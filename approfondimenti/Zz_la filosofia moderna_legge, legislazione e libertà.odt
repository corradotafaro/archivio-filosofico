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nux Libertine O" svg:font-family="'Linux Libertine O'"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officeooo:rsid="0009c459" officeooo:paragraph-rsid="0009c459"/>
    </style:style>
    <style:style style:name="P2" style:family="paragraph" style:parent-style-name="Footnote">
      <style:paragraph-properties fo:margin-top="0.101cm" fo:margin-bottom="0cm" style:contextual-spacing="false" fo:text-align="justify" style:justify-single-word="false"/>
    </style:style>
    <style:style style:name="P3" style:family="paragraph" style:parent-style-name="Standard">
      <style:paragraph-properties fo:margin-top="0.101cm" fo:margin-bottom="0cm" style:contextual-spacing="false"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101cm" fo:margin-bottom="0cm" style:contextual-spacing="false" fo:text-align="justify" style:justify-single-word="false"/>
      <style:text-properties officeooo:paragraph-rsid="0009c459"/>
    </style:style>
    <style:style style:name="P6" style:family="paragraph" style:parent-style-name="Standard">
      <style:paragraph-properties fo:margin-top="0.199cm" fo:margin-bottom="0cm" style:contextual-spacing="false" fo:text-align="justify" style:justify-single-word="false"/>
      <style:text-properties officeooo:paragraph-rsid="0009c459"/>
    </style:style>
    <style:style style:name="P7" style:family="paragraph" style:parent-style-name="Standard">
      <style:paragraph-properties fo:margin-top="0.199cm" fo:margin-bottom="0cm" style:contextual-spacing="false" fo:text-align="justify" style:justify-single-word="false"/>
      <style:text-properties officeooo:paragraph-rsid="000d4ff4"/>
    </style:style>
    <style:style style:name="P8" style:family="paragraph" style:parent-style-name="Standard">
      <style:paragraph-properties fo:margin-top="0.101cm" fo:margin-bottom="0cm" style:contextual-spacing="false" fo:text-align="justify" style:justify-single-word="false"/>
      <style:text-properties officeooo:paragraph-rsid="000d4ff4"/>
    </style:style>
    <style:style style:name="P9" style:family="paragraph" style:parent-style-name="Standard">
      <style:paragraph-properties fo:margin-top="0cm" fo:margin-bottom="0cm" style:contextual-spacing="false" fo:text-align="justify" style:justify-single-word="false"/>
      <style:text-properties officeooo:paragraph-rsid="000d4ff4"/>
    </style:style>
    <style:style style:name="P10" style:family="paragraph" style:parent-style-name="Standard">
      <style:paragraph-properties fo:text-align="justify" style:justify-single-word="false"/>
      <style:text-properties officeooo:paragraph-rsid="000d4ff4"/>
    </style:style>
    <style:style style:name="P11" style:family="paragraph" style:parent-style-name="Standard">
      <style:paragraph-properties fo:margin-top="0.199cm" fo:margin-bottom="0cm" style:contextual-spacing="false" fo:text-align="justify" style:justify-single-word="false"/>
    </style:style>
    <style:style style:name="P12" style:family="paragraph" style:parent-style-name="Standard">
      <style:paragraph-properties fo:margin-top="0.199cm" fo:margin-bottom="0cm" style:contextual-spacing="false" fo:text-align="center" style:justify-single-word="false"/>
      <style:text-properties style:font-name="Linux Libertine O" fo:font-size="15pt" fo:font-style="normal" officeooo:paragraph-rsid="0009c459" style:font-size-asian="15pt" style:font-style-asian="normal" style:font-size-complex="15pt" style:font-style-complex="normal"/>
    </style:style>
    <style:style style:name="P13" style:family="paragraph" style:parent-style-name="Standard">
      <style:paragraph-properties fo:text-align="center" style:justify-single-word="false"/>
      <style:text-properties style:font-name="Linux Libertine O" fo:font-size="15pt" style:font-size-asian="15pt" style:font-size-complex="15pt"/>
    </style:style>
    <style:style style:name="P14" style:family="paragraph" style:parent-style-name="Standard">
      <style:text-properties officeooo:paragraph-rsid="000d4ff4"/>
    </style:style>
    <style:style style:name="P15" style:family="paragraph" style:parent-style-name="Standard">
      <style:paragraph-properties fo:margin-top="0.199cm" fo:margin-bottom="0cm" style:contextual-spacing="false" fo:text-align="center" style:justify-single-word="false"/>
      <style:text-properties style:font-name="Linux Libertine O" fo:font-size="15pt" officeooo:paragraph-rsid="000d4ff4" style:font-size-asian="15pt" style:font-size-complex="15pt"/>
    </style:style>
    <style:style style:name="P16" style:family="paragraph" style:parent-style-name="Standard">
      <style:paragraph-properties fo:text-align="justify" style:justify-single-word="false"/>
      <style:text-properties fo:font-size="13pt" officeooo:paragraph-rsid="00080165" style:font-size-asian="13pt" style:font-size-complex="13pt"/>
    </style:style>
    <style:style style:name="P17" style:family="paragraph" style:parent-style-name="Standard">
      <style:paragraph-properties fo:margin-top="0.199cm" fo:margin-bottom="0cm" style:contextual-spacing="false" fo:text-align="justify" style:justify-single-word="false"/>
      <style:text-properties officeooo:paragraph-rsid="000f0f36"/>
    </style:style>
    <style:style style:name="T1" style:family="text">
      <style:text-properties fo:font-weight="bold" style:font-weight-asian="bold" style:font-weight-complex="bold"/>
    </style:style>
    <style:style style:name="T2" style:family="text">
      <style:text-properties fo:font-weight="bold" officeooo:rsid="000ed030" style:font-weight-asian="bold" style:font-weight-complex="bold"/>
    </style:style>
    <style:style style:name="T3" style:family="text">
      <style:text-properties fo:font-weight="bold" officeooo:rsid="00080165" style:font-weight-asian="bold" style:font-weight-complex="bold"/>
    </style:style>
    <style:style style:name="T4" style:family="text">
      <style:text-properties officeooo:rsid="00073fa9"/>
    </style:style>
    <style:style style:name="T5" style:family="text">
      <style:text-properties officeooo:rsid="0009c459"/>
    </style:style>
    <style:style style:name="T6" style:family="text">
      <style:text-properties fo:font-style="italic" style:font-style-asian="italic" style:font-style-complex="italic"/>
    </style:style>
    <style:style style:name="T7" style:family="text">
      <style:text-properties fo:font-style="italic" officeooo:rsid="0006c881" style:font-style-asian="italic" style:font-style-complex="italic"/>
    </style:style>
    <style:style style:name="T8" style:family="text">
      <style:text-properties officeooo:rsid="000d4ff4"/>
    </style:style>
    <style:style style:name="T9" style:family="text">
      <style:text-properties officeooo:rsid="000d5c8c"/>
    </style:style>
    <style:style style:name="T10" style:family="text">
      <style:text-properties fo:font-size="13pt" style:font-size-asian="13pt" style:font-size-complex="13pt"/>
    </style:style>
    <style:style style:name="T11"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Legge, Legislazione e Libertà:</text:span><text:span text:style-name="T3"> dall’antichità al positivismo legale.</text:span></text:p>
      <text:p text:style-name="P6">Locke e Kant sostengono che non possa esserci libertà senza un quadro normativo, poiché la regola protegge il diritto del singolo. <text:span text:style-name="T5">Entrambi </text:span>rappresentano una tradizione di pensiero che considera la legge e la libertà come elementi reciprocamente necessari.</text:p>
      <text:p text:style-name="P5">In questa prospettiva, la libertà non può sussistere senza un quadro normativo ben definito, poiché è proprio la regola giuridica a fungere da scudo e a proteggere il diritto del singolo da possibili interferenze o soprusi.</text:p>
      <text:p text:style-name="P5">Questa visione si inserisce nel più ampio dibattito sulla tensione filosofica tra norma e autonomia individuale.</text:p>
      <text:p text:style-name="P6">Al contrario, altri pensatori, tra cui Hobbes<text:note text:id="ftn1" text:note-class="footnote"><text:note-citation>1</text:note-citation><text:note-body><text:p text:style-name="P1">Precursore del positivismo giuridico o giuspositivismo che si ientifica in quella dottrina di filosofia del diritto, la quale considera come unico possibile diritto il diritto positivo, ossia quello posto dal legislatore umano.</text:p></text:note-body></text:note> e Bentham<text:note text:id="ftn2" text:note-class="footnote"><text:note-citation>2</text:note-citation><text:note-body><text:p text:style-name="P2">Fortemente avverso al giusnaturalismo, sostenne la codificazione del diritto ed elaborò una compiuta teoria delle garanzie costituzionali.</text:p></text:note-body></text:note>, <text:span text:style-name="T5">hanno</text:span> una visione opposta, interpretando ogni restrizione legale come una limitazione intrinseca alla volontà personale.</text:p>
      <text:p text:style-name="P12">In che modo le diverse concezioni di diritto influenzano la società?</text:p>
      <text:p text:style-name="P7">Le diverse concezioni di diritto influenzano la società plasmando il modo in cui i cittadini percepiscono il rapporto tra il proprio <text:span text:style-name="T11">potere d'agire</text:span> e l<text:span text:style-name="T1">'</text:span><text:span text:style-name="T11">autorità dello Stato</text:span>. In base alla tradizione filosofica adottata, l'impatto sulla struttura sociale cambia radicalmente:</text:p>
      <text:p text:style-name="P8"><text:soft-page-break/><text:span text:style-name="T6">Il diritto come garante della libertà (Locke e Kant)</text:span>: In una società che segue questa visione, il quadro normativo non è percepito come un ostacolo, ma come la condizione necessaria per l'esistenza stessa della libertà. La legge serve a proteggere il diritto del singolo da possibili interferenze esterne, creando un ambiente sociale in cui l'autonomia individuale è preservata proprio grazie alle regole.</text:p>
      <text:p text:style-name="P8"><text:span text:style-name="T6">Il diritto come limitazione (Hobbes e Bentham):</text:span> Se prevale questa prospettiva, ogni norma giuridica viene vista come una <text:span text:style-name="T11">limitazione intrinseca</text:span> alla volontà personale.</text:p>
      <text:p text:style-name="P9">In questo contesto, la società è intesa come un sistema in cui l'individuo accetta di restringere la propria libertà naturale in favore di una regolamentazione legale, vedendo nel diritto un confine necessario ma limitante al proprio agire.</text:p>
      <text:p text:style-name="P7">In definitiva, l'influenza sulla società si manifesta nella <text:span text:style-name="T11">tensione filosofica</text:span><text:span text:style-name="T10"> </text:span>tra norma e autonomia: la concezione di diritto prevalente determina se i cittadini considerano le leggi come uno strumento di emancipazione e protezione o come un vincolo alla propria sovranità individuale.</text:p>
      <text:p text:style-name="P15">In che modo la legge protegge i diritti per Kant?</text:p>
      <text:p text:style-name="P7">Per Kant, la legge protegge i diritti del singolo in quanto costituisce la condizione essenziale e imprescindibile per l'esistenza stessa della libertà. In questa visione, <text:span text:style-name="T11">legge e libertà non sono concetti opposti, ma elementi reciprocamente necessari</text:span><text:span text:style-name="T10">.</text:span></text:p>
      <text:p text:style-name="P14"><text:span text:style-name="T7"/></text:p>
      <text:p text:style-name="P14"><text:soft-page-break/><text:span text:style-name="T7">L</text:span><text:span text:style-name="T6">a protezione dei diritti per Kant si realizza attraverso:</text:span></text:p>
      <text:p text:style-name="P7"><text:span text:style-name="T11">L'istituzione di un quadro normativo</text:span>: Kant sostiene che non possa esserci vera libertà al di fuori di un sistema di regole. La legge definisce il perimetro entro il quale l'individuo può agire, trasformando la libertà da un concetto astratto a un diritto concreto e tutelato.</text:p>
      <text:p text:style-name="P3"><text:span text:style-name="T11">La funzione di "scudo" della regola</text:span><text:span text:style-name="T1">:</text:span> La norma giuridica agisce come una protezione per il singolo, impedendo che l'arbitrio degli altri o potenziali soprusi interferiscano con la sua sfera di autonomia.</text:p>
      <text:p text:style-name="P3"><text:span text:style-name="T11">Il superamento della tensione tra norma e autonomia:</text:span> A differenza di pensatori come Hobbes o Bentham, che vedono nella legge un limite alla volontà, per Kant la legge è lo strumento che <text:span text:style-name="T11">garantisce il diritto individuale</text:span>, permettendo una coesistenza pacifica e libera tra i consociati.</text:p>
      <text:p text:style-name="P11"><text:span text:style-name="T8">P</text:span>er Kant la legge protegge i diritti perché è l'unico strumento capace di <text:span text:style-name="T11">garantire un'autonomia reale</text:span> all'interno di una società organizzata, impedendo che la libertà del singolo sia calpestata da quella altrui.</text:p>
      <text:p text:style-name="P4"/>
      <text:p text:style-name="P13"><text:span text:style-name="T4">I</text:span>n che modo la visione di Hobbes differisce da quella di Kant?</text:p>
      <text:p text:style-name="P4"/>
      <text:p text:style-name="P10">La visione di <text:span text:style-name="T11">Hobbes</text:span> differisce radicalmente da quella di <text:span text:style-name="T11">Kant</text:span> nel modo in cui viene interpretato il rapporto tra la norma giuridica e la libertà individuale.</text:p>
      <text:p text:style-name="P8">Mentre per Kant la legge e la libertà sono elementi reciprocamente necessari, per Hobbes esse rappresentano <text:soft-page-break/>una contrapposizione, dove l'una limita l'altra. Ecco le differenze principali emerse dalle fonti e dalla nostra conversazione:</text:p>
      <text:p text:style-name="P7"><text:span text:style-name="T11">Necessità vs. Limitazione:</text:span> Kant sostiene che non possa esistere vera libertà senza un quadro normativo, poiché la regola ha la funzione essenziale di proteggere il diritto del singolo. Al contrario, Hobbes interpreta ogni restrizione legale come una limitazione intrinseca alla volontà personale, vedendo nella legge un confine all'agire individuale.</text:p>
      <text:p text:style-name="P7"><text:span text:style-name="T11">La funzione della legge</text:span><text:span text:style-name="T10">:</text:span> Nella prospettiva kantiana, la legge agisce come uno scudo che garantisce l'autonomia reale all'interno della società, impedendo i soprusi. Per Hobbes, invece, la legge è lo strumento attraverso cui l'individuo accetta di restringere la propria libertà naturale in favore di una regolamentazione legale, percependo la norma come un vincolo necessario ma limitante.</text:p>
      <text:p text:style-name="P17"><text:span text:style-name="T11">L'origine della libertà</text:span><text:span text:style-name="T1">:</text:span> Per Kant, la libertà è un concetto che si realizza e si tutela proprio attraverso il diritto. Per Hobbes, la libertà sembra essere qualcosa di pre-esistente alla legge che la norma va inevitabilmente a decurtare o regolare.</text:p>
      <text:p text:style-name="P17"><text:span text:style-name="T9">L</text:span>a divergenza risiede nella tensione filosofica tra norma e autonomia: se per Kant la legge è la condizione che rende possibile la libertà, per Hobbes la legge è ciò che ne segna il lim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nux Libertine O" svg:font-family="'Linux Libertine O'"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5-23T17:57:07.100230948</meta:creation-date>
    <dc:date>2026-05-24T17:50:44.745087761</dc:date>
    <dc:creator>corrado tafaro</dc:creator>
    <meta:editing-duration>PT31M28S</meta:editing-duration>
    <meta:editing-cycles>4</meta:editing-cycles>
    <meta:generator>LibreOffice/24.2.7.2$Linux_X86_64 LibreOffice_project/420$Build-2</meta:generator>
    <meta:document-statistic meta:table-count="0" meta:image-count="0" meta:object-count="0" meta:page-count="4" meta:paragraph-count="27" meta:word-count="842" meta:character-count="5606" meta:non-whitespace-character-count="4791"/>
  </office:meta>
</office:document-meta>
</file>