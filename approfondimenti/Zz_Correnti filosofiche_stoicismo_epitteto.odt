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a709" style:font-size-asian="12pt" style:font-size-complex="12pt"/>
    </style:style>
    <style:style style:name="P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0ea709" style:font-size-asian="12pt" style:font-style-asian="normal" style:font-weight-asian="normal" style:font-size-complex="12pt" style:font-style-complex="normal" style:font-weight-complex="normal"/>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0ea709" style:font-size-asian="12pt" style:font-style-asian="normal" style:font-size-complex="12pt" style:font-style-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paragraph-rsid="000ea709"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00%" fo:text-align="center" style:justify-single-word="false"/>
      <style:text-properties fo:font-size="9pt" officeooo:paragraph-rsid="0011d62e" style:font-size-asian="9pt" style:font-size-complex="9pt"/>
    </style:style>
    <style:style style:name="P7" style:family="paragraph" style:parent-style-name="Text_20_body">
      <style:paragraph-properties fo:line-height="100%" fo:text-align="justify" style:justify-single-word="false"/>
      <style:text-properties fo:font-size="9pt" style:font-size-asian="9pt" style:font-size-complex="9pt"/>
    </style:style>
    <style:style style:name="P8" style:family="paragraph" style:parent-style-name="Text_20_body">
      <style:paragraph-properties fo:margin-top="0cm" fo:margin-bottom="0cm" style:contextual-spacing="false" fo:line-height="100%" fo:text-align="justify" style:justify-single-word="false"/>
      <style:text-properties fo:font-size="9pt" style:font-size-asian="9pt" style:font-size-complex="9pt"/>
    </style:style>
    <style:style style:name="P9" style:family="paragraph" style:parent-style-name="Text_20_body">
      <style:paragraph-properties fo:margin-top="0.101cm" fo:margin-bottom="0cm" style:contextual-spacing="false" fo:line-height="100%" fo:text-align="justify" style:justify-single-word="false"/>
    </style:style>
    <style:style style:name="P10" style:family="paragraph" style:parent-style-name="Footnote">
      <style:paragraph-properties fo:text-align="justify" style:justify-single-word="false"/>
    </style:style>
    <style:style style:name="P11" style:family="paragraph" style:parent-style-name="Heading_20_3">
      <style:paragraph-properties fo:line-height="115%" fo:text-align="justify" style:justify-single-word="false"/>
      <style:text-properties style:font-name="Noto Sans1" fo:font-size="12pt" officeooo:paragraph-rsid="000ea709" style:font-size-asian="12pt" style:font-size-complex="12pt"/>
    </style:style>
    <style:style style:name="P12" style:family="paragraph" style:parent-style-name="Heading_20_3">
      <style:text-properties style:font-name="Noto Sans1" fo:font-size="12pt" officeooo:paragraph-rsid="00137b5a" style:font-size-asian="12pt" style:font-size-complex="12pt"/>
    </style:style>
    <style:style style:name="P13" style:family="paragraph" style:parent-style-name="Quotations">
      <style:paragraph-properties fo:margin-top="0.3cm" fo:margin-bottom="0.199cm" style:contextual-spacing="false" fo:line-height="115%" fo:text-align="center" style:justify-single-word="false"/>
      <style:text-properties officeooo:paragraph-rsid="00137b5a"/>
    </style:style>
    <style:style style:name="P14" style:family="paragraph" style:parent-style-name="Quotations">
      <style:paragraph-properties fo:margin-top="0.101cm" fo:margin-bottom="0cm" style:contextual-spacing="false" fo:line-height="115%"/>
      <style:text-properties style:font-name="Noto Sans1" fo:font-size="12pt" fo:font-weight="normal" officeooo:paragraph-rsid="00137b5a"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c6f5c9" officeooo:paragraph-rsid="00137b5a"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cm" style:contextual-spacing="false" fo:line-height="115%" fo:text-align="justify" style:justify-single-word="false"/>
      <style:text-properties style:font-name="Noto Sans1" officeooo:paragraph-rsid="00137b5a"/>
    </style:style>
    <style:style style:name="P17"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Noto Sans1" officeooo:paragraph-rsid="00137b5a"/>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1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2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2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2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2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7b5a"/>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2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27"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2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29"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3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7b5a" style:font-size-asian="12pt" style:font-size-complex="12pt"/>
    </style:style>
    <style:style style:name="P36" style:family="paragraph" style:parent-style-name="Standard">
      <style:paragraph-properties fo:margin-top="0.199cm" fo:margin-bottom="0cm" style:contextual-spacing="false" fo:line-height="115%" fo:text-align="justify" style:justify-single-word="false"/>
      <style:text-properties style:font-name="Noto Sans1" fo:font-size="12pt" fo:font-weight="bold" officeooo:rsid="02397a74" officeooo:paragraph-rsid="00137b5a" style:font-size-asian="12pt" style:font-weight-asian="bold" style:font-size-complex="12pt" style:font-weight-complex="bold"/>
    </style:style>
    <style:style style:name="P37"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4pt" officeooo:paragraph-rsid="00137b5a" style:font-size-asian="14pt" style:font-size-complex="14pt"/>
    </style:style>
    <style:style style:name="T1" style:family="text">
      <style:text-properties style:font-name="Noto Sans1"/>
    </style:style>
    <style:style style:name="T2" style:family="text">
      <style:text-properties style:font-name="Noto Sans1" fo:font-style="italic" style:font-style-asian="italic" style:font-style-complex="italic"/>
    </style:style>
    <style:style style:name="T3" style:family="text">
      <style:text-properties style:font-name="Noto Sans1" fo:font-size="12pt" fo:font-style="normal" fo:font-weight="normal" officeooo:rsid="002bb611" style:font-size-asian="12pt" style:font-style-asian="normal" style:font-weight-asian="normal" style:font-size-complex="12pt" style:font-style-complex="normal" style:font-weight-complex="normal"/>
    </style:style>
    <style:style style:name="T4" style:family="text">
      <style:text-properties style:font-name="Noto Sans1" fo:font-size="11pt" officeooo:rsid="00356da2" style:font-size-asian="11pt" style:font-size-complex="11pt"/>
    </style:style>
    <style:style style:name="T5" style:family="text">
      <style:text-properties style:font-name="Noto Sans1" officeooo:rsid="0030c1a7"/>
    </style:style>
    <style:style style:name="T6" style:family="text">
      <style:text-properties fo:font-style="normal" style:font-style-asian="normal" style:font-style-complex="normal"/>
    </style:style>
    <style:style style:name="T7" style:family="text">
      <style:text-properties fo:font-style="normal" officeooo:rsid="0028aa31" style:font-style-asian="normal" style:font-style-complex="normal"/>
    </style:style>
    <style:style style:name="T8" style:family="text">
      <style:text-properties fo:font-style="normal" officeooo:rsid="001c02ae" style:font-style-asian="normal" style:font-style-complex="normal"/>
    </style:style>
    <style:style style:name="T9" style:family="text">
      <style:text-properties fo:font-style="normal" officeooo:rsid="0033686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ddc89a" style:font-style-asian="normal" style:font-weight-asian="normal" style:font-style-complex="normal" style:font-weight-complex="normal"/>
    </style:style>
    <style:style style:name="T12" style:family="text">
      <style:text-properties fo:font-style="normal" fo:font-weight="normal" officeooo:rsid="0030c1a7" style:font-style-asian="normal" style:font-weight-asian="normal" style:font-style-complex="normal" style:font-weight-complex="normal"/>
    </style:style>
    <style:style style:name="T13" style:family="text">
      <style:text-properties fo:font-style="normal" fo:font-weight="normal" officeooo:rsid="002bb611" style:font-style-asian="normal" style:font-weight-asian="normal" style:font-style-complex="normal" style:font-weight-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29c3ce"/>
    </style:style>
    <style:style style:name="T18" style:family="text">
      <style:text-properties officeooo:rsid="01d5c377"/>
    </style:style>
    <style:style style:name="T19" style:family="text">
      <style:text-properties officeooo:rsid="01d9d0ee"/>
    </style:style>
    <style:style style:name="T20" style:family="text">
      <style:text-properties style:use-window-font-color="true" loext:opacity="0%" fo:background-color="transparent" loext:char-shading-value="0"/>
    </style:style>
    <style:style style:name="T21" style:family="text">
      <style:text-properties fo:font-weight="bold"/>
    </style:style>
    <style:style style:name="T22" style:family="text">
      <style:text-properties fo:font-size="9pt" style:font-size-asian="9pt" style:font-size-complex="9pt"/>
    </style:style>
    <style:style style:name="T23" style:family="text">
      <style:text-properties fo:font-size="9pt" officeooo:rsid="0011d62e" style:font-size-asian="9pt" style:font-size-complex="9pt"/>
    </style:style>
    <style:style style:name="T24" style:family="text">
      <style:text-properties officeooo:rsid="00356da2"/>
    </style:style>
    <style:style style:name="T25" style:family="text">
      <style:text-properties fo:font-size="12pt" fo:font-style="normal" fo:font-weight="normal" officeooo:rsid="002bb611"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186b32"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df46ad"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e0caf7"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30c1a7"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157589f"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ddc89a" style:font-size-asian="12pt" style:font-style-asian="normal" style:font-weight-asian="normal" style:font-size-complex="12pt" style:font-style-complex="normal" style:font-weight-complex="normal"/>
    </style:style>
    <style:style style:name="T34" style:family="text">
      <style:text-properties fo:font-size="12pt" style:font-size-asian="12pt" style:font-size-complex="12pt"/>
    </style:style>
    <style:style style:name="T35" style:family="text">
      <style:text-properties fo:font-size="12pt" fo:font-style="italic" fo:font-weight="normal" officeooo:rsid="002bb611" style:font-size-asian="12pt" style:font-style-asian="italic" style:font-weight-asian="normal" style:font-size-complex="12pt" style:font-style-complex="italic" style:font-weight-complex="normal"/>
    </style:style>
    <style:style style:name="T36" style:family="text">
      <style:text-properties officeooo:rsid="00df46ad"/>
    </style:style>
    <style:style style:name="T37" style:family="text">
      <style:text-properties officeooo:rsid="0030c1a7"/>
    </style:style>
    <style:style style:name="T38" style:family="text">
      <style:text-properties fo:font-size="11pt" fo:font-style="italic" fo:font-weight="bold" style:font-size-asian="11pt" style:font-style-asian="italic" style:font-weight-asian="bold" style:font-size-complex="11pt" style:font-style-complex="italic" style:font-weight-complex="bold"/>
    </style:style>
    <style:style style:name="T39" style:family="text">
      <style:text-properties fo:font-size="11pt" fo:font-style="italic" fo:font-weight="bold" officeooo:rsid="002bb611" style:font-size-asian="11pt" style:font-style-asian="italic" style:font-weight-asian="bold" style:font-size-complex="11pt" style:font-style-complex="italic" style:font-weight-complex="bold"/>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fo:font-weight="normal" officeooo:rsid="002bb611" style:font-size-asian="11pt" style:font-style-asian="italic" style:font-weight-asian="normal" style:font-size-complex="11pt" style:font-style-complex="italic" style:font-weight-complex="normal"/>
    </style:style>
    <style:style style:name="T42" style:family="text">
      <style:text-properties fo:font-size="11pt" officeooo:rsid="00356da2" style:font-size-asian="11pt" style:font-size-complex="11pt"/>
    </style:style>
    <style:style style:name="T43" style:family="text">
      <style:text-properties style:font-name="Noto Sans1" fo:font-size="11pt" officeooo:rsid="00356da2" style:font-size-asian="11pt" style:font-size-complex="11pt"/>
    </style:style>
    <style:style style:name="T44" style:family="text">
      <style:text-properties style:font-name="Noto Sans1" fo:font-size="11pt" fo:font-style="italic" fo:font-weight="bold" style:font-size-asian="11pt" style:font-style-asian="italic" style:font-weight-asian="bold" style:font-size-complex="11pt" style:font-style-complex="italic" style:font-weight-complex="bold"/>
    </style:style>
    <style:style style:name="T45" style:family="text">
      <style:text-properties style:font-name="Noto Sans1" fo:font-size="11pt" fo:font-style="italic" fo:font-weight="bold" officeooo:rsid="002bb611" style:font-size-asian="11pt" style:font-style-asian="italic" style:font-weight-asian="bold" style:font-size-complex="11pt" style:font-style-complex="italic" style:font-weight-complex="bold"/>
    </style:style>
    <style:style style:name="T46" style:family="text">
      <style:text-properties style:font-name="Noto Sans1" fo:font-size="11pt" fo:font-style="italic" style:font-size-asian="11pt" style:font-style-asian="italic" style:font-size-complex="11pt" style:font-style-complex="italic"/>
    </style:style>
    <style:style style:name="T47" style:family="text">
      <style:text-properties style:font-name="Noto Sans1" fo:font-size="11pt" fo:font-style="italic" fo:font-weight="normal" officeooo:rsid="002bb611" style:font-size-asian="11pt" style:font-style-asian="italic" style:font-weight-asian="normal" style:font-size-complex="11pt" style:font-style-complex="italic" style:font-weight-complex="normal"/>
    </style:style>
    <style:style style:name="T48" style:family="text">
      <style:text-properties style:font-name="Noto Sans1" fo:font-style="normal" fo:font-weight="normal" style:font-style-asian="normal" style:font-weight-asian="normal" style:font-style-complex="normal" style:font-weight-complex="normal"/>
    </style:style>
    <style:style style:name="T49" style:family="text">
      <style:text-properties style:font-name="Noto Sans1" fo:font-style="normal" fo:font-weight="normal" officeooo:rsid="00ddc89a" style:font-style-asian="normal" style:font-weight-asian="normal" style:font-style-complex="normal" style:font-weight-complex="normal"/>
    </style:style>
    <style:style style:name="T50" style:family="text">
      <style:text-properties style:font-name="Noto Sans1" fo:font-style="normal" fo:font-weight="normal" officeooo:rsid="0030c1a7" style:font-style-asian="normal" style:font-weight-asian="normal" style:font-style-complex="normal" style:font-weight-complex="normal"/>
    </style:style>
    <style:style style:name="T51" style:family="text">
      <style:text-properties style:font-name="Noto Sans1" fo:font-style="normal" fo:font-weight="normal" officeooo:rsid="002bb611" style:font-style-asian="normal" style:font-weight-asian="normal" style:font-style-complex="normal" style:font-weight-complex="normal"/>
    </style:style>
    <style:style style:name="T52" style:family="text">
      <style:text-properties style:font-name="Noto Sans1" fo:font-style="normal" fo:font-weight="normal" officeooo:rsid="00186b32" style:font-style-asian="normal" style:font-weight-asian="normal" style:font-style-complex="normal" style:font-weight-complex="normal"/>
    </style:style>
    <style:style style:name="T53" style:family="text">
      <style:text-properties style:font-name="Noto Sans1" fo:font-style="normal" fo:font-weight="normal" officeooo:rsid="00df46ad" style:font-style-asian="normal" style:font-weight-asian="normal" style:font-style-complex="normal" style:font-weight-complex="normal"/>
    </style:style>
    <style:style style:name="T54" style:family="text">
      <style:text-properties style:font-name="Noto Sans1" fo:font-style="normal" fo:font-weight="normal" officeooo:rsid="00e0caf7" style:font-style-asian="normal" style:font-weight-asian="normal" style:font-style-complex="normal" style:font-weight-complex="normal"/>
    </style:style>
    <style:style style:name="T55" style:family="text">
      <style:text-properties style:font-name="Noto Sans1" fo:font-style="normal" fo:font-weight="normal" officeooo:rsid="0036f345" style:font-style-asian="normal" style:font-weight-asian="normal" style:font-style-complex="normal" style:font-weight-complex="normal"/>
    </style:style>
    <style:style style:name="T56" style:family="text">
      <style:text-properties style:font-name="Noto Sans1" fo:font-style="normal" fo:font-weight="normal" officeooo:rsid="00356da2" style:font-style-asian="normal" style:font-weight-asian="normal" style:font-style-complex="normal" style:font-weight-complex="normal"/>
    </style:style>
    <style:style style:name="T57" style:family="text">
      <style:text-properties style:font-name="Noto Sans1" fo:font-style="normal" fo:font-weight="normal" officeooo:rsid="0157589f" style:font-style-asian="normal" style:font-weight-asian="normal" style:font-style-complex="normal" style:font-weight-complex="normal"/>
    </style:style>
    <style:style style:name="T58" style:family="text">
      <style:text-properties style:font-name="Noto Sans1" fo:font-style="normal" officeooo:rsid="002bb611" style:font-size-asian="12pt" style:font-style-asian="normal" style:font-style-complex="normal"/>
    </style:style>
    <style:style style:name="T59" style:family="text">
      <style:text-properties style:font-name="Noto Sans1" fo:font-style="normal" officeooo:rsid="002bb611" style:font-style-asian="normal" style:font-style-complex="normal"/>
    </style:style>
    <style:style style:name="T60" style:family="text">
      <style:text-properties style:font-name="Noto Sans1" fo:font-style="italic" fo:font-weight="normal" style:font-style-asian="italic" style:font-weight-asian="normal" style:font-style-complex="italic" style:font-weight-complex="normal"/>
    </style:style>
    <style:style style:name="T61" style:family="text">
      <style:text-properties style:font-name="Noto Sans1" fo:font-style="italic" fo:font-weight="normal" officeooo:rsid="002bb611" style:font-style-asian="italic" style:font-weight-asian="normal" style:font-style-complex="italic" style:font-weight-complex="normal"/>
    </style:style>
    <style:style style:name="T62" style:family="text">
      <style:text-properties style:font-name="Noto Sans1" fo:font-style="italic" fo:font-weight="bold" style:font-style-asian="italic" style:font-weight-asian="bold" style:font-style-complex="italic" style:font-weight-complex="bold"/>
    </style:style>
    <style:style style:name="T63" style:family="text">
      <style:text-properties style:font-name="Noto Sans1" fo:font-style="italic" fo:font-weight="bold" officeooo:rsid="002bb611" style:font-style-asian="italic" style:font-weight-asian="bold" style:font-style-complex="italic" style:font-weight-complex="bold"/>
    </style:style>
    <style:style style:name="T64" style:family="text">
      <style:text-properties style:font-name="Noto Sans1" fo:font-style="italic" style:font-style-asian="italic" style:font-style-complex="italic"/>
    </style:style>
    <style:style style:name="T65" style:family="text">
      <style:text-properties style:font-name="Noto Sans1"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style:font-name="Noto Sans1" fo:font-size="12pt" fo:font-style="normal" fo:font-weight="normal" officeooo:rsid="002bb611" style:font-size-asian="12pt" style:font-style-asian="normal" style:font-weight-asian="normal" style:font-size-complex="12pt" style:font-style-complex="normal" style:font-weight-complex="normal"/>
    </style:style>
    <style:style style:name="T67" style:family="text">
      <style:text-properties style:font-name="Noto Sans1" fo:font-size="12pt" fo:font-style="normal" fo:font-weight="normal" officeooo:rsid="00186b32" style:font-size-asian="12pt" style:font-style-asian="normal" style:font-weight-asian="normal" style:font-size-complex="12pt" style:font-style-complex="normal" style:font-weight-complex="normal"/>
    </style:style>
    <style:style style:name="T68" style:family="text">
      <style:text-properties style:font-name="Noto Sans1" fo:font-size="12pt" fo:font-style="normal" fo:font-weight="normal" officeooo:rsid="00df46ad" style:font-size-asian="12pt" style:font-style-asian="normal" style:font-weight-asian="normal" style:font-size-complex="12pt" style:font-style-complex="normal" style:font-weight-complex="normal"/>
    </style:style>
    <style:style style:name="T69" style:family="text">
      <style:text-properties style:font-name="Noto Sans1" fo:font-size="12pt" fo:font-style="normal" fo:font-weight="normal" officeooo:rsid="00e0caf7" style:font-size-asian="12pt" style:font-style-asian="normal" style:font-weight-asian="normal" style:font-size-complex="12pt" style:font-style-complex="normal" style:font-weight-complex="normal"/>
    </style:style>
    <style:style style:name="T70" style:family="text">
      <style:text-properties style:font-name="Noto Sans1" fo:font-size="12pt" fo:font-style="normal" fo:font-weight="normal" officeooo:rsid="0036f345" style:font-size-asian="12pt" style:font-style-asian="normal" style:font-weight-asian="normal" style:font-size-complex="12pt" style:font-style-complex="normal" style:font-weight-complex="normal"/>
    </style:style>
    <style:style style:name="T71" style:family="text">
      <style:text-properties style:font-name="Noto Sans1" fo:font-size="12pt" fo:font-style="normal" fo:font-weight="normal" officeooo:rsid="00356da2" style:font-size-asian="12pt" style:font-style-asian="normal" style:font-weight-asian="normal" style:font-size-complex="12pt" style:font-style-complex="normal" style:font-weight-complex="normal"/>
    </style:style>
    <style:style style:name="T72" style:family="text">
      <style:text-properties style:font-name="Noto Sans1" fo:font-size="12pt" fo:font-style="normal" fo:font-weight="normal" officeooo:rsid="0030c1a7" style:font-size-asian="12pt" style:font-style-asian="normal" style:font-weight-asian="normal" style:font-size-complex="12pt" style:font-style-complex="normal" style:font-weight-complex="normal"/>
    </style:style>
    <style:style style:name="T73" style:family="text">
      <style:text-properties style:font-name="Noto Sans1" fo:font-size="12pt" fo:font-style="normal" fo:font-weight="normal" officeooo:rsid="0157589f" style:font-size-asian="12pt" style:font-style-asian="normal" style:font-weight-asian="normal" style:font-size-complex="12pt" style:font-style-complex="normal" style:font-weight-complex="normal"/>
    </style:style>
    <style:style style:name="T74" style:family="text">
      <style:text-properties style:font-name="Noto Sans1" fo:font-size="12pt" fo:font-style="normal" fo:font-weight="normal" officeooo:rsid="00ddc89a" style:font-size-asian="12pt" style:font-style-asian="normal" style:font-weight-asian="normal" style:font-size-complex="12pt" style:font-style-complex="normal" style:font-weight-complex="normal"/>
    </style:style>
    <style:style style:name="T75" style:family="text">
      <style:text-properties style:font-name="Noto Sans1" fo:font-size="12pt" fo:font-style="normal" fo:font-weight="normal" officeooo:rsid="00137b5a" style:font-size-asian="12pt" style:font-style-asian="normal" style:font-weight-asian="normal" style:font-size-complex="12pt" style:font-style-complex="normal" style:font-weight-complex="normal"/>
    </style:style>
    <style:style style:name="T76" style:family="text">
      <style:text-properties style:font-name="Noto Sans1"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style:font-name="Noto Sans1" fo:font-size="12pt" fo:font-style="italic" fo:font-weight="normal" officeooo:rsid="002bb611" style:font-size-asian="12pt" style:font-style-asian="italic" style:font-weight-asian="normal" style:font-size-complex="12pt" style:font-style-complex="italic" style:font-weight-complex="normal"/>
    </style:style>
    <style:style style:name="T78" style:family="text">
      <style:text-properties style:font-name="Noto Sans1" fo:font-size="12pt" fo:font-style="italic" fo:font-weight="bold" style:font-size-asian="12pt" style:font-style-asian="italic" style:font-weight-asian="bold" style:font-size-complex="12pt" style:font-style-complex="italic" style:font-weight-complex="bold"/>
    </style:style>
    <style:style style:name="T79" style:family="text">
      <style:text-properties style:font-name="Noto Sans1" fo:font-size="12pt" fo:font-style="italic" fo:font-weight="bold" officeooo:rsid="002bb611" style:font-size-asian="12pt" style:font-style-asian="italic" style:font-weight-asian="bold" style:font-size-complex="12pt" style:font-style-complex="italic" style:font-weight-complex="bold"/>
    </style:style>
    <style:style style:name="T80" style:family="text">
      <style:text-properties style:font-name="Noto Sans1" fo:font-size="12pt" fo:font-style="italic" style:font-size-asian="12pt" style:font-style-asian="italic" style:font-size-complex="12pt" style:font-style-complex="italic"/>
    </style:style>
    <style:style style:name="T81" style:family="text">
      <style:text-properties style:font-name="Noto Sans1" fo:font-size="12pt" officeooo:rsid="00356da2" style:font-size-asian="12pt" style:font-size-complex="12pt"/>
    </style:style>
    <style:style style:name="T82" style:family="text">
      <style:text-properties style:font-name="Noto Sans1" officeooo:rsid="00356d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8">E</text:span><text:span text:style-name="T6">pitteto</text:span></text:p>
      <text:p text:style-name="P13"><text:span text:style-name="Citation"><text:span text:style-name="T81">“Puoi incatenarmi le gambe ma non la mia volontà”</text:span></text:span></text:p>
      <text:p text:style-name="P18"><text:span text:style-name="Citation"><text:span text:style-name="T65">Epitteto (</text:span></text:span><text:span text:style-name="Citation"><text:span text:style-name="T74">d.C</text:span></text:span><text:span text:style-name="Citation"><text:span text:style-name="T65">. 5</text:span></text:span><text:span text:style-name="Citation"><text:span text:style-name="T75">0</text:span></text:span><text:span text:style-name="Citation"><text:span text:style-name="T65"> – 13</text:span></text:span><text:span text:style-name="Citation"><text:span text:style-name="T75">0</text:span></text:span><text:span text:style-name="Citation"><text:span text:style-name="T65"> d.C.) nacque come schiavo nell'Impero Romano, ma ottenne la libertà da adolescente. Studiò filosofia stoica fin dalla tenera età, tenendo poi lezioni sullo stoicismo a Roma. Fu costretto a lasciare la città nel '89 d.C. dopo che l'imperatore Domiziano bandì tutti i filosofi dall'Italia. Fondò quindi la sua scuola a Nicopoli, sulla costa adriatica in Grecia, dove insegnò e tenne conferenze fino alla sua morte, avvenuta intorno al 135. </text:span></text:span></text:p>
      <text:p text:style-name="P18"><text:span text:style-name="Citation"><text:span text:style-name="T65">La principale raccolta dell'insegnamento di Epitteto è l'opera in quattro volumi </text:span></text:span><text:span text:style-name="Citation"><text:span text:style-name="T72">denominata i </text:span></text:span><text:span text:style-name="Citation"><text:span text:style-name="T65">“</text:span></text:span><text:span text:style-name="Citation"><text:span text:style-name="T76">Discorsi</text:span></text:span><text:span text:style-name="Citation"><text:span text:style-name="T65">” </text:span></text:span><text:span text:style-name="Citation"><text:span text:style-name="T3">che forniscono una guida al pensiero del filosofo.</text:span></text:span></text:p>
      <text:h text:style-name="P12" text:outline-level="3"><text:bookmark-start text:name="__RefHeading___Toc18726_2330915828"/>La sua teoria della realtà e della natura umana<text:bookmark-end text:name="__RefHeading___Toc18726_2330915828"/></text:h>
      <text:p text:style-name="P30">Epitteto credeva che gli esseri umani fossero esseri razionali che vivevano in un universo razionale governato da una provvidenza divina. La sua filosofia incoraggiava ad allineare la propria volontà con quella divina, accettando ciò che accade come espressione di un disegno superiore. Si riferisce all'ordine fondamentale di tutte le cose, <text:span text:style-name="T24">ad un progetto intelligente dietro gli eventi e le circostanze e al</text:span> principio razionale che sta alla base dell'universo, come Zeus, Dio o gli dei.</text:p>
      <text:p text:style-name="P16"><text:soft-page-break/><text:span text:style-name="Citation"><text:span text:style-name="T3">Per quanto riguarda gli esseri umani, la capacità di scegliere è la loro caratteristica fondamentale, l'essenza della loro natura. Il principio di causa ed effetto opera in natura, ma le nostre decisioni sono libere da costrizioni esterne. Così Epitteto sarebbe oggi chiamato un compatibilista</text:span></text:span><text:span text:style-name="Citation"><text:span text:style-name="T3"><text:note text:id="ftn35" text:note-class="footnote"><text:note-citation>1</text:note-citation><text:note-body><text:p text:style-name="P10"><text:span text:style-name="T36">Il</text:span> compatibilismo è la teoria filosofica secondo cui il libero arbitrio dell'uomo è conciliabile con il determinismo universale. <text:span text:style-name="T36">In </text:span>filosofia, indica quella concezione per cui in natura nulla avviene per caso, invece tutto accade secondo rapporti di causa-effetto e quindi per necessità.</text:p></text:note-body></text:note></text:span></text:span><text:span text:style-name="Citation"><text:span text:style-name="T3">; </text:span></text:span><text:span text:style-name="Citation"><text:span text:style-name="T67">c</text:span></text:span><text:span text:style-name="Citation"><text:span text:style-name="T3">rede che libertà e determinismo siano compatibili. La cosa più importante è </text:span></text:span><text:span text:style-name="Citation"><text:span text:style-name="T68">credere </text:span></text:span><text:span text:style-name="Citation"><text:span text:style-name="T3">che le nostre convinzioni, i nostri atteggiamenti, le nostre intenzioni e le nostre azioni siano veramente nostre. </text:span></text:span><text:span text:style-name="Citation"><text:span text:style-name="T68">Q</text:span></text:span><text:span text:style-name="Citation"><text:span text:style-name="T3">ueste convinzioni, </text:span></text:span><text:span text:style-name="Citation"><text:span text:style-name="T68">probabilmente</text:span></text:span><text:span text:style-name="Citation"><text:span text:style-name="T3"> derivavano in gran parte dalle sue esperienze di schiavo, dove era costretto a fare molte cose, ma libero di pensare con la propria testa.</text:span></text:span></text:p>
      <text:h text:style-name="P12" text:outline-level="3"><text:bookmark-start text:name="__RefHeading___Toc18728_2330915828"/>Il problema della vita e la sua soluzione<text:bookmark-end text:name="__RefHeading___Toc18728_2330915828"/></text:h>
      <text:p text:style-name="P28">Il problema fondamentale nella vita umana, è che soffriamo perché non riusciamo a distinguere tra ciò che è sotto il nostro controllo e ciò che non lo è. Le cose sotto il nostro controllo includono i nostri giudizi, le nostre intenzioni, i nostri desideri e le nostre avversioni: il mondo interno della mente governato dalla nostra volontà. Ma tutto il resto di noi: il nostro corpo, i nostri beni, le nostre relazioni, la nostra ricchezza, la nostra <text:soft-page-break/>fama, la nostra reputazione, dipend<text:span text:style-name="T37">ono</text:span> da fattori in gran parte al di fuori del nostro controllo.</text:p>
      <text:p text:style-name="P30">Causa ed effetto governano il mondo esterno. Confondere il mondo interno della nostra mente, su cui abbiamo il controllo, con il mondo esterno, che possiamo solo influenzare ma non controllare, causa molta sofferenza. Dobbiamo allenarci a desiderare solo ciò che è in nostro potere e ad accettare ciò che non lo è.</text:p>
      <text:p text:style-name="P29">Solo così possiamo raggiungere la vera felicità e la tranquillità interiore.</text:p>
      <text:p text:style-name="P28">Epitteto usa l'esempio di un cane legato a<text:span text:style-name="T24">d</text:span> un carro. Il cane può abbaiare e cercare di inseguire le lepri, ma non può andare oltre la lunghezza della corda. Allo stesso modo, noi possiamo desiderare cose che non sono in nostro potere, ma non possiamo ottenerle. Usa anche l'esempio di un atleta che si concentra solo sulla sua performance e non si preoccupa dei fattori esterni che possono influenzare il risultato della gara. A peggiorare le cose, spesso diamo per scontato che gli oggetti e le circostanze esterne siano le cose più preziose della vita.</text:p>
      <text:p text:style-name="P30">Crediamo erroneamente che la felicità si trovi al di fuori di noi stessi. Poi, quando il mondo esterno ci delude, proviamo dolore, paura, invidia, desiderio e ansia. Epitteto rifiuta l'idea che queste emozioni ci siano imposte, <text:span text:style-name="T37">noi</text:span> siamo responsabili delle nostre emozioni, sentimenti, pensieri e azioni, e le circostanze della nostra <text:soft-page-break/>vita sono semplicemente l'arena in cui esercitiamo la nostra volontà. Questa idea di base di Epitteto, e dello stoicismo in generale, è a volte racchiusa nella frase concisa: </text:p>
      <text:p text:style-name="P14">"<text:span text:style-name="T15">Non cercare che tutto accada come desideri, ma piuttosto desidera che tutto accada come realmente accadrà, così la tua vita scorrerà bene.</text:span>” </text:p>
      <text:p text:style-name="P30">Anche in questo caso, il benessere non deriva dal possesso di cose esterne, ma dal controllo degli stati d'animo interni. Per capire meglio questo concetto, consideriamo un semplice esempio. </text:p>
      <text:p text:style-name="P30">Se siamo bloccati nel traffico, possiamo scegliere di fumare e imprecare mentre la nostra pressione sanguigna aumenta, oppure possiamo essere grati per la possibilità di ascoltare la nostra musica preferita. Non abbiamo alcun controllo sul traffico, ma abbiamo il controllo su come rispondiamo ad esso.</text:p>
      <text:p text:style-name="P35">Per Epitteto, la chiave del benessere interiore è allineare ciò che la vita ci dà con ciò che vogliamo. O, nel suo linguaggio, allineare la nostra volontà con la volontà degli dei, del destino o di ciò che la vita ci dà:</text:p>
      <text:p text:style-name="P26">“Ma non sono mai stato ostacolato nella mia volontà, né costretto quando non l'ho voluto. E come è possibile? Ho posto i miei movimenti verso l'azione in obbedienza a Dio [il destino]. E' Sua volontà che io abbia la febbre? È anche la <text:soft-page-break/>mia volontà. E' Sua volontà che io mi muova verso qualcosa? È anche la mia volontà. E' Sua volontà che io ottenga qualcosa? E' anche il mio desiderio. Non lo farà? Non voglio. E' Sua volontà che io sia messo alla graticola? E' dunque mia volontà morire; E' mia volontà essere messo alla rastrelliera. Chi dunque è ancora in grado di impedirmi contro il mio giudizio, o di costringermi? Non più di quanto possa ostacolare o costringere Zeus. (I Discorsi, Libro IV, Capitolo 1)</text:p>
      <text:p text:style-name="P18"><text:span text:style-name="Citation"><text:span text:style-name="T3">Questo passaggio riflette la sua convinzione che la vera libertà si ottiene accettando e volendo ciò che accade, poiché tutto è parte di un ordine divino.</text:span></text:span></text:p>
      <text:p text:style-name="P16"><text:span text:style-name="Citation"><text:span text:style-name="T3">Secondo Epitteto, se accettiamo che ogni evento è voluto da </text:span></text:span><text:span text:style-name="Citation"><text:span text:style-name="T69">Dio</text:span></text:span><text:span text:style-name="Citation"><text:span text:style-name="T3">, allora non possiamo essere ostacolati o costretti contro la nostra volontà, perché la nostra volontà è in armonia con quella divina. Questo atteggiamento porta a una serenità interiore, poiché non ci opponiamo a ciò che accade, ma lo accogliamo come parte del grande disegno. </text:span></text:span><text:span text:style-name="Citation"><text:span text:style-name="T69">S</text:span></text:span><text:span text:style-name="Citation"><text:span text:style-name="T3">embra che anche sotto tortura Epitteto sia stato in grado di controllare la sua risposta allineando i suoi desideri con il suo destino. </text:span></text:span></text:p>
      <text:p text:style-name="P18"><text:span text:style-name="Citation"><text:span text:style-name="T3">Durante la guerra del Vietnam, l'aviere della Marina degli Stati Uniti James Stockdale fu catturato nel 1965 e trascorse sette anni e mezzo in prigionia, subendo torture e privazioni. Le idee di Epitteto permisero a Stockdale di mantenere la calma e la dignità di fronte alle </text:span></text:span><text:soft-page-break/><text:span text:style-name="Citation"><text:span text:style-name="T3">avversità. Si concentrò su ciò che poteva controllare, ovvero il suo atteggiamento mentale e le sue azioni, e imparò ad accettare ciò che non poteva controllare.</text:span></text:span></text:p>
      <text:p text:style-name="P16"><text:span text:style-name="Citation"><text:span text:style-name="T3">Stockdale ha scritto un libro intitolato "Incontro con il nemico: una filosofia di vita", </text:span></text:span><text:span text:style-name="Citation"><text:span text:style-name="T70">dove racconta </text:span></text:span><text:span text:style-name="Citation"><text:span text:style-name="T3">come la filosofia di Epitteto lo </text:span></text:span><text:span text:style-name="Citation"><text:span text:style-name="T70">avrebbe</text:span></text:span><text:span text:style-name="Citation"><text:span text:style-name="T3"> aiutato a sopravvivere alla prigionia.</text:span></text:span></text:p>
      <text:p text:style-name="P18"><text:span text:style-name="Citation"><text:span text:style-name="T3">La storia di James Stockdale è un esempio di come la filosofia può fornire una solida base per affrontare le sfide della vita con coraggio, resilienza e dignità. La filosofia di Epitteto ha offerto a Stockdale gli strumenti per mantenere la speranza e la forza d'animo di fronte a una situazione di estrema difficoltà. </text:span></text:span></text:p>
      <text:p text:style-name="P23"><text:span text:style-name="Citation"><text:span text:style-name="T71">Un altro contributo ci arriva dallo </text:span></text:span><text:span text:style-name="Citation"><text:span text:style-name="T3">psicologo Albert Ellis, </text:span></text:span><text:span text:style-name="Citation"><text:span text:style-name="T69">il </text:span></text:span><text:span text:style-name="Citation"><text:span text:style-name="T3">fondatore della Terapia Razionale Emotiva Comportamentale, una forma di terapia cognitivo-comportamentale, </text:span></text:span><text:span text:style-name="Citation"><text:span text:style-name="T71">che </text:span></text:span><text:span text:style-name="Citation"><text:span text:style-name="T3">ha attribuito a Epitteto il merito di aver fornito una base per il suo sistema di psicoterapia. Ellis ha spesso citato Epitteto nei suoi scritti e ha affermato che il filosofo stoico era "uno dei suoi più grandi eroi". In un'intervista, ha detto: "Epitteto mi ha insegnato che non sono le cose che ci accadono a determinarci, ma il modo in cui interpretiamo le cose".</text:span></text:span></text:p>
      <text:p text:style-name="P23"><text:span text:style-name="Citation"><text:span text:style-name="T3">Epitteto estese questa analisi anche ai sentimenti di rabbia o tradimento verso gli altri. Ciò che fanno gli altri è esterno a noi; </text:span></text:span><text:span text:style-name="Citation"><text:span text:style-name="T72">a</text:span></text:span><text:span text:style-name="Citation"><text:span text:style-name="T3">bbiamo solo il controllo sulla nostra </text:span></text:span><text:soft-page-break/><text:span text:style-name="Citation"><text:span text:style-name="T3">risposta. Quello che fanno gli altri non ci fa male, a meno che non glielo permettiamo. </text:span></text:span><text:span text:style-name="Citation"><text:span text:style-name="T69">S</text:span></text:span><text:span text:style-name="Citation"><text:span text:style-name="T3">e qualcuno ci insulta, non è in nostro potere controllare le sue parole, ma possiamo controllare la nostra reazione ad esse. Le parole sono solo suoni nel mondo. Perché dovrebbero farci del male? Il vento e l'oceano emettono suoni che non ci fanno male.</text:span></text:span></text:p>
      <text:p text:style-name="P18"><text:span text:style-name="Citation"><text:span text:style-name="T3">Epitteto, con la sua saggezza stoica, ci insegna una preziosa lezione. Il vento che soffia non è ciò che ci definisce, così come le parole di qualcun altro non dovrebbero influenzare la nostra percezione di noi stessi. </text:span></text:span><text:span text:style-name="Citation"><text:span text:style-name="T71">R</text:span></text:span><text:span text:style-name="Citation"><text:span text:style-name="T3">icordiamoci sempre di essere resilienti, di non permettere che gli eventi esterni ci definiscano, e di coltivare la nostra forza interiore. Come dice Epitteto, “Non sono buono perché sono sulla strada del vento!” - questa è solo una prospettiva limitata. La nostra vera grandezza risiede nella nostra capacità di scegliere e di reagire con saggezza. Questo è ciò che ha insegnato Epitteto, ed è una delle lezioni più preziose nella storia del pensiero.</text:span></text:span></text:p>
      <text:p text:style-name="P23"><text:span text:style-name="Citation"><text:span text:style-name="T3">Tuttavia, imparare a controllare la nostra mente richiede impegno e allenamento. Un insegnante può aiutare ad allenare la nostra mente, ma Epitteto dice che possiamo farlo da soli perché siamo razionali. Possiamo riconoscere la differenza tra la nostra mente, su cui abbiamo il controllo, e il mondo esterno su cui non lo </text:span></text:span><text:soft-page-break/><text:span text:style-name="Citation"><text:span text:style-name="T3">abbiamo. Con lo sforzo, possiamo anche imparare a modificare la nostra disposizione emotiva. Eppure, come ammoniva Spinoza, "</text:span></text:span><text:span text:style-name="Citation"><text:span text:style-name="T77">tutte le cose nobili sono tanto difficili quanto rare</text:span></text:span><text:span text:style-name="Citation"><text:span text:style-name="T3">". Quindi diventare stoici è molto più difficile che comprendere lo stoicismo. Il viaggio verso l'illuminazione e la pace interiore è difficile da seguire come il filo del rasoio. Ciononostante, Epitteto ci ha dato gli spunti da cui iniziare il nostro viaggio.</text:span></text:span></text:p>
      <text:p text:style-name="P36">In conclusione</text:p>
      <text:p text:style-name="P18"><text:span text:style-name="Citation"><text:span text:style-name="T73">S</text:span></text:span><text:span text:style-name="Citation"><text:span text:style-name="T3">u Epitteto e sugli altri stoici, </text:span></text:span><text:span text:style-name="Citation"><text:span text:style-name="T73">ci sarebbe molto altro da dire, </text:span></text:span><text:span text:style-name="Citation"><text:span text:style-name="T71">ma ritengo utile cogliere </text:span></text:span><text:span text:style-name="Citation"><text:span text:style-name="T3">l'essenza dello stoicismo, </text:span></text:span><text:span text:style-name="Citation"><text:span text:style-name="T71">con quanto, nel modo più </text:span></text:span><text:span text:style-name="Citation"><text:span text:style-name="T73">sintetico</text:span></text:span><text:span text:style-name="Citation"><text:span text:style-name="T71"> fu scritto da </text:span></text:span><text:span text:style-name="Citation"><text:span text:style-name="T3">René Descartes </text:span></text:span><text:span text:style-name="Citation"><text:span text:style-name="T74">(Cartesio)</text:span></text:span><text:span text:style-name="Citation"><text:span text:style-name="T3">, il padre della filosofia moderna, nella terza massima con cui ha governato la sua vita. In omaggio alla filosofia stoica, Cartesio scrisse tre delle frasi più lunghe e profonde che </text:span></text:span><text:span text:style-name="Citation"><text:span text:style-name="T71">si siano mai lette</text:span></text:span><text:span text:style-name="Citation"><text:span text:style-name="T3">. (Quando Cartesio si riferisce a "</text:span></text:span><text:span text:style-name="Citation"><text:span text:style-name="T79">filosofi come nei tempi passati</text:span></text:span><text:span text:style-name="Citation"><text:span text:style-name="T3">", si riferisce agli stoici).</text:span></text:span></text:p>
      <text:p text:style-name="P27">“La mia terza massima era di sforzarmi sempre di vincere me stesso piuttosto che la fortuna, e di cambiare i miei desideri piuttosto che l'ordine del mondo, e in generale, abituarmi alla persuasione che, tranne i nostri pensieri, non c'è nulla di assolutamente in nostro potere; in modo che, quando abbiamo fatto del nostro meglio nelle cose esterne a noi, tutto ciò in cui non riusciamo è da ritenersi assolutamente impossibile, per quanto ci riguarda: e questo <text:soft-page-break/>solo principio mi è sembrato sufficiente per impedirmi di desiderare per l'avvenire qualcosa che non potessi ottenere, e così rendermi contento; Poiché la nostra volontà cerca naturalmente solo quegli oggetti che l'intelletto rappresenta come in qualche modo possibile da raggiungere, è chiaro che se consideriamo tutti i beni esterni come egualmente al di là delle nostre forze, non rimpiangeremmo più l'assenza di quei beni che sembrano dovuti alla nostra nascita, quando ne siamo privati senza alcuna colpa da parte nostra che non possedere i regni della Cina o del Messico, e fare così, per così dire, una virtù di necessità, non desidereremo la salute nella malattia, o la libertà nella prigionia, più di quanto non desideriamo ora corpi incorruttibili come diamanti, o ali di uccelli con cui volare.</text:p>
      <text:p text:style-name="P17"><text:span text:style-name="T80">Ma confesso che c'è bisogno di una disciplina prolungata e di una meditazione ripetuta frequentemente per abituare la mente a vedere tutti gli oggetti in questa luce; </text:span><text:span text:style-name="T78">e credo che in questo consistesse principalmente il segreto della potenza di quei filosofi che nei tempi passati erano in grado di elevarsi al di sopra dell'influenza della fortuna e, in mezzo alla sofferenza e alla povertà, godere di una felicità che i loro dèi avrebbero potuto invidiare.</text:span><text:span text:style-name="T80"> </text:span><text:span text:style-name="Citation"><text:span text:style-name="T79">Poiché, occupati incessantemente a considerare i limiti prescritti dalla natura al loro potere, si convinsero così completamente che nulla era a loro disposizione se non i loro pensieri, che questa convinzione era di per sé sufficiente a impedire loro di nutrire alcun desiderio di </text:span></text:span><text:soft-page-break/><text:span text:style-name="Citation"><text:span text:style-name="T79">altri oggetti; e sopra i loro pensieri acquistarono un dominio così assoluto, che avevano qualche motivo per stimarsi più ricchi e più potenti, più liberi e più felici degli altri uomini, i quali, quali che siano i favori che la natura e la fortuna accumulano loro, se privi di questa filosofia, non possono mai comandare la realizzazione di tutti i loro desideri.</text:span></text:span><text:span text:style-name="Citation"><text:span text:style-name="T77">”</text:span></text:span></text:p>
      <text:p text:style-name="P15"><text:span text:style-name="Citation"><text:span text:style-name="T58">Le idee di Epitteto sulla realtà, sulla natura umana e sul vivere una vita virtuosa continuano ad essere rilevanti e ad ispirare persone in tutto il mondo. La sua filosofia offre una preziosa chiave di lettura per affrontare le sfide della vita con saggezza, equanimità e coraggi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7:33:15.765267403</dc:date>
    <dc:creator>corrado tafaro</dc:creator>
    <meta:editing-duration>PT33M1S</meta:editing-duration>
    <meta:editing-cycles>3</meta:editing-cycles>
    <meta:generator>LibreOffice/24.2.7.2$Linux_X86_64 LibreOffice_project/420$Build-2</meta:generator>
    <meta:document-statistic meta:table-count="0" meta:image-count="0" meta:object-count="0" meta:page-count="10" meta:paragraph-count="33" meta:word-count="2112" meta:character-count="12986" meta:non-whitespace-character-count="10900"/>
  </office:meta>
</office:document-meta>
</file>