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adornments="Normale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3a3d9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3a3d9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1c02a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1c02a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1c02a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40f61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officeooo:paragraph-rsid="0013a3d9" style:font-size-asian="12pt" style:font-style-asian="normal" style:font-size-complex="12pt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officeooo:paragraph-rsid="0013a3d9" style:font-size-asian="12pt" style:font-style-asian="normal" style:font-size-complex="12pt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officeooo:paragraph-rsid="0013a3d9" style:font-size-asian="12pt" style:font-style-asian="normal" style:font-size-complex="12pt" style:font-style-complex="normal"/>
    </style:style>
    <style:style style:name="P10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italic" fo:font-weight="normal" officeooo:rsid="0040f61e" officeooo:paragraph-rsid="0013a3d9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a3d9"/>
    </style:style>
    <style:style style:name="P1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officeooo:paragraph-rsid="0013a3d9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tyle="normal" officeooo:paragraph-rsid="0013a3d9" style:font-style-asian="normal" style:font-style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font-name="Noto Sans1" fo:font-style="italic" officeooo:paragraph-rsid="0013a3d9" style:font-style-asian="italic" style:font-style-complex="italic"/>
    </style:style>
    <style:style style:name="P15" style:family="paragraph" style:parent-style-name="Footnote">
      <style:paragraph-properties fo:text-align="justify" style:justify-single-word="false"/>
    </style:style>
    <style:style style:name="P16" style:family="paragraph" style:parent-style-name="Footnote">
      <style:paragraph-properties fo:text-align="justify" style:justify-single-word="false"/>
    </style:style>
    <style:style style:name="P17" style:family="paragraph" style:parent-style-name="Heading_20_1" style:master-page-name="">
      <style:paragraph-properties fo:margin-top="0cm" fo:margin-bottom="0cm" style:contextual-spacing="false" fo:text-align="start" style:justify-single-word="false" style:page-number="auto"/>
      <style:text-properties style:font-name="Noto Sans1" fo:font-size="12pt" fo:font-weight="bold" officeooo:paragraph-rsid="00154676" style:font-size-asian="12pt" style:font-weight-asian="bold" style:font-size-complex="12pt" style:font-weight-complex="bold"/>
    </style:style>
    <style:style style:name="P18" style:family="paragraph" style:parent-style-name="Heading_20_3">
      <style:text-properties style:font-name="Noto Sans1" fo:font-size="12pt" officeooo:paragraph-rsid="0013a3d9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officeooo:paragraph-rsid="00154676"/>
    </style:style>
    <style:style style:name="P2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officeooo:paragraph-rsid="00154676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54676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54676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54676" style:font-size-asian="12pt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54676" style:font-size-asian="12pt" style:font-size-complex="12pt"/>
    </style:style>
    <style:style style:name="P25" style:family="paragraph" style:parent-style-name="Standard" style:list-style-name="L1">
      <style:paragraph-properties fo:line-height="115%" fo:text-align="justify" style:justify-single-word="false"/>
      <style:text-properties style:font-name="Noto Sans1" fo:font-size="12pt" officeooo:rsid="00f4e3f0" officeooo:paragraph-rsid="00154676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/>
      <style:text-properties officeooo:paragraph-rsid="00154676"/>
    </style:style>
    <style:style style:name="P27" style:family="paragraph" style:parent-style-name="Table_20_Content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orphans="0" fo:widows="0" fo:text-indent="0cm" style:auto-text-indent="false" style:page-number="auto" fo:background-color="transparent" text:number-lines="false" text:line-number="0"/>
      <style:text-properties style:font-name="Noto Sans1" fo:font-size="12pt" officeooo:rsid="001658a4" officeooo:paragraph-rsid="00154676" style:font-size-asian="12pt" style:font-size-complex="12pt"/>
    </style:style>
    <style:style style:name="P28" style:family="paragraph" style:parent-style-name="Table_20_Content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orphans="0" fo:widows="0" fo:text-indent="0cm" style:auto-text-indent="false" style:page-number="auto" fo:background-color="transparent" text:number-lines="false" text:line-number="0"/>
      <style:text-properties style:font-name="Noto Sans1" fo:font-size="12pt" officeooo:paragraph-rsid="00154676" style:font-size-asian="12pt" style:font-size-complex="12pt"/>
    </style:style>
    <style:style style:name="P29" style:family="paragraph" style:parent-style-name="Table_20_Content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orphans="0" fo:widows="0" fo:text-indent="0cm" style:auto-text-indent="false" style:page-number="auto" fo:background-color="transparent" text:number-lines="false" text:line-number="0"/>
      <style:text-properties style:font-name="Noto Sans1" fo:font-size="12pt" officeooo:paragraph-rsid="00154676" style:font-size-asian="12pt" style:font-size-complex="12pt"/>
    </style:style>
    <style:style style:name="P30" style:family="paragraph" style:parent-style-name="Table_20_Content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orphans="0" fo:widows="0" fo:text-indent="0cm" style:auto-text-indent="false" style:page-number="auto" fo:background-color="transparent" text:number-lines="false" text:line-number="0"/>
      <style:text-properties style:font-name="Noto Sans1" fo:font-size="12pt" officeooo:paragraph-rsid="00154676" style:font-size-asian="12pt" style:font-size-complex="12pt"/>
    </style:style>
    <style:style style:name="T1" style:family="text">
      <style:text-properties style:font-name="Noto Sans1" fo:font-style="italic" officeooo:rsid="0012ac7a" style:font-style-asian="italic" style:font-style-complex="italic"/>
    </style:style>
    <style:style style:name="T2" style:family="text">
      <style:text-properties style:font-name="Noto Sans1" fo:font-size="12pt" fo:font-style="italic" officeooo:rsid="00432f8e" style:font-size-asian="12pt" style:font-style-asian="italic" style:font-size-complex="12pt" style:font-style-complex="italic"/>
    </style:style>
    <style:style style:name="T3" style:family="text">
      <style:text-properties style:font-name="Noto Sans1" fo:font-size="12pt" fo:font-style="italic" officeooo:rsid="0021b022" style:font-size-asian="12pt" style:font-style-asian="italic" style:font-size-complex="12pt" style:font-style-complex="italic"/>
    </style:style>
    <style:style style:name="T4" style:family="text">
      <style:text-properties style:font-name="Noto Sans1" fo:font-size="12pt" fo:font-style="italic" officeooo:rsid="00207fe0" style:font-size-asian="12pt" style:font-style-asian="italic" style:font-size-complex="12pt" style:font-style-complex="italic"/>
    </style:style>
    <style:style style:name="T5" style:family="text">
      <style:text-properties style:font-name="Noto Sans1"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Noto Sans1" officeooo:rsid="002829a8"/>
    </style:style>
    <style:style style:name="T7" style:family="text">
      <style:text-properties style:font-name="Noto Sans1" officeooo:rsid="0012ac7a"/>
    </style:style>
    <style:style style:name="T8" style:family="text">
      <style:text-properties style:font-name="Noto Sans1" officeooo:rsid="0016919d"/>
    </style:style>
    <style:style style:name="T9" style:family="text">
      <style:text-properties style:font-name="Noto Sans1" officeooo:rsid="00121e10"/>
    </style:style>
    <style:style style:name="T10" style:family="text">
      <style:text-properties fo:font-style="normal" fo:font-weight="normal" officeooo:rsid="001c02ae" style:font-style-asian="normal" style:font-weight-asian="normal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2ac7a" style:font-style-asian="italic" style:font-style-complex="italic"/>
    </style:style>
    <style:style style:name="T13" style:family="text">
      <style:text-properties fo:font-style="italic" fo:font-weight="normal" officeooo:rsid="0040f61e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text-underline-style="none" fo:font-weight="normal" officeooo:rsid="001c02ae" style:font-style-asian="italic" style:font-weight-asian="normal" style:font-style-complex="italic" style:font-weight-complex="normal"/>
    </style:style>
    <style:style style:name="T16" style:family="text">
      <style:text-properties fo:font-size="12pt" fo:font-style="normal" fo:font-weight="normal" officeooo:rsid="0036f34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356da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36120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e34ab2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394bb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1f97d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1c02a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officeooo:rsid="002bb611" style:font-size-asian="12pt" style:font-style-asian="normal" style:font-size-complex="12pt" style:font-style-complex="normal"/>
    </style:style>
    <style:style style:name="T24" style:family="text">
      <style:text-properties fo:font-size="12pt" fo:font-style="normal" officeooo:rsid="00432f8e" style:font-size-asian="12pt" style:font-style-asian="normal" style:font-size-complex="12pt" style:font-style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1b022" style:font-size-asian="12pt" style:font-size-complex="12pt"/>
    </style:style>
    <style:style style:name="T27" style:family="text">
      <style:text-properties fo:font-size="12pt" fo:font-style="italic" fo:font-weight="normal" officeooo:rsid="00356da2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officeooo:rsid="00432f8e" style:font-size-asian="12pt" style:font-style-asian="italic" style:font-size-complex="12pt" style:font-style-complex="italic"/>
    </style:style>
    <style:style style:name="T29" style:family="text">
      <style:text-properties fo:font-size="12pt" fo:font-style="italic" officeooo:rsid="0021b022" style:font-size-asian="12pt" style:font-style-asian="italic" style:font-size-complex="12pt" style:font-style-complex="italic"/>
    </style:style>
    <style:style style:name="T30" style:family="text">
      <style:text-properties fo:font-size="12pt" fo:font-style="italic" officeooo:rsid="00207fe0" style:font-size-asian="12pt" style:font-style-asian="italic" style:font-size-complex="12pt" style:font-style-complex="italic"/>
    </style:style>
    <style:style style:name="T31" style:family="text">
      <style:text-properties fo:font-size="12pt" fo:font-style="italic" officeooo:rsid="002829a8" style:font-size-asian="12pt" style:font-style-asian="italic" style:font-size-complex="12pt" style:font-style-complex="italic"/>
    </style:style>
    <style:style style:name="T32" style:family="text">
      <style:text-properties fo:font-size="12pt" fo:font-style="italic" officeooo:rsid="0012ac7a" style:font-size-asian="12pt" style:font-style-asian="italic" style:font-size-complex="12pt" style:font-style-complex="italic"/>
    </style:style>
    <style:style style:name="T33" style:family="text">
      <style:text-properties fo:font-size="12pt" fo:font-weight="normal" officeooo:rsid="00356da2" style:font-size-asian="12pt" style:font-weight-asian="normal" style:font-size-complex="12pt" style:font-weight-complex="normal"/>
    </style:style>
    <style:style style:name="T34" style:family="text">
      <style:text-properties fo:font-size="11pt" officeooo:rsid="0021b022" style:font-size-asian="11pt" style:font-size-complex="11pt"/>
    </style:style>
    <style:style style:name="T35" style:family="text">
      <style:text-properties officeooo:rsid="00432f8e"/>
    </style:style>
    <style:style style:name="T36" style:family="text">
      <style:text-properties officeooo:rsid="003fde63"/>
    </style:style>
    <style:style style:name="T37" style:family="text">
      <style:text-properties officeooo:rsid="0040f61e"/>
    </style:style>
    <style:style style:name="T38" style:family="text">
      <style:text-properties officeooo:rsid="02911370"/>
    </style:style>
    <style:style style:name="T39" style:family="text">
      <style:text-properties officeooo:rsid="004218ee"/>
    </style:style>
    <style:style style:name="T40" style:family="text">
      <style:text-properties officeooo:rsid="001f97de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1c02ae" style:font-weight-asian="normal" style:font-weight-complex="normal"/>
    </style:style>
    <style:style style:name="T43" style:family="text">
      <style:text-properties fo:font-weight="normal" officeooo:rsid="02911370" style:font-weight-asian="normal" style:font-weight-complex="normal"/>
    </style:style>
    <style:style style:name="T44" style:family="text">
      <style:text-properties fo:font-weight="normal" officeooo:rsid="0037501e" style:font-weight-asian="normal" style:font-weight-complex="normal"/>
    </style:style>
    <style:style style:name="T45" style:family="text">
      <style:text-properties officeooo:rsid="003c6cfa"/>
    </style:style>
    <style:style style:name="T46" style:family="text">
      <style:text-properties officeooo:rsid="0021b022"/>
    </style:style>
    <style:style style:name="T47" style:family="text">
      <style:text-properties officeooo:rsid="00207fe0"/>
    </style:style>
    <style:style style:name="T48" style:family="text">
      <style:text-properties officeooo:rsid="001fad26"/>
    </style:style>
    <style:style style:name="T49" style:family="text">
      <style:text-properties officeooo:rsid="0021b410"/>
    </style:style>
    <style:style style:name="T50" style:family="text">
      <style:text-properties officeooo:rsid="00f6d116"/>
    </style:style>
    <style:style style:name="T51" style:family="text">
      <style:text-properties officeooo:rsid="00f4e3f0"/>
    </style:style>
    <style:style style:name="T52" style:family="text">
      <style:text-properties style:font-name="Noto Sans1" fo:font-size="12pt" fo:font-style="italic" officeooo:rsid="0021b022" style:font-size-asian="12pt" style:font-style-asian="italic" style:font-size-complex="12pt" style:font-style-complex="italic"/>
    </style:style>
    <style:style style:name="T53" style:family="text">
      <style:text-properties style:font-name="Noto Sans1" fo:font-size="12pt" fo:font-style="italic" officeooo:rsid="00432f8e" style:font-size-asian="12pt" style:font-style-asian="italic" style:font-size-complex="12pt" style:font-style-complex="italic"/>
    </style:style>
    <style:style style:name="T54" style:family="text">
      <style:text-properties style:font-name="Noto Sans1" fo:font-size="12pt" fo:font-style="italic" officeooo:rsid="00207fe0" style:font-size-asian="12pt" style:font-style-asian="italic" style:font-size-complex="12pt" style:font-style-complex="italic"/>
    </style:style>
    <style:style style:name="T55" style:family="text">
      <style:text-properties style:font-name="Noto Sans1" fo:font-size="12pt" fo:font-style="italic" officeooo:rsid="002829a8" style:font-size-asian="12pt" style:font-style-asian="italic" style:font-size-complex="12pt" style:font-style-complex="italic"/>
    </style:style>
    <style:style style:name="T56" style:family="text">
      <style:text-properties style:font-name="Noto Sans1" fo:font-size="12pt" fo:font-style="italic" officeooo:rsid="0012ac7a" style:font-size-asian="12pt" style:font-style-asian="italic" style:font-size-complex="12pt" style:font-style-complex="italic"/>
    </style:style>
    <style:style style:name="T57" style:family="text">
      <style:text-properties style:font-name="Noto Sans1" fo:font-style="italic" officeooo:rsid="0021b022" style:font-style-asian="italic" style:font-style-complex="italic"/>
    </style:style>
    <style:style style:name="T58" style:family="text">
      <style:text-properties style:font-name="Noto Sans1" fo:font-style="italic" officeooo:rsid="00432f8e" style:font-style-asian="italic" style:font-style-complex="italic"/>
    </style:style>
    <style:style style:name="T59" style:family="text">
      <style:text-properties style:font-name="Noto Sans1" fo:font-style="italic" officeooo:rsid="00207fe0" style:font-style-asian="italic" style:font-style-complex="italic"/>
    </style:style>
    <style:style style:name="T60" style:family="text">
      <style:text-properties style:font-name="Noto Sans1" fo:font-style="italic" officeooo:rsid="002829a8" style:font-style-asian="italic" style:font-style-complex="italic"/>
    </style:style>
    <style:style style:name="T61" style:family="text">
      <style:text-properties style:font-name="Noto Sans1" fo:font-style="italic" officeooo:rsid="0012ac7a" style:font-style-asian="italic" style:font-style-complex="italic"/>
    </style:style>
    <style:style style:name="T62" style:family="text">
      <style:text-properties officeooo:rsid="00fb169b"/>
    </style:style>
    <style:style style:name="T63" style:family="text">
      <style:text-properties officeooo:rsid="0016919d"/>
    </style:style>
    <style:style style:name="T64" style:family="text">
      <style:text-properties officeooo:rsid="00121e10"/>
    </style:style>
    <style:style style:name="T65" style:family="text">
      <style:text-properties officeooo:rsid="002829a8"/>
    </style:style>
    <style:style style:name="T66" style:family="text">
      <style:text-properties officeooo:rsid="0012ac7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bookmark-start text:name="__RefHeading___Toc18742_2330915828"/>Scetticismo<text:bookmark-end text:name="__RefHeading___Toc18742_2330915828"/></text:h>
      <text:p text:style-name="P21">In termini generali, lo scetticismo è la visione secondo cui dovremmo essere sospettosi delle affermazioni sulla verità epistemologica o almeno astenerci dal giudizio dall'affermare affermazioni assolute sulla conoscenza.</text:p>
      <text:p text:style-name="P22">La parola greca skepsis significa investigazione. Letteralmente, uno “scettico” è un indagatore. Non tutti i filosofi antichi che <text:span text:style-name="T48">con uno sguardo al passato</text:span> chiamiamo “scettici” si riferiscono a se stessi come tali, <text:span text:style-name="T46">t</text:span>uttavia, tutti abbracciano stili di vita dedicati alla ricerca.</text:p>
      <text:p text:style-name="P22">Lo scetticismo antico riguarda tanto la fede quanto la conoscenza. Fin<text:span text:style-name="T46">tanto</text:span> non si raggiunge la conoscenza, gli scettici mirano a non affermare nulla. Da qui nasce la loro ambizione più controversa: <text:span text:style-name="T11">una vita senza fede</text:span>.</text:p>
      <text:p text:style-name="P22">I primi filosofi greci svilupparono distinzioni tra realtà e apparenza, conoscenza e credenza, tra non evidente ed evidente. Queste distinzioni costituiscono il quadro in cui può essere concepito lo scetticismo. Gli scettici (tra cui Pirr<text:span text:style-name="T49">one</text:span>, Timone, Arcesilao, Carneade, Enesidemo e Sesto Empirico) <text:span text:style-name="T46">furono</text:span><text:span text:style-name="T47"> molto attivi </text:span>con la filosofia presocratica; <text:span text:style-name="T47">con </text:span>Socrate: <text:span text:style-name="T46">l</text:span>a sua filosofia si basava sul continuo dialogo e sulla ricerca della verità, <text:span text:style-name="T46">il suo impegno nei confronti della ragione ispira lo scetticismo dell'Accademia ellenistica; </text:span><text:span text:style-name="T47">con il </text:span>relativismo <text:soft-page-break/>protagorano<text:note text:id="ftn37" text:note-class="footnote"><text:note-citation>1</text:note-citation><text:note-body><text:p text:style-name="P15">Secondo <text:span text:style-name="T47">la dottrina di Protagora</text:span>, la verità non è assoluta, ma relativa all'individuo che la percepisce. Protagora è noto per la sua affermazione "L'uomo è la misura di tutte le cose", che sottolinea l'idea che la verità è definita dalla percezione e dall'opinione personale. In altre parole, ciò che una persona percepisce come vero è vero per quella persona. Questo significa che esistono tante verità quanti sono gli individui.</text:p></text:note-body></text:note>; <text:span text:style-name="T47">con </text:span>Platone: <text:span text:style-name="T46">le argomentazioni scettiche del Teeteto non dimostrano che la conoscenza è impossibile, ma mettono in luce i suoi limiti. Esse ci invitano a essere critici nei confronti delle nostre conoscenze e a non dare nulla per scontato; con </text:span>Aristotele: <text:span text:style-name="T46">il quale sottolinea che, affinché un'indagine possa procedere con successo, è prima necessaria una domanda ben formulata </text:span><text:span text:style-name="T49">(b</text:span><text:span text:style-name="T46">isogna conoscere il nodo per scioglierlo</text:span><text:span text:style-name="T49">) p</text:span><text:span text:style-name="T46">er sapere cosa cercare e riconoscerlo quando lo si trova, è necessario prima riflettere sulle difficoltà implicate e quindi formulare una domanda. Se lo fa, allora sarà in grado di riconoscere la soluzione non appena la troverà.</text:span></text:p>
      <text:p text:style-name="P22"><text:span text:style-name="T46">O</text:span>biettivo <text:span text:style-name="T46">degli scettici, </text:span>era mettere in discussione la possibilità di raggiungere una conoscenza certa e definitiva della realtà, <text:span text:style-name="T46">d</text:span>ubitavano di ogni tipo di conoscenza percepita attraverso i sensi o elaborata dalla ragione.</text:p>
      <text:p text:style-name="P20">Lo scetticismo antico era spesso motivato da un desiderio di tranquillità interiore (atarassia), che poteva essere raggiunta solo sospendendo il giudizio (epoché) su ogni affermazione dogmatica. I dibattiti <text:span text:style-name="T50">si concen</text:span>travano su:</text:p>
      <text:p text:style-name="P23"><text:soft-page-break/>La natura della conoscenza: <text:span text:style-name="T50">p</text:span>ossono gli esseri umani conoscere la realtà in modo certo?</text:p>
      <text:p text:style-name="P22">I criteri della verità: <text:span text:style-name="T50">e</text:span>siste un modo per distinguere le opinioni vere da quelle false?</text:p>
      <text:p text:style-name="P22">Il linguaggio: <text:span text:style-name="T50">i</text:span>l linguaggio è uno strumento affidabile per descrivere la realtà?</text:p>
      <text:p text:style-name="P22">I sensi: <text:span text:style-name="T50">i</text:span> sensi ci forniscono informazioni affidabili sulla realtà?</text:p>
      <text:p text:style-name="P22">I concetti fondamentali dello scetticismo antico <text:span text:style-name="T50">erano </text:span>la fede, la sospensione del giudizio, il criterio della verità, le apparenze e l'indagine . Si concentra<text:span text:style-name="T50">va</text:span>no sulla natura della fede, sul rapporto tra fede e parola, e sugli stati mentali dell'indagine <text:span text:style-name="T51">che nello scetticismo antico si riferi</text:span><text:span text:style-name="T50">vano </text:span><text:span text:style-name="T51">a un complesso insieme di atteggiamenti mentali che includ</text:span><text:span text:style-name="T50">evano</text:span><text:span text:style-name="T51">: </text:span></text:p>
      <text:list text:style-name="L1">
        <text:list-item>
          <text:p text:style-name="P25">Dubbio: un atteggiamento critico e sospetto nei confronti di qualsiasi affermazione;</text:p>
        </text:list-item>
        <text:list-item>
          <text:p text:style-name="P25">Apertura: una disponibilità a considerare diverse prospettive e a mettere in discussione le proprie convinzioni;</text:p>
        </text:list-item>
        <text:list-item>
          <text:p text:style-name="P25">Curiosità: un desiderio di conoscere e di comprendere il mondo;</text:p>
        </text:list-item>
        <text:list-item>
          <text:p text:style-name="P25">Distacco: un'accettazione delle limitazioni della conoscenza umana e una capacità di vivere con l'incertezza.</text:p>
        </text:list-item>
      </text:list>
      <text:p text:style-name="P23"><text:soft-page-break/><text:span text:style-name="T46">C</text:span>iò che sostiene lo scettico ricade sotto il dubbio radicale, come facevano notare gli stessi Arcesilao e Carneade, i quali affermavano che alla fine non potevano avere nessun principio di certezza, neppure i principi da essi stessi assunti come guide dell'azione pratica, la "<text:span text:style-name="T11">ragionevolezza</text:span>" secondo Arcesilao, e il "<text:span text:style-name="T11">persuasivo</text:span>" secondo Carneade.</text:p>
      <text:p text:style-name="P19"><text:span text:style-name="Citation"><text:span text:style-name="T3">I</text:span></text:span><text:span text:style-name="Citation"><text:span text:style-name="T2">l più noto scettico antico, Sesto Empirico, scrisse ampiamente: </text:span></text:span><text:span text:style-name="Citation"><text:span text:style-name="T4">p</text:span></text:span><text:span text:style-name="Citation"><text:span text:style-name="T2">ossono gli scettici dire qualcosa di significativo sulla loro filosofia senza affermare nulla su come stanno le cose? <text:s/>Gli scettici mirano a descrivere la loro filosofia </text:span></text:span><text:span text:style-name="Citation"><text:span text:style-name="T4">senza essere accompagnata da necessari chiarimenti e senza preamboli,</text:span></text:span><text:span text:style-name="Citation"><text:span text:style-name="T2"> </text:span></text:span><text:span text:style-name="Citation"><text:span text:style-name="T3">e la </text:span></text:span><text:span text:style-name="Citation"><text:span text:style-name="T2">praticano senza esporre teorie o dottrine particolari. Le idee scettiche </text:span></text:span><text:span text:style-name="Citation"><text:span text:style-name="T3">si accompagnano ad una </text:span></text:span><text:span text:style-name="Citation"><text:span text:style-name="T4">serie di </text:span></text:span><text:span text:style-name="Citation"><text:span text:style-name="T2">obiezioni: </text:span></text:span><text:span text:style-name="Citation"><text:span text:style-name="T4">come </text:span></text:span><text:span text:style-name="Citation"><text:span text:style-name="T2">auto-confutanti</text:span></text:span><text:span text:style-name="Citation"><text:span text:style-name="T2"><text:note text:id="ftn38" text:note-class="footnote"><text:note-citation>2</text:note-citation><text:note-body><text:p text:style-name="P15">Le "obiezioni auto confutatorie" sono argomenti o affermazioni che si contraddicono o si smentiscono da soli. Un esempio classico di un'obiezione auto confutatoria è l'affermazione "Non esistono verità assolute". Se questa affermazione fosse vera, allora sarebbe una verità assoluta, il che contraddice l'affermazione stessa. Quindi, l'affermazione si auto confuta.</text:p></text:note-body></text:note></text:span></text:span><text:span text:style-name="Citation"><text:span text:style-name="T2">, incoerenti, auto contraddittorie e così via. I movimenti scettici accademici e pirroniani iniziano all'incirca nel III secolo a.C. e terminano con Sesto Empirico nel II secolo d.C., i loro contemporanei e principali interlocutori sono gli epicurei, gli stoici, i cinici e i logici megaresi.</text:span></text:span></text:p>
      <text:p text:style-name="P19"><text:span text:style-name="Citation"><text:span text:style-name="T2"/></text:span></text:p>
      <text:p text:style-name="P19"><text:span text:style-name="Citation"><text:span text:style-name="T2"/></text:span></text:p>
      <text:p text:style-name="P27"><text:soft-page-break/>La presenza dello scetticismo segna tutta la storia della filosofia occidentale, antica e moderna. Esso, infatti, esprime un'istanza tipica dell'essere umano: la sua perenne insoddisfazione di fronte al proprio conoscere. Lo scetticismo può essere definito come il momento di dissoluzione o reazione ad un dogmatismo: in quanto atteggiamento di risposta, perciò, l'ipotesi scettica di volta in volta si adegua al dogmatismo cui fa riferimento <text:span text:style-name="T62">e può essere definito come metodo di indagine che si adatta alle varie forme di dogmatismo che incontra. </text:span>La storia del pensiero occidentale è continuamente segnata da questa oscillazione tra affermazione dogmatica e reazione scettica.</text:p>
      <text:p text:style-name="P28"><text:span text:style-name="T63">Lo scetticismo può essere eccessivo e paralizzante quando impedisce di prendere decisioni e di agire in base a delle convinzioni ragionevoli, anche se non assolute. In questo caso, lo scettico può cadere in un'apatia e in un'indifferenza che lo rendono incapace di affrontare i problemi e le sfide della vita. </text:span><text:span text:style-name="T64">Lo </text:span><text:span text:style-name="T63">scetticismo esprime un'istanza tipica dell'essere umano: la sua perenne insoddisfazione di fronte al proprio conoscere. Tuttavia, questa insoddisfazione può anche diventare una fonte di angoscia e di disorientamento, se non si riesce a trovare un equilibrio tra il dubbio e la fiducia.</text:span></text:p>
      <text:p text:style-name="P28"><text:span text:style-name="T65">A</text:span><text:span text:style-name="T66">bbiamo visto come lo scetticismo metta in discussione la possibilità di una conoscenza certa. Il paradosso </text:span><text:soft-page-break/><text:span text:style-name="T66">dell'asino di Buridano illustra questo problema in modo semplice e intuitivo. </text:span></text:p>
      <text:p text:style-name="P28"><text:span text:style-name="T66">L'asino, di fronte a due opzioni ugualmente desiderabili, è incapace di scegliere e rischia di morire di fame. </text:span><text:span text:style-name="T12">Riflette l'incertezza</text:span><text:span text:style-name="T66">: </text:span><text:span text:style-name="T65">l’</text:span><text:span text:style-name="T66">asino, indeciso tra due mucchi di fieno identici, rappresenta l'incapacità di prendere una decisione di fronte a due opzioni ugualmente desiderabili. </text:span><text:span text:style-name="T12">Evidenzia i limiti della ragione</text:span><text:span text:style-name="T66">: </text:span><text:span text:style-name="T65">s</text:span><text:span text:style-name="T66">e la ragione non può distinguere tra due alternative, come può l'asino scegliere? Questo dilemma mette in discussione l'idea che la ragione sia sempre in grado di guidare le nostre scelte. </text:span><text:span text:style-name="T12">Sollecita la riflessione</text:span><text:span text:style-name="T66">: </text:span><text:span text:style-name="T65">i</text:span><text:span text:style-name="T66">l paradosso ci invita a riflettere su come prendiamo decisioni e sul ruolo che la ragione, l'istinto e il caso, possono giocare in questo processo.</text:span></text:p>
      <text:p text:style-name="P26"><text:span text:style-name="Citation"><text:span text:style-name="T55">Tuttavia, dobbiamo ammettere che i</text:span></text:span><text:span text:style-name="Citation"><text:span text:style-name="T56">l paradosso è un'esagerazione semplificata e non rispecchia la complessità del processo decisionale umano, </text:span></text:span><text:span text:style-name="Citation"><text:span text:style-name="T55">ma che è molto attinente con lo scetticismo nella sua particolarità di sospendere un giudizio, di non proferire parola in caso di costante dubbio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adornments="Normale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erif" fo:font-family="'Noto Serif'" style:font-style-name="Normale" style:font-family-generic="roman" style:font-pitch="variable" fo:font-size="13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oto Serif" fo:font-family="'Noto Serif'" style:font-style-name="Normale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>
        <style:tab-stops/>
      </style:paragraph-properties>
      <style:text-properties style:font-name="Noto Serif" fo:font-family="'Noto Serif'" style:font-style-name="Normale" style:font-family-generic="roman" style:font-pitch="variable" fo:font-size="13pt" fo:font-weight="normal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8T11:35:03.377970742</meta:creation-date>
    <dc:date>2026-01-29T17:58:35.040365416</dc:date>
    <dc:creator>corrado tafaro</dc:creator>
    <meta:editing-duration>PT55M1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6" meta:paragraph-count="25" meta:word-count="1152" meta:character-count="7775" meta:non-whitespace-character-count="6649"/>
  </office:meta>
</office:document-meta>
</file>