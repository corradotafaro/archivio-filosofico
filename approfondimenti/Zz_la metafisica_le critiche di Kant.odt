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2" style:family="paragraph" style:parent-style-name="Standard">
      <style:paragraph-properties fo:margin-top="0cm" fo:margin-bottom="0cm" style:contextual-spacing="false" fo:line-height="115%" fo:text-align="justify" style:justify-single-word="false"/>
      <style:text-properties style:font-name="Noto Sans1" fo:font-size="12pt" officeooo:paragraph-rsid="00137b5a" style:font-size-asian="12pt" style:font-size-complex="12pt"/>
    </style:style>
    <style:style style:name="P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7b5a" style:font-size-asian="12pt" style:font-size-complex="12pt"/>
    </style:style>
    <style:style style:name="P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7b5a" style:font-size-asian="12pt" style:font-size-complex="12pt"/>
    </style:style>
    <style:style style:name="P5" style:family="paragraph" style:parent-style-name="Standard">
      <style:paragraph-properties fo:margin-top="0.199cm" fo:margin-bottom="0cm" style:contextual-spacing="false" fo:line-height="115%" fo:text-align="justify" style:justify-single-word="false"/>
      <style:text-properties style:font-name="Noto Sans1" fo:font-size="12pt" fo:font-weight="bold" officeooo:rsid="02397a74" officeooo:paragraph-rsid="00137b5a" style:font-size-asian="12pt" style:font-weight-asian="bold" style:font-size-complex="12pt" style:font-weight-complex="bold"/>
    </style:style>
    <style:style style:name="P6" style:family="paragraph" style:parent-style-name="Quotations">
      <style:paragraph-properties fo:margin-top="0.101cm" fo:margin-bottom="0cm" style:contextual-spacing="false" fo:line-height="115%"/>
      <style:text-properties style:font-name="Noto Sans1" fo:font-size="12pt" fo:font-weight="normal" officeooo:paragraph-rsid="00137b5a"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8" style:family="paragraph" style:parent-style-name="Standard" style:master-page-name="">
      <loext:graphic-properties draw:fill="none"/>
      <style:paragraph-properties fo:margin-left="0cm" fo:margin-right="0cm" fo:margin-top="0.3cm" fo:margin-bottom="0cm" style:contextual-spacing="false" fo:line-height="115%" fo:text-align="justify" style:justify-single-word="false" fo:text-indent="0cm" style:auto-text-indent="false" style:page-number="auto" fo:background-color="transparent"/>
      <style:text-properties style:font-name="Noto Sans1" fo:font-size="12pt" fo:font-style="italic" officeooo:paragraph-rsid="00137b5a" style:font-size-asian="12pt" style:font-style-asian="italic" style:font-size-complex="12pt" style:font-style-complex="italic"/>
    </style:style>
    <style:style style:name="P9" style:family="paragraph" style:parent-style-name="Standard">
      <style:paragraph-properties fo:margin-top="0.101cm" fo:margin-bottom="0cm" style:contextual-spacing="false" fo:line-height="115%" fo:text-align="justify" style:justify-single-word="false"/>
      <style:text-properties style:font-name="Noto Sans1" officeooo:paragraph-rsid="00137b5a"/>
    </style:style>
    <style:style style:name="P10"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Noto Sans1" officeooo:paragraph-rsid="00137b5a"/>
    </style:style>
    <style:style style:name="P1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officeooo:paragraph-rsid="00137b5a"/>
    </style:style>
    <style:style style:name="P12"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7b5a"/>
    </style:style>
    <style:style style:name="P13" style:family="paragraph" style:parent-style-name="Footnote">
      <style:paragraph-properties fo:text-align="justify" style:justify-single-word="false"/>
    </style:style>
    <style:style style:name="P14" style:family="paragraph" style:parent-style-name="Quotations">
      <style:paragraph-properties fo:margin-top="0.3cm" fo:margin-bottom="0.199cm" style:contextual-spacing="false" fo:line-height="115%" fo:text-align="center" style:justify-single-word="false"/>
      <style:text-properties officeooo:paragraph-rsid="00137b5a"/>
    </style:style>
    <style:style style:name="P15" style:family="paragraph" style:parent-style-name="Footnote">
      <style:paragraph-properties fo:text-align="justify" style:justify-single-word="false"/>
      <style:text-properties style:font-name="Noto Sans1"/>
    </style:style>
    <style:style style:name="P16" style:family="paragraph" style:parent-style-name="Footnote">
      <style:paragraph-properties fo:text-align="justify" style:justify-single-word="false"/>
      <style:text-properties style:font-name="Noto Sans1" fo:font-size="9pt" style:font-size-asian="9pt" style:font-size-complex="9pt"/>
    </style:style>
    <style:style style:name="P17" style:family="paragraph" style:parent-style-name="Footnote">
      <style:paragraph-properties fo:text-align="justify" style:justify-single-word="false"/>
      <style:text-properties officeooo:rsid="009c3942" officeooo:paragraph-rsid="009c3942"/>
    </style:style>
    <style:style style:name="P18" style:family="paragraph" style:parent-style-name="Heading_20_2" style:master-page-name="">
      <style:paragraph-properties style:page-number="auto" fo:break-before="page"/>
      <style:text-properties style:font-name="Noto Sans1" fo:font-size="14pt" officeooo:paragraph-rsid="001557a6" style:font-size-asian="14pt" style:font-size-complex="14pt"/>
    </style:style>
    <style:style style:name="P19" style:family="paragraph" style:parent-style-name="Heading_20_3">
      <style:text-properties style:font-name="Noto Sans1" fo:font-size="12pt" officeooo:paragraph-rsid="00137b5a" style:font-size-asian="12pt" style:font-size-complex="12pt"/>
    </style:style>
    <style:style style:name="P2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3e755" style:font-size-asian="12pt" style:font-size-complex="12pt"/>
    </style:style>
    <style:style style:name="P2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2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2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3e755" style:font-size-asian="12pt" style:font-size-complex="12pt"/>
    </style:style>
    <style:style style:name="P24"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3e755"/>
    </style:style>
    <style:style style:name="P25"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officeooo:paragraph-rsid="001557a6"/>
    </style:style>
    <style:style style:name="P26" style:family="paragraph" style:parent-style-name="Standard">
      <style:paragraph-properties fo:margin-top="0.199cm" fo:margin-bottom="0cm" style:contextual-spacing="false"/>
      <style:text-properties style:font-name="Noto Sans1" fo:font-size="12pt" officeooo:paragraph-rsid="001557a6" style:font-size-asian="12pt" style:font-size-complex="12pt"/>
    </style:style>
    <style:style style:name="P27" style:family="paragraph" style:parent-style-name="Standard">
      <style:text-properties style:font-name="Noto Sans1" fo:font-size="12pt" officeooo:paragraph-rsid="001557a6" style:font-size-asian="12pt" style:font-size-complex="12pt"/>
    </style:style>
    <style:style style:name="P2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2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7" style:family="paragraph" style:parent-style-name="Standard">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style:font-name="Noto Sans1" fo:font-size="12pt" officeooo:rsid="001d05ad" officeooo:paragraph-rsid="001557a6" style:font-size-asian="12pt" style:font-size-complex="12pt"/>
    </style:style>
    <style:style style:name="P38" style:family="paragraph" style:parent-style-name="Standard" style:master-page-name="">
      <loext:graphic-properties draw:fill="none"/>
      <style:paragraph-properties fo:margin-left="0cm" fo:margin-right="0cm" fo:margin-top="0.199cm" fo:margin-bottom="0cm" style:contextual-spacing="false" fo:line-height="115%" fo:text-align="justify" style:justify-single-word="false" fo:text-indent="0cm" style:auto-text-indent="false" style:page-number="auto" fo:background-color="transparent"/>
      <style:text-properties style:font-name="Noto Sans1" fo:font-size="12pt" officeooo:rsid="001d05ad" officeooo:paragraph-rsid="001557a6" style:font-size-asian="12pt" style:font-size-complex="12pt"/>
    </style:style>
    <style:style style:name="P39" style:family="paragraph" style:parent-style-name="Standard">
      <style:paragraph-properties fo:margin-top="0.101cm" fo:margin-bottom="0cm" style:contextual-spacing="false" fo:line-height="115%" fo:text-align="justify" style:justify-single-word="false"/>
      <style:text-properties style:font-name="Noto Sans1" fo:font-size="12pt" officeooo:rsid="000f7e3f" officeooo:paragraph-rsid="001557a6" style:font-size-asian="12pt" style:font-size-complex="12pt"/>
    </style:style>
    <style:style style:name="P40"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0f7e3f" officeooo:paragraph-rsid="001557a6" style:font-size-asian="12pt" style:font-size-complex="12pt"/>
    </style:style>
    <style:style style:name="P41" style:family="paragraph" style:parent-style-name="Standard">
      <style:paragraph-properties fo:margin-top="0.101cm" fo:margin-bottom="0cm" style:contextual-spacing="false" fo:line-height="115%" fo:text-align="justify" style:justify-single-word="false"/>
      <style:text-properties style:font-name="Noto Sans1" fo:font-size="12pt" officeooo:rsid="0028f48b" officeooo:paragraph-rsid="001557a6" style:font-size-asian="12pt" style:font-size-complex="12pt"/>
    </style:style>
    <style:style style:name="P42" style:family="paragraph" style:parent-style-name="Standard">
      <style:paragraph-properties fo:margin-top="0cm" fo:margin-bottom="0cm" style:contextual-spacing="false" fo:line-height="115%" fo:text-align="justify" style:justify-single-word="false"/>
      <style:text-properties style:font-name="Noto Sans1" fo:font-size="12pt" officeooo:rsid="0028f48b" officeooo:paragraph-rsid="001557a6" style:font-size-asian="12pt" style:font-size-complex="12pt"/>
    </style:style>
    <style:style style:name="P4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8f48b" officeooo:paragraph-rsid="001557a6" style:font-size-asian="12pt" style:font-size-complex="12pt"/>
    </style:style>
    <style:style style:name="P4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8f48b" officeooo:paragraph-rsid="001557a6" style:font-size-asian="12pt" style:font-size-complex="12pt"/>
    </style:style>
    <style:style style:name="P4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28f48b" officeooo:paragraph-rsid="001557a6" style:font-size-asian="12pt" style:font-size-complex="12pt"/>
    </style:style>
    <style:style style:name="P46"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officeooo:rsid="0028f48b" officeooo:paragraph-rsid="001557a6" style:font-size-asian="12pt" style:font-size-complex="12pt"/>
    </style:style>
    <style:style style:name="P47" style:family="paragraph" style:parent-style-name="Standard" style:list-style-name="L1">
      <style:paragraph-properties fo:margin-top="0.101cm" fo:margin-bottom="0cm" style:contextual-spacing="false" fo:line-height="115%" fo:text-align="justify" style:justify-single-word="false"/>
      <style:text-properties style:font-name="Noto Sans1" fo:font-size="12pt" officeooo:rsid="0028f48b" officeooo:paragraph-rsid="001557a6" style:font-size-asian="12pt" style:font-size-complex="12pt"/>
    </style:style>
    <style:style style:name="P48"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49"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1" fo:font-size="12pt" officeooo:paragraph-rsid="001557a6" style:font-size-asian="12pt" style:font-size-complex="12pt"/>
    </style:style>
    <style:style style:name="P50" style:family="paragraph" style:parent-style-name="Standard">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style:font-name="Noto Sans1" fo:font-size="12pt" officeooo:paragraph-rsid="001557a6" style:font-size-asian="12pt" style:font-size-complex="12pt"/>
    </style:style>
    <style:style style:name="P5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2"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3"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4"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5"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6"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7"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8"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paragraph-rsid="001557a6" style:font-size-asian="12pt" style:font-size-complex="12pt"/>
    </style:style>
    <style:style style:name="P59"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499cm" style:auto-text-indent="false" style:page-number="auto" fo:background-color="transparent"/>
      <style:text-properties style:font-name="Noto Sans1" fo:font-size="12pt" officeooo:paragraph-rsid="001557a6" style:font-size-asian="12pt" style:font-size-complex="12pt"/>
    </style:style>
    <style:style style:name="P60" style:family="paragraph" style:parent-style-name="Standard">
      <style:paragraph-properties fo:margin-top="0.101cm" fo:margin-bottom="0cm" style:contextual-spacing="false" fo:line-height="115%" fo:text-align="justify" style:justify-single-word="false"/>
      <style:text-properties style:font-name="Noto Sans1" fo:font-size="12pt" officeooo:paragraph-rsid="001557a6" style:font-size-asian="12pt" style:font-size-complex="12pt"/>
    </style:style>
    <style:style style:name="P61" style:family="paragraph" style:parent-style-name="Standard"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style:font-name="Noto Sans1" fo:font-size="12pt" officeooo:rsid="0047e3ab" officeooo:paragraph-rsid="001557a6" style:font-size-asian="12pt" style:font-size-complex="12pt"/>
    </style:style>
    <style:style style:name="P62" style:family="paragraph" style:parent-style-name="Standard">
      <style:paragraph-properties fo:text-align="justify" style:justify-single-word="false"/>
      <style:text-properties style:font-name="Noto Sans1" fo:font-size="12pt" style:font-size-asian="12pt" style:font-size-complex="12pt"/>
    </style:style>
    <style:style style:name="P63" style:family="paragraph" style:parent-style-name="Standard">
      <style:paragraph-properties fo:margin-top="0.199cm" fo:margin-bottom="0cm" style:contextual-spacing="false" fo:line-height="115%" fo:text-align="justify" style:justify-single-word="false"/>
      <style:text-properties style:font-name="Noto Sans1" fo:font-size="12pt" fo:font-weight="normal" officeooo:rsid="015416ab" officeooo:paragraph-rsid="001557a6" style:font-size-asian="12pt" style:font-weight-asian="normal" style:font-size-complex="12pt" style:font-weight-complex="normal"/>
    </style:style>
    <style:style style:name="P64" style:family="paragraph" style:parent-style-name="Standard">
      <style:paragraph-properties fo:margin-top="0.101cm" fo:margin-bottom="0cm" style:contextual-spacing="false"/>
      <style:text-properties style:font-name="Noto Sans1" fo:font-size="12pt" fo:font-style="italic" fo:font-weight="normal" officeooo:paragraph-rsid="001557a6" style:font-size-asian="12pt" style:font-style-asian="italic" style:font-weight-asian="normal" style:font-size-complex="12pt" style:font-style-complex="italic" style:font-weight-complex="normal"/>
    </style:style>
    <style:style style:name="P65" style:family="paragraph" style:parent-style-name="Standard">
      <style:paragraph-properties fo:margin-top="0.199cm" fo:margin-bottom="0cm" style:contextual-spacing="false" fo:line-height="100%" fo:text-align="justify" style:justify-single-word="false"/>
      <style:text-properties style:font-name="Noto Sans1" fo:font-size="10pt" officeooo:rsid="0048bbf4" officeooo:paragraph-rsid="001557a6" style:font-size-asian="10pt" style:font-size-complex="10pt"/>
    </style:style>
    <style:style style:name="P66" style:family="paragraph" style:parent-style-name="Standard">
      <style:paragraph-properties fo:margin-top="0cm" fo:margin-bottom="0cm" style:contextual-spacing="false" fo:line-height="115%" fo:text-align="justify" style:justify-single-word="false"/>
      <style:text-properties style:font-name="Noto Sans1" fo:font-size="10pt" officeooo:rsid="0048bbf4" officeooo:paragraph-rsid="001557a6" style:font-size-asian="10pt" style:font-size-complex="10pt"/>
    </style:style>
    <style:style style:name="P67" style:family="paragraph" style:parent-style-name="Standard">
      <style:paragraph-properties fo:margin-top="0.199cm" fo:margin-bottom="0cm" style:contextual-spacing="false" fo:line-height="115%" fo:text-align="justify" style:justify-single-word="false"/>
      <style:text-properties style:font-name="Noto Sans1" fo:font-size="10pt" officeooo:rsid="0048bbf4" officeooo:paragraph-rsid="001557a6" style:font-size-asian="10pt" style:font-size-complex="10pt"/>
    </style:style>
    <style:style style:name="P68" style:family="paragraph" style:parent-style-name="Standard">
      <style:paragraph-properties fo:margin-top="0.199cm" fo:margin-bottom="0cm" style:contextual-spacing="false" fo:line-height="100%" fo:text-align="justify" style:justify-single-word="false"/>
      <style:text-properties style:font-name="Noto Sans1" fo:font-size="10pt" officeooo:rsid="004a0977" officeooo:paragraph-rsid="001557a6" style:font-size-asian="10pt" style:font-size-complex="10pt"/>
    </style:style>
    <style:style style:name="P69" style:family="paragraph" style:parent-style-name="Standard">
      <style:paragraph-properties fo:margin-top="0cm" fo:margin-bottom="0cm" style:contextual-spacing="false" fo:line-height="100%" fo:text-align="justify" style:justify-single-word="false"/>
      <style:text-properties style:font-name="Noto Sans1" fo:font-size="10pt" officeooo:rsid="004a0977" officeooo:paragraph-rsid="001557a6" style:font-size-asian="10pt" style:font-size-complex="10pt"/>
    </style:style>
    <style:style style:name="P70" style:family="paragraph" style:parent-style-name="Standard">
      <style:paragraph-properties fo:margin-top="0cm" fo:margin-bottom="0cm" style:contextual-spacing="false" fo:line-height="115%" fo:text-align="justify" style:justify-single-word="false"/>
      <style:text-properties style:font-name="Noto Sans1" fo:font-size="10pt" officeooo:rsid="004a0977" officeooo:paragraph-rsid="001557a6" style:font-size-asian="10pt" style:font-size-complex="10pt"/>
    </style:style>
    <style:style style:name="T1" style:family="text">
      <style:text-properties style:font-name="Noto Sans1"/>
    </style:style>
    <style:style style:name="T2" style:family="text">
      <style:text-properties style:font-name="Noto Sans1"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font-name="Noto Sans1" fo:font-size="12pt" officeooo:rsid="00356da2" style:font-size-asian="12pt" style:font-size-complex="12pt"/>
    </style:style>
    <style:style style:name="T4" style:family="text">
      <style:text-properties style:font-name="Noto Sans1" fo:font-size="14pt" fo:font-style="normal" officeooo:rsid="002bb611" style:font-size-asian="14pt" style:font-style-asian="normal" style:font-size-complex="14pt" style:font-style-complex="normal"/>
    </style:style>
    <style:style style:name="T5" style:family="text">
      <style:text-properties style:font-name="Noto Sans1" officeooo:rsid="009c579a"/>
    </style:style>
    <style:style style:name="T6" style:family="text">
      <style:text-properties style:font-name="Noto Sans1" officeooo:rsid="009c6705"/>
    </style:style>
    <style:style style:name="T7" style:family="text">
      <style:text-properties style:font-name="Noto Sans1" officeooo:rsid="001d05ad"/>
    </style:style>
    <style:style style:name="T8" style:family="text">
      <style:text-properties style:font-name="Noto Sans1" officeooo:rsid="0035be47"/>
    </style:style>
    <style:style style:name="T9" style:family="text">
      <style:text-properties style:font-name="Noto Sans1" officeooo:rsid="003b3947"/>
    </style:style>
    <style:style style:name="T10" style:family="text">
      <style:text-properties style:font-name="Noto Sans1" fo:font-size="9pt" style:font-size-asian="9pt" style:font-size-complex="9pt"/>
    </style:style>
    <style:style style:name="T11" style:family="text">
      <style:text-properties style:font-name="Noto Sans1" fo:font-size="9pt" officeooo:rsid="009c579a" style:font-size-asian="9pt" style:font-size-complex="9pt"/>
    </style:style>
    <style:style style:name="T12" style:family="text">
      <style:text-properties style:font-name="Noto Sans1" fo:font-size="9pt" officeooo:rsid="009c6705" style:font-size-asian="9pt" style:font-size-complex="9pt"/>
    </style:style>
    <style:style style:name="T13" style:family="text">
      <style:text-properties fo:font-style="normal" style:font-style-asian="normal" style:font-style-complex="normal"/>
    </style:style>
    <style:style style:name="T14" style:family="text">
      <style:text-properties fo:font-style="normal" officeooo:rsid="001c02ae" style:font-style-asian="normal" style:font-style-complex="normal"/>
    </style:style>
    <style:style style:name="T15" style:family="text">
      <style:text-properties fo:font-style="normal" officeooo:rsid="02ac4301" style:font-style-asian="normal" style:font-style-complex="normal"/>
    </style:style>
    <style:style style:name="T16" style:family="text">
      <style:text-properties fo:font-style="normal" officeooo:rsid="001d05ad" style:font-style-asian="normal" style:font-style-complex="normal"/>
    </style:style>
    <style:style style:name="T17" style:family="text">
      <style:text-properties fo:font-style="normal" officeooo:rsid="002bb611" style:font-size-asian="12pt" style:font-style-asian="normal" style:font-style-complex="normal"/>
    </style:style>
    <style:style style:name="T18" style:family="text">
      <style:text-properties fo:font-style="normal" officeooo:rsid="02ac4301" style:font-size-asian="12pt" style:font-style-asian="normal" style:font-style-complex="normal"/>
    </style:style>
    <style:style style:name="T19" style:family="text">
      <style:text-properties fo:font-style="normal" officeooo:rsid="02a83cbc" style:font-size-asian="12pt"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italic" officeooo:rsid="029d9fa9" style:font-style-asian="italic" style:font-style-complex="italic"/>
    </style:style>
    <style:style style:name="T22" style:family="text">
      <style:text-properties fo:font-style="italic" officeooo:rsid="0021a3d3" style:font-style-asian="italic" style:font-style-complex="italic"/>
    </style:style>
    <style:style style:name="T23" style:family="text">
      <style:text-properties fo:font-style="italic" officeooo:rsid="02a93f2f" style:font-style-asian="italic" style:font-style-complex="italic"/>
    </style:style>
    <style:style style:name="T24" style:family="text">
      <style:text-properties fo:font-style="italic" officeooo:rsid="0217c10f" style:font-style-asian="italic" style:font-style-complex="italic"/>
    </style:style>
    <style:style style:name="T25" style:family="text">
      <style:text-properties fo:font-style="italic" officeooo:rsid="0150c66b" style:font-style-asian="italic" style:font-style-complex="italic"/>
    </style:style>
    <style:style style:name="T26" style:family="text">
      <style:text-properties fo:font-style="italic" officeooo:rsid="0285d957" style:font-style-asian="italic" style:font-style-complex="italic"/>
    </style:style>
    <style:style style:name="T27" style:family="text">
      <style:text-properties fo:font-style="italic" officeooo:rsid="002c9e83" style:font-style-asian="italic" style:font-style-complex="italic"/>
    </style:style>
    <style:style style:name="T28" style:family="text">
      <style:text-properties fo:font-style="italic" officeooo:rsid="00624742" style:font-style-asian="italic" style:font-style-complex="italic"/>
    </style:style>
    <style:style style:name="T29" style:family="text">
      <style:text-properties fo:font-style="italic" officeooo:rsid="00cd44c2"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officeooo:rsid="002c9e83"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01d05ad" style:font-weight-asian="bold" style:font-weight-complex="bold"/>
    </style:style>
    <style:style style:name="T34" style:family="text">
      <style:text-properties fo:font-weight="bold" officeooo:rsid="002c9e83" style:font-weight-asian="bold" style:font-weight-complex="bold"/>
    </style:style>
    <style:style style:name="T35" style:family="text">
      <style:text-properties fo:font-size="9pt" style:font-size-asian="9pt" style:font-size-complex="9pt"/>
    </style:style>
    <style:style style:name="T36" style:family="text">
      <style:text-properties fo:font-size="9pt" fo:font-weight="bold" style:font-size-asian="9pt" style:font-weight-asian="bold" style:font-size-complex="9pt" style:font-weight-complex="bold"/>
    </style:style>
    <style:style style:name="T37" style:family="text">
      <style:text-properties officeooo:rsid="00356da2"/>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2bb611"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186b3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df46ad"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e0caf7"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36f345"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356da2"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30c1a7"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157589f"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ddc89a"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137b5a" style:font-size-asian="12pt" style:font-style-asian="normal" style:font-weight-asian="normal" style:font-size-complex="12pt" style:font-style-complex="normal" style:font-weight-complex="normal"/>
    </style:style>
    <style:style style:name="T49" style:family="text">
      <style:text-properties fo:font-size="12pt" style:font-size-asian="12pt" style:font-size-complex="12pt"/>
    </style:style>
    <style:style style:name="T50" style:family="text">
      <style:text-properties fo:font-size="12pt" officeooo:rsid="001d59fb" style:font-size-asian="12pt" style:font-size-complex="12pt"/>
    </style:style>
    <style:style style:name="T5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fo:font-style="italic" fo:font-weight="normal" officeooo:rsid="002bb611" style:font-size-asian="12pt" style:font-style-asian="italic" style:font-weight-asian="normal" style:font-size-complex="12pt" style:font-style-complex="italic" style:font-weight-complex="normal"/>
    </style:style>
    <style:style style:name="T53" style:family="text">
      <style:text-properties fo:font-size="12pt" fo:font-style="italic" fo:font-weight="bold" style:font-size-asian="12pt" style:font-style-asian="italic" style:font-weight-asian="bold" style:font-size-complex="12pt" style:font-style-complex="italic" style:font-weight-complex="bold"/>
    </style:style>
    <style:style style:name="T54" style:family="text">
      <style:text-properties fo:font-size="12pt" fo:font-style="italic" fo:font-weight="bold" officeooo:rsid="002bb611" style:font-size-asian="12pt" style:font-style-asian="italic" style:font-weight-asian="bold" style:font-size-complex="12pt" style:font-style-complex="italic"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fo:font-style="italic" officeooo:rsid="001d59fb" style:font-size-asian="12pt" style:font-style-asian="italic" style:font-size-complex="12pt" style:font-style-complex="italic"/>
    </style:style>
    <style:style style:name="T57" style:family="text">
      <style:text-properties officeooo:rsid="00df46ad"/>
    </style:style>
    <style:style style:name="T58" style:family="text">
      <style:text-properties officeooo:rsid="0030c1a7"/>
    </style:style>
    <style:style style:name="T59" style:family="text">
      <style:text-properties fo:font-size="11pt" fo:font-style="italic" fo:font-weight="bold" officeooo:rsid="002c9e83" style:font-size-asian="11pt" style:font-style-asian="italic" style:font-weight-asian="bold" style:font-size-complex="11pt" style:font-style-complex="italic" style:font-weight-complex="bold"/>
    </style:style>
    <style:style style:name="T60" style:family="text">
      <style:text-properties fo:font-size="11pt" style:font-size-asian="11pt" style:font-size-complex="11pt"/>
    </style:style>
    <style:style style:name="T61" style:family="text">
      <style:text-properties fo:font-size="11pt" fo:font-weight="bold" style:font-size-asian="11pt" style:font-weight-asian="bold" style:font-size-complex="11pt" style:font-weight-complex="bold"/>
    </style:style>
    <style:style style:name="T62" style:family="text">
      <style:text-properties fo:font-size="11pt" fo:font-weight="bold" officeooo:rsid="001d05ad" style:font-size-asian="11pt" style:font-weight-asian="bold" style:font-size-complex="11pt" style:font-weight-complex="bold"/>
    </style:style>
    <style:style style:name="T63" style:family="text">
      <style:text-properties fo:font-size="11pt" fo:font-weight="bold" officeooo:rsid="002c9e83" style:font-size-asian="11pt" style:font-weight-asian="bold" style:font-size-complex="11pt" style:font-weight-complex="bold"/>
    </style:style>
    <style:style style:name="T64" style:family="text">
      <style:text-properties officeooo:rsid="001d59fb"/>
    </style:style>
    <style:style style:name="T65" style:family="text">
      <style:text-properties officeooo:rsid="00665429"/>
    </style:style>
    <style:style style:name="T66" style:family="text">
      <style:text-properties officeooo:rsid="0028f48b"/>
    </style:style>
    <style:style style:name="T67" style:family="text">
      <style:text-properties officeooo:rsid="001f0cbe"/>
    </style:style>
    <style:style style:name="T68" style:family="text">
      <style:text-properties officeooo:rsid="002381eb"/>
    </style:style>
    <style:style style:name="T69" style:family="text">
      <style:text-properties officeooo:rsid="029d9fa9"/>
    </style:style>
    <style:style style:name="T70" style:family="text">
      <style:text-properties officeooo:rsid="0021a3d3"/>
    </style:style>
    <style:style style:name="T71" style:family="text">
      <style:text-properties officeooo:rsid="029fcdaa"/>
    </style:style>
    <style:style style:name="T72" style:family="text">
      <style:text-properties officeooo:rsid="029ed9c8"/>
    </style:style>
    <style:style style:name="T73" style:family="text">
      <style:text-properties officeooo:rsid="02a93f2f"/>
    </style:style>
    <style:style style:name="T74" style:family="text">
      <style:text-properties officeooo:rsid="02a0b3ca"/>
    </style:style>
    <style:style style:name="T75" style:family="text">
      <style:text-properties officeooo:rsid="02a99dd6"/>
    </style:style>
    <style:style style:name="T76" style:family="text">
      <style:text-properties officeooo:rsid="02a23e20"/>
    </style:style>
    <style:style style:name="T77" style:family="text">
      <style:text-properties officeooo:rsid="02a37928"/>
    </style:style>
    <style:style style:name="T78" style:family="text">
      <style:text-properties officeooo:rsid="02aac0d2"/>
    </style:style>
    <style:style style:name="T79" style:family="text">
      <style:text-properties officeooo:rsid="0219769b"/>
    </style:style>
    <style:style style:name="T80" style:family="text">
      <style:text-properties officeooo:rsid="02afd127"/>
    </style:style>
    <style:style style:name="T81" style:family="text">
      <style:text-properties officeooo:rsid="02a6f0dc"/>
    </style:style>
    <style:style style:name="T82" style:family="text">
      <style:text-properties officeooo:rsid="0217c10f"/>
    </style:style>
    <style:style style:name="T83" style:family="text">
      <style:text-properties officeooo:rsid="02a83cbc"/>
    </style:style>
    <style:style style:name="T84" style:family="text">
      <style:text-properties fo:font-size="14pt" officeooo:rsid="0013e755" style:font-size-asian="14pt" style:font-size-complex="14pt"/>
    </style:style>
    <style:style style:name="T85" style:family="text">
      <style:text-properties fo:font-size="14pt" fo:font-style="normal" officeooo:rsid="002bb611" style:font-size-asian="14pt" style:font-style-asian="normal" style:font-size-complex="14pt" style:font-style-complex="normal"/>
    </style:style>
    <style:style style:name="T86" style:family="text">
      <style:text-properties style:font-name="Noto Sans1" fo:font-style="normal" officeooo:rsid="002bb611" style:font-style-asian="normal" style:font-style-complex="normal"/>
    </style:style>
    <style:style style:name="T87" style:family="text">
      <style:text-properties style:font-name="Noto Sans1" fo:font-style="normal" officeooo:rsid="02ac4301" style:font-style-asian="normal" style:font-style-complex="normal"/>
    </style:style>
    <style:style style:name="T88" style:family="text">
      <style:text-properties style:font-name="Noto Sans1" fo:font-style="normal" officeooo:rsid="02a83cbc" style:font-style-asian="normal" style:font-style-complex="normal"/>
    </style:style>
    <style:style style:name="T89" style:family="text">
      <style:text-properties style:font-name="Noto Sans1" fo:font-size="14pt" fo:font-style="normal" officeooo:rsid="002bb611" style:font-size-asian="14pt" style:font-style-asian="normal" style:font-size-complex="14pt" style:font-style-complex="normal"/>
    </style:style>
    <style:style style:name="T90" style:family="text">
      <style:text-properties style:font-name="Noto Sans1" fo:font-size="12pt" fo:font-style="normal" officeooo:rsid="002bb611" style:font-size-asian="12pt" style:font-style-asian="normal" style:font-size-complex="12pt" style:font-style-complex="normal"/>
    </style:style>
    <style:style style:name="T91" style:family="text">
      <style:text-properties officeooo:rsid="02ac4301"/>
    </style:style>
    <style:style style:name="T92" style:family="text">
      <style:text-properties officeooo:rsid="02ae2cad"/>
    </style:style>
    <style:style style:name="T93" style:family="text">
      <style:text-properties officeooo:rsid="0150c66b"/>
    </style:style>
    <style:style style:name="T94" style:family="text">
      <style:text-properties officeooo:rsid="00101508"/>
    </style:style>
    <style:style style:name="T95" style:family="text">
      <style:text-properties officeooo:rsid="01524194"/>
    </style:style>
    <style:style style:name="T96" style:family="text">
      <style:text-properties officeooo:rsid="001390a8"/>
    </style:style>
    <style:style style:name="T97" style:family="text">
      <style:text-properties officeooo:rsid="002b861c"/>
    </style:style>
    <style:style style:name="T98" style:family="text">
      <style:text-properties officeooo:rsid="0165857c"/>
    </style:style>
    <style:style style:name="T99" style:family="text">
      <style:text-properties officeooo:rsid="0013afc7"/>
    </style:style>
    <style:style style:name="T100" style:family="text">
      <style:text-properties officeooo:rsid="02b45c3b"/>
    </style:style>
    <style:style style:name="T101" style:family="text">
      <style:text-properties officeooo:rsid="02b5162e"/>
    </style:style>
    <style:style style:name="T102" style:family="text">
      <style:text-properties officeooo:rsid="001d05ad"/>
    </style:style>
    <style:style style:name="T103" style:family="text">
      <style:text-properties officeooo:rsid="002c9e83"/>
    </style:style>
    <style:style style:name="T104" style:family="text">
      <style:text-properties officeooo:rsid="0285d957"/>
    </style:style>
    <style:style style:name="T105" style:family="text">
      <style:text-properties officeooo:rsid="0042a6bd"/>
    </style:style>
    <style:style style:name="T106" style:family="text">
      <style:text-properties officeooo:rsid="0040f78d"/>
    </style:style>
    <style:style style:name="T107" style:family="text">
      <style:text-properties officeooo:rsid="015416ab"/>
    </style:style>
    <style:style style:name="T108" style:family="text">
      <style:text-properties officeooo:rsid="02b642ee"/>
    </style:style>
    <style:style style:name="T109" style:family="text">
      <style:text-properties officeooo:rsid="0047b141"/>
    </style:style>
    <style:style style:name="T110" style:family="text">
      <style:text-properties fo:font-size="10pt" style:font-size-asian="10pt" style:font-size-complex="10pt"/>
    </style:style>
    <style:style style:name="T111" style:family="text">
      <style:text-properties officeooo:rsid="004a0977"/>
    </style:style>
    <style:style style:name="T112" style:family="text">
      <style:text-properties officeooo:rsid="0046e1c4"/>
    </style:style>
    <style:style style:name="T113" style:family="text">
      <style:text-properties officeooo:rsid="0042cc9b"/>
    </style:style>
    <style:style style:name="T114" style:family="text">
      <style:text-properties officeooo:rsid="004604e0"/>
    </style:style>
    <style:style style:name="T115" style:family="text">
      <style:text-properties officeooo:rsid="02b7a975"/>
    </style:style>
    <style:style style:name="T116" style:family="text">
      <style:text-properties officeooo:rsid="002e651a"/>
    </style:style>
    <style:style style:name="T117" style:family="text">
      <style:text-properties officeooo:rsid="027e5aac"/>
    </style:style>
    <style:style style:name="T118" style:family="text">
      <style:text-properties officeooo:rsid="021c3fca"/>
    </style:style>
    <style:style style:name="T119" style:family="text">
      <style:text-properties officeooo:rsid="00390993"/>
    </style:style>
    <style:style style:name="T120" style:family="text">
      <style:text-properties officeooo:rsid="003a7c0f"/>
    </style:style>
    <style:style style:name="T121" style:family="text">
      <style:text-properties style:font-name="Liberation Serif" officeooo:rsid="003e5d05"/>
    </style:style>
    <style:style style:name="T122" style:family="text">
      <style:text-properties officeooo:rsid="02baab3a"/>
    </style:style>
    <style:style style:name="T123" style:family="text">
      <style:text-properties officeooo:rsid="009f6beb"/>
    </style:style>
    <style:style style:name="T124" style:family="text">
      <style:text-properties officeooo:rsid="00624eaf"/>
    </style:style>
    <style:style style:name="T125" style:family="text">
      <style:text-properties officeooo:rsid="02bbc14e"/>
    </style:style>
    <style:style style:name="T126" style:family="text">
      <style:text-properties officeooo:rsid="0035be47"/>
    </style:style>
    <style:style style:name="T127" style:family="text">
      <style:text-properties officeooo:rsid="003b3947"/>
    </style:style>
    <style:style style:name="T128" style:family="text">
      <style:text-properties officeooo:rsid="003e5d05"/>
    </style:style>
    <style:style style:name="T129" style:family="text">
      <style:text-properties officeooo:rsid="001557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bookmark-start text:name="__RefHeading___Toc17272_1374295045"/>L<text:span text:style-name="T129">e critiche</text:span> di Kant - Una inversione di rotta<text:bookmark-end text:name="__RefHeading___Toc17272_1374295045"/></text:h>
      <text:p text:style-name="P28">Immanuel Kant, figura centrale dell'Illuminismo tedesco, rivoluzionò il modo di concepire la metafisica. Anziché considerarla una scienza che potesse fornire conoscenze certe e definitive sulla realtà al di là dell'esperienza, Kant la sottopose a<text:span text:style-name="T91">d</text:span> un<text:span text:style-name="T91">a sottile</text:span> critica, delineando un nuovo <text:span text:style-name="T92">metodo di filosofia della scienza</text:span>.</text:p>
      <text:p text:style-name="P28"><text:span text:style-name="T93">L</text:span>a <text:span text:style-name="T93">c</text:span>ritica alla <text:span text:style-name="T93">m</text:span>etafisica <text:span text:style-name="T93">t</text:span>radizionale</text:p>
      <text:p text:style-name="P28">Kant partì dal presupposto che la metafisica tradizionale avesse fallito nel suo intento di fornire risposte definitive a domande fondamentali come l'esistenza di Dio, l'immortalità dell'anima e la natura del mondo. Secondo il filosofo tedesco, i metafisici del passato avevano commesso l'errore di voler estendere i limiti della conoscenza umana oltre i confini dell'esperienza sensibile, cercando di cogliere una realtà noumenica, inaccessibile ai nostri sensi.</text:p>
      <text:p text:style-name="P40"><text:span text:style-name="T93">Q</text:span>ui c’è il grosso lavoro che propone Kant, <text:span text:style-name="T93">dove considera la mente come un grande apparato </text:span>compost<text:span text:style-name="T93">o</text:span> da un <text:span text:style-name="T20">“io pens</text:span><text:span text:style-name="T25">o”</text:span> che sarebbe poi un parente stretto del cogito di Cartesio, solo che rispetto a Cartesio, questo <text:span text:style-name="T20">“io penso”</text:span> è molto attrezzato, <text:span text:style-name="T94">nel senso che dispone di due forme pure dell’intuizione e di 12 categorie che sono esistenti </text:span><text:span text:style-name="T95">nella nostra mente </text:span><text:span text:style-name="T94">sin dall’inizio, senza </text:span><text:span text:style-name="T96">che </text:span><text:span text:style-name="T94">nessuno gliele debba insegnare. </text:span></text:p>
      <text:p text:style-name="P26"><text:bookmark-start text:name="__RefHeading___Toc17553_4287692119"/><text:soft-page-break/>La Rivoluzione Copernicana della Filosofia<text:bookmark-end text:name="__RefHeading___Toc17553_4287692119"/></text:p>
      <text:p text:style-name="P28">Per superare questa impasse, Kant propose una vera e propria rivoluzione nella filosofia, paragonabile alla rivoluzione copernicana in astronomia. Anziché adattare il nostro pensiero alla realtà, Kant sostenne che è la realtà a conformarsi alle nostre strutture mentali. In altre parole, non sono gli oggetti a darci la conoscenza, ma sono le nostre facoltà cognitive a plasmare la nostra esperienza del mondo. </text:p>
      <text:p text:style-name="P28">Kant distin<text:span text:style-name="T97">gue</text:span> tra <text:span text:style-name="T97">conoscenza a Priori e Posteriore. </text:span><text:span text:style-name="T98">I</text:span>l termine “<text:span text:style-name="T20">a priori</text:span>” si riferisce a un tipo di conoscenza o ragionamento che si basa su principi o verità considerate indipendenti dall’esperienza sensoriale o dall’osservazione diretta. Questo tipo di ragionamento si contrappone al ragionamento “<text:span text:style-name="T20">a posteriori</text:span>”, che si basa invece sull’esperienza empirica.</text:p>
      <text:p text:style-name="P28">Kant sostiene che la mente umana possiede strutture innate che permettono di organizzare e comprendere le informazioni sensoriali. Queste strutture sono le “<text:span text:style-name="T20">forme a priori</text:span>” della sensibilità e dell’intelletto. Sono le forme pure dell'intuizione (spazio e tempo) e le categorie dell'intelletto (causalità, sostanza, <text:span text:style-name="T66">unità, pluralità </text:span>ecc.) che strutturano la nostra esperienza.</text:p>
      <text:p text:style-name="P41">Lo spazio ed il tempo non sono caratteristiche del mondo esterno, ma sono le lenti con cui noi percepiamo il mondo.</text:p>
      <text:list text:style-name="L1">
        <text:list-item>
          <text:p text:style-name="P47"><text:soft-page-break/>Spazio: Tutte le nostre percezioni sensoriali sono localizzate nello spazio. Non possiamo percepire un oggetto se non lo collochiamo in una determinata posizione rispetto ad altri oggetti. Lo spazio è la forma a priori che ci permette di ordinare le nostre sensazioni spaziali.</text:p>
        </text:list-item>
        <text:list-item>
          <text:p text:style-name="P47">Tempo: Le nostre esperienze si susseguono nel tempo. Un evento precede o segue un altro evento. Il tempo è la forma a priori che ci permette di ordinare le nostre sensazioni temporali.</text:p>
        </text:list-item>
      </text:list>
      <text:p text:style-name="P39"><text:span text:style-name="T95">N</text:span><text:span text:style-name="T94">oi vediamo le cose nello spazio e nel tempo perché abbiamo delle intuizioni, </text:span><text:span text:style-name="T95">l</text:span><text:span text:style-name="T94">e cose </text:span><text:span text:style-name="T96">in sé </text:span><text:span text:style-name="T94">non sono né nello spazio e né nel tempo; </text:span><text:span text:style-name="T96">qui entrano in gioco le </text:span><text:span text:style-name="T94">categorie, </text:span><text:span text:style-name="T96">dove </text:span><text:span text:style-name="T94">una sostanza, </text:span><text:span text:style-name="T99">sotto effetto di </text:span><text:span text:style-name="T94">un’azione, causa degli effetti. </text:span><text:span text:style-name="T99">T</text:span><text:span text:style-name="T94">utto questo non c’è nella natura, c’è nella mente che l</text:span><text:span text:style-name="T99">a</text:span><text:span text:style-name="T94"> osserva, c’è un capovolgimento </text:span><text:span text:style-name="T99">del modo di pensare</text:span><text:span text:style-name="T94">.</text:span></text:p>
      <text:p text:style-name="P43">Immaginiamo di guardare un paesaggio. Vediamo alberi, montagne, un fiume. Noi non percepiamo gli oggetti in sé, ma le nostre sensazioni visive organizzate secondo le forme a priori dello spazio e del tempo. Gli alberi sono più piccoli delle montagne e si trovano più vicini al fiume. Questa è una percezione spaziale, organizzata secondo la forma a priori dello spazio.</text:p>
      <text:p text:style-name="P62">Le nuvole si muovono nel cielo. Questa è una percezione temporale, organizzata secondo la forma a priori del tempo.</text:p>
      <text:p text:style-name="P42"><text:soft-page-break/>Ci si chiede: come è possibile la conoscenza a priori se non si ha la conoscenza?</text:p>
      <text:p text:style-name="P43">Kant spiega che la conoscenza a priori è possibile perché la mente umana non è una tabula rasa, ma possiede già le strutture necessarie per organizzare l’esperienza. Queste strutture a priori sono ciò che rende possibile la conoscenza scientifica e matematica, che è universale e necessaria.</text:p>
      <text:p text:style-name="P43">Un esempio comune di conoscenza a priori è il principio di non contraddizione, <text:span text:style-name="T100">dove si</text:span> afferma che una proposizione non può essere sia vera che falsa allo stesso tempo. Questo principio può essere compreso e accettato indipendentemente da qualsiasi esperienza specifica. Altri esempi di conoscenza a priori includono i principi matematici <text:span text:style-name="T100">come il fatto che la somma degli angoli di un triangolo è sempre di 180°, oppure </text:span>alcune verità etiche <text:span text:style-name="T100">come quella </text:span><text:span text:style-name="T101">dell’imperativo categorico che afferma che dobbiamo agire solo secondo quelle massime che possiamo al tempo stesso volere che diventino leggi universali. Il "non mentire" può essere una verità etica a priori perché possiamo razionalmente comprendere che mentire non può essere universalmente accettabile</text:span>.</text:p>
      <text:p text:style-name="P46">Comprendere il ruolo delle forme a priori ci aiuta a capire i limiti della nostra conoscenza, <text:span text:style-name="T101">n</text:span>on possiamo conoscere <text:soft-page-break/>il mondo "<text:span text:style-name="T20">in sé</text:span>", ma solo il mondo come appare a noi, filtrato dalle nostre forme a priori.</text:p>
      <text:p text:style-name="P27"/>
      <text:p text:style-name="P27"><text:bookmark-start text:name="__RefHeading___Toc17555_4287692119"/>I Limiti della Metafisica<text:bookmark-end text:name="__RefHeading___Toc17555_4287692119"/></text:p>
      <text:p text:style-name="P38">Secondo Kant, la metafisica può occuparsi solo delle condizioni a priori della conoscenza, cioè delle strutture mentali che rendono possibile qualsiasi esperienza. Non può, invece, fornire conoscenze certe sulla realtà noumenica, che rimane per noi inconoscibile.</text:p>
      <text:p text:style-name="P48"><text:span text:style-name="T102">Kant ridefinì la metafisica come una disciplina critica, volta a indagare i limiti e le possibilità della ragione umana. La metafisica kantiana non ha più l'ambizione di fornire risposte definitive ai grandi interrogativi dell'esistenza, ma si limita a chiarire le condizioni di possibilità della nostra conoscenza. </text:span></text:p>
      <text:p text:style-name="P37">Le Tre Critiche Kantiane</text:p>
      <text:p text:style-name="P50"><text:span text:style-name="T103">N</text:span><text:span text:style-name="T102">el tentativo di fondare la filosofia su basi solide e critiche, </text:span><text:span text:style-name="T103">Kant</text:span><text:span text:style-name="T102"> sviluppa un sistema complesso che ruota attorno a tre grandi opere: </text:span></text:p>
      <text:p text:style-name="P49"><text:span text:style-name="T102">la </text:span><text:span text:style-name="T33">Critica della ragion pura</text:span><text:span text:style-name="T102">, la </text:span><text:span text:style-name="T33">Critica della ragion pratica,</text:span><text:span text:style-name="T102">la </text:span><text:span text:style-name="T33">Critica del giudizio</text:span><text:span text:style-name="T102">.</text:span></text:p>
      <text:p text:style-name="P50"><text:span text:style-name="T20">Critica della ragion </text:span><text:span text:style-name="T26">P</text:span><text:span text:style-name="T20">ura</text:span>.</text:p>
      <text:p text:style-name="P59"><text:span text:style-name="T104">I</text:span><text:span text:style-name="T102">n quest'opera </text:span><text:span text:style-name="T105">Kant </text:span><text:span text:style-name="T106">introduce il concetto di fenomeno e noumeno</text:span><text:span text:style-name="T106"><text:note text:id="ftn1" text:note-class="footnote"><text:note-citation>1</text:note-citation><text:note-body><text:p text:style-name="P15"><text:span text:style-name="T35">Il concetto di “noumeno”</text:span> è la base della teoria della conoscenza elaborata da Immanuel Kant. Noumeno dal greco significa “ciò che è pensato” e si distingue da “fenomeno” che, invece, significa “ciò che appare”. Nella teoria kantiana è possibile conoscere il “fenomeno”, ma non il “noumeno”. Grazie all’esperienza sensibile possiamo raccogliere i dati di ciò <text:span text:style-name="T107">c</text:span>he vediamo e di cui abbiamo una certezza sensibile, e grazie all’intelletto possiamo ordinare e regolare questi risultati sotto forma di giudizi. Ciò che invece, non è possibile fare, è andare al di là dell’esperienza ed è qui che si colloca il “noumeno”, “la cosa in sé”. Il concetto di “noumeno”, dunque, rappresenta la differenza tra ciò che l’uomo crede, oppure sa, riguardo ad una cosa e ciò che realmente la cosa è. </text:p></text:note-body></text:note></text:span><text:span text:style-name="T106">, </text:span><text:span text:style-name="T105">cioè delle questioni </text:span><text:span text:style-name="T102">relative alla conoscenza </text:span><text:soft-page-break/><text:span text:style-name="T102">in generale. Kant sostiene che il nostro modo di conoscere il mondo è limitato alle nostre facoltà cognitive, che ci permettono di percepire solo le apparenze delle cose. </text:span><text:span text:style-name="T108">L</text:span><text:span text:style-name="T102">a nostra esperienza del mondo è mediata dalle nostre capacità cognitive, che filtrano e organizzano le informazioni sensoriali, </text:span><text:span text:style-name="T108">p</text:span><text:span text:style-name="T102">ertanto, ciò che percepiamo e conosciamo sono i fenomeni, non la realtà ultima o il noumeno. Possiamo solo avere un’idea del noumeno attraverso la ragione, ma non possiamo conoscerlo direttamente. Nella filosofia di Platone, il noumeno rappresenta una specie intelligibile o idea e indica tutto ciò che non può essere percepito nel mondo tangibile, ma a cui si può arrivare solo tramite il pensiero e la ragione. Il concetto di noumeno è strettamente legato alla teoria delle idee di Platone, secondo la quale le idee sono entità eterne e immutabili, che esistono al di là del mondo sensibile e sono la vera realtà. Platone credeva che il mondo sensibile, quello che percepiamo attraverso i nostri sensi, fosse solo un’ombra o una copia </text:span><text:soft-page-break/><text:span text:style-name="T102">imperfetta delle idee. Il noumeno, quindi, rappresenta il livello più elevato di conoscenza e verità, che può essere raggiunto solo attraverso il pensiero e la contemplazione. Platone riteneva che solo attraverso la </text:span><text:span text:style-name="T109">dialettica </text:span><text:span text:style-name="T102">e la ricerca delle idee si pote</text:span><text:span text:style-name="T108">va</text:span><text:span text:style-name="T102"> raggiungere la conoscenza autentica e la saggezza. </text:span></text:p>
      <text:p text:style-name="P61">Kant la pensava diversamente e po<text:span text:style-name="T108">n</text:span>e un limite alla conoscenza, introducendo una distinzione più netta tra fenomeno (ciò che appare) e noumeno (la cosa in sé). Il fenomeno è l'oggetto della nostra esperienza, mediato dalle forme a priori dello spazio, del tempo e delle categorie dell'intelletto. La nostra mente, con le sue strutture a priori, è limitata alla conoscenza dei fenomeni. Il noumeno rimane un limite trascendentale della nostra conoscenza, che non possiamo determinare, è ciò che sta al di là delle nostre possibilità cognitive.</text:p>
      <text:p text:style-name="P63">Di seguito, si propone un quadro sintetico della divergenza di pensiero tra Kant e Platone.</text:p>
      <text:p text:style-name="P67"><text:span text:style-name="T32">Caratteristica</text:span><text:tab/><text:tab/><text:span text:style-name="T32">Platone</text:span><text:tab/><text:tab/><text:tab/><text:span text:style-name="T32">Kant</text:span></text:p>
      <text:p text:style-name="P65">Natura del noumeno<text:tab/>Mondo perfetto e<text:tab/>Limite trascendentale </text:p>
      <text:p text:style-name="P66"><text:tab/><text:tab/><text:tab/>immutabile<text:tab/><text:tab/>della conoscenza</text:p>
      <text:p text:style-name="P65">Conoscibilità del<text:tab/>Possibile attraverso<text:tab/><text:span text:style-name="T111">Inconoscibile</text:span></text:p>
      <text:p text:style-name="P66"><text:span text:style-name="T111">noumeno</text:span><text:tab/><text:tab/>la reminiscenza</text:p>
      <text:p text:style-name="P68">Relazione con il<text:tab/>Il mondo sensibile è<text:tab/>Il mondo sensibile è</text:p>
      <text:p text:style-name="P69">mondo sensibile<text:tab/>una copia imperfetta<text:tab/>l’unico oggetto della</text:p>
      <text:p text:style-name="P70"><text:tab/><text:tab/><text:tab/>del mondo delle idee<text:tab/>nostra esperienza</text:p>
      <text:p text:style-name="P28"><text:soft-page-break/>Per Kant, la conoscenza fenomenica rappresenta la nostra percezione del mondo esterno. Secondo il filosofo tedesco, non siamo in grado di conoscere direttamente la realtà in sé, ma solo l’aspetto che essa assume per noi. <text:span text:style-name="T112">L</text:span>a conoscenza è mediata dai nostri sensi e dalla nostra capacità di interpretare le percezioni che essi ci trasmettono. Pertanto, la conoscenza fenomenica è soggettiva, poiché ogni individuo percepisce il mondo in modo unico, a seconda delle proprie sensazioni e interpretazioni. <text:span text:style-name="T113">Q</text:span>uali sono i limiti della conoscenza umana? Quali sono le condizioni di possibilità dell'esperienza? Quali sono i concetti a priori che strutturano il nostro pensiero? La Critica della ragion pura è dedicata proprio a indagare queste domande, cercando di delimitare il campo della conoscenza umana e di individuare i principi che regolano il nostro modo di pensare. <text:span text:style-name="T103">In altre parole, la ragion pura si occupa del mondo così come lo conosciamo, utilizza un metodo analitico, decomponendo i concetti e le proposizioni in elementi più semplici.</text:span></text:p>
      <text:p text:style-name="P28">Secondo Kant, <text:span text:style-name="T114">sono tre </text:span>le forme della conoscenza: la <text:span text:style-name="T32">sensibilità</text:span>, <text:span text:style-name="T32">l’intelletto</text:span> e <text:span text:style-name="T32">la ragione</text:span>. La sensibilità è la capacità di percepire e sperimentare il mondo attraverso i sensi, come la vista, l’udito, il tatto, ecc. È attraverso la sensibilità che siamo in grado di avere esperienze sensoriali e di percepire gli oggetti nel mondo esterno.</text:p>
      <text:p text:style-name="P51"><text:soft-page-break/><text:span text:style-name="T102">L’intelletto, invece, è la facoltà che ci permette di comprendere e interpretare le percezioni sensoriali. Attraverso l’intelletto, siamo in grado di organizzare e classificare le nostre esperienze sensoriali, di identificare gli oggetti e di attribuire loro proprietà e caratteristiche. È grazie all’intelletto che siamo in grado di formulare giudizi e di avere una conoscenza empirica del mondo. </text:span><text:span text:style-name="T115">L</text:span><text:span text:style-name="T102">a ragione è la facoltà che ci permette di andare oltre l’esperienza sensoriale e l’intelletto, di ragionare, di formulare concetti astratti e di avere una comprensione più profonda della realtà. La ragione ci permette di riflettere sulle nostre esperienze, di formulare idee e concetti universali, di porci domande filosofiche e di cercare risposte a quesiti che vanno al di là di ciò che possiamo percepire con i sensi.</text:span></text:p>
      <text:p text:style-name="P64"><text:bookmark-start text:name="__RefHeading___Toc19292_4287692119"/>Critica della ragion <text:span text:style-name="T104">P</text:span>ratica<text:bookmark-end text:name="__RefHeading___Toc19292_4287692119"/></text:p>
      <text:p text:style-name="P51"><text:span text:style-name="T104">Q</text:span><text:span text:style-name="T103">ui Kant si</text:span><text:span text:style-name="T102"> riferisce invece alla capacità della mente di agire in modo morale. La ragion pratica si occupa delle questioni relative alla volontà e alla moralità: cosa rende un'azione giusta o sbagliata? Qual è il fondamento della legge morale? Come possiamo vivere una vita buona e virtuosa? La Critica della ragion pratica ha come obiettivo quello di scoprire la legge morale universale che guida le nostre azioni e di mostrare come l'uomo, in quanto essere razionale, sia dotato di una volontà libera che lo rende responsabile delle proprie scelte. </text:span><text:span text:style-name="T115">L</text:span><text:span text:style-name="T103">a ragion pratica si concentra sul mondo come lo vogliamo, utilizza un </text:span><text:soft-page-break/><text:span text:style-name="T103">metodo sintetico, costruendo una legge morale universale a partire da principi fondamentali. </text:span><text:span text:style-name="T116">La </text:span><text:span text:style-name="T103">Critica </text:span><text:span text:style-name="T117">d</text:span><text:span text:style-name="T103">ella Ragion pratica </text:span><text:span text:style-name="T116">si conclude con una citazione famosissima, le cui parole sono scritte sulla pietra</text:span><text:span text:style-name="T103">: &lt;&lt;</text:span><text:span text:style-name="T27">Due cose riempiono l’animo di ammirazione e venerazione sempre nuova e crescente, quanto più spesso e accuratamente la riflessione si occupa di esse</text:span><text:span text:style-name="T103">: </text:span><text:span text:style-name="T31">il cielo stellato sopra di me, e la legge morale in me</text:span><text:span text:style-name="T34">. </text:span><text:span text:style-name="T27">Queste due cose io non ho bisogno di cercarle e semplicemente supporle come se fossero avvolte nell’oscurità o fossero nel trascendente fuori del mio orizzonte; io le vedo davanti a me e le connetto immediatamente con la coscienza della mia esistenza. Il primo comincia dal luogo che io occupo nel mondo sensibile esterno ed estende la connessione in cui mi trovo nell’infinitamente grande, con mondi sopra mondi e sistemi di sistemi, nei tempi illimitati del loro movimento periodico, nel loro inizio e nella loro continuità. La seconda comincia dalla mia invisibile identità, la personalità, e mi pone in un mondo che possiede vera infinità, ma di cui si può accorgere solo l’intelletto, e con il quale (ma grazie ad esso anche con tutti quei mondi visibili) io non mi riconosco, come là, in una connessione puramente accidentale, ma in una necessaria e universale. Il primo sguardo di una innumerabile quantità di mondi per così dire annienta la mia importanza, che è quella di una creatura animale, che dovrà restituire ai pianeti la materia da cui è sorta, dopo essere stata dotata per breve tempo (non si sa come) di </text:span><text:soft-page-break/><text:span text:style-name="T27">forza vitale. Il secondo al contrario innalza infinitamente il mio valore, che è quello di una intelligenza, grazie alla mia personalità, nella quale la legge morale mi rivela una vita indipendente dall’animalità e anche dall’intero mondo sensibile, per lo</text:span><text:span text:style-name="T103"> </text:span><text:span text:style-name="T27">meno quanto può essere dedotta dalla destinazione finale della mia esistenza attraverso questa legge, che non è limitata alle condizioni e ai confini di questa vita, ma si estende all’infinito...&gt;&gt;</text:span></text:p>
      <text:p text:style-name="P28">Il cielo stellato e la legge morale sono quindi il simbolo dello sforzo della ragione che tenta di comprendere, oltre l’intelletto, ciò che più le procura ammirazione: la propria natura e la natura fuori di sé.</text:p>
      <text:p text:style-name="P51"><text:span text:style-name="T102">La contemplazione del cielo stellato funge da metafora per l'infinita ricerca della conoscenza. La legge morale interna, d'altra parte, rappresenta la bussola etica che guida l'umanità attraverso le sfide della vita. Questi due elementi simboleggiano la dualità della nostra esistenza: l'aspirazione a comprendere l'universo esterno e il desiderio di ascoltare la nostra coscienza</text:span><text:span text:style-name="T102"><text:note text:id="ftn2" text:note-class="footnote"><text:note-citation>2</text:note-citation><text:note-body><text:p text:style-name="P17"><text:span text:style-name="T10">Nucleo più segreto e sacrario dell’uomo, luogo in cui l’individuo si confronta con la propria legge morale e con Dio, </text:span><text:span text:style-name="T11">la cui voce risuona nella intimità propria. La coscienza rappresenta la facoltà umana di percepire la legge morale universale e di agire in conformità ad essa.</text:span><text:span text:style-name="T10"> </text:span><text:span text:style-name="T11">La coscienza non è mero arbitrio individuale. </text:span><text:span text:style-name="T12">U</text:span><text:span text:style-name="T11">na scelta che v</text:span><text:span text:style-name="T12">iene</text:span><text:span text:style-name="T11"> compiuta “in coscienza” non vuol dire che si tratti di una scelta giusta. In coscienza ci si può sbagliare. L’inferno, si dice, è lastricato di buone intenzioni. </text:span><text:span text:style-name="T12">Da qui l’importanza di “farsi una coscienza”, di educarla attraverso la ragione ed il confronto con un criterio di giusto che trascenda il </text:span><text:span text:style-name="T6">singolo.</text:span></text:p></text:note-body></text:note></text:span><text:span text:style-name="T102"> interna. Insieme, ci ricordano che, nonostante i nostri limiti </text:span><text:soft-page-break/><text:span text:style-name="T102">umani, possediamo la capacità unica di riflettere sulla nostra posizione nell'universo e di agire secondo principi morali universali. Una interpretazione radicale di queste </text:span><text:span text:style-name="T118">p</text:span><text:span text:style-name="T102">arole porta ad affermare che di fronte al sublime, la ragione non riesce a fornire alcuna spiegazione perché mancante di un metodo, ma riesce a provare solo ammirazione e rispetto.</text:span></text:p>
      <text:p text:style-name="P50"><text:span text:style-name="T119">U</text:span><text:span text:style-name="T102">n concetto centrale nella filosofia estetica di Immanuel Kant </text:span><text:span text:style-name="T119">è la </text:span><text:span text:style-name="T102">distinzione tra il bello e il sublime, espost</text:span><text:span text:style-name="T120">o</text:span><text:span text:style-name="T102"> nella sua opera “</text:span><text:span text:style-name="T16">Critica del Giudizio</text:span><text:span text:style-name="T102">”.</text:span></text:p>
      <text:p text:style-name="P51"><text:span text:style-name="T102">Secondo Kant, il bello è associato a un sentimento di promozione della vita, poiché produce un piacere diretto e immediato. Al contrario, il sublime provoca un piacere che sorge solo indirettamente, dopo un momento di impedimento delle forze vitali, seguito da una loro esaltazione più intensa. </text:span><text:span text:style-name="T126">I punti cardine della filosofia estetica di Kant sono: </text:span>Il Giudizio di Gusto: Kant distingue tra giudizi estetici e giudizi cognitivi. I giudizi estetici, come “questa rosa è bella”, non si basano su concetti o conoscenze oggettive, ma sul sentimento di piacere che l’oggetto suscita nel soggetto. Il bello è associato a un piacere diretto e armonioso, che promuove la vita e l’equilibrio delle facoltà cognitive. Il sublime, invece, provoca un piacere indiretto, che nasce dopo un momento di impedimento delle forze vitali, seguito da una loro esaltazione più intensa.</text:p>
      <text:p text:style-name="P26"><text:soft-page-break/><text:span text:style-name="T30">Critica del Giudizio</text:span>.</text:p>
      <text:p text:style-name="P51">Kant definisce bello “ciò che piace senza interesse – Il gusto è la facoltà di giudicare un oggetto o una rappresentazione mediante un piacere o un dispiacere, senza alcun interesse. L’oggetto di tal piacere dicesi bello”. Il concetto del bello viene sradicato dall’oggettività, rimane universale ma è soggettivo nella misura in cui si determina a partire dal soggetto in maniera trascendentale; è una proiezione del soggetto nell’oggetto, è il riconoscimento di un sentimento soggettivo prodotto dalla relazione con l’altro, ed è un movimento universale perché compiuto allo stesso modo da tutti gli uomini. Questa concezione non è concepibile se non si coglie la differenza che Kant individua tra bello e gradevole. “De gustibus non disputandum” (<text:span text:style-name="T127">dei gusti non si deve discutere</text:span>) è una frase da riferire al gradevole, al piacevole e non al bello, l’arbitrarietà del gusto si ferma al livello empirico, è individuale e particolare, ma è decisamente distinta dall’universalità soggettiva della bellezza, frutto di un giudizio che Kant definisce riflettente, in quanto prodotto dal riflesso, appunto, del soggetto nell’oggetto, dal riconoscimento di un sentimento che sorge dalla relazione con l’oggetto stesso.“Bello è ciò che piace universalmente senza concetto. Circa il gradevole ciascuno riconosce che il suo giudizio, fondato su di un sentimento personale, si limita, quanto al valore, alla sua persona” (Critica del Giudizio). I <text:soft-page-break/>giudizi riflettenti estetici, oltre all’idea del bello, generano quella di Sublime che si distingue dal bello per struttura. Il bello ha una forma, caratterizzata da proporzione e armonia: un dipinto, una chiesa, una persona… Il sublime è, invece, informe, disorganico e produce nell’uomo un sentimento straniante di irrequietezza e angoscia davanti alla sua impetuosa e caotica maestosità. </text:p>
      <text:p text:style-name="P51">L’immensità dell’oceano, una catena montuosa, un’enorme nevicata, ma anche eventi catastrofici come l’eruzione di un vulcano, uno tsunami, sono fenomeni ai quali reagiamo dapprima con un senso di annientamento, di sudditanza cosmica, di inferiorità che viene poi soppiantata da un ritorno di consapevolezza dovuta al possesso di razionalità, facoltà di una potenza infinita che ci innalza al di sopra della natura e ci fa vincere lo stato di sottomissione iniziale.“<text:span text:style-name="T128">«</text:span>Il sentimento estetico del sublime è un piacere o senso di esaltazione che segue a un senso di depressione delle nostre energie vitali.</text:p>
      <text:p text:style-name="P50">Il piacere del sublime è diverso da quello del bello; questo infatti produce direttamente un sentimento di esaltazione della vita; <text:span text:style-name="T122">l’altro </text:span>è un piacere che ha solo un’origine indiretta, giacché esso sorge dal sentimento di un momentaneo arresto delle energie vitali, seguito da una più intensa <text:s/>esaltazione ( Critica del Giudizio). <text:s/>E’ importante sottolineare che il <text:span text:style-name="T123">s</text:span>ublime kantiano è anti-<text:soft-page-break/>empirico, è un sentimento e non un aggettivo attribuibile ad oggetti, ed è una condizione che prevede una dinamica contemplativa; se mi trovo nei pressi di uno tsunami non mi sfiora l’idea del sublime, se sono ai piedi di un vulcano in eruzione sono altri i sentimenti che muovono il mio animo. Edmund Burke lo definisce l’ orrore piacevole che si manifesta quando la percezione da parte del soggetto di un pericolo o di un rischio estremo è strettamente connessa alla consapevolezza della distanza che separa quello stesso soggetto dal pericolo appunto percepito. </text:p>
      <text:p text:style-name="P60">Le visioni del "sublime" di Kant e Burke sono davvero affascinanti e riflettono due approcci distinti all'estetica.</text:p>
      <text:p text:style-name="P51">Edmund Burke<text:note text:id="ftn3" text:note-class="footnote"><text:note-citation>3</text:note-citation><text:note-body><text:p text:style-name="P16"><text:span text:style-name="T124">P</text:span>olitico, filosofo e scrittore britannico di origine irlandese, nonché uno dei principali precursori ideologici del Romanticismo ingles<text:span text:style-name="T124">e. </text:span></text:p></text:note-body></text:note> <text:span text:style-name="T124">(1729-1797)</text:span> vedeva il sublime come un'esperienza empirica e fisiologica. Nel suo lavoro "<text:span text:style-name="T20">A Philosophical Enquiry into the Origin of Our Ideas of the Sublime and Beautiful" “</text:span><text:span text:style-name="T28">Una indagine filosofica sull’origine delle nostre idee di Sub</text:span><text:span text:style-name="T29">l</text:span><text:span text:style-name="T28">ime e Bello </text:span><text:span text:style-name="T20">(1757)</text:span>, Burke sostiene che il sublime è legato a sentimenti di terrore e potenza, che provocano una risposta fisica nel corpo umano. Per lui, il sublime è ciò che evoca un senso di grandezza e paura, come paesaggi vasti e tempestosi.</text:p>
      <text:p text:style-name="P51">Immanuel Kant, propone una visione più contemplativa del sublime. Kant distingue tra il sublime matematico e il sublime dinamico. Il sublime matematico riguarda <text:soft-page-break/>l'immensità e l'infinità che superano la nostra capacità di comprensione, mentre il sublime dinamico è legato alla potenza della natura che ci sovrasta. Per Kant, il sublime non è una qualità degli oggetti, ma una dinamica interna della mente umana che riflette sulla propria limitatezza e, allo stesso tempo, sulla propria capacità <text:span text:style-name="T125">di trascendere</text:span> <text:span text:style-name="T125">ogni immaginazione</text:span> attraverso la ragione.</text:p>
      <text:p text:style-name="P25"><text:span text:style-name="Citation"><text:span text:style-name="T90">Propendere per il pensiero kantiano significa apprezzare la profondità della riflessione umana e la capacità della mente di trovare grandezza e bellezza anche di fronte a ciò che è apparentemente incomprensibile o terrificante. È una visione che eleva l'esperienza estetica a un livello più alto di introspezione e contemplaz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svg:font-family="'Noto Serif'" style:font-adornments="Normale"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erif" fo:font-family="'Noto Serif'" style:font-style-name="Normale" style:font-family-generic="roman" style:font-pitch="variable" fo:font-size="13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erif" fo:font-family="'Noto Serif'" style:font-style-name="Normale" style:font-family-generic="roman" style:font-pitch="variable" fo:font-size="12pt" fo:font-weight="normal"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8T11:35:03.377970742</meta:creation-date>
    <dc:date>2026-01-31T16:56:00.500676915</dc:date>
    <dc:creator>corrado tafaro</dc:creator>
    <meta:editing-duration>PT53M28S</meta:editing-duration>
    <meta:editing-cycles>5</meta:editing-cycles>
    <meta:generator>LibreOffice/24.2.7.2$Linux_X86_64 LibreOffice_project/420$Build-2</meta:generator>
    <meta:document-statistic meta:table-count="0" meta:image-count="0" meta:object-count="0" meta:page-count="16" meta:paragraph-count="57" meta:word-count="3404" meta:character-count="21880" meta:non-whitespace-character-count="18511"/>
  </office:meta>
</office:document-meta>
</file>