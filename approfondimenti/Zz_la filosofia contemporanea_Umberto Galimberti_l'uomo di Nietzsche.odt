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automatic-styles>
    <style:style style:name="P1" style:family="paragraph" style:parent-style-name="Footnote">
      <style:paragraph-properties fo:text-align="justify" style:justify-single-word="false"/>
      <style:text-properties officeooo:rsid="000f9c95" officeooo:paragraph-rsid="000f9c95"/>
    </style:style>
    <style:style style:name="P2" style:family="paragraph" style:parent-style-name="Footnote">
      <style:paragraph-properties fo:text-align="justify" style:justify-single-word="false"/>
    </style:style>
    <style:style style:name="P3" style:family="paragraph" style:parent-style-name="Footnote">
      <style:text-properties officeooo:rsid="0017a088" officeooo:paragraph-rsid="0017a088"/>
    </style:style>
    <style:style style:name="P4" style:family="paragraph" style:parent-style-name="Standard">
      <style:paragraph-properties fo:line-height="115%" fo:text-align="justify" style:justify-single-word="false"/>
      <style:text-properties style:font-name="Liberation Serif" fo:font-size="14pt" fo:font-weight="bold" officeooo:rsid="0016c8ba" officeooo:paragraph-rsid="0016c8ba" style:font-size-asian="14pt" style:font-weight-asian="bold" style:font-size-complex="14pt" style:font-weight-complex="bold"/>
    </style:style>
    <style:style style:name="P5" style:family="paragraph" style:parent-style-name="Standard">
      <style:paragraph-properties fo:line-height="115%" fo:text-align="justify" style:justify-single-word="false"/>
      <style:text-properties style:font-name="Liberation Serif" fo:font-size="14pt" officeooo:rsid="0016c8ba" officeooo:paragraph-rsid="0016c8ba" style:font-size-asian="14pt" style:font-size-complex="14pt"/>
    </style:style>
    <style:style style:name="P6" style:family="paragraph" style:parent-style-name="Standard">
      <style:paragraph-properties fo:line-height="115%"/>
      <style:text-properties style:font-name="Liberation Serif" fo:font-size="14pt" officeooo:rsid="0016c8ba" officeooo:paragraph-rsid="0016c8ba" style:font-size-asian="14pt" style:font-size-complex="14pt"/>
    </style:style>
    <style:style style:name="P7"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a6e5f" officeooo:paragraph-rsid="0016c8ba" style:font-size-asian="14pt" style:font-size-complex="14pt"/>
    </style:style>
    <style:style style:name="P8" style:family="paragraph" style:parent-style-name="Standard">
      <style:paragraph-properties fo:line-height="115%" fo:text-align="justify" style:justify-single-word="false"/>
      <style:text-properties style:font-name="Liberation Serif" fo:font-size="14pt" officeooo:rsid="000a6e5f" officeooo:paragraph-rsid="000ac649" style:font-size-asian="14pt" style:font-size-complex="14pt"/>
    </style:style>
    <style:style style:name="P9" style:family="paragraph" style:parent-style-name="Standard">
      <style:paragraph-properties fo:line-height="115%" fo:text-align="justify" style:justify-single-word="false"/>
      <style:text-properties style:font-name="Liberation Serif" fo:font-size="14pt" officeooo:rsid="000a6e5f" officeooo:paragraph-rsid="0017a088" style:font-size-asian="14pt" style:font-size-complex="14pt"/>
    </style:style>
    <style:style style:name="P10" style:family="paragraph" style:parent-style-name="Standard">
      <style:paragraph-properties fo:line-height="115%"/>
      <style:text-properties style:font-name="Liberation Serif" fo:font-size="14pt" officeooo:rsid="000a6e5f" officeooo:paragraph-rsid="0016c8ba" style:font-size-asian="14pt" style:font-size-complex="14pt"/>
    </style:style>
    <style:style style:name="P11" style:family="paragraph" style:parent-style-name="Standard">
      <style:paragraph-properties fo:line-height="115%"/>
      <style:text-properties style:font-name="Liberation Serif" fo:font-size="14pt" officeooo:rsid="0017a088" officeooo:paragraph-rsid="0017a088" style:font-size-asian="14pt" style:font-size-complex="14pt"/>
    </style:style>
    <style:style style:name="P12"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7a088" officeooo:paragraph-rsid="0017a088" style:font-size-asian="14pt" style:font-size-complex="14pt"/>
    </style:style>
    <style:style style:name="P13"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ac649" officeooo:paragraph-rsid="000ac649" style:font-size-asian="14pt" style:font-size-complex="14pt"/>
    </style:style>
    <style:style style:name="P14" style:family="paragraph" style:parent-style-name="Standard">
      <style:paragraph-properties fo:line-height="115%" fo:text-align="justify" style:justify-single-word="false"/>
      <style:text-properties style:font-name="Liberation Serif" fo:font-size="14pt" officeooo:rsid="000ad2fb" officeooo:paragraph-rsid="0017a088" style:font-size-asian="14pt" style:font-size-complex="14pt"/>
    </style:style>
    <style:style style:name="P15"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ad2fb" officeooo:paragraph-rsid="0017a088" style:font-size-asian="14pt" style:font-size-complex="14pt"/>
    </style:style>
    <style:style style:name="P16"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0bbbdb" officeooo:paragraph-rsid="0016c8ba" style:font-size-asian="14pt" style:font-size-complex="14pt"/>
    </style:style>
    <style:style style:name="P17" style:family="paragraph" style:parent-style-name="Standard">
      <style:paragraph-properties fo:line-height="115%" fo:text-align="justify" style:justify-single-word="false"/>
      <style:text-properties style:font-name="Liberation Serif" fo:font-size="14pt" officeooo:rsid="000bbbdb" officeooo:paragraph-rsid="0016c8ba" style:font-size-asian="14pt" style:font-size-complex="14pt"/>
    </style:style>
    <style:style style:name="P18" style:family="paragraph" style:parent-style-name="Standard">
      <style:paragraph-properties fo:line-height="115%" fo:text-align="justify" style:justify-single-word="false"/>
      <style:text-properties style:font-name="Liberation Serif" fo:font-size="14pt" officeooo:rsid="000bbbdb" officeooo:paragraph-rsid="000eb9b5" style:font-size-asian="14pt" style:font-size-complex="14pt"/>
    </style:style>
    <style:style style:name="P19"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officeooo:rsid="000ba349" officeooo:paragraph-rsid="0017a088" style:font-size-asian="14pt" style:font-style-asian="normal" style:font-size-complex="14pt" style:font-style-complex="normal"/>
    </style:style>
    <style:style style:name="P20"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officeooo:rsid="000bbbdb" officeooo:paragraph-rsid="000eb9b5" style:font-size-asian="14pt" style:font-style-asian="normal" style:font-size-complex="14pt" style:font-style-complex="normal"/>
    </style:style>
    <style:style style:name="P21" style:family="paragraph" style:parent-style-name="Standard">
      <style:paragraph-properties fo:line-height="115%" fo:text-align="justify" style:justify-single-word="false"/>
      <style:text-properties style:font-name="Liberation Serif" fo:font-size="14pt" fo:font-style="normal" officeooo:rsid="000eb9b5" officeooo:paragraph-rsid="000eb9b5" style:font-size-asian="14pt" style:font-style-asian="normal" style:font-size-complex="14pt" style:font-style-complex="normal"/>
    </style:style>
    <style:style style:name="P22" style:family="paragraph" style:parent-style-name="Standard">
      <style:paragraph-properties fo:line-height="115%" fo:text-align="justify" style:justify-single-word="false"/>
      <style:text-properties style:font-name="Liberation Serif" fo:font-size="14pt" fo:font-style="normal" officeooo:rsid="000eb9b5" officeooo:paragraph-rsid="000f9c95" style:font-size-asian="14pt" style:font-style-asian="normal" style:font-size-complex="14pt" style:font-style-complex="normal"/>
    </style:style>
    <style:style style:name="P23" style:family="paragraph" style:parent-style-name="Standard">
      <style:paragraph-properties fo:line-height="115%" fo:text-align="justify" style:justify-single-word="false"/>
      <style:text-properties style:font-name="Liberation Serif" fo:font-size="14pt" fo:font-style="normal" officeooo:rsid="000f9c95" officeooo:paragraph-rsid="000f9c95" style:font-size-asian="14pt" style:font-style-asian="normal" style:font-size-complex="14pt" style:font-style-complex="normal"/>
    </style:style>
    <style:style style:name="P24" style:family="paragraph" style:parent-style-name="Standard">
      <style:paragraph-properties fo:line-height="115%" fo:text-align="justify" style:justify-single-word="false"/>
      <style:text-properties style:font-name="Liberation Serif" fo:font-size="14pt" fo:font-style="normal" officeooo:rsid="000f9c95" officeooo:paragraph-rsid="00132b5e" style:font-size-asian="14pt" style:font-style-asian="normal" style:font-size-complex="14pt" style:font-style-complex="normal"/>
    </style:style>
    <style:style style:name="P25" style:family="paragraph" style:parent-style-name="Standard">
      <style:paragraph-properties fo:line-height="115%" fo:text-align="justify" style:justify-single-word="false"/>
      <style:text-properties style:font-name="Liberation Serif" fo:font-size="14pt" fo:font-style="normal" officeooo:rsid="000f9c95" officeooo:paragraph-rsid="0017a088" style:font-size-asian="14pt" style:font-style-asian="normal" style:font-size-complex="14pt" style:font-style-complex="normal"/>
    </style:style>
    <style:style style:name="P26"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officeooo:rsid="000f9c95" officeooo:paragraph-rsid="0017a088" style:font-size-asian="14pt" style:font-style-asian="normal" style:font-size-complex="14pt" style:font-style-complex="normal"/>
    </style:style>
    <style:style style:name="P27" style:family="paragraph" style:parent-style-name="Standard">
      <style:paragraph-properties fo:line-height="115%" fo:text-align="justify" style:justify-single-word="false"/>
      <style:text-properties style:font-name="Liberation Serif" fo:font-size="14pt" fo:font-style="normal" officeooo:rsid="001515aa" officeooo:paragraph-rsid="001515aa" style:font-size-asian="14pt" style:font-style-asian="normal" style:font-size-complex="14pt" style:font-style-complex="normal"/>
    </style:style>
    <style:style style:name="P28" style:family="paragraph" style:parent-style-name="Standard">
      <style:paragraph-properties fo:line-height="115%" fo:text-align="justify" style:justify-single-word="false"/>
      <style:text-properties style:font-name="Liberation Serif" fo:font-size="14pt" fo:font-style="normal" officeooo:rsid="001515aa" officeooo:paragraph-rsid="001594b6" style:font-size-asian="14pt" style:font-style-asian="normal" style:font-size-complex="14pt" style:font-style-complex="normal"/>
    </style:style>
    <style:style style:name="P29" style:family="paragraph" style:parent-style-name="Standard">
      <style:paragraph-properties fo:line-height="115%" fo:text-align="justify" style:justify-single-word="false"/>
      <style:text-properties style:font-name="Liberation Serif" fo:font-size="14pt" fo:font-style="normal" officeooo:rsid="0016b47a" officeooo:paragraph-rsid="0016b47a" style:font-size-asian="14pt" style:font-style-asian="normal" style:font-size-complex="14pt" style:font-style-complex="normal"/>
    </style:style>
    <style:style style:name="P30" style:family="paragraph" style:parent-style-name="Standard">
      <style:paragraph-properties fo:line-height="115%" fo:text-align="justify" style:justify-single-word="false"/>
      <style:text-properties style:font-name="Liberation Serif" fo:font-size="14pt" fo:font-style="normal" officeooo:rsid="0016b47a" officeooo:paragraph-rsid="00198b38" style:font-size-asian="14pt" style:font-style-asian="normal" style:font-size-complex="14pt" style:font-style-complex="normal"/>
    </style:style>
    <style:style style:name="P31" style:family="paragraph" style:parent-style-name="Standard">
      <style:paragraph-properties fo:line-height="115%" fo:text-align="justify" style:justify-single-word="false"/>
      <style:text-properties style:font-name="Liberation Serif" fo:font-size="14pt" fo:font-style="normal" officeooo:rsid="0016b47a" officeooo:paragraph-rsid="001abc88" style:font-size-asian="14pt" style:font-style-asian="normal" style:font-size-complex="14pt" style:font-style-complex="normal"/>
    </style:style>
    <style:style style:name="P32" style:family="paragraph" style:parent-style-name="Standard">
      <style:paragraph-properties fo:line-height="115%" fo:text-align="justify" style:justify-single-word="false"/>
      <style:text-properties officeooo:rsid="000a6e5f" officeooo:paragraph-rsid="000eb9b5"/>
    </style:style>
    <style:style style:name="P33" style:family="paragraph" style:parent-style-name="Standard">
      <style:paragraph-properties fo:line-height="115%" fo:text-align="justify" style:justify-single-word="false"/>
      <style:text-properties officeooo:rsid="001515aa" officeooo:paragraph-rsid="001594b6"/>
    </style:style>
    <style:style style:name="T1" style:family="text">
      <style:text-properties style:font-name="Noto Sans"/>
    </style:style>
    <style:style style:name="T2" style:family="text">
      <style:text-properties style:font-name="Noto Sans" officeooo:rsid="000ac649"/>
    </style:style>
    <style:style style:name="T3" style:family="text">
      <style:text-properties style:font-name="Noto Sans" fo:font-style="normal" style:font-style-asian="normal" style:font-style-complex="normal"/>
    </style:style>
    <style:style style:name="T4" style:family="text">
      <style:text-properties style:font-name="Noto Sans" fo:font-style="normal" officeooo:rsid="000ad2fb" style:font-style-asian="normal" style:font-style-complex="normal"/>
    </style:style>
    <style:style style:name="T5" style:family="text">
      <style:text-properties style:font-name="Noto Sans" fo:font-style="normal" officeooo:rsid="000d32a1" style:font-style-asian="normal" style:font-style-complex="normal"/>
    </style:style>
    <style:style style:name="T6" style:family="text">
      <style:text-properties style:font-name="Noto Sans" fo:font-style="normal" officeooo:rsid="000eb9b5" style:font-style-asian="normal" style:font-style-complex="normal"/>
    </style:style>
    <style:style style:name="T7" style:family="text">
      <style:text-properties style:font-name="Noto Sans" fo:font-style="italic" style:font-style-asian="italic" style:font-style-complex="italic"/>
    </style:style>
    <style:style style:name="T8" style:family="text">
      <style:text-properties style:font-name="Noto Sans"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Noto Sans" fo:font-size="11pt" fo:font-style="normal" fo:font-weight="bold" officeooo:rsid="000eb9b5" style:font-size-asian="11pt" style:font-style-asian="normal" style:font-weight-asian="bold" style:font-size-complex="11pt" style:font-style-complex="normal" style:font-weight-complex="bold"/>
    </style:style>
    <style:style style:name="T10" style:family="text">
      <style:text-properties officeooo:rsid="000ac649"/>
    </style:style>
    <style:style style:name="T11" style:family="text">
      <style:text-properties fo:font-style="italic" style:font-style-asian="italic" style:font-style-complex="italic"/>
    </style:style>
    <style:style style:name="T12" style:family="text">
      <style:text-properties fo:font-style="italic" officeooo:rsid="000ba349" style:font-style-asian="italic" style:font-style-complex="italic"/>
    </style:style>
    <style:style style:name="T13" style:family="text">
      <style:text-properties fo:font-style="italic" officeooo:rsid="0016b47a" style:font-style-asian="italic" style:font-style-complex="italic"/>
    </style:style>
    <style:style style:name="T14" style:family="text">
      <style:text-properties fo:font-style="italic" officeooo:rsid="0017a088" style:font-style-asian="italic" style:font-style-complex="italic"/>
    </style:style>
    <style:style style:name="T15" style:family="text">
      <style:text-properties officeooo:rsid="000a6e5f"/>
    </style:style>
    <style:style style:name="T16" style:family="text">
      <style:text-properties officeooo:rsid="000ad2fb"/>
    </style:style>
    <style:style style:name="T17" style:family="text">
      <style:text-properties fo:font-style="normal" style:font-style-asian="normal" style:font-style-complex="normal"/>
    </style:style>
    <style:style style:name="T18" style:family="text">
      <style:text-properties fo:font-style="normal" officeooo:rsid="000ba349" style:font-style-asian="normal" style:font-style-complex="normal"/>
    </style:style>
    <style:style style:name="T19" style:family="text">
      <style:text-properties fo:font-style="normal" officeooo:rsid="0017a088" style:font-style-asian="normal" style:font-style-complex="normal"/>
    </style:style>
    <style:style style:name="T20" style:family="text">
      <style:text-properties fo:font-style="normal" officeooo:rsid="000ad2fb" style:font-style-asian="normal" style:font-style-complex="normal"/>
    </style:style>
    <style:style style:name="T21" style:family="text">
      <style:text-properties fo:font-style="normal" officeooo:rsid="000d32a1" style:font-style-asian="normal" style:font-style-complex="normal"/>
    </style:style>
    <style:style style:name="T22" style:family="text">
      <style:text-properties fo:font-style="normal" officeooo:rsid="000eb9b5"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eb9b5" style:font-style-asian="normal" style:font-weight-asian="bold" style:font-style-complex="normal" style:font-weight-complex="bold"/>
    </style:style>
    <style:style style:name="T25" style:family="text">
      <style:text-properties officeooo:rsid="000f9c95"/>
    </style:style>
    <style:style style:name="T26" style:family="text">
      <style:text-properties officeooo:rsid="0010c638"/>
    </style:style>
    <style:style style:name="T27" style:family="text">
      <style:text-properties officeooo:rsid="001161ad"/>
    </style:style>
    <style:style style:name="T28" style:family="text">
      <style:text-properties officeooo:rsid="00132b5e"/>
    </style:style>
    <style:style style:name="T29" style:family="text">
      <style:text-properties officeooo:rsid="001515aa"/>
    </style:style>
    <style:style style:name="T30" style:family="text">
      <style:text-properties officeooo:rsid="001594b6"/>
    </style:style>
    <style:style style:name="T31" style:family="text">
      <style:text-properties officeooo:rsid="000c02d3"/>
    </style:style>
    <style:style style:name="T32" style:family="text">
      <style:text-properties officeooo:rsid="0016b47a"/>
    </style:style>
    <style:style style:name="T33" style:family="text">
      <style:text-properties officeooo:rsid="0016c8ba"/>
    </style:style>
    <style:style style:name="T34" style:family="text">
      <style:text-properties officeooo:rsid="0017a088"/>
    </style:style>
    <style:style style:name="T35" style:family="text">
      <style:text-properties officeooo:rsid="000bbbdb"/>
    </style:style>
    <style:style style:name="T36" style:family="text">
      <style:text-properties fo:font-size="11pt" fo:font-weight="bold" style:font-size-asian="11pt" style:font-weight-asian="bold" style:font-size-complex="11pt" style:font-weight-complex="bold"/>
    </style:style>
    <style:style style:name="T37" style:family="text">
      <style:text-properties fo:font-size="11pt" fo:font-weight="bold" officeooo:rsid="000bbbdb" style:font-size-asian="11pt" style:font-weight-asian="bold" style:font-size-complex="11pt" style:font-weight-complex="bold"/>
    </style:style>
    <style:style style:name="T38" style:family="text">
      <style:text-properties fo:font-size="11pt" fo:font-style="normal" fo:font-weight="bold" style:font-size-asian="11pt" style:font-style-asian="normal" style:font-weight-asian="bold" style:font-size-complex="11pt" style:font-style-complex="normal" style:font-weight-complex="bold"/>
    </style:style>
    <style:style style:name="T39" style:family="text">
      <style:text-properties fo:font-size="11pt" fo:font-style="normal" fo:font-weight="bold" officeooo:rsid="000eb9b5" style:font-size-asian="11pt" style:font-style-asian="normal" style:font-weight-asian="bold" style:font-size-complex="11pt" style:font-style-complex="normal" style:font-weight-complex="bold"/>
    </style:style>
    <style:style style:name="T40" style:family="text">
      <style:text-properties officeooo:rsid="00198b38"/>
    </style:style>
    <style:style style:name="T41" style:family="text">
      <style:text-properties officeooo:rsid="001abc88"/>
    </style:style>
    <style:style style:name="T42" style:family="text">
      <style:text-properties officeooo:rsid="001d09d6"/>
    </style:style>
    <style:style style:name="T43" style:family="text">
      <style:text-properties officeooo:rsid="001dc2ad"/>
    </style:style>
    <style:style style:name="T44" style:family="text">
      <style:text-properties style:font-name="Liberation Serif"/>
    </style:style>
    <style:style style:name="T45" style:family="text">
      <style:text-properties style:font-name="Liberation Serif" fo:font-size="14pt" style:font-size-asian="14pt" style:font-size-complex="14pt"/>
    </style:style>
    <style:style style:name="T46" style:family="text">
      <style:text-properties style:font-name="Liberation Serif" fo:font-size="14pt" fo:font-style="normal" style:font-size-asian="14pt" style:font-style-asian="normal" style:font-size-complex="14pt" style:font-style-complex="normal"/>
    </style:style>
    <style:style style:name="T47" style:family="text">
      <style:text-properties fo:font-weight="bold" style:font-weight-asian="bold" style:font-weight-complex="bold"/>
    </style:style>
    <style:style style:name="T48" style:family="text">
      <style:text-properties fo:font-weight="bold" officeooo:rsid="000bbbd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ultimo uomo e il superuomo nel contesto di gloria e vana gloria dell’uomo di Nietzsche.</text:p>
      <text:p text:style-name="P5"/>
      <text:p text:style-name="P6">Premessa:</text:p>
      <text:p text:style-name="P7">L'ultimo uomo, <text:span text:style-name="T33">nella rappresentazione di Nietzsche </text:span><text:span text:style-name="T42">è</text:span> la condizione umana nella sua forma più stagnante e conformista. È un individuo che vive una vita priva di significato, privo di passioni e di valori profondi. Si accontenta di una felicità mediocre e non cerca mai di superare i propri limiti.</text:p>
      <text:p text:style-name="P7">Il superuomo, rappresenta l'ideale di un essere umano che ha superato questi limiti. È un individuo creativo, autonomo e fedele a se stesso. Abbraccia la vita con gioia e vitalità, non ha paura di sfidare le convenzioni e cerca di realizzare il proprio potenziale al massimo.</text:p>
      <text:p text:style-name="P7"><text:span text:style-name="T33">T</text:span>ra le due figure non <text:span text:style-name="T33">c’</text:span>è contraddizione di pensiero, ma piuttosto una rappresentazione di due possibili stati dell'essere umano. Il superuomo rappresenta ciò che l'uomo potrebbe essere, mentre l'ultimo uomo rappresenta ciò che l'uomo rischia di diventare se non si impegna a superare i propri limiti.</text:p>
      <text:p text:style-name="P7">Nietzsche non intendeva il superuomo come un ideale da raggiungere per tutti, ma piuttosto come un'idea a cui aspirare per spingere gli individui a diventare la migliore versione di sé stessi.</text:p>
      <text:p text:style-name="P7"><text:soft-page-break/>La figura del superuomo rappresenta la possibilità di una vita vissuta con pienezza e autenticità, una vita in cui l'individuo crea i propri valori e vive secondo i propri principi, accettando la vita con tutte le sue sfide e contraddizioni. In questo senso, il pensiero di Nietzsche non è un invito al nichilismo o all'individualismo sfrenato, ma piuttosto un invito alla responsabilità individuale e alla creazione di una vita autentica.</text:p>
      <text:p text:style-name="P7">La figura del superuomo non deve essere fraintesa come una celebrazione dell'egoismo o della sopraffazione. Al contrario, Nietzsche sostiene che il superuomo è colui che si prende cura degli altri e contribuisce al miglioramento della società.</text:p>
      <text:p text:style-name="P10"/>
      <text:p text:style-name="P11">Relatore: Umberto Galimberti</text:p>
      <text:p text:style-name="P12"><text:span text:style-name="T15">La vana gloria individuale, coincide sostanzialmente con la superbia e la vana gloria dell’uomo occidentale, dove la vana gloria ha assunto misure al di là di ogni limite e su queste riflessioni vediamo di farci accompagnare da Nietzsche e da Freud. Sia la gloria che la vana gloria hanno bisogno di relazionarsi con l’altro, nessuno diventa superbo da solo, quindi la struttura sia della gloria che della vana gloria si fondano su una struttura relazionale, io ho bisogno degli altri, non tanto per esaltare la mia superbia, ma perché </text:span><text:span text:style-name="T10">la relazione con gli altri </text:span><text:span text:style-name="T15">affonda</text:span><text:span text:style-name="T10"> le radici</text:span><text:span text:style-name="T15"> in quel nucleo profondissimo </text:span><text:soft-page-break/><text:span text:style-name="T15">che è la nostra identità. L’identità non è una cosa naturale, noi non nasciamo con una identità; l’identità è un dono dell’altro, se l’altro ci riconosce costruiamo una identità positiva, se non c’è la relazione con l’altro, costruiamo </text:span><text:span text:style-name="T10">una</text:span><text:span text:style-name="T15"> identità negativa.</text:span></text:p>
      <text:p text:style-name="P8"><text:span text:style-name="T10">Quando un genitore, un maestro, un insegnante si rivolge al proprio figlio, al proprio alunno con parole o frasi che sviliscono la persona, oppure ci si abitua a considerarli </text:span>dei “<text:span text:style-name="T11">minus habens</text:span>” (deficienti, idioti) gli <text:span text:style-name="T10">si sta </text:span>preparando il terreno per la costruzione di una identità negativa.</text:p>
      <text:p text:style-name="P13">Analizziamo la frase “<text:span text:style-name="T11">l’uno viene dal due</text:span>”, stiamo parlando del modo in cui un individuo (l’uno) nasce da una relazione tra due entità (il due). Questo è particolarmente evidente nella relazione tra una madre e il suo bambino. La madre porta il bambino in grembo, creando una relazione fisica e intima. Da questa relazione di “due” (madre e bambino), nasce l’uno ( il bambino come individuo), con la sua identità. <text:span text:style-name="T15"><text:s/></text:span>L’identità di un individuo non nasce isolatamente, ma è il frutto di relazioni e interazioni con gli altri. Attraverso il riconoscimento da parte degli altri, un individuo può formare un senso di sé, <text:span text:style-name="T15">noi siamo frutto di questa relazione; la definizione greca dell’uomo come animale sociale prima di essere un evento sociologico è un evento strutturale senza riconoscimento dell’altro, io non so chi sono.</text:span></text:p>
      <text:p text:style-name="P8"><text:soft-page-break/>Su questo tema ha preso posizione innanzitutto Platone, il quale considerando l’anima tripartita, con una parte dedita alla concupiscenza <text:span text:style-name="T10">che presiede al desiderio ed è la più legata al corpo terreno; una parte </text:span>all’ira <text:span text:style-name="T10">che funge da legante tra la ragione e il desiderio;</text:span> una terza parte dedita alla nobiltà, al coraggio, all’onore ed è questa parte che lui chiama Timica (thymòs) che significa “animo”, “sentimento”, “passione”, “coraggio”, che non è qualcosa di romantico, ma la considerazione che uno ha di sé, il sentimento di sé; questa prerogativa dell’anima è esclusivamente umana perché la concupiscenza<text:note text:id="ftn1" text:note-class="footnote"><text:note-citation>1</text:note-citation><text:note-body><text:p text:style-name="P3">Intenso desiderio di appagamento soprattutto di piaceri fisici.</text:p></text:note-body></text:note> è anche animale; anche l’aggressività e l’ira sono figure animali, ma la nobiltà d’animo è tipicamente umana. E chi sono coloro che hanno la nobiltà d’animo? Chi sono gli uomini chimici? Platone dice: coloro che lottano per i propri principi per i loro valori fino alla vittoria o alla morte. C’è quindi una considerazione del valore della nobiltà che arriva fino a quelle figure estreme che sono la vittoria o la morte.</text:p>
      <text:p text:style-name="P9">Uno scrittore greco diceva che Ares dio della guerra risparmia i vili e porta con se nell’ade gli eroi. Sono gli eroi a morire non le persone vili. Questo motivo è stato ripreso anche da Hegel <text:span text:style-name="T10">e Heidegger che hanno sottolineato l’importanza del riconoscimento reciproco per la formazione di dell’identità e per la realizzazione di sé. M</text:span>entre gli animali uccidono per fame, gli uomini <text:soft-page-break/>uccidono per essere riconosciuti; questo riconoscimento, aveva nell’antichità delle manifestazioni esteriori <text:span text:style-name="T10">come</text:span>, quando un condottiero romano trascinava per le vie di Roma, il capo di un popolo sconfitto in guerra, incatenato, per significare la sua vittoria, il suo trionfo e quindi ottenere il riconoscimento di <text:span text:style-name="T16">veramente </text:span>capo. <text:span text:style-name="T16">Tutto questo, a parere di Nietzsche, questa nobiltà d’animo questo coraggio, questa forza di difesa della propria nobiltà, del proprio orgoglio, dei propri principi, dei propri valori, come dice Platone, in quella lotta che approda alla vittoria o alla morte è stato distrutto dal cristianesimo, perché il cristianesimo ha stabilito il principio dell’uguaglianza degli uomini e dice <text:s/>Nietzsche che l’uguaglianza non è altro che la morale dei deboli, il risentimento dei deboli, i deboli che non hanno il coraggio di emergere con il loro valore e la loro umiltà, stabiliscono che tutti gli uomini sono uguali. Nasce a questo punto, parere di <text:s/>Nietzsche, la morale degli schiavi, di coloro che non vogliono la bellezza e la nobiltà della vita, ma vogliono semplicemente conservarne </text:span><text:span text:style-name="T34">la vita,</text:span><text:span text:style-name="T16"> alla quiete. </text:span><text:span text:style-name="T34">Vivi e lascia vivere, cosa c’è di pi cristiano in questa frase? </text:span></text:p>
      <text:p text:style-name="P14">Questa morale degli schiavi, con la morte di dio è stata ereditata dalle democrazie liberali e dalle democrazie socialiste, è sempre <text:s/>Nietzsche che parla, nel senso che le democrazie liberali hanno sancito che gli uomini sono uguali davanti <text:s/>alla legge, e le democrazie socialiste <text:soft-page-break/>devono essere uguali anche economicamente. Questa figura dell’uguaglianza è la morte della nobiltà dell’uomo e del suo grande stile; fin qui la gloria.</text:p>
      <text:p text:style-name="P14">La vana gloria invece incomincia sempre secondo <text:s text:c="2"/>Nietzsche quando uno celebra se stesso al di là dei propri limiti e qui Nietzsche che era un grande cultore della grecità, recupera quel modello di grecità che i greci avevano segnalato <text:s/>con la parola <text:span text:style-name="T11">eudemonia</text:span><text:span text:style-name="T17"> che vuol dire bene, felicità, in quanto fine ultimo assegnato agli uomini e alle loro azioni, e che era stata enunciata dall’oracolo di Delfi con due messaggi molto semplice ma al tempo stesso incisivi: il primo, conosci te stesso, </text:span><text:span text:style-name="T18">perché se non conosci te stesso non riesci a realizzare quello che tu propriamente sei, quello per cui tu sei propriamente chiamato in termini religiosi: la tua vocazione, ciò per cui sei nato. Se invece realizzi, il tuo </text:span><text:span text:style-name="T12">demone</text:span><text:span text:style-name="T18">, per raggiungere la felicità, la buona realizzazione del tuo demone deve avvenire secondo misura. Questo il secondo messaggio dell’oracolo di Delfi. Devi conoscere i tuoi limiti, non puoi oltrepassarli e se tenti di oltrepassarli, entri nello scenario della superbia, vanagloria e prepari la tua rovina andando incontro ad un destino crudele. Secondo la sapienza greca, chi è consapevole del proprio limite perviene alla felicità. Fin qui il discorso individuale non eccessivamente interessante, abbiamo capito cos’è nobiltà. </text:span></text:p>
      <text:p text:style-name="P15"><text:soft-page-break/><text:span text:style-name="T17">Nietzsche </text:span><text:span text:style-name="T18">dice che il motivo dell’uguaglianza ha generato in quelle figure che lui nomina </text:span><text:span text:style-name="T12">“piccoli uomini </text:span><text:span text:style-name="T14">o ultimo uomo</text:span><text:span text:style-name="T12">” </text:span><text:span text:style-name="T18">il cui ideale di vita è una piccola voglia per il giorno, per la notte, fermo restando la </text:span><text:span text:style-name="T19">buona salute</text:span><text:span text:style-name="T18"> salute. Noi abbiamo inventato la felicità, dicono i piccoli uomini, ma costoro sono i figli dell’uguaglianza, sono le espressioni più degradate della morale degli schiavi, sono coloro che invece della nobiltà della vita, preferiscono la conservazione della propria vita.</text:span></text:p>
      <text:p text:style-name="P19">Passiamo adesso alla megalomania della vanagloria, che è la caratteristica dell’uomo occidentale, e qui ci facciamo aiutare da Freud, il quale dice che l’uomo occidentale ha subito negli ultimi secoli, negli ultimi tre secoli, tre grandi mortificazioni. <text:span text:style-name="T48">La prima umiliazione</text:span><text:span text:style-name="T35">, è stata portata da Nicola Copernico, che ha dimostrato che la Terra non è al centro dell’universo, ma ruota attorno al Sole. Questo ha sconvolto la visione geocentrica dell’universo che era stata accettata per secoli.</text:span></text:p>
      <text:p text:style-name="P20"><text:span text:style-name="T47">La seconda umiliazione</text:span> è venuta da Charles Darwin, che con la sua teoria dell’evoluzione ha mostrato che gli esseri umani non sono creature divinamente create, ma discendono dalle scimmie e sono il risultato di milioni di anni di evoluzione naturale.</text:p>
      <text:p text:style-name="P16"><text:span text:style-name="T24">L</text:span><text:span text:style-name="T23">a terza umiliazione</text:span><text:span text:style-name="T17"> è stata portata dallo stesso Freud con la sua teoria della psicoanalisi. </text:span></text:p>
      <text:p text:style-name="P17"><text:soft-page-break/><text:span text:style-name="T17">Freud ha sostenuto che “</text:span><text:span text:style-name="T11">l’io non è padrone in casa propria</text:span><text:span text:style-name="T17">”</text:span><text:span text:style-name="T17"><text:note text:id="ftn2" text:note-class="footnote"><text:note-citation>2</text:note-citation><text:note-body><text:p text:style-name="P2">La frase "L'io non è padrone in casa propria" è una famosa citazione di Sigmund Freud che riflette la sua visione della psiche umana. Secondo Freud, l'io, che rappresenta la parte cosciente della mente, non è sempre in grado di controllare o essere pienamente consapevole di ciò che accade nelle parti più profonde e inconsce della mente. Freud ha sviluppato una teoria chiamata "le Topiche" tra il 1920 e il 1922. Questa teoria distingue tra l'Inconscio, il Preconscio e il Conscio nella prima topica, e l'Es, l'Io e il Super-Io nella seconda. Nella prima topica, Freud paragona la mente a un iceberg. La parte visibile dell'iceberg rappresenta il Conscio, la parte che emerge e scompare con le onde del mare rappresenta il Preconscio, e la parte sommersa rappresenta l'Inconscio. Secondo Freud, siamo consapevoli solo di una piccola parte della nostra psiche (la parte conscia), mentre gran parte della nostra psiche (l'inconscio) rimane nascosta. Nella seconda topica, Freud descrive l'Es come la fonte delle nostre pulsioni e desideri, molti dei quali sono inconsci¹. L'Io, d'altra parte, cerca di mediare tra le esigenze dell'Es e le regole e restrizioni del Super-Io (che rappresenta le norme sociali e morali) e della realtà esterna. Quindi, quando Freud dice "L'io non è padrone in casa propria", sta sottolineando come l'Io non sia sempre in grado di controllare o essere consapevole delle pulsioni e dei desideri che emergono dall'Es. In altre parole, ci sono forze all'interno di noi (i nostri desideri inconsci, le nostre pulsioni) che possono influenzare i nostri pensieri, sentimenti e comportamenti in modi che non siamo sempre in grado di controllare o comprendere.</text:p></text:note-body></text:note></text:span><text:span text:style-name="T17">, nel senso che non abbiamo il pieno controllo della nostra mente. Gran parte dei nostri pensieri e comportamenti sono guidati dall’inconscio, una parte della nostra mente di cui non siamo normalmente consapevoli.</text:span></text:p>
      <text:p text:style-name="P18"><text:span text:style-name="T17">Questi tre gradi di mortificazioni, riconducono l’umanità nel suo limite dice Freud, e questo limite quasi in risonanza con <text:s/></text:span><text:span text:style-name="T20">Nietzsche, </text:span><text:span text:style-name="T17">non va oltrepassato.</text:span></text:p>
      <text:p text:style-name="P18"><text:span text:style-name="T20">M</text:span><text:span text:style-name="T17">a vediamo da vicino queste tre grandi vane glorie, la prima: gli occidentali hanno pensato che la terra fosse </text:span><text:span text:style-name="T21">al</text:span><text:span text:style-name="T17"> centro dell’universo, ma non è stato sempre così.</text:span></text:p>
      <text:p text:style-name="P18"><text:soft-page-break/><text:span text:style-name="T17">I greci concepivano la natura come sfondo immutabile che nessun uomo, nessun dio fece, e guardando la natura la concepivano come quella regola a partire dalla quale, era possibile costruire una città secondo le leggi della natura e i principi della conduzione dell’anima. I greci non avevano nessuna nozione di individuo perché per lo</text:span><text:span text:style-name="T22">ro</text:span><text:span text:style-name="T17"> esisteva la comunità nella forma della città che loro chiamavano </text:span><text:span text:style-name="T11">polis, </text:span><text:span text:style-name="T22">una città che doveva essere progettata in armonia con l’ambiente naturale circostante e secondo i principi di equilibrio e proporzione, che vedevano nella natura. </text:span></text:p>
      <text:p text:style-name="P18"><text:span text:style-name="T22">D</text:span><text:span text:style-name="T17">ice Aristotele che l’uomo non può vivere da solo, ma deve vivere assolutamente insieme agli altri e chi preferisce la solitudine, </text:span><text:span text:style-name="T22">si avvicina</text:span><text:span text:style-name="T17"> a due figure estreme dell’umano, <text:s/>o è animale o è dio. L’uomo ha bisogno della relazione, ed è questa la struttura fondante della grecità. Questa natura non è una creatura di dio, non è a disposizione dell’uomo, sempre e sarà eterna e l’uomo ha il compito di indagarla per catturarne le sostanze per la propria sopravvivenza secondo misura. </text:span></text:p>
      <text:p text:style-name="P21">Fu allora che l'uomo, congedatosi dagli dèi e da Dio, prese a costruire argini e spesse mura e, imitando i processi della natura, tentò di arginare la sua potenza con la tecnica; tecnica medica per evitare, come dice Ippocrate, la morte evitabile; la tecnica ingegneristica per costruire difese che impedissero catastrofi; la <text:soft-page-break/>tecnica previsionale che allontanasse il più possibile l'inquietudine dell'imprevedibile. </text:p>
      <text:p text:style-name="P21">Rassicurato dalla sua mente e dai prodotti della sua mente, interrogò Prometeo<text:note text:id="ftn3" text:note-class="footnote"><text:note-citation>3</text:note-citation><text:note-body><text:p text:style-name="P1">Esiodo ne “Le opere e i giorni” offre altri spunti sulla decadenza dell’uomo, Prometeo ruba il fuoco agli dei per donarlo agli uomini, portando loro conoscenza e progresso, ma anche sofferenza e fatica. Pandora, la prima donna, viene creata dagli dei e porta con sé un vaso pieno di mali che si scatenano nel mondo.</text:p></text:note-body></text:note>, che aveva donato la tecnica agli uomini, ponendogli questa domanda: "È più forte la tecnica o la necessità che governa le leggi di natura?". Prometeo, amico degli uomini e inventore delle tecniche, dà la sua risposta lapidaria: "La tecnica è di gran lunga più debole della necessità che governa le leggi della natura". Così riferisce Eschilo nel Prometeo incatenato, e Sofocle, di rincalzo, nell'Antigone dice che l'aratro ferisce la terra, ma questa si ricompone dopo il suo passaggio. Allo stesso modo la nave fende la calma trasognata del mare, ma le acque si ricompongono perché la natura è sovrana.</text:p>
      <text:p text:style-name="P23">Questo lo potevano dire i greci perché la tecnica dei greci era fondamentalmente primitiva o comunque non evoluta come la nostra, e quindi l’uomo poteva ancora considerarsi il soggetto della storia, mentre noi oggi non possiamo più considerarci tali perché il soggetto della storia è la tecnica e gli uomini sono diventati funzionari di apparati tecnici.</text:p>
      <text:p text:style-name="P22"><text:soft-page-break/>Noi abbiamo dimenticato la sovranità della natura che, al dire di Eraclito, "nessun uomo e nessun Dio fece" e, inebriati dai nostri dispositivi tecnici, abbiamo dimenticato la sua potenza. </text:p>
      <text:p text:style-name="P22"><text:span text:style-name="T25">Da dove viene questo dominio della terra, non dalla </text:span><text:span text:style-name="T34">G</text:span><text:span text:style-name="T25">recia, non dalla grecità ma dal cristianesimo. Il primo libro della bibbia, il genesi, dio allontanando </text:span><text:span text:style-name="T34">A</text:span><text:span text:style-name="T25">damo dal paradiso terrestre gli dice: dominerai sugli animali della terra, sui volatili del cielo, sui pesci delle acque; e come f</text:span>edeli esecutori del comando biblico, <text:span text:style-name="T25">l’occidente ha intrapreso quella strada del dominio della terra.</text:span></text:p>
      <text:p text:style-name="P23">Abbiamo trasformato il suo uso in usura, e per il breve periodo delle nostre vite e dei nostri miopi calcoli economici, forziamo la natura a essere risposta alle nostre esigenze oltre la giusta misura.</text:p>
      <text:p text:style-name="P23">La scienza e la tecnica sono arrivate a noi grazie all’impulso del cristianesimo; scienza e tecnica sono eventi occidentali e lo sono perché l’occidente è cristiano. Anche l’ateo è cristiano, anche l’agnostico è cristiano, e lo sono perché entrambi si occupano di dio per negarlo. Il cristianesimo non è solo una religione, è la struttura fondante dell’occidente che si basa sull’ottimismo che non hanno le altre civiltà; un ottimismo che deriva dal fatto che il <text:s/>futuro è speranza, salvezza, auspicio e sguardo positivo. Il cristianesimo ci ha insegnato che il passato è il peccato originale, il presente è redenzione e il futuro è salvezza.</text:p>
      <text:p text:style-name="P23"><text:soft-page-break/>Il futuro è sempre positivo, a differenza dei greci che pensavano che l’età dell’oro fosse al passato e che gli uomini continuassero a decadere da questa età dell’oro. Esiodo diceva: siamo giunti alla quinta generazione che è l’età del ferro, caratterizzata da miserie, sofferenze e ingiustizia. Esiodo credeva che quella <text:span text:style-name="T14">era</text:span> fosse la peggiore di tutte <text:s/>e che le cose sarebbero solo peggiorate nel tempo.</text:p>
      <text:p text:style-name="P23">Tornando al nostro modello, il cristianesimo coincide rigorosamente con l’occidente per via della concezione del tempo trasmessa alla scienza e alla tecnica; la scienza <text:span text:style-name="T27">si comporta secondo il modello cr</text:span><text:span text:style-name="T34">i</text:span><text:span text:style-name="T27">stiano</text:span>, il passato è ignoranza, il presente è ricerca ed il futuro è progresso.</text:p>
      <text:p text:style-name="P23">Anche Marx è un grande cristiano, il passato è ingiustizia, il presente è rivoluzione, il futuro è giustizia sulla terra; anche Freud nonostante le sue critiche alla religione, ritiene che il passato sia trauma, il presente analisi ed il futuro guarigione; tutto è positivo in occidente perché tutto è cristiano.</text:p>
      <text:p text:style-name="P24"><text:span text:style-name="T26">L</text:span>a scienza e la tecnica non guardano il mondo per contemplarlo, la scienza guarda il mondo per manipolarlo per cui lo sguardo scientifico è già tecnico, la tecnica è l’anima della scienza perché lo sguardo scientifico ha già un’intenzione manipolatoria.</text:p>
      <text:p text:style-name="P25"><text:soft-page-break/><text:span text:style-name="T28">Se in un bosco va</text:span><text:span text:style-name="T34">nno</text:span><text:span text:style-name="T28"> un poeta </text:span><text:span text:style-name="T34">e</text:span><text:span text:style-name="T28"> un falegname, non vedono le stesse cose. </text:span><text:span text:style-name="T34">I</text:span><text:span text:style-name="T28">l falegname vede sedie </text:span><text:span text:style-name="T34">e </text:span><text:span text:style-name="T28">tavoli e in questo c’è già lo sguardo scientifico.</text:span></text:p>
      <text:p text:style-name="P26"><text:span text:style-name="T28">Adesso che stiamo andando verso una catastrofe ambientale, perché non abbiamo <text:s/>avuto la capacità di custodire la terra e l’ambiente, qualcuno dice che dio non ha detto dominerai sulla terra, ma ha detto custodirai la terra. Questo cambio di interpretazione riflette un cambiamento di atteggiamento nei confronti del nostro ambiente. Mentre una volta l’uomo poteva vedere se stesso come il dominatore della terra, oggi c’è un crescente riconoscimento che occorre vivere in armonia con la natura, piuttosto che cercare di controllarla e sottometterla. Non abbiamo un’etica all’altezza della tutela della terra e dell’ambiente, perché l’etica che abbiamo formulato fino adesso, sono etiche che si limitano a regolare i rapporti tra gli umani, a ridurre al massimo i conflitti ma non abbiamo un’etica che si sia fatta carico degli enti di natura. L’etica cristiana non serve più a niente perché è un’etica dell’intenzione pur essendo stata in occidente il fondamento di tutto l’ordine giuridico europeo. </text:span><text:span text:style-name="T34">E’</text:span><text:span text:style-name="T28"> un’etica delle intenzioni perché </text:span><text:span text:style-name="T34">ognuno di noi è</text:span><text:span text:style-name="T28"> giudicato colpevole o innocente guardando nell’interiorità della </text:span><text:span text:style-name="T34">propria</text:span><text:span text:style-name="T28"> anima; qual’é la </text:span><text:span text:style-name="T34">nostra </text:span><text:span text:style-name="T28">intenzione nel compiere un’azione? Anche l’ordine giuridico stabilisce l’intenzione, perché se la </text:span><text:span text:style-name="T34">nostra</text:span><text:span text:style-name="T28"> </text:span><text:soft-page-break/><text:span text:style-name="T28">intenzione e quella di uccidere s</text:span><text:span text:style-name="T34">iamo</text:span><text:span text:style-name="T28"> colpevol</text:span><text:span text:style-name="T34">i</text:span><text:span text:style-name="T28">, se non avevi l’intenzione di uccidere il tuo delitto è colposo: </text:span><text:span text:style-name="T29">ci sono delitti intenzionali </text:span><text:span text:style-name="T34">e </text:span><text:span text:style-name="T29">preterintenzionali, </text:span><text:span text:style-name="T34">per cui c’è tanto</text:span><text:span text:style-name="T29"> cristianesimo nell’ordine giuridico. L’etica delle intenzioni nell’età della tecnica non conta niente, che intenzioni avesse Fermi o Oppenheimer quando hanno inventato la bomba atomica, </text:span><text:span text:style-name="T34">a quel tempo, </text:span><text:span text:style-name="T29">non interessava a nessuno, </text:span><text:span text:style-name="T34">oggi </text:span><text:span text:style-name="T29">a noi interessano le conseguenze della bomba atomica, le conseguenze degli organismi geneticamente modificati, fatta salva l’intenzione, tutto tace.</text:span></text:p>
      <text:p text:style-name="P27">Kant ha costruito un’etica che potremmo definire laica, non per il fatto che voleva fondarla su presupposti religiosi, ma fonda<text:span text:style-name="T34">rla</text:span> su presupposti razionali, perché l’etica deve valere per tutti; le religioni sono diverse a secondo dei popoli, per avere un’etica universale dobbiamo costruirla soltanto ed esclusivamente in termini razionali che si riassume con la sua proposizione: “<text:span text:style-name="T11">l’uomo va trattato sempre come un fine mai come un mezzo</text:span>”; Kant pensava che si fosse liberato del cristianesimo, ma in realtà a porre l’uomo al vertice del creato è stata proprio la cultura cristiana, nella scala degli esseri e dei viventi in cima c’è l’uomo e se l’uomo va trattato come un fine allora tutto il resto va trattato come un mezzo? Nell’età della tecnica l’aria è un mezzo o un fine da salvaguardare e l’acqua è un mezzo o un fine da salvaguardare e gli animali e le piante e <text:soft-page-break/>l’atmosfera e la biosfera sono un mezzo? L’etica cristiana porta a questo, e noi non abbia<text:span text:style-name="T34">m</text:span>o ancora costruito un’etica che si sia fatta carico degli enti di natura. <text:s/>Ma le etiche per funzionare devono essere interiorizzate e vissute psicologicamente e devono scendere nella psiche umana, altrimenti non funzionano. Se stupro <text:s/>una ragazza io sono colpevole perché si è stratificato questo modello nella psiche di tutti; ma se io inquino sono davvero colpevole? Se l’etica di non inquinare la terra, se questo modello non è entrato nella nostra psiche, allora come dice Heidegger arriveremo all’usura della terra.</text:p>
      <text:p text:style-name="P28">Freud ci dice che la seconda mortificazione che ha subito l’umanità è costituita dal fatto che l’uomo è stato sempre pensato come creatura di dio e invece la scienza ci dice che l’uomo viene per evoluzione del mondo animale. Quella proposizione che stabilisce che l’uomo è un animale ragionevole non è propriamente corretta. L’uomo a differenza degli animali non possiede gli istinti; se io do una bistecca alla mucca, la mucca non la percepisce come cibo, se gli dò un covone di fieno si mette a mangiare; <text:span text:style-name="T30">cos’è un istinto? E una risposta rigida a uno stimolo, infatti gli animali appena nati sanno cosa fare, non hanno bisogno di istituzioni perché hanno gli istinti che regolano la loro esistenza; una volta l’educazione umana durava 15 anni, adesso dura anche 30 anni e non tutte le educazioni riescono, perché lo </text:span><text:soft-page-break/><text:span text:style-name="T30">dice bene Arnold</text:span><text:span text:style-name="T31"> </text:span><text:span text:style-name="T30">Gehlen, l'uomo è una "natura mancante" e un "disadattato nell'ordine della natura". Gehlen sosteneva che l'uomo è un essere "biologicamente carente", costretto a procacciarsi opportunità di sopravvivenza attraverso l'azione e l'intervento continuo sull'ambiente. L’uomo non è armonico con la natura, ma piuttosto costruisce un complesso di artifici per compensare l'insufficienza dei codici naturali che gli istinti rappresentano per gli animali, gli manca quella regola interna per condurre la propria vita. Queste cose le ha già dette per la prima volta Platone </text:span><text:span text:style-name="T32">che nel Protagora racconta di aver assegnato a Epimeteo, fratello di Prometeo, i nomi non sono causali, </text:span><text:span text:style-name="T13">metis</text:span><text:span text:style-name="T32"> è la mente e Epimeteo è quello che pensa dopo, lo stupido, l’improvvido; Prometeo </text:span><text:span text:style-name="T13">pro metis</text:span><text:span text:style-name="T32"> è quello che pensa in anticipo; Zeus aveva dato a Epimeteo il compito di conferire a tutti i viventi la loro qualità, le loro virtù, in pratica i loro istinti, e Epimeteo a grandi mani distribuisce a tutti i viventi la loro qualità; giunto all’uomo si trova le mani vuote, non c’è più niente da dare per questo vivente e allora Zeus, non avendo previsto questa situazione, si rivolge a Prometeo e gli dice: dai agli umani la tua virtù, la virtù di prevedere. Hobbes, nel 1600 dice ad esempio che gli animali mangiano quando hanno fame, l’uomo invece è affamato anche dalla fame futura anche quando ha lo stomaco pieno sa che avrà fame, e questo fa si che si </text:span><text:soft-page-break/><text:span text:style-name="T32">mette in moto per procurarsi la continuità dell’alimentazione, la previsione è la caratteristica umana, non l’istinto, l’istinto non c’è; anche l’istinto sessuale </text:span><text:span text:style-name="T40">a volte è</text:span><text:span text:style-name="T32"> poco istintivo, </text:span><text:span text:style-name="T40">tanto</text:span><text:span text:style-name="T32"> che </text:span><text:span text:style-name="T40">si può</text:span><text:span text:style-name="T32"> </text:span><text:span text:style-name="T40">fare</text:span><text:span text:style-name="T32"> in presenza di una pulsione sessuale, fare l’amore con un tacco a spillo, cosa che non sembra sia concessa agli animali, oppure possa in presenza di una pulsione sessuale, conferire una meta non sessuale, fare un’opera d’arte.</text:span></text:p>
      <text:p text:style-name="P29">Freud stesso che utilizzava la parola <text:span text:style-name="T11">istinct</text:span> all’inizio dei suoi scritti, l’abbandona, e usa la parola <text:span text:style-name="T11">trieb</text:span> che in tedesco vuol dire spinta; Freud vedeva le pulsioni come forze motrici fondamentali della psiche umana, che spingono l’individuo verso specifici obiettivi. (Nella psicologia moderna, alcune teorie contemporanee suggeriscono che gli esseri umani hanno una serie di istinti di base, come l’istinto di sopravvivenza o l’istinto sociale che influenzano il nostro comportamento in modi complessi.)</text:p>
      <text:p text:style-name="P29">Questa è la condizione umana, un animale mancante, un animale che ha dovuto, a compensazione della carenza e della mancanza di istinti, costruire istituzioni. L’ordine, le istituzioni, le leggi, sono i confini artificiali e culturali che sostituiscono quella base naturale di confine che è costituito dall’istinto.</text:p>
      <text:p text:style-name="P29">La terza mortificazione subita dall’umanità, la d<text:span text:style-name="T33">à</text:span> Freud con la psicoanalisi, dicendo agli umani: guardate che <text:soft-page-break/>non siete padroni del vostro io, o meglio, l’io non è padrone in casa propria. Freud dice di non essere stato il primo a dire queste cose, le ha dette un filosofo che Freud ammira molto a cui dedica pagine di elogi sconfinati, che è Arthur Schopenhauer, con la differenza che quando parlano i filosofi, possono dire quello che vogliono perché nessuno li ascolta, quando parlano i medici, tutti quanti sono attenti a quel che dicono, perché da l<text:span text:style-name="T40">ì,</text:span> dipende la nostra sopravvivenza. Anche se è stato <text:s/>Schopenhauer a dire queste cose per primo, è Freud ad essere perseguitato. Cosa vuol dire “l’io non è padrone in casa propria?” Dentro di noi c’è un’altra soggettività che non è egoica, è la soggettività della specie; e cos’è la specie? La specie fornisce <text:span text:style-name="T40">a </text:span>ciascun individuo due pulsioni che sono: la sessualità per la riproduzione e l’aggressività per la difesa della prole. Svolti questi compiti, alla specie, non interessa più l’uomo. L<text:span text:style-name="T40">o</text:span> priva gradatamente della sessualità e <text:s/>successivamente dell’aggressività, e queste due funzioni non sono funzioni egoiche.</text:p>
      <text:p text:style-name="P30">Un giovane, in preda ad una pulsione sessuale non è in grado di governarla, la pulsione sessuale trascina, non possono rinunciare ai loro investimenti affettivi, non si dispone della sessualità è la sessualità che dispone di noi. Se consideriamo dal punto di vista egoico una donna che decide di generare, dal punto di vista egoico è una perdita assoluta perché deve assistere alla <text:soft-page-break/>modificazione del suo corpo, al trauma della nascita, all’allattamento, alla sottrazione del suo tempo dal suo sonno, dalla sua carriera. Dal punto di vista egoico è una perdita secca, ma dal punto di vista della specie è un vantaggio, la specie è molto più forte dell’individuo. Alla natura non importa di noi, noi serviamo alla natura per la natura, non per noi. <text:span text:style-name="T40">Noi, l</text:span>a soggettività della specie non la prendiamo in considerazione e per questo Freud dice: questo è il nostro inconscio, ciò a cui non pensiamo mai, e cosa contiene l’inconscio? <text:span text:style-name="T40">S</text:span>essualità e aggressività, cioè le funzioni della specie, quelle per cui noi non viviamo, perché tutta la nostra vita è organizzata intorno a dio, intorno alla propria auto-affermazione, intorno al proprio riconoscimento, intorno alla realizzazione dei nostri obiettivi, questo è il nostro modo di regolarci nella vita.</text:p>
      <text:p text:style-name="P30"><text:span text:style-name="T40">Q</text:span>uando arriva la morte, decretata dalla specie, o la malattia, ci si ammala perché di fondo dobbiamo morire, non siamo più interessanti per la specie, nonostante la medicina abbia creato altri 30 anni di disfacimento del proprio corpo fino alla morte prolungata al di là di ogni misura.</text:p>
      <text:p text:style-name="P31">Se noi anticipiamo l’idea di morte come pensiero, non perché si muore, ma per la consapevolezza del morire, se la teniamo lì come destino, allora possiamo anche evitare la vanagloria. <text:span text:style-name="T40">Quante azioni sono veramente essenziali? </text:span><text:span text:style-name="T42">Q</text:span><text:span text:style-name="T40">uanti progetti sono veramente da </text:span><text:soft-page-break/><text:span text:style-name="T40">perseguire in maniera assoluta? </text:span><text:span text:style-name="T42">C</text:span><text:span text:style-name="T40">he distanza teniamo di fronte ai nostri ideali, ai nostri desideri, non è che la sofferenza è prodotta da un eccesso di desiderio rispetto al limite che potremmo conferire al nostro desiderio, se consideriamo che dobbiamo morire. </text:span><text:span text:style-name="T41">Q</text:span><text:span text:style-name="T40">uanta gente ha sfiorato la morte e poi ha detto: da quel giorno ho capito che cosa conta e cosa non conta nella vita, perché non stiamo un po' con la morte? In fondo ci spetta. Questo potrebbe essere il vero grande limite che ci consente di evitare gli errori e di stare nella giusta misura. Dopodiché, si possono difendere ideali, si devono raggiungere obiettivi, ma ancora una volta con la giusta misura, e la giusta misura ce la dà morte a cui la natura ci consegna in quanto non siamo più soggetti riproduttivi e in quanto non riproduttivi, non siamo più interessanti. Qui ci troviamo di fronte a una cecità della natura, a una indifferenza della natura nei confronti dei viventi.</text:span></text:p>
      <text:p text:style-name="P31">Goethe scrisse che la Natura ha inventato la morte per avere molta vita, Schopenhauer vede questa energia metafisica che tende a vivificare sempre la materia, quasi una demon<text:span text:style-name="T43">ì</text:span>a.</text:p>
      <text:p text:style-name="P31"><text:span text:style-name="T41">Blaise </text:span><text:span text:style-name="T40">Pascal </text:span><text:span text:style-name="T41">nei “Pensieri” </text:span><text:span text:style-name="T40">paragona l'uomo a una "canna debolissima" in confronto all'infinità del cosmo. </text:span><text:span text:style-name="T42">Si </text:span><text:span text:style-name="T40">rende conto della piccolezza e </text:span><text:span text:style-name="T42">della </text:span><text:span text:style-name="T40">fragilità dell'essere,</text:span><text:span text:style-name="T41"> </text:span><text:span text:style-name="T40"><text:s/>però </text:span><text:span text:style-name="T42">aggiunge</text:span><text:span text:style-name="T40"> è pensante; </text:span><text:span text:style-name="T41">l</text:span><text:span text:style-name="T40">'uomo, dotato di ragione </text:span><text:span text:style-name="T41">è</text:span><text:span text:style-name="T40"> capace di contemplare la propria esistenza, è </text:span><text:soft-page-break/><text:span text:style-name="T40">anche cosciente della propria mortalità e finitezza. Di fronte a questa vastità e alla consapevolezza dei propri limiti, Pascal prova un senso di vertigine e smarrimento. Si sente come una piccola e insignificante creatura in un universo immenso e indifferente. </text:span><text:span text:style-name="T41">L</text:span><text:span text:style-name="T40">'angoscia di Pascal di fronte al cielo stellato rappresenta la presa di coscienza della propria condizione umana: fragile, finita e insignificante di fronte all'immensità dell'universo.</text:span></text:p>
      <text:p text:style-name="P31"/>
      <text:p text:style-name="P31"/>
      <text:p text:style-name="P33"><text:span text:style-name="T46"><text:s/></text:span></text:p>
      <text:p text:style-name="P32"><text:a xlink:type="simple" xlink:href="https://www.youtube.com/watch?v=GHdVYNpV7bk&amp;t=316s" text:style-name="Internet_20_link" text:visited-style-name="Visited_20_Internet_20_Link"><text:span text:style-name="T45">(4) Umberto Galimberti - " Il piccolo uomo" - YouTube</text:span></text:a><text:span text:style-name="T4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be1bb"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fbe1bb"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4-06-01T17:51:58.925000000</meta:creation-date>
    <dc:date>2026-03-31T16:28:46.889677526</dc:date>
    <meta:editing-duration>PT22H25M58S</meta:editing-duration>
    <meta:editing-cycles>26</meta:editing-cycles>
    <meta:generator>LibreOffice/24.2.7.2$Linux_X86_64 LibreOffice_project/420$Build-2</meta:generator>
    <dc:creator>corrado tafaro</dc:creator>
    <meta:document-statistic meta:table-count="0" meta:image-count="0" meta:object-count="0" meta:page-count="21" meta:paragraph-count="53" meta:word-count="4654" meta:character-count="29139" meta:non-whitespace-character-count="24512"/>
  </office:meta>
</office:document-meta>
</file>