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Normale" style:font-family-generic="roman" style:font-pitch="variable"/>
  </office:font-face-decls>
  <office:automatic-styles>
    <style:style style:name="P1" style:family="paragraph" style:parent-style-name="Footnote">
      <style:paragraph-properties fo:line-height="100%" fo:text-align="justify" style:justify-single-word="false"/>
      <style:text-properties style:font-name="Noto Sans1" fo:font-size="9pt" officeooo:rsid="00b86155" officeooo:paragraph-rsid="00bebd19" style:font-size-asian="9pt" style:font-size-complex="9pt"/>
    </style:style>
    <style:style style:name="P2" style:family="paragraph" style:parent-style-name="Footnote">
      <style:paragraph-properties fo:text-align="justify" style:justify-single-word="false"/>
      <style:text-properties style:font-name="Noto Sans1"/>
    </style:style>
    <style:style style:name="P3" style:family="paragraph" style:parent-style-name="Footnote">
      <style:paragraph-properties fo:text-align="justify" style:justify-single-word="false"/>
    </style:style>
    <style:style style:name="P4" style:family="paragraph" style:parent-style-name="Heading_20_1">
      <style:paragraph-properties fo:text-align="center" style:justify-single-word="false"/>
      <style:text-properties style:font-name="Noto Serif" fo:font-size="15pt" officeooo:paragraph-rsid="000cc0c0" style:font-size-asian="15pt" style:font-size-complex="15pt"/>
    </style:style>
    <style:style style:name="P5" style:family="paragraph" style:parent-style-name="Heading_20_2">
      <style:text-properties style:font-name="Noto Sans1" officeooo:paragraph-rsid="000cc0c0"/>
    </style:style>
    <style:style style:name="P6" style:family="paragraph" style:parent-style-name="Standard">
      <style:paragraph-properties fo:margin-top="0.101cm" fo:margin-bottom="0cm" style:contextual-spacing="false" fo:line-height="115%" fo:text-align="center" style:justify-single-word="false"/>
      <style:text-properties style:font-name="Noto Sans1" fo:font-size="10pt" fo:font-style="normal" fo:text-shadow="none" officeooo:rsid="027f6543" officeooo:paragraph-rsid="000cc0c0" style:font-size-asian="10pt" style:font-style-asian="normal" style:font-size-complex="10pt" style:font-style-complex="normal"/>
    </style:style>
    <style:style style:name="P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c55ca2" officeooo:paragraph-rsid="000cc0c0" style:font-size-asian="10.5pt" style:font-style-asian="normal" style:font-size-complex="12pt" style:font-style-complex="normal"/>
    </style:style>
    <style:style style:name="P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officeooo:rsid="000e7768" officeooo:paragraph-rsid="000cc0c0" style:font-size-asian="10.5pt" style:font-style-asian="normal" style:font-size-complex="12pt" style:font-style-complex="normal"/>
    </style:style>
    <style:style style:name="P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0e7768" officeooo:paragraph-rsid="000cc0c0" style:font-size-asian="10.5pt" style:font-style-asian="normal" style:font-size-complex="12pt" style:font-style-complex="normal"/>
    </style:style>
    <style:style style:name="P1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abbcb9" officeooo:paragraph-rsid="000cc0c0" style:font-size-asian="10.5pt" style:font-size-complex="12pt"/>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0fc34a" officeooo:paragraph-rsid="000cc0c0" style:font-size-asian="10.5pt" style:font-size-complex="12pt"/>
    </style:style>
    <style:style style:name="P1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0fc34a" officeooo:paragraph-rsid="000cc0c0" style:font-size-asian="10.5pt" style:font-size-complex="12pt"/>
    </style:style>
    <style:style style:name="P1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0fc34a" officeooo:paragraph-rsid="000cc0c0" style:font-size-asian="10.5pt" style:font-size-complex="12pt"/>
    </style:style>
    <style:style style:name="P1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cc0c0" style:font-size-asian="12pt" style:font-size-complex="12pt"/>
    </style:style>
    <style:style style:name="P15" style:family="paragraph" style:parent-style-name="Standard">
      <style:paragraph-properties fo:margin-top="0.101cm" fo:margin-bottom="0cm" style:contextual-spacing="false" fo:line-height="115%" fo:text-align="justify" style:justify-single-word="false"/>
      <style:text-properties style:font-name="Noto Sans1" fo:font-style="normal" officeooo:paragraph-rsid="000cc0c0" style:font-style-asian="normal" style:font-style-complex="normal"/>
    </style:style>
    <style:style style:name="P1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tyle="normal" officeooo:paragraph-rsid="000cc0c0" style:font-style-asian="normal" style:font-style-complex="normal"/>
    </style:style>
    <style:style style:name="P1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tyle="normal" officeooo:paragraph-rsid="000cc0c0" style:font-style-asian="normal" style:font-style-complex="normal"/>
    </style:style>
    <style:style style:name="P1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tyle="normal" officeooo:paragraph-rsid="000cc0c0" style:font-style-asian="normal" style:font-style-complex="normal"/>
    </style:style>
    <style:style style:name="P1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0cc0c0"/>
    </style:style>
    <style:style style:name="P2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0cc0c0"/>
    </style:style>
    <style:style style:name="T1" style:family="text">
      <style:text-properties officeooo:rsid="00ef88cd"/>
    </style:style>
    <style:style style:name="T2" style:family="text">
      <style:text-properties officeooo:rsid="00ad2448"/>
    </style:style>
    <style:style style:name="T3" style:family="text">
      <style:text-properties officeooo:rsid="00bdc33a"/>
    </style:style>
    <style:style style:name="T4" style:family="text">
      <style:text-properties officeooo:rsid="00d162fd"/>
    </style:style>
    <style:style style:name="T5" style:family="text">
      <style:text-properties fo:font-style="italic" officeooo:rsid="00ad2448" style:font-style-asian="italic" style:font-style-complex="italic"/>
    </style:style>
    <style:style style:name="T6" style:family="text">
      <style:text-properties fo:font-size="12pt" officeooo:rsid="000e7768" style:font-size-asian="10.5pt" style:font-size-complex="12pt"/>
    </style:style>
    <style:style style:name="T7" style:family="text">
      <style:text-properties fo:font-size="12pt" officeooo:rsid="00bdc33a" style:font-size-asian="10.5pt" style:font-size-complex="12pt"/>
    </style:style>
    <style:style style:name="T8" style:family="text">
      <style:text-properties fo:font-size="12pt" officeooo:rsid="00af7d22" style:font-size-asian="10.5pt" style:font-size-complex="12pt"/>
    </style:style>
    <style:style style:name="T9" style:family="text">
      <style:text-properties fo:font-size="12pt" officeooo:rsid="000fc34a" style:font-size-asian="10.5pt" style:font-size-complex="12pt"/>
    </style:style>
    <style:style style:name="T10" style:family="text">
      <style:text-properties fo:font-size="12pt" officeooo:rsid="00f12137" style:font-size-asian="10.5pt" style:font-size-complex="12pt"/>
    </style:style>
    <style:style style:name="T11" style:family="text">
      <style:text-properties fo:font-size="12pt" officeooo:rsid="00d162fd" style:font-size-asian="10.5pt" style:font-size-complex="12pt"/>
    </style:style>
    <style:style style:name="T12" style:family="text">
      <style:text-properties fo:font-size="12pt" officeooo:rsid="00c2d954" style:font-size-asian="10.5pt" style:font-size-complex="12pt"/>
    </style:style>
    <style:style style:name="T13" style:family="text">
      <style:text-properties fo:font-size="12pt" officeooo:rsid="00b93547" style:font-size-asian="10.5pt" style:font-size-complex="12pt"/>
    </style:style>
    <style:style style:name="T14" style:family="text">
      <style:text-properties fo:font-size="12pt" officeooo:rsid="00bebd19" style:font-size-asian="10.5pt" style:font-size-complex="12pt"/>
    </style:style>
    <style:style style:name="T15" style:family="text">
      <style:text-properties fo:font-size="12pt" fo:font-style="italic" officeooo:rsid="00f12137" style:font-size-asian="10.5pt" style:font-style-asian="italic" style:font-size-complex="12pt" style:font-style-complex="italic"/>
    </style:style>
    <style:style style:name="T16" style:family="text">
      <style:text-properties fo:font-size="12pt" fo:font-style="italic" officeooo:rsid="000fc34a" style:font-size-asian="10.5pt" style:font-style-asian="italic" style:font-size-complex="12pt" style:font-style-complex="italic"/>
    </style:style>
    <style:style style:name="T17" style:family="text">
      <style:text-properties fo:font-size="12pt" fo:font-style="normal" officeooo:rsid="000fc34a" style:font-size-asian="10.5pt" style:font-style-asian="normal" style:font-size-complex="12pt" style:font-style-complex="normal"/>
    </style:style>
    <style:style style:name="T18" style:family="text">
      <style:text-properties fo:font-size="12pt" fo:font-style="normal" officeooo:rsid="00c08a0c" style:font-size-asian="10.5pt" style:font-style-asian="normal" style:font-size-complex="12pt" style:font-style-complex="normal"/>
    </style:style>
    <style:style style:name="T19" style:family="text">
      <style:text-properties fo:font-size="12pt" fo:font-style="normal" officeooo:rsid="00d19e65" style:font-size-asian="10.5pt" style:font-style-asian="normal" style:font-size-complex="12pt" style:font-style-complex="normal"/>
    </style:style>
    <style:style style:name="T20" style:family="text">
      <style:text-properties fo:font-size="12pt" fo:font-style="normal" officeooo:rsid="02235d54" style:font-size-asian="10.5pt" style:font-style-asian="normal" style:font-size-complex="12pt" style:font-style-complex="normal"/>
    </style:style>
    <style:style style:name="T21" style:family="text">
      <style:text-properties fo:font-size="12pt" fo:font-style="normal" officeooo:rsid="00c23866" style:font-size-asian="10.5pt" style:font-style-asian="normal" style:font-size-complex="12pt" style:font-style-complex="normal"/>
    </style:style>
    <style:style style:name="T22" style:family="text">
      <style:text-properties fo:font-size="12pt" fo:font-style="normal" officeooo:rsid="00c2d954" style:font-size-asian="10.5pt" style:font-style-asian="normal" style:font-size-complex="12pt" style:font-style-complex="normal"/>
    </style:style>
    <style:style style:name="T23" style:family="text">
      <style:text-properties fo:font-size="12pt" fo:font-style="normal" officeooo:rsid="00c3aa3b" style:font-size-asian="10.5pt" style:font-style-asian="normal" style:font-size-complex="12pt" style:font-style-complex="normal"/>
    </style:style>
    <style:style style:name="T24" style:family="text">
      <style:text-properties fo:font-size="12pt" fo:font-style="normal" officeooo:rsid="00d2142f" style:font-size-asian="10.5pt" style:font-style-asian="normal" style:font-size-complex="12pt" style:font-style-complex="normal"/>
    </style:style>
    <style:style style:name="T25" style:family="text">
      <style:text-properties fo:font-size="12pt" fo:font-style="normal" officeooo:rsid="00e82454" style:font-size-asian="10.5pt" style:font-style-asian="normal" style:font-size-complex="12pt" style:font-style-complex="normal"/>
    </style:style>
    <style:style style:name="T26" style:family="text">
      <style:text-properties officeooo:rsid="00b93547"/>
    </style:style>
    <style:style style:name="T27" style:family="text">
      <style:text-properties officeooo:rsid="00d19e65"/>
    </style:style>
    <style:style style:name="T28" style:family="text">
      <style:text-properties style:font-name="Noto Sans" officeooo:rsid="00c08a0c"/>
    </style:style>
    <style:style style:name="T29" style:family="text">
      <style:text-properties officeooo:rsid="00bebd19"/>
    </style:style>
    <style:style style:name="T30" style:family="text">
      <style:text-properties officeooo:rsid="00bfa736"/>
    </style:style>
    <style:style style:name="T31" style:family="text">
      <style:text-properties officeooo:rsid="00c08a0c"/>
    </style:style>
    <style:style style:name="T32" style:family="text">
      <style:text-properties officeooo:rsid="00c9f1f5"/>
    </style:style>
    <style:style style:name="T33" style:family="text">
      <style:text-properties officeooo:rsid="00b9d124"/>
    </style:style>
    <style:style style:name="T34" style:family="text">
      <style:text-properties officeooo:rsid="000fc34a"/>
    </style:style>
    <style:style style:name="T35" style:family="text">
      <style:text-properties style:font-name="Noto Sans1"/>
    </style:style>
    <style:style style:name="T36" style:family="text">
      <style:text-properties fo:font-size="14pt" style:font-size-asian="14pt" style:font-size-complex="14pt"/>
    </style:style>
    <style:style style:name="T37" style:family="text">
      <style:text-properties fo:font-style="normal" officeooo:rsid="000fc34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start text:name="__RefHeading___Toc3733_4164060355COPY_IS_MOVE"/>La filosofia come arte di vivere: lo stoicismo e l’epicureismo secondo Pierre Hadot.<text:bookmark-end text:name="__RefHeading___Toc3733_4164060355COPY_IS_MOVE"/></text:h>
      <text:p text:style-name="P6">Pierre Hadot (1922-2010), studioso del pensiero greco e del neoplatonismo. E’ considerato tra i massimi specialisti contemporanei nel campo degli studi di filosofia antica</text:p>
      <text:p text:style-name="P10">Pierre Hadot, è considerato uno dei massimi studiosi contemporanei di filosofia antica. Piuttosto che vederla come un'attività puramente intellettuale, la considerava come un "modo di vivere”. I suoi scritti mostrano come le scuole di pensiero antiche, come l'epicureismo <text:span text:style-name="T1">e</text:span> lo stoicismo, mirassero a trasformare la vita interiore degli individui e aiutarli a raggiungere la felicità e la saggezza. <text:span text:style-name="T2">Tra le sue pubblicazioni, c’è né un</text:span><text:span text:style-name="T3">a</text:span><text:span text:style-name="T2"> che merita la </text:span><text:span text:style-name="T4">mia</text:span><text:span text:style-name="T2"> attenzione: “</text:span><text:span text:style-name="T5">La filosofia come modo di vivere”</text:span><text:span text:style-name="T2"> </text:span><text:span text:style-name="T5">(2008).</text:span></text:p>
      <text:p text:style-name="P8">Il testo esplora il ruolo della filosofia come “modo di vivere”, una tradizione che risale ai filosofi antichi come Socrate e Platone, e che continua fino a Kant.</text:p>
      <text:p text:style-name="P9">Pierre Hadot, sostiene che la filosofia non è solo una attività intellettuale, ma un percorso per trasformare la vita interiore e raggiungere la saggezza.</text:p>
      <text:p text:style-name="P15"><text:span text:style-name="Citation"><text:span text:style-name="T6">«Non prepara a una professione ma trasforma la sensibilità delle persone, il loro carattere, il modo di vedere il mondo».</text:span></text:span><text:span text:style-name="T6"> </text:span></text:p>
      <text:p text:style-name="P16"><text:span text:style-name="T6">Questo concetto, si contrappone a molte correnti della filosofia morale contemporanea, che vedono la filosofia come una costruzione di teorie astratte. </text:span><text:span text:style-name="T7">Qui s</text:span><text:span text:style-name="T8">i pone in evidenza </text:span><text:span text:style-name="T9">la distinzione kantiana tra filosofia “cosmica” e </text:span><text:soft-page-break/><text:span text:style-name="T9">“scolastica”, dove la prima si concentra sulla domanda “come vivere?”, mentre la seconda è più focalizzata sulla speculazione teorica. L’idea di “pensare con la propria testa” come chiave di volta dell’illuminismo è infine connessa a una tradizione di pensiero che risale all’Accademia Probabilistica di Arcesilao e Carneade, che enfatizzava la critica e la libertà di scelta individuale, </text:span><text:span text:style-name="T10">che si manifestò con la corrente di pensiero detta </text:span><text:span text:style-name="T15">Scetticismo</text:span><text:span text:style-name="T10">.</text:span></text:p>
      <text:h text:style-name="P5" text:outline-level="2"><text:bookmark-start text:name="__RefHeading___Toc19916_4287692119"/><text:span text:style-name="T36">La filosofia come "modo di vivere": un ponte tra passato e presente</text:span><text:bookmark-end text:name="__RefHeading___Toc19916_4287692119"/></text:h>
      <text:p text:style-name="P16"><text:span text:style-name="T9">La concezione di Hadot della filosofia come "modo di vivere", influenza profondamente il rapporto tra pensiero e azione nella vita quotidiana perché sposta l'enfasi da</text:span><text:span text:style-name="T7">i concetti puramente </text:span><text:span text:style-name="T9">teori</text:span><text:span text:style-name="T7">ci, </text:span><text:span text:style-name="T9">alla trasformazione personale. I filosofi non si limitavano a elaborare teorie </text:span><text:span text:style-name="T11">più o meno </text:span><text:span text:style-name="T9">astratte, ma si consideravano "educatori" che, attraverso la pratica filosofica, miravano a trasformare la sensibilità, il carattere e la visione del mondo dei propri discepoli.</text:span></text:p>
      <text:p text:style-name="P18"><text:span text:style-name="T9">L'obiettivo non era insegnare un mestiere specifico, ma il "mestiere dell'uomo", ovvero vivere una vita virtuosa, in accordo con la natura e in costante ricerca della saggezza. Questa concezione "pratica" della filosofia era condivisa da diverse scuole di pensiero, come l'</text:span><text:span text:style-name="T16">epicureismo </text:span><text:span text:style-name="T15">e lo </text:span><text:span text:style-name="T16">stoicismo</text:span><text:span text:style-name="T9">, e trovava la sua massima espressione nella vita quotidiana degli individui. Questa </text:span><text:soft-page-break/><text:span text:style-name="T9">concezione riecheggia l'idea di filosofia come "educazione degli adulti" proposta da Hilary Putnam</text:span><text:span text:style-name="T9"><text:note text:id="ftn7" text:note-class="footnote"><text:note-citation>1</text:note-citation><text:note-body><text:p text:style-name="P1">Hilary Putnam (1926-2016), filosofo e matematico statunitense. <text:span text:style-name="T26">I suoi contributi più celebri riguardano la filosofia della mente e del linguaggio.</text:span></text:p></text:note-body></text:note></text:span><text:span text:style-name="T9">. </text:span></text:p>
      <text:p text:style-name="P11">Questa concezione della filosofia come pratica di trasformazione personale risale a Socrate e Platone e si ritrova in tutta l'antichità. Simplicio, filosofo neoplatonico del VI secolo, paragonava il ruolo del filosofo a quello di uno "scultore di uomini".</text:p>
      <text:p text:style-name="P19"><text:span text:style-name="T12">Già il </text:span><text:span text:style-name="T9">Socrate dell’Apologia aveva rimproverato agli ateniesi di occuparsi della loro fortuna, della loro reputazione, dei loro onori, invece di cercare di migliorarsi nel loro pensiero, nella loro verità, nella loro anima.</text:span></text:p>
      <text:p text:style-name="P11">Analogamente, Epitteto sosteneva che il successo di un filosofo si misura<text:span text:style-name="T27">va</text:span> dalla sua capacità di vivere una vita retta, proprio come un falegname dimostra la sua abilità costruendo una casa.</text:p>
      <text:p text:style-name="P13">Hadot, Kant e Putnam condividono una concezione della filosofia come un'attività che trasforma l'individuo e non si limita alla sola speculazione intellettuale.</text:p>
      <text:p text:style-name="P19"><text:span text:style-name="T9">Putnam, riprendendo Kant, vede la filosofia come "educazione degli adulti", un processo che cambia le persone e il loro modo di vedere il mondo, non solo le loro idee. </text:span><text:span text:style-name="T13">Questo concetto si ritrova anche in Kant, per il quale la filosofia che interessa veramente l'uomo è </text:span><text:soft-page-break/><text:span text:style-name="T13">quella"cosmica", che mira alla saggezza e guida l'uomo verso la sua meta </text:span><text:span text:style-name="T14">e che</text:span><text:span text:style-name="T13"> risponde alla domanda "Come vivere?". Tuttavia, Kant riconosce l'utilità della filosofia scolastica come strumento per esercitare la ragione.</text:span></text:p>
      <text:p text:style-name="P14">Sia Putnam che Kant, collegano la filosofia all' "Aufkl<text:span text:style-name="T28">ä</text:span>rung<text:note text:id="ftn8" text:note-class="footnote"><text:note-citation>2</text:note-citation><text:note-body><text:p text:style-name="P2"><text:span text:style-name="T29">M</text:span>ovimento di idee usualmente chiamato Illuminismo. <text:span text:style-name="T30">Kant ha esaltato l’Aufkl</text:span><text:span text:style-name="T31">ä</text:span><text:span text:style-name="T30">rung come l’uscire dell’uomo dallo stato di minorità per obbedire al motto sapere aude, ossia imparare a servirsi del proprio intelletto senza la guida di altri. L’Aufkl</text:span><text:span text:style-name="T31">ä</text:span><text:span text:style-name="T30">rung si manifestò come una sorta di ‘filosofia popolare’, tendente a individuare principi facilmente assimilabili e di immediata efficacia per la vita e la felicità terrena dell’uomo.</text:span></text:p></text:note-body></text:note>" intesa come la capacità di "pensare con la propria testa", liberandosi dai pregiudizi e dalle mode. <text:span text:style-name="T27">Questo pensiero</text:span><text:span text:style-name="T32"> si </text:span><text:span text:style-name="T33">conne</text:span><text:span text:style-name="T32">tte</text:span><text:span text:style-name="T33"> </text:span><text:span text:style-name="T34">a una tradizione di pensiero che risale all’Accademia Probabilistica di Arcesilao e Carneade, che enfatizzava</text:span><text:span text:style-name="T32">no</text:span><text:span text:style-name="T34"> la critica e la libertà di scelt</text:span><text:span text:style-name="T32">e</text:span><text:span text:style-name="T34"> individual</text:span><text:span text:style-name="T32">i</text:span><text:span text:style-name="T34">. </text:span><text:span text:style-name="T37">Perché "probabilistica"?</text:span></text:p>
      <text:p text:style-name="P20"><text:span text:style-name="T17">Il termine "probabilistica" è stato attribuito in epoca moderna all'Accademia fondata da Arcesilao e sviluppata da Carneade per sottolineare la loro posizione scettica riguardo alla possibilità di raggiungere una conoscenza certa e indubitabile. Gli Accademici Nuovi, come venivano chiamati, sostenevano che la nostra conoscenza è sempre affetta da un grado di probabilità e che la verità assoluta è </text:span><text:span text:style-name="T18">inarrivabile</text:span><text:span text:style-name="T17">. Arcesilao e Carneade, opponendosi alla pretesa stoica di possedere una conoscenza certa e infallibile, sostenevano che le nostre </text:span><text:soft-page-break/><text:span text:style-name="T17">percezioni e giudizi non possono mai raggiungere una verità assoluta. </text:span><text:span text:style-name="T19">Al contrario</text:span><text:span text:style-name="T17">, possiamo solo raggiungere gradi di probabilità. Arcesilao introdusse il concetto di "ragionevole" come criterio pratico di giudizio, mentre Carneade parlava di "persuasivo" o "approvabile" classificando le conoscenze in base al loro grado di probabilità.</text:span></text:p>
      <text:p text:style-name="P19"><text:span text:style-name="T17">Questa filosofia incoraggia</text:span><text:span text:style-name="T20">va</text:span><text:span text:style-name="T17"> il pensiero critico e indipendente, poiché invita</text:span><text:span text:style-name="T20">va</text:span><text:span text:style-name="T17"> a valutare le informazioni e le opinioni basandosi sulla loro probabilità e persuasività, piuttosto che accettarle come verità assolute. In questo senso, si può dire che l'Accademia probabilistica promuove</text:span><text:span text:style-name="T20">va</text:span><text:span text:style-name="T17"> l'idea di "pensare con la propria testa".</text:span></text:p>
      <text:p text:style-name="P19"><text:span text:style-name="T17">L'idea di "pensare con la propria testa" è profondamente radicata nella filosofia scettica </text:span><text:span text:style-name="T21">che affonda le sue radici in figure come Pirrone</text:span><text:span text:style-name="T21"><text:note text:id="ftn9" text:note-class="footnote"><text:note-citation>3</text:note-citation><text:note-body><text:p text:style-name="P3">I<text:span text:style-name="T35">l concetto chiave del pensiero di Pirrone è l'acatalessia, ovvero l'impossibilità di raggiungere una conoscenza vera e certa delle cose. Secondo Pirrone, ogni affermazione può essere contraddetta da un'altra affermazione altrettanto valida, rendendo così impossibile stabilire la verità assoluta.</text:span></text:p></text:note-body></text:note></text:span><text:span text:style-name="T21"> di Elis.</text:span><text:span text:style-name="T17"> Gli scettici antichi, mettevano in discussione la possibilità di conoscere la realtà in modo oggettivo e assoluto, sottolineando i limiti della percezione e del ragionamento umano </text:span><text:span text:style-name="T22">e </text:span><text:span text:style-name="T17">rifiuta</text:span><text:span text:style-name="T21">ndo</text:span><text:span text:style-name="T17"> ogni forma di dogmatismo e di autorità, invitando ciascuno a pensare in modo autonomo e a mettere in discussione ogni credenza.</text:span></text:p>
      <text:p text:style-name="P19"><text:soft-page-break/><text:span text:style-name="T17">A</text:span><text:span text:style-name="T23">bbiamo detto che la filosofia, intesa come modo di vivere, trae le sue origini </text:span><text:span text:style-name="T24">nelle</text:span><text:span text:style-name="T23"> scuole di pensiero della filosofia antica </text:span><text:span text:style-name="T24">nell’</text:span><text:span text:style-name="T23">epicureismo </text:span><text:span text:style-name="T25">e stoicismo.</text:span></text:p>
      <text:p text:style-name="P7">Esplorando le storie dei suoi protagonisti principali, metterò in luce i punti chiave per dimostrare come la filosofia possa offrirci strumenti preziosi per migliorare la nostra vita quotidia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Norm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ab-stops/>
      </style:paragraph-properties>
      <style:text-properties style:font-name="Noto Serif1" fo:font-family="'Noto Serif'" style:font-style-name="Normale" style:font-family-generic="roman" style:font-pitch="variable" fo:font-size="13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1" fo:font-family="'Noto Serif'" style:font-style-name="Normale" style:font-family-generic="roman" style:font-pitch="variable" fo:font-size="13pt" fo:font-weight="normal"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7T16:53:27.808056207</meta:creation-date>
    <dc:date>2026-01-27T16:59:49.317817311</dc:date>
    <dc:creator>corrado tafaro</dc:creator>
    <meta:editing-duration>PT6M22S</meta:editing-duration>
    <meta:editing-cycles>1</meta:editing-cycles>
    <meta:document-statistic meta:table-count="0" meta:image-count="0" meta:object-count="0" meta:page-count="6" meta:paragraph-count="24" meta:word-count="1104" meta:character-count="7490" meta:non-whitespace-character-count="6408"/>
    <meta:generator>LibreOffice/24.2.7.2$Linux_X86_64 LibreOffice_project/420$Build-2</meta:generator>
  </office:meta>
</office:document-meta>
</file>