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svg:font-family="'Noto Serif'" style:font-adornments="Normale" style:font-family-generic="roman"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style:font-name="Noto Sans1" fo:font-size="12pt" style:font-size-asian="12pt" style:font-size-complex="12pt"/>
    </style:style>
    <style:style style:name="P2" style:family="paragraph" style:parent-style-name="Text_20_body">
      <style:paragraph-properties fo:margin-top="0.101cm" fo:margin-bottom="0cm" style:contextual-spacing="false" fo:text-align="justify" style:justify-single-word="false"/>
      <style:text-properties style:font-name="Noto Sans1" fo:font-size="12pt" style:font-size-asian="12pt" style:font-size-complex="12pt"/>
    </style:style>
    <style:style style:name="P3" style:family="paragraph" style:parent-style-name="Standard">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style:font-name="Noto Sans1" fo:font-size="12pt" officeooo:rsid="001c02ae" officeooo:paragraph-rsid="000d5cfd" style:font-size-asian="12pt" style:font-size-complex="12pt"/>
    </style:style>
    <style:style style:name="P4" style:family="paragraph" style:parent-style-name="Standard">
      <style:paragraph-properties fo:line-height="115%" fo:text-align="justify" style:justify-single-word="false"/>
      <style:text-properties style:font-name="Noto Sans1" fo:font-size="12pt" officeooo:rsid="00145787" officeooo:paragraph-rsid="000d5cfd" style:font-size-asian="12pt" style:font-size-complex="12pt"/>
    </style:style>
    <style:style style:name="P5" style:family="paragraph" style:parent-style-name="Standard" style:master-page-name="">
      <loext:graphic-properties draw:fill="none"/>
      <style:paragraph-properties fo:margin-left="0cm" fo:margin-right="0cm" fo:margin-top="0.049cm" fo:margin-bottom="0cm" style:contextual-spacing="false" fo:line-height="115%" fo:text-align="justify" style:justify-single-word="false" fo:text-indent="0cm" style:auto-text-indent="false" style:page-number="auto" fo:background-color="transparent"/>
      <style:text-properties style:font-name="Noto Sans1" fo:font-size="12pt" officeooo:rsid="00145787" officeooo:paragraph-rsid="000d5cfd" style:font-size-asian="12pt" style:font-size-complex="12pt"/>
    </style:style>
    <style:style style:name="P6"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rsid="00145787" officeooo:paragraph-rsid="000d5cfd" style:font-size-asian="12pt" style:font-size-complex="12pt"/>
    </style:style>
    <style:style style:name="P7"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officeooo:rsid="00145787" officeooo:paragraph-rsid="000d5cfd" style:font-size-asian="12pt" style:font-size-complex="12pt"/>
    </style:style>
    <style:style style:name="P8" style:family="paragraph" style:parent-style-name="Standard" style:master-page-name="">
      <loext:graphic-properties draw:fill="none"/>
      <style:paragraph-properties fo:margin-left="0cm" fo:margin-right="0cm" fo:margin-top="0.199cm" fo:margin-bottom="0cm" style:contextual-spacing="false" fo:line-height="115%" fo:text-align="justify" style:justify-single-word="false" fo:text-indent="0cm" style:auto-text-indent="false" style:page-number="auto" fo:background-color="transparent"/>
      <style:text-properties style:font-name="Noto Sans1" fo:font-size="12pt" officeooo:rsid="00145787" officeooo:paragraph-rsid="000d5cfd" style:font-size-asian="12pt" style:font-size-complex="12pt"/>
    </style:style>
    <style:style style:name="P9" style:family="paragraph" style:parent-style-name="Standard">
      <style:paragraph-properties fo:line-height="115%" fo:text-align="justify" style:justify-single-word="false"/>
      <style:text-properties style:font-name="Noto Sans1" fo:font-size="12pt" officeooo:rsid="00139a99" officeooo:paragraph-rsid="000d5cfd" style:font-size-asian="12pt" style:font-size-complex="12pt"/>
    </style:style>
    <style:style style:name="P10" style:family="paragraph" style:parent-style-name="Standard" style:master-page-name="">
      <loext:graphic-properties draw:fill="none"/>
      <style:paragraph-properties fo:margin-left="0cm" fo:margin-right="0cm" fo:margin-top="0.049cm" fo:margin-bottom="0cm" style:contextual-spacing="false" fo:line-height="115%" fo:text-align="justify" style:justify-single-word="false" fo:text-indent="0cm" style:auto-text-indent="false" style:page-number="auto" fo:background-color="transparent"/>
      <style:text-properties style:font-name="Noto Sans1" fo:font-size="12pt" officeooo:rsid="00139a99" officeooo:paragraph-rsid="000d5cfd" style:font-size-asian="12pt" style:font-size-complex="12pt"/>
    </style:style>
    <style:style style:name="P11" style:family="paragraph" style:parent-style-name="Standard">
      <style:paragraph-properties fo:margin-top="0.199cm" fo:margin-bottom="0cm" style:contextual-spacing="false" fo:line-height="115%" fo:text-align="justify" style:justify-single-word="false"/>
      <style:text-properties style:font-name="Noto Sans1" fo:font-size="12pt" fo:font-weight="normal" officeooo:rsid="001c02ae" officeooo:paragraph-rsid="000d5cfd" style:font-size-asian="10.5pt" style:font-weight-asian="normal" style:font-size-complex="12pt" style:font-weight-complex="normal"/>
    </style:style>
    <style:style style:name="P12" style:family="paragraph" style:parent-style-name="Standard">
      <style:paragraph-properties fo:margin-top="0.101cm" fo:margin-bottom="0cm" style:contextual-spacing="false" fo:line-height="115%" fo:text-align="justify" style:justify-single-word="false"/>
      <style:text-properties style:font-name="Noto Sans1" fo:font-size="12pt" fo:font-weight="normal" officeooo:rsid="001c02ae" officeooo:paragraph-rsid="000d5cfd" style:font-size-asian="10.5pt" style:font-weight-asian="normal" style:font-size-complex="12pt" style:font-weight-complex="normal"/>
    </style:style>
    <style:style style:name="P13"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weight="normal" officeooo:rsid="001c02ae" officeooo:paragraph-rsid="000d5cfd" style:font-size-asian="10.5pt" style:font-weight-asian="normal" style:font-size-complex="12pt" style:font-weight-complex="normal"/>
    </style:style>
    <style:style style:name="P14"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weight="normal" officeooo:rsid="001c02ae" officeooo:paragraph-rsid="000d5cfd" style:font-size-asian="10.5pt" style:font-weight-asian="normal" style:font-size-complex="12pt" style:font-weight-complex="normal"/>
    </style:style>
    <style:style style:name="P15"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weight="normal" officeooo:rsid="0020b17c" officeooo:paragraph-rsid="000d5cfd" style:font-size-asian="10.5pt" style:font-weight-asian="normal" style:font-size-complex="12pt" style:font-weight-complex="normal"/>
    </style:style>
    <style:style style:name="P16" style:family="paragraph" style:parent-style-name="Footnote">
      <style:paragraph-properties fo:text-align="justify" style:justify-single-word="false"/>
    </style:style>
    <style:style style:name="P17" style:family="paragraph" style:parent-style-name="Standard">
      <style:paragraph-properties fo:line-height="115%" fo:text-align="justify" style:justify-single-word="false"/>
      <style:text-properties fo:font-size="12pt" officeooo:rsid="00139a99" officeooo:paragraph-rsid="000d5cfd" style:font-size-asian="12pt" style:font-size-complex="12pt"/>
    </style:style>
    <style:style style:name="P18"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fo:font-size="12pt" officeooo:rsid="00139a99" officeooo:paragraph-rsid="000d5cfd" style:font-size-asian="12pt" style:font-size-complex="12pt"/>
    </style:style>
    <style:style style:name="P19"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fo:font-size="12pt" officeooo:rsid="00139a99" officeooo:paragraph-rsid="000d5cfd" style:font-size-asian="12pt" style:font-size-complex="12pt"/>
    </style:style>
    <style:style style:name="P20" style:family="paragraph" style:parent-style-name="Footnote">
      <style:text-properties style:font-name="Noto Sans1"/>
    </style:style>
    <style:style style:name="P21" style:family="paragraph" style:parent-style-name="Footnote">
      <style:paragraph-properties fo:text-align="justify" style:justify-single-word="false"/>
      <style:text-properties style:font-name="Noto Sans1"/>
    </style:style>
    <style:style style:name="P22" style:family="paragraph" style:parent-style-name="Footnote">
      <style:paragraph-properties fo:line-height="100%" fo:text-align="justify" style:justify-single-word="false"/>
      <style:text-properties style:font-name="Noto Sans1"/>
    </style:style>
    <style:style style:name="P23" style:family="paragraph" style:parent-style-name="Heading_20_2">
      <style:text-properties officeooo:paragraph-rsid="0010c507"/>
    </style:style>
    <style:style style:name="P24" style:family="paragraph" style:parent-style-name="Heading_20_3">
      <style:text-properties fo:font-weight="normal" officeooo:paragraph-rsid="0010c507" style:font-weight-asian="normal" style:font-weight-complex="normal"/>
    </style:style>
    <style:style style:name="P25" style:family="paragraph" style:parent-style-name="Heading_20_3">
      <style:text-properties officeooo:paragraph-rsid="0010c507"/>
    </style:style>
    <style:style style:name="P26" style:family="paragraph" style:parent-style-name="Standard">
      <style:paragraph-properties fo:margin-top="0.101cm" fo:margin-bottom="0cm" style:contextual-spacing="false" fo:line-height="115%" fo:text-align="justify" style:justify-single-word="false"/>
      <style:text-properties style:font-name="Noto Sans1" fo:font-size="12pt" fo:font-weight="normal" officeooo:rsid="001b5411" officeooo:paragraph-rsid="0010c507" style:font-size-asian="12pt" style:font-weight-asian="normal" style:font-size-complex="12pt" style:font-weight-complex="normal"/>
    </style:style>
    <style:style style:name="P27"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499cm" style:auto-text-indent="false" fo:background-color="transparent"/>
      <style:text-properties style:font-name="Noto Sans1" fo:font-size="12pt" officeooo:paragraph-rsid="0010c507" style:font-size-asian="12pt" style:font-size-complex="12pt"/>
    </style:style>
    <style:style style:name="P28"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officeooo:paragraph-rsid="0010c507" style:font-size-asian="12pt" style:font-size-complex="12pt"/>
    </style:style>
    <style:style style:name="P29"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0c507" style:font-size-asian="12pt" style:font-size-complex="12pt"/>
    </style:style>
    <style:style style:name="P30"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0c507" style:font-size-asian="12pt" style:font-size-complex="12pt"/>
    </style:style>
    <style:style style:name="P31"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0c507" style:font-size-asian="12pt" style:font-size-complex="12pt"/>
    </style:style>
    <style:style style:name="P32"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0c507" style:font-size-asian="12pt" style:font-size-complex="12pt"/>
    </style:style>
    <style:style style:name="P33"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0c507" style:font-size-asian="12pt" style:font-size-complex="12pt"/>
    </style:style>
    <style:style style:name="P34"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0c507" style:font-size-asian="12pt" style:font-size-complex="12pt"/>
    </style:style>
    <style:style style:name="P35"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0c507" style:font-size-asian="12pt" style:font-size-complex="12pt"/>
    </style:style>
    <style:style style:name="P36"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0c507" style:font-size-asian="12pt" style:font-size-complex="12pt"/>
    </style:style>
    <style:style style:name="P37"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0c507" style:font-size-asian="12pt" style:font-size-complex="12pt"/>
    </style:style>
    <style:style style:name="P38"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0c507" style:font-size-asian="12pt" style:font-size-complex="12pt"/>
    </style:style>
    <style:style style:name="P39"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0c507" style:font-size-asian="12pt" style:font-size-complex="12pt"/>
    </style:style>
    <style:style style:name="P40"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0c507" style:font-size-asian="12pt" style:font-size-complex="12pt"/>
    </style:style>
    <style:style style:name="P41"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0c507" style:font-size-asian="12pt" style:font-size-complex="12pt"/>
    </style:style>
    <style:style style:name="P42"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0c507" style:font-size-asian="12pt" style:font-size-complex="12pt"/>
    </style:style>
    <style:style style:name="P43"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0c507" style:font-size-asian="12pt" style:font-size-complex="12pt"/>
    </style:style>
    <style:style style:name="P44"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0c507" style:font-size-asian="12pt" style:font-size-complex="12pt"/>
    </style:style>
    <style:style style:name="P45"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0c507" style:font-size-asian="12pt" style:font-size-complex="12pt"/>
    </style:style>
    <style:style style:name="P46"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0c507" style:font-size-asian="12pt" style:font-size-complex="12pt"/>
    </style:style>
    <style:style style:name="P47" style:family="paragraph" style:parent-style-name="Standard">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style:font-name="Noto Sans1" fo:font-size="12pt" officeooo:paragraph-rsid="0010c507" style:font-size-asian="12pt" style:font-size-complex="12pt"/>
    </style:style>
    <style:style style:name="P48" style:family="paragraph" style:parent-style-name="Standard" style:master-page-name="">
      <loext:graphic-properties draw:fill="none"/>
      <style:paragraph-properties fo:margin-left="0cm" fo:margin-right="0cm" fo:margin-top="0.199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0c507" style:font-size-asian="12pt" style:font-size-complex="12pt"/>
    </style:style>
    <style:style style:name="P49" style:family="paragraph" style:parent-style-name="Standard">
      <style:paragraph-properties fo:margin-top="0.101cm" fo:margin-bottom="0cm" style:contextual-spacing="false" fo:line-height="115%" fo:text-align="justify" style:justify-single-word="false"/>
      <style:text-properties style:font-name="Noto Sans1" fo:font-size="12pt" officeooo:paragraph-rsid="0010c507" style:font-size-asian="12pt" style:font-size-complex="12pt"/>
    </style:style>
    <style:style style:name="P50" style:family="paragraph" style:parent-style-name="Standard">
      <style:paragraph-properties fo:margin-top="0.101cm" fo:margin-bottom="0cm" style:contextual-spacing="false" fo:line-height="115%" fo:text-align="center" style:justify-single-word="false"/>
      <style:text-properties style:font-name="Noto Sans1" fo:font-size="12pt" officeooo:paragraph-rsid="0010c507" style:font-size-asian="12pt" style:font-size-complex="12pt"/>
    </style:style>
    <style:style style:name="P51" style:family="paragraph" style:parent-style-name="Standard">
      <style:paragraph-properties fo:margin-top="0cm" fo:margin-bottom="0cm" style:contextual-spacing="false" fo:line-height="115%" fo:text-align="center" style:justify-single-word="false"/>
      <style:text-properties style:font-name="Noto Sans1" fo:font-size="12pt" fo:font-weight="bold" officeooo:rsid="001b5411" officeooo:paragraph-rsid="0010c507" style:font-size-asian="12pt" style:font-weight-asian="bold" style:font-size-complex="12pt" style:font-weight-complex="bold"/>
    </style:style>
    <style:style style:name="P52" style:family="paragraph" style:parent-style-name="Standard">
      <style:paragraph-properties fo:margin-top="0.101cm" fo:margin-bottom="0cm" style:contextual-spacing="false" fo:line-height="115%" fo:text-align="center" style:justify-single-word="false"/>
      <style:text-properties style:font-name="Noto Sans1" fo:font-size="12pt" fo:font-style="italic" officeooo:paragraph-rsid="0010c507" style:font-size-asian="12pt" style:font-style-asian="italic" style:font-size-complex="12pt" style:font-style-complex="italic"/>
    </style:style>
    <style:style style:name="P53"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499cm" style:auto-text-indent="false" style:page-number="auto" fo:background-color="transparent"/>
      <style:text-properties style:font-name="Noto Sans1" fo:font-size="12pt" fo:font-style="normal" officeooo:rsid="001c02ae" officeooo:paragraph-rsid="0010c507" style:font-size-asian="12pt" style:font-style-asian="normal" style:font-size-complex="12pt" style:font-style-complex="normal"/>
    </style:style>
    <style:style style:name="P54"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0f6323" style:font-size-asian="12pt" style:font-size-complex="12pt"/>
    </style:style>
    <style:style style:name="P55"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officeooo:paragraph-rsid="000f6323" style:font-size-asian="12pt" style:font-size-complex="12pt"/>
    </style:style>
    <style:style style:name="P56" style:family="paragraph" style:parent-style-name="Standard">
      <style:paragraph-properties fo:margin-top="0.101cm" fo:margin-bottom="0cm" style:contextual-spacing="false" fo:line-height="115%" fo:text-align="justify" style:justify-single-word="false"/>
      <style:text-properties style:font-name="Noto Sans1" fo:font-size="12pt" officeooo:paragraph-rsid="000f6323" style:font-size-asian="12pt" style:font-size-complex="12pt"/>
    </style:style>
    <style:style style:name="P57" style:family="paragraph" style:parent-style-name="Standard">
      <style:paragraph-properties fo:line-height="115%" fo:text-align="justify" style:justify-single-word="false"/>
      <style:text-properties style:font-name="Noto Sans1" fo:font-size="12pt" style:font-size-asian="12pt" style:font-size-complex="12pt"/>
    </style:style>
    <style:style style:name="P58" style:family="paragraph" style:parent-style-name="Standard" style:master-page-name="">
      <loext:graphic-properties draw:fill="none"/>
      <style:paragraph-properties fo:margin-left="0cm" fo:margin-right="0cm" fo:margin-top="0.199cm" fo:margin-bottom="0cm" style:contextual-spacing="false" fo:line-height="115%" fo:text-align="justify" style:justify-single-word="false" fo:text-indent="0cm" style:auto-text-indent="false" style:page-number="auto" fo:background-color="transparent"/>
      <style:text-properties style:font-name="Noto Sans1" fo:font-size="12pt" officeooo:rsid="00136491" officeooo:paragraph-rsid="000f6323" style:font-size-asian="12pt" style:font-size-complex="12pt"/>
    </style:style>
    <style:style style:name="P59"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rsid="00136491" officeooo:paragraph-rsid="000f6323" style:font-size-asian="12pt" style:font-size-complex="12pt"/>
    </style:style>
    <style:style style:name="P60" style:family="paragraph" style:parent-style-name="Standard">
      <style:paragraph-properties fo:text-align="justify" style:justify-single-word="false"/>
      <style:text-properties style:font-name="Noto Sans1" fo:font-size="12pt" style:font-size-asian="12pt" style:font-size-complex="12pt"/>
    </style:style>
    <style:style style:name="P61"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weight="normal" officeooo:rsid="001617bc" officeooo:paragraph-rsid="000f6323" style:font-size-asian="12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fo:font-style="italic" officeooo:rsid="00139a99" style:font-style-asian="italic" style:font-style-complex="italic"/>
    </style:style>
    <style:style style:name="T3" style:family="text">
      <style:text-properties fo:font-style="italic" officeooo:rsid="0036f345" style:font-style-asian="italic" style:font-style-complex="italic"/>
    </style:style>
    <style:style style:name="T4" style:family="text">
      <style:text-properties fo:font-style="italic" officeooo:rsid="00145787" style:font-style-asian="italic" style:font-style-complex="italic"/>
    </style:style>
    <style:style style:name="T5" style:family="text">
      <style:text-properties fo:font-style="italic" officeooo:rsid="01be6cbb" style:font-style-asian="italic" style:font-style-complex="italic"/>
    </style:style>
    <style:style style:name="T6" style:family="text">
      <style:text-properties fo:font-style="italic" officeooo:rsid="00219981"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1c02ae" style:font-style-asian="italic" style:font-weight-asian="normal" style:font-style-complex="italic" style:font-weight-complex="normal"/>
    </style:style>
    <style:style style:name="T9" style:family="text">
      <style:text-properties fo:font-style="italic" fo:font-weight="normal" officeooo:rsid="001617bc" style:font-style-asian="italic" style:font-weight-asian="normal" style:font-style-complex="italic" style:font-weight-complex="normal"/>
    </style:style>
    <style:style style:name="T10" style:family="text">
      <style:text-properties fo:font-style="italic" fo:font-weight="normal" officeooo:rsid="0017c97a" style:font-style-asian="italic" style:font-weight-asian="normal" style:font-style-complex="italic" style:font-weight-complex="normal"/>
    </style:style>
    <style:style style:name="T11" style:family="text">
      <style:text-properties fo:font-style="italic" fo:font-weight="normal" officeooo:rsid="002ee1f1" style:font-style-asian="italic" style:font-weight-asian="normal" style:font-style-complex="italic" style:font-weight-complex="normal"/>
    </style:style>
    <style:style style:name="T12" style:family="text">
      <style:text-properties fo:font-size="12pt" fo:font-style="italic" fo:font-weight="normal" officeooo:rsid="001617bc" style:font-size-asian="12pt" style:font-style-asian="italic" style:font-weight-asian="normal" style:font-size-complex="12pt" style:font-style-complex="italic" style:font-weight-complex="normal"/>
    </style:style>
    <style:style style:name="T13" style:family="text">
      <style:text-properties fo:font-size="12pt" fo:font-style="italic" fo:font-weight="normal" officeooo:rsid="002ee1f1" style:font-size-asian="12pt" style:font-style-asian="italic" style:font-weight-asian="normal" style:font-size-complex="12pt" style:font-style-complex="italic" style:font-weight-complex="normal"/>
    </style:style>
    <style:style style:name="T14" style:family="text">
      <style:text-properties fo:font-size="12pt" fo:font-style="italic" style:font-size-asian="12pt" style:font-style-asian="italic" style:font-size-complex="12pt" style:font-style-complex="italic"/>
    </style:style>
    <style:style style:name="T15" style:family="text">
      <style:text-properties fo:font-size="12pt" fo:font-style="normal" fo:font-weight="normal" officeooo:rsid="01d0615c" style:font-size-asian="12pt" style:font-style-asian="normal" style:font-weight-asian="normal" style:font-size-complex="12pt" style:font-style-complex="normal" style:font-weight-complex="normal"/>
    </style:style>
    <style:style style:name="T16" style:family="text">
      <style:text-properties fo:font-size="12pt" fo:font-style="normal" fo:font-weight="normal" officeooo:rsid="001c02ae" style:font-size-asian="12pt" style:font-style-asian="normal" style:font-weight-asian="normal" style:font-size-complex="12pt" style:font-style-complex="normal" style:font-weight-complex="normal"/>
    </style:style>
    <style:style style:name="T17" style:family="text">
      <style:text-properties fo:font-size="12pt" style:font-size-asian="12pt" style:font-size-complex="12pt"/>
    </style:style>
    <style:style style:name="T18" style:family="text">
      <style:text-properties fo:font-size="12pt" officeooo:rsid="00136491" style:font-size-asian="12pt" style:font-size-complex="12pt"/>
    </style:style>
    <style:style style:name="T19" style:family="text">
      <style:text-properties fo:font-size="12pt" officeooo:rsid="00db80f1" style:font-size-asian="12pt" style:font-size-complex="12pt"/>
    </style:style>
    <style:style style:name="T20" style:family="text">
      <style:text-properties fo:font-size="12pt" officeooo:rsid="002bb611" style:font-size-asian="12pt" style:font-size-complex="12pt"/>
    </style:style>
    <style:style style:name="T21" style:family="text">
      <style:text-properties fo:font-size="12pt" officeooo:rsid="00dc5b42" style:font-size-asian="12pt" style:font-size-complex="12pt"/>
    </style:style>
    <style:style style:name="T22" style:family="text">
      <style:text-properties fo:font-size="12pt" officeooo:rsid="0013e158" style:font-size-asian="12pt" style:font-size-complex="12pt"/>
    </style:style>
    <style:style style:name="T23" style:family="text">
      <style:text-properties fo:font-size="12pt" officeooo:rsid="0030bfb7" style:font-size-asian="12pt" style:font-size-complex="12pt"/>
    </style:style>
    <style:style style:name="T24" style:family="text">
      <style:text-properties fo:font-size="12pt" fo:font-weight="normal" officeooo:rsid="001617bc" style:font-size-asian="12pt" style:font-weight-asian="normal" style:font-size-complex="12pt" style:font-weight-complex="normal"/>
    </style:style>
    <style:style style:name="T25" style:family="text">
      <style:text-properties fo:font-size="12pt" fo:font-weight="normal" officeooo:rsid="002ee1f1" style:font-size-asian="12pt" style:font-weight-asian="normal" style:font-size-complex="12pt" style:font-weight-complex="normal"/>
    </style:style>
    <style:style style:name="T26" style:family="text">
      <style:text-properties fo:font-size="12pt" fo:font-weight="normal" officeooo:rsid="001b5411" style:font-size-asian="12pt" style:font-weight-asian="normal" style:font-size-complex="12pt" style:font-weight-complex="normal"/>
    </style:style>
    <style:style style:name="T27" style:family="text">
      <style:text-properties style:font-name="Noto Sans1"/>
    </style:style>
    <style:style style:name="T28" style:family="text">
      <style:text-properties style:font-name="Noto Sans1" fo:font-size="12pt" fo:font-style="normal" fo:font-weight="normal" officeooo:rsid="01d0615c" style:font-size-asian="12pt" style:font-style-asian="normal" style:font-weight-asian="normal" style:font-size-complex="12pt" style:font-style-complex="normal" style:font-weight-complex="normal"/>
    </style:style>
    <style:style style:name="T29" style:family="text">
      <style:text-properties style:font-name="Noto Sans1" fo:font-size="12pt" fo:font-style="normal" fo:font-weight="normal" officeooo:rsid="001c02ae" style:font-size-asian="12pt" style:font-style-asian="normal" style:font-weight-asian="normal" style:font-size-complex="12pt" style:font-style-complex="normal" style:font-weight-complex="normal"/>
    </style:style>
    <style:style style:name="T30" style:family="text">
      <style:text-properties style:font-name="Noto Sans1" officeooo:rsid="00d44442"/>
    </style:style>
    <style:style style:name="T31" style:family="text">
      <style:text-properties style:font-name="Noto Sans1" officeooo:rsid="022a9003"/>
    </style:style>
    <style:style style:name="T32" style:family="text">
      <style:text-properties style:font-name="Noto Sans1" officeooo:rsid="0029e37e"/>
    </style:style>
    <style:style style:name="T33" style:family="text">
      <style:text-properties style:font-name="Noto Sans1" fo:font-style="italic" style:text-underline-style="none" officeooo:rsid="0029e37e" style:font-style-asian="italic" style:font-style-complex="italic"/>
    </style:style>
    <style:style style:name="T34" style:family="text">
      <style:text-properties style:font-name="Noto Sans1" fo:font-style="italic" style:font-style-asian="italic" style:font-style-complex="italic"/>
    </style:style>
    <style:style style:name="T35" style:family="text">
      <style:text-properties style:font-name="Noto Sans1" fo:font-style="italic" officeooo:rsid="0029e37e" style:font-style-asian="italic" style:font-style-complex="italic"/>
    </style:style>
    <style:style style:name="T36" style:family="text">
      <style:text-properties style:font-name="Noto Sans1" fo:font-style="italic" fo:font-weight="normal" officeooo:rsid="00d44442" style:font-style-asian="italic" style:font-weight-asian="normal" style:font-style-complex="italic" style:font-weight-complex="normal"/>
    </style:style>
    <style:style style:name="T37" style:family="text">
      <style:text-properties fo:font-style="normal" style:font-style-asian="normal" style:font-style-complex="normal"/>
    </style:style>
    <style:style style:name="T38" style:family="text">
      <style:text-properties fo:font-style="normal" officeooo:rsid="0027935f" style:font-style-asian="normal" style:font-style-complex="normal"/>
    </style:style>
    <style:style style:name="T39" style:family="text">
      <style:text-properties fo:font-style="normal" officeooo:rsid="00294116" style:font-style-asian="normal" style:font-style-complex="normal"/>
    </style:style>
    <style:style style:name="T40" style:family="text">
      <style:text-properties fo:font-style="normal" officeooo:rsid="0025f7dd" style:font-style-asian="normal" style:font-style-complex="normal"/>
    </style:style>
    <style:style style:name="T41" style:family="text">
      <style:text-properties fo:font-style="normal" style:font-size-asian="12pt"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d44442" style:font-style-asian="normal" style:font-weight-asian="normal" style:font-style-complex="normal" style:font-weight-complex="normal"/>
    </style:style>
    <style:style style:name="T44" style:family="text">
      <style:text-properties fo:font-style="normal" fo:font-weight="normal" officeooo:rsid="00294116" style:font-style-asian="normal" style:font-weight-asian="normal" style:font-style-complex="normal" style:font-weight-complex="normal"/>
    </style:style>
    <style:style style:name="T45" style:family="text">
      <style:text-properties fo:font-style="normal" fo:font-weight="normal" officeooo:rsid="001c02ae" style:font-style-asian="normal" style:font-weight-asian="normal" style:font-style-complex="normal" style:font-weight-complex="normal"/>
    </style:style>
    <style:style style:name="T46" style:family="text">
      <style:text-properties fo:font-style="normal" fo:font-weight="normal" officeooo:rsid="0029e37e" style:font-style-asian="normal" style:font-weight-asian="normal" style:font-style-complex="normal" style:font-weight-complex="normal"/>
    </style:style>
    <style:style style:name="T47" style:family="text">
      <style:text-properties fo:font-style="normal" fo:font-weight="normal" officeooo:rsid="0036f345" style:font-style-asian="normal" style:font-weight-asian="normal" style:font-style-complex="normal" style:font-weight-complex="normal"/>
    </style:style>
    <style:style style:name="T48" style:family="text">
      <style:text-properties fo:font-style="normal" fo:font-weight="normal" officeooo:rsid="0040f61e" style:font-style-asian="normal" style:font-weight-asian="normal" style:font-style-complex="normal" style:font-weight-complex="normal"/>
    </style:style>
    <style:style style:name="T49" style:family="text">
      <style:text-properties fo:font-style="normal" fo:font-weight="normal" officeooo:rsid="00e29ca3" style:font-style-asian="normal" style:font-weight-asian="normal" style:font-style-complex="normal" style:font-weight-complex="normal"/>
    </style:style>
    <style:style style:name="T50" style:family="text">
      <style:text-properties fo:font-style="normal" fo:font-weight="normal" officeooo:rsid="00145787" style:font-style-asian="normal" style:font-weight-asian="normal" style:font-style-complex="normal" style:font-weight-complex="normal"/>
    </style:style>
    <style:style style:name="T51" style:family="text">
      <style:text-properties fo:font-style="normal" fo:font-weight="normal" officeooo:rsid="001617bc" style:font-style-asian="normal" style:font-weight-asian="normal" style:font-style-complex="normal" style:font-weight-complex="normal"/>
    </style:style>
    <style:style style:name="T52" style:family="text">
      <style:text-properties fo:font-style="normal" fo:font-weight="normal" officeooo:rsid="002bb611" style:font-style-asian="normal" style:font-weight-asian="normal" style:font-style-complex="normal" style:font-weight-complex="normal"/>
    </style:style>
    <style:style style:name="T53" style:family="text">
      <style:text-properties fo:font-style="normal" fo:font-weight="normal" officeooo:rsid="0017c97a" style:font-style-asian="normal" style:font-weight-asian="normal" style:font-style-complex="normal" style:font-weight-complex="normal"/>
    </style:style>
    <style:style style:name="T54" style:family="text">
      <style:text-properties fo:font-style="normal" fo:font-weight="normal" officeooo:rsid="01d0615c" style:font-style-asian="normal" style:font-weight-asian="normal" style:font-style-complex="normal" style:font-weight-complex="normal"/>
    </style:style>
    <style:style style:name="T55" style:family="text">
      <style:text-properties fo:font-style="normal" fo:font-weight="normal" officeooo:rsid="0021b0eb" style:font-style-asian="normal" style:font-weight-asian="normal" style:font-style-complex="normal" style:font-weight-complex="normal"/>
    </style:style>
    <style:style style:name="T56" style:family="text">
      <style:text-properties fo:font-style="normal" fo:font-weight="bold" officeooo:rsid="001c02ae" style:font-style-asian="normal" style:font-weight-asian="bold" style:font-style-complex="normal" style:font-weight-complex="bold"/>
    </style:style>
    <style:style style:name="T57" style:family="text">
      <style:text-properties fo:font-style="normal" fo:font-weight="bold" officeooo:rsid="0029e37e" style:font-style-asian="normal" style:font-weight-asian="bold" style:font-style-complex="normal" style:font-weight-complex="bold"/>
    </style:style>
    <style:style style:name="T58" style:family="text">
      <style:text-properties fo:font-weight="normal" officeooo:rsid="001c02ae" style:font-weight-asian="normal" style:font-weight-complex="normal"/>
    </style:style>
    <style:style style:name="T59" style:family="text">
      <style:text-properties fo:font-weight="normal" officeooo:rsid="028ba1d6" style:font-weight-asian="normal" style:font-weight-complex="normal"/>
    </style:style>
    <style:style style:name="T60" style:family="text">
      <style:text-properties fo:font-weight="normal" officeooo:rsid="001617bc" style:font-weight-asian="normal" style:font-weight-complex="normal"/>
    </style:style>
    <style:style style:name="T61" style:family="text">
      <style:text-properties fo:font-weight="normal" officeooo:rsid="002ee1f1" style:font-weight-asian="normal" style:font-weight-complex="normal"/>
    </style:style>
    <style:style style:name="T62" style:family="text">
      <style:text-properties fo:font-weight="normal" officeooo:rsid="0030bfb7" style:font-weight-asian="normal" style:font-weight-complex="normal"/>
    </style:style>
    <style:style style:name="T63" style:family="text">
      <style:text-properties fo:font-weight="normal" officeooo:rsid="0029e37e" style:font-weight-asian="normal" style:font-weight-complex="normal"/>
    </style:style>
    <style:style style:name="T64" style:family="text">
      <style:text-properties fo:font-weight="normal" officeooo:rsid="002bb611" style:font-weight-asian="normal" style:font-weight-complex="normal"/>
    </style:style>
    <style:style style:name="T65" style:family="text">
      <style:text-properties fo:font-weight="normal" officeooo:rsid="00dd9e6e" style:font-weight-asian="normal" style:font-weight-complex="normal"/>
    </style:style>
    <style:style style:name="T66" style:family="text">
      <style:text-properties fo:font-weight="normal" officeooo:rsid="0017c97a" style:font-weight-asian="normal" style:font-weight-complex="normal"/>
    </style:style>
    <style:style style:name="T67" style:family="text">
      <style:text-properties fo:font-weight="normal" officeooo:rsid="01cf55d6" style:font-weight-asian="normal" style:font-weight-complex="normal"/>
    </style:style>
    <style:style style:name="T68" style:family="text">
      <style:text-properties fo:font-size="11pt" fo:font-weight="bold" style:font-size-asian="11pt" style:font-weight-asian="bold" style:font-size-complex="11pt" style:font-weight-complex="bold"/>
    </style:style>
    <style:style style:name="T69" style:family="text">
      <style:text-properties fo:font-size="11pt" fo:font-weight="bold" officeooo:rsid="0020b17c" style:font-size-asian="11pt" style:font-weight-asian="bold" style:font-size-complex="11pt" style:font-weight-complex="bold"/>
    </style:style>
    <style:style style:name="T70" style:family="text">
      <style:text-properties officeooo:rsid="00cdc78f"/>
    </style:style>
    <style:style style:name="T71" style:family="text">
      <style:text-properties officeooo:rsid="003afd6a"/>
    </style:style>
    <style:style style:name="T72" style:family="text">
      <style:text-properties officeooo:rsid="00ccda81"/>
    </style:style>
    <style:style style:name="T73" style:family="text">
      <style:text-properties officeooo:rsid="00d2142f"/>
    </style:style>
    <style:style style:name="T74" style:family="text">
      <style:text-properties officeooo:rsid="01274ef5" style:font-size-asian="12pt"/>
    </style:style>
    <style:style style:name="T75" style:family="text">
      <style:text-properties officeooo:rsid="012e50a3"/>
    </style:style>
    <style:style style:name="T76" style:family="text">
      <style:text-properties officeooo:rsid="02288e9b"/>
    </style:style>
    <style:style style:name="T77" style:family="text">
      <style:text-properties officeooo:rsid="0128a155"/>
    </style:style>
    <style:style style:name="T78" style:family="text">
      <style:text-properties officeooo:rsid="0027935f"/>
    </style:style>
    <style:style style:name="T79" style:family="text">
      <style:text-properties officeooo:rsid="0020b17c"/>
    </style:style>
    <style:style style:name="T80" style:family="text">
      <style:text-properties officeooo:rsid="00d223de"/>
    </style:style>
    <style:style style:name="T81" style:family="text">
      <style:text-properties officeooo:rsid="022a836c"/>
    </style:style>
    <style:style style:name="T82" style:family="text">
      <style:text-properties officeooo:rsid="001f97de"/>
    </style:style>
    <style:style style:name="T83" style:family="text">
      <style:text-properties officeooo:rsid="0036f345"/>
    </style:style>
    <style:style style:name="T84" style:family="text">
      <style:text-properties officeooo:rsid="00124bba"/>
    </style:style>
    <style:style style:name="T85" style:family="text">
      <style:text-properties officeooo:rsid="00294116"/>
    </style:style>
    <style:style style:name="T86" style:family="text">
      <style:text-properties officeooo:rsid="00d36474"/>
    </style:style>
    <style:style style:name="T87" style:family="text">
      <style:text-properties officeooo:rsid="00139a99"/>
    </style:style>
    <style:style style:name="T88" style:family="text">
      <style:text-properties officeooo:rsid="0029e37e"/>
    </style:style>
    <style:style style:name="T89" style:family="text">
      <style:text-properties officeooo:rsid="00d44442"/>
    </style:style>
    <style:style style:name="T90" style:family="text">
      <style:text-properties officeooo:rsid="00145787"/>
    </style:style>
    <style:style style:name="T91" style:family="text">
      <style:text-properties officeooo:rsid="00d4fbd8"/>
    </style:style>
    <style:style style:name="T92" style:family="text">
      <style:text-properties officeooo:rsid="0040f61e"/>
    </style:style>
    <style:style style:name="T93" style:family="text">
      <style:text-properties officeooo:rsid="0015111c"/>
    </style:style>
    <style:style style:name="T94" style:family="text">
      <style:text-properties officeooo:rsid="002ee1f1"/>
    </style:style>
    <style:style style:name="T95" style:family="text">
      <style:text-properties officeooo:rsid="002bb611"/>
    </style:style>
    <style:style style:name="T96" style:family="text">
      <style:text-properties officeooo:rsid="00db80f1"/>
    </style:style>
    <style:style style:name="T97" style:family="text">
      <style:text-properties officeooo:rsid="00dc5b42"/>
    </style:style>
    <style:style style:name="T98" style:family="text">
      <style:text-properties officeooo:rsid="0013e158"/>
    </style:style>
    <style:style style:name="T99" style:family="text">
      <style:text-properties officeooo:rsid="00136491"/>
    </style:style>
    <style:style style:name="T100" style:family="text">
      <style:text-properties officeooo:rsid="0030bfb7"/>
    </style:style>
    <style:style style:name="T101" style:family="text">
      <style:text-properties officeooo:rsid="0059bde2"/>
    </style:style>
    <style:style style:name="T102" style:family="text">
      <style:text-properties officeooo:rsid="0019b8cc"/>
    </style:style>
    <style:style style:name="T103" style:family="text">
      <style:text-properties officeooo:rsid="01cf884b"/>
    </style:style>
    <style:style style:name="T104" style:family="text">
      <style:text-properties fo:language="it" fo:country="IT"/>
    </style:style>
    <style:style style:name="T105" style:family="text">
      <style:text-properties officeooo:rsid="001b5411"/>
    </style:style>
    <style:style style:name="T106" style:family="text">
      <style:text-properties officeooo:rsid="00161fce"/>
    </style:style>
    <style:style style:name="T107" style:family="text">
      <style:text-properties officeooo:rsid="001f4b8f"/>
    </style:style>
    <style:style style:name="T108" style:family="text">
      <style:text-properties officeooo:rsid="002199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SENECA, Lettere a Lucilio, I secolo d.C.</text:p>
      <text:h text:style-name="P23" text:outline-level="2"><text:bookmark-start text:name="__RefHeading___Toc18146_3602757520"/>Il tempo e la brevità della vita<text:bookmark-end text:name="__RefHeading___Toc18146_3602757520"/></text:h>
      <text:p text:style-name="P26">Seneca ci ricorda che il tempo è la nostra risorsa più preziosa. La vita è breve e, troppo spesso, lo realizziamo troppo tardi. È fondamentale sfruttare ogni momento e vivere con consapevolezza.</text:p>
      <text:h text:style-name="P25" text:outline-level="3"><text:bookmark-start text:name="__RefHeading___Toc18148_3602757520"/><text:span text:style-name="T26">Lettera 1</text:span><text:span text:style-name="T105"> - </text:span>Seneca Lucilio suo salutem<text:bookmark-end text:name="__RefHeading___Toc18148_3602757520"/></text:h>
      <text:p text:style-name="P29">Fa' così, caro Lucilio: renditi veramente padrone di te e custodisci con ogni cura quel tempo che finora ti era portato via, o ti sfuggiva. Persuaditi che le cose stanno come io ti scrivo: alcune ore ci vengono sottratte da vane occupazioni, altre ci scappano quasi di mano; ma la perdita per noi più vergognosa è quella che avviene per nostra negligenza.</text:p>
      <text:p text:style-name="P47">Se badi bene, una gran parte della vita ci sfugge nel fare il male, la maggior parte nel non fare nulla, tutta quanta nel fare altro da quello che dovremmo. Puoi indicarmi qualcuno che dia un giusto valore al suo tempo e alla sua giornata, e che si renda <text:span text:style-name="T106">c</text:span>onto com<text:span text:style-name="T105">e </text:span>egli muoia giorno per giorno? In questo c'inganniamo, nel vedere la morte avanti a noi, come un avvenimento futuro, mentre gran parte di essa è già alle nostre spalle. Ogni ora del"nostro passato appartiene al dominio della morte. Dunque, caro Lucilio, fa' ciò che mi scrivi; fa' tesoro di tutto il tempo che hai.</text:p>
      <text:p text:style-name="P28"><text:soft-page-break/>Sarai meno schiavo del domani, se ti sarai reso padrone dell'oggi. Mentre rinviamo i nostri impegni, la vita passa. Tutto, o Lucilio, dipende dagli altri; solo il tempo è nostro. Abbiamo avuto dalla natura il possesso di questo solo bene sommamente fuggevole, ma ce lo lasciamo togliere dal primo venuto. E l'uomo è tanto stolto che, quando acquista beni di nessun valore, e in ogni caso compensabili, accetta che gli vengano messi in conto; ma nessuno, che abbia cagionato perdita di tempo agli altri, pensa di essere debitore di qualcosa, mentre è questo l'unico bene che l'uomo non può restituire, neppure con tutta la sua buona volontà.</text:p>
      <text:p text:style-name="P28">Mi domanderai forse come mi comporti io che ti dò questi consigli. Te lo dirò francamente: il mio caso è quello di un uomo che spende con liberalità, ma tiene in ordine la sua amministrazione; anch'io tengo i conti esatti della spesa. Non posso dire che nulla vada perduto, ma sono in grado di dire quanto tempo perdo, perché e come lo perdo; posso cioè spiegare i motivi della mia povertà. Capita anche a me, come alla maggior parte della gente caduta in miseria senza sua colpa: tutti sono disposti a scusare, ma nessuno viene in aiuto. E che dunque? Per me non è povero del tutto colui che, per quanto poco gli resti, se lo fa bastare. Ma tu, fin d'ora, serba gelosamente tutto quello che possiedi; e avrai cominciato a buon punto, poiché ci ammoniscono i nostri vecchi «<text:span text:style-name="T1">è troppo tardi per risparmiare il vino, quando si è </text:span><text:soft-page-break/><text:span text:style-name="T1">giunti alla feccia</text:span>». Nel fondo del vaso resta non solo la parte più scarsa,ma anche la peggiore. Addio.</text:p>
      <text:h text:style-name="P25" text:outline-level="3"><text:bookmark-start text:name="__RefHeading___Toc18150_3602757520"/>Lettera 49<text:bookmark-end text:name="__RefHeading___Toc18150_3602757520"/></text:h>
      <text:p text:style-name="P29">Mio caro, è davvero una persona apatica e trascurata chi si ricorda di un amico quando glielo richiama alla mente la vista di un qualche luogo; certe volte, però posti familiari evocano in noi una nostalgia che era latente dentro di noi; non è che riaccendano un ricordo ormai spento, ma lo scuotono dal torpore; allo stesso modo che uno schiavo caro alla persona scomparsa, o un suo vestito, o la casa, riacutizzano il dolore di chi piange, anche se ormai è stato mitigato dal tempo.</text:p>
      <text:p text:style-name="P29">Ecco, è incredibile come la Campania, e soprattutto Napoli, e la vista della tua Pompei abbiano reso cocente la nostalgia di te: ti ho tutto davanti agli occhi. È il momento del distacco: ti vedo mentre inghiotti le lacrime e non riesci a resistere al dirompere dell'affetto nonostante cerchi di frenarti.</text:p>
      <text:p text:style-name="P29">Mi sembra di averti lasciato poco fa; che cosa non è accaduto "poco fa" se lo si rivive nella memoria? Poco fa sedevo fanciullo alla scuola del filosofo Sozione<text:note text:id="ftn16" text:note-class="footnote"><text:note-citation>1</text:note-citation><text:note-body><text:p text:style-name="P20">Filosofo pitagorico, appartenente alla scuola dei Sextii, e accolse anche motivi etici di derivazione stoica. Visse a Roma all'epoca di Augusto e di Tiberio e fu tra i maestri di Seneca; viene da questi citato, a proposito del vegetarianismo di ispirazione pitagorica.</text:p></text:note-body></text:note>, poco fa cominciavo a discutere le cause, poco fa decidevo di non discuterle più, poco fa cominciavo a non poterlo più fare.</text:p>
      <text:p text:style-name="P29"><text:soft-page-break/>Il tempo scorre velocissimo e ce ne accorgiamo soprattutto quando guardiamo indietro: mentre siamo intenti al presente, passa inosservato, tanto vola via leggero nella sua fuga precipitosa. Ne chiedi il motivo?</text:p>
      <text:p text:style-name="P28">Tutto il tempo trascorso si trova in uno stesso luogo; lo vediamo simultaneamente, sta tutto insieme; ogni cosa precipita nello stesso baratro. E, del resto, non possono esserci lunghi intervalli in una cosa che nel complesso è breve. La nostra vita è un attimo, anzi, meno di un attimo; ma la natura ci ha schernito dando un'apparenza di durata a questo spazio di tempo minimo: di una parte ne ha fatto l'infanzia, di un'altra la fanciullezza, poi l'adolescenza, il declino dall'adolescenza alla vecchiaia e la vecchiaia stessa. Quanti gradini ha collocato in una scala così corta!</text:p>
      <text:p text:style-name="P29">Poco fa ti ho salutato; e tuttavia questo "poco fa" è una buona parte della nostra esistenza, e la sua breve durata, pensiamoci, un giorno finirà. Non mi sembrava in passato che il tempo scorresse tanto veloce; ora la sua celerità mi appare incredibile, sia perché sento che si avvicina la meta, sia perché ho cominciato a osservare e a fare il conto delle mie perdite.</text:p>
      <text:p text:style-name="P29">Perciò mi sdegno tanto più con coloro che spendono in occupazioni inutili la maggior parte di questo tempo insufficiente già per le attività necessarie, anche se vi si bada con la massima cura. Cicerone afferma che se pure <text:soft-page-break/>gli venisse raddoppiata la vita, non avrebbe il tempo di leggere i lirici; nello stesso conto tengo i dialettici: ma essi sono più tristemente inutili. Quelli vaneggiano e lo riconoscono, questi ritengono di fare qualcosa di buono.</text:p>
      <text:p text:style-name="P29">Non dico che non si debba dare un'occhiata a queste futilità, ma solo un'occhiata e un saluto dalla soglia, badando che non ci raggirino e ci facciano credere che in esse ci sia un grande bene nascosto.</text:p>
      <text:p text:style-name="P29">Perché ti tormenti e ti maceri su un problema che è cosa più intelligente disprezzare che risolvere? Se uno si sposta tranquillo e con tutta calma, può anche raccogliere le cose di poco conto: ma quando il nemico incalza alle spalle e il soldato ha ricevuto l'ordine di muoversi, bisogna gettar via quanto si è accumulato nella quiete della pace. Non ho tempo di seguire le loro frasi ambigue e di mettervi alla prova il mio acume.</text:p>
      <text:p text:style-name="P28">“<text:span text:style-name="T1">Guarda quali popoli si radunano, quali città, chiuse le porte, affilano le armi</text:span>”.</text:p>
      <text:p text:style-name="P29">Devo ascoltare con grande coraggio questo strepito di guerra che risuona intorno a me. Giustamente sembrerei a tutti un pazzo se, mentre le donne e i vecchi ammassano pietre per fortificare le mura, mentre i giovani in armi aspettano o chiedono vicino alle porte il segnale della sortita, mentre i giavellotti nemici vibrano conficcandosi nelle porte e il suolo stesso trema per le trincee e le gallerie, sedessi in ozio ponendomi sciocche <text:soft-page-break/>questioni di questo tipo: "<text:span text:style-name="T1">Hai quello che non hai perduto; non hai perduto le corna, quindi hai le corna</text:span>" e altre, formate sull'esempio di questo acuto delirio.</text:p>
      <text:p text:style-name="P29">Ebbene, ugualmente potrei sembrarti un pazzo se adesso impiegassi le mie energie in codeste questioni: anche ora sono assediato. Tuttavia nell'assedio di una città mi sovrasterebbe un pericolo esterno, un muro mi separerebbe dal nemico: ora, invece, i pericoli mortali sono dentro di me. Non ho tempo per queste sciocchezze; ho tra le mani una faccenda importante.</text:p>
      <text:p text:style-name="P29">Che devo fare? La morte mi incalza, la vita fugge. Insegnami come affrontare questa situazione; fa' che io non fugga la morte, che la vita non fugga me. Incoraggiami contro le difficoltà, contro i mali inevitabili; prolunga il poco tempo che ho. Insegnami che il valore della vita non consiste nella sua durata, ma nell'uso che se ne fa; che può accadere, anzi accade spessissimo, che chi è vissuto a lungo è vissuto poco.</text:p>
      <text:p text:style-name="P29">Dimmi, quando sto per addormentarmi: "Potresti non svegliarti più"; e quando mi sono svegliato: "Potresti non addormentarti più". Dimmi quando esco: "Può accadere che tu non torni"; e quando ritorno: "Può accadere che tu non esca più."</text:p>
      <text:p text:style-name="P29">Sbagli a ritenere che soltanto in mare è minima la distanza che separa la vita dalla morte: è ugualmente breve in ogni posto. La morte non si mostra dovunque <text:soft-page-break/>tanto vicina: ma dovunque è tanto vicina. Dissipa queste tenebre e più facilmente mi darai quegli insegnamenti cui sono preparato.</text:p>
      <text:p text:style-name="P29">La natura ci ha creato duttili e ci ha dato una ragione imperfetta, ma suscettibile di perfezionamento. Discuti con me della giustizia, della pietà, della sobrietà, delle due forme di pudore, sia di quello che non viola il corpo altrui, sia di quello che ha riguardo del proprio corpo. Se non mi condurrai fuori strada arriverò più facilmente alla meta cui tendo; come dice quel famoso tragediografo: "<text:span text:style-name="T1">La verità si esprime con parole semplici</text:span>"; perciò non bisogna ingarbugliarla; a un animo che abbia grandi aspirazioni niente si addice meno di questa subdola acutezza di ingegno. Stammi bene.</text:p>
      <text:h text:style-name="P24" text:outline-level="3"><text:bookmark-start text:name="__RefHeading___Toc18152_3602757520"/><text:span text:style-name="T105">Lettera </text:span><text:span text:style-name="T107">101</text:span><text:bookmark-end text:name="__RefHeading___Toc18152_3602757520"/></text:h>
      <text:p text:style-name="P48">Ogni giorno, ogni ora ci mostra che siamo un nulla e con qualche nuovo argomento, ricorda a noi dimentichi la nostra caducità, e mentre concepiamo progetti come se fossimo eterni ci costringe a guardare alla morte. Chiedi che cosa significhi questa premessa?</text:p>
      <text:p text:style-name="P28">Tu conosci Cornelio Senecione, cavaliere romano illustre e cortese: da un'umile origine era arrivato in alto, destinato a ulteriori e facili successi. L'inizio di una carriera è più difficile che il suo sviluppo. Anche il denaro tarda molto ad arrivare, se uno è povero: alla povertà si rimane attaccati, finché non si riesce a tirarsene fuori.</text:p>
      <text:p text:style-name="P28"><text:soft-page-break/>Senecione ormai mirava ad arricchirsi e a questo lo portavano due qualità validissime: la capacità di procurarsi il denaro e quella di conservarlo; sarebbe bastata una sola delle due a renderlo ricco. Quest'uomo molto frugale, che aveva cura tanto del patrimonio quanto del suo corpo, mi aveva fatto visita al mattino, come d'abitudine, e aveva poi assistito per l'intera giornata, fino a notte, un amico gravemente malato che giaceva a letto senza speranza di guarigione; dopo aver cenato allegramente, colpito da un male fulminante, l'angina, a stento sopravvisse fino all'alba rantolando con le vie respiratorie bloccate. È morto, dunque, pochissime ore dopo aver svolto tutte le attività proprie di un individuo sano e in forze.</text:p>
      <text:p text:style-name="P29">Quell'uomo, che faceva girare il denaro per terra e per mare, che aveva partecipato anche a pubblici appalti e non aveva tralasciato nessun tipo di guadagno, proprio quando le cose si mettevano bene, proprio quando il denaro arrivava in abbondanza, è scomparso.</text:p>
      <text:p text:style-name="P52">Innesta ora i peri, Melibeo, disponi le viti in filari.</text:p>
      <text:p text:style-name="P29">Come è insensato disporre della propria vita, se non siamo padroni neppure del domani! Come sono pazzi quelli che danno il via a progetti lontani nell'avvenire: comprerò, costruirò, darò denaro in prestito, ne riscuoterò, ricoprirò cariche, e alla fine passerò in ozio, stanco e soddisfatto, la vecchiaia. Credimi: tutto è <text:soft-page-break/>incerto, anche per gli uomini fortunati; nessuno deve ripromettersi niente per il futuro; anche quello che abbiamo fra le mani ci sfugge e il caso tronca l'ora stessa che stringiamo.</text:p>
      <text:p text:style-name="P28">Il tempo passa secondo una legge determinata, ma a noi sconosciuta: e che mi importa se per la natura è certo quello che per me è incerto? Ci proponiamo lunghi viaggi per mare e un ritorno in patria lontano nel tempo, dopo aver vagato per lidi stranieri; imprese militari e tardive ricompense di fatiche guerresche, amministrazioni di province e avanzamenti di carriera, di carica in carica, mentre la morte ci sta accanto; e poiché non ci pensiamo mai, se non quando tocca agli altri, di tanto in tanto ci vengono messi davanti esempi della nostra mortalità, che, però, durano in noi solo quanto il nostro stupore.</text:p>
      <text:p text:style-name="P28">Ma niente è più sciocco che stupirsi che accada un giorno quanto può accadere ogni giorno. Il termine della nostra vita sta dove l'ha fissato l'inesorabile ineluttabilità del destino; ma nessuno di noi sa quanto si trovi vicino alla fine; disponiamo, perciò la nostra anima come se fossimo arrivati al momento estremo. Non rinviamo niente; chiudiamo ogni giorno il bilancio con la vita. Il difetto maggiore dell'esistenza è di essere sempre incompiuta e che sempre se ne rimanda una parte.</text:p>
      <text:p text:style-name="P28">Chi dà ogni giorno l'ultima mano alla sua vita, non ha bisogno di tempo; da questo bisogno nascono la paura e <text:soft-page-break/>la brama del futuro che rode l'anima. Non c'è niente di più triste che chiedersi quale esito avranno gli eventi futuri; se uno si preoccupa di quanto gli resta da vivere o di come, è agitato da una paura inguaribile. Come sfuggire a questa inquietudine? In un solo modo: la nostra vita non deve protendersi all'avvenire, deve raccogliersi in se stessa; chi non è in grado di vivere il presente, è in balia del futuro.</text:p>
      <text:p text:style-name="P28">Ma quando ho pagato il debito che avevo con me stesso, quando ho ben chiaro in testa che non c'è differenza tra un giorno e un secolo, posso guardare con distacco il susseguirsi dei giorni e degli eventi futuri e pensare sorridendo al succedersi degli anni. Se uno è saldo di fronte all'incerto, non può turbarlo la varietà e l'incostanza dei casi della vita.</text:p>
      <text:p text:style-name="P28">Affrettati, perciò a vivere, Lucilio mio, e i singoli giorni siano per te una vita. Chi si forma così e ogni giorno vive compiutamente la sua vita, è tranquillo: se uno vive nella speranza, si sente sfuggire anche il tempo più vicino e subentra in lui l'avidità della vita e l'infelicissima paura della morte che rende altrettanto infelice ogni cosa. Nasce da qui quel vergognosissimo voto di Mecenate che non rifiuta malattie e deformità e in ultimo il supplizio del palo, pur di continuare a vivere anche tra queste sventure:</text:p>
      <text:p text:style-name="P49"><text:soft-page-break/>“<text:span text:style-name="T1">rendimi storpio di una mano, zoppo di una gamba, fammi crescere la gobba, fammi cadere i denti: purché continui a vivere, va bene; conservami la vita anche su un palo di tortura</text:span>”.</text:p>
      <text:p text:style-name="P29">Egli si augura un destino che sarebbe molto infelice, se si realizzasse, e pur di vivere, chiede un supplizio continuo. Lo considererei già spregevolissimo se volesse vivere fino al momento di salire al patibolo: "<text:span text:style-name="T1">Storpiami pure</text:span>," dice, "<text:span text:style-name="T1">purché lo spirito vitale rimanga in questo corpo senza forze e inservibile; sfigurami, purché, mostruoso e deforme, io possa vivere anc</text:span><text:span text:style-name="T6">o</text:span><text:span text:style-name="T1">ra un po'; impalami, crocifiggimi</text:span>".</text:p>
      <text:p text:style-name="P28"><text:span text:style-name="T108">V</text:span>ale la pena comprimere la propria ferita e penzolare dalla forca con gli arti slogati, pur di rimandare la cosa più desiderabile quando si soffre: la fine dei tormenti? Val la pena di avere la vita per esalarla? Che cosa potresti augurargli se non la benevolenza degli dèi? A che mirano questi versi turpemente effeminati? A che questo patto nato da una paura insensatissima? E questo mendicare così sconciamente la vita? Potresti pensare che Virgilio abbia mai recitato a Mecenate<text:note text:id="ftn17" text:note-class="footnote"><text:note-citation>2</text:note-citation><text:note-body><text:p text:style-name="P22">Gaio Cilnio Mecenate (70 a.C. – 8 a.C.): Era un influente consigliere politico di Ottaviano Augusto e un grande Protettore delle arti. Proveniva da una ricca famiglia etrusca e, grazie alla sua posizione, divenne il centro di un importante circolo letterario che includeva alcuni dei più grandi poeti dell'epoca, tra cui Virgilio, Orazio e Properzio.</text:p></text:note-body></text:note> questo verso:</text:p>
      <text:p text:style-name="P50"><text:span text:style-name="T1">Morire è, dunque, così triste</text:span>?<text:note text:id="ftn18" text:note-class="footnote"><text:note-citation>3</text:note-citation><text:note-body><text:p text:style-name="P21">Questo verso non appartiene a Virgilio. Seneca lo cita per introdurre una discussione filosofica sulla morte e sulla sua percezione. Il punto di Seneca non è tanto l'attribuzione del verso, quanto piuttosto l'idea che la paura della morte sia irrazionale e che la vita vada vissuta pienamente.</text:p></text:note-body></text:note></text:p>
      <text:p text:style-name="P53"><text:soft-page-break/>Egli si augura i mali più atroci e desidera prolungare e sopportare le sofferenze più terribili: che ci guadagna? Una vita più lunga naturalmente. Ma che vita è agonizzare a lungo? C'è qualcuno che preferisce consumarsi tra i tormenti, morire membro a membro ed esalare l'anima ripetutamente in uno stillicidio, invece che morire in un sol colpo? C'è qualcuno che vuole prolungare una vita fonte di tante sofferenze, attaccato a quel maledetto palo, ormai storpio, deforme, con una gobba ripugnante sulla schiena e sul petto, quando avrebbe avuto molti motivi per morire anche senza arrivare alla croce?</text:p>
      <text:p text:style-name="P27"><text:span text:style-name="T45">E dimmi ora che non è un grande beneficio della natura l'ineluttabilità della morte. Molti sono pronti a fare patti anc</text:span><text:span text:style-name="T55">o</text:span><text:span text:style-name="T45">ra più vergognosi: anche a tradire un amico per vivere più a lungo, e a consegnare di persona i figli allo stupro, pur di poter vedere la luce, testimone di tanti delitti. Scuotiamoci di dosso questa smania di vivere e impariamo che non importa quando subiremo quello che dobbiamo prima o poi subire; conta vivere bene, non vivere a lungo; ma spesso il vivere bene consiste proprio nel non vivere a lungo. Stammi ben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svg:font-family="'Noto Serif'" style:font-adornments="Normale" style:font-family-generic="roman"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ab-stops/>
      </style:paragraph-properties>
      <style:text-properties style:font-name="Noto Serif" fo:font-family="'Noto Serif'" style:font-style-name="Normale" style:font-family-generic="roman" style:font-pitch="variable" fo:font-size="13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Noto Serif" fo:font-family="'Noto Serif'" style:font-style-name="Normale" style:font-family-generic="roman" style:font-pitch="variable" fo:font-size="13pt" fo:font-weight="normal" style:font-size-asian="16pt" style:font-weight-asian="bold" style:font-size-complex="16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Noto Serif" fo:font-family="'Noto Serif'" style:font-style-name="Normale" style:font-family-generic="roman" style:font-pitch="variable" fo:font-size="12pt" fo:font-weight="normal" style:font-size-asian="14pt" style:font-weight-asian="bold" style:font-size-complex="14pt" style:font-weight-complex="bol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499cm" fo:margin-bottom="1.499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1-27T16:53:27.808056207</meta:creation-date>
    <dc:date>2026-01-27T18:27:50.686580711</dc:date>
    <dc:creator>corrado tafaro</dc:creator>
    <meta:editing-duration>PT28M32S</meta:editing-duration>
    <meta:editing-cycles>5</meta:editing-cycles>
    <meta:generator>LibreOffice/24.2.7.2$Linux_X86_64 LibreOffice_project/420$Build-2</meta:generator>
    <meta:document-statistic meta:table-count="0" meta:image-count="0" meta:object-count="0" meta:page-count="12" meta:paragraph-count="46" meta:word-count="2791" meta:character-count="16576" meta:non-whitespace-character-count="13830"/>
  </office:meta>
</office:document-meta>
</file>