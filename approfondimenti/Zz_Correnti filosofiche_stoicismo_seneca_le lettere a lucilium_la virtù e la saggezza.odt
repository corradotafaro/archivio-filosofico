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a709"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0ea709" style:font-size-asian="12pt" style:font-style-asian="normal" style:font-weight-asian="normal" style:font-size-complex="12pt" style:font-style-complex="normal" style:font-weight-complex="normal"/>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1c02ae" officeooo:paragraph-rsid="000ea709" style:font-size-asian="12pt" style:font-style-asian="normal" style:font-size-complex="12pt" style:font-style-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paragraph-rsid="000ea709"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00%" fo:text-align="center" style:justify-single-word="false"/>
      <style:text-properties fo:font-size="9pt" officeooo:paragraph-rsid="0011d62e" style:font-size-asian="9pt" style:font-size-complex="9pt"/>
    </style:style>
    <style:style style:name="P7" style:family="paragraph" style:parent-style-name="Text_20_body">
      <style:paragraph-properties fo:line-height="100%" fo:text-align="justify" style:justify-single-word="false"/>
      <style:text-properties fo:font-size="9pt" style:font-size-asian="9pt" style:font-size-complex="9pt"/>
    </style:style>
    <style:style style:name="P8" style:family="paragraph" style:parent-style-name="Text_20_body">
      <style:paragraph-properties fo:margin-top="0cm" fo:margin-bottom="0cm" style:contextual-spacing="false" fo:line-height="100%" fo:text-align="justify" style:justify-single-word="false"/>
      <style:text-properties fo:font-size="9pt" style:font-size-asian="9pt" style:font-size-complex="9pt"/>
    </style:style>
    <style:style style:name="P9" style:family="paragraph" style:parent-style-name="Text_20_body">
      <style:paragraph-properties fo:margin-top="0.101cm" fo:margin-bottom="0cm" style:contextual-spacing="false" fo:line-height="100%" fo:text-align="justify" style:justify-single-word="false"/>
    </style:style>
    <style:style style:name="P10" style:family="paragraph" style:parent-style-name="Footnote">
      <style:paragraph-properties fo:text-align="justify" style:justify-single-word="false"/>
      <style:text-properties style:font-name="Noto Sans1"/>
    </style:style>
    <style:style style:name="P11" style:family="paragraph" style:parent-style-name="Footnote">
      <style:paragraph-properties fo:text-align="justify" style:justify-single-word="false"/>
      <style:text-properties officeooo:paragraph-rsid="01e7b0a4"/>
    </style:style>
    <style:style style:name="P12" style:family="paragraph" style:parent-style-name="Heading_20_2" style:master-page-name="">
      <style:paragraph-properties style:page-number="auto"/>
      <style:text-properties style:font-name="Noto Sans1" fo:font-size="12pt" officeooo:paragraph-rsid="00136e5c" style:font-size-asian="12pt" style:font-size-complex="12pt"/>
    </style:style>
    <style:style style:name="P13" style:family="paragraph" style:parent-style-name="Heading_20_3">
      <style:paragraph-properties fo:line-height="115%" fo:text-align="justify" style:justify-single-word="false"/>
      <style:text-properties style:font-name="Noto Sans1" fo:font-size="12pt" officeooo:paragraph-rsid="000ea709" style:font-size-asian="12pt" style:font-size-complex="12pt"/>
    </style:style>
    <style:style style:name="P14" style:family="paragraph" style:parent-style-name="Heading_20_3">
      <style:text-properties style:font-name="Noto Sans1" fo:font-size="12pt" officeooo:paragraph-rsid="00136e5c" style:font-size-asian="12pt" style:font-size-complex="12pt"/>
    </style:style>
    <style:style style:name="P15" style:family="paragraph" style:parent-style-name="Heading_20_3">
      <style:paragraph-properties fo:margin-top="0.199cm" fo:margin-bottom="0.011cm" style:contextual-spacing="false"/>
      <style:text-properties style:font-name="Noto Sans1" fo:font-size="12pt" officeooo:paragraph-rsid="00136e5c" style:font-size-asian="12pt" style:font-size-complex="12pt"/>
    </style:style>
    <style:style style:name="P1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136e5c" style:font-size-asian="12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36e5c" style:font-size-asian="12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1c02ae" officeooo:paragraph-rsid="00136e5c" style:font-size-asian="12pt" style:font-style-asian="normal" style:font-size-complex="12pt" style:font-style-complex="normal"/>
    </style:style>
    <style:style style:name="P19" style:family="paragraph" style:parent-style-name="Standard">
      <style:paragraph-properties fo:margin-top="0cm" fo:margin-bottom="0cm" style:contextual-spacing="false" fo:line-height="115%" fo:text-align="justify" style:justify-single-word="false"/>
      <style:text-properties style:font-name="Noto Sans1" fo:font-size="12pt" fo:font-weight="normal" officeooo:rsid="0039c6a4" officeooo:paragraph-rsid="00136e5c" style:font-size-asian="12pt" style:font-weight-asian="normal" style:font-size-complex="12pt" style:font-weight-complex="normal"/>
    </style:style>
    <style:style style:name="P20"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39c6a4" officeooo:paragraph-rsid="00136e5c" style:font-size-asian="12pt" style:font-weight-asian="normal" style:font-size-complex="12pt" style:font-weight-complex="normal"/>
    </style:style>
    <style:style style:name="P21"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39c6a4" officeooo:paragraph-rsid="00136e5c"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39c6a4" officeooo:paragraph-rsid="00136e5c"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39c6a4" officeooo:paragraph-rsid="00136e5c"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39c6a4" officeooo:paragraph-rsid="00136e5c"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39c6a4" officeooo:paragraph-rsid="00136e5c"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39c6a4" officeooo:paragraph-rsid="00136e5c" style:font-size-asian="12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3f8f75" officeooo:paragraph-rsid="00136e5c"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3f8f75" officeooo:paragraph-rsid="00136e5c"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3f8f75" officeooo:paragraph-rsid="00136e5c"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3f8f75" officeooo:paragraph-rsid="00136e5c"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6e5c" style:font-size-asian="12pt" style:font-size-complex="12pt"/>
    </style:style>
    <style:style style:name="P3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6e5c" style:font-size-asian="12pt" style:font-size-complex="12pt"/>
    </style:style>
    <style:style style:name="P33"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rsid="0036a1c0" officeooo:paragraph-rsid="00136e5c" style:font-size-asian="12pt" style:font-size-complex="12pt"/>
    </style:style>
    <style:style style:name="P3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36a1c0" officeooo:paragraph-rsid="00136e5c" style:font-size-asian="12pt" style:font-size-complex="12pt"/>
    </style:style>
    <style:style style:name="P3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3f8f75" officeooo:paragraph-rsid="00136e5c" style:font-size-asian="12pt" style:font-size-complex="12pt"/>
    </style:style>
    <style:style style:name="T1" style:family="text">
      <style:text-properties style:font-name="Noto Sans1" fo:font-size="12pt" fo:font-style="italic" fo:font-weight="normal" officeooo:rsid="001c02ae" style:font-size-asian="12pt" style:font-style-asian="italic" style:font-weight-asian="normal" style:font-size-complex="12pt" style:font-style-complex="italic" style:font-weight-complex="normal"/>
    </style:style>
    <style:style style:name="T2" style:family="text">
      <style:text-properties style:font-name="Noto Sans1" fo:font-size="12pt" fo:font-style="normal" fo:font-weight="normal" officeooo:rsid="001c02ae" style:font-size-asian="12pt" style:font-style-asian="normal" style:font-weight-asian="normal" style:font-size-complex="12pt" style:font-style-complex="normal" style:font-weight-complex="normal"/>
    </style:style>
    <style:style style:name="T3" style:family="text">
      <style:text-properties style:font-name="Noto Sans1" fo:font-size="12pt" fo:font-style="normal" fo:font-weight="normal" officeooo:rsid="0041e50b" style:font-size-asian="12pt" style:font-style-asian="normal" style:font-weight-asian="normal" style:font-size-complex="12pt"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28aa31" style:font-style-asian="normal" style:font-style-complex="normal"/>
    </style:style>
    <style:style style:name="T6" style:family="text">
      <style:text-properties fo:font-style="normal" officeooo:rsid="001c02ae" style:font-style-asian="normal" style:font-style-complex="normal"/>
    </style:style>
    <style:style style:name="T7" style:family="text">
      <style:text-properties fo:font-style="normal" officeooo:rsid="00336864" style:font-style-asian="normal" style:font-style-complex="normal"/>
    </style:style>
    <style:style style:name="T8" style:family="text">
      <style:text-properties fo:font-style="normal" officeooo:rsid="00381eca" style:font-style-asian="normal" style:font-style-complex="normal"/>
    </style:style>
    <style:style style:name="T9" style:family="text">
      <style:text-properties fo:font-style="normal" officeooo:rsid="003d8415" style:font-style-asian="normal" style:font-style-complex="normal"/>
    </style:style>
    <style:style style:name="T10" style:family="text">
      <style:text-properties fo:font-style="normal" fo:font-weight="normal" officeooo:rsid="001c02ae" style:font-style-asian="normal" style:font-weight-asian="normal" style:font-style-complex="normal" style:font-weight-complex="normal"/>
    </style:style>
    <style:style style:name="T11" style:family="text">
      <style:text-properties fo:font-style="normal" fo:font-weight="normal" officeooo:rsid="0041e50b" style:font-style-asian="normal" style:font-weight-asian="normal" style:font-style-complex="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02ae" style:font-style-asian="italic" style:font-style-complex="italic"/>
    </style:style>
    <style:style style:name="T15" style:family="text">
      <style:text-properties fo:font-style="italic" fo:font-weight="normal" officeooo:rsid="001c02ae" style:font-style-asian="italic" style:font-weight-asian="normal" style:font-style-complex="italic" style:font-weight-complex="normal"/>
    </style:style>
    <style:style style:name="T16" style:family="text">
      <style:text-properties officeooo:rsid="0029c3ce"/>
    </style:style>
    <style:style style:name="T17" style:family="text">
      <style:text-properties officeooo:rsid="01d5c377"/>
    </style:style>
    <style:style style:name="T18" style:family="text">
      <style:text-properties officeooo:rsid="01d9d0ee"/>
    </style:style>
    <style:style style:name="T19" style:family="text">
      <style:text-properties style:use-window-font-color="true" loext:opacity="0%" fo:background-color="transparent" loext:char-shading-value="0"/>
    </style:style>
    <style:style style:name="T20" style:family="text">
      <style:text-properties fo:font-weight="bold"/>
    </style:style>
    <style:style style:name="T21" style:family="text">
      <style:text-properties fo:font-size="9pt" style:font-size-asian="9pt" style:font-size-complex="9pt"/>
    </style:style>
    <style:style style:name="T22" style:family="text">
      <style:text-properties fo:font-size="9pt" officeooo:rsid="0011d62e" style:font-size-asian="9pt" style:font-size-complex="9pt"/>
    </style:style>
    <style:style style:name="T23" style:family="text">
      <style:text-properties officeooo:rsid="003b14cf"/>
    </style:style>
    <style:style style:name="T24" style:family="text">
      <style:text-properties officeooo:rsid="003b6769"/>
    </style:style>
    <style:style style:name="T25" style:family="text">
      <style:text-properties officeooo:rsid="01e60ccc"/>
    </style:style>
    <style:style style:name="T26" style:family="text">
      <style:text-properties officeooo:rsid="01e7b0a4"/>
    </style:style>
    <style:style style:name="T27" style:family="text">
      <style:text-properties officeooo:rsid="003fe53b"/>
    </style:style>
    <style:style style:name="T28" style:family="text">
      <style:text-properties officeooo:rsid="00419323"/>
    </style:style>
    <style:style style:name="T29"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41e50b" style:font-size-asian="12pt" style:font-style-asian="normal" style:font-weight-asian="normal" style:font-size-complex="12pt" style:font-style-complex="normal" style:font-weight-complex="normal"/>
    </style:style>
    <style:style style:name="T31" style:family="text">
      <style:text-properties fo:font-size="12pt" fo:font-style="italic" fo:font-weight="normal" officeooo:rsid="001c02ae"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bookmark-start text:name="__RefHeading___Toc18164_3602757520"/>La virtù e la saggezza<text:bookmark-end text:name="__RefHeading___Toc18164_3602757520"/></text:h>
      <text:p text:style-name="P16">La virtù e la saggezza sono pilastri centrali nel pensiero di Seneca. Egli crede che la vera felicità derivi dalla vita virtuosa e che la saggezza sia il mezzo per raggiungere tale virtù.</text:p>
      <text:h text:style-name="P14" text:outline-level="3"><text:bookmark-start text:name="__RefHeading___Toc18166_3602757520"/>Lettera 5<text:bookmark-end text:name="__RefHeading___Toc18166_3602757520"/></text:h>
      <text:p text:style-name="P31">Tu ti applichi con costanza e hai lasciato da parte tutto il resto per renderti ogni giorno migliore: approvo e ne sono contento; quindi non solo ti esorto, ma anche ti prego di perseverare. Un unico consiglio: non abbigliarti e non vivere in maniera stravagante, come le persone che non vogliono progredire, ma mettersi in mostra.</text:p>
      <text:p text:style-name="P32">Evita gli abiti trasandati, i capelli lunghi e la barba incolta, il disprezzo manifesto per i preziosi, il letto sistemato a terra e in generale tutto ciò che per vie traverse corre dietro al desiderio di distinguersi. Il nome stesso di filosofia, pur se la si pratica con discrezione, è già abbastanza odiato. Figurati poi se cominceremo a sottrarci alle abituali regole di comportamento. Bisogna essere nell'intimo completamente diversi dagli altri, ma simili al resto della gente nell'aspetto esteriore. La toga non deve essere sfarzosa, ma nemmeno sordida.</text:p>
      <text:p text:style-name="P32">Cerchiamo di non avere argento cesellato d'oro massiccio, ma neanche consideriamo segno di frugalità far completamente a meno sia di oro che di argento. <text:soft-page-break/>Sforziamoci di vivere meglio della massa, non in maniera contraria: altrimenti mettiamo in fuga e allontaniamo da noi quelli che vorremmo correggere, e per giunta facciamo sì che non ci vogliano imitare in niente, per timore di doverci imitare in tutto. Ecco le promesse prime della filosofia: senso comune, umanità e socievolezza: l'essere troppo diversi ci impedirà di attuarle. Badiamo che non sia ridicolo e fastidioso quel comportamento con cui vogliamo suscitare ammirazione.</text:p>
      <text:p text:style-name="P32">Certo il nostro proposito è vivere secondo natura: ma è contro natura tormentare il proprio corpo, trascurare una normale igiene, ricercare il sudiciume e nutrirsi di cibi non solo poveri, ma addirittura disgustosi e sgradevoli. Come è segno di mollezza cercare alimenti raffinati, così è segno di pazzia evitare quelli comuni che si possono avere a poco prezzo.</text:p>
      <text:p text:style-name="P32">La filosofia richiede frugalità, non sofferenza, e la frugalità può essere decorosa. Mi sembra buona questa via di mezzo: l'esistenza sia una giusta combinazione tra moralità e morale predominante. Che tutta la gente guardi con ammirazione la nostra vita, ma sia anche in grado di capirla. "<text:span text:style-name="T13">E allora, dovremo comportarci come gli altri? Non ci sarà nessuna differenza tra noi e loro?</text:span>" Sì , e grandissima: chi ci guarda più da vicino, sappia che siamo diversi dalla massa; chi entra in casa nostra ammiri noi, non il nostro mobilio. È grande chi usa <text:soft-page-break/>vasellami di argilla come se fossero di argento, ma non lo è meno chi usa l'argento come se fosse argilla; solo i deboli non sono in grado di reggere la ricchezza.</text:p>
      <text:p text:style-name="P32"><text:span text:style-name="T6">Ma voglio dividere con te anche il piccolo guadagno di oggi: ho letto nel nostro Ecatone</text:span><text:span text:style-name="T6"><text:note text:id="ftn19" text:note-class="footnote"><text:note-citation>1</text:note-citation><text:note-body><text:p text:style-name="P10">Ecatone di Rodi 100 a.C. circa è stato un filosofo stoico greco antico. Secondo Diogene Laerzio, Ecatone divide le virtù in due tipologie: quelle fondate sui principi scientifici intellettuali (come la saggezza e la giustizia) e quelle non fondate su queste basi. Come i primi stoici, Cleante e Crisippo, Ecatone ritenne che la virtù può essere insegnata.</text:p></text:note-body></text:note></text:span><text:span text:style-name="T6"> che non avere più accesi desideri serve anche come rimedio alla paura. "</text:span><text:span text:style-name="T14">Non avrai più paura se smetterai di sperare.</text:span><text:span text:style-name="T6">" "</text:span><text:span text:style-name="T14">Ma</text:span><text:span text:style-name="T6">," potresti obiettare, "</text:span><text:span text:style-name="T14">come fanno a stare insieme sentimenti tanto diversi?</text:span><text:span text:style-name="T6">" Eppure è così , Lucilio mio: sembrano in contraddizione e invece sono collegati. Come le stesse manette legano il detenuto e la guardia, così elementi tanto differenti procedono di pari passo: la paura segue la speranza. E non mi meraviglio che le cose vadano così : speranza e timore sono contrassegni di un animo inquieto e preoccupato del futuro.</text:span></text:p>
      <text:p text:style-name="P18">La loro causa prima è che noi non ci adattiamo al presente, ma ci spingiamo lontano con il pensiero; per questo la capacità di fare previsioni, che pure è una delle qualità migliori dell'uomo, si risolve in un male. Le belve evitano i pericoli che vedono e, una volta schivatili, si sentono al sicuro: noi ci tormentiamo e per il futuro e per il passato. Molte nostre prerogative ci nuocciono; la <text:soft-page-break/>memoria rinnova l'angoscia della paura, il prevedere il futuro ce l'anticipa; nessuno è infelice solo per il presente. Stammi bene.</text:p>
      <text:h text:style-name="P14" text:outline-level="3"><text:bookmark-start text:name="__RefHeading___Toc18168_3602757520"/>Lettera 16<text:bookmark-end text:name="__RefHeading___Toc18168_3602757520"/></text:h>
      <text:p text:style-name="P33">Caro Lucilio, ti è chiaro - ne sono certo - che nessuno può vivere felicemente e neppure in maniera tollerabile senza l'amore della saggezza: una perfetta saggezza rende felice la vita, ma tollerabile la rende anche una saggezza imperfetta. Questo concetto, anche se è evidente, deve tuttavia essere rafforzato e scolpito nel profondo con una riflessione quotidiana: mantenere i propositi fatti richiede più impegno che concepire onesti propositi. Bisogna perseverare e rinvigorire il nostro spirito con una assidua applicazione, finché la tendenza al bene diventi saggezza.</text:p>
      <text:p text:style-name="P34">Perciò con me non hai bisogno di molti discorsi o di lunghe assicurazioni formali: so che hai fatto notevoli progressi. Conosco la provenienza di ciò che scrivi; non fingi, né ingigantisci le cose. Ti dirò tuttavia il mio pensiero: nutro in te grandi speranze, ma non ho ancora completa fiducia. Voglio che anche tu faccia lo stesso: non confidare in te subito e con facilità. Scruta, fruga ed esamina a fondo te stesso; considera innanzi tutto se hai fatto progressi nella filosofia oppure nella tua stessa vita.</text:p>
      <text:p text:style-name="P34">La filosofia non è un'arte che cerca il favore popolare e non è fatta per essere ostentata; non consiste nelle <text:soft-page-break/>parole, ma nei fatti. Di essa non ci si vale per far trascorrere piacevolmente le giornate, per eliminare il disgusto che viene dall'ozio: educa e forma l'animo, regola la vita, governa le azioni, mostra ciò che si deve o non si deve fare, siede al timone e dirige la rotta attraverso i pericoli di un mare agitato. Senza di lei nessuno può vivere tranquillo e sicuro; in ogni momento si presentano innumerevoli circostanze che esigono una direttiva, e questa bisogna cercarla nella filosofia. Qualcuno dirà: "<text:span text:style-name="T13">A che mi giova la filosofia, se esiste il fato? A che, se c'è un dio che ci governa? A che, se il caso detta legge? Non si possono mutare gli eventi prestabiliti, né difendersi contro quelli incerti, ma o un dio è padrone delle mie decisioni e ha stabilito che cosa devo fare, o la sorte non mi concede nessuna decisione.</text:span>" Qualunque di queste forze esista, anche se esistono tutte, caro Lucilio, bisogna dedicarsi alla filosofia; sia che il destino ci vincoli con la sua legge inesorabile, sia che un dio, arbitro dell'universo, abbia disposto ogni cosa, sia che il caso sospinga e muova disordinatamente le vicende umane, deve proteggerci la filosofia.</text:p>
      <text:p text:style-name="P34">Ci esorterà a obbedire di buon grado a dio, e con fierezza alla sorte; ci insegnerà a seguire la volontà di dio, a sopportare il caso. Ma non è questo il momento di discutere, quale sia il potere umano, se regna la provvidenza, o se ci vincola e ci trascina l'alternarsi delle vicende volute dal destino, o se dominano eventi <text:soft-page-break/>impensati e improvvisi: io torno a raccomandarti e ti esorto a non lasciare che lo slancio del tuo spirito cali e perda vigore. Disciplinalo e rafforzalo, così che il tuo impulso al bene diventi un modo di essere.</text:p>
      <text:p text:style-name="P34"><text:span text:style-name="T6">Subito, appena avrai in mano la lettera, se ben ti conosco, andrai a vedere quale piccolo dono ti porta: scorrila con attenzione e lo troverai. Non stupirti della mia generosità: anc</text:span><text:span text:style-name="T8">o</text:span><text:span text:style-name="T6">ra una volta ti faccio dono di un pensiero altrui. Ma perché ho detto altrui? Ogni concetto buono espresso da qualcuno, è mio. Anche questa è una massima di Epicuro: "</text:span><text:span text:style-name="T14">Se vivrai secondo natura, non sarai mai povero; se vivrai secondo le opinioni non sarai mai ricco</text:span><text:span text:style-name="T6">". La natura ha poche esigenze, le opinioni moltissime.</text:span></text:p>
      <text:p text:style-name="P18">Si concentrino pure nelle tue mani le ricchezze di molti; la sorte ti dia più denaro di quanto ne possiede normalmente un privato, ti ricopra d'oro, ti vesta di porpora, ti conceda tanto lusso e magnificenza da poter ricoprire di marmo la terra e ti sia possibile non solo avere ricchezze, ma calpestarle; si aggiungano statue, dipinti e tutto ciò che le varie arti hanno creato per la soddisfazione della lussuria; da questi beni imparerai solo a desiderare sempre di più.</text:p>
      <text:p text:style-name="P34"><text:span text:style-name="T6">I desideri naturali hanno limiti ben definiti, quelli nati da una falsa opinione non ne hanno: il falso non ha confini. Chi percorre una strada ha una m</text:span><text:span text:style-name="T8">e</text:span><text:span text:style-name="T6">ta: l'andare errando, </text:span><text:soft-page-break/><text:span text:style-name="T6">invece, non ha mai fine. Allontanati, dunque, dalle vanità e quando vuoi sapere se ciò cui aspiri corrisponde a un desiderio cieco o naturale, considera se ha un termine; se dopo un lungo cammino rimane sempre una m</text:span><text:span text:style-name="T8">e</text:span><text:span text:style-name="T6">ta più avanzata, sappi che non è un desiderio naturale. Stammi bene.</text:span></text:p>
      <text:h text:style-name="P14" text:outline-level="3"><text:bookmark-start text:name="__RefHeading___Toc18170_3602757520"/>Lettera 85<text:bookmark-end text:name="__RefHeading___Toc18170_3602757520"/></text:h>
      <text:p text:style-name="P22">Ti avevo risparmiato e avevo tralasciato tutte le questioni complicate che ancora rimanevano, contento di darti come un assaggio delle teorie stoiche tendenti a dimostrare che la virtù da sola basta a rendere felice la vita. Ora tu vuoi che io ti esponga tutte le argomentazioni della nostra scuola oppure quelle escogitate per schernirci: se volessi farlo, la mia non sarebbe una lettera, ma un libro. Te l'ho detto tante volte che non mi piace questo genere di argomenti, mi vergogno di scendere in campo e di battermi a favore di dèi e uomini armato di una lesina.</text:p>
      <text:p text:style-name="P19">"<text:span text:style-name="T13">L'uomo saggio è anche moderato; l'uomo moderato è anche tenace; l'uomo tenace è imperturbabile, l'uomo imperturbabile non è mai triste; chi non è mai triste è felice; quindi, il saggio è felice e la saggezza è sufficiente per avere una vita felice.</text:span>"</text:p>
      <text:p text:style-name="P22"><text:soft-page-break/>A questo sillogismo certi Peripatetici<text:note text:id="ftn20" text:note-class="footnote"><text:note-citation>2</text:note-citation><text:note-body><text:p text:style-name="P10">La scuola peripatetica fu una delle grandi scuole filosofiche greche, fondata da Aristotele. I suoi membri erano detti peripatetici.</text:p></text:note-body></text:note> rispondono che intendono "<text:span text:style-name="T13">imperturbabile, tenace, mai triste</text:span>" nel senso in cui si definisce "<text:span text:style-name="T13">imperturbabile</text:span>" chi si turba raramente e poco, non chi non si turba mai. Allo stesso modo si definisce "<text:span text:style-name="T13">mai triste</text:span>" dicono chi non è soggetto alla tristezza e non indulge spesso in maniera eccessiva a questo difetto; perché per sua natura nessun uomo può essere immune dalla tristezza; il saggio non vi soccombe, ma ne è toccato; e aggiungono altre affermazioni in linea alle direttive della loro scuola. Così per loro il saggio non è privo di passioni, ma le domina. Certo riconosciamo ben poco al saggio se lo stimiamo più forte dei più deboli, più allegro dei più tristi, più moderato dei più sfrenati, più grande dei più umili! Che penseresti se Lada trovasse straordinaria la sua velocità mettendola a confronto con gli zoppi e i deboli?</text:p>
      <text:p text:style-name="P22">Ella potrebbe volare a fior delle messi intatte senza danneggiare con la corsa le tenere spighe, o attraversare il mare sospesa sui gonfi flutti, senza bagnare i veloci piedi. Questa è una velocità apprezzata per se stessa, che non è lodata al confronto con i più lenti. Definiresti sana una persona che ha una febbre leggera? Non avere una malattia grave non è salute. "<text:span text:style-name="T13">Così</text:span> ," continuano, "<text:span text:style-name="T13">si dice che il saggio è imperturbabile, come si dice che sono senza </text:span><text:soft-page-break/><text:span text:style-name="T13">nocciolo non i frutti privi di semi, ma quelli che li hanno più piccoli.</text:span>" Falso. Il saggio, a mio parere, deve essere senza vizi, e non averne di meno; devono mancare completamente, non essere piccoli; se ce n'è qualcuno, crescerà e sarà a volte di ostacolo. Un principio di cataratta offusca la vista; quando diventa più grande e matura rende ciechi. Se al saggio attribuisci delle passioni, la ragione sarà sopraffatta e trascinata via come da un torrente, soprattutto se deve combattere, a tuo parere, non contro una sola passione, ma contro tutte. Una massa di passioni, anche se moderate, ha più forza di un'unica, violenta passione. È avido, ma non troppo; è ambizioso, ma non in maniera esagerata; è collerico, ma si calma s<text:span text:style-name="T23">u</text:span>bito; è incostante, ma non eccessivamente volubile e mutevole; è lussurioso, ma non maniaco. Si tratterebbe meglio con un individuo caratterizzato da un unico vizio completo che con chi li ha tutti, anche se più leggeri.</text:p>
      <text:p text:style-name="P25">Inoltre, non importa quanto è grande una passione: per piccola che sia, non sa obbedire, non accetta consigli. Nessun animale, sia feroce, sia domestico e mansueto, obbedisce alla ragione: la loro natura è sorda ai moniti che da essa provengono; così le passioni, per quanto piccole siano, non seguono la ragione, non le d<text:span text:style-name="T24">a</text:span>nno ascolto. Le tigri e i leoni non si spogliano mai della loro ferocia, certe volte la placano, ma, quando meno te <text:soft-page-break/>l'aspetti, la loro ferinità, momentaneamente lenita, esplode.</text:p>
      <text:p text:style-name="P25">Non c'è mai sicura garanzia che i vizi siano domati. E poi, se la ragione viene in aiuto, le passioni non nascono nemmeno; ma se cominciano a dispetto della ragione, a dispetto della ragione continueranno. È più facile impedirne la nascita che dominarne la violenza. Parlare di una via di mezzo è perciò sbagliato e inutile, come se uno dicesse che ci si può ammalare o impazzire solo un po'. Solo la virtù conosce la moderazione, i vizi no; è più facile eliminarli che dominarli. I vizi radicati e incalliti dell'anima umana, quelli che noi definiamo malattie, come l'avarizia, la crudeltà, la prepotenza, sono senza dubbio smodati. Quindi, smodate sono anche le passioni; giacché da quelli si passa a queste.</text:p>
      <text:p text:style-name="P25">E poi, se riconosciamo un qualche diritto alla tristezza, alla paura, alla cupidigia, e agli altri impulsi perversi, non riusciremo più a dominarli. Perché? Perché le forze che li eccitano sono fuori di noi, e perciò essi cresceranno a seconda che a suscitarli siano cause più o meno grandi. Se uno guarda più a lungo o più da vicino quello che lo atterrisce, la sua paura sarà maggiore; così la cupidigia sarà più acuta se la stimola la speranza di una cosa più preziosa. Se non siamo in grado di impedire l'insorgere delle passioni, non saremo neppure in grado di regolarle.</text:p>
      <text:p text:style-name="P25"><text:soft-page-break/>Se hai permesso loro di nascere, cresceranno con le loro cause e la loro forza sarà proporzionale al loro sviluppo. Aggiungi poi che le passioni, per quanto possano essere moderate, tendono ad aumentare; le cose nocive non mantengono mai una giusta misura; per quanto all'inizio siano leggeri, i mali serpeggiano e a volte un attacco lievissimo abbatte un organismo malato.</text:p>
      <text:p text:style-name="P25">Che pazzia è credere di poter mettere fine a nostro piacimento a quelle passioni di cui non siamo in grado di contrastare gli inizi! Come posso avere forza sufficiente per mettere fine a una cosa che non ho avuto la forza di impedire, quando è più facile respingere che mettere freno a quello cui si è lasciato via libera!</text:p>
      <text:p text:style-name="P25">Certi filosofi hanno fatto questa distinzione: "<text:span text:style-name="T13">L'uomo moderato e saggio è sereno per disposizione e abito mentale, ma non lo è di fronte ad avvenimenti improvvisi. Per abito mentale non si turba, non si rattrista, non ha paura, ma a turbarlo possono intervenire molte cause esterne.</text:span>"</text:p>
      <text:p text:style-name="P25">Precisiamo quello che vogliono dire: costui non è collerico, ma qualche volta si infuria; non è un vigliacco, ma qualche volta ha paura, in lui, cioè, la paura non è un vizio, ma un'affezione momentanea. Se ammettiamo questo, la paura a lungo andare può trasformarsi in vizio, e l'ira, una volta penetrata nell'animo, può modificare quella fisionomia propria di un animo che ne è esente. <text:soft-page-break/>Inoltre, se uno non disprezza le cause esterne e teme qualcosa, esiterà a muoversi e sarà riluttante quando dovrà affrontare con coraggio le armi, il fuoco per difendere la patria, le leggi, la libertà. Ma il saggio non è soggetto a questi sentimenti contrastanti. Ritengo, inoltre, che bisogna fare attenzione a non mescolare due questioni che vanno esaminate separatamente; in un modo si argomenta che l'unico bene è l'onesto, in un altro che la virtù basta alla felicità. Se l'unico bene è l'onesto, tutti ammettono che la virtù basta alla felicità; viceversa,se è solo la virtù a rendere felici, non si concederà che l'unico bene è l'onesto. Senocrate e Speusippo giudicano che si può diventare felici anche per la sola virtù, ma non che l'unico bene è l'onesto.</text:p>
      <text:p text:style-name="P25">Anche secondo Epicuro, avendo la virtù, si è felici, ma la virtù non basta alla felicità, perché a rendere felici è il piacere che deriva dalla virtù, non la virtù in se stessa. È una distinzione che non vale niente: lo stesso Epicuro sostiene infatti che la virtù si accompagna sempre al piacere. Così se vi è sempre strettamente unita e ne è inseparabile, basta anche da sola; difatti, anche quando è sola, ha con sé il piacere, senza il quale non esiste. È poi assurdo affermare che si sarà felici anche con la sola virtù, ma non perfettamente felici; non capisco come ciò sia possibile.</text:p>
      <text:p text:style-name="P25"><text:soft-page-break/>La felicità ha in sé il bene perfetto e insuperabile; e se è così, la felicità è perfetta. Se non c'è niente di più grande o di migliore della vita degli dèi, e la vita degli dèi è felice, essa non può innalzarsi a vertici più alti. Inoltre, se la felicità non ha bisogno di niente, ogni felicità è perfetta ed è, al tempo stesso, felice e la più felice.</text:p>
      <text:p text:style-name="P25">Dubiti forse che la felicità sia il sommo bene? E allora, se possiede il sommo bene, è felice al massimo grado. Il sommo bene non ammette aumenti, perché non c'è niente al di sopra del sommo; analogamente non ne ammette neppure la felicità, che non esiste senza il sommo bene. Perché se postuli uno "<text:span text:style-name="T13">più</text:span>" felice, postulerai anche uno "<text:span text:style-name="T13">molto più</text:span>" felice; farai innumerevoli distinzioni del sommo bene, mentre io intendo come sommo bene ciò che non ha gradi sopra di sé.</text:p>
      <text:p text:style-name="P25">Se uno è meno felice di un altro, ne consegue che il primo preferisce alla sua la vita dell'altro più felice; ma l'uomo felice non preferisce niente alla sua vita. Entrambi i casi sono inverosimili: sia che per l'uomo felice ci sia qualcosa da preferire al suo stato, sia che non preferisca uno stato migliore del suo. Più uno è saggio, più tenderà al meglio e desidererà conseguirlo a ogni costo. Ma come può essere felice uno che può anzi deve, avere ancora dei desideri?</text:p>
      <text:p text:style-name="P25"><text:soft-page-break/>Ti spiegherò l'origine di questo errore: non sanno che una sola è la felicità. La sua qualità, non la sua grandezza, la mette nella condizione migliore; perciò è uguale sia lunga, sia breve, sia estesa, sia ristretta, distribuita in molti luoghi e in parti diverse o costretta in un unico posto. Chi la valuta in base a numeri, misure e parti, la priva della sua singolare caratteristica. E qual è questa caratteristica? La completezza. Saziarsi è secondo me lo scopo del mangiare e del bere. Uno mangia di più, un altro di meno: che importa? Si sono saziati entrambi. Uno beve di più, un altro di meno: che importa? Nessuno dei due ha sete. Uno ha vissuto più a lungo, un altro meno: non importa, se i numerosi anni di vita hanno reso felice l'uno quanto l'altro i pochi. Quell'uomo che tu definisci meno felice, non è felice: questo aggettivo non può venire limitato. "<text:span text:style-name="T13">Chi è forte non ha paura; chi non ha paura non è triste; chi non è triste è felice.</text:span>"</text:p>
      <text:p text:style-name="P25">Questo è un sillogismo stoico; tentano di confutarlo dicendo che noi vogliamo far passare per vera un'affermazione falsa e controversa, cioè che l'uomo forte non ha paura. "<text:span text:style-name="T13">E come?</text:span>" dicono. "<text:span text:style-name="T13">L'uomo forte non temerà i mali che lo sovrastano? Questo è l'atteggiamento di un pazzo, di un demente, non di una persona forte. Egli riesce a dominare la sua paura, ma non ne è del tutto immune.</text:span>" Quelli che la pensano così ricadono di nuovo nello stesso errore: considerano virtù i vizi meno accentuati; se uno ha paura, ma più raramente e meno <text:soft-page-break/>degli altri, non è che non abbia questo vizio, solo ne è affetto in misura minore. "<text:span text:style-name="T13">Ma per me è un pazzo chi non teme i mali che lo minacciano</text:span>." Ciò che dici sarebbe vero se si trattasse di mali, ma se egli sa che quelli non sono mali e giudica un male soltanto la disonestà, dovrà guardare i pericoli senza paura e disprezzare i timori degli altri. Oppure, se non temere i mali è da sciocchi o da pazzi, più uno è saggio più ne avrà timore. "<text:span text:style-name="T13">Secondo voi</text:span>," continuano, "<text:span text:style-name="T13">l'uomo forte deve esporsi ai pericoli.</text:span>" Niente affatto: non ne avrà paura, ma cercherà di evitarli; gli si addice la cautela, non la paura. "<text:span text:style-name="T13">Ma come?</text:span>" chiedono "<text:span text:style-name="T13">Non avrà paura della morte, della prigione, del fuoco e degli altri colpi della fortuna?</text:span>" No; sa che non sono mali, ne hanno solo l'apparenza; tutti questi li giudica spauracchi della vita umana.</text:p>
      <text:p text:style-name="P25">Descrivigli la prigionia, le frustate, le catene, la povertà, le membra straziate dalle malattie o dalla violenza e qualunque altro tormento vorrai aggiungere: le considera paure degne di una mente malata. Solo i deboli ne hanno timore. Oppure giudichi un male quello che a volte dobbiamo affrontare volontariamente? Chiedi qual è il male? Cedere ai cosiddetti mali e consegnare ad essi la propria libertà, in nome della quale bisogna sopportare ogni sofferenza: la libertà finisce, se non disprezziamo le cose che ci impongono un giogo. Se sapessero cos'è il coraggio, non avrebbero dubbi sull'atteggiamento conveniente a un uomo coraggioso. E <text:soft-page-break/>il coraggio non è temerità sconsiderata o amore del pericolo o ricerca di situazioni spaventose: è la capacità di distinguere cos'è male e che cosa non lo è. L'uomo coraggioso è molto attento alla sua difesa e nello stesso tempo sopporta con grande fermezza gli eventi che hanno la falsa apparenza di mali. "<text:span text:style-name="T13">E allora? Se l'uomo forte lo minaccia una spada, se è colpito ripetutamente in più parti del corpo, se dal ventre squarciato vede le sue viscere, se viene torturato a intervalli perché senta di più i tormenti e nuovo sangue esce dalle ferite rimarginate, dirai forse che non ha paura, né tanto meno prova dolore?</text:span>" Soffre, sì -nessuna virtù toglie all'uomo la sensibilità-, ma non ha paura: incrollabile guarda dall'alto le sue sofferenze. Vuoi sapere qual è il suo stato d'animo in quel momento? Quello di chi conforta un amico ammalato.</text:p>
      <text:p text:style-name="P20">"<text:span text:style-name="T13">Ciò che è male nuoce; ciò che nuoce rende peggiori, il dolore e la povertà non rendono peggiori; quindi, non sono mali.</text:span>"</text:p>
      <text:p text:style-name="P21">"<text:span text:style-name="T13">Sillogismo falso</text:span>," sostengono, "<text:span text:style-name="T13">quello che nuoce non è detto che renda anche peggiori. Tempeste e burrasche nuocciono al timoniere, ma non lo rendono peggiore.</text:span>"</text:p>
      <text:p text:style-name="P22">Qualche Stoico controbatte così : tempeste e burrasche rendono peggiore il timoniere perché non può realizzare i suoi propositi e non può mantenere la rotta; non diventa peggiore nella sua arte, ma nel realizzarla. A <text:soft-page-break/>questi filosofi i Peripatetici rispondono: "<text:span text:style-name="T13">Dunque, la povertà, il dolore e qualunque altra disgrazia del genere, renderanno peggiore anche il saggio; non gli toglieranno la virtù, ma ne impediranno l'attuazione.</text:span>" Questa affermazione sarebbe giusta se la condizione del timoniere e quella del saggio non fosse diversa.</text:p>
      <text:p text:style-name="P25">Il saggio non si propone di realizzare a ogni costo nel corso della vita i suoi scopi, ma di agire sempre con rettitudine: il timoniere, invece, si propone di condurre a ogni costo la nave in porto. Le arti sono strumenti, devono mantenere quello che promettono, la saggezza è signora e padrona; le arti sono al servizio della vita, la saggezza la comanda.</text:p>
      <text:p text:style-name="P25">Ritengo, quindi, che si debba rispondere diversamente: nessuna burrasca rende peggiore l'arte del timoniere o la sua attuazione pratica. Il timoniere non ti promette un esito fortunato, ma un servizio utile e la capacità di condurre la nave; e questa risulta tanto più evidente quanto maggiori sono le forze impreviste che lo ostacolano. Chi ha potuto dire: "<text:span text:style-name="T13">Nettuno, non avrai mai questa nave, se non sulla giusta rotta</text:span>", ha fatto abbastanza per l'arte sua. La tempesta non impedisce il lavoro del timoniere, ma il successo. "<text:span text:style-name="T13">Come?</text:span>" chiedono. "<text:span text:style-name="T13">Al timoniere non nuoce una cosa che gli impedisce di arrivare in porto, che rende vani i suoi tentativi, che lo spinge </text:span><text:soft-page-break/><text:span text:style-name="T13">indietro oppure non lo fa avanzare e distrugge l'attrezzatura dell'imbarcazione?</text:span>" </text:p>
      <text:p text:style-name="P25">Non gli nuoce come timoniere, ma come navigante: per altri aspetti egli non è un timoniere. Non impedisce la sua arte, anzi la mette in risalto; col mare tranquillo - dice il proverbio - tutti sono bravi piloti. Queste difficoltà danneggiano la nave, non il timoniere, in quanto timoniere. Il timoniere riveste due ruoli: uno comune a tutti i passeggeri della nave: anch'egli è un passeggero; l'altro suo proprio: è il timoniere.</text:p>
      <text:p text:style-name="P25">La tempesta gli nuoce come passeggero, non come timoniere. Inoltre l'arte del timoniere è un bene per gli altri: riguarda i passeggeri, come quella del medico riguarda i pazienti: l'arte del saggio è un bene comune, sia di coloro con cui vive, sia suo proprio. Perciò forse il timoniere subisce un danno quando la tempesta gli impedisce di compiere un servizio promesso ad altri; al saggio, invece, non nuocciono la povertà, il dolore e le altre vicissitudini della vita: non gli impediscono ogni attività, ma solo quelle che riguardano gli altri; egli è sempre in azione e realizza i suoi intenti soprattutto quando la sorte gli è sfavorevole; allora agisce nell'interesse della stessa saggezza che, come abbiamo detto, è un bene suo e degli altri.</text:p>
      <text:p text:style-name="P17">Il saggio, inoltre, può giovare agli altri anche se è oppresso dalle difficoltà. La povertà gli può impedire di <text:soft-page-break/>insegnare come governare lo stato, ma egli insegna come governare la povertà. La sua opera dura per tutta la vita. L'attività del saggio non la impediscono così nessun caso, nessuna circostanza: egli si occupa di quella stessa faccenda che gli impedisce di occuparsi d'altro. È pronto a entrambe le evenienze: essere padrone del bene e saper vincere il male.</text:p>
      <text:p text:style-name="P25"><text:span text:style-name="T6">Si è preparato, dico, a dimostrare la sua virtù sia nella buona che nella cattiva fortuna e a guardare non alla materia in cui la virtù si esplica, ma direttamente ad essa; perciò non lo ferma la povertà, né il dolore, né qualunque altro caso che distoglie e mette in fuga gli ignoranti. Pensi che i mali lo abbattano? Al contrario, se ne serve. Fidia non sapeva scolpire solo statue d'avorio, le faceva anche di bronzo. Se avesse avuto a disposizione marmo o un materiale anc</text:span><text:span text:style-name="T9">o</text:span><text:span text:style-name="T6">ra meno pregiato, avrebbe fatto il meglio che la materia consentiva. Così il saggio dimostrerà la sua virtù - se sarà possibile – nella ricchezza, se no, in povertà; se potrà, in patria, se no, in esilio; come comandante supremo, se no, come soldato; sano, se no storpio.</text:span></text:p>
      <text:p text:style-name="P17">Qualunque sia il suo destino, ne ricaverà cose memorabili. Ci sono domatori che ammaestrano bestie ferocissime e spaventose a trovarsele davanti, e non si accontentano di averle private della loro fierezza, le ammansiscono fino ad averne familiarità: il domatore <text:soft-page-break/>caccia la mano nelle fauci del leone, il sorvegliante bacia la tigre; un giovanissimo etiope fa inginocchiare l'elefante e lo fa passeggiare sulla fune. Così il saggio è capace di domare i mali: il dolore, la miseria, il disonore, il carcere, l'esilio, spaventosi sempre, davanti a lui diventano mansueti. Stammi bene.</text:p>
      <text:h text:style-name="P15" text:outline-level="3"><text:bookmark-start text:name="__RefHeading___Toc18172_3602757520"/>Lettera 92<text:bookmark-end text:name="__RefHeading___Toc18172_3602757520"/></text:h>
      <text:p text:style-name="P27">Io e te siamo d'accordo, penso: i beni materiali ce li procuriamo per il corpo, il corpo lo curiamo per onorare l'anima, nell'anima ci sono parti subalterne dateci per l'elemento principale, per mezzo delle quali ci muoviamo e ci nutriamo. In questo elemento principale c'è una parte irrazionale, e ce n'è anche una razionale; la prima è soggetta alla seconda, e questa è la sola a non essere subordinata a niente altro, ma a subordinare tutto a sé. Anche la ragione divina è preposta a tutto, non dipende da nessuno; così è la nostra ragione che da lei nasce.</text:p>
      <text:p text:style-name="P28">Se siamo d'accordo su questo punto, lo saremo di conseguenza anche sul fatto che la felicità consiste soltanto nell'avere la perfetta ragione. Essa sola non si scoraggia e sta salda contro la fortuna; in qualsiasi condizione conserva la padronanza di sé. Ed è il solo bene che non viene mai spezzato. È felice, secondo me, l'uomo che non può essere sminuito da nulla; è giunto alla sommità e non si appoggia che a se stesso: infatti, chi si sostiene con l'aiuto di qualcuno, può cadere. In <text:soft-page-break/>caso contrario, cominceranno a prevalere in noi elementi estranei. Ma chi vuole dipendere dalla fortuna o qual è il saggio che ammira se stesso per beni non suoi? Che cos'è la felicità? Uno stato duraturo di sicurezza e di serenità, e ce lo daranno la grandezza d'animo e la continuità nel giudicare sempre rettamente. Come ci si arriva? Esaminando la verità nella sua interezza, conservando nelle proprie azioni l'ordine, la misura, la dignità, una volontà che non fa il male, ma il bene, che non perde di vista la ragione e non se ne allontana mai, degna di essere amata e insieme ammirata. Infine, per dirla in breve, l'animo del saggio deve essere degno di dio. Che cosa può desiderare d'altro chi ha raggiunto ogni virtù?</text:p>
      <text:p text:style-name="P28"><text:span text:style-name="T25">I</text:span>nfatti, se i vizi possono contribuire al raggiungimento del bene supremo, la felicità consisterà in essi, poiché senza di essi non esiste. E che cosa c'è di più vergognoso e sciocco che legare all'irrazionale il bene di un animo razionale?</text:p>
      <text:p text:style-name="P27">Certi filosofi, tuttavia, ritengono che il sommo bene si accresca, poiché non è perfetto se la sorte è contraria. Anche Antipatro<text:note text:id="ftn21" text:note-class="footnote"><text:note-citation>3</text:note-citation><text:note-body><text:p text:style-name="P11">Antipatro fu un ufficiale di Filippo II, che lo incaricò, dopo la vittoria di Cheronea (338 a.C.) di condurre i cadaveri degli Ateniesi presso Atene.<text:span text:style-name="T26"> </text:span>Questo gesto era simbolicamente significativo, poiché rappresentava la sottomissione di Atene alla Macedonia <text:s/></text:p></text:note-body></text:note>, uno dei grandi rappresentanti della nostra scuola filosofica, attribuisce una certa importanza, sia pure molto scarsa, ai fattori esterni. Pensa che <text:soft-page-break/>assurdità sarebbe non accontentarsi della luce del giorno e voler accendere una fiammella: che valore può avere una scintilla quando splende il sole? Se non sei contento della sola virtù, è inevitabile che tu voglia aggiungerci o la serenità dello spirito, che i Greci chiamano <text:span text:style-name="T27">sofia</text:span>, o il piacere. L'una la si può accettare comunque, poiché l'animo libero dagli affanni si dedica all'osservazione dell'universo e niente lo distoglie dalla contemplazione della natura. L'altro, il piacere, è il bene delle bestie; aggiungiamo, dunque, l'irrazionale al razionale, l'immorale al morale, il piccolo al grande: l'eccitazione dei sensi rende la vita ‹felice›?</text:p>
      <text:p text:style-name="P28">Perché allora esitate a dire che l'uomo sta bene, se sta bene il palato? E tu, quest'individuo per cui il sommo bene consiste nei sapori, nei colori, nei suoni, lo annoveri non dico fra gli uomini di valore, ma fra gli uomini comuni? Esca da questa bellissima categoria di esseri, seconda unicamente agli dèi; da animale, contento solo di mangiare, si aggreghi alle bestie.</text:p>
      <text:p text:style-name="P28">L'elemento irrazionale dell'anima si suddivide in due parti: una audace, ambiziosa, sfrenata, immersa nelle passioni, l'altra vile, fiacca, dedita ai piaceri; alcuni tralasciano la prima, sfrenata, e tuttavia migliore, certo più forte e degna di un uomo, e ritengono necessaria alla felicità la seconda, senza nervo e spregevole. Vi hanno asservito la ragione, e il sommo bene dell'animale più <text:soft-page-break/>nobile lo hanno svilito e reso spregevole, facendolo diventare un impasto mostruoso di parti diverse e disarmoniche. Così il nostro Virgilio parlando di Scilla dice: <text:span text:style-name="T13">nella parte superiore fino al pube ha aspetto umano, di fanciulla dal bel petto; in basso è un mostro marino dal corpo smisurato con code di delfini unite a ventre di lupi</text:span>.</text:p>
      <text:p text:style-name="P28">A questa Scilla sono congiunti animali selvaggi, orribili, veloci: ma costoro, con che razza di mostri l'hanno messa insieme la saggezza? L'elemento principale dell'uomo è la virtù; a essa è unita la carne inutile e caduca, capace solo di ricevere il cibo, come afferma Posidonio.</text:p>
      <text:p text:style-name="P28">Quella virtù divina finisce in un elemento instabile e alle sue parti eccelse, degne di venerazione e del cielo, si congiunge un animale inerte e putrido. Quanto poi alla serenità dello spirito, di per sé non garantisce niente all'anima, rimuove, però gli ostacoli: il piacere, invece, distrugge e fiacca ogni forza. Si può trovare un'unione di corpi più contrastanti tra loro? A un elemento fortissimo se ne aggiunge uno del tutto inerte, a uno severissimo uno frivolo, a uno irreprensibile uno sfrenato fino all'immoralità.</text:p>
      <text:p text:style-name="P28">"<text:span text:style-name="T13">Ma come?</text:span>" si obietta, "<text:span text:style-name="T13">se la salute, la serenità e l'assenza di dolore non ostacolano la virtù, non cercherai di ottenerle?</text:span>" E perché no? Non, però; perché sono beni, ma perché sono secondo natura e perché le sceglierò con criterio. Che cosa avranno, allora, di positivo? Solo <text:soft-page-break/>questo: una scelta opportuna. Quando indosso un vestito adatto, quando cammino come si conviene, quando sto a tavola come si deve, non il pranzo o il camminare o il vestito sono beni, ma la mia intenzione di mantenere in ogni circostanza un comportamento in sintonia con la ragione. Dirò di più: l'uomo deve scegliere una veste pulita, poiché per natura l'uomo è un essere pulito ed elegante. Perciò non è un bene di per sé una veste pulita, ma la scelta di una veste pulita, poiché il bene non consiste nella cosa in sé, ma nel tipo di scelta; oneste sono le nostre azioni, non l'oggetto delle nostre azioni.</text:p>
      <text:p text:style-name="P28">Quanto ho detto del vestito, fa' conto che lo dica del corpo. Anche questo la natura lo ha messo intorno all'animo come una veste: è il suo manto. Chi ha mai valutato i vestiti in base all'armadio? Il fodero non rende una spada né buona, né cattiva. Quindi, ti rispondo lo stesso anche per il corpo: sceglierò se sarà possibile, la salute e le forze, ma il bene consisterà nel mio giudizio su di esse, non in questi elementi in se stessi.</text:p>
      <text:p text:style-name="P28">"<text:span text:style-name="T13">Certo</text:span>," dicono, "<text:span text:style-name="T13">il saggio è felice; tuttavia, raggiunge il sommo bene solo se ha a disposizione anche i mezzi naturali. Così non può essere infelice chi possiede la virtù, ma non è veramente felice chi ha perso i beni naturali, come la salute o l'integrità fisica.</text:span>" Quello che sembra più incredibile, tu lo ammetti, cioè che un uomo non sia <text:soft-page-break/>infelice in mezzo a dolori gravissimi e continui, anzi che sia addirittura felice; neghi, invece, la cosa più semplice: che sia veramente felice.</text:p>
      <text:p text:style-name="P28">Eppure, se la virtù può fare in modo che uno non sia infelice, più facilmente lo renderà molto felice; tra un uomo felice e uno molto felice c'è una distanza inferiore che tra uno infelice e uno felice. Oppure, una cosa che riesce a strappare un uomo alle disgrazie e renderlo felice, non può aggiungere quel che resta e renderlo molto felice? Le mancheranno le forze proprio all'ultimo?Nella vita ci sono beni e mali, entrambi fuori di noi. Se l'uomo virtuoso non è infelice, per quanto oppresso da ogni male, come può non essere molto felice anche se gli manca qualche bene? Come non è abbattuto dal peso dei mali fino a essere infelice, così non è strappato dalla condizione di uomo estremamente felice per la mancanza di beni, ma è molto felice senza beni quanto non è infelice sotto il peso dei mali; altrimenti, il suo bene, se lo si può diminuire, potrà anche essergli tolto.</text:p>
      <text:p text:style-name="P28">Poco fa dicevo che una fiammella non aggiunge niente alla luce del sole, poiché lo splendore di questo astro nasconde qualunque cosa brilli indipendentemente da lui. "<text:span text:style-name="T13">Ma ci sono corpi che fanno da ostacolo anche al sole,</text:span>" dicono. Il sole, però conserva la sua integrità anche in presenza di ostacoli, e, se pure c'è di mezzo qualcosa che ci impedisce di vederlo, è in attività e continua il suo <text:soft-page-break/>corso; ogni volta che risplende fra le nubi non è più debole e neppure più lento di quando c'è il sereno, poiché è una cosa molto diversa se c'è solo un ostacolo o un vero e proprio impedimento. Così quanto si oppone alla virtù non le sottrae nulla: essa non è più debole, ma riluce meno. Forse non ci è visibile e non brilla allo stesso modo, ma si mantiene identica a se stessa e, senza apparire, esercita la sua forza, come il sole quando è coperto. Così le sventure, le privazioni e le offese hanno sulla virtù lo stesso potere che una nube ha sul sole.</text:p>
      <text:p text:style-name="P28">C'è chi dice che il saggio, se non ha un fisico sano, non è felice, né infelice. Anche costoro sbagliano, poiché equiparano i beni fortuiti alle virtù e considerano alla stessa stregua l'onesto e il disonesto. Ma che cosa c'è di più ignobile e indegno che paragonare cose di tutto rispetto a cose spregevoli? Meritano rispetto la giustizia, la pietà, la lealtà, la fortezza, la prudenza: al contrario, sono senza valore i beni che spesso toccano con maggiore profusione agli uomini più infimi: gambe robuste, muscoli e denti sani e forti. Inoltre, se non considereremo né felice, né infelice il saggio sofferente nel fisico, ma lo relegheremo in una condizione di mezzo, anche la sua vita non dovrà essere né desiderata, né evitata. Ma che c'è di così assurdo quanto il pensare che la vita del saggio non sia desiderabile? Oppure di così incredibile che esista un tipo di vita da non desiderare e da non evitare? E poi, se i difetti fisici non rendono <text:soft-page-break/>infelici, permettono di essere felici: quello che non può peggiorare una condizione, non può neppure impedire che questa condizione diventi ottima. "<text:span text:style-name="T13">Noi conosciamo il freddo e il caldo</text:span>," ribattono, "<text:span text:style-name="T13">in mezzo c'è il tiepido; così c'è il felice, l'infelice, e chi non è né felice, né infelice.</text:span>"</text:p>
      <text:p text:style-name="P28">Voglio esaminare questo paragone che ci viene opposto. Se aggiungerò una sostanza più fredda a una tiepida, questa diventerà fredda, se ne aggiungerò una più calda, alla fine diventerà calda. Ma per quanto io aggravi le disgrazie di quest'uomo che non è felice, né infelice, non sarà infelice, come dite; quindi, il paragone non è appropriato. Eccoti, poi, un uomo né infelice, né felice. Gli aggiungo la cecità: non diventa infelice; la debolezza: non diventa infelice; dolori continui e violenti: non diventa infelice. Se tanti mali non lo portano all'infelicità, non possono nemmeno strapparlo alla felicità.</text:p>
      <text:p text:style-name="P28">Se il saggio, come voi dite, non può ridursi da felice a infelice, non può neppure ridursi all'assenza di felicità. Perché uno che ha incominciato a scivolare dovrebbe a un certo punto fermarsi? Ciò che non lo lascia precipitare fino in fondo lo trattiene in cima. E perché la felicità dovrebbe poter essere distrutta? Non può neppure essere diminuita e per questo la virtù da sola basta a raggiungerla. "<text:span text:style-name="T13">Ma come?</text:span>" continuano, "<text:span text:style-name="T13">il saggio che è vissuto più a lungo senza essere distratto da nessun dolore </text:span><text:soft-page-break/><text:span text:style-name="T13">non è più felice di quello che ha lottato sempre con la cattiva sorte?</text:span>"</text:p>
      <text:p text:style-name="P28">Rispondimi: è forse migliore e più onesto? Se non è così , non è neppure più felice. Per vivere più felicemente deve condurre una vita più retta: se non può vivere più rettamente, non potrà nemmeno essere più felice. La virtù non si accresce e, perciò, neppure la felicità che da essa nasce. La virtù è un bene così grande che non avverte questi insignificanti complementi, la brevità del tempo, il dolore e le varie malattie, poiché il piacere non è degno di essere preso in considerazione.</text:p>
      <text:p text:style-name="P28">Qual è la prerogativa della virtù? Non aver bisogno del futuro e non fare il conto dei propri giorni. In un momento conduce a pienezza i beni eterni. Questo ci sembra incredibile e superiore alla natura umana: noi misuriamo la sua grandezza in base alla nostra debolezza e diamo ai nostri vizi il nome di virtù. E dunque? Non sembra ugualmente incredibile che un uomo fra i più atroci tormenti, dica: "<text:span text:style-name="T13">Sono felice</text:span>"? Eppure queste parole si sono sentite proprio nella scuola del piacere. "<text:span text:style-name="T13">Vivo questo mio ultimo giorno, il più felice,</text:span>" disse Epicuro, anche se era tormentato da difficoltà urinarie e dal dolore di un'ulcera addominale inguaribile. E perché questo comportamento dovrebbe sembrare incredibile a chi pratica la virtù, quando si ritrova anche in quegli uomini che obbediscono al piacere? Anche questa gente <text:soft-page-break/>degenere e d'animo vilissimo sostiene che in mezzo alle più gravi sofferenze, alle più terribili disgrazie, il saggio non sarà né infelice, né felice. Eppure anche questo è incredibile, anzi più incredibile anc<text:span text:style-name="T28">o</text:span>ra: non vedo come la virtù cacciata dai suoi fastigi non precipiti in fondo. O deve assicurare all'uomo la felicità, oppure, se è costretta a rinunziare, non gli impedirà di diventare infelice. Finché è in lizza, non può ritirarsi: deve vincere o essere vinta.</text:p>
      <text:p text:style-name="P28">"<text:span text:style-name="T13">Solo agli dèi immortali</text:span>," dicono, "<text:span text:style-name="T13">è toccata la virtù e la felicità, a noi un pallido riflesso di quei beni; ci avviciniamo a essi, senza raggiungerli.</text:span>"</text:p>
      <text:p text:style-name="P27">In realtà la ragione è comune agli dèi e agli uomini; in quelli è perfetta, in noi è suscettibile di perfezione. Ma i nostri vizi ci portano a disperare. Infatti, l'uomo che ha una capacità di giudizio anc<text:span text:style-name="T28">o</text:span>ra vacillante e incerta è inferiore, in quanto poco fermo nel mantenere i suoi propositi di virtù. Des<text:span text:style-name="T28">i</text:span>deri pure vista e udito integri, salute, bell'aspetto e una vita lunga senza decadenza fisica. Così si può condurre una vita soddisfacente, ma c'è in quest'uomo imperfetto una certa quantità di malizia, poiché ha un animo incline al male; tuttavia, la sua non è una malizia profondamente radicata e che non ha tregua. Non è anc<text:span text:style-name="T28">o</text:span>ra un uomo virtuoso, ma cerca di rendersi tale; però, se a uno manca qualcosa per essere virtuoso, è malvagio. Ma chi ha coraggio e animo risoluto <text:soft-page-break/>in corpo eguaglia gli dèi e tende a loro memore della sua origine.</text:p>
      <text:p text:style-name="P28">Tutti giustamente si sforzano di risalire là da dove erano scesi. Perché non dovresti credere che ci sia qualcosa di divino in chi è parte di dio? Tutto quello che ci circonda è una sola cosa: dio; e noi ne siamo alleati e membra. La nostra anima ha la capacità di raggiungerlo, se i vizi non la trascinano in basso. Come il nostro corpo ha una posizione eretta e guardiamo al cielo, così l'anima, che può protendersi quanto vuole, desidera per sua formazione naturale le stesse cose degli dèi. E se si avvale delle sue forze e procede nel suo <text:span text:style-name="T28">a</text:span>mbito, tende alla vetta per la via che gli è propria. È una grande fatica salire al cielo: eppure vi fa ritorno. Trovata questa strada, avanza con coraggio, disprezzando ogni cosa; non si volta a guardare il denaro, l'oro e l'argento, del tutto degni delle tenebre in cui giacevano, non li v<text:span text:style-name="T28">a</text:span>luta dallo splendore con cui colpiscono gli occhi degli ignoranti, ma dal fango di vecchia data da cui la nostra avidità li ha separati ed estratti.</text:p>
      <text:p text:style-name="P28">L'anima sa, dico, che le ricchezze stanno altrove, non dove vengono ammassate; sa che si deve riempire lo spirito, non il forziere. La si può mettere a capo di tutto, darle il possesso della natura, in modo che l'oriente e l'occidente siano i confini delle sue proprietà e sia padrona dell'universo come gli dèi e disprezzi con le sue <text:soft-page-break/>ricchezze i ricchi; nessuno di loro è mai tanto lieto dei propri beni quanto triste per quelli altrui.</text:p>
      <text:p text:style-name="P28">Giunta a tale sublime altezza, non ama il corpo, ma se ne cura come di un peso necessario, e non si sottomette a quello cui è stata assegnata. Se uno è schiavo del corpo, non è libero; anche a trascurare gli altri padroni che si trovano, se ci si cura troppo del corpo, il suo dominio è capriccioso ed esigente. Dal corpo l'anima del saggio ora esce serenamente, ora balza fuori con audacia e non si chiede che fine faranno le sue spoglie; ma come non ci curiamo della barba e dei capelli tagliati via, così quell'anima divina quando sta per lasciare l'uomo ritiene che non la riguardi dove andrà a finire quello che era il suo riparo, se lo divori il fuoco o lo ricopra la terra o lo lacerino le fiere, come la placenta non riguarda un bambino appena nato.</text:p>
      <text:p text:style-name="P35"><text:span text:style-name="T10">Che importa a chi non c'è più se il suo corpo viene abbandonato allo strazio dei rapaci ed è gettato come preda ai pescecani e divorato? Ma anche quando è anc</text:span><text:span text:style-name="T11">o</text:span><text:span text:style-name="T10">ra fra gli uomini non teme nessuna minaccia di quegli spauracchi che spingono i nostri timori al di là della morte. "</text:span><text:span text:style-name="T15">Non mi atterrisce</text:span><text:span text:style-name="T10">," dice, "</text:span><text:span text:style-name="T15">l'uncino, né l'orribile vista del cadavere straziato ed esposto all'oltraggio. Non chiedo a nessuno di celebrare le mie esequie, a nessuno affido i miei resti. La natura provvede a non lasciare insepolto nessuno; il tempo ricoprirà i cadaveri </text:span><text:soft-page-break/><text:span text:style-name="T15">abbandonati dalla crudeltà umana.</text:span><text:span text:style-name="T10">" Dice bene Mecenate: non mi curo della tomba: la natura seppellisce i resti insepolti. Potresti pensare che a parlare sia stato un grand'uomo: avrebbe avuto un'indole nobile e virile, se il successo non l'avesse infiacchita.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6:23:23.258929238</dc:date>
    <dc:creator>corrado tafaro</dc:creator>
    <meta:editing-duration>PT39M56S</meta:editing-duration>
    <meta:editing-cycles>4</meta:editing-cycles>
    <meta:generator>LibreOffice/24.2.7.2$Linux_X86_64 LibreOffice_project/420$Build-2</meta:generator>
    <meta:document-statistic meta:table-count="0" meta:image-count="0" meta:object-count="0" meta:page-count="32" meta:paragraph-count="75" meta:word-count="7376" meta:character-count="43424" meta:non-whitespace-character-count="36119"/>
  </office:meta>
</office:document-meta>
</file>