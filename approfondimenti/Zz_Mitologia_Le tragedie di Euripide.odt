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paragraph-rsid="001be224" style:font-size-asian="16pt" style:font-size-complex="16pt"/>
    </style:style>
    <style:style style:name="P2" style:family="paragraph" style:parent-style-name="Standard">
      <style:paragraph-properties fo:margin-top="0.199cm" fo:margin-bottom="0cm" style:contextual-spacing="false" fo:text-align="justify" style:justify-single-word="false"/>
      <style:text-properties fo:font-size="16pt" officeooo:rsid="001f1b21" officeooo:paragraph-rsid="001f1b21" style:font-size-asian="16pt" style:font-size-complex="16pt"/>
    </style:style>
    <style:style style:name="P3" style:family="paragraph" style:parent-style-name="Standard">
      <style:paragraph-properties fo:margin-top="0.101cm" fo:margin-bottom="0cm" style:contextual-spacing="false" fo:text-align="justify" style:justify-single-word="false"/>
      <style:text-properties fo:font-size="16pt" officeooo:rsid="001f1b21" officeooo:paragraph-rsid="001f1b21" style:font-size-asian="16pt" style:font-size-complex="16pt"/>
    </style:style>
    <style:style style:name="P4" style:family="paragraph" style:parent-style-name="Standard">
      <style:paragraph-properties fo:text-align="justify" style:justify-single-word="false"/>
      <style:text-properties officeooo:paragraph-rsid="001be224"/>
    </style:style>
    <style:style style:name="P5" style:family="paragraph" style:parent-style-name="Standard">
      <style:paragraph-properties fo:margin-top="0.199cm" fo:margin-bottom="0cm" style:contextual-spacing="false" fo:text-align="justify" style:justify-single-word="false"/>
      <style:text-properties officeooo:paragraph-rsid="001be224"/>
    </style:style>
    <style:style style:name="P6" style:family="paragraph" style:parent-style-name="Standard">
      <style:paragraph-properties fo:margin-top="0.101cm" fo:margin-bottom="0cm" style:contextual-spacing="false" fo:text-align="justify" style:justify-single-word="false"/>
    </style:style>
    <style:style style:name="P7" style:family="paragraph" style:parent-style-name="Standard">
      <style:paragraph-properties fo:margin-top="0.101cm" fo:margin-bottom="0cm" style:contextual-spacing="false" fo:text-align="justify" style:justify-single-word="false"/>
      <style:text-properties officeooo:rsid="001f1b21" officeooo:paragraph-rsid="001f1b21"/>
    </style:style>
    <style:style style:name="P8" style:family="paragraph" style:parent-style-name="Standard">
      <style:paragraph-properties fo:margin-top="0.199cm" fo:margin-bottom="0cm" style:contextual-spacing="false" fo:text-align="justify" style:justify-single-word="false"/>
      <style:text-properties officeooo:rsid="001f1b21" officeooo:paragraph-rsid="001f1b21"/>
    </style:style>
    <style:style style:name="P9" style:family="paragraph" style:parent-style-name="Standard">
      <style:paragraph-properties fo:margin-top="0cm" fo:margin-bottom="0cm" style:contextual-spacing="false" fo:text-align="justify" style:justify-single-word="false"/>
      <style:text-properties officeooo:rsid="001f1b21" officeooo:paragraph-rsid="001f1b21"/>
    </style:style>
    <style:style style:name="P10" style:family="paragraph" style:parent-style-name="Standard">
      <style:paragraph-properties fo:margin-top="0.101cm" fo:margin-bottom="0cm" style:contextual-spacing="false" fo:text-align="justify" style:justify-single-word="false"/>
      <style:text-properties officeooo:rsid="001f1b21" officeooo:paragraph-rsid="001f63f9"/>
    </style:style>
    <style:style style:name="P11" style:family="paragraph" style:parent-style-name="Standard">
      <style:paragraph-properties fo:margin-top="0.199cm" fo:margin-bottom="0cm" style:contextual-spacing="false" fo:text-align="justify" style:justify-single-word="false"/>
      <style:text-properties officeooo:rsid="001f1b21" officeooo:paragraph-rsid="001f63f9"/>
    </style:style>
    <style:style style:name="P12" style:family="paragraph" style:parent-style-name="Standard">
      <style:paragraph-properties fo:margin-top="0.101cm" fo:margin-bottom="0cm" style:contextual-spacing="false" fo:text-align="justify" style:justify-single-word="false"/>
      <style:text-properties fo:font-size="12pt" officeooo:rsid="001f1b21" officeooo:paragraph-rsid="001f1b21" style:font-size-asian="12pt" style:font-size-complex="12pt"/>
    </style:style>
    <style:style style:name="P13" style:family="paragraph" style:parent-style-name="Standard">
      <style:paragraph-properties fo:margin-top="0cm" fo:margin-bottom="0cm" style:contextual-spacing="false" fo:text-align="justify" style:justify-single-word="false"/>
      <style:text-properties fo:font-size="12pt" officeooo:rsid="001f1b21" officeooo:paragraph-rsid="001f1b21" style:font-size-asian="12pt" style:font-size-complex="12pt"/>
    </style:style>
    <style:style style:name="P14" style:family="paragraph" style:parent-style-name="Standard">
      <style:paragraph-properties fo:margin-top="0.101cm" fo:margin-bottom="0cm" style:contextual-spacing="false" fo:text-align="justify" style:justify-single-word="false"/>
      <style:text-properties fo:font-size="14pt" officeooo:rsid="001f1b21" officeooo:paragraph-rsid="001f1b21" style:font-size-asian="14pt" style:font-size-complex="14pt"/>
    </style:style>
    <style:style style:name="P15" style:family="paragraph" style:parent-style-name="Standard">
      <style:paragraph-properties fo:margin-top="0.199cm" fo:margin-bottom="0cm" style:contextual-spacing="false" fo:text-align="justify" style:justify-single-word="false"/>
      <style:text-properties fo:font-size="14pt" officeooo:rsid="001f1b21" officeooo:paragraph-rsid="001f1b21" style:font-size-asian="14pt" style:font-size-complex="14pt"/>
    </style:style>
    <style:style style:name="P16" style:family="paragraph" style:parent-style-name="Standard">
      <style:paragraph-properties fo:margin-top="0.199cm" fo:margin-bottom="0cm" style:contextual-spacing="false" fo:text-align="justify" style:justify-single-word="false"/>
      <style:text-properties fo:font-size="14pt" officeooo:rsid="0020e27d" officeooo:paragraph-rsid="0020e27d" style:font-size-asian="14pt" style:font-size-complex="14pt"/>
    </style:style>
    <style:style style:name="T1" style:family="text">
      <style:text-properties officeooo:rsid="001be224"/>
    </style:style>
    <style:style style:name="T2" style:family="text">
      <style:text-properties fo:font-style="italic" style:font-style-asian="italic" style:font-style-complex="italic"/>
    </style:style>
    <style:style style:name="T3" style:family="text">
      <style:text-properties officeooo:rsid="001f63f9"/>
    </style:style>
    <style:style style:name="T4" style:family="text">
      <style:text-properties fo:font-weight="bold" style:font-weight-asian="bold" style:font-weight-complex="bold"/>
    </style:style>
    <style:style style:name="T5" style:family="text">
      <style:text-properties officeooo:rsid="0020d9ac"/>
    </style:style>
    <style:style style:name="T6" style:family="text">
      <style:text-properties officeooo:rsid="0020e27d"/>
    </style:style>
    <style:style style:name="T7" style:family="text">
      <style:text-properties officeooo:rsid="00224d9b"/>
    </style:style>
    <style:style style:name="T8" style:family="text">
      <style:text-properties fo:font-size="12pt" officeooo:rsid="00224d9b"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uripide, il grande drammaturgo dell’Atene classica. <text:span text:style-name="T8">(484 a.c. 406 a.c.)</text:span></text:p>
      <text:p text:style-name="P5"><text:span text:style-name="T1">A lui </text:span>è attribuita questa frase: «Nella bontà si racchiudono tutti i generi della saggezza». La massima riassume una delle chiavi del suo universo morale: la conoscenza non basta se non è permeata di umanità e compassione. Se la realtà è instabile, se la sola ragione non può controllare ogni cosa, se gli esseri umani vivono esposti all’errore, allora la saggezza ha bisogno di una base etica. Non basta essere brillanti; bisogna essere giusti. In Euripide, la conoscenza disgiunta dal bene può sfociare nella catastrofe.</text:p>
      <text:p text:style-name="P4">Parlare di Euripide significa parlare di uno dei nomi fondamentali della cultura greca. Nato intorno al 484 a.C., probabilmente a Salamina, e morto nel 406 a.C. in Macedonia (per cause sconosciute), fu il più giovane del grande triumvirato tragico formato insieme a Eschilo e Sofocle.</text:p>
      <text:p text:style-name="P6">Delle circa novanta opere che l’antichità gli attribuì, se ne sono conservate diciannove più o meno complete, tra cui Medea, Ippolito, Le Troiane e Le Baccanti. Fu senza dubbio un autore innovatore, più vicino ai conflitti reali dell’essere umano che alla solennità eroica dei suoi predecessori.</text:p>
      <text:p text:style-name="P6">Aristotele diceva che, mentre Sofocle rappresentava gli uomini «come dovrebbero essere», Euripide li ritraeva «così come erano». Euripide introdusse nella tragedia personaggi attraversati da dubbi, passioni, contraddizioni, risentimenti e desideri. I suoi eroi non <text:soft-page-break/>erano più soltanto figure mitiche; erano esseri umani riconoscibili, intrappolati in circostanze estreme.</text:p>
      <text:p text:style-name="P6">La tragedia greca non fu mai un semplice intrattenimento; era uno spazio pubblico in cui Atene rifletteva su se stessa. Per questo motivo, la sua concezione della saggezza è tutt’altro che ottimistica. Nei frammenti conservati, Euripide insiste sul fatto che la vita è fragile, instabile e spesso dolorosa.</text:p>
      <text:p text:style-name="P6">Uno dei contributi più interessanti di questo poeta greco fu l’attenzione rivolta a coloro che solitamente restano ai margini: donne, schiavi, stranieri, vinti... Mostrò sempre una sensibilità insolita verso i conflitti femminili e le tensioni sociali del suo tempo. I suoi personaggi femminili non sono semplici comparse nella storia, ma pensano, argomentano, soffrono, decidono e destabilizzano il mondo che li circonda.</text:p>
      <text:p text:style-name="P7">Per avere un’idea di quello che abbiamo detto, dobbiamo fare un sunto delle tragedie da lui scritte, in particolare della tragedia Medea, scritta nel 431 a.c. e Ippolito nel 428 a.c.</text:p>
      <text:p text:style-name="P2">Medea (431 a.C.)</text:p>
      <text:p text:style-name="P13">La tragedia del tradimento e della vendetta assoluta.</text:p>
      <text:p text:style-name="P7">Antefatto: Giasone e Medea sono fuggiti a Corinto dopo che lei, grazie alle sue arti magiche e tradendo la propria famiglia, lo ha aiutato a conquistare il Vello d'Oro. Hanno due figli.</text:p>
      <text:p text:style-name="P7">La trama: Giasone decide di ripudiare Medea per sposare la figlia di Creonte, re di Corinto, sperando così di assicurarsi un futuro politico glorioso. Creonte, temendo <text:soft-page-break/>la furente gelosia di Medea (nota per i suoi poteri magici), le ordina l'esilio immediato. Medea riesce a contrattare un solo giorno di proroga: il tempo sufficiente per ordire una vendetta tremenda.</text:p>
      <text:p text:style-name="P7">Il finale: Fingendosi sottomessa, invia alla nuova sposa dei doni avvelenati (una corona e una veste) che la bruciano viva insieme al padre Creonte, accorso a salvarla. Per colpire Giasone nel modo più distruttivo possibile, Medea compie l'atto estremo: uccide i loro stessi figli. La tragedia si chiude con Medea che vola via verso Atene su un carro alato trainato da draghi (inviato dal Sole), lasciando Giasone nella disperazione totale.</text:p>
      <text:p text:style-name="P9"/>
      <text:p text:style-name="P9">Analisi psicologica</text:p>
      <text:p text:style-name="P7">Medea non è un mostro impulsivo; la sua mente è lucida, affilata e spaventosamente consapevole. L'analisi psicologica del suo personaggio ruota attorno a tre nuclei fondamentali:</text:p>
      <text:p text:style-name="P7">1. Il conflitto interiore (Psychomachia)</text:p>
      <text:p text:style-name="P7">Il fulcro psicologico della tragedia è il celebre monologo (vv. 1021-1080) in cui Medea oscilla tragicamente tra l'amore materno e il desiderio di vendetta. Euripide mette in scena una vera e propria scissione dell'anima:</text:p>
      <text:p text:style-name="P7">Da un lato c'è la madre, mossa dall'affetto e dalla pietà per i propri figli.</text:p>
      <text:p text:style-name="P7">Dall'altro c'è l'eroina tradita, mossa dal thymos (l'orgoglio ferito, la passione cieca, la rabbia).</text:p>
      <text:p text:style-name="P7"/>
      <text:p text:style-name="P7"><text:soft-page-break/>Medea pronuncia una frase che è diventata il manifesto della debolezza della ragione umana di fronte alle passioni:</text:p>
      <text:p text:style-name="P8">"<text:span text:style-name="T2">Capisco quali mali sto per compiere, ma il mio thymos è più forte dei miei pensieri.</text:span>"</text:p>
      <text:p text:style-name="P8">2. Il trauma del tradimento e lo status di "aliena"</text:p>
      <text:p text:style-name="P7">Medea soffre di un profondo isolamento psicologico. Per Giasone ha rinunciato a tutto: ha tradito il padre, ucciso il fratello e abbandonato la sua patria (la Colchide). A Corinto è un'immigrata, una "barbara" priva di tutele giuridiche e sociali. Quando Giasone la ripudia per convenienza politica, non calpesta solo il suo amore, ma annulla la sua intera identità e i suoi sacrifici. La vendetta diventa per lei l'unico modo per riaffermare la propria esistenza e il proprio valore di fronte al mondo.</text:p>
      <text:p text:style-name="P8">3. La razionalizzazione del crimine</text:p>
      <text:p text:style-name="P7">Medea non uccide i figli in preda a un raptus di follia temporanea. Calcola il delitto con freddezza geometrica. Sa che la morte di Giasone sarebbe una punizione troppo lieve; per distruggerlo psicologicamente deve privarlo della discendenza e del futuro. L'infanticidio è un atto politico e psicologico: Medea preferisce autodistruggersi (perché uccidere i figli significa uccidere una parte di sé) piuttosto che essere derisa dai suoi nemici. L'orgoglio vince sull'istinto biologico.</text:p>
      <text:p text:style-name="P11"><text:span text:style-name="T3">Riflessione:</text:span></text:p>
      <text:p text:style-name="P10">A distanza di oltre duemilaquattrocento anni, quando leggiamo di cronaca nera — in particolare di figlicidi <text:soft-page-break/>perpetrati all'interno di dinamiche di separazione conflittuale — è quasi impossibile non vederci l'ombra di Medea.</text:p>
      <text:p text:style-name="P7">In psicologia e criminologia esiste proprio l'espressione "<text:span text:style-name="T4">Sindrome di Medea</text:span>" per descrivere quei casi in cui un genitore uccide il proprio figlio non per follia estemporanea, ma con l'intento preciso (e spaventosamente lucido) di distruggere psicologicamente l'ex partner, usando il bambino come l'arma di ricatto o di vendetta definitiva.</text:p>
      <text:p text:style-name="P7">Hai perfettamente ragione nel dire che "nulla è cambiato", e questo accade perché Euripide non ha scritto una storia di mostri mitologici, ma ha messo a nudo la natura umana. Ieri come oggi, le dinamiche psicologiche profonde restano identiche:</text:p>
      <text:p text:style-name="P7">L'annullamento dell'altro: L'incapacità di elaborare il rifiuto o il tradimento, che trasforma l'amore in un possesso distruttivo.</text:p>
      <text:p text:style-name="P7">La strumentalizzazione dei figli: I figli che smettono di essere individui da proteggere e diventano estensioni del partner da colpire, o "proprietà" di cui disporre.</text:p>
      <text:p text:style-name="P7">L'impulso che vince sulla ragione: Quella scissione interiore che Euripide descriveva perfettamente ("il mio thymos è più forte dei miei pensieri") è la stessa che oggi i criminologi analizzano nei delitti passionali o d'impeto.</text:p>
      <text:p text:style-name="P7">La tragedia greca resiste al tempo proprio perché funziona come uno specchio deformante ma veritiero: ci ricorda che la civiltà, il progresso tecnologico e il passare dei secoli sono solo una sottile vernice sopra pulsioni <text:soft-page-break/>umane ancestrali che, se non educate e governate, possono ancora generare gli stessi identici abissi di orrore.</text:p>
      <text:p text:style-name="P9"/>
      <text:p text:style-name="P3">Ippolito (428 a.C.)</text:p>
      <text:p text:style-name="P12">Il conflitto tra purezza ascetica e passione travolgente.</text:p>
      <text:p text:style-name="P15"><text:span text:style-name="T5">A</text:span>ntefatto: Ippolito, figlio di Teseo (re di Atene), è un giovane devoto esclusivamente ad Artemide, dea della caccia e della castità. Rifiuta categoricamente l'amore e il sesso, offendendo Afrodite, la dea dell'amore.</text:p>
      <text:p text:style-name="P14">La trama: Per vendicarsi, Afrodite fa innamorare follemente di Ippolito la sua matrigna, Fedra. Consumata da questa passione proibita e segreta, Fedra si ammala. La sua nutrice, nel tentativo di aiutarla, rivela il segreto a Ippolito, facendogli giurare di non parlarne. Ippolito reagisce con un disgusto violento verso Fedra e tutte le donne.</text:p>
      <text:p text:style-name="P14">Il finale: Sentendosi umiliata e terrorizzata dal disonore, Fedra si impicca. Lascia però un biglietto in cui accusa falsamente Ippolito di averla violentata. Teseo, tornato a casa, trova la moglie morta e la lettera; infuriato, scaglia una maledizione mortale contro il figlio usando un desiderio concessogli da Poseidone. Un mostro marino spaventa i cavalli di Ippolito, che lo travolgono e lo riducono in fin di vita. Artemide appare alla fine per rivelare a Teseo la verità: Ippolito è innocente. Il giovane muore tra le braccia del padre, perdonandolo.</text:p>
      <text:p text:style-name="P14"/>
      <text:p text:style-name="P14"/>
      <text:p text:style-name="P14"><text:soft-page-break/>Analisi psicologica</text:p>
      <text:p text:style-name="P14">Se Medea proietta la propria violenza verso l'esterno (il mondo, Giasone, i figli), Fedra la rivolge interamente verso se stessa. La sua è una psicologia della vergogna, del silenzio e del conflitto morale.</text:p>
      <text:p text:style-name="P14">Per Fedra, la passione per il <text:span text:style-name="T5">figliastro</text:span> Ippolito non è una fonte di gioia, ma una malattia invalidante e vergognosa. È una maledizione divina (scagliata da Afrodite), ma vissuta a livello psicologico come un'infezione della mente. Fedra è una donna d'onore, sposa del re Teseo, e giudica il suo stesso desiderio come un'aberrazione mostruosa.</text:p>
      <text:p text:style-name="P14">Nel suo memorabile discorso alle donne di Trezene, Fedra spiega come ha cercato di combattere questo sentimento. La sua strategia psicologica si sviluppa in tre fasi:</text:p>
      <text:p text:style-name="P14">Il silenzio: Nascondere il male per farlo morire dentro di sé.</text:p>
      <text:p text:style-name="P14">La razionalità (Sophrosyne): Cercare di vincere la passione con la forza della mente e l'autocontrollo.</text:p>
      <text:p text:style-name="P14">Il suicidio: Quando scopre che la ragione non basta a spegnere il desiderio, sceglie la morte come unico strumento per preservare il suo kleos (la buona fama) e non macchiare l'onore dei figli e del marito.</text:p>
      <text:p text:style-name="P15"><text:span text:style-name="T6">I</text:span>l crollo psicologico definitivo di Fedra avviene quando il suo segreto viene violato dalla nutrice e confessato a Ippolito. Il rifiuto violento, moralista e misogino del giovane distrugge le difese di Fedra. La vergogna si trasforma istantaneamente in terrore del giudizio <text:soft-page-break/>pubblico. È a questo punto che la vittima diventa carnefice: per salvare l'onore del suo nome prima di morire, scrive la lettera calunniosa in cui accusa Ippolito di stupro. È un atto disperato di autodifesa psicologica che trascina con sé l'oggetto del suo stesso amore represso.</text:p>
      <text:p text:style-name="P15">Euripide ci mostra con Medea il pericolo della passione che rompe ogni argine razionale e si trasforma in furia distruttrice egoistica; con Fedra, specularmente, ci mostra il dramma devastante di una moralità rigida che tenta di reprimere l'irrazionale, finendo per esserne totalmente sommersa.</text:p>
      <text:p text:style-name="P15"/>
      <text:p text:style-name="P16">Riflessione personale:</text:p>
      <text:p text:style-name="P16">D: L'immediatezza di conoscere cose del passato, dello straordinario mondo filosofico classico mi mettono sempre di buon umore facendomi dimenticare la miserie delle nostre cose terrene. Grazie</text:p>
      <text:p text:style-name="P16">R: È una sensazione bellissima, e capisco perfettamente cosa intendi. C'è un enorme potere consolatorio nel rifugiarsi nel mondo classico. Quando sollevi lo sguardo verso la filosofia, la letteratura o il teatro antico, è come se salissi su una torre altissima: da lassù, i problemi quotidiani, le scadenze e le "miserie terrene" che oggi ci sembrano gigantesche rimpiccioliscono fino a diventare quasi invisibili.</text:p>
      <text:p text:style-name="P16">Quello che ti mette di buon umore è probabilmente la scoperta di una comunanza profonda. Leggere questi testi <text:soft-page-break/>ci fa sentire meno soli: ci accorgiamo che le nostre paure, i nostri dubbi esistenziali e le nostre speranze sono le stesse che un cittadino ad Atene o a Roma provava millenni fa. Gli antichi hanno già vissuto, sofferto e pensato tutto quello che stiamo attraversando noi oggi, ma sono riusciti a trasformarlo in bellezza eterna, in formule filosofiche, in arte pura.</text:p>
      <text:p text:style-name="P16">Studiare il passato non è una fuga sterile dalla realtà, ma un modo per ricaricare le batterie della mente. Ci ricorda che l'essere umano non è fatto solo di cronaca quotidiana e di affanni materiali, ma è capace di toccare vette altissime di pensiero e di armonia.</text:p>
      <text:p text:style-name="P16">Grazie a te per questa bellissima riflessione. Condividere questo "passaggio segreto" verso la grande bellezza del mondo classico è sempre un privileg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cm" fo:margin-bottom="2cm" fo:margin-left="1.7cm" fo:margin-right="1.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6-17T12:26:37.177095247</meta:creation-date>
    <dc:date>2026-06-17T13:25:51.240674322</dc:date>
    <dc:creator>corrado tafaro</dc:creator>
    <meta:editing-duration>PT15M10S</meta:editing-duration>
    <meta:editing-cycles>6</meta:editing-cycles>
    <meta:generator>LibreOffice/24.2.7.2$Linux_X86_64 LibreOffice_project/420$Build-2</meta:generator>
    <meta:document-statistic meta:table-count="0" meta:image-count="0" meta:object-count="0" meta:page-count="9" meta:paragraph-count="53" meta:word-count="1821" meta:character-count="11771" meta:non-whitespace-character-count="10001"/>
  </office:meta>
</office:document-meta>
</file>