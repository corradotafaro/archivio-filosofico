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office:font-face-decls>
  <office:automatic-styles>
    <style:style style:name="P1" style:family="paragraph" style:parent-style-name="Standard">
      <style:paragraph-properties fo:line-height="115%" fo:text-align="justify" style:justify-single-word="false"/>
      <style:text-properties style:font-name="Liberation Serif1" fo:font-size="14pt" officeooo:paragraph-rsid="000499cf" style:font-size-asian="14pt" style:font-size-complex="14pt"/>
    </style:style>
    <style:style style:name="P2" style:family="paragraph" style:parent-style-name="Standard">
      <style:paragraph-properties fo:line-height="115%" fo:text-align="justify" style:justify-single-word="false"/>
      <style:text-properties style:font-name="Liberation Serif1" fo:font-size="14pt" officeooo:paragraph-rsid="000570dd" style:font-size-asian="14pt" style:font-size-complex="14pt"/>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1" fo:font-size="14pt" officeooo:paragraph-rsid="000d2483" style:font-size-asian="14pt" style:font-size-complex="14pt"/>
    </style:style>
    <style:style style:name="P4" style:family="paragraph" style:parent-style-name="Standard">
      <style:paragraph-properties fo:line-height="115%" fo:text-align="justify" style:justify-single-word="false"/>
      <style:text-properties style:font-name="Liberation Serif1" fo:font-size="14pt" fo:font-style="italic" officeooo:paragraph-rsid="000570dd" style:font-size-asian="14pt" style:font-style-asian="italic" style:font-size-complex="14pt" style:font-style-complex="italic"/>
    </style:style>
    <style:style style:name="P5" style:family="paragraph" style:parent-style-name="Standard">
      <style:paragraph-properties fo:margin-top="0.199cm" fo:margin-bottom="0cm" style:contextual-spacing="false" fo:line-height="115%" fo:text-align="justify" style:justify-single-word="false"/>
      <style:text-properties style:font-name="Liberation Serif1" fo:font-size="14pt" fo:font-style="italic" officeooo:paragraph-rsid="000570dd" style:font-size-asian="14pt" style:font-style-asian="italic" style:font-size-complex="14pt" style:font-style-complex="italic"/>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1" fo:font-size="14pt" fo:font-style="italic" officeooo:paragraph-rsid="00060033" style:font-size-asian="14pt" style:font-style-asian="italic" style:font-size-complex="14pt" style:font-style-complex="italic"/>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italic" officeooo:paragraph-rsid="000ad91d" style:font-size-asian="14pt" style:font-style-asian="italic" style:font-size-complex="14pt" style:font-style-complex="italic"/>
    </style:style>
    <style:style style:name="P8"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normal" officeooo:paragraph-rsid="0009cec6" style:font-size-asian="14pt" style:font-style-asian="normal" style:font-size-complex="14pt" style:font-style-complex="normal"/>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normal" officeooo:paragraph-rsid="00060033" style:font-size-asian="14pt" style:font-style-asian="normal" style:font-size-complex="14pt" style:font-style-complex="normal"/>
    </style:style>
    <style:style style:name="P10"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normal" officeooo:paragraph-rsid="000b6d2a" style:font-size-asian="14pt" style:font-style-asian="normal" style:font-size-complex="14pt" style:font-style-complex="normal"/>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normal" officeooo:paragraph-rsid="000beb15" style:font-size-asian="14pt" style:font-style-asian="normal" style:font-size-complex="14pt" style:font-style-complex="normal"/>
    </style:style>
    <style:style style:name="P12" style:family="paragraph" style:parent-style-name="Standard">
      <style:paragraph-properties fo:margin-top="0.199cm" fo:margin-bottom="0cm" style:contextual-spacing="false" fo:line-height="115%" fo:text-align="justify" style:justify-single-word="false"/>
      <style:text-properties style:font-name="Liberation Serif1" fo:font-size="14pt" fo:font-style="normal" officeooo:paragraph-rsid="000d2483" style:font-size-asian="14pt" style:font-style-asian="normal" style:font-size-complex="14pt" style:font-style-complex="normal"/>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1" fo:font-size="14pt" fo:font-style="normal" officeooo:paragraph-rsid="000d2483" style:font-size-asian="14pt" style:font-style-asian="normal" style:font-size-complex="14pt" style:font-style-complex="normal"/>
    </style:style>
    <style:style style:name="P14" style:family="paragraph" style:parent-style-name="Standard">
      <style:paragraph-properties fo:line-height="115%" fo:text-align="justify" style:justify-single-word="false"/>
      <style:text-properties style:font-name="Liberation Serif1" fo:font-size="16pt" officeooo:paragraph-rsid="000d2483" style:font-size-asian="16pt" style:font-size-complex="16pt"/>
    </style:style>
    <style:style style:name="T1" style:family="text">
      <style:text-properties fo:font-size="14pt" style:font-size-asian="14pt" style:font-size-complex="14pt"/>
    </style:style>
    <style:style style:name="T2" style:family="text">
      <style:text-properties fo:font-size="14pt" officeooo:rsid="000499cf" style:font-size-asian="14pt" style:font-size-complex="14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officeooo:rsid="000499cf" style:font-size-asian="10pt" style:font-size-complex="10pt"/>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tyle="normal" style:font-style-asian="normal" style:font-style-complex="normal"/>
    </style:style>
    <style:style style:name="T8" style:family="text">
      <style:text-properties fo:font-style="normal" officeooo:rsid="000570dd" style:font-style-asian="normal" style:font-style-complex="normal"/>
    </style:style>
    <style:style style:name="T9" style:family="text">
      <style:text-properties officeooo:rsid="000570dd"/>
    </style:style>
    <style:style style:name="T10" style:family="text">
      <style:text-properties officeooo:rsid="00060033"/>
    </style:style>
    <style:style style:name="T11" style:family="text">
      <style:text-properties style:font-name="Liberation Serif" officeooo:rsid="00060033"/>
    </style:style>
    <style:style style:name="T12" style:family="text">
      <style:text-properties officeooo:rsid="00062d80"/>
    </style:style>
    <style:style style:name="T13" style:family="text">
      <style:text-properties officeooo:rsid="000ad91d"/>
    </style:style>
    <style:style style:name="T14" style:family="text">
      <style:text-properties officeooo:rsid="0009cec6"/>
    </style:style>
    <style:style style:name="T15" style:family="text">
      <style:text-properties officeooo:rsid="000b6d2a"/>
    </style:style>
    <style:style style:name="T16" style:family="text">
      <style:text-properties officeooo:rsid="000bd4da"/>
    </style:style>
    <style:style style:name="T17" style:family="text">
      <style:text-properties officeooo:rsid="000beb15"/>
    </style:style>
    <style:style style:name="T18" style:family="text">
      <style:text-properties officeooo:rsid="000499cf"/>
    </style:style>
    <style:style style:name="T19" style:family="text">
      <style:text-properties fo:font-size="11pt" style:font-size-asian="11pt" style:font-size-complex="11pt"/>
    </style:style>
    <style:style style:name="T20" style:family="text">
      <style:text-properties fo:font-size="11pt" officeooo:rsid="000499cf" style:font-size-asian="11pt" style:font-size-complex="11pt"/>
    </style:style>
    <style:style style:name="T21" style:family="text">
      <style:text-properties officeooo:rsid="000d24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Le passioni dell’anima di Cartesio tra fisiologia e stoicismo</text:span></text:p>
      <text:p text:style-name="P3"><text:span text:style-name="T3">“La filosofia non è un’arte che cerca il favore popolare e non è fatta per essere ostentata; non consiste nelle parole, ma nei fatti. Di essa non ci si vale per far trascorrere piacevolmente le giornate, per eliminare il disgusto che viene dall’ozio: educa e forma l’animo, regola la vita, governa le azioni, mostra ciò che si deve o non si deve fare, siede al timone e dirige la rotta attraverso i pericoli di un mare agitato. Senza di lei nessuno può vivere tranquillo e sicuro; in ogni momento si presentano innumerevoli circostanze che esigono una direttiva, e questa bisogna cercarla nella filosofia.“</text:span><text:span text:style-name="T5">S</text:span><text:span text:style-name="T4">ENECA, Epistulae, II, 16, 3.</text:span><text:span text:style-name="T19"> </text:span><text:s/></text:p>
      <text:p text:style-name="P1"/>
      <text:p text:style-name="P2"><text:span text:style-name="T3">“Mi sembrava infatti che avrei potuto trovare molta più verità nei ragionamenti che ognuno fa a proposito delle faccende che gli stanno a cuore, e il cui esito finirebbe per punirlo immediatamente, se ha fatto un ragionamento sbagliato, che non in quelli che fa un uomo di lettere nel suo studio, a proposito di speculazioni che non gli causeranno altra conseguenza se non, forse, che egli ne trarrà tanta più vanità quanto più quelle saranno lontane dal senso comune, per il fatto che avrà dovuto impiegare tanto maggior ingegno ed </text:span><text:soft-page-break/><text:span text:style-name="T3">artificio per cercare di renderle verosimili”.<text:tab/></text:span><text:span text:style-name="T6">CARTESIO, Discours de la méthode, AT,VI,9-10.</text:span></text:p>
      <text:p text:style-name="P4"><text:span text:style-name="T7"/></text:p>
      <text:p text:style-name="P4"><text:span text:style-name="T8">Dalle epistole tra la principessa Elisabetta di Boemia, figlia di Federico V.</text:span></text:p>
      <text:p text:style-name="P4"/>
      <text:p text:style-name="P4">Elisabetta a Descartes, Lettera del 6/16 maggio 1643. «[…] <text:span text:style-name="T7">in quale maniera l’anima dell’uomo (non essendo che una sostanza pensante) può determinare gli spiriti del corpo, ed eseguire le azioni volontarie. […] il contatto infatti mi sembra incompatibile con una cosa immateriale. Motivo per cui vi domando una definizione di anima più particolareggiata che nella vostra Metafisica, ossia della sostanza separata dalla sua azione, ossia dal pensiero»</text:span>. <text:s/></text:p>
      <text:p text:style-name="P5">Elisabetta a Descartes, <text:span text:style-name="T9">[…] </text:span>«Riconoscendo in voi il miglior medico della mia anima […]».</text:p>
      <text:p text:style-name="P6"><text:span text:style-name="T9">D</text:span>a Cartesio al<text:span text:style-name="T9">l</text:span>a principessa, <text:span text:style-name="T9">L</text:span>ettera del 18 maggio <text:span text:style-name="T10">1</text:span>645«[…] <text:s/></text:p>
      <text:p text:style-name="P6"><text:span text:style-name="T10">«</text:span>La causa più comune della febbre persistente è la tristezza. Ora, l’accanimento della fortuna nel perseguitare la vostra casata vi offre continuamente dei motivi di contrarietà così noti ed evidenti, che non c’è bisogno di ricorrere a molte congetture, né essere molto addentro negli affari pubblici, per considerare che <text:soft-page-break/>proprio in questo consiste la principale causa della vostra indisposizione. E c’è da temere che non ne possiate essere completamente libera, se, in forza della vostra virtù, non rasserenate la vostra anima, malgrado i colpi avversi della fortuna». </text:p>
      <text:p text:style-name="P12"><text:span text:style-name="T12">Nella sua ultima fatica “</text:span>Le passioni dell’anima” egli continuò a sostenere che la mente «<text:span text:style-name="T3">è di una natura che non ha alcun rapporto con l’estensione, né con le dimensioni, o altre proprietà della materia di cui il corpo è composto </text:span>».</text:p>
      <text:p text:style-name="P13">La tesi dell’incorporeità della mente/anima e del dualismo ontologico tra il livello del pensiero e quello della materia, è, dunque, una vera e propria costante del sistema cartesiano.</text:p>
      <text:p text:style-name="P8">Questa soluzione ‘massimalista’ <text:span text:style-name="T13">fu</text:span> prontamente portat<text:span text:style-name="T13">a</text:span> alla ribalta dalla posizione oltranzista ed entusiastica di Regius, il discepolo ‘eretico’ di Cartesio che insegnava all’Università di Utrecht, secondo il quale «il nesso tra due realtà distinte con rigore cartesiano non potrebbe intendersi se non quale nesso accidentale, cosicché l’uomo stesso dovrebbe definirsi “ens per accidens”».</text:p>
      <text:p text:style-name="P8"><text:span text:style-name="T14">Tuttavia</text:span> Cartesio <text:span text:style-name="T14">preso </text:span>dal timore che il proprio dualismo delle sostanze, po<text:span text:style-name="T14">tesse diventare foriera di pericolose conseguenze di natura teologica, oltre ad </text:span>essere interpretato come un platonismo radicale, <text:span text:style-name="T13">prende </text:span><text:soft-page-break/>le distanze dalle speculazioni di Regius <text:span text:style-name="T13">e lo </text:span>ammonisce di non dire che l'uomo è ente per accidente, ma un vero ente. La mente è unita al corpo realmente e sostanzialmente. "La natura, così intesa, nient’altro mi insegna tanto chiaramente quanto che ho un corpo che sta male quando io sento dolore, ha bisogno di cibo o bevande quando io soffro la fame o la sete, e così via: e non devo quindi dubitare che in ciò ci sia qualcosa di vero."</text:p>
      <text:p text:style-name="P9">E qui si coglie un punto interessante e molto complesso che potrebbe portare ad una contraddizione. Cartesio, nel suo pensiero, sottolinea la distinzione tra la mente e il corpo, ma al contempo riconosce la loro interazione e l'importanza di entrambi nella nostra esperienza umana. La citazione riportata evidenzia come Cartesio non neghi la realtà del corpo e delle sue necessità, ma piuttosto sottolinei che queste sono inseparabilmente connesse alla nostra esperienza cosciente. La contraddizione che si avverte potrebbe derivare dalla tensione intrinseca nel tentativo di conciliare queste due dimensioni dell'essere umano. Da un lato, Cartesio vede la mente come la vera essenza dell'uomo, mentre dall'altro, non può negare che il corpo influenzi direttamente la nostra esperienza e il nostro benessere.</text:p>
      <text:p text:style-name="P9"><text:soft-page-break/>In questo senso, la frase "<text:span text:style-name="T3">l'uomo è ente per accidente</text:span>" può sembrare riduttiva rispetto alla complessità dell'esperienza umana <text:span text:style-name="T13">e</text:span> Cartesio stesso, infatti, corregge questa visione, affermando che l'uomo è un vero ente, con una natura che comprende sia la mente che il corpo in una relazione sostanziale e reale.</text:p>
      <text:p text:style-name="P7">Descartes a Elisabetta, 21 maggio 1643.</text:p>
      <text:p text:style-name="P7">«In primo luogo considero che vi sono alcune nozioni primitive, che sono come gli originali sul cui modello formiamo tutte le nostre altre conoscenze. […] per l’anima e il corpo insieme, non abbiamo che la nozione della loro unione, dalla quale dipende quella della forza che l’anima ha di muovere il corpo, e il corpo di agire sull’anima, causandone sentimenti e passioni». </text:p>
      <text:p text:style-name="P7">Descartes a Elisabetta, 28 giugno 1643.</text:p>
      <text:p text:style-name="P7">«In primo luogo, dunque, noto una grande differenza tra questi tipi di nozioni per il fatto che l’anima non è concepita che tramite l’intelletto puro; anche il corpo, cioè l’estensione, le figure e i movimenti, si possono conoscere tramite il solo intelletto, ma molto meglio attraverso l’intelletto soccorso dall’immaginazione; e infine le cose che appartengono all’unione dell’anima e del corpo si conoscono solo oscuramente tramite il solo intelletto, e anche tramite l’intelletto soccorso <text:soft-page-break/>dall’immaginazione; ma si conoscono molto chiaramente tramite i sensi». </text:p>
      <text:p text:style-name="P10"><text:span text:style-name="T15">S</text:span>arà infatti proprio questa problematica ad attirare <text:span text:style-name="T15">l</text:span>’attenzione della principessa Elisabetta e a innescare il suo successivo intenso scambio epistolare con il filosofo. Se esiste una ‘barriera ontologica’ tra la res cogitans e la res extensa, allora questo stato di cose comporta l’impossibilità di una loro causalità reciproca, concepibile solamente all’interno di ciascuna sostanza (pensiero con pensiero, corpo con corpo). Tuttavia, per Cartesio la coppia concettuale mente/corpo si esplica in un complesso e articolato modello interattivo globale che vede nella loro unione un «insegnamento della natura», un’innegabile esperienza quotidiana, dotata di una fisionomia decisamente multidimensionale garantita dalla veracità di Dio.</text:p>
      <text:p text:style-name="P10"><text:span text:style-name="T16">Riconducendo </text:span>e contemporaneamente superando sia il modello platonico (l’anima che si serve di un corpo come se questo fosse uno strumento), sia quello aristotelico (anima come forma sostanziale del corpo), Cartesio giunge a tematizzare l’esistenza di una terza nozione primitiva. Infatti, egli scrive ne<text:span text:style-name="T16">i </text:span>Principi di filosofia, noi sperimentiamo, oltre al pensiero e alla materia, «<text:span text:style-name="T3">anche altre cose, che non si debbono riferire né alla sola mente, e neanche al solo corpo, e che […] provengono </text:span><text:soft-page-break/><text:span text:style-name="T3">dalla stretta e intima unione della nostra mente col corpo; cioè gli appetiti della fame, della sete, eccetera</text:span>». </text:p>
      <text:p text:style-name="P11">La trattazione cartesiana della natura umana è piuttosto complessa, <text:span text:style-name="T17">ma in sintesi </text:span>Cartesio vede <text:span text:style-name="T17">nella </text:span>natura umana la capacità dell'essere umano (sia mente che corpo) di adattarsi e cambiare in risposta a diverse condizioni e stimoli.</text:p>
      <text:p text:style-name="P11"><text:span text:style-name="T17">Il </text:span>corpo <text:span text:style-name="T17">tende </text:span>a seguire movimenti e reazioni automatiche causate dagli "spiriti animali", che secondo Cartesio, sono delle sostanze che circolano nel corpo e influenzano le nostre azioni e reazioni. Nonostante queste reazioni automatiche, l'essere umano ha la capacità di adattarsi e può essere "addestrato" o manipolato con tecniche simili a quelle utilizzate per addestrare i cani da caccia. Questo significa che, attraverso la ripetizione e l'allenamento, l'uomo può modificare il suo comportamento e le sue reazioni.<text:line-break/>l'essere umano ha una notevole capacità di adattamento e può essere condizionato attraverso l'allenamento e la ripetizione.<text:line-break/><text:line-break/><text:line-break/>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ans"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fo:font-size="10pt"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5-01-20T18:21:40.160000000</meta:creation-date>
    <dc:date>2026-04-04T18:34:59.078325440</dc:date>
    <dc:creator>corrado tafaro</dc:creator>
    <meta:editing-duration>PT4M26S</meta:editing-duration>
    <meta:editing-cycles>3</meta:editing-cycles>
    <meta:generator>LibreOffice/24.2.7.2$Linux_X86_64 LibreOffice_project/420$Build-2</meta:generator>
    <meta:document-statistic meta:table-count="0" meta:image-count="0" meta:object-count="0" meta:page-count="7" meta:paragraph-count="22" meta:word-count="1289" meta:character-count="8393" meta:non-whitespace-character-count="7112"/>
  </office:meta>
</office:document-meta>
</file>