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text-properties officeooo:paragraph-rsid="0024df04"/>
    </style:style>
    <style:style style:name="P3" style:family="paragraph" style:parent-style-name="Standard">
      <style:paragraph-properties fo:line-height="115%" fo:text-align="center" style:justify-single-word="false"/>
      <style:text-properties style:font-name="Liberation Serif" fo:font-size="14pt" officeooo:rsid="002a6ee9" officeooo:paragraph-rsid="002a6ee9" style:font-size-asian="14pt" style:font-size-complex="14pt"/>
    </style:style>
    <style:style style:name="P4" style:family="paragraph" style:parent-style-name="Standard">
      <style:paragraph-properties fo:line-height="115%" fo:text-align="justify" style:justify-single-word="false"/>
      <style:text-properties style:font-name="Liberation Serif" fo:font-size="14pt" officeooo:rsid="002a6ee9" officeooo:paragraph-rsid="002a6ee9" style:font-size-asian="14pt" style:font-size-complex="14pt"/>
    </style:style>
    <style:style style:name="P5" style:family="paragraph" style:parent-style-name="Standard">
      <style:paragraph-properties fo:line-height="115%" fo:text-align="justify" style:justify-single-word="false"/>
      <style:text-properties style:font-name="Liberation Serif" fo:font-size="14pt" officeooo:paragraph-rsid="002a6ee9" style:font-size-asian="14pt" style:font-size-complex="14pt"/>
    </style:style>
    <style:style style:name="P6" style:family="paragraph" style:parent-style-name="Standard">
      <style:paragraph-properties fo:line-height="115%" fo:text-align="justify" style:justify-single-word="false"/>
      <style:text-properties style:font-name="Liberation Serif" fo:font-size="14pt" officeooo:paragraph-rsid="0015febb" style:font-size-asian="14pt" style:font-size-complex="14pt"/>
    </style:style>
    <style:style style:name="P7" style:family="paragraph" style:parent-style-name="Standard">
      <style:paragraph-properties fo:line-height="115%" fo:text-align="justify" style:justify-single-word="false"/>
      <style:text-properties style:font-name="Liberation Serif" fo:font-size="14pt" officeooo:paragraph-rsid="00175fdd" style:font-size-asian="14pt" style:font-size-complex="14pt"/>
    </style:style>
    <style:style style:name="P8" style:family="paragraph" style:parent-style-name="Standard">
      <style:paragraph-properties fo:line-height="115%" fo:text-align="justify" style:justify-single-word="false"/>
      <style:text-properties style:font-name="Liberation Serif" fo:font-size="14pt" officeooo:paragraph-rsid="001a7838" style:font-size-asian="14pt" style:font-size-complex="14pt"/>
    </style:style>
    <style:style style:name="P9" style:family="paragraph" style:parent-style-name="Standard">
      <style:paragraph-properties fo:margin-top="0.101cm" fo:margin-bottom="0cm" style:contextual-spacing="false" fo:line-height="115%" fo:text-align="justify" style:justify-single-word="false"/>
      <style:text-properties style:font-name="Liberation Serif" fo:font-size="14pt" officeooo:paragraph-rsid="001a7838" style:font-size-asian="14pt" style:font-size-complex="14pt"/>
    </style:style>
    <style:style style:name="P10" style:family="paragraph" style:parent-style-name="Standard">
      <style:paragraph-properties fo:line-height="115%" fo:text-align="justify" style:justify-single-word="false"/>
      <style:text-properties style:font-name="Liberation Serif" fo:font-size="14pt" officeooo:paragraph-rsid="001f3219" style:font-size-asian="14pt" style:font-size-complex="14pt"/>
    </style:style>
    <style:style style:name="P11"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f3219" style:font-size-asian="14pt" style:font-size-complex="14pt"/>
    </style:style>
    <style:style style:name="P12" style:family="paragraph" style:parent-style-name="Standard">
      <style:paragraph-properties fo:line-height="115%" fo:text-align="center" style:justify-single-word="false"/>
      <style:text-properties style:font-name="Liberation Serif" fo:font-size="14pt" fo:font-weight="bold" officeooo:rsid="002005a5" officeooo:paragraph-rsid="002a6ee9" style:font-size-asian="14pt" style:font-weight-asian="bold" style:font-size-complex="14pt" style:font-weight-complex="bold"/>
    </style:style>
    <style:style style:name="P13" style:family="paragraph" style:parent-style-name="Standard">
      <style:paragraph-properties fo:margin-top="0.199cm" fo:margin-bottom="0cm" style:contextual-spacing="false" fo:line-height="115%" fo:text-align="justify" style:justify-single-word="false"/>
      <style:text-properties style:font-name="Liberation Serif" fo:font-size="14pt" officeooo:paragraph-rsid="001f3219" style:font-size-asian="14pt" style:font-size-complex="14pt"/>
    </style:style>
    <style:style style:name="P14" style:family="paragraph" style:parent-style-name="Standard">
      <style:paragraph-properties fo:line-height="115%" fo:text-align="justify" style:justify-single-word="false"/>
      <style:text-properties fo:font-style="italic" officeooo:paragraph-rsid="00175fdd" style:font-style-asian="italic" style:font-style-complex="italic"/>
    </style:style>
    <style:style style:name="P15" style:family="paragraph" style:parent-style-name="Standard">
      <style:paragraph-properties fo:line-height="115%" fo:text-align="justify" style:justify-single-word="false"/>
      <style:text-properties fo:font-style="italic" officeooo:paragraph-rsid="001a7838" style:font-style-asian="italic" style:font-style-complex="italic"/>
    </style:style>
    <style:style style:name="P16" style:family="paragraph" style:parent-style-name="Text_20_body">
      <style:paragraph-properties fo:margin-top="0.199cm" fo:margin-bottom="0.25cm" style:contextual-spacing="false" fo:line-height="115%" fo:text-align="justify" style:justify-single-word="false"/>
      <style:text-properties style:font-name="Liberation Serif" fo:font-size="14pt" officeooo:paragraph-rsid="00175fdd" style:font-size-asian="14pt" style:font-size-complex="14pt"/>
    </style:style>
    <style:style style:name="P17" style:family="paragraph" style:parent-style-name="Text_20_body">
      <style:paragraph-properties fo:margin-top="0.199cm" fo:margin-bottom="0cm" style:contextual-spacing="false" fo:line-height="115%" fo:text-align="justify" style:justify-single-word="false"/>
      <style:text-properties style:font-name="Liberation Serif" fo:font-size="14pt" officeooo:paragraph-rsid="0027da60" style:font-size-asian="14pt" style:font-size-complex="14pt"/>
    </style:style>
    <style:style style:name="P18" style:family="paragraph" style:parent-style-name="Text_20_body">
      <style:paragraph-properties fo:margin-top="0.199cm" fo:margin-bottom="0.25cm" style:contextual-spacing="false" fo:line-height="115%" fo:text-align="justify" style:justify-single-word="false"/>
      <style:text-properties style:font-name="Liberation Serif" fo:font-size="14pt" officeooo:paragraph-rsid="0032b863" style:font-size-asian="14pt" style:font-size-complex="14pt"/>
    </style:style>
    <style:style style:name="P19" style:family="paragraph" style:parent-style-name="Text_20_body">
      <style:paragraph-properties fo:margin-top="0.199cm" fo:margin-bottom="0cm" style:contextual-spacing="false" fo:line-height="115%" fo:text-align="justify" style:justify-single-word="false"/>
      <style:text-properties style:font-name="Liberation Serif" fo:font-size="14pt" officeooo:paragraph-rsid="0035b404" style:font-size-asian="14pt" style:font-size-complex="14pt"/>
    </style:style>
    <style:style style:name="P20" style:family="paragraph" style:parent-style-name="Text_20_body">
      <style:paragraph-properties fo:margin-top="0cm" fo:margin-bottom="0cm" style:contextual-spacing="false" fo:line-height="115%" fo:text-align="justify" style:justify-single-word="false"/>
      <style:text-properties style:font-name="Liberation Serif" fo:font-size="14pt" officeooo:paragraph-rsid="0035b404" style:font-size-asian="14pt" style:font-size-complex="14pt"/>
    </style:style>
    <style:style style:name="P21" style:family="paragraph" style:parent-style-name="Text_20_body">
      <style:paragraph-properties fo:margin-top="0cm" fo:margin-bottom="0cm" style:contextual-spacing="false" fo:line-height="115%" fo:text-align="justify" style:justify-single-word="false"/>
      <style:text-properties style:font-name="Liberation Serif" fo:font-size="14pt" fo:font-style="italic" officeooo:paragraph-rsid="0032b863" style:font-size-asian="14pt" style:font-style-asian="italic" style:font-size-complex="14pt" style:font-style-complex="italic"/>
    </style:style>
    <style:style style:name="P22" style:family="paragraph" style:parent-style-name="Text_20_body">
      <style:paragraph-properties fo:margin-top="0cm" fo:margin-bottom="0cm" style:contextual-spacing="false" fo:line-height="115%" fo:text-align="justify" style:justify-single-word="false"/>
      <style:text-properties officeooo:paragraph-rsid="0032b863"/>
    </style:style>
    <style:style style:name="P23" style:family="paragraph" style:parent-style-name="Text_20_body">
      <style:paragraph-properties fo:margin-top="0.101cm" fo:margin-bottom="0cm" style:contextual-spacing="false" fo:line-height="115%" fo:text-align="justify" style:justify-single-word="false"/>
      <style:text-properties officeooo:paragraph-rsid="0032b863"/>
    </style:style>
    <style:style style:name="P24" style:family="paragraph" style:parent-style-name="Text_20_body">
      <style:paragraph-properties fo:margin-top="0.199cm" fo:margin-bottom="0.25cm" style:contextual-spacing="false" fo:line-height="115%" fo:text-align="justify" style:justify-single-word="false"/>
      <style:text-properties officeooo:paragraph-rsid="00341abc"/>
    </style:style>
    <style:style style:name="P25" style:family="paragraph" style:parent-style-name="Text_20_body">
      <style:paragraph-properties fo:margin-top="0.101cm" fo:margin-bottom="0cm" style:contextual-spacing="false" fo:line-height="115%" fo:text-align="justify" style:justify-single-word="false"/>
      <style:text-properties officeooo:paragraph-rsid="00341abc"/>
    </style:style>
    <style:style style:name="P26" style:family="paragraph" style:parent-style-name="Text_20_body">
      <style:paragraph-properties fo:margin-top="0cm" fo:margin-bottom="0cm" style:contextual-spacing="false" fo:line-height="115%" fo:text-align="justify" style:justify-single-word="false"/>
      <style:text-properties officeooo:paragraph-rsid="00341abc"/>
    </style:style>
    <style:style style:name="T1" style:family="text">
      <style:text-properties style:font-name="Liberation Serif" fo:font-size="14pt" style:font-size-asian="14pt" style:font-size-complex="14pt"/>
    </style:style>
    <style:style style:name="T2" style:family="text">
      <style:text-properties style:font-name="Liberation Serif" fo:font-size="14pt" officeooo:rsid="00175fdd" style:font-size-asian="14pt" style:font-size-complex="14pt"/>
    </style:style>
    <style:style style:name="T3" style:family="text">
      <style:text-properties style:font-name="Liberation Serif" fo:font-size="14pt" officeooo:rsid="00188e55" style:font-size-asian="14pt" style:font-size-complex="14pt"/>
    </style:style>
    <style:style style:name="T4" style:family="text">
      <style:text-properties style:font-name="Liberation Serif" fo:font-size="14pt" officeooo:rsid="001c440f" style:font-size-asian="14pt" style:font-size-complex="14pt"/>
    </style:style>
    <style:style style:name="T5" style:family="text">
      <style:text-properties style:font-name="Liberation Serif" fo:font-size="14pt" officeooo:rsid="0032b863" style:font-size-asian="14pt" style:font-size-complex="14pt"/>
    </style:style>
    <style:style style:name="T6" style:family="text">
      <style:text-properties style:font-name="Liberation Serif" fo:font-size="14pt" officeooo:rsid="00347eb6" style:font-size-asian="14pt" style:font-size-complex="14pt"/>
    </style:style>
    <style:style style:name="T7" style:family="text">
      <style:text-properties style:font-name="Liberation Serif" fo:font-size="14pt" fo:font-weight="normal" officeooo:rsid="00175fdd" style:font-size-asian="14pt" style:font-weight-asian="normal" style:font-size-complex="14pt" style:font-weight-complex="normal"/>
    </style:style>
    <style:style style:name="T8" style:family="text">
      <style:text-properties style:font-name="Liberation Serif" fo:font-size="14pt" fo:font-style="italic" officeooo:rsid="0032b863" style:font-size-asian="14pt" style:font-style-asian="italic" style:font-size-complex="14pt" style:font-style-complex="italic"/>
    </style:style>
    <style:style style:name="T9" style:family="text">
      <style:text-properties style:font-name="Liberation Serif" fo:font-size="14pt" fo:font-style="italic" officeooo:rsid="00175fdd" style:font-size-asian="14pt" style:font-style-asian="italic" style:font-size-complex="14pt" style:font-style-complex="italic"/>
    </style:style>
    <style:style style:name="T10" style:family="text">
      <style:text-properties style:font-name="Liberation Serif" officeooo:rsid="00175fdd"/>
    </style:style>
    <style:style style:name="T11" style:family="text">
      <style:text-properties style:font-name="Liberation Serif" officeooo:rsid="00341abc"/>
    </style:style>
    <style:style style:name="T12" style:family="text">
      <style:text-properties officeooo:rsid="0015febb"/>
    </style:style>
    <style:style style:name="T13" style:family="text">
      <style:text-properties officeooo:rsid="0024df04"/>
    </style:style>
    <style:style style:name="T14" style:family="text">
      <style:text-properties officeooo:rsid="002005a5"/>
    </style:style>
    <style:style style:name="T15" style:family="text">
      <style:text-properties officeooo:rsid="002de211"/>
    </style:style>
    <style:style style:name="T16" style:family="text">
      <style:text-properties style:font-name="Liberation Serif"/>
    </style:style>
    <style:style style:name="T17" style:family="text">
      <style:text-properties style:font-name="Liberation Serif" fo:font-size="14pt" officeooo:rsid="00175fdd" style:font-size-asian="14pt" style:font-size-complex="14pt"/>
    </style:style>
    <style:style style:name="T18" style:family="text">
      <style:text-properties officeooo:rsid="002f3984"/>
    </style:style>
    <style:style style:name="T19" style:family="text">
      <style:text-properties officeooo:rsid="00175fdd"/>
    </style:style>
    <style:style style:name="T20" style:family="text">
      <style:text-properties officeooo:rsid="0017a9e4"/>
    </style:style>
    <style:style style:name="T21" style:family="text">
      <style:text-properties officeooo:rsid="00185d0b"/>
    </style:style>
    <style:style style:name="T22" style:family="text">
      <style:text-properties officeooo:rsid="001a7838"/>
    </style:style>
    <style:style style:name="T23" style:family="text">
      <style:text-properties officeooo:rsid="0026407c"/>
    </style:style>
    <style:style style:name="T24" style:family="text">
      <style:text-properties officeooo:rsid="00341abc"/>
    </style:style>
    <style:style style:name="T25" style:family="text">
      <style:text-properties fo:font-weight="bold" officeooo:rsid="00175fdd" style:font-weight-asian="bold" style:font-weight-complex="bold"/>
    </style:style>
    <style:style style:name="T26" style:family="text">
      <style:text-properties officeooo:rsid="0035b4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 dialogo con i nostri pregiudizi </text:p>
      <text:p text:style-name="P3"><text:span text:style-name="T14">(</text:span>Il testo è tratto dalla sintesi di una conferenza del Prof. <text:span text:style-name="T15">f</text:span>ilosofo Umberto Galimberti)</text:p>
      <text:p text:style-name="P4"/>
      <text:p text:style-name="P5">Che cos’è un pregiudizio? <text:span text:style-name="T18">Il</text:span><text:span text:style-name="T12"> </text:span>pregiudizio è l’insieme delle idee che ciascuno di noi assume come proprie in virtù della propria nascita, educazione, formazione culturale e relazionale. Queste idee costituiscono il fondamento dell’identità e dell’appartenenza, e non possono essere facilmente abbandonate senza mettere a rischio la coesione personale e sociale.</text:p>
      <text:p text:style-name="P6">Posso separarmi da esse? No, perché senza di esse la mia identità vacilla. Posso diventare musulmano? È improbabile: sono nato in una cultura cristiana, e il cristianesimo non è soltanto una religione, ma un inconscio collettivo che plasma il nostro modo di guardare il tempo. Esso lo divide in tre dimensioni: il passato come colpa, il presente come redenzione, il futuro come salvezza. La scienza, che crediamo opposta alla religione, ripete lo stesso schema: il passato è ignoranza, il presente ricerca, il futuro progresso. È cristianesimo laicizzato. Anche Marx è cristiano: il passato è ingiustizia, il presente è lotta, il futuro è giustizia. Anche Freud, pur scrivendo contro la religione, pensa il tempo così: il passato è trauma, il presente analisi, il futuro guarigione. Il cristianesimo è la forma dell’Occidente: perfetta coincidenza. Anche <text:soft-page-break/>l’ateo è cristiano. Nietzsche lo sapeva: la morte di Dio non la proclama l’ateo, ma il folle, che a mezzogiorno entra con una lanterna e grida: “Dio è morto, noi l’abbiamo ucciso”. È il più grande dei delitti. E ora? Ora precipitiamo nell’abisso, senza alto né basso, senza orientamento. Le chiese non sono più templi, ma sepolcri di Dio.</text:p>
      <text:p text:style-name="P7">La morte di Dio comporta il collasso dell’ottimismo occidentale: viene meno la promessa di salvezza e la visione del futuro come rimedio ai mali del presente e del passato. La generazione cresciuta in un contesto di speranza ha interiorizzato un linguaggio di attesa passiva “spero”, “mi auguro”, “auspico”, ma per le nuove generazioni il futuro appare piuttosto come minaccia o come dimensione imprevedibile. Il cristianesimo ha innestato nell’Occidente questo ottimismo, e fu la sua potenza. L’Occidente è la prima civiltà europea grazie al cristianesimo, <text:span text:style-name="T19">m</text:span>a se Dio è morto, tutto questo collassa. Dire che Dio è morto non significa discutere della sua esistenza: significa che prima era vivo. Nel Medioevo, la letteratura parlava di inferno, purgatorio e paradiso; l’arte era sacra; la donna era angelo. Senza la parola Dio, il Medioevo non si comprende. Ma nel mondo contemporaneo, sì: lo comprendiamo anche senza Dio. Non lo comprenderemmo se togliessimo la parola denaro o la parola tecnica. Così, morto Dio, crolla la promessa del <text:soft-page-break/>futuro come riscatto. <text:span text:style-name="T19">Il venir meno della promessa cristiana del futuro come riscatto genera una crisi generazionale. I giovani non percepiscono il futuro come prospettiva, ma come fonte di angoscia. I comportamenti di eccesso (alcool, droghe, vita notturna) non sono riducibili al piacere, ma esprimono un desiderio di anestesia rispetto a un futuro percepito come ostile. Essi si sentono non convocati, non valorizzati come risorsa, ma relegati a problema, sperimentando quotidianamente la propria insignificanza sociale. In Italia, il 39% dei giovani non lavora e una quota consistente non studia: questa è la questione centrale, più rilevante di altre come l’immigrazione.</text:span></text:p>
      <text:p text:style-name="P22"><text:span text:style-name="T2">Viviamo perché qualcosa ci attrae. Ma se il futuro non attrae, cosa accade? Accade che la motivazione si spegne. Nietzsche chiama la nostra epoca nichilista: nichilismo è assenza di scopo, è il futuro che non promette più nulla. Non vi è risposta alla domanda: perché dovrei impegnarmi?</text:span></text:p>
      <text:p text:style-name="P23"><text:span text:style-name="T3">I</text:span><text:span text:style-name="T2">l </text:span><text:span text:style-name="Strong_20_Emphasis"><text:span text:style-name="T7">pregiudizio come fondamento dell’identità e dell’appartenenza</text:span></text:span><text:span text:style-name="T2">, e l’idea che l’identità sia un dono sociale, non un possesso individuale. </text:span></text:p>
      <text:p text:style-name="P18"><text:span text:style-name="T19">l</text:span><text:span text:style-name="T20">l</text:span><text:span text:style-name="T19"> pregiudizio è ciò che ci conferisce identità e appartenenza. Sono occidentale: ho questa cultura, questi valori, mi fido di chi li condivide, ed è questo il </text:span><text:soft-page-break/><text:span text:style-name="T19">mio modo di abitare il mondo. Si può uscire dai pregiudizi? No, perché rinunciare a ciò che penso, alle idee che mi sono formato, significherebbe rinunciare a me stesso. Il pregiudizio è il luogo della mia identità e della mia appartenenza, due fattori antropologici senza i quali nessuno può vivere. L’identità non è un dato naturale, ma nasce dal riconoscimento degli altri. Se a un bambino si dice che è intelligente, e lo conferma la maestra, egli costruisce un’identità positiva; se gli si dice che è un cretino, e lo conferma la maestra, costruisce un’identità negativa. L’identità è un dono sociale. Così, nei miei pregiudizi, nel luogo in cui sono cresciuto, ottengo riconoscimento dai miei simili: essi mi danno identità, non solo da bambino, ma anche da adulto. Nel lavoro, quando si viene promossi, l’identità cresce; quando si subisce mobbing, l’identità diminuisce. E allora comprendiamo: la società viene prima dell’individuo. È tempo di metterlo in mente con chiarezza.</text:span></text:p>
      <text:p text:style-name="P21"><text:span text:style-name="T11">L’argomento che segue, </text:span><text:span text:style-name="T10">mette a confronto l'individualismo cristiano e il senso sociale dei greci, individuando nel dialogo socratico la forza intellettuale necessaria per liberarsi dai pregiudizi.</text:span></text:p>
      <text:p text:style-name="P16"><text:span text:style-name="T21">E </text:span><text:span text:style-name="T19">qui, purtroppo, il cristianesimo non ci è d’aiuto. Esso ha sancito il primato dell’individuo sulla società: ciò che conta è salvare l’anima, e poiché l’anima è individuale, </text:span><text:soft-page-break/><text:span text:style-name="T19">l’individuo precede la comunità. Non sorprende allora che il mondo religioso si lamenti dell’individualismo, dell’egoismo e del narcisismo: è stato il cristianesimo stesso a porre l’individuo al di sopra della società. I Greci non pensavano così. Per loro la città veniva prima dell’individuo. Aristotele diceva che chi pretende di vivere nella città senza gli altri è bestia o è Dio. E Dio stesso, metaforicamente, non è felice di essere solo: ha bisogno della preghiera degli uomini per sentirsi Dio. La società viene prima, perché è lei che ci riconosce, e dal riconoscimento nasce la nostra identità. Ma come si giunge al giusto giudizio? Qui la via ce la indica Socrate. La filosofia non nasce all’università, né come codificazione di logiche astratte: nasce come ricerca viva, come domande poste nella città. Socrate interrogava i suoi interlocutori sulla giustizia, sulla bellezza, sulla verità, e metteva le loro opinioni sulla graticola, verificando se reggevano da sole. I Greci chiamavano questo “episteme”: un’idea che sta in piedi da sé, non perché diffusa, non perché persuasiva, non perché retoricamente seducente, ma perché fondata. La verità, per Socrate, è provvisoria e nasce dal dialogo. Ma il dialogo non è pacifica conversazione: è guerra. “Dia” significa distanza estrema </text:span><text:span text:style-name="T24">come due punti del </text:span><text:span text:style-name="T19"><text:s/></text:span><text:span text:style-name="T25">dia</text:span><text:span text:style-name="T19">metro, </text:span><text:span text:style-name="T24">o come </text:span><text:span text:style-name="T25">dia</text:span><text:span text:style-name="T19">volo </text:span><text:span text:style-name="T24">opposto a Geù Cristo.</text:span><text:span text:style-name="T19"> Dialogare è confrontarsi con chi pensa diversamente, e solo così si può mettere in questione il proprio </text:span><text:soft-page-break/><text:span text:style-name="T19">pregiudizio. Non per abbandonarlo — il pregiudizio è la nostra casa — ma per modificarlo, per trasformarlo nel confronto con altri pregiudizi. E questo richiede un atteggiamento preciso.</text:span></text:p>
      <text:p text:style-name="P24"><text:span text:style-name="T8">L’argomento che segue, </text:span><text:span text:style-name="T9">contrappone la tolleranza passiva (intesa come sopportazione) a quella attiva (intesa come dialogo), richiamando la distinzione di Jaspers tra il credente autentico e il “militante della fede”.</text:span></text:p>
      <text:p text:style-name="P25"><text:span text:style-name="T2">Tolleranza non significa sopportare. Sopporto il vicino che mi infastidisce, ma questa non è tolleranza. La tolleranza è un atteggiamento ben più alto: riconosco che la tua opinione è diversa dalla mia, e forse contiene un gradiente di verità superiore al mio, perciò ti ascolto. Come ricorda Karl Jaspers, non si può dialogare con chi pretende di possedere la verità assoluta. Costoro non mettono in questione la loro fede, non sono credenti ma militanti della fede. Con loro il dialogo è impossibile. Il dialogo è possibile solo se l’altro accetta di mettersi in questione, e se io stesso metto in questione il mio pregiudizio, ipotizzando che dalla discussione possa nascere una trasformazione.</text:span></text:p>
      <text:p text:style-name="P26"><text:span text:style-name="T2"/></text:p>
      <text:p text:style-name="P14"><text:span text:style-name="T2">Questo frammento intreccia la critica al pregiudizio con la pratica del dialogo filosofico, arrivando a ridefinire la fede stessa: essa non è più un dogma incrollabile, </text:span><text:soft-page-break/><text:span text:style-name="T2">bensì un cammino segnato dal dubbio e dalla ricerca interiore."</text:span></text:p>
      <text:p text:style-name="P9">Crescere culturalmente non significa accumulare libri letti o nozioni apprese, ma saper mettere in questione il proprio pregiudizio, confrontandolo con chi pensa diversamente. Il diverso è essenziale: solo così si entra nella verità. La filosofia non è sapere, ma atteggiamento: non si rassegna all’opinione corrente, non si appoggia all’autorità di un nome. Platone lo sapeva: dei suoi 34 dialoghi, 14 sono contro retori e sofisti. La filosofia inaugura la democrazia, che non è votare per eleggere capi, ma ascoltare il parere di tutti. E per ascoltare occorre essere filosofi, cioè disposti a mettere in gioco il proprio pregiudizio. Nel dialogo, dice Socrate, bisogna cercare l’avversario e supporre che abbia un gradiente di verità superiore al nostro. Non per sconfiggerlo, ma per trasformare se stessi. L’eristica, che domina i talk show, mira solo a vincere: non è filosofia, è violenza. Il tema del pregiudizio si estende alla fede. L’esperienza di dialogo con esponenti religiosi mostra come la verità assoluta sia spesso difesa per ruolo istituzionale, forse senza crederci, ma il <text:span text:style-name="T22">loro</text:span> mestiere l<text:span text:style-name="T22">i</text:span> obbliga alla verità assoluta. Diverso era <text:span text:style-name="T22">il cardinale </text:span>Martini, che diceva: il credente deve avere il dubbio. Tommaso d’Aquino, fondamento della teologia cattolica, affermava che credere è sacrificium intellectus: la fede è ex voluntate, atto della volontà, non <text:soft-page-break/>dell’intelletto. Paolo di Tarso parlava di credere con timore e tremore: non si è mai certi. Se sei certo, non credi: cerchi solo rassicurazione. La fede autentica vive nell’incertezza, si confronta con chi non crede, ipotizzando che l’altro abbia un gradiente di verità superiore. Si crede perché non si sa: tra sapere e fede non c’è accordo. La verità esclude ciò che la nega; la fede, invece, abita il dubbio.</text:p>
      <text:p text:style-name="P15"><text:span text:style-name="T1"/></text:p>
      <text:p text:style-name="P15"><text:span text:style-name="T1">Il frammento </text:span><text:span text:style-name="T6">che segue </text:span><text:span text:style-name="T1">affronta un tema provocatorio: la decostruzione del pregiudizio sull'amore materno attraverso la lente della filosofia. Il testo mostra con forza come l'indignazione sociale nasca da un presupposto culturale profondo, collegandolo alla visione di Schopenhauer e alla dialettica tra soggettività maschile e femminile."</text:span></text:p>
      <text:p text:style-name="P9">Un ulteriore esempio di pregiudizio è rappresentato dall’amore materno. L’uccisione dei figli da parte della madre suscita un’indignazione diffusa, poiché contraddice il presupposto culturale secondo cui l’amore materno è naturale e incondizionato. Tale reazione evidenzia la forza del pregiudizio che attribuisce alla maternità un valore assoluto. Per comprendere meglio questa dinamica, occorre analizzare la soggettività umana nella sua duplicità: in ciascun individuo coesistono dimensioni maschili e femminili, come sottolineato da Schopenhauer. L’amore materno, <text:soft-page-break/>dunque, non è un dato universale e immutabile, ma un fenomeno che va indagato criticamente alla luce della complessità della soggettività.</text:p>
      <text:p text:style-name="P10">Freud considera Schopenhauer l’inventore della psicanalisi, colui che ha introdotto l’idea delle due soggettività: da un lato la volontà di vivere, forza cieca e irrazionale che spinge ogni essere a esistere, procreare e perpetuarsi; dall’altro la specie, che ci utilizza come funzionari, ci fa nascere, ci dota di sessualità e aggressività, e poi ci destina alla morte quando non serviamo più. Dal punto di vista dell’io, la morte è un assurdo; dal punto di vista della specie, un guadagno secco.</text:p>
      <text:p text:style-name="P10">Goethe vede la specie come una danzatrice che si muove con grazia, indifferente al destino dei singoli; Schopenhauer, invece, la descrive come crudele, una danza di dolore e sofferenza. Così, anche l’amore materno rivela la sua ambivalenza: amore e odio insieme. Le madri amano i figli, ma li odiano anche, come mostrano certe espressioni quotidiane (“ti mangerei”, “ti ucciderei”), dette con affetto ma intrise di aggressività. Chi ha vissuto l’esperienza materna conosce questa ambivalenza. Se ci ostiniamo a pensare l’amore materno come assoluto, ogni deviazione diventa criminale. Ma se riconosciamo l’ambivalenza, possiamo stare accanto alle madri che soffrono, senza ridurle a mostri.</text:p>
      <text:p text:style-name="P11"><text:soft-page-break/>Giunti ai nostri giorni, ci troviamo di fronte a un pregiudizio ancora radicato: l’idea che la tecnica sia soltanto uno strumento nelle mani dell’uomo. Ogni volta che ascolto questa formula mi chiedo: ma abbiamo davvero osservato ciò che ci circonda? Possiamo ancora ridurre la tecnica a un semplice utensile? Dentro di noi, accanto all’inconscio pulsionale che porta con sé sessualità e aggressività, si annida un inconscio tecnologico che ci induce a comportarci secondo le logiche che la tecnica stessa impone. Essa non si limita al suo ambito originario: invade il sociale, plasma i rapporti. Pensiamo al dibattito sull’opportunità di consegnare uno smartphone ai bambini: molti lo giudicano un errore, eppure, se la socializzazione passa attraverso quel mezzo, negarlo significa privare il bambino della possibilità stessa di socializzare. Ciò può non piacerci, ma non possiamo ignorare che la tecnica ha oltrepassato i confini del tecnico ed è divenuta società. Non si tratta più di frigoriferi, automobili o telefoni: quella è tecnologia, figlia della razionalità tecnica. Quando parlo di tecnica, intendo la forma più alta di razionalità mai raggiunta dall’uomo, la sua espressione suprema.</text:p>
      <text:p text:style-name="P11">La razionalità della tecnica si mostra più perfetta di quella economica. Anche il mercato è razionale: domanda e offerta si incontrano nel prezzo. Ma il <text:soft-page-break/>mercato resta imperfetto, perché contaminato da una passione umana — l’avidità di denaro — dalla quale la tecnica è invece immune. La razionalità tecnica è semplice e al tempo stesso pericolosa: tende a conseguire il massimo dei fini con il minimo dei mezzi. Se questa logica diventa egemone, tutto si misura secondo tale criterio, e la tecnologia inevitabilmente vi si conforma. Ricordiamo i primi telefoni cellulari: ingombranti e limitati a una sola funzione. Oggi, minuscoli, racchiudono in sé una molteplicità di funzioni: massimo degli scopi, minimo dei mezzi. Ma se questa razionalità diventa la forma del mondo — e già lo è — l’uomo rischia di essere espulso dalla storia, perché l’uomo è anche irrazionale. L’amore lo dimostra: dire “ti amo” è chiaro e preciso, ma il linguaggio degli innamorati è un fiume di parole, un eccesso semantico, un turbine di simboli ed emozioni che la tecnica non tollererebbe. Eppure proprio in questa confusione si rivela la verità dell’umano. Platone lo aveva colto: la follia d’amore, la più divina. Lo sa anche il popolo, che nell’amore esclama “mi fai impazzire”, “ho perso la testa”. L’amore, il dolore, il sogno, l’immaginazione, l’ideazione: tutte figure irrazionali. Il pericolo è che la razionalità tecnica, divenuta sovrana, finisca per marginalizzare progressivamente l’uomo.</text:p>
      <text:p text:style-name="P11"><text:soft-page-break/><text:span text:style-name="T16">Che i filosofi lo dicano da un secolo è verità: Oswald Spengler</text:span><text:span text:style-name="T16"><text:note text:id="ftn1" text:note-class="footnote"><text:note-citation>1</text:note-citation><text:note-body><text:p text:style-name="P2"><text:span text:style-name="T13">L’</text:span>eccessiva enfasi sulla tecnica conduce a <text:span text:style-name="Strong_20_Emphasis">disumanizzazione</text:span> e perdita di senso.</text:p></text:note-body></text:note></text:span><text:span text:style-name="T16">, nel monumentale </text:span><text:span text:style-name="Emphasis"><text:span text:style-name="T16">Tramonto dell’Occidente</text:span></text:span><text:span text:style-name="T16">, ha mostrato il legame indissolubile tra uomo e tecnica, definendola “espressione metafisica della volontà di potenza” della civiltà occidentale. La tecnica non è mai neutrale: mutando forma nel corso della storia, riflette l’anima e i valori di ogni civiltà. In Occidente essa si è fatta pervasiva, penetrando cultura ed economia, fino a rischiare di disumanizzare, manipolare la natura e dissolvere il senso. Gȕnther Anders</text:span><text:span text:style-name="T16"><text:note text:id="ftn2" text:note-class="footnote"><text:note-citation>2</text:note-citation><text:note-body><text:p text:style-name="P1"><text:span text:style-name="T13">L’</text:span>uomo diventa subordinato alle macchine e agli apparati, incapace di controllarli; la tecnica diventa il nuovo soggetto della storia.</text:p></text:note-body></text:note></text:span><text:span text:style-name="T16">, emigrato in America e impiegato alla Ford, scrisse al suo maestro Heidegger</text:span><text:span text:style-name="T16"><text:note text:id="ftn3" text:note-class="footnote"><text:note-citation>3</text:note-citation><text:note-body><text:p text:style-name="P1"><text:span text:style-name="T13">L</text:span>’uomo dimentica l’essere, vivendo nell’illusione di dominare la tecnica, mentre in realtà ne è catturato.</text:p></text:note-body></text:note></text:span><text:span text:style-name="T16">: “Lei mi ha insegnato che l’uomo è il pastore dell’essere; io qui sono il pastore delle macchine”. Il suo lavoro era una ginnastica meccanica di occhi e braccia, sequenze di luci e leve, un rituale tecnico che lo riduceva a ingranaggio. Anders chiamò questa condizione “filosofia della discrepanza”: la distanza crescente tra attività umane e dispositivi, da quando gli strumenti — prolungamenti del corpo — sono stati sostituiti da macchine autonome. E macchina non è solo la catena di montaggio: lo è lo studio </text:span><text:soft-page-break/><text:span text:style-name="T16">notarile, la casa editrice, l’ospedale, dove gli individui realizzano gli scopi dell’apparato, non i propri. In un convegno di cardiologia, un celebre medico osservava: i protocolli sono statisticamente corretti, ma valgono solo per i pazienti al centro della curva di Gauss; agli estremi, possono condurre alla morte. Eppure il medico che non li applica è colpevole, mentre chi li applica è innocente, anche se il paziente muore. Questa è la razionalità della tecnica: perfetta, impersonale, implacabile.</text:span></text:p>
      <text:p text:style-name="P19">La tecnica è penetrata anche nella scuola. A Milano, nei licei, i temi scritti sono stati sostituiti da prove di comprensione: dieci parole da interpretare, un punto in meno per ogni errore. Tutto è razionale, misurabile. Ma la soggettività degli studenti scompare: e senza soggettività, è ancora educazione? Come si può educare senza conoscere chi si ha di fronte? La scuola italiana non educa più, e gli apparati tecnici — computer, lavagne digitali — hanno già preso il sopravvento. Se invece si introducesse la letteratura, unico luogo dove i ragazzi imparano i sentimenti — dolore, amore, disperazione, speranza, gioia — essi avrebbero strumenti per nominare la propria angoscia e cercarne le vie d’uscita. Eschilo lo aveva intuito: il dolore è un errore della mente, e senza conoscenza non si può affrontarlo. Ma opporsi alla tecnica è impossibile, come <text:soft-page-break/>insegna Hegel: l’accumulazione quantitativa conduce inevitabilmente a un cambiamento qualitativo, generando nuove re<text:span text:style-name="T23">altà.</text:span></text:p>
      <text:p text:style-name="P19">Per Hegel, ogni cosa ha una sua misura: un intervallo entro il quale può cambiare quantitativamente senza perdere la propria identità. Quando si esce da questo intervallo, avviene il salto dialettico.</text:p>
      <text:p text:style-name="P20"><text:span text:style-name="T26">L</text:span>'acqua: <text:span text:style-name="T26">s</text:span>e scaldi l'acqua, essa aumenta la sua temperatura grado dopo grado (cambiamento quantitativo). Arrivata a 100°C, però, non diventa solo "più calda": cambia stato fisico e diventa vapore (salto qualitativo).</text:p>
      <text:p text:style-name="P19">Marx riprese l’argomento: il denaro, da mezzo, diventa fine universale; così la tecnica, da strumento, diventa condizione necessaria di ogni scopo, e quindi soggetto della storia. La politica, che per Platone era teknè, ha perso il suo ruolo decisionale: oggi decide l’economia, e l’economia guarda alla tecnica. La tecnica ha soppiantato la politica, ma non apre orizzonti di senso: funziona, e basta. Così le categorie umanistiche collassano. La verità non è più logica, ma efficacia: ciò che accade perché aveva le condizioni per accadere. La natura non è più dimora dell’uomo, ma materia prima che la tecnica provoca, come ha mostrato Heidegger.</text:p>
      <text:p text:style-name="P17">Che cos’è la storia? Esiste finché vi è un senso, uno scopo da realizzare, come nell’epoca cristiana. Quando <text:soft-page-break/>il senso svanisce, resta soltanto la successione del tempo. E che cos’è il tempo? Chi ha vissuto più stagioni lo percepisce come durata, mentre i giovani lo vivono come accelerazione. Essi abitano un mondo diverso, quello creato dalla tecnica informatica, dove la socializzazione non è più corpo a corpo, ma corpo a computer, corpo a telefonino. L’identità si misura nel numero dei “like”, nel riconoscimento che lenisce un deserto di solitudine. Ho chiesto ai ragazzi perché confidano a me ciò che non dicono ai genitori o agli insegnanti. Risposta severa: “Sappiamo già cosa ci direbbero”. È la prima generazione in cui l’esperienza dei padri non passa ai figli, perché i mondi sono radicalmente diversi. Non si tratta di fannulloni, ma di giovani che vivono altrove. I genitori possono parlare fino ai dodici anni; poi subentra la sessualità, e l’amore verticale verso i genitori si trasforma in orizzontale verso gli amici. Se non si è parlato prima, dopo non si può più. La comunicazione si riduce a domande di circostanza. Le madri si fermano al corpo, mai al cuore: mai sentito una madre chiedere al figlio “sei felice?”. Eppure una via c’è: aprire una finestra, come Socrate, e dire “parla, perché sono curioso del tuo mondo”. Solo così i figli si aprono. Chiudiamo con una nota tragica. Gunther Anders osserva che l’età della tecnica ebbe come paradigma iniziale il nazismo. Lo mostra l’intervista di Gitta Sereny a Franz Stangl, direttore di <text:soft-page-break/>Treblinka: alla domanda su cosa provasse, egli rispose infine che non era incaricato di provare, ma di eseguire bene il suo lavoro. Mandare a morte migliaia di persone era per lui un compito da svolgere con efficienza e produttività. Ecco l’ottimo funzionario dell’età della tecnica: giudicato non per il contenuto del suo operato, ma per la perfezione con cui lo esegue.</text:p>
      <text:p text:style-name="P17">Nelle fabbriche di mine antiuomo, un operaio è considerato bravo se su cento ordigni novantanove esplodono. Non importa il contenuto del lavoro, conta solo la perfezione dell’esecuzione. Lo stesso accade nelle banche: chi vende derivati o titoli spazzatura, anche se ne percepisce la nocività, deve raggiungere i numeri richiesti dall’apparato, pena la perdita del posto. La coscienza individuale viene neutralizzata: psicologi e comportamentisti aiutano ad allinearsi, a ridurre la dissonanza cognitiva. Ma chi vende derivati non è anch’egli un Franz Stangl? E sì, lo è. Ogni volta che allo sportello ci sentiamo dire “non è di mia competenza”, incontriamo un piccolo Stangl: responsabile non verso di noi, ma solo verso i superiori. Questa è la logica della tecnica: obbedire all’apparato, eseguire alla perfezione, accettare la competizione che dissolve la solidarietà. L’età della tecnica trasforma i colleghi in rivali, e le decisioni non sono più umane: sono algoritmiche. Heidegger lo aveva detto nel 1952: inquietante non è <text:soft-page-break/>che il mondo diventi un apparato tecnico, ma che non abbiamo un pensiero alternativo al calcolo. Non sappiamo più distinguere il buono, il bello, il giusto, il santo: sappiamo solo ciò che è utile. Un episodio quotidiano illustra questa mentalità: una giovane arpista, accolta con interesse per il suo strumento, si sente infine chiedere “dov’è il business?”. L’arte viene interpretata esclusivamente in termini economici. Tale riduzione riflette la progressiva eliminazione delle dimensioni irrazionali dell’uomo — dolore, amore, sogno, immaginazione, ideazione. Gunther Anders ha sintetizzato questa condizione: la questione non è cosa l’uomo possa fare con la tecnica, ma cosa la tecnica abbia già fatto dell’uomo.</text:p>
      <text:p text:style-name="P11"/>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ans"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5-11-19T16:47:53.419455780</meta:creation-date>
    <dc:date>2026-03-30T18:31:49.760099690</dc:date>
    <dc:creator>corrado tafaro</dc:creator>
    <meta:editing-duration>PT1H11M14S</meta:editing-duration>
    <meta:editing-cycles>12</meta:editing-cycles>
    <meta:generator>LibreOffice/24.2.7.2$Linux_X86_64 LibreOffice_project/420$Build-2</meta:generator>
    <meta:document-statistic meta:table-count="0" meta:image-count="0" meta:object-count="0" meta:page-count="17" meta:paragraph-count="30" meta:word-count="3462" meta:character-count="22496" meta:non-whitespace-character-count="19048"/>
  </office:meta>
</office:document-meta>
</file>