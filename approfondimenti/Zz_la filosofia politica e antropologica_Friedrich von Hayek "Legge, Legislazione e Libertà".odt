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Footnote">
      <style:paragraph-properties fo:text-align="justify" style:justify-single-word="false"/>
    </style:style>
    <style:style style:name="P2" style:family="paragraph" style:parent-style-name="Footnote" style:master-page-name="">
      <loext:graphic-properties draw:fill="none"/>
      <style:paragraph-properties fo:margin-left="0.6cm" fo:margin-right="0cm" fo:text-align="justify" style:justify-single-word="false" fo:text-indent="0cm" style:auto-text-indent="false" style:page-number="auto" fo:background-color="transparent" text:number-lines="false" text:line-number="0"/>
    </style:style>
    <style:style style:name="P3" style:family="paragraph" style:parent-style-name="Text_20_body">
      <style:paragraph-properties fo:margin-top="0cm" fo:margin-bottom="0cm" style:contextual-spacing="false" fo:line-height="115%" fo:text-align="justify" style:justify-single-word="false"/>
      <style:text-properties officeooo:paragraph-rsid="0028dfc0"/>
    </style:style>
    <style:style style:name="P4" style:family="paragraph" style:parent-style-name="Text_20_body">
      <style:paragraph-properties fo:margin-top="0.199cm" fo:margin-bottom="0cm" style:contextual-spacing="false" fo:line-height="115%" fo:text-align="justify" style:justify-single-word="false"/>
      <style:text-properties officeooo:paragraph-rsid="0028dfc0"/>
    </style:style>
    <style:style style:name="P5"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28dfc0"/>
    </style:style>
    <style:style style:name="P6" style:family="paragraph" style:parent-style-name="Quotations" style:master-page-name="">
      <loext:graphic-properties draw:fill="none"/>
      <style:paragraph-properties fo:margin-left="0cm" fo:margin-right="0cm" fo:margin-top="0cm" fo:margin-bottom="0.499cm" style:contextual-spacing="false" fo:line-height="115%" fo:text-align="justify" style:justify-single-word="false" fo:text-indent="0cm" style:auto-text-indent="false" style:page-number="auto" fo:background-color="transparent"/>
    </style:style>
    <style:style style:name="P7" style:family="paragraph" style:parent-style-name="Standard">
      <style:paragraph-properties fo:margin-top="0cm" fo:margin-bottom="0cm" style:contextual-spacing="false" fo:line-height="115%" fo:text-align="justify" style:justify-single-word="false"/>
      <style:text-properties officeooo:paragraph-rsid="0022725e"/>
    </style:style>
    <style:style style:name="P8" style:family="paragraph" style:parent-style-name="Standard">
      <style:paragraph-properties fo:margin-top="0.101cm" fo:margin-bottom="0cm" style:contextual-spacing="false" fo:line-height="115%" fo:text-align="justify" style:justify-single-word="false"/>
      <style:text-properties officeooo:paragraph-rsid="0022725e"/>
    </style:style>
    <style:style style:name="P9" style:family="paragraph" style:parent-style-name="Standard">
      <style:paragraph-properties fo:margin-top="0.199cm" fo:margin-bottom="0cm" style:contextual-spacing="false" fo:line-height="115%" fo:text-align="justify" style:justify-single-word="false"/>
      <style:text-properties officeooo:paragraph-rsid="002de2c4"/>
    </style:style>
    <style:style style:name="P10" style:family="paragraph" style:parent-style-name="Standard">
      <style:paragraph-properties fo:margin-top="0.101cm" fo:margin-bottom="0cm" style:contextual-spacing="false" fo:line-height="115%" fo:text-align="justify" style:justify-single-word="false"/>
      <style:text-properties officeooo:paragraph-rsid="002de2c4"/>
    </style:style>
    <style:style style:name="P11" style:family="paragraph" style:parent-style-name="Standard">
      <style:paragraph-properties fo:margin-top="0.199cm" fo:margin-bottom="0cm" style:contextual-spacing="false" fo:line-height="115%" fo:text-align="justify" style:justify-single-word="false"/>
      <style:text-properties officeooo:paragraph-rsid="0023c7ff"/>
    </style:style>
    <style:style style:name="P12" style:family="paragraph" style:parent-style-name="Standard">
      <style:paragraph-properties fo:margin-top="0.101cm" fo:margin-bottom="0cm" style:contextual-spacing="false" fo:line-height="115%" fo:text-align="justify" style:justify-single-word="false"/>
      <style:text-properties officeooo:paragraph-rsid="0023c7ff"/>
    </style:style>
    <style:style style:name="P13" style:family="paragraph" style:parent-style-name="Standard">
      <style:paragraph-properties fo:margin-top="0.199cm" fo:margin-bottom="0cm" style:contextual-spacing="false" fo:line-height="115%" fo:text-align="justify" style:justify-single-word="false"/>
      <style:text-properties officeooo:paragraph-rsid="002479ff"/>
    </style:style>
    <style:style style:name="P14" style:family="paragraph" style:parent-style-name="Standard">
      <style:paragraph-properties fo:margin-top="0.101cm" fo:margin-bottom="0cm" style:contextual-spacing="false" fo:line-height="115%" fo:text-align="justify" style:justify-single-word="false"/>
      <style:text-properties officeooo:paragraph-rsid="002479ff"/>
    </style:style>
    <style:style style:name="P15" style:family="paragraph" style:parent-style-name="Text_20_body">
      <style:paragraph-properties fo:margin-top="0.101cm" fo:margin-bottom="0cm" style:contextual-spacing="false" fo:line-height="115%" fo:text-align="justify" style:justify-single-word="false"/>
      <style:text-properties officeooo:paragraph-rsid="002479ff"/>
    </style:style>
    <style:style style:name="P16" style:family="paragraph" style:parent-style-name="Text_20_body">
      <style:paragraph-properties fo:margin-top="0.101cm" fo:margin-bottom="0cm" style:contextual-spacing="false" fo:line-height="115%" fo:text-align="justify" style:justify-single-word="false"/>
      <style:text-properties officeooo:paragraph-rsid="0024ab97"/>
    </style:style>
    <style:style style:name="P17" style:family="paragraph" style:parent-style-name="Text_20_body">
      <style:paragraph-properties fo:margin-top="0.199cm" fo:margin-bottom="0cm" style:contextual-spacing="false" fo:line-height="115%" fo:text-align="justify" style:justify-single-word="false"/>
    </style:style>
    <style:style style:name="P18" style:family="paragraph" style:parent-style-name="Text_20_body">
      <style:paragraph-properties fo:margin-top="0.101cm" fo:margin-bottom="0cm" style:contextual-spacing="false" fo:line-height="115%" fo:text-align="justify" style:justify-single-word="false"/>
    </style:style>
    <style:style style:name="P19" style:family="paragraph" style:parent-style-name="Standard">
      <style:paragraph-properties fo:margin-top="0.199cm" fo:margin-bottom="0cm" style:contextual-spacing="false" fo:line-height="115%" fo:text-align="justify" style:justify-single-word="false"/>
      <style:text-properties officeooo:paragraph-rsid="0045be2e"/>
    </style:style>
    <style:style style:name="P20" style:family="paragraph" style:parent-style-name="Standard">
      <style:paragraph-properties fo:margin-top="0.101cm" fo:margin-bottom="0cm" style:contextual-spacing="false" fo:line-height="115%"/>
      <style:text-properties officeooo:paragraph-rsid="002479ff"/>
    </style:style>
    <style:style style:name="P21" style:family="paragraph" style:parent-style-name="Text_20_body">
      <style:paragraph-properties fo:margin-top="0.101cm" fo:margin-bottom="0cm" style:contextual-spacing="false" fo:line-height="115%"/>
    </style:style>
    <style:style style:name="P22" style:family="paragraph" style:parent-style-name="Quotations">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italic" style:font-size-asian="16pt" style:font-style-asian="italic" style:font-size-complex="16pt" style:font-style-complex="italic"/>
    </style:style>
    <style:style style:name="P23"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6pt" officeooo:rsid="00377204" officeooo:paragraph-rsid="00377204" style:font-size-asian="16pt" style:font-size-complex="16pt"/>
    </style:style>
    <style:style style:name="P24" style:family="paragraph" style:parent-style-name="Quotations">
      <loext:graphic-properties draw:fill="none"/>
      <style:paragraph-properties fo:margin-left="0cm" fo:margin-right="0cm" fo:margin-top="0.199cm" fo:margin-bottom="0cm" style:contextual-spacing="false" fo:line-height="100%" fo:text-align="justify" style:justify-single-word="false" fo:text-indent="0cm" style:auto-text-indent="false" fo:background-color="transparent"/>
      <style:text-properties fo:font-size="16pt" officeooo:rsid="00371e2f" officeooo:paragraph-rsid="00371e2f" style:font-size-asian="16pt" style:font-size-complex="16pt"/>
    </style:style>
    <style:style style:name="P25" style:family="paragraph" style:parent-style-name="Quotations">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style:font-size-asian="14pt" style:font-size-complex="14pt"/>
    </style:style>
    <style:style style:name="P26" style:family="paragraph" style:parent-style-name="Quotations">
      <loext:graphic-properties draw:fill="none"/>
      <style:paragraph-properties fo:margin-left="0cm" fo:margin-right="0cm" fo:margin-top="0.101cm" fo:margin-bottom="0cm" style:contextual-spacing="false" fo:line-height="100%" fo:text-align="justify" style:justify-single-word="false" fo:text-indent="0cm" style:auto-text-indent="false" fo:background-color="transparent"/>
      <style:text-properties fo:font-size="14pt" style:font-size-asian="14pt" style:font-size-complex="14pt"/>
    </style:style>
    <style:style style:name="P27" style:family="paragraph" style:parent-style-name="Quotations">
      <loext:graphic-properties draw:fill="none"/>
      <style:paragraph-properties fo:margin-left="0cm" fo:margin-right="0cm" fo:margin-top="0.199cm" fo:margin-bottom="0cm" style:contextual-spacing="false" fo:line-height="100%" fo:text-align="justify" style:justify-single-word="false" fo:text-indent="0cm" style:auto-text-indent="false" fo:background-color="transparent"/>
      <style:text-properties fo:font-size="14pt" style:font-size-asian="14pt" style:font-size-complex="14pt"/>
    </style:style>
    <style:style style:name="P28"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style:font-size-asian="14pt" style:font-size-complex="14pt"/>
    </style:style>
    <style:style style:name="P29"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size="14pt" style:font-size-asian="14pt" style:font-size-complex="14pt"/>
    </style:style>
    <style:style style:name="P30"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71e2f" officeooo:paragraph-rsid="00371e2f" style:font-size-asian="14pt" style:font-size-complex="14pt"/>
    </style:style>
    <style:style style:name="P31"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77204" officeooo:paragraph-rsid="00377204" style:font-size-asian="14pt" style:font-size-complex="14pt"/>
    </style:style>
    <style:style style:name="P32"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font-size="14pt" officeooo:rsid="00377204" officeooo:paragraph-rsid="00377204" style:font-size-asian="14pt" style:font-size-complex="14pt"/>
    </style:style>
    <style:style style:name="P33"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font-size="14pt" officeooo:rsid="003bb20f" officeooo:paragraph-rsid="003bb20f" style:font-size-asian="10.5pt" style:font-size-complex="12pt"/>
    </style:style>
    <style:style style:name="P34"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bb20f" officeooo:paragraph-rsid="003bb20f" style:font-size-asian="10.5pt" style:font-size-complex="12pt"/>
    </style:style>
    <style:style style:name="P35"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font-size="14pt" officeooo:rsid="003bb20f" officeooo:paragraph-rsid="003e1361" style:font-size-asian="10.5pt" style:font-size-complex="12pt"/>
    </style:style>
    <style:style style:name="P36" style:family="paragraph" style:parent-style-name="Standard">
      <style:paragraph-properties fo:margin-top="0.101cm" fo:margin-bottom="0cm" style:contextual-spacing="false" fo:line-height="100%" fo:text-align="justify" style:justify-single-word="false"/>
      <style:text-properties fo:font-style="italic" officeooo:paragraph-rsid="0022725e" style:font-style-asian="italic" style:font-style-complex="italic"/>
    </style:style>
    <style:style style:name="P37" style:family="paragraph" style:parent-style-name="Footnote">
      <style:paragraph-properties fo:text-align="justify" style:justify-single-word="false"/>
      <style:text-properties officeooo:rsid="003d3c2e" officeooo:paragraph-rsid="003d3c2e"/>
    </style:style>
    <style:style style:name="P38" style:family="paragraph" style:parent-style-name="Footnote">
      <style:paragraph-properties fo:margin-top="0.101cm" fo:margin-bottom="0cm" style:contextual-spacing="false" fo:text-align="justify" style:justify-single-word="false"/>
      <style:text-properties officeooo:rsid="003d3c2e" officeooo:paragraph-rsid="003d3c2e"/>
    </style:style>
    <style:style style:name="P39" style:family="paragraph" style:parent-style-name="Footnote">
      <style:text-properties officeooo:rsid="0046c1a9" officeooo:paragraph-rsid="0046c1a9"/>
    </style:style>
    <style:style style:name="P40" style:family="paragraph" style:parent-style-name="Footnote">
      <style:paragraph-properties fo:text-align="justify" style:justify-single-word="false"/>
      <style:text-properties officeooo:rsid="004d4d42" officeooo:paragraph-rsid="004d4d42"/>
    </style:style>
    <style:style style:name="P41" style:family="paragraph" style:parent-style-name="Quotations">
      <loext:graphic-properties draw:fill="none"/>
      <style:paragraph-properties fo:margin-left="0cm" fo:margin-right="0cm" fo:margin-top="0.101cm" fo:margin-bottom="0cm" style:contextual-spacing="false" fo:line-height="100%" fo:text-align="justify" style:justify-single-word="false" fo:text-indent="0cm" style:auto-text-indent="false" fo:background-color="transparent"/>
      <style:text-properties fo:font-size="14pt" style:font-size-asian="14pt" style:font-size-complex="14pt"/>
    </style:style>
    <style:style style:name="P42"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size="14pt" officeooo:rsid="00371e2f" officeooo:paragraph-rsid="00371e2f" style:font-size-asian="14pt" style:font-size-complex="14pt"/>
    </style:style>
    <style:style style:name="P43"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71e2f" officeooo:paragraph-rsid="00371e2f" style:font-size-asian="14pt" style:font-size-complex="14pt"/>
    </style:style>
    <style:style style:name="P44" style:family="paragraph" style:parent-style-name="Quotations">
      <loext:graphic-properties draw:fill="none"/>
      <style:paragraph-properties fo:margin-left="0cm" fo:margin-right="0cm" fo:margin-top="0.101cm" fo:margin-bottom="0cm" style:contextual-spacing="false" fo:line-height="100%" fo:text-align="justify" style:justify-single-word="false" fo:text-indent="0cm" style:auto-text-indent="false" fo:background-color="transparent"/>
      <style:text-properties fo:font-size="14pt" fo:font-style="italic" style:font-size-asian="14pt" style:font-style-asian="italic" style:font-size-complex="14pt" style:font-style-complex="italic"/>
    </style:style>
    <style:style style:name="P4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bb20f" officeooo:paragraph-rsid="003bb20f" style:font-size-asian="10.5pt" style:font-size-complex="12pt"/>
    </style:style>
    <style:style style:name="P46"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size="14pt" officeooo:rsid="003bb20f" officeooo:paragraph-rsid="003e1361" style:font-size-asian="10.5pt" style:font-size-complex="12pt"/>
    </style:style>
    <style:style style:name="P47"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size="14pt" officeooo:rsid="003bb20f" officeooo:paragraph-rsid="00401158" style:font-size-asian="10.5pt" style:font-size-complex="12pt"/>
    </style:style>
    <style:style style:name="P48"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4pt" officeooo:rsid="003bb20f" officeooo:paragraph-rsid="00401158" style:font-size-asian="10.5pt" style:font-size-complex="12pt"/>
    </style:style>
    <style:style style:name="P49" style:family="paragraph" style:parent-style-name="Quotations">
      <loext:graphic-properties draw:fill="none"/>
      <style:paragraph-properties fo:margin-left="0cm" fo:margin-right="0cm" fo:margin-top="0.199cm" fo:margin-bottom="0cm" style:contextual-spacing="false" fo:line-height="100%" fo:text-align="justify" style:justify-single-word="false" fo:text-indent="0cm" style:auto-text-indent="false" fo:background-color="transparent"/>
      <style:text-properties fo:font-size="16pt" style:font-size-asian="16pt" style:font-size-complex="16pt"/>
    </style:style>
    <style:style style:name="P50"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size="16pt" officeooo:rsid="003bb20f" officeooo:paragraph-rsid="003bb20f" style:font-size-asian="16pt" style:font-size-complex="16pt"/>
    </style:style>
    <style:style style:name="P51" style:family="paragraph" style:parent-style-name="Quotations">
      <loext:graphic-properties draw:fill="none"/>
      <style:paragraph-properties fo:margin-left="0cm" fo:margin-right="0cm" fo:margin-top="0.199cm" fo:margin-bottom="0cm" style:contextual-spacing="false" fo:line-height="100%" fo:text-align="justify" style:justify-single-word="false" fo:text-indent="0cm" style:auto-text-indent="false" fo:background-color="transparent"/>
      <style:text-properties fo:font-size="16pt" officeooo:rsid="003bb20f" officeooo:paragraph-rsid="003e1361" style:font-size-asian="16pt" style:font-size-complex="16pt"/>
    </style:style>
    <style:style style:name="P52" style:family="paragraph" style:parent-style-name="Standard">
      <style:paragraph-properties fo:margin-top="0cm" fo:margin-bottom="0cm" style:contextual-spacing="false" fo:line-height="100%" fo:text-align="justify" style:justify-single-word="false"/>
      <style:text-properties fo:font-size="20pt" officeooo:paragraph-rsid="003503c0" style:font-size-asian="20pt" style:font-size-complex="20pt"/>
    </style:style>
    <style:style style:name="P53" style:family="paragraph" style:parent-style-name="Standard">
      <style:paragraph-properties fo:margin-top="0cm" fo:margin-bottom="0cm" style:contextual-spacing="false" fo:line-height="115%" fo:text-align="justify" style:justify-single-word="false"/>
      <style:text-properties style:font-name="Liberation Serif1" fo:font-size="14pt" fo:language="it" fo:country="IT" officeooo:rsid="001877d7" officeooo:paragraph-rsid="001877d7" style:font-size-asian="14pt"/>
    </style:style>
    <style:style style:name="P54" style:family="paragraph" style:parent-style-name="Standard">
      <style:paragraph-properties fo:margin-top="0cm" fo:margin-bottom="0.101cm" style:contextual-spacing="false" fo:line-height="115%" fo:text-align="justify" style:justify-single-word="false"/>
      <style:text-properties style:font-name="Liberation Serif1" fo:font-size="14pt" fo:language="it" fo:country="IT" officeooo:rsid="001877d7" officeooo:paragraph-rsid="001877d7" style:font-size-asian="14pt"/>
    </style:style>
    <style:style style:name="P55" style:family="paragraph" style:parent-style-name="Standard">
      <style:paragraph-properties fo:margin-top="0.101cm" fo:margin-bottom="0.101cm" style:contextual-spacing="false" fo:line-height="115%" fo:text-align="justify" style:justify-single-word="false"/>
      <style:text-properties style:font-name="Liberation Serif1" fo:font-size="14pt" fo:language="it" fo:country="IT" officeooo:rsid="001877d7" officeooo:paragraph-rsid="001877d7" style:font-size-asian="14pt"/>
    </style:style>
    <style:style style:name="P56" style:family="paragraph" style:parent-style-name="Standard">
      <style:paragraph-properties fo:margin-top="0cm" fo:margin-bottom="0.101cm" style:contextual-spacing="false" fo:line-height="115%" fo:text-align="justify" style:justify-single-word="false"/>
      <style:text-properties style:font-name="Liberation Serif1" fo:font-size="14pt" fo:language="it" fo:country="IT" officeooo:rsid="001877d7" officeooo:paragraph-rsid="0042a911" style:font-size-asian="14pt"/>
    </style:style>
    <style:style style:name="P57" style:family="paragraph" style:parent-style-name="Standard">
      <style:paragraph-properties fo:margin-top="0cm" fo:margin-bottom="0.101cm" style:contextual-spacing="false" fo:line-height="115%" fo:text-align="justify" style:justify-single-word="false"/>
      <style:text-properties style:font-name="Liberation Serif1" fo:font-size="14pt" fo:language="it" fo:country="IT" style:font-size-asian="14pt"/>
    </style:style>
    <style:style style:name="P58" style:family="paragraph" style:parent-style-name="Standard">
      <style:paragraph-properties fo:margin-top="0cm" fo:margin-bottom="0.101cm" style:contextual-spacing="false" fo:line-height="115%" fo:text-align="justify" style:justify-single-word="false"/>
      <style:text-properties style:font-name="Liberation Serif1" fo:font-size="16pt" fo:language="it" fo:country="IT" officeooo:rsid="001877d7" officeooo:paragraph-rsid="001877d7" style:font-size-asian="16pt" style:font-size-complex="16pt"/>
    </style:style>
    <style:style style:name="P59" style:family="paragraph" style:parent-style-name="Standard">
      <style:paragraph-properties fo:margin-top="0.101cm" fo:margin-bottom="0.101cm" style:contextual-spacing="false" fo:line-height="100%" fo:text-align="justify" style:justify-single-word="false"/>
      <style:text-properties style:font-name="Liberation Serif1" fo:font-size="16pt" fo:language="it" fo:country="IT" officeooo:rsid="00362945" officeooo:paragraph-rsid="0042a911" style:font-size-asian="16pt"/>
    </style:style>
    <style:style style:name="P60" style:family="paragraph" style:parent-style-name="Standard">
      <style:paragraph-properties fo:margin-top="0.199cm" fo:margin-bottom="0cm" style:contextual-spacing="false" fo:line-height="115%" fo:text-align="justify" style:justify-single-word="false"/>
      <style:text-properties style:font-name="Liberation Serif1" fo:font-size="16pt" fo:language="it" fo:country="IT" officeooo:rsid="00362945" officeooo:paragraph-rsid="0042a911" style:font-size-asian="16pt"/>
    </style:style>
    <style:style style:name="P61" style:family="paragraph" style:parent-style-name="Standard">
      <style:paragraph-properties fo:margin-top="0cm" fo:margin-bottom="0.101cm" style:contextual-spacing="false" fo:line-height="115%" fo:text-align="justify" style:justify-single-word="false"/>
      <style:text-properties officeooo:paragraph-rsid="001877d7"/>
    </style:style>
    <style:style style:name="P62" style:family="paragraph" style:parent-style-name="Standard">
      <style:paragraph-properties fo:margin-top="0cm" fo:margin-bottom="0.101cm" style:contextual-spacing="false" fo:line-height="115%" fo:text-align="justify" style:justify-single-word="false"/>
    </style:style>
    <style:style style:name="P63" style:family="paragraph" style:parent-style-name="Standard" style:list-style-name="L1">
      <style:paragraph-properties fo:margin-top="0.199cm" fo:margin-bottom="0cm" style:contextual-spacing="false" fo:line-height="115%" fo:text-align="justify" style:justify-single-word="false"/>
      <style:text-properties officeooo:paragraph-rsid="0045be2e"/>
    </style:style>
    <style:style style:name="P64" style:family="paragraph" style:parent-style-name="Standard" style:list-style-name="L2">
      <style:paragraph-properties fo:margin-top="0.101cm" fo:margin-bottom="0cm" style:contextual-spacing="false" fo:line-height="115%" fo:text-align="justify" style:justify-single-word="false"/>
      <style:text-properties officeooo:paragraph-rsid="002479ff"/>
    </style:style>
    <style:style style:name="P65" style:family="paragraph" style:parent-style-name="Standard" style:list-style-name="L3">
      <style:paragraph-properties fo:margin-top="0.101cm" fo:margin-bottom="0cm" style:contextual-spacing="false" fo:line-height="115%"/>
      <style:text-properties officeooo:paragraph-rsid="002479ff"/>
    </style:style>
    <style:style style:name="P66" style:family="paragraph" style:parent-style-name="Text_20_body" style:list-style-name="L4">
      <style:paragraph-properties fo:margin-top="0.101cm" fo:margin-bottom="0cm" style:contextual-spacing="false" fo:line-height="100%" fo:text-align="justify" style:justify-single-word="false"/>
    </style:style>
    <style:style style:name="P67" style:family="paragraph" style:parent-style-name="Text_20_body" style:list-style-name="L4">
      <style:paragraph-properties fo:margin-top="0.101cm" fo:margin-bottom="0.199cm" style:contextual-spacing="false" fo:line-height="100%" fo:text-align="justify" style:justify-single-word="false"/>
      <style:text-properties officeooo:paragraph-rsid="0028dfc0"/>
    </style:style>
    <style:style style:name="P68" style:family="paragraph" style:parent-style-name="Text_20_body" style:list-style-name="L5">
      <style:paragraph-properties fo:margin-top="0.101cm" fo:margin-bottom="0cm" style:contextual-spacing="false" fo:line-height="100%" fo:text-align="justify" style:justify-single-word="false"/>
      <style:text-properties officeooo:paragraph-rsid="0024ab97"/>
    </style:style>
    <style:style style:name="P69" style:family="paragraph" style:parent-style-name="Text_20_body" style:list-style-name="L5">
      <style:paragraph-properties fo:margin-top="0.101cm" fo:margin-bottom="0cm" style:contextual-spacing="false" fo:line-height="100%" fo:text-align="justify" style:justify-single-word="false"/>
    </style:style>
    <style:style style:name="P70" style:family="paragraph" style:parent-style-name="Text_20_body" style:list-style-name="L5">
      <style:paragraph-properties fo:margin-top="0cm" fo:margin-bottom="0cm" style:contextual-spacing="false" fo:line-height="100%" fo:text-align="justify" style:justify-single-word="false"/>
      <style:text-properties officeooo:paragraph-rsid="0028dfc0"/>
    </style:style>
    <style:style style:name="P71" style:family="paragraph" style:parent-style-name="Text_20_body" style:list-style-name="L6">
      <style:paragraph-properties fo:margin-top="0cm" fo:margin-bottom="0cm" style:contextual-spacing="false" fo:line-height="100%" fo:text-align="justify" style:justify-single-word="false"/>
    </style:style>
    <style:style style:name="P72" style:family="paragraph" style:parent-style-name="Text_20_body" style:list-style-name="L6">
      <style:paragraph-properties fo:margin-top="0.101cm" fo:margin-bottom="0cm" style:contextual-spacing="false" fo:line-height="100%" fo:text-align="justify" style:justify-single-word="false"/>
    </style:style>
    <style:style style:name="P73" style:family="paragraph" style:parent-style-name="Text_20_body" style:list-style-name="L7">
      <style:paragraph-properties fo:margin-top="0cm" fo:margin-bottom="0cm" style:contextual-spacing="false" fo:line-height="100%" fo:text-align="justify" style:justify-single-word="false"/>
      <style:text-properties officeooo:paragraph-rsid="0024ab97"/>
    </style:style>
    <style:style style:name="P74" style:family="paragraph" style:parent-style-name="Text_20_body" style:list-style-name="L8">
      <style:paragraph-properties fo:margin-top="0cm" fo:margin-bottom="0cm" style:contextual-spacing="false" fo:line-height="100%" fo:text-align="justify" style:justify-single-word="false"/>
    </style:style>
    <style:style style:name="P75" style:family="paragraph" style:parent-style-name="Text_20_body" style:list-style-name="L9">
      <style:paragraph-properties fo:margin-top="0.101cm" fo:margin-bottom="0cm" style:contextual-spacing="false" fo:line-height="100%" fo:text-align="justify" style:justify-single-word="false"/>
    </style:style>
    <style:style style:name="P76" style:family="paragraph" style:parent-style-name="Text_20_body" style:list-style-name="L9">
      <style:paragraph-properties fo:margin-top="0cm" fo:margin-bottom="0cm" style:contextual-spacing="false" fo:line-height="115%" fo:text-align="justify" style:justify-single-word="false"/>
    </style:style>
    <style:style style:name="P77" style:family="paragraph" style:parent-style-name="Text_20_body">
      <style:paragraph-properties fo:margin-top="0.101cm" fo:margin-bottom="0cm" style:contextual-spacing="false" fo:line-height="115%" fo:text-align="justify" style:justify-single-word="false"/>
      <style:text-properties officeooo:paragraph-rsid="0024ab97"/>
    </style:style>
    <style:style style:name="T1" style:family="text">
      <style:text-properties style:font-name="Liberation Serif1" fo:font-size="14pt" fo:language="it" fo:country="IT" style:font-size-asian="14pt"/>
    </style:style>
    <style:style style:name="T2" style:family="text">
      <style:text-properties style:font-name="Liberation Serif1" fo:font-size="14pt" fo:language="it" fo:country="IT" officeooo:rsid="001877d7" style:font-size-asian="14pt"/>
    </style:style>
    <style:style style:name="T3" style:family="text">
      <style:text-properties style:font-name="Liberation Serif1" fo:font-size="14pt" fo:language="it" fo:country="IT" officeooo:rsid="0042a911" style:font-size-asian="14pt"/>
    </style:style>
    <style:style style:name="T4" style:family="text">
      <style:text-properties style:font-name="Liberation Serif1" fo:language="it" fo:country="IT" officeooo:rsid="002a26fe"/>
    </style:style>
    <style:style style:name="T5" style:family="text">
      <style:text-properties style:font-name="Liberation Serif1" fo:font-size="10pt" fo:language="it" fo:country="IT" officeooo:rsid="002a26fe" style:font-size-asian="10pt" style:font-size-complex="10pt"/>
    </style:style>
    <style:style style:name="T6" style:family="text">
      <style:text-properties officeooo:rsid="001877d7"/>
    </style:style>
    <style:style style:name="T7" style:family="text">
      <style:text-properties officeooo:rsid="0018e435"/>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22725e"/>
    </style:style>
    <style:style style:name="T11" style:family="text">
      <style:text-properties officeooo:rsid="0023c7ff"/>
    </style:style>
    <style:style style:name="T12" style:family="text">
      <style:text-properties officeooo:rsid="002479ff"/>
    </style:style>
    <style:style style:name="T13" style:family="text">
      <style:text-properties fo:font-weight="normal" style:font-weight-asian="normal" style:font-weight-complex="normal"/>
    </style:style>
    <style:style style:name="T14" style:family="text">
      <style:text-properties fo:font-weight="normal" officeooo:rsid="002479ff" style:font-weight-asian="normal" style:font-weight-complex="normal"/>
    </style:style>
    <style:style style:name="T15" style:family="text">
      <style:text-properties officeooo:rsid="0024ab97"/>
    </style:style>
    <style:style style:name="T16" style:family="text">
      <style:text-properties fo:font-style="normal" style:font-style-asian="normal" style:font-style-complex="normal"/>
    </style:style>
    <style:style style:name="T17" style:family="text">
      <style:text-properties officeooo:rsid="0026e797"/>
    </style:style>
    <style:style style:name="T18" style:family="text">
      <style:text-properties officeooo:rsid="0028dfc0"/>
    </style:style>
    <style:style style:name="T19" style:family="text">
      <style:text-properties officeooo:rsid="002aaeda"/>
    </style:style>
    <style:style style:name="T20" style:family="text">
      <style:text-properties officeooo:rsid="002c09c3"/>
    </style:style>
    <style:style style:name="T21" style:family="text">
      <style:text-properties officeooo:rsid="00325fb8"/>
    </style:style>
    <style:style style:name="T22" style:family="text">
      <style:text-properties officeooo:rsid="00332ee0"/>
    </style:style>
    <style:style style:name="T23" style:family="text">
      <style:text-properties officeooo:rsid="00382391"/>
    </style:style>
    <style:style style:name="T24" style:family="text">
      <style:text-properties officeooo:rsid="003a173b"/>
    </style:style>
    <style:style style:name="T25" style:family="text">
      <style:text-properties officeooo:rsid="003a3869"/>
    </style:style>
    <style:style style:name="T26" style:family="text">
      <style:text-properties officeooo:rsid="003ac326"/>
    </style:style>
    <style:style style:name="T27" style:family="text">
      <style:text-properties officeooo:rsid="003bfa1a"/>
    </style:style>
    <style:style style:name="T28" style:family="text">
      <style:text-properties fo:font-weight="bold" style:font-weight-asian="bold" style:font-weight-complex="bold"/>
    </style:style>
    <style:style style:name="T29" style:family="text">
      <style:text-properties officeooo:rsid="003d84fd"/>
    </style:style>
    <style:style style:name="T30" style:family="text">
      <style:text-properties officeooo:rsid="003e1361"/>
    </style:style>
    <style:style style:name="T31" style:family="text">
      <style:text-properties officeooo:rsid="00401158"/>
    </style:style>
    <style:style style:name="T32" style:family="text">
      <style:text-properties officeooo:rsid="00420b0e"/>
    </style:style>
    <style:style style:name="T33" style:family="text">
      <style:text-properties officeooo:rsid="0042a911"/>
    </style:style>
    <style:style style:name="T34" style:family="text">
      <style:text-properties fo:language="it" fo:country="IT"/>
    </style:style>
    <style:style style:name="T35" style:family="text">
      <style:text-properties fo:font-size="14pt" officeooo:rsid="001877d7" style:font-size-asian="14pt"/>
    </style:style>
    <style:style style:name="T36" style:family="text">
      <style:text-properties style:font-size-complex="16pt"/>
    </style:style>
    <style:style style:name="T37" style:family="text">
      <style:text-properties officeooo:rsid="0042ca6d"/>
    </style:style>
    <style:style style:name="T38" style:family="text">
      <style:text-properties officeooo:rsid="0043b6de"/>
    </style:style>
    <style:style style:name="T39" style:family="text">
      <style:text-properties officeooo:rsid="00453f8b"/>
    </style:style>
    <style:style style:name="T40" style:family="text">
      <style:text-properties officeooo:rsid="0045be2e"/>
    </style:style>
    <style:style style:name="T41" style:family="text">
      <style:text-properties officeooo:rsid="0046c1a9"/>
    </style:style>
    <style:style style:name="T42" style:family="text">
      <style:text-properties officeooo:rsid="004ab3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loext:marker-style-name="T1"><text:span text:style-name="T4">Legge, Legislazione e Libertà</text:span></text:p>
      <text:p text:style-name="P52" loext:marker-style-name="T1"><text:span text:style-name="T5">(note tratte dal libro di Friedrich August von Hayek)</text:span></text:p>
      <text:p text:style-name="P53" loext:marker-style-name="T1"/>
      <text:p text:style-name="P58" loext:marker-style-name="T1">La nascita dell’approccio evoluzionista</text:p>
      <text:p text:style-name="P54" loext:marker-style-name="T1">Hayek teme che si faccia un errore <text:span text:style-name="T33">nel </text:span>credere che l’evoluzione sociale sia un’applicazione della teoria darwiniana e mette in guardia contro un ipotetico fraintendimento.</text:p>
      <text:p text:style-name="P61" loext:marker-style-name="T1"><text:span text:style-name="T34">Nelle scienze sociali, il pensiero di Friedrich von Hayek opera un’importante inversione di paradigma, stabilendo che non è la sociologia ad aver imitato la biologia, ma il contrario: è la biologia che ha imparato dalle scienze sociali</text:span></text:p>
      <text:p text:style-name="P56" loext:marker-style-name="T1">Contrariamente a quanto comunemente si crede, l'idea di "selezione" non è nata in ambito biologico per poi essere applicata alla società. Lo stesso Charles Darwin riconosceva che il concetto di selezione gli era stato suggerito osservando la concorrenza economica, la competizione sociale e la selezione artificiale praticata dagli allevatori</text:p>
      <text:p text:style-name="P56" loext:marker-style-name="T1">Le scienze sociali, dunque, hanno fornito alla biologia le basi concettuali per comprendere l'evoluzione della specie. Darwin stesso riconosceva che l’idea di “selezione” gli venne osservando la concorrenza economica, la competizione sociale, la selezione artificiale praticata dagli allevatori.</text:p>
      <text:p text:style-name="P53" loext:marker-style-name="T1"><text:soft-page-break/>Per le scienze sociali hayekiane, l'evoluzione culturale non è il risultato di una progettazione consapevole (quello che abbiamo definito "costruttivismo"), ma un processo di selezione naturale di regol<text:span text:style-name="T33">e. </text:span>Per Hayek, evoluzione culturale significa che le istituzioni sociali — diritto, morale, mercato, linguaggio — non sono state progettate da nessuno, ma sono il risultato di un lungo processo di selezione di regole di comportamento che hanno permesso ai gruppi umani di sopravvivere e prosperare.</text:p>
      <text:p text:style-name="P53" loext:marker-style-name="T1">Hayek inserisce il linguaggio nella stessa categoria del diritto, della morale e del mercato. Tutte queste <text:s/>istituzioni sono ordini complessi che emergono dall'interazione di molti individui senza che vi sia un unico "creatore" o un'autorità centrale che ne abbia stabilito le regole iniziali, ma non per questo caotica. <text:span text:style-name="T38">I</text:span>l linguaggio è un ordine spontaneo perché si è evoluto "dal basso" attraverso l'uso e la pratica sociale, consolidandosi in una struttura complessa che nessun intelletto umano singolo avrebbe potuto progettare nella sua interez<text:span text:style-name="T38">za.</text:span></text:p>
      <text:p text:style-name="P55" loext:marker-style-name="T1">Possiamo immaginare le istituzioni sociali come i sentieri di una foresta: non sono stati disegnati da un architetto prima che la foresta venisse abitata, ma sono nati spontaneamente perché migliaia di persone, per generazioni, hanno scelto di calpestare l'erba nello stesso <text:soft-page-break/>punto, trovando quella strada la più sicura e rapida per sopravvivere.</text:p>
      <text:p text:style-name="P54" loext:marker-style-name="T1">Gli scozzesi del Settecento — Hume, Smith, Ferguson — avevano già descritto il mercato, la lingua, il diritto, le istituzioni politiche, come ordini spontanei, cioè come risultati non intenzionali dell’azione umana.</text:p>
      <text:p text:style-name="P53" loext:marker-style-name="T1">David Hume — L’evoluzione delle regole morali non nascono da un progetto razionale, ma dall’esperienza condivisa e dall’abitudine.</text:p>
      <text:p text:style-name="P53" loext:marker-style-name="T1">Per Hume le regole di giustizia (proprietà, promessa, contratto) non sono state inventate da un legislatore ma sono emerse gradualmente perché utili alla convivenza.</text:p>
      <text:p text:style-name="P54" loext:marker-style-name="T1">La morale è un prodotto dell’esperienza collettiva, non della ragione astratta. È un’evoluzione lenta, non pianificata, guidata dall’utilità sociale.</text:p>
      <text:p text:style-name="P53" loext:marker-style-name="T1">Adam Smith — L’evoluzione del mercato e della società nasce spontaneamente dall’interazione degli individui, non da un progetto centrale.</text:p>
      <text:p text:style-name="P53" loext:marker-style-name="T1">La sua “mano invisibile” è un meccanismo evolutivo secondo il quale gli individui perseguono fini personali, generano effetti collettivi non intenzionali, migliorano la cooperazione e la prosperità.</text:p>
      <text:p text:style-name="P53" loext:marker-style-name="T1">Smith applica lo stesso principio anche al linguaggio, al diritto e alle istituzioni morali.</text:p>
      <text:p text:style-name="P54" loext:marker-style-name="T1">Per lui, la società è un ordine complesso non progettato, frutto di adattamenti successivi.</text:p>
      <text:p text:style-name="P53" loext:marker-style-name="T1"><text:soft-page-break/>Adam Ferguson — L’evoluzione delle istituzioni secondo cui “<text:span text:style-name="T38">l</text:span>e nazioni progrediscono grazie a risultati dell’azione umana, ma non della sua progettazione.”</text:p>
      <text:p text:style-name="P53" loext:marker-style-name="T1">Per Ferguson: le istituzioni politiche, le norme sociali, le strutture della società civile non sono state create deliberatamente.</text:p>
      <text:p text:style-name="P54" loext:marker-style-name="T1">Sono il risultato non intenzionale di tentativi, errori, imitazioni, adattamenti. È la <text:s/>prima vera teoria dell’evoluzione culturale, nessun architetto, nessun piano, nessuna mente centrale, solo un processo storico cumulativo.</text:p>
      <text:p text:style-name="P59" loext:marker-style-name="T1"><text:span text:style-name="T36">La persistenza del costruttivismo nel nostro modo di pensare </text:span></text:p>
      <text:p text:style-name="P60" loext:marker-style-name="T1"><text:span text:style-name="T35">L’uomo è tanto un animale bisognoso di seguire regole, quanto una creatura che cerca di darsi dei fini.</text:span><text:span text:style-name="T35"><text:note text:id="ftn1" text:note-class="footnote"><text:note-citation>1</text:note-citation><text:note-body><text:p text:style-name="P1">«L'uomo è un anima<text:span text:style-name="T19">l</text:span>e che segue delle regole. Le sue azioni non sono so<text:span text:style-name="T19">ltanto</text:span> rivolte verso degli obiettivi, ma si conformano a modelli e convenzioni sociali e, a differenza di una macchina calcolatrice, egli agisce grazie alla sua conoscenza di en<text:span text:style-name="T19">t</text:span>rambi, regole ed obi<text:span text:style-name="T6">e</text:span>ttivi. Per esempio, noi attribuiamo agli individui tra<text:span text:style-name="T20">t</text:span>ti del loto carattere quali l'onestà, la puntualità la delicatezza e la meschinità. Tali termini non individuano, a differenza di altri quali <text:span text:style-name="T6">a</text:span>mbizione, fama, arrivismo sociale, il tipo di obi<text:span text:style-name="T6">e</text:span>ttivi che un individuo ten<text:span text:style-name="T37">t</text:span>a di raggiungere; piuttosto, essi indicano il tipo di regole che l'uomo impone alla sua condotta, qualunque sia il proprio obiettivo».</text:p></text:note-body></text:note></text:span><text:span text:style-name="T35"> </text:span></text:p>
      <text:p text:style-name="P62" loext:marker-style-name="T1"><text:span text:style-name="T1">L'approccio costruttivista conduce a false conclusioni, in quanto le azioni umane sono ampiamente do</text:span><text:span text:style-name="T2">t</text:span><text:span text:style-name="T1">a</text:span><text:span text:style-name="T2">t</text:span><text:span text:style-name="T1">e di successo — e questo non solo negli stadi primitivi di civilizzazione ma ancor più in quelli evoluti — perché </text:span><text:soft-page-break/><text:span text:style-name="T1">esse sono adattate a fatti particolari noti all'individuo agente cosi come ad una grande moltitudine di altri fatti che egli non conosce né potrebbe conoscere. Tale adattamento alle circostanze generali che lo circondano è determinato dalla sua osservanza a regole che non ha progettato, e che spesso neppure conosce esplicitamente, sebbene sia capace di seguirle in pratica. </text:span><text:span text:style-name="T3">P</text:span><text:span text:style-name="T1">er dirla in altro modo, il nostro adattamento all'ambiente non consiste solo, e forse neppure principalmente, nella capacità di scorgere le relazioni tra cause ed effetti, ma anche, e soprattutto, nel fatto che le nostre azioni sono governate da regole adattate al tipo di mondo in cui viviamo, cioè a circostanze di cui non siamo ben consapevoli, ma che tuttavia determinano la struttura delle nostre azioni dotate di successo.</text:span></text:p>
      <text:p text:style-name="P57" loext:marker-style-name="T1">La completa razionalità dell'azione, in senso cartesiano, richiede la conoscenza completa di tutti i fatti rilevanti. Un progettista o un ingegnere hanno bisogno di tutti i dati e del pieno potere di controllarli e di manipo<text:span text:style-name="T7">l</text:span>arli, per poter organizzare le circostanze materiali in modo da ottenere il risultato voluto. Ma il successo delle azioni nell'ambito della società richiede un numero di fatti particolari sup<text:span text:style-name="T7">e</text:span>riore a quello che chiunque può essere in grado di conoscere. E, di conseguenza, la nostra intera civiltà si basa, e deve basarsi, su credenze, che noi non <text:soft-page-break/>possiamo conoscere per vere nel senso cartesiano del termine.</text:p>
      <text:p text:style-name="P7">Secondo Hayek, il razionalismo cartesiano <text:s/>quello che lui chiama razionalismo costruttivista si fonda sull’idea che:</text:p>
      <text:p text:style-name="P36">per agire razionalmente bisogna conoscere tutti i fatti rilevanti.</text:p>
      <text:p text:style-name="P8">Questa impostazione deriva dal metodo di Cartesio, che funziona perfettamente nelle scienze esatte, dove il problema può essere isolato, semplificato e trattato con dedu<text:span text:style-name="T10">z</text:span>ione logica.</text:p>
      <text:p text:style-name="P9">Hayek osserva però che nelle scienze sociali questa condizione è impossibile: la conoscenza non è mai concentrata in un’unica mente, ma è dispersa tra milioni di individui, ciascuno con informazioni locali, tacite, mutevol<text:span text:style-name="T10">i.</text:span></text:p>
      <text:p text:style-name="P12">Hayek sostiene che il costruttivismo, cioè l’idea che la società possa essere progettata razionalmente come una macchina, fallisce per due motivi fondamentali: <text:span text:style-name="T39">i</text:span>gnora la dispersione della conoscenza - <text:span text:style-name="T39">l</text:span>a conoscenza sociale è: frammentata, contestuale, spesso tacita, <text:s/>distribuita tra individui diversi.</text:p>
      <text:p text:style-name="P10">Nessun pianificatore, legislatore o “ingegnere sociale” può possederla tutta. Questa è una delle tesi centrali della sua epistemologia: la società funziona nonostante la nostra ignoranza, non grazie a una razionalità totale.</text:p>
      <text:p text:style-name="P11"><text:soft-page-break/><text:span text:style-name="T39">Il costruttivismo s</text:span>opravvaluta la capacità della ragione umana.</text:p>
      <text:p text:style-name="P12">Hayek chiama questa, illusione <text:s/><text:span text:style-name="T17">o </text:span>“presunzione fatale”: la convinzione che un gruppo di esperti possa progettare un ordine sociale migliore di quello che emerge <text:span text:style-name="T11">s</text:span>pontanea­mente dalle interazioni individuali.</text:p>
      <text:p text:style-name="P10">Questa critica è ribadita anche nella sua analisi dei feno­meni complessi e nella distin­zione tra: razionalismo car­tesiano (costruttivista, progettuale) razionalismo critico (consapevole dei limiti della ragione) </text:p>
      <text:p text:style-name="P19">L’alternativa hayekiana - l’ordine spontaneo: <text:span text:style-name="T40">p</text:span>oiché la conoscenza è dispersa, l’unico ordine sociale che può funzionare è quello che:</text:p>
      <text:list text:style-name="L1">
        <text:list-item>
          <text:p text:style-name="P63">non viene progettato,</text:p>
        </text:list-item>
      </text:list>
      <text:list text:style-name="L2">
        <text:list-item>
          <text:p text:style-name="P64">non richiede conoscenza totale,</text:p>
        </text:list-item>
        <text:list-item>
          <text:p text:style-name="P64">emerge spontaneamente dalle interazioni tra individui.</text:p>
        </text:list-item>
      </text:list>
      <text:p text:style-name="P20">Esempi di ordini spontanei:</text:p>
      <text:list text:style-name="L3">
        <text:list-item>
          <text:p text:style-name="P65">il mercato,</text:p>
        </text:list-item>
        <text:list-item>
          <text:p text:style-name="P65">la lingua,</text:p>
        </text:list-item>
        <text:list-item>
          <text:p text:style-name="P65">il diritto consuetudinario,</text:p>
        </text:list-item>
        <text:list-item>
          <text:p text:style-name="P65">le norme morali evolute nel tempo.</text:p>
        </text:list-item>
      </text:list>
      <text:p text:style-name="P13">Questi ordini non sono il prodotto di una mente singola, ma di un processo storico di adattamento.</text:p>
      <text:p text:style-name="P14"><text:soft-page-break/>Per Hayek, la razionalità cartesiana richiede una conoscenza totale che l’uomo non può avere.</text:p>
      <text:p text:style-name="P14">Il costruttivismo, basato su questa pretesa, porta a errori gravi nelle scienze sociali. <text:span text:style-name="T12">L</text:span>a società funziona grazie a un ordine spontaneo, non grazie alla pianificazione razionale.</text:p>
      <text:p text:style-name="P21"><text:span text:style-name="T40">C</text:span>os’è l’“illusione sinottica”</text:p>
      <text:p text:style-name="P15">Hayek usa questa espressione per indicare una tentazione tipica del razionalismo cartesiano: <text:span text:style-name="T18">c</text:span><text:span text:style-name="Strong_20_Emphasis"><text:span text:style-name="T13">redere che sia possibile avere una visione completa (“sinottica”) di tutti i fatti rilevanti per organizzare la società, </text:span></text:span><text:span text:style-name="Strong_20_Emphasis"><text:span text:style-name="T14">è</text:span></text:span> un’illusione perché:</text:p>
      <text:list text:style-name="L4">
        <text:list-item>
          <text:p text:style-name="P66">nessuno possiede tutta la conoscenza necessaria, </text:p>
        </text:list-item>
        <text:list-item>
          <text:p text:style-name="P66">la conoscenza sociale è dispersa tra milioni di individui, </text:p>
        </text:list-item>
        <text:list-item>
          <text:p text:style-name="P67">gran parte di essa è tacita, locale, non formalizzabile.</text:p>
        </text:list-item>
      </text:list>
      <text:p text:style-name="P3">Perché è così seducente:</text:p>
      <text:p text:style-name="P16">Hayek dice che molti intellettuali sono affascinati da sistemi politici o economici che appaiono:</text:p>
      <text:list text:style-name="L5">
        <text:list-item>
          <text:p text:style-name="P68">ben ordinati </text:p>
        </text:list-item>
        <text:list-item>
          <text:p text:style-name="P69">chiari </text:p>
        </text:list-item>
        <text:list-item>
          <text:p text:style-name="P70">facili da comprendere</text:p>
        </text:list-item>
      </text:list>
      <text:p text:style-name="P4">Sono modelli eleganti, geometrici, simili alle costruzioni cartesiane.<text:line-break/><text:soft-page-break/>Ma proprio questa eleganza è ingannevole: <text:span text:style-name="Strong_20_Emphasis"><text:span text:style-name="T13">la realtà sociale non è un sistema semplice</text:span></text:span><text:span text:style-name="T13">.</text:span></text:p>
      <text:p text:style-name="P18">La “presunzione fatale”: <text:span text:style-name="T15">q</text:span>ui Hayek diventa ancora più netto. La<text:span text:style-name="T16"> </text:span><text:span text:style-name="Emphasis"><text:span text:style-name="T16">presunzione fatale</text:span></text:span><text:span text:style-name="T16"> è: </text:span><text:span text:style-name="Strong_20_Emphasis"><text:span text:style-name="T9">la convinzione che la ragione umana possa progettare deliberatamente un ordine sociale migliore di quello che emerge spontaneamente.</text:span></text:span></text:p>
      <text:p text:style-name="P5">È “fatale” perché porta a:</text:p>
      <text:list text:style-name="L6">
        <text:list-item>
          <text:p text:style-name="P71">concentrare potere, </text:p>
        </text:list-item>
        <text:list-item>
          <text:p text:style-name="P72">sopprimere segnali di mercato, </text:p>
        </text:list-item>
        <text:list-item>
          <text:p text:style-name="P72">ignorare conoscenze locali, </text:p>
        </text:list-item>
        <text:list-item>
          <text:p text:style-name="P72">irrigidire la società, </text:p>
        </text:list-item>
        <text:list-item>
          <text:p text:style-name="P72">generare effetti imprevisti e spesso disastrosi.</text:p>
        </text:list-item>
      </text:list>
      <text:p text:style-name="P17"><text:span text:style-name="T18">Vi è un legame </text:span>tra “illusione sinottica” e “presunzione fatale” <text:span text:style-name="T18">che possiamo sintetiz­zare così:</text:span></text:p>
      <text:list text:style-name="L7">
        <text:list-item>
          <text:p text:style-name="P73"><text:span text:style-name="Strong_20_Emphasis"><text:span text:style-name="T13">Illusione sinottica</text:span></text:span><text:span text:style-name="T13"> → credere di poter conoscere tutto. </text:span></text:p>
        </text:list-item>
      </text:list>
      <text:list text:style-name="L8">
        <text:list-item>
          <text:p text:style-name="P74"><text:span text:style-name="Strong_20_Emphasis"><text:span text:style-name="T13">Presunzione fatale</text:span></text:span><text:span text:style-name="T13"> </text:span>→ credere di poter progettare tutto.</text:p>
        </text:list-item>
      </text:list>
      <text:p text:style-name="P16">Il fallimento della pianificazione</text:p>
      <text:p text:style-name="P18">Per Hayek, la pianificazione centralizzata fallisce perché:</text:p>
      <text:list text:style-name="L9">
        <text:list-item>
          <text:p text:style-name="P75"><text:span text:style-name="Strong_20_Emphasis"><text:span text:style-name="T13">non può raccogliere tutta la conoscenza dispersa</text:span></text:span><text:span text:style-name="T13">, </text:span></text:p>
        </text:list-item>
        <text:list-item>
          <text:p text:style-name="P75"><text:span text:style-name="Strong_20_Emphasis"><text:span text:style-name="T13">non può aggiornarsi alla velocità dei cambiamenti locali</text:span></text:span><text:span text:style-name="T13">, </text:span></text:p>
        </text:list-item>
        <text:list-item>
          <text:p text:style-name="P75"><text:span text:style-name="Strong_20_Emphasis"><text:span text:style-name="T13">non può prevedere gli effetti secondari</text:span></text:span><text:span text:style-name="T13">, </text:span></text:p>
        </text:list-item>
        <text:list-item>
          <text:p text:style-name="P75"><text:span text:style-name="Strong_20_Emphasis"><text:span text:style-name="T13">non può sostituire i segnali di prezzo</text:span></text:span><text:span text:style-name="T13">, </text:span></text:p>
        </text:list-item>
        <text:list-item>
          <text:p text:style-name="P76"><text:soft-page-break/><text:span text:style-name="Strong_20_Emphasis"><text:span text:style-name="T13">non può replicare l’ordine spontaneo che emerge dal basso</text:span></text:span><text:span text:style-name="T13">.</text:span> </text:p>
        </text:list-item>
      </text:list>
      <text:p text:style-name="P16">Il risultato è sempre lo stesso: <text:span text:style-name="Strong_20_Emphasis"><text:span text:style-name="T13">rigidità, inefficienza, perdita di libertà, e infine collasso.</text:span></text:span></text:p>
      <text:p text:style-name="P6">Entrambe spiegano perché, secondo Hayek, la piani­ficazione razionale della società — tipica del co­struttivismo cartesiano — è destinata a fallire.</text:p>
      <text:p text:style-name="P22">I pericoli derivanti dall'attribuire maggior importanza alle conseguenze predicibili<text:note text:id="ftn0" text:note-class="footnote"><text:note-citation>2</text:note-citation><text:note-body><text:p text:style-name="P39">Un comportamento o un risultato il cui verificarsi è intuibile o atteso.</text:p></text:note-body></text:note> piuttosto che alle conseguenze meramente possibili delle nostre azioni".</text:p>
      <text:p text:style-name="P27"><text:span text:style-name="T21">Qui è il </text:span>cuore della sua critica al costruttivismo e all'utilitarismo ingenuo.</text:p>
      <text:p text:style-name="P25">Per capire esattamente cosa intenda Hayek, dobbiamo fare un piccolo passo indietro e guardare come lui vede la mente umana e la società.</text:p>
      <text:p text:style-name="P26">Hayek parte da un presupposto di radicale umiltà cognitiva: la nostra ignoranza è inevitabile. Nessun singolo individuo, e nessun comitato di pianificatori, può conoscere tutti i fatti particolari, i desideri, le competenze e le circostanze che muovono una società complessa.</text:p>
      <text:p text:style-name="P26">La civiltà non è nata perché qualcuno l'ha progettata a tavolino, ma attraverso un ordine spontaneo (cosmos), regolato da norme di condotta che si sono evolute nel tempo, la "Legge". Queste norme astratte (come il <text:soft-page-break/>rispetto della proprietà o dei contratti) non servono a raggiungere uno scopo specifico e visibile, ma servono a permettere a individui ignoti di cooperare pacificamente inseguendo i propri scopi.</text:p>
      <text:p text:style-name="P44">La distinzione tra conseguenze "predicibili" e "meramente possibili"</text:p>
      <text:p text:style-name="P28">Quando un legislatore o un individuo decide di violare una regola generale a fin di bene, di solito lo fa perché vede un problema concreto e immediato da risolvere.</text:p>
      <text:p text:style-name="P28">Le conseguenze predicibili (o visibili): Sono gli effetti diretti, immediati e tangibili di un'azione o di una legge. Se lo Stato interviene per bloccare i prezzi di un bene in un momento di crisi, la conseguenza predicibile e immediata è che quel bene costerà meno per chi riesce a comprarlo. Sembra un atto morale e razionale.</text:p>
      <text:p text:style-name="P28">Le conseguenze meramente possibili (o invisibili): Sono gli effetti a lungo termine, diffusi e indiretti che derivano dall'aver scardinato una regola generale. Nel caso del blocco dei prezzi, la conseguenza possibile (e storicamente probabilissima) è che i produttori smetteranno di produrre quel bene, creando penuria, mercati neri e un collasso del sistema di incentivi.</text:p>
      <text:p text:style-name="P28">Hayek dice che, poiché le conseguenze positive immediate sono certe e visibili, mentre quelle negative a lungo termine sono astratte, invisibili e solo potenziali, la <text:soft-page-break/>mente umana tende stupidamente a dare più peso alle prime.</text:p>
      <text:p text:style-name="P28">Il pericolo di cui parla Hayek <text:span text:style-name="T22">nel</text:span> paragrafo si articola su tre livelli:</text:p>
      <text:p text:style-name="P28"><text:span text:style-name="T8">La distruzione della certezza del diritto:</text:span> <text:span text:style-name="T41">s</text:span>e iniziamo a giustificare la violazione delle norme generali di giustizia ogni volta che una "buona causa" immediata sembra richiederlo, la legge cessa di essere una guida stabile. Diventa uno strumento di arbitrio politico.</text:p>
      <text:p text:style-name="P28"><text:span text:style-name="T8">L'illusione del controllo (L'inganno utilitaristico):</text:span> L'utilitarismo calcola il bene in base agli effetti prevedibili dell'azione. Ma Hayek ci avverte: non siamo abbastanza intelligenti per calcolare gli effetti a lungo termine della distruzione di una regola. Crediamo di essere razionali, ma stiamo solo agendo in base alla nostra cecità.</text:p>
      <text:p text:style-name="P28"><text:span text:style-name="T8">Il totalitarismo strisciante:</text:span> Ogni volta che si preferisce il risultato concreto e pianificato (la conseguenza predicibile) al rispetto di una norma astratta, si sottraggono spazi alla libertà individuale. Se il legislatore si arroga il diritto di guidare le azioni in base agli esiti specifici che desidera ottenere, la società scivola inevitabilmente verso la pianificazione totale e la perdita della libertà.</text:p>
      <text:p text:style-name="P28"><text:soft-page-break/>Hayek ci sta dicendo che la libertà si regge sul rispetto di regole di cui spesso non comprendiamo appieno l'utilità immediata, ma che proteggono l'ordine sociale da disastri futuri che non siamo in grado di prevedere, ma che rimangono drammaticamente possibili.</text:p>
      <text:p text:style-name="P49">La libertà può essere preservata solo seguendo dei principi, e viene distrutta se si seguono degli espedienti validi caso per caso.</text:p>
      <text:p text:style-name="P29">Questa frase tocca uno dei nodi cruciali della filosofia politica ed etica, sollevando una contrapposizione netta tra la stabilità dei principi e la deriva del pragmatismo spicciolo (o utilitarismo caso per caso).</text:p>
      <text:p text:style-name="P28">L'essenza del concetto si articola su due livelli:</text:p>
      <text:p text:style-name="P28">1. La fragilità dell'espediente (Il caso per caso)</text:p>
      <text:p text:style-name="P28">Quando la libertà viene gestita tramite espedienti estemporanei, cessa di essere un diritto universale e diventa una concessione condizionata. L'approccio puramente pragmatico o emergenziale ("per questa volta facciamo un'eccezione", "in questo caso specifico conviene fare così") è per sua natura arbitrario.</text:p>
      <text:p text:style-name="P28">Se si accetta che una regola fondamentale possa essere aggirata per un fine immediato o per un calcolo di convenienza del momento, si crea un precedente. Una volta che il principio diventa negoziabile, la libertà non è più protetta da un argine invalicabile, ma resta alla mercé <text:soft-page-break/>di chi ha il potere di definire cosa costituisca un "caso eccezionale".</text:p>
      <text:p text:style-name="P28">Per Hayek, pretendere di regolare la società caso per caso, basandosi sull'espediente apparentemente più "razionale" o "utile" del momento, è un'illusione pericolosa (quella che lui chiama l'ingegneria sociale).</text:p>
      <text:p text:style-name="P28">2. La forza del principio (La visione a lungo termine)</text:p>
      <text:p text:style-name="P28">I principi sono, per definizione, de-contestualizzati: valgono sia quando sono comodi, sia (e soprattutto) quando applicarli comporta un costo o un sacrificio immediato. Preservare la libertà attraverso i principi significa accettare una rigidità strutturale che protegge l'individuo dal capriccio del momento o dalla tirannia della maggioranza.</text:p>
      <text:p text:style-name="P28">Questo concetto richiama fortemente la visione di pensatori che hanno riflettuto sui fondamenti del diritto e della politica:</text:p>
      <text:p text:style-name="P28"><text:s text:c="4"/>• L'imperativo etico: Se l'azione non si fonda su una massima universalizzabile, ma solo sull'opportunismo del momento, crolla l'impalcatura della responsabilità e della convivenza civile.</text:p>
      <text:p text:style-name="P28"><text:s text:c="4"/>• Il costituzionalismo: Le regole del gioco (i principi costituzionali) servono proprio a impedire che le decisioni contingenti e gli umori passeggeri distruggano i diritti fondamentali.</text:p>
      <text:p text:style-name="P28"><text:soft-page-break/>L'espediente cerca la soluzione più comoda o efficace nel breve termine, ma erode le fondamenta della struttura. Il principio, pur sembrando talvolta rigido o svantaggioso nell'immediato, è l'unica garanzia che quella stessa libertà esista ancora domani.</text:p>
      <text:p text:style-name="P28">Quando il legislatore o il pianificatore politico interviene per risolvere un problema specifico con un provvedimento ad hoc, crede di fare del bene. In realtà, sta introducendo un arbitrio che distorce l'ordine spontaneo della società. L'espediente distrugge la certezza del diritto: se i cittadini non possono più prevedere come lo Stato applicherà le regole, non possono più pianificare liberamente le proprie vite. La libertà scivola così, un compromesso alla volta, verso la sottomissione.</text:p>
      <text:p text:style-name="P28">I principi generali e astratti — le norme di corretta condotta che si applicano a tutti indistintamente, senza guardare al risultato del caso specifico — sono per Hayek il distillato di un'evoluzione culturale. Sono regole che sono sopravvissute perché permettono agli individui di cooperare pacificamente pur non conoscendosi.</text:p>
      <text:p text:style-name="P28">I principi stabili devono essere inflessibili, persino quando l'applicazione rigorosa sembra portare a un esito immediato meno soddisfacente rispetto a un espediente. Questo perché il beneficio di un principio non si vede nel <text:soft-page-break/>singolo caso, ma nella stabilità complessiva del sistema che esso garantisce nel lungo periodo.</text:p>
      <text:p text:style-name="P28">In un'epoca in cui la politica tende sempre più a governare tramite decreti d'urgenza e risposte emotive agli eventi quotidiani, questa analisi di Hayek sulla "dittatura del contingente" conserva una lucidità quasi profetica.</text:p>
      <text:p text:style-name="P24">Il realismo spurio (falso realismo) e il coraggio necessario per concepire l’utopia. </text:p>
      <text:p text:style-name="P42">Questo è il messaggio che von Hyyek rivolge agli intellettuali liberali che si dicono "pratici" e "concreti", ma che in realtà sono schiavi del presente.</text:p>
      <text:p text:style-name="P42">Il realista spurio è colui che si limita a considerare come unico orizzonte d'azione ciò che è politicamente realizzabile oggi, accettando lo stato delle cose e l'opinione pubblica dominante come dati immutabili.</text:p>
      <text:p text:style-name="P30">Pensa che la politica sia solo l'arte del compromesso immediato, dell'aggiustamento marginale o della "ristrutturazione" dell'esistente (ad esempio, accettare un socialismo mitigato o un <text:span text:style-name="T8">welfare state</text:span> sempre più pervasivo solo perché "ormai la storia va in quella direzione").</text:p>
      <text:p text:style-name="P30">Per Hayek, questo non è vero realismo, ma cecità intellettuale. Chi si adegua costantemente a ciò che sembra "pratico" nel breve termine non si accorge che <text:soft-page-break/>l'opinione pubblica e i confini di ciò che è "possibile" sono determinati da idee nate decenni prima. Rinunciando a difendere i princìpi di fondo per inseguire il pragmatismo immediato, il realista spurio finisce per farsi trascinare passivamente verso la direzione tracciata dai suoi avversari politici.</text:p>
      <text:p text:style-name="P23">Il coraggio di concepire l’utopia</text:p>
      <text:p text:style-name="P31">Il liberalismo, per sopravvivere e vincere, deve riscoprire il coraggio di essere utopico.</text:p>
      <text:p text:style-name="P32">Secondo la prospettiva di Friedrich von Hayek, il clamoroso successo storico di un movimento politico come il socialismo, specialmente tra gli intellettuali, non è dipeso dalla validità delle sue basi scientifiche o pratiche, che egli considerava fallaci, <text:span text:style-name="T23">i</text:span>l successo è derivato invece dal "coraggio dell'utopia": la capacità di proporre una visione trasformativa e ideale capace di conquistare l'immaginazione e l'adesione morale delle persone, offrendo una meta che va oltre la realtà effettuale.</text:p>
      <text:p text:style-name="P32">Karl Marx giudicava le prime tendenze del socialismo francese come puramente "utopistiche" e ideologiche. Egli cercò di sostituire l'utopia con una "analisi scientifica" della società, basata sulla critica dell'economia politica e sul materialismo storico. <text:span text:style-name="T23">Secondo Karl Marx e Friederich Engels, il motore della </text:span><text:soft-page-break/><text:span text:style-name="T23">storia umana non è lo spirito o le idee, ma l’evoluzione delle condizioni materiali ed economiche della vita.</text:span></text:p>
      <text:p text:style-name="P32">Nonostante la pretesa di scientificità di Marx, <text:span text:style-name="T24">è opinione comune tra gli intellettuali, che </text:span>la forza politica del movimento risiedesse proprio in quella carica utopica che permetteva di trasformare la sofferenza materiale in una "coscienza di classe" orientata verso un futuro di collettivizzazione e uguaglianza.</text:p>
      <text:p text:style-name="P32">Il successo politico di una visione utopica si lega alla promessa di superare la decadenza e l'alienazione, <text:span text:style-name="T24">in</text:span> un'epoca segnata dall'asservimento al ciclo lavorativo e dalla logica della merce. <text:span text:style-name="T25">L’</text:span>utopia politica promette il recupero dell'umanità perduta attraverso una trasformazione complessiva dei rapporti di produzione, la cui base è data dal possesso privato del capitale. <text:span text:style-name="T25">L</text:span>’uomo può riconquistare la propria umanità e divenire compiutamente un essere sociale oltre ogni scissione con se stesso e gli altri individui, <text:span text:style-name="T24">eliminando la contraddizio­ne tra l'uomo come "borghese" (disuguale concretamen­te) e come "cittadino" (uguale astrattamente), prometten­do un'emancipazione reale che riappropri l'essenza uma­na</text:span><text:span text:style-name="T24"><text:note text:id="ftn2" text:note-class="footnote"><text:note-citation>3</text:note-citation><text:note-body><text:p text:style-name="P1">La critica nietzschiana: l'Utopia come "Ipocrisia del Gregge"</text:p><text:p text:style-name="P2">Nietzsche offre una visione critica del successo politico basato su ideali utopici di uguaglianza, <text:span text:style-name="T26">e</text:span>gli vede nel successo delle morali democratiche e socialiste una "gigantesca operazione di ipocrisia collettiva", dove la debolezza viene mascherata da scelta morale. Per Nietzsche, l'utopia dell'uguaglianza dei diritti è un "veleno" che nega gli istinti vitali e conduce al nichilismo, ovvero alla svalutazione di tutti i valori in nome di una pace del "gregge" che annulla la forza creatrice del singolo.</text:p></text:note-body></text:note></text:span><text:span text:style-name="T24">.</text:span></text:p>
      <text:p text:style-name="P32"><text:soft-page-break/>Hayek scrive: "<text:span text:style-name="T8">Ciò che ci manca è un'Utopia liberale, un programma che non sembri né una mera difesa delle cose come sono, né una sorta di socialismo diluito, ma un radicalismo veramente liberale che non sia troppo severamente pratico."</text:span></text:p>
      <text:p text:style-name="P31">Concepire l'utopia liberale significa <text:span text:style-name="T26">l</text:span>avorare per un ideale puro, a prescindere dalle sue immediate possibilità di realizzazione. Il teorico non deve fare i compromessi che spettano al politico; il suo compito è mantenere intatta la coerenza del modello interno (un mercato davvero libero, la sovranità della legge astratta, la limitazione drastica del potere statale).</text:p>
      <text:p text:style-name="P31">Se il liberalismo si riduce a dire semplici "no" ai progetti altrui, o a proporre una "ragionevole riduzione delle tasse" o un "allentamento dei controlli", non ispirerà mai nessuno. Deve invece proporre una visione radicale della libertà come ordine spontaneo e autogestito.</text:p>
      <text:p text:style-name="P32"><text:span text:style-name="T25">I</text:span>l successo politico non è solo una questione di gestione del potere, ma della capacità di fornire un "fine superiore" che dia senso all'esistenza. <text:span text:style-name="T25">L</text:span>'utopia funge da catalizzatore che permette di integrare la vita individuale in una "necessaria catena di anelli della cultura", offrendo la promessa di un cambiamento radicale della condizione umana. <text:span text:style-name="T25">Per visualizzare questo legame, </text:span><text:soft-page-break/>possiamo pensare a una bussola in una tempesta: la politica "pratica" è la tecnica con cui si manovrano le vele per non affondare, ma l'utopia è la stella polare che convince l'equipaggio che valga la pena continuare a remare verso un porto che ancora non si vede all'orizzonte.</text:p>
      <text:p text:style-name="P50">Il ruolo del giurista nell’evoluzione politica</text:p>
      <text:p text:style-name="P34">Per Friedrich von Hayek, il ruolo del giurista non è affatto quello di un ingegnere sociale che progetta le leggi da zero, bensì quello di un custode e scopritore di un ordine spontaneo.</text:p>
      <text:p text:style-name="P33">Nella sua evoluzione intellettuale, Hayek compie una distinzione netta tra la Legge (Nomos, le norme di condotta giusta nate spontaneamente) e il Decreto (Thesis, la legge dell'organizzazione, cioè la legislazione statale). Il giurista si colloca esattamente al centro di questa tensione<text:note text:id="ftn3" text:note-class="footnote"><text:note-citation>4</text:note-citation><text:note-body><text:p text:style-name="P37">Il Nomos (legge della libertà) rappresenta la legge nel suo senso più antico e profondo: non un comando imposto dall'alto, ma il riflesso delle regole di condotta stabili e astratte che si sono sviluppate spontaneamente per consentire la convivenza pacifica tra gli individui. Il Nomos non è il prodotto della volontà di un legislatore, ma il risultato di un lungo processo di selezione culturale, tentativi ed errori. Le società che hanno adottato determinate regole (ad esempio, il rispetto della proprietà privata e dei contratti) sono fiorite, mentre le altre sono decadute. Le norme del Nomos sono astratte, generali e prospettiche. Si applicano a un numero indefinito di persone e di casi futuri, senza fare distinzioni di status o di classe. Sono prevalentemente divieti ("non fare"). Non dicono all'individuo cosa fare o quali scopi perseguire, ma delimitano una sfera protetta di libertà all'interno della quale ognuno può formulare i propri piani personali. Preservare il Cosmos, ovvero l'ordine spontaneo del mercato e della società, garantisce la massima prevedibilità delle azioni altrui. Il giudice non crea il Nomos; lo scopre risolvendo i conflitti concreti e rendendo esplicite quelle regole di giustizia che la comunità già sente come vincolanti (il tipico approccio della Common Law britannica, <text:span text:style-name="T42">la quale non si basa su codici scritti, ma sulle decisioni dei giudici precedenti. Ha natura evolutiva, garantisce la certezza del diritto e si adatta ai casi reali attraverso le corti.</text:span></text:p><text:p text:style-name="P38"><text:tab/>La Thesis è la <text:span text:style-name="T28">legislazione</text:span> propriamente detta, l'insieme dei decreti, dei regolamenti e dei comandi specifici emanati dall'autorità politica per gestire l'apparato governativo e raggiungere determinati obiettivi concreti. È il prodotto intenzionale di una mente o di un corpo legislativo (un parlamento, un sovrano, una burocrazia). È una progettazione top-down (dall'alto verso il basso). Le norme della Thesis sono spesso specifiche e finalizzate. Si rivolgono a gruppi precisi di persone (es. i funzionari pubblici, o specifiche categorie di cittadini) e cambiano rapidamente a seconda delle necessità politiche del momento. Impongono obblighi di fare <text:span text:style-name="T29">(positivismo giuridico)</text:span>. Prescrivono comportamenti specifici per indirizzare le risorse verso scopi stabiliti dal governo (es. la riscossione delle tasse, la gestione dei servizi pubblici, l'organizzazione della difesa). Hayek riconosce che la Thesis è indispensabile per far funzionare lo Stato e per amministrare i beni pubblici. <text:span text:style-name="T28">Il disastro politico moderno avviene quando lo Stato usa gli strumenti della Thesis (i decreti amministrativi) per sostituire o alterare il Nomos (le regole generali di condotta), tentando di pianificare l'intera società o di imporre una "giustizia distributiva"</text:span>.</text:p></text:note-body></text:note>.</text:p>
      <text:p text:style-name="P34"><text:soft-page-break/>Hayek si oppone radicalmente al positivismo giuridico (l'idea che la legge sia valida solo in quanto emanata da un'autorità sovrana). Per lui, il diritto preesiste allo Stato. I sistemi giuridici evolvono attraverso un processo di tentativi ed errori, accumulando le esperienze di generazioni.</text:p>
      <text:p text:style-name="P34">Il giurista <text:span text:style-name="T27">inteso come scopritore e non come creatore è s</text:span>imile a quello del giudice di Common Law, il giurista deve "scoprire" le regole di condotta già implicitamente accettate dalla società e renderle esplicite. Il suo lavoro è un'opera di pulizia e articolazione di norme preesistenti, <text:soft-page-break/>volte a risolvere conflitti e a preservare le aspettative stabili dei cittadini.</text:p>
      <text:p text:style-name="P33">Nel corso dell'evoluzione politica moderna, la figura del giurista ha subito — secondo Hayek — una pericolosa mutazione. Trasformandosi da servitore del diritto a funzionario della macchina burocratica o legislativa, il giurista moderno è diventato lo strumento del costruttivismo: l'illusione che una mente centrale possa pianificare e programmare la società attraverso decreti ed editti.</text:p>
      <text:p text:style-name="P33">Quando il giurista si presta a questo ruolo, smette di difendere la libertà e favorisce l'espansione del potere statale, riducendo la legge a mero strumento di governo e di redistribuzione politica.</text:p>
      <text:p text:style-name="P35">In un sistema di questo tipo, la libertà individuale perde la sua protezione oggettiva <text:span text:style-name="T30">se </text:span>ogni decisione della maggioranza è considerata legge, <text:span text:style-name="T30">e in questi casi </text:span>la democrazia può trasformarsi in uno strumento di oppressione perfettamente legale, dove il diritto del singolo viene sacrificato in nome della volontà collettiva. <text:span text:style-name="T30">I</text:span>l totalitarismo democratico è una gabbia invisibile costruita non con la forza bruta, ma con la burocrazia e il voto di maggioranza, trasforma la Legge da scudo della libertà a strumento di ingegneria sociale, rendendo i cittadini "servi volontari" di un piano collettivo che non hanno scelto.</text:p>
      <text:p text:style-name="P35"><text:soft-page-break/><text:span text:style-name="T27">Comunque, l</text:span>'evoluzione spontanea del diritto non è perfetta; può produrre vicoli ciechi o regole non più adatte. Il giurista e il giudice hanno il compito di intervenire, ma con un approccio "chirurgico" e conservativo. Ogni modifica o chiarimento della norma deve essere coerente con il resto del corpus giuridico esistente. L'obiettivo è sempre quello di migliorare la cooperazione sociale dinamica, riducendo l'incertezza, non di imporre una visione ideologica o un particolare "risultato" economico. <text:span text:style-name="T27">L’</text:span>evoluzione politica sana di una società libera, dipende da giuristi che comprendono i limiti della conoscenza umana. Il loro vero ruolo politico è limitare la politica stessa, mantenendo salde le regole del gioco che permettono agli individui di pianificare la propria vita in autonomia.</text:p>
      <text:p text:style-name="P51"><text:span text:style-name="T31">L</text:span>a degenerazione del diritto moderno non è un fallimento puramente tecnico o giuridico, ma la conseguenza diretta del trionfo di teorie economiche errate — in particolare quelle di stampo interventista, keynesiano e collettivista.</text:p>
      <text:p text:style-name="P46">Per comprendere come, secondo Hayek, le "false concezioni economiche" abbiano sviato il diritto, occorre analizzare la transizione dalla legge intesa come cornice astratta alla legge intesa come strumento di direzione economica.</text:p>
      <text:p text:style-name="P46"><text:soft-page-break/>La prima falsa concezione economica è il costruttivismo: l'idea che l'economia di mercato sia un meccanismo progettato (o progettabile) dall'uomo, che può essere regolato e aggiustato a piacimento attraverso interventi legislativi, esattamente come un ingegnere fa con una macchina. L'economia non è una macchina, ma un ordine spontaneo guidato dal meccanismo dei prezzi. Nessuna mente centrale possiede la conoscenza dispersa necessaria per coordinare i bisogni e le risorse di milioni di individui. Per "correggere" presunti fallimenti di questo meccanismo, i legislatori hanno iniziato a emanare leggi non più per garantire la giustizia, ma per ottenere risultati economici specifici (fissazione dei prezzi, sussidi, quote di produzione). Il diritto ha così abbandonato la sua natura astratta (Nomos) per trasformarsi in una serie di comandi burocratici (Thesis), distruggendo la prevedibilità delle regole del gioco.</text:p>
      <text:p text:style-name="P47"><text:span text:style-name="T31">P</text:span>er Hayek, il concetto di "giustizia sociale" applicato al mercato è un nonsenso logico e una falsa concezione economica distruttiva. Il mercato non distribuisce la ricchezza in base al "merito morale", ma in base al valore che i consumatori attribuiscono a beni e servizi in un dato momento. Credere che lo Stato possa determinare una ripartizione "giusta" della ricchezza senza distruggere i segnali del mercato (i prezzi e i profitti) che spingono le risorse dove sono più utili.</text:p>
      <text:p text:style-name="P48"><text:soft-page-break/>Per perseguire la giustizia distributiva, il diritto ha dovuto smettere di essere uguale per tutti. La legislazione moderna è diventata un catalogo di privilegi e discriminazioni legali: norme specifiche per favorire o tutelare determinati gruppi (lavoratori di un settore, inquilini, specifiche industrie) a scapito di altri. Il principio fondamentale dell'uguaglianza di fronte alla legge è stato sostituito dall'uguaglianza dei risultati, che richiede intrinsecamente un trattamento giuridico disuguale e arbitrario.</text:p>
      <text:p text:style-name="P48">Il trionfo delle teorie economiche della pianificazione (specialmente a metà del XX secolo) ha diffuso l'idea che lo Stato debba guidare lo sviluppo economico complessivo della nazione. L'illusione che la crescita sia il prodotto di una direzione centralizzata e non della libera iniziativa individuale coordinata dal mercato.</text:p>
      <text:p text:style-name="P48">Il diritto è stato ridotto a mero strumento amministrativo del potere esecutivo. Invece di corti di giustizia che applicano regole stabili, lo sviluppo economico moderno ha visto la proliferazione di agenzie governative, autorità di regolamentazione e burocrazie dotate di enormi poteri discrezionali. La legge non dice più al cittadino cosa non può fare (lasciandolo libero di agire), ma dice alle autorità come regolare ciò che il cittadino fa.</text:p>
      <text:p text:style-name="P47"><text:soft-page-break/><text:span text:style-name="T32">Q</text:span>uando il diritto si piega a "false concezioni economiche", cessa di essere il guardiano della libertà e diventa la cinghia di trasmissione del dirigismo statale.</text:p>
      <text:p text:style-name="P48">Il diritto moderno ha smesso di essere una barriera contro l'arbitrio del potere ed è diventato lo strumento principale con cui il potere esercita l'arbitrio, giustificandolo in nome dell'efficienza economica o della solidarietà sociale.</text:p>
      <text:p text:style-name="P48">Il risultato politico di questa deviazione non è una società più prospera o più giusta, ma quella che Hayek definisce la Via della schiavitù<text:note text:id="ftn4" text:note-class="footnote"><text:note-citation>5</text:note-citation><text:note-body><text:p text:style-name="P40">“The Road to Serfdom”, libro scritto tra il 1940 e il 1943, è dedicato ai socialisti di tutti i partiti, intendendo in quel momento per socialisti coloro che propugnavano la politica di nazionalizzazione dei mezzi di produzione e la pianificazione centralizzata.</text:p></text:note-body></text:note>: un sistema in cui la certezza del diritto svanisce e i diritti individuali vengono progressivamente subordinati alle priorità economiche stabilite dal pianificatore di tur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4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family-generic="roman"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2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5-15T16:25:21.293330400</meta:creation-date>
    <dc:date>2026-06-21T19:06:09.311516203</dc:date>
    <dc:creator>corrado tafaro</dc:creator>
    <meta:editing-duration>PT3H6S</meta:editing-duration>
    <meta:editing-cycles>17</meta:editing-cycles>
    <meta:generator>LibreOffice/24.2.7.2$Linux_X86_64 LibreOffice_project/420$Build-2</meta:generator>
    <meta:document-statistic meta:table-count="0" meta:image-count="0" meta:object-count="0" meta:page-count="26" meta:paragraph-count="149" meta:word-count="5000" meta:character-count="33944" meta:non-whitespace-character-count="29070"/>
  </office:meta>
</office:document-meta>
</file>