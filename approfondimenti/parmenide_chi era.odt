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3pt" fo:font-style="normal" officeooo:rsid="00572710" officeooo:paragraph-rsid="0000975a" style:font-size-asian="13pt" style:font-style-asian="normal" style:font-size-complex="13pt" style:font-style-complex="normal"/>
    </style:style>
    <style:style style:name="P2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3pt" fo:font-style="normal" officeooo:rsid="0028adfc" officeooo:paragraph-rsid="0000f2d3" style:font-size-asian="13pt" style:font-style-asian="normal" style:font-size-complex="13pt" style:font-style-complex="normal"/>
    </style:style>
    <style:style style:name="P3" style:family="paragraph" style:parent-style-name="Standard">
      <style:paragraph-properties fo:margin-top="0.101cm" fo:margin-bottom="0cm" style:contextual-spacing="false" fo:line-height="115%" fo:text-align="center" style:justify-single-word="false"/>
      <style:text-properties style:font-name="Noto Sans1" fo:font-size="13pt" fo:font-style="normal" fo:font-weight="bold" officeooo:rsid="00495b7a" officeooo:paragraph-rsid="0002cf35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3pt" fo:font-style="normal" fo:font-weight="normal" officeooo:rsid="002994d3" officeooo:paragraph-rsid="0002cf35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3pt" fo:font-style="normal" fo:font-weight="normal" officeooo:rsid="002994d3" officeooo:paragraph-rsid="0002cf35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margin-top="0.199cm" fo:margin-bottom="0cm" style:contextual-spacing="false" fo:line-height="100%" fo:text-align="justify" style:justify-single-word="false"/>
      <style:text-properties style:font-name="Noto Sans1" fo:font-size="13pt" fo:font-style="normal" fo:font-weight="normal" officeooo:rsid="002994d3" officeooo:paragraph-rsid="0002cf35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3pt" officeooo:rsid="0027e024" officeooo:paragraph-rsid="0000975a" style:font-size-asian="13pt" style:font-size-complex="13pt"/>
    </style:style>
    <style:style style:name="P8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3pt" officeooo:rsid="0028adfc" officeooo:paragraph-rsid="0000f2d3" style:font-size-asian="13pt" style:font-size-complex="13pt"/>
    </style:style>
    <style:style style:name="P9" style:family="paragraph" style:parent-style-name="Standard">
      <style:paragraph-properties fo:margin-top="0.3cm" fo:margin-bottom="0cm" style:contextual-spacing="false" fo:line-height="115%" fo:text-align="center" style:justify-single-word="false"/>
      <style:text-properties style:font-name="Noto Sans1" fo:font-size="13pt" fo:font-style="italic" fo:font-weight="normal" officeooo:rsid="0028adfc" officeooo:paragraph-rsid="0000f2d3" style:font-size-asian="13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paragraph-properties fo:margin-top="0.199cm" fo:margin-bottom="0cm" style:contextual-spacing="false" fo:line-height="100%" fo:text-align="center" style:justify-single-word="false"/>
      <style:text-properties style:font-name="Noto Sans1" fo:font-size="13pt" fo:font-style="italic" fo:font-weight="normal" officeooo:rsid="002994d3" officeooo:paragraph-rsid="0002cf35" style:font-size-asian="13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Noto Sans1" fo:font-size="13pt" fo:font-style="italic" fo:font-weight="normal" officeooo:rsid="002994d3" officeooo:paragraph-rsid="0002cf35" style:font-size-asian="13pt" style:font-style-asian="italic" style:font-weight-asian="normal" style:font-size-complex="13pt" style:font-style-complex="italic" style:font-weight-complex="normal"/>
    </style:style>
    <style:style style:name="P12" style:family="paragraph" style:parent-style-name="Standard">
      <style:paragraph-properties fo:margin-top="0.199cm" fo:margin-bottom="0cm" style:contextual-spacing="false" fo:line-height="115%" fo:text-align="center" style:justify-single-word="false"/>
      <style:text-properties style:font-name="Noto Sans1" fo:font-size="14pt" fo:font-style="normal" fo:font-weight="normal" officeooo:rsid="0002cf35" officeooo:paragraph-rsid="0002cf35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style:font-name="Noto Sans1" fo:font-size="13pt" fo:font-style="italic" fo:text-shadow="none" fo:font-weight="normal" officeooo:paragraph-rsid="0000f2d3" style:font-size-asian="13pt" style:font-style-asian="italic" style:font-weight-asian="normal" style:font-size-complex="13pt" style:font-style-complex="italic" style:font-weight-complex="normal"/>
    </style:style>
    <style:style style:name="P14" style:family="paragraph" style:parent-style-name="Text_20_body">
      <style:paragraph-properties fo:margin-top="0.199cm" fo:margin-bottom="0cm" style:contextual-spacing="false" fo:line-height="115%" fo:text-align="center" style:justify-single-word="false"/>
      <style:text-properties style:font-name="Noto Sans1" fo:font-size="13pt" fo:font-style="italic" fo:text-shadow="none" fo:font-weight="bold" officeooo:paragraph-rsid="0000f2d3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ize="11pt" fo:font-style="normal" style:font-size-asian="11pt" style:font-style-asian="normal" style:font-size-complex="11pt" style:font-style-complex="normal"/>
    </style:style>
    <style:style style:name="T3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028adfc"/>
    </style:style>
    <style:style style:name="T7" style:family="text">
      <style:text-properties officeooo:rsid="004c2768"/>
    </style:style>
    <style:style style:name="T8" style:family="text">
      <style:text-properties style:font-name="Noto Sans" fo:font-style="italic" officeooo:rsid="0028adfc" style:font-style-asian="italic" style:font-style-complex="italic"/>
    </style:style>
    <style:style style:name="T9" style:family="text">
      <style:text-properties style:font-name="Noto Sans" fo:font-style="italic" officeooo:rsid="00850878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8adfc" style:font-style-asian="italic" style:font-style-complex="italic"/>
    </style:style>
    <style:style style:name="T12" style:family="text">
      <style:text-properties fo:font-style="italic" officeooo:rsid="0083b457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8adfc" style:font-style-asian="normal" style:font-style-complex="normal"/>
    </style:style>
    <style:style style:name="T15" style:family="text">
      <style:text-properties fo:font-style="normal" officeooo:rsid="0083b457" style:font-style-asian="normal" style:font-style-complex="normal"/>
    </style:style>
    <style:style style:name="T16" style:family="text">
      <style:text-properties fo:font-style="normal" officeooo:rsid="00572710" style:font-style-asian="normal" style:font-style-complex="normal"/>
    </style:style>
    <style:style style:name="T17" style:family="text">
      <style:text-properties fo:font-style="normal" officeooo:rsid="004c2768" style:font-style-asian="normal" style:font-style-complex="normal"/>
    </style:style>
    <style:style style:name="T18" style:family="text">
      <style:text-properties fo:font-style="normal" officeooo:rsid="0002cf35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83b457"/>
    </style:style>
    <style:style style:name="T21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officeooo:rsid="0002cf35"/>
    </style:style>
    <style:style style:name="T23" style:family="text">
      <style:text-properties officeooo:rsid="002d221f"/>
    </style:style>
    <style:style style:name="T24" style:family="text">
      <style:text-properties officeooo:rsid="00495b7a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7c37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armenide</text:p>
      <text:p text:style-name="P4">A partire dal 500 avanti Cristo, alcuni filosofi, tra questi <text:span text:style-name="T25">Parmenide</text:span>, <text:s/>si occuparono d<text:span text:style-name="T23">ella </text:span>questione <text:span text:style-name="T23">sulla contrapposizione tra la permanenza che nulla cambia <text:s/>ed il mutamento che tutto cambia.</text:span></text:p>
      <text:p text:style-name="P5">Parmenide, come la totalità dei greci, davano per scontato che tutto ciò che esiste è sempre esistito e tutto quello che esiste è eterno, niente può essere creato dal niente e qualsiasi cosa esistente non può scomp<text:span text:style-name="T24">a</text:span>rire nel nulla. Parmenide sosteneva che non esiste nessun mutamento, niente può trasformarsi in qualcosa di diverso da quello che è. </text:p>
      <text:p text:style-name="P10">«… Orbene io ti dirò, e tu ascolta accuratamente il discorso,</text:p>
      <text:p text:style-name="P11">quali sono le vie di ricerca che sole sono da pensare:</text:p>
      <text:p text:style-name="P11"><text:span text:style-name="T25">l'una che "è"</text:span> e che non è possibile che non sia,</text:p>
      <text:p text:style-name="P11">e questo <text:span text:style-name="T25">è il sentiero della Persuasione</text:span> (infatti segue la Verità);</text:p>
      <text:p text:style-name="P11"><text:span text:style-name="T25">l'altra che "non è" </text:span>e che è necessario che non sia,</text:p>
      <text:p text:style-name="P11">e io ti dico che questo è un sentiero del tutto inaccessibile:</text:p>
      <text:p text:style-name="P11">infatti non potresti avere cognizione di ciò che non è (poiché non è possibile), né potresti esprimerlo.… Infatti lo stesso è pensare ed essere.» <text:tab/>(Parmenide, Il poema sulla natura)</text:p>
      <text:p text:style-name="P6"><text:soft-page-break/>Secondo Parmenide, l'essere è ciò che è, immutabile, ingenerato e immortale, mentre il non essere è ciò che non è, impensabile e inesprimibile. L'essere è assoluto e non dipende da nulla.</text:p>
      <text:p text:style-name="P5">Parmenide sostiene che la parola "essere" non si deve confondere con la parola "esistere" perché l'essere è un concetto universale e immutabile, mentre l'esistenza è un concetto particolare e relativo. In altre parole, l'essere è ciò che è, mentre l'esistenza è il modo in cui le cose sono. L'essere è un concetto che esiste indipendentemente dalla mente umana, mentre l'esistenza è un concetto che dipende dalla mente umana e dalle sue percezioni.</text:p>
      <text:p text:style-name="P5">Per<text:span text:style-name="T26">ò</text:span>, poco alla volta un dubbio iniziò ad instillarsi nella mente di Parmenide poiché era proprio la natura che mostrava i mutamenti e le trasformazioni delle cose, <text:s/>quindi fu costretto a far coincidere quanto percepiva con i sensi con quello che gli diceva la ragione e quando fu costretto a decidere se fidarsi dei sensi o della ragione, scelse la ragione. Come filosofo, capì che il suo compito era quello di smascherare tutte le forme di inganno dei sensi. I sensi (vista, tatto, udito) non sono fonti di conoscenza vera, ciò che vediamo, tocchiamo e <text:soft-page-break/>sentiamo è mera apparenza. Solo la <text:span text:style-name="T10">ragione</text:span>, o meglio solo la logica, conduce alla verità. </text:p>
      <text:p text:style-name="P5">Questa fede così radicata nella ragione umana viene chiamata <text:span text:style-name="T10">razionalismo </text:span>in quanto è fonte del sapere nel mondo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99cm" fo:margin-bottom="1.499cm" fo:margin-left="1.799cm" fo:margin-right="1.7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1-21T16:48:54.959560843</meta:creation-date>
    <dc:date>2026-01-21T17:07:02.341570153</dc:date>
    <dc:creator>corrado tafaro</dc:creator>
    <meta:editing-duration>PT18M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14" meta:word-count="414" meta:character-count="2469" meta:non-whitespace-character-count="2063"/>
  </office:meta>
</office:document-meta>
</file>