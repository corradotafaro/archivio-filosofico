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3e897d" officeooo:paragraph-rsid="000c04dc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3e897d" officeooo:paragraph-rsid="000c04d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2b633f" officeooo:paragraph-rsid="000c04d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394a50" officeooo:paragraph-rsid="000c04d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Footnote">
      <style:paragraph-properties fo:text-align="justify" style:justify-single-word="false"/>
    </style:style>
    <style:style style:name="P6" style:family="paragraph" style:parent-style-name="Quotations">
      <style:paragraph-properties fo:margin-left="0cm" fo:margin-right="1cm" fo:margin-top="0.199cm" fo:margin-bottom="0cm" style:contextual-spacing="false" fo:line-height="115%" fo:text-align="start" style:justify-single-word="false" fo:text-indent="0cm" style:auto-text-indent="false"/>
      <style:text-properties style:font-name="Noto Sans1" fo:font-weight="bold" officeooo:paragraph-rsid="000cea6c" style:font-weight-asian="bold" style:font-weight-complex="bold"/>
    </style:style>
    <style:style style:name="P7" style:family="paragraph" style:parent-style-name="Quotations">
      <style:paragraph-properties fo:margin-top="0.3cm" fo:margin-bottom="0cm" style:contextual-spacing="false" fo:line-height="115%" fo:text-align="start" style:justify-single-word="false"/>
      <style:text-properties fo:font-style="italic" officeooo:paragraph-rsid="000cea6c" style:font-style-asian="italic" style:font-style-complex="italic"/>
    </style:style>
    <style:style style:name="P8" style:family="paragraph" style:parent-style-name="Quotations">
      <style:paragraph-properties fo:margin-top="0.199cm" fo:margin-bottom="0cm" style:contextual-spacing="false" fo:line-height="115%" fo:text-align="center" style:justify-single-word="false"/>
      <style:text-properties fo:font-style="italic" officeooo:paragraph-rsid="000cea6c" style:font-style-asian="italic" style:font-style-complex="italic"/>
    </style:style>
    <style:style style:name="P9" style:family="paragraph" style:parent-style-name="Quotations" style:master-page-name="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paragraph-rsid="000cea6c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115%" fo:text-align="center" style:justify-single-word="false" fo:break-before="page"/>
      <style:text-properties fo:font-size="11pt" fo:font-weight="bold" officeooo:rsid="0040adbd" officeooo:paragraph-rsid="000cea6c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40adbd" officeooo:paragraph-rsid="000cea6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40adbd" officeooo:paragraph-rsid="000cea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officeooo:rsid="0040adbd" officeooo:paragraph-rsid="000cea6c"/>
    </style:style>
    <style:style style:name="T1" style:family="text">
      <style:text-properties officeooo:rsid="004f4021"/>
    </style:style>
    <style:style style:name="T2" style:family="text">
      <style:text-properties officeooo:rsid="00446aa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f4021" style:font-style-asian="italic" style:font-style-complex="italic"/>
    </style:style>
    <style:style style:name="T5" style:family="text">
      <style:text-properties officeooo:rsid="00538b7a"/>
    </style:style>
    <style:style style:name="T6" style:family="text">
      <style:text-properties officeooo:rsid="003f6927"/>
    </style:style>
    <style:style style:name="T7" style:family="text">
      <style:text-properties officeooo:rsid="00394a50"/>
    </style:style>
    <style:style style:name="T8" style:family="text">
      <style:text-properties style:font-name="Noto Sans1"/>
    </style:style>
    <style:style style:name="T9" style:family="text">
      <style:text-properties style:font-name="Noto Sans1" fo:font-style="normal" style:font-style-asian="normal" style:font-style-complex="normal"/>
    </style:style>
    <style:style style:name="T10" style:family="text">
      <style:text-properties style:font-name="Noto Sans1" fo:font-style="normal" officeooo:rsid="00394a50" style:font-style-asian="normal" style:font-style-complex="normal"/>
    </style:style>
    <style:style style:name="T11" style:family="text">
      <style:text-properties style:font-name="Noto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oto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Noto Sans1" officeooo:rsid="00418d38"/>
    </style:style>
    <style:style style:name="T14" style:family="text">
      <style:text-properties style:font-name="Noto Sans1" officeooo:rsid="00446aa3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L</text:span><text:span text:style-name="T9">e scienze storiche e la scienza medica</text:span></text:p>
      <text:p text:style-name="P11">Per i Greci, non era soltanto la vita del singolo individuo ad ess<text:span text:style-name="T1">e</text:span>re decisa dal fato, ma addirittura il corso della storia, persino l’esito delle guerre, si pensava fosse influenzato dagli dei. </text:p>
      <text:p text:style-name="P12">Poco alla volta si costituì una scienza storica che cercava di scoprire le cause naturali che si nascondevano dietro gli avvenimenti: si fece strada l’idea che, se uno <text:span text:style-name="T5">s</text:span>tato perdeva una guerra, la responsabil<text:span text:style-name="T1">it</text:span>à non poteva attribuirsi agli dei e al loro desiderio di vendetta nel punire gli uni o gli altri. Prima, quando ancora non c’era una netta <text:s/>differenza tra la poesia e la storia, tutto veniva raccontato cercando di abbellire la verità, allo scopo di comunicarla nella sua forma migliore.</text:p>
      <text:p text:style-name="P12">La storia, quale indagine delle cause che determinavano gli eventi, si limitava a rintracciare e a trasmettere il vero, senza concentrarsi sulla forma, senza imbellettare o addolcire la talvolta amara pillola della realtà. </text:p>
      <text:p text:style-name="P12">Erodoto (484-430 a.C ) e Tucidi<text:span text:style-name="T5">de</text:span> (460-400 a.C) furono tra gli storici, quelli più famosi, tanto che Erodoto fu considerato da Cicerone come il “padre della storia”. <text:span text:style-name="T5">Tucidide, n</text:span>ella sua opera <text:span text:style-name="T5">storica</text:span>, “<text:span text:style-name="T5">la guerra del Peloponneso” racconta la guerra tra la lega peloponnesiaca, guidata da Sparta, e la lega delio-attica, guidata da Atene, che lui stesso definisce il più grande </text:span><text:soft-page-break/><text:span text:style-name="T5">sconvolgimento nella storia greca. La guerra durò 27 anni, dal 431 al 404 a.C., e fu uno dei conflitti più sanguinosi della storia greca,</text:span> fu un conflitto totale, che coinvolse tutte le poleis<text:note text:id="ftn4" text:note-class="footnote"><text:note-citation>1</text:note-citation><text:note-body><text:p text:style-name="P5">Le poleis erano le città-stato dell'antica Grecia. Erano unità politiche, economiche e culturali autonome, che si svilupparono a partire dall'VIII secolo a.C. Le poleis erano governate da un'assemblea di cittadini, che si riuniva per discutere e votare sulle questioni pubbliche. I cittadini erano liberi uomini adulti, che avevano il diritto di voto e di partecipare alla vita politica. Alcune poleis erano grandi e potenti, come Atene e Sparta, mentre altre erano più piccole e meno influenti.</text:p></text:note-body></text:note> <text:span text:style-name="T5">greche. La guerra del Peloponneso ebbe un impatto profondo sulla storia greca. Essa segnò la fine della potenza di Atene e la nascita di Sparta come potenza egemone in Grecia. La guerra contribuì anche al declino della civiltà greca, in quanto indebolì le poleis greche e le rese più vulnerabili alle invasioni straniere.</text:span></text:p>
      <text:p text:style-name="P13"><text:span text:style-name="T11">I greci ritenevano che anche le malattie erano imputabili all’intervento delle divinità: le epidemie o anche le malattie, venivano interpretate come una punizione divina che avessero una causa sovrannaturale. Il termine “influenza” deriva infatti dalla forma latina medioevale </text:span><text:span text:style-name="T12">influentia </text:span><text:span text:style-name="T11">che significa “azione degli astri sul destino umano” : quindi una persona si ammalava se veniva a trovarsi sotto l’influenza negativa dei pianeti.</text:span></text:p>
      <text:p text:style-name="P12">Nello stesso periodo in cui i filosofi greci cominciarono a riflettere sulla natura, nacque anche una scienza medica che cercava di scoprire le cause naturali della salute e <text:soft-page-break/>delle malattie. Colui che pose le basi di tale scienza medica fu probabilmente <text:span text:style-name="T15">Ippocrate</text:span> (460 a.C.) definito il “padre della medicina” poiché fu il primo in Occidente a sistematizzare i conoscimenti disponibili su salute e malattia. Secondo la tradizione Ippocrita, la moderazione e un modo sano di vivere, erano la migliore difesa contro le malattie.</text:p>
      <text:p text:style-name="P7">“È più importante sapere che tipo di persona abbia una malattia, che sapere che tipo di malattia abbia una persona.”</text:p>
      <text:p text:style-name="P9"><text:span text:style-name="T8">Tutti conosco il giuramento di Ippocrate, formula di</text:span><text:span text:style-name="T13"> intenti che per molto tempo è stata pronunciata dai medici una volta abilitati alla professione. Il giuramento mostra come per Ippocrate la medicina non debba essere separata d</text:span><text:span text:style-name="T14">a</text:span><text:span text:style-name="T13">ll’etica <text:s/>e dalla filosofia, la medicina deve essere praticata con il solo scopo di migliorare la vita degli uomini, senza interessi personali e ricerca di profitti.</text:span></text:p>
      <text:p text:style-name="P8">“Esistono soltanto due cose: scienza ed opinione; la prima genera conoscenza, la seconda ignoranza”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6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4T16:32:29.992294674</meta:creation-date>
    <dc:date>2026-01-24T17:09:20.227884070</dc:date>
    <dc:creator>corrado tafaro</dc:creator>
    <meta:editing-duration>PT9M1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11" meta:word-count="616" meta:character-count="3907" meta:non-whitespace-character-count="3298"/>
  </office:meta>
</office:document-meta>
</file>