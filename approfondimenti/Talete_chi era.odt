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margin-top="0.3cm" fo:margin-bottom="0.3cm" style:contextual-spacing="false" fo:line-height="115%" fo:text-align="center" style:justify-single-word="false"/>
      <style:text-properties style:font-name="Noto Sans1" fo:font-size="13pt" fo:font-style="italic" officeooo:paragraph-rsid="0017c187" style:font-size-asian="13pt" style:font-style-asian="italic" style:font-size-complex="13pt" style:font-style-complex="italic"/>
    </style:style>
    <style:style style:name="P2" style:family="paragraph" style:parent-style-name="Standard">
      <style:paragraph-properties fo:margin-top="0.199cm" fo:margin-bottom="0cm" style:contextual-spacing="false" fo:line-height="115%" fo:text-align="justify" style:justify-single-word="false"/>
      <style:text-properties style:font-name="Noto Sans1" officeooo:rsid="0027e024" officeooo:paragraph-rsid="0017c187"/>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9deb8" officeooo:paragraph-rsid="0017c187"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99cm" fo:margin-bottom="0cm" style:contextual-spacing="false" fo:line-height="115%" fo:text-align="justify" style:justify-single-word="false"/>
      <style:text-properties style:font-name="Noto Sans1" fo:font-size="11pt" fo:font-style="normal" fo:font-weight="bold" officeooo:rsid="0027e024" officeooo:paragraph-rsid="0017c187" style:font-size-asian="11pt" style:font-style-asian="normal" style:font-weight-asian="bold" style:font-size-complex="11pt" style:font-style-complex="normal" style:font-weight-complex="bold"/>
    </style:style>
    <style:style style:name="P5" style:family="paragraph" style:parent-style-name="Standard" style:master-page-name="">
      <style:paragraph-properties fo:margin-top="0.199cm" fo:margin-bottom="0cm" style:contextual-spacing="false" fo:line-height="115%" fo:text-align="justify" style:justify-single-word="false" style:page-number="auto" fo:break-before="auto" fo:break-after="auto"/>
      <style:text-properties style:font-name="Noto Sans1" fo:font-size="13pt" officeooo:rsid="0027e024" officeooo:paragraph-rsid="0017c187" style:font-size-asian="13pt" style:font-size-complex="13pt"/>
    </style:style>
    <style:style style:name="P6" style:family="paragraph" style:parent-style-name="Standard">
      <style:paragraph-properties fo:margin-top="0.199cm" fo:margin-bottom="0cm" style:contextual-spacing="false" fo:line-height="115%" fo:text-align="justify" style:justify-single-word="false"/>
      <style:text-properties style:font-name="Noto Sans1" fo:font-size="13pt" officeooo:rsid="0027e024" officeooo:paragraph-rsid="0017c187" style:font-size-asian="13pt" style:font-size-complex="13pt"/>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fo:font-size="13pt" officeooo:rsid="0027e024" officeooo:paragraph-rsid="0017c187" style:font-size-asian="13pt" style:font-size-complex="13pt"/>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3pt" fo:font-style="italic" officeooo:rsid="0027e024" officeooo:paragraph-rsid="0017c187" style:font-size-asian="13pt" style:font-style-asian="italic" style:font-size-complex="13pt" style:font-style-complex="italic"/>
    </style:style>
    <style:style style:name="P9" style:family="paragraph" style:parent-style-name="Standard">
      <style:paragraph-properties fo:margin-top="0.101cm" fo:margin-bottom="0cm" style:contextual-spacing="false" fo:line-height="115%" fo:text-align="center" style:justify-single-word="false"/>
      <style:text-properties style:font-name="Noto Sans1" fo:font-size="13pt" fo:font-style="italic" fo:font-weight="bold" officeooo:rsid="0027e024" officeooo:paragraph-rsid="0017c187" style:font-size-asian="13pt" style:font-style-asian="italic" style:font-weight-asian="bold" style:font-size-complex="13pt" style:font-style-complex="italic" style:font-weight-complex="bold"/>
    </style:style>
    <style:style style:name="P10"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7e024" officeooo:paragraph-rsid="0017c187" style:font-size-asian="13pt" style:font-style-asian="normal" style:font-weight-asian="normal" style:font-size-complex="13pt" style:font-style-complex="normal" style:font-weight-complex="normal"/>
    </style:style>
    <style:style style:name="P11"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994d3" officeooo:paragraph-rsid="0017c187"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center" style:justify-single-word="false"/>
      <style:text-properties style:font-name="Noto Sans1" officeooo:rsid="0017c187" officeooo:paragraph-rsid="0017c187"/>
    </style:style>
    <style:style style:name="T1" style:family="text">
      <style:text-properties fo:font-size="11pt" fo:font-style="normal" fo:font-weight="bold" style:font-size-asian="11pt" style:font-style-asian="normal" style:font-weight-asian="bold" style:font-size-complex="11pt" style:font-style-complex="normal" style:font-weight-complex="bold"/>
    </style:style>
    <style:style style:name="T2" style:family="text">
      <style:text-properties officeooo:rsid="0059deb8"/>
    </style:style>
    <style:style style:name="T3" style:family="text">
      <style:text-properties officeooo:rsid="003c274b"/>
    </style:style>
    <style:style style:name="T4" style:family="text">
      <style:text-properties officeooo:rsid="004c2768"/>
    </style:style>
    <style:style style:name="T5" style:family="text">
      <style:text-properties officeooo:rsid="0055558f"/>
    </style:style>
    <style:style style:name="T6" style:family="text">
      <style:text-properties officeooo:rsid="002994d3"/>
    </style:style>
    <style:style style:name="T7" style:family="text">
      <style:text-properties fo:font-style="italic" style:font-style-asian="italic" style:font-style-complex="italic"/>
    </style:style>
    <style:style style:name="T8" style:family="text">
      <style:text-properties fo:font-size="14pt" fo:font-style="normal" fo:font-weight="bold" style:font-size-asian="14pt" style:font-style-asian="normal" style:font-weight-asian="bold" style:font-size-complex="14pt" style:font-style-complex="normal" style:font-weight-complex="bold"/>
    </style:style>
    <style:style style:name="T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3pt" style:font-size-asian="13pt" style:font-size-complex="13pt"/>
    </style:style>
    <style:style style:name="T13" style:family="text">
      <style:text-properties fo:font-size="13pt" officeooo:rsid="0059deb8" style:font-size-asian="13pt" style:font-size-complex="13pt"/>
    </style:style>
    <style:style style:name="T14" style:family="text">
      <style:text-properties fo:font-size="13pt" officeooo:rsid="003c274b" style:font-size-asian="13pt" style:font-size-complex="13pt"/>
    </style:style>
    <style:style style:name="T1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alete di Mileto</text:p>
      <text:p text:style-name="P5"><text:span text:style-name="T17">Il primo filosofo</text:span><text:span text:style-name="T11"> </text:span>di cui abbiamo notizie è Talete <text:span text:style-name="T2">di Mileto</text:span>, <text:span text:style-name="T2">nato nella seconda metà del VII secolo a.C. Appena raggiunta l’età della ragione, s’imb</text:span><text:span text:style-name="T3">a</text:span><text:span text:style-name="T2">rcò sulla prima nave in partenza e iniziò una lunga serie di viaggi tra l’Egitto ed il Medio Oriente. Furono i sacerdoti egiziani e caldei a provvedere alla sua educazione e a insegnargli le prime nozioni di astronomia, di matematica e di navigazione. </text:span><text:s/>Durante la sua permanenza in Egitto ebbe modo di constatare che i campi e i prati cominciavano a germogliare non appena le acque del Nilo si ritiravano <text:s/>dalle terre che costituivano il suo delta. Forse vide anche le rane e i vermi spuntare dal terreno non appena finiva di piovere e probabilmente finì per arrivare alla conclusione che la terra è piena di minuscoli e invisibili “germi di vita”. <text:span text:style-name="T2">Fu probabilmente l’osservazione di questi fenomeni che lo portarono ad el</text:span><text:span text:style-name="T4">a</text:span><text:span text:style-name="T2">borare la teoria secondo la quale</text:span> l’acqua è il principio di tutte le cose.</text:p>
      <text:p text:style-name="P7">Aristotele è anche la fonte di informazioni sul pensiero filosofico di Talete: nel primo libro della Metafisica descrive Talete come il fondatore di <text:soft-page-break/>quella scuola di pensiero che ricerca le cause e il principio da cui provengono tutte le cose, cioè tutte le manifestazioni della realtà. Talete è chiamato il filosofo dell’acqua, ma leggiamo come l’argomento viene sviluppato nella sua versione originale:</text:p>
      <text:p text:style-name="P8">«[…] infatti deve esserci qualche realtà naturale (o una sola o più di una) dalla quale derivano tutte le altre cose, mentre essa continua ad esistere immutata. Tuttavia, questi filosofi non sono tutti d’accordo circa il numero e la specie di un tale principio. Talete, iniziatore di questo tipo di filosofia, dice che quel principio è l’acqua (per questo afferma anche che la terra galleggia sull’acqua), desumendo indubbiamente questa sua convinzione dalla constatazione che il nutrimento di tutte le cose è umido, e che perfino il caldo si genera dall’umido e vive nell’umido. Ora, ciò da cui tutte le cose si generano è, appunto, il principio di tutto. Egli desunse dunque questa convinzione da questo fatto e dal fatto che i semi di tutte le cose hanno una natura umida e l’acqua è il principio della natura delle cose umide.» (Metafisica, Libro I, 983 b)</text:p>
      <text:p text:style-name="P6">Negli scritti tramandati da Aristotele, <text:s/>vissuto quasi duecento anni dopo Talete, sembra abbia calcolato l’altezza di una piramide in Egitto, grazie a una felice <text:soft-page-break/>intuizione. Egli si accorse, infatti, che la lunghezza di un’ombra proiettata sul terreno dipende dall’altezza dell’oggetto che l’ha originata secondo una relazione matematica ben precisa. Conoscendo l’altezza di un’asta usata per il confronto e misurando le lunghezze delle ombre sul terreno, Talete fu in grado di determinare l’altezza della piramide. Il cosiddetto Teorema di Talete è la formalizzazione di questa intuizione:</text:p>
      <text:p text:style-name="P9">lunghezza ombra 1 : lunghezza ombra 2 = altezza asta : altezza incognita della piramide</text:p>
      <text:p text:style-name="P10">Il suo metodo di analisi della realtà lo re<text:span text:style-name="T2">se</text:span> una delle figure più importanti della conoscenza scientifica <text:span text:style-name="T2">tanto da essere d</text:span><text:span text:style-name="T5">e</text:span><text:span text:style-name="T2">finito da Platone “ingegnoso inventore di tecniche”. La fama di scienziato se la guadagnò comunque quando nel 585 a.C. ebbe la felice intuizione di prevedere un’eclissi totale di sole</text:span> <text:span text:style-name="T2">che spaventò a morte tutti i cittadini della regione. Riuscì a calcolare con argomentazioni geometriche la distanze delle navi dalla costa, divise l’anno in 365 giorni e fu il primo a scoprire l’Orsa Minore e la sua importanza per la navigazione.</text:span></text:p>
      <text:p text:style-name="P3">Fino a quel momento Talete era considerato dai suoi concittadini “una brava persona” un tipo con la testa fra <text:soft-page-break/>le nuvole e privo di senso pratico. Socrate racconta <text:span text:style-name="T6">nel Teeteto di Platone un aneddoto su Talete:</text:span></text:p>
      <text:p text:style-name="P1">«[Talete], mentre studiava gli astri e guardava in alto, cadde in un pozzo. Una graziosa e intelligente servetta lo prese in giro, dicendogli che si preoccupava tanto di conoscere le cose che stanno in cielo, ma non vedeva quelle che gli stavano davanti, tra i piedi. La stessa ironia è riservata a chi passa il tempo a filosofare [...] provoca il riso non solo delle schiave di Tracia, ma anche del resto della gente, cadendo, per inesperienza, nei pozzi e in ogni difficoltà.»</text:p>
      <text:p text:style-name="P11">Socrate con ciò non volle sbeffeggiare Talete, ma evidenziò in lui il simbolo delle difficoltà e delle ostilità <text:span text:style-name="T2">che incontravano i </text:span>filosofi, <text:span text:style-name="T2">per quel comportamento di indagare e riflettere sempre, di porsi domande alla scoperta della verità e non attribuire agli Dei la soluzione di tutti i misteri.</text:span></text:p>
      <text:p text:style-name="P4"/>
      <text:p text:style-name="P4"/>
      <text:p text:style-name="P4"/>
      <text:p text:style-name="P4"/>
      <text:p text:style-name="P4"><text:soft-page-break/></text:p>
      <text:p text:style-name="P4"/>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1T16:35:31.139658426</meta:creation-date>
    <dc:date>2026-01-21T16:46:55.255240801</dc:date>
    <dc:creator>corrado tafaro</dc:creator>
    <meta:editing-duration>PT11M25S</meta:editing-duration>
    <meta:editing-cycles>1</meta:editing-cycles>
    <meta:document-statistic meta:table-count="0" meta:image-count="0" meta:object-count="0" meta:page-count="5" meta:paragraph-count="10" meta:word-count="727" meta:character-count="4443" meta:non-whitespace-character-count="3723"/>
    <meta:generator>LibreOffice/24.2.7.2$Linux_X86_64 LibreOffice_project/420$Build-2</meta:generator>
  </office:meta>
</office:document-meta>
</file>