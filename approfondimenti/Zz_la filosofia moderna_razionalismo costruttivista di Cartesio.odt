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22A5C7DA5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.199cm" fo:margin-bottom="0cm" style:contextual-spacing="false" fo:text-align="justify" style:justify-single-word="false"/>
      <style:text-properties fo:font-size="16pt" fo:font-weight="normal" officeooo:rsid="000453a7" officeooo:paragraph-rsid="000453a7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/>
      <style:text-properties fo:font-size="16pt" officeooo:rsid="00086a0a" officeooo:paragraph-rsid="00086a0a" style:font-size-asian="16pt" style:font-size-complex="16pt"/>
    </style:style>
    <style:style style:name="P5" style:family="paragraph" style:parent-style-name="Heading_20_2">
      <style:paragraph-properties fo:margin-left="0cm" fo:margin-right="0cm" fo:line-height="100%" fo:text-align="justify" style:justify-single-word="false" fo:text-indent="0cm" style:auto-text-indent="false"/>
      <style:text-properties fo:font-size="16pt" fo:font-style="normal" fo:font-weight="normal" officeooo:rsid="000453a7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fo:font-size="16pt" fo:font-style="normal" fo:font-weight="normal" officeooo:rsid="000453a7" officeooo:paragraph-rsid="000453a7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Heading_20_2">
      <style:paragraph-properties fo:margin-top="0.25cm" fo:margin-bottom="0cm" style:contextual-spacing="false" fo:text-align="justify" style:justify-single-word="false"/>
      <style:text-properties officeooo:paragraph-rsid="000747bf"/>
    </style:style>
    <style:style style:name="P8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0453a7"/>
    </style:style>
    <style:style style:name="P9" style:family="paragraph" style:parent-style-name="Standard">
      <style:paragraph-properties fo:margin-top="0.199cm" fo:margin-bottom="0cm" style:contextual-spacing="false" fo:text-align="justify" style:justify-single-word="false"/>
      <style:text-properties officeooo:paragraph-rsid="000453a7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.101cm" fo:margin-bottom="0cm" style:contextual-spacing="false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15cm" style:contextual-spacing="false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dd71e"/>
    </style:style>
    <style:style style:name="P15" style:family="paragraph" style:parent-style-name="Text_20_body">
      <style:paragraph-properties fo:margin-top="0.199cm" fo:margin-bottom="0cm" style:contextual-spacing="false" fo:text-align="justify" style:justify-single-word="false"/>
      <style:text-properties officeooo:paragraph-rsid="000dd71e"/>
    </style:style>
    <style:style style:name="P16" style:family="paragraph" style:parent-style-name="Heading_20_2"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tyle="normal" officeooo:paragraph-rsid="00049cba" style:font-style-asian="normal" style:font-style-complex="normal"/>
    </style:style>
    <style:style style:name="P18" style:family="paragraph" style:parent-style-name="Text_20_body">
      <style:paragraph-properties fo:margin-top="0.199cm" fo:margin-bottom="0cm" style:contextual-spacing="false" fo:text-align="start" style:justify-single-word="false"/>
      <style:text-properties fo:font-style="normal" officeooo:paragraph-rsid="00049cba" style:font-style-asian="normal" style:font-style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tyle="normal" fo:font-weight="normal" officeooo:rsid="000453a7" style:font-style-asian="normal" style:font-weight-asian="normal" style:font-style-complex="normal" style:font-weight-complex="normal"/>
    </style:style>
    <style:style style:name="P20" style:family="paragraph" style:parent-style-name="Quotations">
      <style:paragraph-properties fo:margin-left="1cm" fo:margin-right="1cm" fo:text-indent="0cm" style:auto-text-indent="false"/>
    </style:style>
    <style:style style:name="P21" style:family="paragraph" style:parent-style-name="Quotations">
      <style:paragraph-properties fo:margin-left="1cm" fo:margin-right="1cm" fo:margin-top="0cm" fo:margin-bottom="0cm" style:contextual-spacing="false" fo:text-indent="0cm" style:auto-text-indent="false"/>
    </style:style>
    <style:style style:name="P22" style:family="paragraph" style:parent-style-name="Quotations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>
      <style:paragraph-properties fo:margin-left="0cm" fo:margin-right="0cm" fo:margin-top="0.101cm" fo:margin-bottom="0cm" style:contextual-spacing="false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27" style:family="paragraph" style:parent-style-name="Text_20_body">
      <style:paragraph-properties fo:margin-left="0cm" fo:margin-right="0cm" fo:margin-top="0.199cm" fo:margin-bottom="0cm" style:contextual-spacing="false" fo:line-height="100%" fo:text-indent="0cm" style:auto-text-indent="false"/>
    </style:style>
    <style:style style:name="P28" style:family="paragraph" style:parent-style-name="Text_20_body">
      <style:paragraph-properties fo:margin-left="0cm" fo:margin-right="0cm" fo:margin-top="0.101cm" fo:margin-bottom="0.15cm" style:contextual-spacing="false" fo:line-height="100%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30" style:family="paragraph" style:parent-style-name="Text_20_body"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/>
    </style:style>
    <style:style style:name="P31" style:family="paragraph" style:parent-style-name="Text_20_body">
      <style:paragraph-properties fo:margin-top="0.101cm" fo:margin-bottom="0cm" style:contextual-spacing="false" fo:line-height="100%"/>
      <style:text-properties officeooo:paragraph-rsid="000dd71e"/>
    </style:style>
    <style:style style:name="P32" style:family="paragraph" style:parent-style-name="Text_20_body">
      <style:paragraph-properties fo:margin-left="0cm" fo:margin-right="0cm" fo:margin-top="0.199cm" fo:margin-bottom="0cm" style:contextual-spacing="false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 style:parent-style-name="Text_20_body">
      <style:text-properties officeooo:paragraph-rsid="000dd71e"/>
    </style:style>
    <style:style style:name="P35" style:family="paragraph" style:parent-style-name="Text_20_body">
      <style:paragraph-properties fo:margin-top="0.101cm" fo:margin-bottom="0cm" style:contextual-spacing="false"/>
      <style:text-properties officeooo:paragraph-rsid="000dd71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dd71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104ea8"/>
    </style:style>
    <style:style style:name="P38" style:family="paragraph" style:parent-style-name="Text_20_body">
      <style:paragraph-properties fo:margin-left="0cm" fo:margin-right="0cm" fo:margin-top="0.101cm" fo:margin-bottom="0cm" style:contextual-spacing="false" fo:text-indent="0cm" style:auto-text-indent="false"/>
      <style:text-properties officeooo:paragraph-rsid="00104ea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0a773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0a773"/>
    </style:style>
    <style:style style:name="P41" style:family="paragraph" style:parent-style-name="Quotations">
      <style:paragraph-properties fo:margin-left="1cm" fo:margin-right="1cm" fo:margin-top="0cm" fo:margin-bottom="0.3cm" style:contextual-spacing="false" fo:text-align="center" style:justify-single-word="false" fo:text-indent="0cm" style:auto-text-indent="false"/>
    </style:style>
    <style:style style:name="P42" style:family="paragraph" style:parent-style-name="Standard">
      <style:paragraph-properties fo:margin-top="0.199cm" fo:margin-bottom="0cm" style:contextual-spacing="false" fo:text-align="center" style:justify-single-word="false"/>
      <style:text-properties fo:font-style="italic" fo:font-weight="normal" officeooo:rsid="000453a7" officeooo:paragraph-rsid="000453a7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top="0.199cm" fo:margin-bottom="0cm" style:contextual-spacing="false"/>
      <style:text-properties officeooo:rsid="000453a7" officeooo:paragraph-rsid="000453a7"/>
    </style:style>
    <style:style style:name="P44" style:family="paragraph" style:parent-style-name="Text_20_body" style:list-style-name="L1">
      <style:paragraph-properties fo:margin-left="0cm" fo:margin-right="0cm" fo:margin-top="0.101cm" fo:margin-bottom="0cm" style:contextual-spacing="false" fo:orphans="1" fo:text-indent="0cm" style:auto-text-indent="false"/>
      <style:text-properties officeooo:paragraph-rsid="00049cba"/>
    </style:style>
    <style:style style:name="P45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justify" style:justify-single-word="false" fo:orphans="1" fo:text-indent="0cm" style:auto-text-indent="false"/>
      <style:text-properties officeooo:paragraph-rsid="00049cba"/>
    </style:style>
    <style:style style:name="P46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47" style:family="paragraph" style:parent-style-name="Text_20_body" style:list-style-name="L1">
      <style:paragraph-properties fo:margin-left="0cm" fo:margin-right="0cm" fo:margin-top="0.101cm" fo:margin-bottom="0cm" style:contextual-spacing="false" fo:line-height="100%" fo:orphans="1" fo:text-indent="0cm" style:auto-text-indent="false"/>
      <style:text-properties officeooo:paragraph-rsid="00049cba"/>
    </style:style>
    <style:style style:name="P48" style:family="paragraph" style:parent-style-name="Text_20_body" style:list-style-name="L1">
      <style:paragraph-properties fo:margin-left="0cm" fo:margin-right="0cm" fo:margin-top="0cm" fo:margin-bottom="0cm" style:contextual-spacing="false" fo:line-height="100%" fo:orphans="1" fo:text-indent="0cm" style:auto-text-indent="false"/>
      <style:text-properties officeooo:paragraph-rsid="00049cba"/>
    </style:style>
    <style:style style:name="P49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0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1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2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3" style:family="paragraph" style:parent-style-name="Text_20_body" style:list-style-name="L2">
      <style:paragraph-properties fo:margin-left="0cm" fo:margin-right="0cm" fo:margin-top="0.101cm" fo:margin-bottom="0cm" style:contextual-spacing="false" fo:text-indent="0cm" style:auto-text-indent="false"/>
    </style:style>
    <style:style style:name="P5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58" style:family="paragraph" style:parent-style-name="Text_20_body" style:list-style-name="L9">
      <style:paragraph-properties fo:margin-top="0cm" fo:margin-bottom="0cm" style:contextual-spacing="false"/>
      <style:text-properties officeooo:paragraph-rsid="001457a3"/>
    </style:style>
    <style:style style:name="P59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officeooo:paragraph-rsid="000dd71e"/>
    </style:style>
    <style:style style:name="P6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62" style:family="paragraph" style:parent-style-name="Text_20_body" style:list-style-name="L13">
      <style:paragraph-properties fo:margin-left="0cm" fo:margin-right="0cm" fo:margin-top="0.101cm" fo:margin-bottom="0cm" style:contextual-spacing="false" fo:text-indent="0cm" style:auto-text-indent="false"/>
    </style:style>
    <style:style style:name="P63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64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officeooo:paragraph-rsid="00104ea8"/>
    </style:style>
    <style:style style:name="P65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67" style:family="paragraph" style:parent-style-name="Text_20_body" style:list-style-name="L16">
      <style:paragraph-properties fo:margin-left="0cm" fo:margin-right="0cm" fo:margin-top="0.101cm" fo:margin-bottom="0cm" style:contextual-spacing="false" fo:text-indent="0cm" style:auto-text-indent="false"/>
    </style:style>
    <style:style style:name="P6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  <style:text-properties officeooo:paragraph-rsid="00104ea8"/>
    </style:style>
    <style:style style:name="P70" style:family="paragraph" style:parent-style-name="Text_20_body" style:list-style-name="L17">
      <style:paragraph-properties fo:margin-left="0cm" fo:margin-right="0cm" fo:margin-top="0.101cm" fo:margin-bottom="0cm" style:contextual-spacing="false" fo:text-indent="0cm" style:auto-text-indent="false"/>
    </style:style>
    <style:style style:name="P71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18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3" style:family="paragraph" style:parent-style-name="Text_20_body" style:list-style-name="L18">
      <style:paragraph-properties fo:margin-left="0cm" fo:margin-right="0cm" fo:text-align="start" style:justify-single-word="false" fo:text-indent="0cm" style:auto-text-indent="false"/>
    </style:style>
    <style:style style:name="P74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75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77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45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53a7" style:font-weight-asian="normal" style:font-weight-complex="normal"/>
    </style:style>
    <style:style style:name="T5" style:family="text">
      <style:text-properties fo:font-weight="normal" officeooo:rsid="00049cba" style:font-weight-asian="normal" style:font-weight-complex="normal"/>
    </style:style>
    <style:style style:name="T6" style:family="text">
      <style:text-properties fo:font-weight="normal" officeooo:rsid="000c2a54" style:font-weight-asian="normal" style:font-weight-complex="normal"/>
    </style:style>
    <style:style style:name="T7" style:family="text">
      <style:text-properties fo:font-weight="normal" officeooo:rsid="0012e0dc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4c8cf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49cba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0453a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2a5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338c0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0453a7" style:font-style-asian="normal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officeooo:rsid="000747bf" style:font-size-asian="10.5pt" style:font-weight-asian="normal" style:font-size-complex="12pt" style:font-weight-complex="normal"/>
    </style:style>
    <style:style style:name="T18" style:family="text">
      <style:text-properties fo:font-size="14pt" fo:font-weight="normal" officeooo:rsid="000453a7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747bf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0c0972" style:font-size-asian="14pt" style:font-weight-asian="normal" style:font-size-complex="14pt" style:font-weight-complex="normal"/>
    </style:style>
    <style:style style:name="T21" style:family="text">
      <style:text-properties fo:font-size="14pt" fo:font-style="normal" fo:font-weight="normal" officeooo:rsid="000453a7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4pt" fo:font-style="normal" fo:font-weight="normal" officeooo:rsid="000747bf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4pt" fo:font-style="normal" fo:font-weight="normal" officeooo:rsid="000453a7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0747bf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0747bf"/>
    </style:style>
    <style:style style:name="T26" style:family="text">
      <style:text-properties fo:font-size="16pt" fo:font-weight="normal" officeooo:rsid="00086a0a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0453a7" style:font-size-asian="16pt" style:font-weight-asian="normal" style:font-size-complex="16pt" style:font-weight-complex="normal"/>
    </style:style>
    <style:style style:name="T28" style:family="text">
      <style:text-properties officeooo:rsid="0012e0dc"/>
    </style:style>
    <style:style style:name="T29" style:family="text">
      <style:text-properties officeooo:rsid="001338c0"/>
    </style:style>
    <style:style style:name="T30" style:family="text">
      <style:text-properties officeooo:rsid="0014c8cf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né Descartes (Approfondimento <text:span text:style-name="T30">sul pensiero che fu espressione di ciò che </text:span>chiameremo <text:span text:style-name="T8">Razionalismo Costruttivista</text:span><text:span text:style-name="T9">)</text:span></text:p>
      <text:p text:style-name="P43"><text:span text:style-name="T28">Spunti </text:span>tratti da<text:span text:style-name="T28">lla lettura di </text:span><text:span text:style-name="T2">Legge, Legislazione e Libertà </text:span><text:span text:style-name="T3">di Friedrich August von Hayek</text:span></text:p>
      <text:p text:style-name="P9"><text:span text:style-name="Emphasis"><text:span text:style-name="T4">Razionalismo costruttivista</text:span></text:span><text:span text:style-name="T4"> significa che la </text:span><text:span text:style-name="Strong_20_Emphasis"><text:span text:style-name="T1">ragione non si limita a scoprire la verità</text:span></text:span><text:span text:style-name="T4">, ma </text:span><text:span text:style-name="Strong_20_Emphasis"><text:span text:style-name="T1">la costruisce attivamente</text:span></text:span><text:span text:style-name="T4">, edificando l’intero sapere a partire da principi primi certi e da un metodo rigoroso. In questo senso Cartesio è il pensatore che porta questa impostazione alla sua forma più compiuta: la verità non è trovata nel mondo, ma </text:span><text:span text:style-name="Strong_20_Emphasis"><text:span text:style-name="T1">prodotta dall’attività ordinatrice del soggetto pensante</text:span></text:span><text:span text:style-name="T4">.</text:span></text:p>
      <text:p text:style-name="P3">Che cosa significa “razionalismo costruttivista”</text:p>
      <text:p text:style-name="P9"><text:span text:style-name="T11">Razionalismo</text:span><text:span text:style-name="T5">: </text:span><text:span text:style-name="T4">È la posizione filosofica che considera la </text:span><text:span text:style-name="Emphasis"><text:span text:style-name="T4">ragione</text:span></text:span><text:span text:style-name="T4"> la fonte principale e più affidabile della conoscenza. Cartesio fonda il sapere su ciò che può essere conosciuto in modo </text:span><text:span text:style-name="Emphasis"><text:span text:style-name="T4">chiaro e distinto</text:span></text:span><text:span text:style-name="T4">, tramite deduzione rigorosa. </text:span></text:p>
      <text:p text:style-name="P8"><text:span text:style-name="T11">Costruttivismo</text:span><text:span text:style-name="T5">:</text:span><text:span text:style-name="T4"> È l’idea secondo cui la conoscenza non è uno “specchio” della realtà, ma una </text:span><text:span text:style-name="Emphasis"><text:span text:style-name="T4">costruzione</text:span></text:span><text:span text:style-name="T4"> prodotta dalle strutture cognitive del soggetto. La realtà conosciuta è il risultato dell’attività del pensiero, non una copia passiva del mondo.</text:span></text:p>
      <text:p text:style-name="P42">Razionalismo costruttivista = ragione che costruisce il mondo della conoscenza.</text:p>
      <text:p text:style-name="P6">Perché Cartesio incarna il razionalismo costruttivista?</text:p>
      <text:p text:style-name="P18"><text:span text:style-name="Strong_20_Emphasis"><text:span text:style-name="T7">Usa </text:span></text:span><text:span text:style-name="Strong_20_Emphasis"><text:span text:style-name="T1">Il metodo</text:span></text:span><text:span text:style-name="T4"> come architettura del sapere</text:span></text:p>
      <text:p text:style-name="P17"><text:span text:style-name="T4">Cartesio elabora un metodo universale, modellato sulla matematica, che permette di </text:span><text:span text:style-name="Emphasis"><text:span text:style-name="T4">costruire</text:span></text:span><text:span text:style-name="T4"> il sapere a partire da principi evidenti e deduzioni necessarie. </text:span></text:p>
      <text:list text:style-name="L1">
        <text:list-item>
          <text:p text:style-name="P44"><text:span text:style-name="Strong_20_Emphasis">Il cogito</text:span> come fondamento costruito</text:p>
          <text:p text:style-name="P45">Il punto di partenza non è un dato del mondo, ma una certezza prodotta dall’atto stesso del pensare: <text:span text:style-name="Emphasis">io penso, dunque sono</text:span>. Da qui si edifica l’intero edificio della conoscenza. </text:p>
        </text:list-item>
        <text:list-item>
          <text:p text:style-name="P44"><text:span text:style-name="Strong_20_Emphasis">Le idee innate</text:span> come strutture costruttive</text:p>
          <text:p text:style-name="P45">Le idee fondamentali (infinito, perfezione, estensione, Dio) non vengono dall’esperienza, ma sono <text:span text:style-name="Emphasis">strutture della mente</text:span> che permettono di organizzare e comprendere la realtà. </text:p>
        </text:list-item>
        <text:list-item>
          <text:p text:style-name="P47"><text:span text:style-name="Strong_20_Emphasis">La deduzione</text:span> come processo costruttivo</text:p>
          <text:p text:style-name="P48">La verità non si riceve dai sensi, ma si <text:span text:style-name="Emphasis">deduce</text:span> logicamente da principi primi. La conoscenza è quindi un’opera di costruzione razionale.</text:p>
        </text:list-item>
      </text:list>
      <text:h text:style-name="P1" text:outline-level="2">In che senso è “costruttivista” e non solo “razionalista”?</text:h>
      <text:p text:style-name="P2"><text:span text:style-name="T16">Il razionalismo classico sostiene che la ragione </text:span><text:span text:style-name="Emphasis"><text:span text:style-name="T16">scopre</text:span></text:span><text:span text:style-name="T16"> verità già presenti. Il razionalismo cartesiano, invece, mostra che la ragione:</text:span></text:p>
      <text:list text:style-name="L2">
        <text:list-item>
          <text:p text:style-name="P53"><text:span text:style-name="Strong_20_Emphasis">stabilisce i criteri di verità</text:span> (chiarezza e distinzione);</text:p>
        </text:list-item>
        <text:list-item>
          <text:p text:style-name="P54"><text:span text:style-name="Strong_20_Emphasis">definisce i principi primi</text:span> (il cogito);</text:p>
        </text:list-item>
        <text:list-item>
          <text:p text:style-name="P49"><text:span text:style-name="Strong_20_Emphasis">organizza la realtà</text:span> secondo categorie matematiche;</text:p>
        </text:list-item>
        <text:list-item>
          <text:p text:style-name="P49"><text:span text:style-name="Strong_20_Emphasis">garantisce l’esistenza del mondo</text:span> tramite l’idea di Dio.</text:p>
        </text:list-item>
      </text:list>
      <text:p text:style-name="P27"><text:soft-page-break/>In altre parole, la ragione <text:span text:style-name="Strong_20_Emphasis">non si limita a registrare</text:span> il reale: lo <text:span text:style-name="Strong_20_Emphasis">costruisce</text:span> come oggetto di conoscenza.</text:p>
      <text:h text:style-name="P7" text:outline-level="2"><text:span text:style-name="T17">Come detto, Cartesio elabora un </text:span><text:span text:style-name="T21">metodo universale, modellato sulla matematica </text:span><text:span text:style-name="T22">che</text:span><text:span text:style-name="T21"> </text:span><text:span text:style-name="Emphasis"><text:span text:style-name="T18">organizza la realtà secondo categorie matematiche. </text:span></text:span><text:span text:style-name="Emphasis"><text:span text:style-name="T20">Q</text:span></text:span><text:span text:style-name="Emphasis"><text:span text:style-name="T24">uesto</text:span></text:span><text:span text:style-name="Emphasis"><text:span text:style-name="T19"> </text:span></text:span><text:span text:style-name="T23">significa che la mente umana comprende il mondo </text:span><text:span text:style-name="Strong_20_Emphasis"><text:span text:style-name="T23">solo traducendolo in grandezze misurabili</text:span></text:span><text:span text:style-name="T23">, cioè in termini di estensione, figura, movimento, ordine e quantità. La matematica diventa così la </text:span><text:span text:style-name="Emphasis"><text:span text:style-name="T18">struttura</text:span></text:span><text:span text:style-name="T23"> attraverso cui la realtà fisica appare intelligibile.</text:span></text:h>
      <text:p text:style-name="P32">Cartesio definisce la materia come <text:span text:style-name="Strong_20_Emphasis">res extensa</text:span>, <text:span text:style-name="T25">(sostanza estesa) </text:span>cioè ciò che <text:span text:style-name="Emphasis">occupa spazio</text:span>. Questo implica che tutto ciò che è materiale può essere descritto tramite:</text:p>
      <text:list text:style-name="L3">
        <text:list-item>
          <text:p text:style-name="P50"><text:span text:style-name="Strong_20_Emphasis">Estensione</text:span> — quanto spazio occupa un corpo.</text:p>
        </text:list-item>
        <text:list-item>
          <text:p text:style-name="P50"><text:span text:style-name="Strong_20_Emphasis">Figura</text:span> — la forma geometrica che assume.</text:p>
        </text:list-item>
        <text:list-item>
          <text:p text:style-name="P50"><text:span text:style-name="Strong_20_Emphasis">Movimento</text:span> — il cambiamento di posizione nello spazio.</text:p>
        </text:list-item>
        <text:list-item>
          <text:p text:style-name="P50"><text:span text:style-name="Strong_20_Emphasis">Quantità</text:span> — ciò che può essere misurato e calcolato.</text:p>
        </text:list-item>
      </text:list>
      <text:p text:style-name="P28">Queste non sono proprietà “tra le altre”: <text:span text:style-name="Strong_20_Emphasis">sono le uniche proprietà reali della materia</text:span>. Tutto il resto (colore, sapore, calore…) è solo un effetto soggettivo nella mente.</text:p>
      <text:p text:style-name="P33">Cartesio era matematico prima che filosofo. Secondo le fonti, egli <text:span text:style-name="Strong_20_Emphasis">estese il metodo matematico a ogni aspetto del sapere</text:span>, perché solo la matematica garantisce chiarezza, distinzione e certezza .</text:p>
      <text:p text:style-name="P25">Questo significa <text:span text:style-name="T29">che</text:span>:</text:p>
      <text:list text:style-name="L4">
        <text:list-item>
          <text:p text:style-name="P51">La realtà fisica è intelligibile <text:span text:style-name="Strong_20_Emphasis">solo se ridotta a rapporti geometrici</text:span>.</text:p>
        </text:list-item>
        <text:list-item>
          <text:p text:style-name="P51">Le leggi della natura sono <text:span text:style-name="Strong_20_Emphasis">leggi meccaniche e quantitative</text:span>, non qualitative.</text:p>
        </text:list-item>
        <text:list-item>
          <text:p text:style-name="P46">La fisica deve essere una <text:span text:style-name="Strong_20_Emphasis">geometria del mondo</text:span>, come già mostrava la sua invenzione del piano cartesiano, che unifica algebra e geometria</text:p>
        </text:list-item>
      </text:list>
      <text:h text:style-name="P5" text:outline-level="2">Esempio concreto: un pezzo di cera</text:h>
      <text:p text:style-name="P29">Quando la cera si scioglie, cambia colore, odore, consistenza. Eppure per Cartesio resta la <text:span text:style-name="Emphasis">stessa</text:span> cera, perché ciò che la definisce è solo:</text:p>
      <text:list text:style-name="L5">
        <text:list-item>
          <text:p text:style-name="P52">la sua <text:span text:style-name="Strong_20_Emphasis">estensione</text:span>,</text:p>
        </text:list-item>
        <text:list-item>
          <text:p text:style-name="P52">la sua <text:span text:style-name="Strong_20_Emphasis">figura</text:span> mutevole,</text:p>
        </text:list-item>
        <text:list-item>
          <text:p text:style-name="P52">la sua <text:span text:style-name="Strong_20_Emphasis">divisibilità</text:span>,</text:p>
        </text:list-item>
        <text:list-item>
          <text:p text:style-name="P52">il suo <text:span text:style-name="Strong_20_Emphasis">movimento</text:span> possibile.</text:p>
        </text:list-item>
      </text:list>
      <text:p text:style-name="P26">Tutte categorie matematiche.</text:p>
      <text:h text:style-name="P16" text:outline-level="2"><text:span text:style-name="T26">P</text:span><text:span text:style-name="T27">erché questo è “costruttivista”?</text:span></text:h>
      <text:p text:style-name="P30">La mente non si limita a registrare il mondo: lo <text:span text:style-name="Strong_20_Emphasis">ricostruisce</text:span> secondo le proprie categorie matematiche.</text:p>
      <text:p text:style-name="P26">In altre parole:</text:p>
      <text:p text:style-name="P41"><text:span text:style-name="Strong_20_Emphasis"><text:span text:style-name="T10">La realtà fisica diventa conoscibile solo quando la ragione la traduce in termini matematici.</text:span></text:span></text:p>
      <text:p text:style-name="P24">Non vediamo “la natura così com’è”, ma la natura <text:span text:style-name="Strong_20_Emphasis">come la nostra ragione la può misurare e ordinare</text:span>.</text:p>
      <text:p text:style-name="P10"><text:soft-page-break/><text:span text:style-name="T12">Nel campo della filosofia morale e delle scienze sociali, </text:span><text:span text:style-name="T13">Cartesio non è </text:span><text:span text:style-name="T12">riuscito a dare la stessa impronta lasciata sul razionalismo costruttivista, cosa che invece riuscì a Thomas Hobbes, suo contemparaneo. </text:span></text:p>
      <text:p text:style-name="P11"><text:span text:style-name="T14">Q</text:span><text:span text:style-name="T13">uesto non è un caso, dipende dalla </text:span><text:span text:style-name="Emphasis"><text:span text:style-name="T6">struttura stessa</text:span></text:span><text:span text:style-name="T13"> del razionalismo cartesiano.</text:span></text:p>
      <text:p text:style-name="P12"><text:span text:style-name="T12">Cartesio costruisce la realtà su due sostanze: </text:span><text:span text:style-name="Strong_20_Emphasis"><text:span text:style-name="T15">pensiero</text:span></text:span><text:span text:style-name="T12"> ed </text:span><text:span text:style-name="Strong_20_Emphasis"><text:span text:style-name="T15">estensione</text:span></text:span><text:span text:style-name="T12">. La sua filosofia è calibrata per funzionare perfettamente nel mondo dell’estensione, cioè nella </text:span><text:span text:style-name="Strong_20_Emphasis"><text:span text:style-name="T15">fisica matematizzata</text:span></text:span><text:span text:style-name="T12">.</text:span></text:p>
      <text:p text:style-name="P10">Ma la morale e la società non sono “estese”: sono fatte di passioni, desideri, conflitti, immaginazione, potere. Tutto ciò che non è riducibile a matematica diventa per Cartesio <text:span text:style-name="Strong_20_Emphasis">opaco</text:span>.</text:p>
      <text:p text:style-name="P19">Il metodo cartesiano funziona dove c’è:</text:p>
      <text:list text:style-name="L6">
        <text:list-item>
          <text:p text:style-name="P55">chiarezza</text:p>
        </text:list-item>
        <text:list-item>
          <text:p text:style-name="P55">distinzione</text:p>
        </text:list-item>
        <text:list-item>
          <text:p text:style-name="P55">deduzione</text:p>
        </text:list-item>
        <text:list-item>
          <text:p text:style-name="P55">necessità</text:p>
        </text:list-item>
      </text:list>
      <text:p text:style-name="P25">Ma la vita morale e sociale è fatta di:</text:p>
      <text:list text:style-name="L7">
        <text:list-item>
          <text:p text:style-name="P56">ambivalenze</text:p>
        </text:list-item>
        <text:list-item>
          <text:p text:style-name="P56">passioni</text:p>
        </text:list-item>
        <text:list-item>
          <text:p text:style-name="P56">contingenze</text:p>
        </text:list-item>
        <text:list-item>
          <text:p text:style-name="P56">conflitti</text:p>
        </text:list-item>
      </text:list>
      <text:p text:style-name="P23">Cartesio tenta di applicare il metodo anche alla morale (la “morale provvisoria”), ma resta un progetto <text:span text:style-name="Strong_20_Emphasis">incompiuto</text:span> e quasi marginale rispetto al suo sistema.</text:p>
      <text:p text:style-name="P13"><text:span text:style-name="T12">Nel </text:span><text:span text:style-name="Emphasis"><text:span text:style-name="T4">Trattato delle passioni</text:span></text:span><text:span text:style-name="T12">, Cartesio interpreta le emozioni come movimenti corporei, quasi come riflessi meccanici. Questo approccio:</text:span></text:p>
      <text:list text:style-name="L8">
        <text:list-item>
          <text:p text:style-name="P57">è innovativo sul piano fisiologico,</text:p>
        </text:list-item>
        <text:list-item>
          <text:p text:style-name="P57">ma <text:span text:style-name="Strong_20_Emphasis">non coglie la dimensione sociale e politica delle passioni</text:span>,</text:p>
        </text:list-item>
        <text:list-item>
          <text:p text:style-name="P57">né la loro funzione costitutiva nella vita collettiva.</text:p>
        </text:list-item>
      </text:list>
      <text:p text:style-name="P23">Risultato: una teoria elegante ma <text:span text:style-name="Strong_20_Emphasis">astratta</text:span>, poco utile per spiegare società, istituzioni, potere.</text:p>
      <text:p text:style-name="P14"><draw:frame draw:style-name="fr1" draw:name="Immagine1" text:anchor-type="char" svg:x="0.023cm" svg:y="0.129cm" svg:width="3.93cm" svg:height="3.388cm" draw:z-index="0"><draw:image xlink:href="Pictures/10000001000003000000022A5C7DA521.png" xlink:type="simple" xlink:show="embed" xlink:actuate="onLoad" draw:mime-type="image/png"/></draw:frame><text:span text:style-name="T12">Hobbes non ha il dualismo cartesiano. Per lui tutto è corpo, movimento, appetito, avversione. Questo gli permette di costruire una </text:span><text:span text:style-name="Strong_20_Emphasis"><text:span text:style-name="T15">scienza dell’uomo</text:span></text:span><text:span text:style-name="T12"> che è:</text:span></text:p>
      <text:list text:style-name="L9">
        <text:list-item>
          <text:p text:style-name="P58">unitaria</text:p>
        </text:list-item>
        <text:list-item>
          <text:p text:style-name="P58">meccanicistica</text:p>
        </text:list-item>
        <text:list-item>
          <text:p text:style-name="P58">applicabile alla politica</text:p>
        </text:list-item>
      </text:list>
      <text:p text:style-name="P36"/>
      <text:p text:style-name="P36"/>
      <text:p text:style-name="P36"><text:soft-page-break/>Hobbes parte dalle passioni reali:</text:p>
      <text:list text:style-name="L10">
        <text:list-item>
          <text:p text:style-name="P59">paura</text:p>
        </text:list-item>
        <text:list-item>
          <text:p text:style-name="P59">desiderio di potere</text:p>
        </text:list-item>
        <text:list-item>
          <text:p text:style-name="P59">competizione</text:p>
        </text:list-item>
        <text:list-item>
          <text:p text:style-name="P59">diffidenza</text:p>
        </text:list-item>
      </text:list>
      <text:p text:style-name="P14">Queste passioni non sono errori da correggere, ma <text:span text:style-name="Strong_20_Emphasis">forze da organizzare</text:span>. Da qui nasce la sua teoria dello Stato come macchina artificiale.</text:p>
      <text:p text:style-name="P34"><text:span text:style-name="Strong_20_Emphasis"><text:span text:style-name="T12">Hobbes applica il costruttivismo razionale </text:span></text:span><text:span text:style-name="Strong_20_Emphasis"><text:span text:style-name="T15">alla società</text:span></text:span><text:span text:style-name="Strong_20_Emphasis"><text:span text:style-name="T12">, non alla fisica:</text:span></text:span></text:p>
      <text:list text:style-name="L11">
        <text:list-item>
          <text:p text:style-name="P60">lo Stato è un <text:span text:style-name="Emphasis">artefatto</text:span></text:p>
        </text:list-item>
        <text:list-item>
          <text:p text:style-name="P60">nasce da un <text:span text:style-name="Emphasis">patto</text:span></text:p>
        </text:list-item>
        <text:list-item>
          <text:p text:style-name="P60">è costruito da individui razionali che vogliono sicurezza</text:p>
        </text:list-item>
      </text:list>
      <text:p text:style-name="P23">È un vero <text:span text:style-name="Strong_20_Emphasis">razionalismo costruttivista applicato al sociale</text:span>.</text:p>
      <text:p text:style-name="P34"><text:span text:style-name="Strong_20_Emphasis"><text:span text:style-name="T15">Cartesio costruisce la scienza della natura.</text:span></text:span><text:span text:style-name="Strong_20_Emphasis"><text:span text:style-name="T12"> </text:span></text:span><text:span text:style-name="Strong_20_Emphasis"><text:span text:style-name="T15">Hobbes costruisce la scienza della società.</text:span></text:span></text:p>
      <text:p text:style-name="P23">Il primo matematizza il mondo fisico; il secondo matematizza il comportamento umano.</text:p>
      <text:p text:style-name="P34"><text:span text:style-name="Strong_20_Emphasis"><text:span text:style-name="T12">Per Hobbes, l’essere umano è un </text:span></text:span><text:span text:style-name="Strong_20_Emphasis"><text:span text:style-name="T15">corpo materiale</text:span></text:span><text:span text:style-name="Strong_20_Emphasis"><text:span text:style-name="T12"> governato da leggi meccaniche:</text:span></text:span></text:p>
      <text:list text:style-name="L12">
        <text:list-item>
          <text:p text:style-name="P61"><text:span text:style-name="Strong_20_Emphasis">Appetito</text:span> — movimento verso ciò che desideriamo</text:p>
        </text:list-item>
        <text:list-item>
          <text:p text:style-name="P61"><text:span text:style-name="Strong_20_Emphasis">Avversione</text:span> — movimento di fuga da ciò che temiamo</text:p>
        </text:list-item>
        <text:list-item>
          <text:p text:style-name="P61"><text:span text:style-name="Strong_20_Emphasis">Desiderio di potere</text:span> — tendenza naturale ad accrescere le proprie possibilità</text:p>
        </text:list-item>
        <text:list-item>
          <text:p text:style-name="P61"><text:span text:style-name="Strong_20_Emphasis">Paura della morte</text:span> — la passione più forte, fondamento della politica</text:p>
        </text:list-item>
      </text:list>
      <text:p text:style-name="P25">Non c’è anima immateriale, non c’è libero arbitrio nel senso tradizionale:</text:p>
      <text:p text:style-name="P21"><text:span text:style-name="Strong_20_Emphasis">L’uomo è un automa complesso, mosso da cause naturali.</text:span></text:p>
      <text:p text:style-name="P31"><text:span text:style-name="Strong_20_Emphasis"><text:span text:style-name="T12">La società non nasce spontaneamente: </text:span></text:span><text:span text:style-name="Strong_20_Emphasis"><text:span text:style-name="T15">va costruita</text:span></text:span><text:span text:style-name="Strong_20_Emphasis"><text:span text:style-name="T12">. Hobbes la pensa come un </text:span></text:span><text:span text:style-name="Strong_20_Emphasis"><text:span text:style-name="Emphasis"><text:span text:style-name="T4">meccanismo artificiale</text:span></text:span></text:span><text:span text:style-name="Strong_20_Emphasis"><text:span text:style-name="T12">, un dispositivo progettato per risolvere un problema:</text:span></text:span></text:p>
      <text:list text:style-name="L13">
        <text:list-item>
          <text:p text:style-name="P62">gli uomini, lasciati a sé, entrano in conflitto</text:p>
        </text:list-item>
        <text:list-item>
          <text:p text:style-name="P63">il conflitto genera insicurezza</text:p>
        </text:list-item>
        <text:list-item>
          <text:p text:style-name="P63">l’insicurezza rende impossibile la vita sociale</text:p>
        </text:list-item>
      </text:list>
      <text:p text:style-name="P37">Per questo Hobbes parla dello Stato come di un <text:span text:style-name="Strong_20_Emphasis">“uomo artificiale”</text:span> (nel <text:span text:style-name="Emphasis">Leviatano</text:span>), composto da:</text:p>
      <text:list text:style-name="L14">
        <text:list-item>
          <text:p text:style-name="P64"><text:span text:style-name="Strong_20_Emphasis">Individui</text:span> = ingranaggi</text:p>
        </text:list-item>
        <text:list-item>
          <text:p text:style-name="P65"><text:span text:style-name="Strong_20_Emphasis">Leggi</text:span> = molle e ruote</text:p>
        </text:list-item>
        <text:list-item>
          <text:p text:style-name="P65"><text:span text:style-name="Strong_20_Emphasis">Sovrano</text:span> = motore centrale</text:p>
        </text:list-item>
      </text:list>
      <text:p text:style-name="P35"><text:span text:style-name="Strong_20_Emphasis"><text:span text:style-name="T12">Il passaggio dallo stato di natura allo Stato è un </text:span></text:span><text:span text:style-name="Strong_20_Emphasis"><text:span text:style-name="T15">atto costruttivo</text:span></text:span><text:span text:style-name="Strong_20_Emphasis"><text:span text:style-name="T12">, non naturale:</text:span></text:span></text:p>
      <text:list text:style-name="L15">
        <text:list-item>
          <text:p text:style-name="P66">Gli individui riconoscono che la loro condizione naturale è instabile.</text:p>
        </text:list-item>
        <text:list-item>
          <text:p text:style-name="P66">Per paura della morte, decidono di rinunciare al diritto illimitato su tutto.</text:p>
        </text:list-item>
        <text:list-item>
          <text:p text:style-name="P66"><text:soft-page-break/>Trasferiscono questo diritto a un sovrano.</text:p>
        </text:list-item>
        <text:list-item>
          <text:p text:style-name="P66">Il sovrano diventa il <text:span text:style-name="Strong_20_Emphasis">motore unico</text:span> che garantisce ordine e sicurezza.</text:p>
        </text:list-item>
      </text:list>
      <text:p text:style-name="P23">Il contratto non è un patto d’amore o di solidarietà: è un <text:span text:style-name="Strong_20_Emphasis">meccanismo di autoconservazione</text:span>.</text:p>
      <text:p text:style-name="P24">Cartesio applica il meccanicismo alla <text:span text:style-name="Strong_20_Emphasis">fisica</text:span>. Hobbes lo applica alla <text:span text:style-name="Strong_20_Emphasis">politica</text:span>.</text:p>
      <text:list text:style-name="L16">
        <text:list-item>
          <text:p text:style-name="P67">Cartesio non ha una teoria delle passioni sociali.</text:p>
        </text:list-item>
        <text:list-item>
          <text:p text:style-name="P68">Hobbes sì: paura, competizione, gloria.</text:p>
        </text:list-item>
        <text:list-item>
          <text:p text:style-name="P68">Cartesio non costruisce un modello della società.</text:p>
        </text:list-item>
        <text:list-item>
          <text:p text:style-name="P69">Hobbes costruisce lo Stato come macchina</text:p>
        </text:list-item>
      </text:list>
      <text:p text:style-name="P38">Per questo Hobbes è il vero fondatore della <text:span text:style-name="Strong_20_Emphasis">scienza politica moderna</text:span>.</text:p>
      <text:p text:style-name="P15"><text:span text:style-name="Strong_20_Emphasis"><text:span text:style-name="T12">Nella politica moderna la </text:span></text:span><text:span text:style-name="Strong_20_Emphasis"><text:span text:style-name="T15">paura</text:span></text:span><text:span text:style-name="Strong_20_Emphasis"><text:span text:style-name="T12"> è diventata una delle principali forze che orientano il comportamento collettivo, il consenso, le istituzioni e perfino la forma dello Stato. Questo sviluppo affonda le sue radici nella teoria hobbesiana, secondo cui la paura <text:s/>soprattutto la </text:span></text:span><text:span text:style-name="Strong_20_Emphasis"><text:span text:style-name="Emphasis"><text:span text:style-name="T4">paura della morte</text:span></text:span></text:span><text:span text:style-name="Strong_20_Emphasis"><text:span text:style-name="T12"> e del </text:span></text:span><text:span text:style-name="Strong_20_Emphasis"><text:span text:style-name="Emphasis"><text:span text:style-name="T4">caos</text:span></text:span></text:span><text:span text:style-name="Strong_20_Emphasis"><text:span text:style-name="T12"> <text:s/>è il motore che spinge gli individui a creare il potere politico. Oggi, come mostrano diverse analisi contemporanee, la paura non solo continua a essere decisiva, ma è diventata </text:span></text:span><text:span text:style-name="Strong_20_Emphasis"><text:span text:style-name="T15">uno strumento di governo</text:span></text:span><text:span text:style-name="Strong_20_Emphasis"><text:span text:style-name="T12">, di comunicazione politica e di costruzione del consenso.</text:span></text:span></text:p>
      <text:p text:style-name="P15"><text:span text:style-name="Strong_20_Emphasis"><text:span text:style-name="T12">Secondo Hobbes, il male più grande non è l’oppressione, ma </text:span></text:span><text:span text:style-name="Strong_20_Emphasis"><text:span text:style-name="T15">l’insicurezza</text:span></text:span><text:span text:style-name="Strong_20_Emphasis"><text:span text:style-name="T12">: il rischio che la società precipiti nel disordine e nella violenza . La paura:</text:span></text:span></text:p>
      <text:list text:style-name="L17">
        <text:list-item>
          <text:p text:style-name="P70">nasce dalla vulnerabilità reciproca degli individui;</text:p>
        </text:list-item>
        <text:list-item>
          <text:p text:style-name="P71">spinge a uscire dallo stato di natura;</text:p>
        </text:list-item>
        <text:list-item>
          <text:p text:style-name="P71">giustifica la creazione del Leviatano, potere sovrano assoluto che garantisce sicurezza.</text:p>
        </text:list-item>
      </text:list>
      <text:p text:style-name="P23">In Hobbes, dunque:</text:p>
      <text:p text:style-name="P20"><text:span text:style-name="Strong_20_Emphasis">La politica nasce dalla paura e serve a neutralizzare la paura.</text:span></text:p>
      <text:p text:style-name="P11">Le analisi recenti mostrano che la paura è tornata al centro della scena pubblica, in forme nuove e pervasive.</text:p>
      <text:p text:style-name="P10">La paura è diventata “la regina delle opinioni politiche e delle scelte elettorali” . Fenomeni come:</text:p>
      <text:list text:style-name="L18">
        <text:list-item>
          <text:p text:style-name="P72">populismi,</text:p>
        </text:list-item>
        <text:list-item>
          <text:p text:style-name="P72">crisi economiche,</text:p>
        </text:list-item>
        <text:list-item>
          <text:p text:style-name="P72">pandemia,</text:p>
        </text:list-item>
        <text:list-item>
          <text:p text:style-name="P72">terrorismo,</text:p>
        </text:list-item>
        <text:list-item>
          <text:p text:style-name="P72">migrazioni,</text:p>
        </text:list-item>
        <text:list-item>
          <text:p text:style-name="P73">insicurezza sociale,</text:p>
        </text:list-item>
      </text:list>
      <text:p text:style-name="P23">hanno reso la paura un <text:span text:style-name="Strong_20_Emphasis">fattore decisivo</text:span> nella formazione del consenso.</text:p>
      <text:p text:style-name="P15"><text:soft-page-break/><text:span text:style-name="Strong_20_Emphasis"><text:span text:style-name="T12">Secondo alcune analisi, i poteri istituzionali hanno reagito alla perdita di legittimità producendo </text:span></text:span><text:span text:style-name="Strong_20_Emphasis"><text:span text:style-name="T15">emergenze permanenti</text:span></text:span><text:span text:style-name="Strong_20_Emphasis"><text:span text:style-name="T12"> e un bisogno costante di sicurezza . Questo porta a:</text:span></text:span></text:p>
      <text:list text:style-name="L19">
        <text:list-item>
          <text:p text:style-name="P74">accettare limitazioni delle libertà,</text:p>
        </text:list-item>
        <text:list-item>
          <text:p text:style-name="P74">rafforzare l’autorità esecutiva,</text:p>
        </text:list-item>
        <text:list-item>
          <text:p text:style-name="P74">normalizzare lo “stato di eccezione”.</text:p>
        </text:list-item>
      </text:list>
      <text:p text:style-name="P23">È una dinamica che ricorda il Leviatano hobbesiano, ma in forma aggiornata.</text:p>
      <text:p text:style-name="P15"><text:span text:style-name="Strong_20_Emphasis"><text:span text:style-name="T12">La paura può essere:</text:span></text:span></text:p>
      <text:list text:style-name="L20">
        <text:list-item>
          <text:p text:style-name="P75"><text:span text:style-name="Strong_20_Emphasis">indotta</text:span> (attraverso narrazioni mediatiche o politiche),</text:p>
        </text:list-item>
        <text:list-item>
          <text:p text:style-name="P75"><text:span text:style-name="Strong_20_Emphasis">amplificata</text:span> (per giustificare misure restrittive),</text:p>
        </text:list-item>
        <text:list-item>
          <text:p text:style-name="P75"><text:span text:style-name="Strong_20_Emphasis">gestita</text:span> (per ottenere consenso o disciplinare la società).</text:p>
        </text:list-item>
      </text:list>
      <text:p text:style-name="P39">Questo fenomeno è stato definito “emozionismo politico” .</text:p>
      <text:p text:style-name="P40"><text:span text:style-name="Strong_20_Emphasis"><text:span text:style-name="T12">Le forme della paura cambiano con le epoche:</text:span></text:span></text:p>
      <text:list text:style-name="L21">
        <text:list-item>
          <text:p text:style-name="P76"><text:span text:style-name="Strong_20_Emphasis">Età moderna (Hobbes):</text:span> paura della violenza e della morte reciproca .</text:p>
        </text:list-item>
        <text:list-item>
          <text:p text:style-name="P76"><text:span text:style-name="Strong_20_Emphasis">Età postmoderna:</text:span> paura della fine della specie, dei rischi tecnologici, del collasso ecologico (Hans Jonas) .</text:p>
        </text:list-item>
      </text:list>
      <text:p text:style-name="P23">Jonas propone una “euristica della paura”:</text:p>
      <text:p text:style-name="P20"><text:span text:style-name="Strong_20_Emphasis">dobbiamo imparare ad avere paura delle conseguenze del nostro potere tecnologico</text:span> per assumere responsabilità verso il futuro .</text:p>
      <text:p text:style-name="P23">Qui la paura non è solo politica, ma <text:span text:style-name="Strong_20_Emphasis">etica</text:span>.</text:p>
      <text:p text:style-name="P22"><text:span text:style-name="Strong_20_Emphasis">Hobbes ha mostrato che la politica nasce dalla paura.</text:span> <text:span text:style-name="Strong_20_Emphasis">La politica moderna mostra che la paura può anche governare la politica.</text:span></text:p>
      <text:p text:style-name="P23">La paura è diventata:</text:p>
      <text:list text:style-name="L22">
        <text:list-item>
          <text:p text:style-name="P77">un motore del consenso,</text:p>
        </text:list-item>
        <text:list-item>
          <text:p text:style-name="P77">un dispositivo di governo,</text:p>
        </text:list-item>
        <text:list-item>
          <text:p text:style-name="P77">un criterio di legittimazione del potere,</text:p>
        </text:list-item>
        <text:list-item>
          <text:p text:style-name="P77">un’emozione collettiva che modella istituzioni e decisioni.</text:p>
        </text:list-item>
      </text:list>
      <text:p text:style-name="P24"/>
      <text:p text:style-name="P15"><text:span text:style-name="Strong_20_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5-11T15:51:24.345320647</meta:creation-date>
    <dc:date>2026-05-16T17:55:25.183120641</dc:date>
    <dc:creator>corrado tafaro</dc:creator>
    <meta:editing-duration>PT46M56S</meta:editing-duration>
    <meta:editing-cycles>8</meta:editing-cycles>
    <meta:generator>LibreOffice/24.2.7.2$Linux_X86_64 LibreOffice_project/420$Build-2</meta:generator>
    <meta:document-statistic meta:table-count="0" meta:image-count="1" meta:object-count="0" meta:page-count="6" meta:paragraph-count="149" meta:word-count="1730" meta:character-count="11176" meta:non-whitespace-character-count="9658"/>
  </office:meta>
</office:document-meta>
</file>