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automatic-styles>
    <style:style style:name="P1" style:family="paragraph" style:parent-style-name="Footnote">
      <style:paragraph-properties fo:line-height="100%" fo:text-align="justify" style:justify-single-word="false"/>
      <style:text-properties style:font-name="Noto Sans1" fo:font-size="9pt" officeooo:rsid="00b86155" officeooo:paragraph-rsid="00bebd19" style:font-size-asian="9pt" style:font-size-complex="9pt"/>
    </style:style>
    <style:style style:name="P2" style:family="paragraph" style:parent-style-name="Footnote">
      <style:paragraph-properties fo:text-align="justify" style:justify-single-word="false"/>
      <style:text-properties style:font-name="Noto Sans1"/>
    </style:style>
    <style:style style:name="P3" style:family="paragraph" style:parent-style-name="Standard">
      <style:paragraph-properties fo:margin-top="0.101cm" fo:margin-bottom="0cm" style:contextual-spacing="false" fo:line-height="115%" fo:text-align="center" style:justify-single-word="false"/>
      <style:text-properties style:font-name="Noto Sans1" fo:font-size="10pt" fo:font-style="normal" fo:text-shadow="none" officeooo:rsid="027f6543" officeooo:paragraph-rsid="000cc0c0" style:font-size-asian="10pt" style:font-style-asian="normal" style:font-size-complex="10pt" style:font-style-complex="normal"/>
    </style:style>
    <style:style style:name="P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0e7768" officeooo:paragraph-rsid="000cc0c0" style:font-size-asian="10.5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0e7768" officeooo:paragraph-rsid="000cc0c0" style:font-size-asian="10.5pt" style:font-style-asian="normal" style:font-size-complex="12pt" style:font-style-complex="normal"/>
    </style:style>
    <style:style style:name="P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abbcb9" officeooo:paragraph-rsid="000cc0c0" style:font-size-asian="10.5pt" style:font-size-complex="12pt"/>
    </style:style>
    <style:style style:name="P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0fc34a" officeooo:paragraph-rsid="000cc0c0" style:font-size-asian="10.5pt" style:font-size-complex="12pt"/>
    </style:style>
    <style:style style:name="P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0fc34a" officeooo:paragraph-rsid="000cc0c0" style:font-size-asian="10.5pt" style:font-size-complex="12pt"/>
    </style:style>
    <style:style style:name="P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cc0c0" style:font-size-asian="12pt" style:font-size-complex="12pt"/>
    </style:style>
    <style:style style:name="P10" style:family="paragraph" style:parent-style-name="Standard">
      <style:paragraph-properties fo:margin-top="0.101cm" fo:margin-bottom="0cm" style:contextual-spacing="false" fo:line-height="115%" fo:text-align="justify" style:justify-single-word="false"/>
      <style:text-properties style:font-name="Noto Sans1" fo:font-style="normal" officeooo:paragraph-rsid="000cc0c0" style:font-style-asian="normal" style:font-style-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tyle="normal" officeooo:paragraph-rsid="000cc0c0" style:font-style-asian="normal" style:font-style-complex="normal"/>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tyle="normal" officeooo:paragraph-rsid="000cc0c0" style:font-style-asian="normal" style:font-style-complex="normal"/>
    </style:style>
    <style:style style:name="P1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0cc0c0"/>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0cc0c0"/>
    </style:style>
    <style:style style:name="P15" style:family="paragraph" style:parent-style-name="Footnote">
      <style:paragraph-properties fo:text-align="justify" style:justify-single-word="false"/>
    </style:style>
    <style:style style:name="P16" style:family="paragraph" style:parent-style-name="Text_20_body">
      <style:paragraph-properties fo:text-align="justify" style:justify-single-word="false"/>
      <style:text-properties style:font-name="Noto Sans1" fo:font-size="12pt" style:font-size-asian="12pt" style:font-size-complex="12pt"/>
    </style:style>
    <style:style style:name="P17" style:family="paragraph" style:parent-style-name="Text_20_body">
      <style:paragraph-properties fo:margin-top="0.101cm" fo:margin-bottom="0cm" style:contextual-spacing="false" fo:text-align="justify" style:justify-single-word="false"/>
      <style:text-properties style:font-name="Noto Sans1" fo:font-size="12pt" style:font-size-asian="12pt" style:font-size-complex="12pt"/>
    </style:style>
    <style:style style:name="P18" style:family="paragraph" style:parent-style-name="Footnote">
      <style:paragraph-properties fo:text-align="justify" style:justify-single-word="false"/>
    </style:style>
    <style:style style:name="P19" style:family="paragraph" style:parent-style-name="Heading_20_2">
      <style:text-properties style:font-name="Noto Sans1" fo:font-size="14pt" officeooo:paragraph-rsid="000cc0c0" style:font-size-asian="14pt" style:font-size-complex="14pt"/>
    </style:style>
    <style:style style:name="P20" style:family="paragraph" style:parent-style-name="Heading_20_3">
      <style:text-properties fo:font-size="11pt" fo:font-weight="bold" officeooo:paragraph-rsid="000d5cfd" style:font-size-asian="11pt" style:font-weight-asian="bold" style:font-size-complex="11pt" style:font-weight-complex="bold"/>
    </style:style>
    <style:style style:name="P21"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22"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20b17c" officeooo:paragraph-rsid="000d5cfd"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rsid="001c02ae" officeooo:paragraph-rsid="000d5cfd" style:font-size-asian="12pt" style:font-size-complex="12pt"/>
    </style:style>
    <style:style style:name="P32" style:family="paragraph" style:parent-style-name="Standard">
      <style:paragraph-properties fo:line-height="115%" fo:text-align="justify" style:justify-single-word="false"/>
      <style:text-properties style:font-name="Noto Sans1" fo:font-size="12pt" officeooo:rsid="00145787" officeooo:paragraph-rsid="000d5cfd" style:font-size-asian="12pt" style:font-size-complex="12pt"/>
    </style:style>
    <style:style style:name="P33"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34"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3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45787" officeooo:paragraph-rsid="000d5cfd" style:font-size-asian="12pt" style:font-size-complex="12pt"/>
    </style:style>
    <style:style style:name="P37"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38" style:family="paragraph" style:parent-style-name="Standard">
      <style:paragraph-properties fo:line-height="115%" fo:text-align="justify" style:justify-single-word="false"/>
      <style:text-properties style:font-name="Noto Sans1" fo:font-size="12pt" officeooo:rsid="00139a99" officeooo:paragraph-rsid="000d5cfd" style:font-size-asian="12pt" style:font-size-complex="12pt"/>
    </style:style>
    <style:style style:name="P39"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39a99" officeooo:paragraph-rsid="000d5cfd" style:font-size-asian="12pt" style:font-size-complex="12pt"/>
    </style:style>
    <style:style style:name="P4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d5cfd" style:font-size-asian="12pt" style:font-size-complex="12pt"/>
    </style:style>
    <style:style style:name="P41" style:family="paragraph" style:parent-style-name="Standard">
      <style:paragraph-properties fo:line-height="115%" fo:text-align="justify" style:justify-single-word="false"/>
      <style:text-properties fo:font-size="12pt" officeooo:rsid="00139a99" officeooo:paragraph-rsid="000d5cfd" style:font-size-asian="12pt" style:font-size-complex="12pt"/>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fo:font-size="12pt" officeooo:rsid="00139a99" officeooo:paragraph-rsid="000d5cfd" style:font-size-asian="12pt" style:font-size-complex="12pt"/>
    </style:style>
    <style:style style:name="P4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2pt" officeooo:rsid="00139a99" officeooo:paragraph-rsid="000d5cfd" style:font-size-asian="12pt" style:font-size-complex="12pt"/>
    </style:style>
    <style:style style:name="T1" style:family="text">
      <style:text-properties officeooo:rsid="00ef88cd"/>
    </style:style>
    <style:style style:name="T2" style:family="text">
      <style:text-properties officeooo:rsid="00ad2448"/>
    </style:style>
    <style:style style:name="T3" style:family="text">
      <style:text-properties officeooo:rsid="00bdc33a"/>
    </style:style>
    <style:style style:name="T4" style:family="text">
      <style:text-properties officeooo:rsid="00d162fd"/>
    </style:style>
    <style:style style:name="T5" style:family="text">
      <style:text-properties fo:font-style="italic" style:font-style-asian="italic" style:font-style-complex="italic"/>
    </style:style>
    <style:style style:name="T6" style:family="text">
      <style:text-properties fo:font-style="italic" officeooo:rsid="00ad2448" style:font-style-asian="italic" style:font-style-complex="italic"/>
    </style:style>
    <style:style style:name="T7" style:family="text">
      <style:text-properties fo:font-style="italic" officeooo:rsid="00139a99" style:font-style-asian="italic" style:font-style-complex="italic"/>
    </style:style>
    <style:style style:name="T8" style:family="text">
      <style:text-properties fo:font-style="italic" officeooo:rsid="0036f345" style:font-style-asian="italic" style:font-style-complex="italic"/>
    </style:style>
    <style:style style:name="T9" style:family="text">
      <style:text-properties fo:font-style="italic" officeooo:rsid="00145787" style:font-style-asian="italic" style:font-style-complex="italic"/>
    </style:style>
    <style:style style:name="T10" style:family="text">
      <style:text-properties fo:font-style="italic" officeooo:rsid="01be6cbb"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c02ae" style:font-style-asian="italic" style:font-weight-asian="normal" style:font-style-complex="italic" style:font-weight-complex="normal"/>
    </style:style>
    <style:style style:name="T13" style:family="text">
      <style:text-properties fo:font-size="12pt" officeooo:rsid="000e7768" style:font-size-asian="10.5pt" style:font-size-complex="12pt"/>
    </style:style>
    <style:style style:name="T14" style:family="text">
      <style:text-properties fo:font-size="12pt" officeooo:rsid="00bdc33a" style:font-size-asian="10.5pt" style:font-size-complex="12pt"/>
    </style:style>
    <style:style style:name="T15" style:family="text">
      <style:text-properties fo:font-size="12pt" officeooo:rsid="00af7d22" style:font-size-asian="10.5pt" style:font-size-complex="12pt"/>
    </style:style>
    <style:style style:name="T16" style:family="text">
      <style:text-properties fo:font-size="12pt" officeooo:rsid="000fc34a" style:font-size-asian="10.5pt" style:font-size-complex="12pt"/>
    </style:style>
    <style:style style:name="T17" style:family="text">
      <style:text-properties fo:font-size="12pt" officeooo:rsid="00f12137" style:font-size-asian="10.5pt" style:font-size-complex="12pt"/>
    </style:style>
    <style:style style:name="T18" style:family="text">
      <style:text-properties fo:font-size="12pt" officeooo:rsid="00d162fd" style:font-size-asian="10.5pt" style:font-size-complex="12pt"/>
    </style:style>
    <style:style style:name="T19" style:family="text">
      <style:text-properties fo:font-size="12pt" officeooo:rsid="00c2d954" style:font-size-asian="10.5pt" style:font-size-complex="12pt"/>
    </style:style>
    <style:style style:name="T20" style:family="text">
      <style:text-properties fo:font-size="12pt" officeooo:rsid="00b93547" style:font-size-asian="10.5pt" style:font-size-complex="12pt"/>
    </style:style>
    <style:style style:name="T21" style:family="text">
      <style:text-properties fo:font-size="12pt" officeooo:rsid="00bebd19" style:font-size-asian="10.5pt" style:font-size-complex="12pt"/>
    </style:style>
    <style:style style:name="T22" style:family="text">
      <style:text-properties fo:font-size="12pt" fo:font-style="italic" officeooo:rsid="00f12137" style:font-size-asian="10.5pt" style:font-style-asian="italic" style:font-size-complex="12pt" style:font-style-complex="italic"/>
    </style:style>
    <style:style style:name="T23" style:family="text">
      <style:text-properties fo:font-size="12pt" fo:font-style="italic" officeooo:rsid="000fc34a" style:font-size-asian="10.5pt" style:font-style-asian="italic" style:font-size-complex="12pt" style:font-style-complex="italic"/>
    </style:style>
    <style:style style:name="T2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1c02ae" style:font-size-asian="10.5pt" style:font-style-asian="italic" style:font-weight-asian="normal" style:font-size-complex="12pt" style:font-style-complex="italic" style:font-weight-complex="normal"/>
    </style:style>
    <style:style style:name="T26" style:family="text">
      <style:text-properties fo:font-size="12pt" fo:font-style="normal" officeooo:rsid="000fc34a" style:font-size-asian="10.5pt" style:font-style-asian="normal" style:font-size-complex="12pt" style:font-style-complex="normal"/>
    </style:style>
    <style:style style:name="T27" style:family="text">
      <style:text-properties fo:font-size="12pt" fo:font-style="normal" officeooo:rsid="00c08a0c" style:font-size-asian="10.5pt" style:font-style-asian="normal" style:font-size-complex="12pt" style:font-style-complex="normal"/>
    </style:style>
    <style:style style:name="T28" style:family="text">
      <style:text-properties fo:font-size="12pt" fo:font-style="normal" officeooo:rsid="00d19e65" style:font-size-asian="10.5pt" style:font-style-asian="normal" style:font-size-complex="12pt" style:font-style-complex="normal"/>
    </style:style>
    <style:style style:name="T29" style:family="text">
      <style:text-properties fo:font-size="12pt" fo:font-style="normal" officeooo:rsid="02235d54" style:font-size-asian="10.5pt" style:font-style-asian="normal" style:font-size-complex="12pt" style:font-style-complex="normal"/>
    </style:style>
    <style:style style:name="T30" style:family="text">
      <style:text-properties fo:font-size="12pt" fo:font-style="normal" officeooo:rsid="00c23866" style:font-size-asian="10.5pt" style:font-style-asian="normal" style:font-size-complex="12pt" style:font-style-complex="normal"/>
    </style:style>
    <style:style style:name="T31" style:family="text">
      <style:text-properties fo:font-size="12pt" fo:font-style="normal" officeooo:rsid="00c2d954" style:font-size-asian="10.5pt" style:font-style-asian="normal" style:font-size-complex="12pt" style:font-style-complex="normal"/>
    </style:style>
    <style:style style:name="T32" style:family="text">
      <style:text-properties fo:font-size="12pt" fo:font-style="normal" officeooo:rsid="00c3aa3b" style:font-size-asian="10.5pt" style:font-style-asian="normal" style:font-size-complex="12pt" style:font-style-complex="normal"/>
    </style:style>
    <style:style style:name="T33" style:family="text">
      <style:text-properties fo:font-size="12pt" fo:font-style="normal" officeooo:rsid="00d2142f" style:font-size-asian="10.5pt" style:font-style-asian="normal" style:font-size-complex="12pt" style:font-style-complex="normal"/>
    </style:style>
    <style:style style:name="T34" style:family="text">
      <style:text-properties fo:font-size="12pt" fo:font-style="normal" officeooo:rsid="00e82454" style:font-size-asian="10.5pt" style:font-style-asian="normal" style:font-size-complex="12pt" style:font-style-complex="normal"/>
    </style:style>
    <style:style style:name="T3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294116"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1c02ae"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29e37e"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d44442"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36f345" style:font-size-asian="10.5pt" style:font-style-asian="normal" style:font-weight-asian="normal" style:font-size-complex="12pt" style:font-style-complex="normal" style:font-weight-complex="normal"/>
    </style:style>
    <style:style style:name="T41" style:family="text">
      <style:text-properties officeooo:rsid="00b93547"/>
    </style:style>
    <style:style style:name="T42" style:family="text">
      <style:text-properties officeooo:rsid="00d19e65"/>
    </style:style>
    <style:style style:name="T43" style:family="text">
      <style:text-properties style:font-name="Noto Sans" officeooo:rsid="00c08a0c"/>
    </style:style>
    <style:style style:name="T44" style:family="text">
      <style:text-properties officeooo:rsid="00bebd19"/>
    </style:style>
    <style:style style:name="T45" style:family="text">
      <style:text-properties officeooo:rsid="00bfa736"/>
    </style:style>
    <style:style style:name="T46" style:family="text">
      <style:text-properties officeooo:rsid="00c08a0c"/>
    </style:style>
    <style:style style:name="T47" style:family="text">
      <style:text-properties officeooo:rsid="00c9f1f5"/>
    </style:style>
    <style:style style:name="T48" style:family="text">
      <style:text-properties officeooo:rsid="00b9d124"/>
    </style:style>
    <style:style style:name="T49" style:family="text">
      <style:text-properties officeooo:rsid="000fc34a"/>
    </style:style>
    <style:style style:name="T50" style:family="text">
      <style:text-properties style:font-name="Noto Sans1"/>
    </style:style>
    <style:style style:name="T51" style:family="text">
      <style:text-properties style:font-name="Noto Sans1" fo:font-size="12pt" fo:font-style="normal" fo:font-weight="normal" officeooo:rsid="00294116" style:font-size-asian="10.5pt" style:font-style-asian="normal" style:font-weight-asian="normal" style:font-size-complex="12pt" style:font-style-complex="normal" style:font-weight-complex="normal"/>
    </style:style>
    <style:style style:name="T52" style:family="text">
      <style:text-properties style:font-name="Noto Sans1" fo:font-size="12pt" fo:font-style="normal" fo:font-weight="normal" officeooo:rsid="001c02ae" style:font-size-asian="10.5pt" style:font-style-asian="normal" style:font-weight-asian="normal" style:font-size-complex="12pt" style:font-style-complex="normal" style:font-weight-complex="normal"/>
    </style:style>
    <style:style style:name="T53" style:family="text">
      <style:text-properties style:font-name="Noto Sans1" fo:font-size="12pt" fo:font-style="normal" fo:font-weight="normal" officeooo:rsid="0029e37e" style:font-size-asian="10.5pt" style:font-style-asian="normal" style:font-weight-asian="normal" style:font-size-complex="12pt" style:font-style-complex="normal" style:font-weight-complex="normal"/>
    </style:style>
    <style:style style:name="T54" style:family="text">
      <style:text-properties style:font-name="Noto Sans1" fo:font-size="12pt" fo:font-style="normal" fo:font-weight="normal" officeooo:rsid="0040f61e" style:font-size-asian="10.5pt" style:font-style-asian="normal" style:font-weight-asian="normal" style:font-size-complex="12pt" style:font-style-complex="normal" style:font-weight-complex="normal"/>
    </style:style>
    <style:style style:name="T55" style:family="text">
      <style:text-properties style:font-name="Noto Sans1" fo:font-size="12pt" fo:font-style="normal" fo:font-weight="normal" officeooo:rsid="00e29ca3" style:font-size-asian="10.5pt" style:font-style-asian="normal" style:font-weight-asian="normal" style:font-size-complex="12pt" style:font-style-complex="normal" style:font-weight-complex="normal"/>
    </style:style>
    <style:style style:name="T56" style:family="text">
      <style:text-properties style:font-name="Noto Sans1" fo:font-size="12pt" fo:font-style="normal" fo:font-weight="normal" officeooo:rsid="00145787" style:font-size-asian="10.5pt" style:font-style-asian="normal" style:font-weight-asian="normal" style:font-size-complex="12pt" style:font-style-complex="normal" style:font-weight-complex="normal"/>
    </style:style>
    <style:style style:name="T57" style:family="text">
      <style:text-properties style:font-name="Noto Sans1" fo:font-size="12pt" fo:font-style="italic" officeooo:rsid="0029e37e" style:font-size-asian="12pt" style:font-style-asian="italic" style:font-size-complex="12pt" style:font-style-complex="italic"/>
    </style:style>
    <style:style style:name="T58" style:family="text">
      <style:text-properties style:font-name="Noto Sans1" fo:font-size="11pt" fo:font-style="normal" fo:font-weight="bold" officeooo:rsid="0029e37e" style:font-size-asian="11pt" style:font-style-asian="normal" style:font-weight-asian="bold" style:font-size-complex="11pt" style:font-style-complex="normal" style:font-weight-complex="bold"/>
    </style:style>
    <style:style style:name="T59" style:family="text">
      <style:text-properties style:font-name="Noto Sans1" fo:font-size="11pt" fo:font-style="normal" fo:font-weight="bold" officeooo:rsid="001c02ae" style:font-size-asian="11pt" style:font-style-asian="normal" style:font-weight-asian="bold" style:font-size-complex="11pt" style:font-style-complex="normal" style:font-weight-complex="bold"/>
    </style:style>
    <style:style style:name="T60" style:family="text">
      <style:text-properties style:font-name="Noto Sans1" officeooo:rsid="00d44442"/>
    </style:style>
    <style:style style:name="T61" style:family="text">
      <style:text-properties style:font-name="Noto Sans1" officeooo:rsid="022a9003"/>
    </style:style>
    <style:style style:name="T62" style:family="text">
      <style:text-properties style:font-name="Noto Sans1" officeooo:rsid="0029e37e"/>
    </style:style>
    <style:style style:name="T63" style:family="text">
      <style:text-properties style:font-name="Noto Sans1" fo:font-style="italic" style:text-underline-style="none" officeooo:rsid="0029e37e" style:font-style-asian="italic" style:font-style-complex="italic"/>
    </style:style>
    <style:style style:name="T64" style:family="text">
      <style:text-properties style:font-name="Noto Sans1" fo:font-style="italic" style:font-style-asian="italic" style:font-style-complex="italic"/>
    </style:style>
    <style:style style:name="T65" style:family="text">
      <style:text-properties style:font-name="Noto Sans1" fo:font-style="italic" officeooo:rsid="0029e37e" style:font-style-asian="italic" style:font-style-complex="italic"/>
    </style:style>
    <style:style style:name="T66" style:family="text">
      <style:text-properties style:font-name="Noto Sans1" fo:font-style="italic" fo:font-weight="normal" officeooo:rsid="00d44442" style:font-style-asian="italic" style:font-weight-asian="normal" style:font-style-complex="italic" style:font-weight-complex="normal"/>
    </style:style>
    <style:style style:name="T67" style:family="text">
      <style:text-properties style:font-name="Noto Sans1" fo:font-style="normal" fo:font-weight="normal" officeooo:rsid="00294116" style:font-style-asian="normal" style:font-weight-asian="normal" style:font-style-complex="normal" style:font-weight-complex="normal"/>
    </style:style>
    <style:style style:name="T68" style:family="text">
      <style:text-properties style:font-name="Noto Sans1" fo:font-style="normal" fo:font-weight="normal" officeooo:rsid="001c02ae" style:font-style-asian="normal" style:font-weight-asian="normal" style:font-style-complex="normal" style:font-weight-complex="normal"/>
    </style:style>
    <style:style style:name="T69" style:family="text">
      <style:text-properties style:font-name="Noto Sans1" fo:font-style="normal" fo:font-weight="normal" officeooo:rsid="0029e37e" style:font-style-asian="normal" style:font-weight-asian="normal" style:font-style-complex="normal" style:font-weight-complex="normal"/>
    </style:style>
    <style:style style:name="T70" style:family="text">
      <style:text-properties style:font-name="Noto Sans1" fo:font-style="normal" fo:font-weight="normal" officeooo:rsid="0040f61e" style:font-style-asian="normal" style:font-weight-asian="normal" style:font-style-complex="normal" style:font-weight-complex="normal"/>
    </style:style>
    <style:style style:name="T71" style:family="text">
      <style:text-properties style:font-name="Noto Sans1" fo:font-style="normal" fo:font-weight="normal" officeooo:rsid="00e29ca3" style:font-style-asian="normal" style:font-weight-asian="normal" style:font-style-complex="normal" style:font-weight-complex="normal"/>
    </style:style>
    <style:style style:name="T72" style:family="text">
      <style:text-properties style:font-name="Noto Sans1" fo:font-style="normal" fo:font-weight="normal" officeooo:rsid="00145787" style:font-style-asian="normal" style:font-weight-asian="normal" style:font-style-complex="normal" style:font-weight-complex="normal"/>
    </style:style>
    <style:style style:name="T73" style:family="text">
      <style:text-properties style:font-name="Noto Sans1" fo:font-style="normal" fo:font-weight="bold" officeooo:rsid="0029e37e" style:font-style-asian="normal" style:font-weight-asian="bold" style:font-style-complex="normal" style:font-weight-complex="bold"/>
    </style:style>
    <style:style style:name="T74" style:family="text">
      <style:text-properties style:font-name="Noto Sans1" fo:font-style="normal" fo:font-weight="bold" officeooo:rsid="001c02ae"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00fc34a" style:font-style-asian="normal" style:font-style-complex="normal"/>
    </style:style>
    <style:style style:name="T77" style:family="text">
      <style:text-properties fo:font-style="normal" officeooo:rsid="0027935f" style:font-style-asian="normal" style:font-style-complex="normal"/>
    </style:style>
    <style:style style:name="T78" style:family="text">
      <style:text-properties fo:font-style="normal" officeooo:rsid="00294116" style:font-style-asian="normal" style:font-style-complex="normal"/>
    </style:style>
    <style:style style:name="T79" style:family="text">
      <style:text-properties fo:font-style="normal" officeooo:rsid="0025f7dd" style:font-style-asian="normal" style:font-style-complex="normal"/>
    </style:style>
    <style:style style:name="T80" style:family="text">
      <style:text-properties fo:font-style="normal" style:font-size-asian="12pt"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d44442" style:font-style-asian="normal" style:font-weight-asian="normal" style:font-style-complex="normal" style:font-weight-complex="normal"/>
    </style:style>
    <style:style style:name="T83" style:family="text">
      <style:text-properties fo:font-style="normal" fo:font-weight="normal" officeooo:rsid="00294116" style:font-style-asian="normal" style:font-weight-asian="normal" style:font-style-complex="normal" style:font-weight-complex="normal"/>
    </style:style>
    <style:style style:name="T84" style:family="text">
      <style:text-properties fo:font-style="normal" fo:font-weight="normal" officeooo:rsid="001c02ae" style:font-style-asian="normal" style:font-weight-asian="normal" style:font-style-complex="normal" style:font-weight-complex="normal"/>
    </style:style>
    <style:style style:name="T85" style:family="text">
      <style:text-properties fo:font-style="normal" fo:font-weight="normal" officeooo:rsid="0029e37e" style:font-style-asian="normal" style:font-weight-asian="normal" style:font-style-complex="normal" style:font-weight-complex="normal"/>
    </style:style>
    <style:style style:name="T86" style:family="text">
      <style:text-properties fo:font-style="normal" fo:font-weight="normal" officeooo:rsid="0036f345" style:font-style-asian="normal" style:font-weight-asian="normal" style:font-style-complex="normal" style:font-weight-complex="normal"/>
    </style:style>
    <style:style style:name="T87" style:family="text">
      <style:text-properties fo:font-style="normal" fo:font-weight="bold" officeooo:rsid="001c02ae" style:font-style-asian="normal" style:font-weight-asian="bold" style:font-style-complex="normal" style:font-weight-complex="bold"/>
    </style:style>
    <style:style style:name="T88" style:family="text">
      <style:text-properties fo:font-style="normal" fo:font-weight="bold" officeooo:rsid="0029e37e" style:font-style-asian="normal" style:font-weight-asian="bold" style:font-style-complex="normal" style:font-weight-complex="bold"/>
    </style:style>
    <style:style style:name="T89" style:family="text">
      <style:text-properties fo:font-weight="normal" officeooo:rsid="001c02ae" style:font-weight-asian="normal" style:font-weight-complex="normal"/>
    </style:style>
    <style:style style:name="T90" style:family="text">
      <style:text-properties fo:font-weight="normal" officeooo:rsid="028ba1d6" style:font-weight-asian="normal" style:font-weight-complex="normal"/>
    </style:style>
    <style:style style:name="T91" style:family="text">
      <style:text-properties fo:font-size="11pt" fo:font-style="normal" fo:font-weight="bold" officeooo:rsid="0029e37e" style:font-size-asian="11pt" style:font-style-asian="normal" style:font-weight-asian="bold" style:font-size-complex="11pt" style:font-style-complex="normal" style:font-weight-complex="bold"/>
    </style:style>
    <style:style style:name="T92" style:family="text">
      <style:text-properties fo:font-size="11pt" fo:font-style="normal" fo:font-weight="bold" officeooo:rsid="001c02ae" style:font-size-asian="11pt" style:font-style-asian="normal" style:font-weight-asian="bold" style:font-size-complex="11pt" style:font-style-complex="normal" style:font-weight-complex="bold"/>
    </style:style>
    <style:style style:name="T93" style:family="text">
      <style:text-properties fo:font-size="11pt" fo:font-style="normal" fo:font-weight="normal" officeooo:rsid="0036f345" style:font-size-asian="11pt" style:font-style-asian="normal" style:font-weight-asian="normal" style:font-size-complex="11pt" style:font-style-complex="normal" style:font-weight-complex="normal"/>
    </style:style>
    <style:style style:name="T94" style:family="text">
      <style:text-properties fo:font-size="11pt" fo:font-style="normal" fo:font-weight="normal" officeooo:rsid="0029e37e" style:font-size-asian="11pt" style:font-style-asian="normal" style:font-weight-asian="normal" style:font-size-complex="11pt" style:font-style-complex="normal" style:font-weight-complex="normal"/>
    </style:style>
    <style:style style:name="T95" style:family="text">
      <style:text-properties fo:font-size="11pt" fo:font-style="normal" fo:font-weight="normal" officeooo:rsid="001c02ae" style:font-size-asian="11pt" style:font-style-asian="normal" style:font-weight-asian="normal" style:font-size-complex="11pt" style:font-style-complex="normal" style:font-weight-complex="normal"/>
    </style:style>
    <style:style style:name="T96" style:family="text">
      <style:text-properties fo:font-size="11pt" fo:font-style="normal" fo:font-weight="normal" officeooo:rsid="00294116" style:font-size-asian="11pt" style:font-style-asian="normal" style:font-weight-asian="normal" style:font-size-complex="11pt" style:font-style-complex="normal" style:font-weight-complex="normal"/>
    </style:style>
    <style:style style:name="T97" style:family="text">
      <style:text-properties fo:font-size="11pt" fo:font-weight="bold" style:font-size-asian="11pt" style:font-weight-asian="bold" style:font-size-complex="11pt" style:font-weight-complex="bold"/>
    </style:style>
    <style:style style:name="T98" style:family="text">
      <style:text-properties fo:font-size="11pt" fo:font-weight="bold" officeooo:rsid="0020b17c" style:font-size-asian="11pt" style:font-weight-asian="bold" style:font-size-complex="11pt" style:font-weight-complex="bold"/>
    </style:style>
    <style:style style:name="T99" style:family="text">
      <style:text-properties officeooo:rsid="00cdc78f"/>
    </style:style>
    <style:style style:name="T100" style:family="text">
      <style:text-properties officeooo:rsid="003afd6a"/>
    </style:style>
    <style:style style:name="T101" style:family="text">
      <style:text-properties officeooo:rsid="00ccda81"/>
    </style:style>
    <style:style style:name="T102" style:family="text">
      <style:text-properties officeooo:rsid="00d2142f"/>
    </style:style>
    <style:style style:name="T103" style:family="text">
      <style:text-properties officeooo:rsid="01274ef5" style:font-size-asian="12pt"/>
    </style:style>
    <style:style style:name="T104" style:family="text">
      <style:text-properties officeooo:rsid="012e50a3"/>
    </style:style>
    <style:style style:name="T105" style:family="text">
      <style:text-properties officeooo:rsid="02288e9b"/>
    </style:style>
    <style:style style:name="T106" style:family="text">
      <style:text-properties officeooo:rsid="0128a155"/>
    </style:style>
    <style:style style:name="T107" style:family="text">
      <style:text-properties officeooo:rsid="0027935f"/>
    </style:style>
    <style:style style:name="T108" style:family="text">
      <style:text-properties officeooo:rsid="0020b17c"/>
    </style:style>
    <style:style style:name="T109" style:family="text">
      <style:text-properties officeooo:rsid="00d223de"/>
    </style:style>
    <style:style style:name="T110" style:family="text">
      <style:text-properties officeooo:rsid="022a836c"/>
    </style:style>
    <style:style style:name="T111" style:family="text">
      <style:text-properties officeooo:rsid="001f97de"/>
    </style:style>
    <style:style style:name="T112" style:family="text">
      <style:text-properties officeooo:rsid="0036f345"/>
    </style:style>
    <style:style style:name="T113" style:family="text">
      <style:text-properties officeooo:rsid="00124bba"/>
    </style:style>
    <style:style style:name="T114" style:family="text">
      <style:text-properties officeooo:rsid="00294116"/>
    </style:style>
    <style:style style:name="T115" style:family="text">
      <style:text-properties officeooo:rsid="00d36474"/>
    </style:style>
    <style:style style:name="T116" style:family="text">
      <style:text-properties officeooo:rsid="00139a99"/>
    </style:style>
    <style:style style:name="T117" style:family="text">
      <style:text-properties officeooo:rsid="0029e37e"/>
    </style:style>
    <style:style style:name="T118" style:family="text">
      <style:text-properties officeooo:rsid="00d44442"/>
    </style:style>
    <style:style style:name="T119" style:family="text">
      <style:text-properties officeooo:rsid="00145787"/>
    </style:style>
    <style:style style:name="T120" style:family="text">
      <style:text-properties officeooo:rsid="00d4fbd8"/>
    </style:style>
    <style:style style:name="T121" style:family="text">
      <style:text-properties officeooo:rsid="0040f61e"/>
    </style:style>
    <style:style style:name="T122" style:family="text">
      <style:text-properties officeooo:rsid="0015111c"/>
    </style:style>
    <style:style style:name="T123" style:family="text">
      <style:text-properties fo:font-size="10.5pt" fo:font-style="italic" style:font-size-asian="10.5pt" style:font-style-asian="italic" style:font-size-complex="10.5pt" style:font-style-complex="italic"/>
    </style:style>
    <style:style style:name="T124" style:family="text">
      <style:text-properties fo:font-size="10.5pt" fo:font-style="italic" officeooo:rsid="01be6cbb" style:font-size-asian="10.5pt" style:font-style-asian="italic" style:font-size-complex="10.5pt" style:font-style-complex="italic"/>
    </style:style>
    <style:style style:name="T125" style:family="text">
      <style:text-properties officeooo:rsid="002ee1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3"><text:bookmark-start text:name="__RefHeading___Toc22638_1047567575"/>Stoicismo<text:bookmark-end text:name="__RefHeading___Toc22638_1047567575"/></text:h>
      <text:p text:style-name="P23">Le esperienze e le conoscenze del passato hanno avuto e continuano ad avere un<text:span text:style-name="T99">a </text:span>inesorabil<text:span text:style-name="T100">e </text:span>influenza sulle conoscenze di oggi sia in campo scientifico, tecnico e culturale. In ogni campo del sapere, il progresso è frutto di un processo di accumulazione di conoscenze e di esperienze, che si basa sulla continua interazione tra passato e presente.</text:p>
      <text:p text:style-name="P23">Nel caso specifico dello stoicismo, le esperienze e le conoscenze dei cinici ebbero un ruolo importante nello sviluppo di questa scuola filosofica, per essere stati i primi a sviluppare l'idea che la virtù fosse l'unica cosa <text:span text:style-name="T101">veramente importante </text:span>per l'uomo, <text:span text:style-name="T102">e che</text:span><text:span text:style-name="T101"> si pote</text:span><text:span text:style-name="T102">sse</text:span><text:span text:style-name="T101"> raggiungere </text:span>attraverso la semplicità di vita, l'autosufficienza e il distacco dai beni materiali.</text:p>
      <text:p text:style-name="P23">In particolare, <text:span text:style-name="T97">Zenone </text:span><text:span text:style-name="T103">(non quello dei paradossi)</text:span>, il fondatore dello stoicismo, fu un discepolo del cinico Cratete di Tebe. Zenone fu attratto dall'idea cinica della virtù come condizione naturale dell'uomo, ma ne fu deluso per il complesso di quelle pratiche esteriori fatte di rinunce, penitenze e mortificazioni che miravano al raggiungimento di una purificazione spirituale che aveva come fine il distacco assoluto dal mondo.</text:p>
      <text:p text:style-name="P23">Zenone è noto per la sua caratterizzazione del bene umano come un flusso regolare della vita. Gli stoici erano <text:soft-page-break/>quindi attratti dall'elenchus<text:note text:id="ftn15" text:note-class="footnote"><text:note-citation>1</text:note-citation><text:note-body><text:p text:style-name="P15">L'elenchus socratico <text:span text:style-name="T104">era</text:span> una tecnica dialettica che Socrate utilizzava nei suoi dialoghi per stimolare il pensiero critico e portare alla luce le contraddizioni presenti nelle affermazioni dell'interlocutore.</text:p></text:note-body></text:note> socratico perché poteva <text:span text:style-name="T105">mettere in evidenza</text:span> incongruenze, sia sociali che psicologiche, che sconvolgevano la vita di una persona. In assenza di giustificazione per un'azione o una convinzione specifica, non si <text:span text:style-name="T105">poteva essere </text:span>in armonia con se stessi. D'altro canto, se si sosteneva una posizione che sopravviveva al controinterrogatorio, tale posizione sarebbe stata coerente. L'elenchus socratico non era quindi solo un importante test sociale e psicologico, ma anche epistemologico. Gli stoici credevano che la conoscenza fosse un sistema integrato di atteggiamenti psicologici coerenti. Per loro, una persona che poteva mantenere atteggiamenti resistenti all'elenchus <text:s/>possedeva conoscenza vera. Viceversa, chi aveva atteggiamenti incoerenti era considerato ignorante.</text:p>
      <text:p text:style-name="P27">Questa visione rifletteva l'importanza della coerenza logica e della stabilità interiore per gli stoici. La saggezza, quindi, non era solo un accumulo di informazioni, ma un modo di vivere in armonia con la ragione e la natura.</text:p>
      <text:p text:style-name="P27"><text:span text:style-name="T106">La scuola fondata da Zenone pre</text:span><text:span text:style-name="T104">s</text:span><text:span text:style-name="T106">e il nome di </text:span>"Stoà Poikìle", ovvero "Portico Dipinto", dal portico dell'agorà di Atene dove impartiva le sue lezioni.</text:p>
      <text:p text:style-name="P27"><text:span text:style-name="T97">Cleante</text:span>, discepolo di Zenone, fu un altro importante punto di contatto tra stoicismo e cinismo. Cleante era un <text:soft-page-break/>ex schiavo, che fu attratto dalla filosofia cinica per la sua promessa di libertà e indipendenza. <text:span text:style-name="T107">E’ </text:span>considerato il fondatore della scuola stoica propriamente detta, in quanto contribuì a darle una forma più <text:span text:style-name="T102">consone</text:span> e a diffonderla in tutto il mondo greco.</text:p>
      <text:p text:style-name="P27"><text:span text:style-name="T108">Anche </text:span><text:span text:style-name="T98">Crisippo</text:span><text:span text:style-name="T108">, discepolo di Cleante e suo successore, diede un impulso alla diffusione della filosofia stoica. <text:s/>Fu scrittore prolifico, ma delle sue 700 opere non rimase nulla ad eccezione di piccoli frammenti ritrovati nella villa dei papiri di Ercolano, e di alcuni scritti di autori successivi, come Cicerone, Seneca e Plutarco.</text:span></text:p>
      <text:p text:style-name="P30">Crisippo fu un personaggio controverso, sia in vita che dopo la sua morte. I suoi critici lo accusavano di essere pedante e di aver diluito le dottrine stoiche con elementi di altre scuole filosofiche. Tuttavia, i suoi sostenitori lo consideravano un genio filosofico e lo elogiavano per la sua profondità di pensiero e la sua capacità di comunicare le sue idee in modo chiaro e conciso.</text:p>
      <text:p text:style-name="P21">La scuola stoica si sviluppò in tre periodi principali:</text:p>
      <text:p text:style-name="P21"><text:span text:style-name="T97">L'antica stoa</text:span>, che va dal 300 a.C. al 200 a.C., è rappresentata da Zenone, Cleante e Crisippo di Soli, considerato il più grande filosofo stoico.</text:p>
      <text:p text:style-name="P22"><text:span text:style-name="T97">La media stoa</text:span>, che va dal 200 a.C. al 100 a.C., è rappresentata da Panezio di Rodi e Posidonio di Rodi, che tentarono di conciliare lo stoicismo con altre correnti filosofiche, come lo scetticismo e il platonismo.</text:p>
      <text:p text:style-name="P23"><text:soft-page-break/><text:span text:style-name="T80">Panezio</text:span>, fu influenzato dalle idee del platonismo e dell'aristotelismo. Da Platone, egli riprese l'idea dell'anima come un principio incorruttibile e immortale, e dell'esistenza di un mondo intelligibile, distinto dal mondo sensibile. Da Aristotele, invece, egli riprese l'idea della virtù come un mezzo, e non come un fine, e la concezione della politica come un'attività finalizzata al bene comune.</text:p>
      <text:p text:style-name="P17"><text:span text:style-name="T75">Posidonio</text:span>, invece, fu più influenzato dallo scetticismo. Egli condivise con gli scettici la critica al dogmatismo, e l'idea che la verità non <text:span text:style-name="T109">fosse</text:span> accessibile alla ragione umana. Tuttavia, egli si distaccò dagli scettici <text:span text:style-name="T110">poichè</text:span> riteneva che la virtù fosse comunque possibile, anche in assenza di una conoscenza certa. <text:span text:style-name="T111">In generale, Panezio e Posidonio cercarono di rendere lo stoicismo una filosofia più accessibile e comprensibile, anche per coloro che erano stati educati in altre tradizioni filosofiche. Le loro opere ebbero un'influenza significativa sulla diffusione dello stoicismo nel mondo romano. </text:span></text:p>
      <text:p text:style-name="P17"><text:bookmark-start text:name="__RefHeading___Toc24036_1047567575"/>La nuova stoa - <text:span text:style-name="T90">V</text:span><text:span text:style-name="T89">a dal 100 a.C. al 300 d.C., è rappresentata da Seneca, Epitteto e Marco Aurelio, che adattarono lo stoicismo ai valori dell'impero romano.</text:span><text:bookmark-end text:name="__RefHeading___Toc24036_1047567575"/></text:p>
      <text:p text:style-name="P23"><text:span text:style-name="T112">Il nuovo </text:span><text:span text:style-name="T113">stoicismo era popolare tra tutti, dagli schiavi all’aristocrazia perché a differenza di gran parte della filosofia, era utile, utile per la sua praticità e applicabilità nella vita quotidiana. La filosofia stoica, con il suo focus </text:span><text:soft-page-break/><text:span text:style-name="T113">sulla resilienza, il controllo delle emozioni e l’accettazione degli eventi al di fuori del nostro controllo, offriva strumenti concreti per affrontare le difficoltà della vita.</text:span></text:p>
      <text:p text:style-name="P27">Lo stoicismo <text:span text:style-name="T114">fu </text:span>caratterizzato dalla crisi delle monarchie ellenistiche e dall'ascesa di Roma, <text:span text:style-name="T114">e in </text:span>questo contesto, lo stoicismo offriva una visione del mondo rassicurante e ottimistica, fondata sulla convinzione che l'universo è governato da una legge universale di giustizia e ordine. Questa teoria portò alla <text:span text:style-name="T114">certezza</text:span> che esistesse un diritto di natura, il quale, essendo basato sul <text:span text:style-name="T5">logos</text:span> eterno, non <text:span text:style-name="T115">sarebbe mutato</text:span> nel tempo e nello spazio. Il diritto di natura vale<text:span text:style-name="T115">va</text:span> per tutti gli esseri umani, <text:span text:style-name="T115">g</text:span>li insegnamenti erano accessibili a tutti, indipendentemente dal loro status sociale.</text:p>
      <text:p text:style-name="P27">Sia gli schiavi che gli aristocratici potevano trarre beneficio dai principi stoici, forniva consigli pratici per gestire situazioni di stress, panico, disperazione e rabbia. <text:span text:style-name="T115">I</text:span>nsegnavano l’importanza di mantenere la calma e la compostezza di fronte alle avversità, aiutando le persone a sviluppare una maggiore resilienza emotiva; <text:span text:style-name="T115">l</text:span>a filosofia stoica enfatizzava il controllo delle proprie reazioni e atteggiamenti, piuttosto che cercare di controllare eventi esterni al di fuori del proprio potere, promuovevano l’accettazione serena degli eventi inevitabili, riducendo così l’ansia e la frustrazione.</text:p>
      <text:p text:style-name="P27"><text:soft-page-break/><text:span text:style-name="T75">Da veri filosofi del proprio tempo, gli stoici erano cosmopoliti, quindi aperti a nuovi orizzonti e ai fermenti culturali diversi dai loro, </text:span><text:span text:style-name="T77">e pertanto, </text:span><text:span text:style-name="T75">la comunità degli uomini d</text:span><text:span text:style-name="T78">oveva</text:span><text:span text:style-name="T75"> partecipare a tutte le attività sia politiche che socio culturali. </text:span><text:span text:style-name="T77">Tra gli </text:span><text:span text:style-name="T75">stoici </text:span><text:span text:style-name="T77">emergono umanisti come </text:span><text:span text:style-name="T79">Lucio Annea </text:span><text:span text:style-name="T75">Seneca ( 4 a.C.-65 d.C) che considerò l’uomo qualcosa di sacro, affermazione che diverrà il motto di tutto l’umanesimo;</text:span><text:span text:style-name="T77"> </text:span><text:span text:style-name="T75">Epitteto </text:span><text:span text:style-name="T79">u</text:span><text:span text:style-name="T75">no dei maggiori esponenti del neostoicismo romano </text:span><text:span text:style-name="T77">o </text:span><text:span text:style-name="T75">attivi statisti come l’imperatore romano Marco Aurelio (121-180d.C.). Gli stoici sottolinearono che tutti i processi naturali, comprese la malattia e la morte, seguono le leggi immutabili della natura, e quindi l’uomo deve assecondare il proprio destino. Niente avviene per caso, perché tutto avviene secondo necessità: se il destino bussa alla porta, non serve a nulla lamentarsi; analogamente anche le circostanze liete vanno vissute con la massima tranquillità.</text:span></text:p>
      <text:p text:style-name="P16"><text:span text:style-name="T114">Si onora</text:span><text:span text:style-name="T113"> ancora questa filosofia ogni volta che pensiamo a qualcuno come coraggioso, </text:span><text:span text:style-name="T114">oppure alla</text:span><text:span text:style-name="T81"> persona che non si lascia coinvolgere dalle passioni o dai turbamenti. </text:span><text:span text:style-name="T82">O</text:span><text:span text:style-name="T81">ggi gli </text:span><text:span text:style-name="T83">potremmo </text:span><text:span text:style-name="T81">attribui</text:span><text:span text:style-name="T83">re </text:span><text:span text:style-name="T81">la frase che possiede una “</text:span><text:span text:style-name="T11">calma stoica</text:span><text:span text:style-name="T81">”.</text:span></text:p>
      <text:p text:style-name="P31"><text:span text:style-name="T116">Ci sono due </text:span><text:span text:style-name="T117">argomenti di interesse</text:span><text:span text:style-name="T116"> in cui lo stoicismo ci può </text:span><text:span text:style-name="T117">essere d’aiuto</text:span><text:span text:style-name="T116">: il primo è </text:span><text:span text:style-name="T7">l’ansia</text:span><text:span text:style-name="T116">. </text:span><text:span text:style-name="T117">Q</text:span><text:span text:style-name="T116">uando </text:span><text:span text:style-name="T117">ti</text:span><text:span text:style-name="T116"> sent</text:span><text:span text:style-name="T117">i</text:span><text:span text:style-name="T116"> in ansia per qualcosa, la maggior parte delle persone </text:span><text:span text:style-name="T117">che ti </text:span><text:soft-page-break/><text:span text:style-name="T117">sono vicine, c</text:span><text:span text:style-name="T116">redono sia loro dovere tirarti su il morale </text:span><text:span text:style-name="T117">dicendoti</text:span><text:span text:style-name="T116"> cose come: andrà </text:span><text:span text:style-name="T118">tutto </text:span><text:span text:style-name="T116">bene, non preoccuparti </text:span><text:span text:style-name="T117">e cose del genere</text:span><text:span text:style-name="T116">.</text:span></text:p>
      <text:p text:style-name="P41"><text:span text:style-name="T50">Gli stoici </text:span><text:span text:style-name="T60">ne </text:span><text:span text:style-name="T50">sarebbero </text:span><text:span text:style-name="T60">rimasti </text:span><text:span text:style-name="T50">sconvolti. Odiavano qualsiasi tipo di consolazione che si propone</text:span><text:span text:style-name="T61">sse</text:span><text:span text:style-name="T50"> di dare “</text:span><text:span text:style-name="T65">speranza</text:span><text:span text:style-name="T62">”</text:span><text:span text:style-name="T50">. La speranza è l’oppio delle emozioni e deve essere eliminata definitivamente per dare a una persona qualche possibilità di pace interiore, </text:span><text:span text:style-name="T62">poic</text:span><text:span text:style-name="T50">hé la speranza ci solleva solo </text:span><text:span text:style-name="T62">un po' </text:span><text:span text:style-name="T50">più in alto in rapporto ad una eventuale caduta.</text:span></text:p>
      <text:p text:style-name="P42"><text:span text:style-name="T50">Gli stoici consiglia</text:span><text:span text:style-name="T62">vano</text:span><text:span text:style-name="T50"> di prendere una strada diversa. Per essere calmi si deve dire a se stessi qualcosa di molto oscuro: “sarà terribile”, “</text:span><text:span text:style-name="T62">p</text:span><text:span text:style-name="T50">otrei andare in prigione”, “</text:span><text:span text:style-name="T62">i</text:span><text:span text:style-name="T50">l nodulo potrebbe davvero essere maligno”, “</text:span><text:span text:style-name="T62">p</text:span><text:span text:style-name="T50">robabilmente sar</text:span><text:span text:style-name="T62">ò</text:span><text:span text:style-name="T50"> licenziato e umiliato”. </text:span><text:span text:style-name="T60">Ma</text:span><text:span text:style-name="T50">, un enorme </text:span><text:span text:style-name="T61">e </text:span><text:span text:style-name="T50">consolante stoico </text:span><text:span text:style-name="T63">ma</text:span><text:span text:style-name="T50">, si deve </text:span><text:span text:style-name="T62">sempre</text:span><text:span text:style-name="T50"> tenere a mente </text:span><text:span text:style-name="T62">se si</text:span><text:span text:style-name="T50"> vuole </text:span><text:span text:style-name="T60">stare bene con se stessi</text:span><text:span text:style-name="T50">, perché alla fine, come disse Marco Aurelio: “</text:span><text:span text:style-name="T64">ciascuno di noi è più forte di quanto pensiamo, </text:span><text:span text:style-name="T65">i</text:span><text:span text:style-name="T64">l carcere non sarà divertente, né perdere il lavoro o essere </text:span><text:span text:style-name="T65">oggetto di scherno, </text:span><text:span text:style-name="T66">ma</text:span><text:span text:style-name="T64"> ci passeremo sopra</text:span><text:span text:style-name="T50">”.</text:span></text:p>
      <text:p text:style-name="P43"><text:span text:style-name="T50">Lo stoicismo ci incoraggia contro il peggior destino che può capitarci, </text:span><text:span text:style-name="T62">e </text:span><text:span text:style-name="T50"><text:s/>se davvero non </text:span><text:span text:style-name="T60">si </text:span><text:span text:style-name="T50">riesc</text:span><text:span text:style-name="T60">e</text:span><text:span text:style-name="T50"> al accettarlo, il suicidio è sempre un’opzione. Gli stoici lo menzionano ripetutamente.</text:span></text:p>
      <text:p text:style-name="P35"><text:soft-page-break/>Ecco Seneca: <text:span text:style-name="T5">“Non riesci più a vedere una strada verso la libertà? E’ proprio di fronte a te. E’ sufficiente girare i polsi.”</text:span></text:p>
      <text:p text:style-name="P38"><text:span text:style-name="T119">Per costruire l’impressione della resilienza di qualcuno, gli </text:span><text:span text:style-name="T117">s</text:span><text:span text:style-name="T119">toici ci insegnano preziose lezioni sulla resi</text:span><text:span text:style-name="T120">stenza</text:span><text:span text:style-name="T119"> e la forza interiore. Considerare lo scenario peggiore è un modo per prepararsi mentalmente e affrontare le sfide con coraggio. Immagina di essere un marinaio in mare aperto: anticipare le tempeste ti permette di prepararti con ancor più determinazione. </text:span></text:p>
      <text:p text:style-name="P32">Quando consideriamo il peggio, possiamo:</text:p>
      <text:p text:style-name="P39"><text:span text:style-name="T8">M</text:span><text:span text:style-name="T9">antenere la calma</text:span><text:span text:style-name="T119">: </text:span><text:span text:style-name="T112">a</text:span><text:span text:style-name="T119">ffrontare le difficoltà con compostezza e razionalità;</text:span></text:p>
      <text:p text:style-name="P33"><text:span text:style-name="T5">Pianificare</text:span>: <text:span text:style-name="T121">p</text:span>reparare strategie per affrontare gli ostacoli;</text:p>
      <text:p text:style-name="P33"><text:span text:style-name="T5">Apprezzare il presente</text:span>: <text:span text:style-name="T121">r</text:span>endere più prezioso il momento attuale. La resilienza nasce proprio da questa capacità di affrontare le avversità con una mente forte e una visione realistica. Quindi, quando ti trovi di fronte a una sfida, ricorda di considerare il peggio, ma di sperare sempre nel meglio. Ad esempio, due volte l’anno, ci si dovrebbe togliere i propri abiti eleganti, indossare degli stracci sporchi, dormire su un tappeto sul pavimento della cucina e mangiare solo pane raffermo e a bere acqua piovana dalla ciotola <text:span text:style-name="T122">d</text:span>i un animale e quindi, fare un’incredibile scoperta: “<text:span text:style-name="T5">Quasi nulla di materiale è necessario per una vita felice, per chi ha capito l’esistenza</text:span>”.</text:p>
      <text:p text:style-name="P32"><text:span text:style-name="T10">(</text:span><text:span text:style-name="T5">Marco Aurelio</text:span><text:span text:style-name="T10">)</text:span></text:p>
      <text:p text:style-name="P37"><text:soft-page-break/><text:span text:style-name="T117">L’</text:span> altro argomento di interesse per gli <text:span text:style-name="T117">s</text:span>toici era: la <text:span text:style-name="T5">rabbia</text:span>. I Romani avevano un temperamento molto caldo, gli stoici volevano calmarli, ma lo fecero in un modo insolito: tramite l’argomentazione intellettuale.</text:p>
      <text:p text:style-name="P36"><text:span text:style-name="T117">Spiegarono</text:span> che arrabbiarsi non è qualcosa che si fa per natura, perché un<text:span text:style-name="T117">o</text:span> <text:span text:style-name="T117">ha un </text:span>temperamento latino <text:span text:style-name="T117">oppure perché ha </text:span>un’alta temperatura sanguigna. <text:span text:style-name="T117">Arrabbiarsi </text:span>è il risultato dell’essere stupidi, dell’avere le idee sbagliate sulla vita.</text:p>
      <text:p text:style-name="P36">La rabbia nasce quando la speranza, mal riposta, si schianta contro la realtà imprevista. Noi non gridiamo quando ci accade qualcosa di negativo, ma solo quando ciò che accade è negativo e inaspettato. Per esempio, non ti arrabbieresti solo perché ha iniziato a piovere. <text:span text:style-name="T125">La</text:span> pioggia può essere <text:span text:style-name="T117">fastidiosa</text:span>, <text:span text:style-name="T125">ma hai </text:span>imparato <text:span text:style-name="T125">che quando ci sono le nuvole, devi </text:span><text:span text:style-name="T122">a</text:span>spettarti la pioggia. Lo stesso dovrebbe valere per tutto. Non solo aspettarsi la pioggia, ma aspettarsi il tradimento, l’infamia, il sadismo, il furto, l’umiliazione, la lussuria, i dispetti.</text:p>
      <text:p text:style-name="P36">Uno smetterà di essere così arrabbiato quando imparerà l’effettiva miseria della vita. Il saggio dovrebbe mirare a raggiungere uno stato in cui semplicemente niente potrebbe improvvisamente turbare la sua tranquillità. Ogni tragedia sarebbe già considerata. <text:span text:style-name="T112">Non possiamo non citare</text:span> la più bella massima che Seneca enunciò proprio mentre le guardie di Nerone <text:span text:style-name="T112">l</text:span>o stavano <text:soft-page-break/>spingendo in un bagno, dove fu <text:span text:style-name="T112">obbligato</text:span> a prendere un coltello affilato per uccidersi. </text:p>
      <text:p text:style-name="P36"><text:span text:style-name="T84">La moglie Paolina e i suoi due bambini erano nel panico, piange</text:span><text:span text:style-name="T85">vano</text:span><text:span text:style-name="T84">, aggrappa</text:span><text:span text:style-name="T85">ti</text:span><text:span text:style-name="T84"> al suo mantello, ma si voltò verso di loro, gli fece un sorriso stanco e disse semplicemente: “</text:span><text:span text:style-name="T12">che senso ha piangere sui singoli aspetti della vita? La vita intera è un pianto</text:span><text:span text:style-name="T84">.” </text:span></text:p>
      <text:p text:style-name="P36"><text:span text:style-name="T85">Come abbiamo accennato, </text:span><text:span text:style-name="T84">due </text:span><text:span text:style-name="T85">furono i </text:span><text:span text:style-name="T84">grandi filosofi </text:span><text:span text:style-name="T83">che res</text:span><text:span text:style-name="T86">ero</text:span><text:span text:style-name="T83"> intramontabile lo</text:span><text:span text:style-name="T84"> stoicismo. Il primo </text:span><text:span text:style-name="T83">fu</text:span><text:span text:style-name="T84"> lo scrittore romano e precettore di Nerone, </text:span><text:span text:style-name="T87">Seneca </text:span><text:span text:style-name="T88">(</text:span><text:span text:style-name="T86">4 a.C.</text:span><text:span text:style-name="T85"> - 65 d.C.)</text:span><text:span text:style-name="T84"> </text:span><text:span text:style-name="T83">il quale </text:span><text:span text:style-name="T85">i</text:span><text:span text:style-name="T83">niziò a frequentare i palazzi del potere come</text:span><text:span text:style-name="T84"> “tutore di Nerone”. L’infame dittatore che dormiva con la propria madre, violentava giovani ragazzi e, proprio perché ne av</text:span><text:span text:style-name="T81">e</text:span><text:span text:style-name="T84">va voglia, chiese al suo vecchio precettore, Seneca, di suicidarsi di fronte alla sua famiglia. </text:span></text:p>
      <text:p text:style-name="P40"><text:span text:style-name="T67">L’altra </text:span><text:span text:style-name="T68">nostra guida allo stoicismo, </text:span><text:span text:style-name="T67">fu</text:span><text:span text:style-name="T68"> </text:span><text:span text:style-name="T73">Epitteto</text:span><text:span text:style-name="T69"> </text:span><text:span text:style-name="T68">(55-c. 135 d.C.) </text:span><text:span text:style-name="T70">insieme al </text:span><text:span text:style-name="T68">buono e magnanim</text:span><text:span text:style-name="T67">o </text:span><text:span text:style-name="T71">i</text:span><text:span text:style-name="T68">mperatore romano </text:span><text:span text:style-name="T74">Marco Aurelio</text:span><text:span text:style-name="T68"> (121-180 d.C.), che fu costretto a passare gran parte del suo regno ai confini dell’impero, combattendo orde germaniche invincibili, ma t</text:span><text:span text:style-name="T72">r</text:span><text:span text:style-name="T68">ovò il tempo di scrivere una delle più grandi opere filosofiche, le <text:s/>“Meditazioni” nella sua tenda, durante l</text:span><text:span text:style-name="T70">e</text:span><text:span text:style-name="T68"> nott</text:span><text:span text:style-name="T70">i</text:span><text:span text:style-name="T6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1"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1"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1" fo:font-family="'Noto Serif'" style:font-style-name="Normale" style:font-family-generic="roman" style:font-pitch="variable" fo:font-size="12pt" fo:font-weight="normal"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7T18:06:40.601456196</dc:date>
    <dc:creator>corrado tafaro</dc:creator>
    <meta:editing-duration>PT11M14S</meta:editing-duration>
    <meta:editing-cycles>2</meta:editing-cycles>
    <meta:generator>LibreOffice/24.2.7.2$Linux_X86_64 LibreOffice_project/420$Build-2</meta:generator>
    <meta:document-statistic meta:table-count="0" meta:image-count="0" meta:object-count="0" meta:page-count="10" meta:paragraph-count="40" meta:word-count="2061" meta:character-count="13419" meta:non-whitespace-character-count="11389"/>
  </office:meta>
</office:document-meta>
</file>