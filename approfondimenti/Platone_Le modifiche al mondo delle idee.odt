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20ab44" officeooo:paragraph-rsid="0020ab44"/>
    </style:style>
    <style:style style:name="P2" style:family="paragraph" style:parent-style-name="Standard">
      <style:paragraph-properties fo:line-height="115%" fo:text-align="justify" style:justify-single-word="false"/>
      <style:text-properties style:font-name="Noto Sans1" fo:font-size="12pt" officeooo:paragraph-rsid="0012ce64" style:font-size-asian="12pt" style:font-size-complex="12pt"/>
    </style:style>
    <style:style style:name="P3" style:family="paragraph" style:parent-style-name="Text_20_body">
      <style:paragraph-properties fo:margin-top="0.199cm" fo:margin-bottom="0cm" style:contextual-spacing="false" fo:line-height="115%" fo:text-align="center" style:justify-single-word="false"/>
      <style:text-properties style:font-name="Noto Sans1" fo:font-size="12pt" officeooo:paragraph-rsid="0012ce64" style:font-size-asian="12pt" style:font-size-complex="12pt"/>
    </style:style>
    <style:style style:name="P4" style:family="paragraph" style:parent-style-name="Text_20_body">
      <style:paragraph-properties fo:margin-top="0.101cm" fo:margin-bottom="0cm" style:contextual-spacing="false" fo:line-height="115%" fo:text-align="center" style:justify-single-word="false"/>
      <style:text-properties style:font-name="Noto Sans1" fo:font-size="12pt" officeooo:paragraph-rsid="0012ce64" style:font-size-asian="12pt" style:font-size-complex="12pt"/>
    </style:style>
    <style:style style:name="P5" style:family="paragraph" style:parent-style-name="Text_20_body">
      <style:paragraph-properties fo:margin-top="0.199cm" fo:margin-bottom="0cm" style:contextual-spacing="false" fo:line-height="115%" fo:text-align="justify" style:justify-single-word="false"/>
      <style:text-properties style:font-name="Noto Sans1" fo:font-size="12pt" officeooo:paragraph-rsid="0012ce64" style:font-size-asian="12pt" style:font-size-complex="12pt"/>
    </style:style>
    <style:style style:name="P6" style:family="paragraph" style:parent-style-name="Text_20_body">
      <style:paragraph-properties fo:margin-top="0cm" fo:margin-bottom="0cm" style:contextual-spacing="false" fo:line-height="115%" fo:text-align="justify" style:justify-single-word="false"/>
      <style:text-properties style:font-name="Noto Sans1" fo:font-size="12pt" officeooo:paragraph-rsid="0012ce64" style:font-size-asian="12pt" style:font-size-complex="12pt"/>
    </style:style>
    <style:style style:name="P7" style:family="paragraph" style:parent-style-name="Text_20_body">
      <style:paragraph-properties fo:margin-top="0.101cm" fo:margin-bottom="0cm" style:contextual-spacing="false" fo:line-height="115%" fo:text-align="justify" style:justify-single-word="false"/>
      <style:text-properties style:font-name="Noto Sans1" fo:font-size="12pt" officeooo:paragraph-rsid="0012ce64" style:font-size-asian="12pt" style:font-size-complex="12pt"/>
    </style:style>
    <style:style style:name="P8" style:family="paragraph" style:parent-style-name="Text_20_body" style:list-style-name="L1">
      <style:paragraph-properties fo:margin-top="0.199cm" fo:margin-bottom="0.25cm" style:contextual-spacing="false" fo:line-height="115%" fo:text-align="justify" style:justify-single-word="false"/>
      <style:text-properties style:font-name="Noto Sans1" fo:font-size="12pt" officeooo:paragraph-rsid="0012ce64" style:font-size-asian="12pt" style:font-size-complex="12pt"/>
    </style:style>
    <style:style style:name="P9" style:family="paragraph" style:parent-style-name="Text_20_body" style:list-style-name="L1">
      <style:paragraph-properties fo:line-height="115%" fo:text-align="justify" style:justify-single-word="false"/>
      <style:text-properties style:font-name="Noto Sans1" fo:font-size="12pt" officeooo:paragraph-rsid="0012ce64" style:font-size-asian="12pt" style:font-size-complex="12pt"/>
    </style:style>
    <style:style style:name="P10" style:family="paragraph" style:parent-style-name="Text_20_body">
      <style:paragraph-properties fo:margin-top="0.199cm" fo:margin-bottom="0cm" style:contextual-spacing="false" fo:line-height="115%" fo:text-align="justify" style:justify-single-word="false"/>
      <style:text-properties style:font-name="Noto Sans1" fo:font-size="12pt" officeooo:paragraph-rsid="001378ec" style:font-size-asian="12pt" style:font-size-complex="12pt"/>
    </style:style>
    <style:style style:name="P11" style:family="paragraph" style:parent-style-name="Text_20_body">
      <style:paragraph-properties fo:margin-top="0.199cm" fo:margin-bottom="0cm" style:contextual-spacing="false" fo:line-height="115%" fo:text-align="justify" style:justify-single-word="false"/>
      <style:text-properties style:font-name="Noto Sans1" fo:font-size="12pt" fo:font-weight="bold" officeooo:paragraph-rsid="0012ce64" style:font-size-asian="12pt" style:font-weight-asian="bold" style:font-size-complex="12pt" style:font-weight-complex="bold"/>
    </style:style>
    <style:style style:name="P12" style:family="paragraph" style:parent-style-name="Text_20_body">
      <style:paragraph-properties fo:margin-top="0.101cm" fo:margin-bottom="0cm" style:contextual-spacing="false" fo:line-height="115%" fo:text-align="justify" style:justify-single-word="false" fo:break-before="page"/>
      <style:text-properties style:font-name="Noto Sans1" fo:font-size="12pt" fo:font-weight="bold" officeooo:rsid="00d8390b" officeooo:paragraph-rsid="0012ce64" style:font-size-asian="12pt" style:font-weight-asian="bold" style:font-size-complex="12pt" style:font-weight-complex="bold"/>
    </style:style>
    <style:style style:name="P13" style:family="paragraph" style:parent-style-name="Text_20_body" style:list-style-name="L1">
      <style:paragraph-properties fo:line-height="115%" fo:text-align="justify" style:justify-single-word="false"/>
      <style:text-properties style:font-name="Noto Sans1" fo:font-size="12pt" fo:font-style="normal" fo:font-weight="normal" officeooo:paragraph-rsid="0012ce64"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cm" fo:margin-bottom="0cm" style:contextual-spacing="false" fo:line-height="115%" fo:text-align="justify" style:justify-single-word="false"/>
      <style:text-properties style:font-name="Noto Sans1" fo:font-size="12pt" fo:font-style="normal" officeooo:rsid="00dbde21" officeooo:paragraph-rsid="0012ce64" style:font-size-asian="12pt" style:font-style-asian="normal" style:font-size-complex="12pt" style:font-style-complex="normal"/>
    </style:style>
    <style:style style:name="P15" style:family="paragraph" style:parent-style-name="Text_20_body">
      <style:paragraph-properties fo:margin-top="0.101cm" fo:margin-bottom="0cm" style:contextual-spacing="false" fo:line-height="115%" fo:text-align="justify" style:justify-single-word="false"/>
      <style:text-properties style:font-name="Noto Sans1" fo:font-size="12pt" fo:font-style="normal" officeooo:rsid="00dbde21" officeooo:paragraph-rsid="0012ce64" style:font-size-asian="12pt" style:font-style-asian="normal" style:font-size-complex="12pt" style:font-style-complex="normal"/>
    </style:style>
    <style:style style:name="P16" style:family="paragraph" style:parent-style-name="Text_20_body">
      <style:paragraph-properties fo:margin-top="0.101cm" fo:margin-bottom="0cm" style:contextual-spacing="false" fo:line-height="115%" fo:text-align="justify" style:justify-single-word="false"/>
      <style:text-properties style:font-name="Noto Sans1" fo:font-size="12pt" fo:font-style="normal" officeooo:paragraph-rsid="0012ce64" style:font-size-asian="12pt" style:font-style-asian="normal" style:font-size-complex="12pt" style:font-style-complex="normal"/>
    </style:style>
    <style:style style:name="P17" style:family="paragraph" style:parent-style-name="Text_20_body">
      <style:paragraph-properties fo:margin-top="0cm" fo:margin-bottom="0cm" style:contextual-spacing="false" fo:line-height="115%" fo:text-align="justify" style:justify-single-word="false"/>
      <style:text-properties style:font-name="Noto Sans1" fo:font-size="12pt" fo:font-weight="normal" officeooo:paragraph-rsid="0012ce64" style:font-size-asian="12pt" style:font-weight-asian="normal" style:font-size-complex="12pt" style:font-weight-complex="normal"/>
    </style:style>
    <style:style style:name="P18" style:family="paragraph" style:parent-style-name="Text_20_body">
      <style:paragraph-properties fo:margin-top="0.101cm" fo:margin-bottom="0cm" style:contextual-spacing="false" fo:line-height="115%" fo:text-align="justify" style:justify-single-word="false"/>
      <style:text-properties style:font-name="Noto Sans1" fo:font-size="12pt" fo:font-weight="normal" officeooo:paragraph-rsid="0012ce64" style:font-size-asian="12pt" style:font-weight-asian="normal" style:font-size-complex="12pt" style:font-weight-complex="normal"/>
    </style:style>
    <style:style style:name="P19" style:family="paragraph" style:parent-style-name="Text_20_body">
      <style:paragraph-properties fo:line-height="115%" fo:text-align="justify" style:justify-single-word="false"/>
      <style:text-properties style:font-name="Noto Sans1" officeooo:paragraph-rsid="0012ce64"/>
    </style:style>
    <style:style style:name="P20" style:family="paragraph" style:parent-style-name="Text_20_body">
      <style:paragraph-properties fo:margin-top="0.199cm" fo:margin-bottom="0cm" style:contextual-spacing="false"/>
      <style:text-properties officeooo:paragraph-rsid="0012ce64"/>
    </style:style>
    <style:style style:name="T1" style:family="text">
      <style:text-properties fo:font-size="12pt" fo:font-weight="normal" officeooo:rsid="0069f188" style:font-size-asian="12pt" style:font-weight-asian="normal" style:font-size-complex="12pt" style:font-weight-complex="normal"/>
    </style:style>
    <style:style style:name="T2" style:family="text">
      <style:text-properties fo:font-size="12pt" fo:font-weight="normal" officeooo:rsid="00105638" style:font-size-asian="12pt" style:font-weight-asian="normal" style:font-size-complex="12pt" style:font-weight-complex="normal"/>
    </style:style>
    <style:style style:name="T3" style:family="text">
      <style:text-properties style:font-name="Noto Sans1" fo:font-size="12pt" style:font-size-asian="12pt" style:font-size-complex="12pt"/>
    </style:style>
    <style:style style:name="T4" style:family="text">
      <style:text-properties style:font-name="Noto Sans1" fo:font-size="12pt" officeooo:rsid="001378ec" style:font-size-asian="12pt" style:font-size-complex="12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e4ab3" style:font-style-asian="normal" style:font-style-complex="normal"/>
    </style:style>
    <style:style style:name="T10" style:family="text">
      <style:text-properties fo:font-style="normal" officeooo:rsid="0069f188" style:font-style-asian="normal" style:font-style-complex="normal"/>
    </style:style>
    <style:style style:name="T11" style:family="text">
      <style:text-properties fo:font-style="normal" officeooo:rsid="00dd9444"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d8390b" style:font-style-asian="normal" style:font-weight-asian="normal" style:font-style-complex="normal" style:font-weight-complex="normal"/>
    </style:style>
    <style:style style:name="T14" style:family="text">
      <style:text-properties fo:font-style="normal" fo:font-weight="normal" officeooo:rsid="006646c2" style:font-style-asian="normal" style:font-weight-asian="normal" style:font-style-complex="normal" style:font-weight-complex="normal"/>
    </style:style>
    <style:style style:name="T15" style:family="text">
      <style:text-properties fo:font-style="normal" fo:font-weight="normal" officeooo:rsid="00dbde21"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officeooo:rsid="0062a038"/>
    </style:style>
    <style:style style:name="T19" style:family="text">
      <style:text-properties style:text-underline-style="none"/>
    </style:style>
    <style:style style:name="T20" style:family="text">
      <style:text-properties fo:font-weight="bold" style:font-weight-asian="bold" style:font-weight-complex="bold"/>
    </style:style>
    <style:style style:name="T21" style:family="text">
      <style:text-properties fo:font-weight="bold" officeooo:rsid="0069f188" style:font-weight-asian="bold" style:font-weight-complex="bold"/>
    </style:style>
    <style:style style:name="T22" style:family="text">
      <style:text-properties fo:font-weight="bold" officeooo:rsid="001378ec"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7a711a" style:font-weight-asian="normal" style:font-weight-complex="normal"/>
    </style:style>
    <style:style style:name="T25" style:family="text">
      <style:text-properties fo:font-weight="normal" officeooo:rsid="0069f188" style:font-weight-asian="normal" style:font-weight-complex="normal"/>
    </style:style>
    <style:style style:name="T26" style:family="text">
      <style:text-properties fo:font-weight="normal" officeooo:rsid="00651b66" style:font-weight-asian="normal" style:font-weight-complex="normal"/>
    </style:style>
    <style:style style:name="T27" style:family="text">
      <style:text-properties fo:font-weight="normal" officeooo:rsid="00dd9444" style:font-weight-asian="normal" style:font-weight-complex="normal"/>
    </style:style>
    <style:style style:name="T28" style:family="text">
      <style:text-properties fo:font-weight="normal" officeooo:rsid="006481f6" style:font-weight-asian="normal" style:font-weight-complex="normal"/>
    </style:style>
    <style:style style:name="T29" style:family="text">
      <style:text-properties officeooo:rsid="0069f188"/>
    </style:style>
    <style:style style:name="T30" style:family="text">
      <style:text-properties style:font-name="Bahnschrift SemiBold1"/>
    </style:style>
    <style:style style:name="T31" style:family="text">
      <style:text-properties style:font-name="Bahnschrift SemiBold1" fo:font-weight="normal" style:font-weight-asian="normal" style:font-weight-complex="normal"/>
    </style:style>
    <style:style style:name="T32" style:family="text">
      <style:text-properties style:font-name="Bahnschrift SemiBold1" fo:font-style="normal" fo:font-weight="normal" style:font-style-asian="normal" style:font-weight-asian="normal" style:font-style-complex="normal" style:font-weight-complex="normal"/>
    </style:style>
    <style:style style:name="T33" style:family="text">
      <style:text-properties style:font-name="Bahnschrift SemiBold1" fo:font-style="italic" fo:font-weight="normal" style:font-style-asian="italic" style:font-weight-asian="normal" style:font-style-complex="italic" style:font-weight-complex="normal"/>
    </style:style>
    <style:style style:name="T34" style:family="text">
      <style:text-properties officeooo:rsid="00d8390b"/>
    </style:style>
    <style:style style:name="T35" style:family="text">
      <style:text-properties officeooo:rsid="006646c2"/>
    </style:style>
    <style:style style:name="T36" style:family="text">
      <style:text-properties officeooo:rsid="0020ab44"/>
    </style:style>
    <style:style style:name="T37" style:family="text">
      <style:text-properties officeooo:rsid="00dd9444"/>
    </style:style>
    <style:style style:name="T38" style:family="text">
      <style:text-properties officeooo:rsid="001e4ab3"/>
    </style:style>
    <style:style style:name="T39" style:family="text">
      <style:text-properties officeooo:rsid="001378e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latone - Le modifiche al mondo delle Idee</text:p>
      <text:p text:style-name="P5">Una volta pensato il mondo delle idee, per cui Platone gode di una fama intramontabile, sembra avere qualche problema che un pensiero filosofico, coerente e intento alla ricerca della verità non può ignorare. Abituato a mettere costantemente in discussione le risposte ottenute, come il maestro Socrate gli aveva insegnato, nell’ultima fase della sua vita Platone sistema il mondo delle idee, per chiarire <text:span text:style-name="T23">qual </text:span><text:span text:style-name="T24">è</text:span><text:span text:style-name="T23"> il </text:span><text:span text:style-name="T20">rapporto</text:span><text:span text:style-name="T23"> tra il </text:span><text:span text:style-name="T20">mondo delle idee</text:span><text:span text:style-name="T23"> e il</text:span><text:span text:style-name="T31"> </text:span><text:span text:style-name="T20">mondo sensibile</text:span><text:span text:style-name="T23"> e anche, </text:span><text:span text:style-name="T28">qual </text:span><text:span text:style-name="T24">è</text:span><text:span text:style-name="T20"> la natura delle idee</text:span><text:span text:style-name="T31">.</text:span> <text:span text:style-name="T23">I dialoghi della maturità</text:span> e quindi del terzo periodo del suo pensiero sono principalmente 8, in essi Platone sistema il mondo delle idee cercando di risolvere i quesiti che la sua stessa dottrina aveva messo in essere. Questi <text:span text:style-name="T20">8 dialoghi</text:span> sono quindi fondamentali per completare la conoscenza della dottrina delle idee, la cui teorizzazione cambierà il corso della storia della filosofia per sempre. I dialoghi in cui Platone <text:span text:style-name="T34">rivede e </text:span>sistema il mondo delle idee sono intitolati: <text:span text:style-name="T7">Parmenide, Teeteto, Sofista, Politico, Filebo, Timeo, Crizia, Le Leggi</text:span><text:span text:style-name="T33">.</text:span></text:p>
      <text:p text:style-name="P5"><text:span text:style-name="T22">Quali sono i problemi del mondo delle idee</text:span></text:p>
      <text:p text:style-name="P7">Platone, <text:span text:style-name="T35">nella sua teoria delle idee,</text:span> aveva inizialmente pensato <text:span text:style-name="T35">che il</text:span> <text:span text:style-name="T23">rapporto tra le idee e le cose</text:span> <text:span text:style-name="T35">fosse </text:span>di 3 tipi: <text:span text:style-name="T20">imitazione</text:span> (le cose imitano le idee); <text:span text:style-name="T20">partecipazione</text:span> (le cose molteplici partecipano all’unità <text:soft-page-break/>dell’idea); <text:span text:style-name="T20">contenimento</text:span> (le cose contengono le idee avendone gli attributi). L’interlocutore che non a caso intravede dei problemi in questo rapporto è Parmenide, il cui nome intitola uno dei dialoghi in cui Platone sistema il mondo delle idee. <text:span text:style-name="T16">I problemi che emergono nel Parmenide</text:span><text:span text:style-name="T19"> sono sostanzialmente due e riguardano entrambi l’unità dell’idea:</text:span></text:p>
      <text:p text:style-name="P5">1. Se è vero che l’idea è unica e in sé perfetta e unita, come fa a contenere per partecipazione tutte le cose molteplici, senza diventare essa stessa frantumata in tante parti e dunque molteplice?</text:p>
      <text:p text:style-name="P5">2. Se si ha un’idea ogni volta che si considera una molteplicità di oggetti, accomunati da qualcosa che li unisce nell’idea (immaginiamo l’idea di casa che contiene tutte le caratteristiche delle case particolari), si creerà una terza idea che accomuna la molteplicità degli oggetti e insieme la loro idea.</text:p>
      <text:p text:style-name="P7"><text:span text:style-name="T34">Aristotele mosse delle critiche abbastanza pesanti nei confronti della </text:span><text:span text:style-name="T36">teoria </text:span>platonica delle idee, sost<text:span text:style-name="T36">ene</text:span><text:span text:style-name="T34">ndo</text:span> che, <text:s/>se la somiglianza tra le cose è determinata dalla loro comune idea, allora sarà necessaria una nuova idea per determinare tale somiglianza, e così via all'infinito. <text:span text:style-name="T36">Tale </text:span><text:span text:style-name="T18">a</text:span><text:span text:style-name="T36">rgomentazione mise in </text:span><text:s/>discussione la logica <text:soft-page-break/>platonica da essere celebre come <text:span text:style-name="T20">argomento del terzo uomo</text:span><text:span text:style-name="T20"><text:note text:id="ftn59" text:note-class="footnote"><text:note-citation>1</text:note-citation><text:note-body><text:p text:style-name="P1">Si definisce argomento del terzo uomo perché si partì dall’esempio dei singoli uomini e dall’idea dell’uomo.</text:p></text:note-body></text:note></text:span>.</text:p>
      <text:p text:style-name="P6"><text:span text:style-name="T12">Questi problemi nascono tutti in seno alla logica parmenidea che afferma: “</text:span><text:span text:style-name="T7">solo l’essere è, il non-essere non è</text:span><text:span text:style-name="T12">”. Risulta evidente che la dottrina delle idee, non concependo l’</text:span><text:span text:style-name="T14">e</text:span><text:span text:style-name="T12">ssere unico a cui </text:span><text:span text:style-name="T14">fa riferimento </text:span><text:span text:style-name="T12">Parmenide per poter affermare che “il non-essere non è”, richiede una messa in discussione della logica parmenidea. Platone non è disposto a rinunciare alla molteplicità delle idee, tuttavia</text:span><text:span text:style-name="T17">, </text:span><text:span text:style-name="T12">stando a quanto dice Parmenide, se le idee sono tante ognuna di esse non-è l’altra e quindi diventerebbe non-essere, dunque non esisterebbe più.</text:span></text:p>
      <text:p text:style-name="P5"><text:span text:style-name="T12">Platone non è in grado di confutare le critiche di Parmenide, </text:span><text:span text:style-name="T14">t</text:span><text:span text:style-name="T12">uttavia, in dialoghi successivi, come il "Sofista" e il "Filebo", egli cerca di superare queste difficoltà. In questi dialoghi, Platone sostiene che le idee possono essere molteplici pur essendo uniche. Le idee sono molteplici in quanto sono molte le cose che partecipano di esse, ma sono uniche in quanto sono tutte forme o modelli immutabili che stanno alla base della realtà sensibile.</text:span><text:span text:style-name="T17"> </text:span><text:span text:style-name="T12">Impossibilitato a stare nella logica parmenidea che esclude la molteplicità delle idee, Platone sistema il mondo delle idee negando le tesi di </text:span><text:soft-page-break/><text:span text:style-name="T12">Parmenide che egli definisce «maestro terribile e venerando». Questa negazione è nota nella storia della filosofia come “</text:span><text:span text:style-name="T7">parmenicidio</text:span><text:span text:style-name="T12">”, ovvero l’uccisione simbolica di Parmenide, che Platone compie inaugurando una nuova logica.</text:span></text:p>
      <text:p text:style-name="P11"><text:span text:style-name="T39">Platone sistema il mondo delle idee: Le idee sono molteplici, l’essere è possibilità.</text:span></text:p>
      <text:p text:style-name="P7"><text:span text:style-name="T13">Nel </text:span><text:span text:style-name="T17">Teeteto</text:span><text:span text:style-name="T12"> </text:span><text:span text:style-name="T13">si assiste ad</text:span><text:span text:style-name="T12"> un dialogo </text:span><text:span text:style-name="T13">tra Socrate e il giovane matematico Teeteto, mentre riflettono sulla domanda “che cos’è la scienza”. Alla domanda di Socrate: “che cos’è la conoscenza?”, Teeteto cita Protagora e risponde che è sensazione. Socrate la giudica inadeguata, ma allo stesso tempo comprende che il giovane è «gravido», e che quindi è possibile tirar fuori da lui una definizione soddisfacente con l'esercizio della maieutica. Questa prima definizione porta Socrate ad analizzare - e criticare - il relativismo di ispirazione protagorea e l'eraclitismo; quindi, sempre sotto la guida di Socrate, Teeteto propone una seconda: “la conoscenza è opinione vera” e infine una terza definizione: “la conoscenza è opinione vera di cui si sa rendere ragione”. Platone sostiene che è impossibile considerare vera scienza se non in riferimento all’essere, cioè all’idea. Questa affermazione è finalizzata a smentire la soggettività gnoseologica dei sofisti, che ritenevano fossero i sensi a determinare la conoscenza.</text:span><text:span text:style-name="T12"> </text:span><text:soft-page-break/><text:span text:style-name="T12">Dal Teeteto si giunge così al </text:span><text:span text:style-name="T17">Sofista</text:span><text:span text:style-name="T32">,</text:span><text:span text:style-name="T12"> in cui Platone commette l’omicidio di Parmenide, </text:span><text:span text:style-name="T15">(in senso figurato)</text:span><text:span text:style-name="T12"> affermando la molteplicità delle idee e dell’Essere e spiegando l’esistenza del non-essere.</text:span></text:p>
      <text:p text:style-name="P5">Il contenuto principale del dialogo Sofista è la teoria dei generi sommi, Platone intende con essi delle grandi categorie-attributo alle quali le idee partecipano, concepite come cinque forme dell’essere. Le idee, infatti, sono e la loro partecipazione a queste forme dell’essere lo dimostra. </text:p>
      <text:p text:style-name="P7">Secondo la <text:span text:style-name="T20">teoria dei generi sommi</text:span><text:span text:style-name="T30">,</text:span> ogni idea appartiene a ognuno dei primi 3 generi sommi, mentre ha la possibilità di appartenere o al quarto o al quinto: </text:p>
      <text:list text:style-name="L1">
        <text:list-item>
          <text:p text:style-name="P8">E<text:span text:style-name="T39">ssere</text:span>: ogni idea è, quindi rientra nel genere dell’essere;</text:p>
        </text:list-item>
        <text:list-item>
          <text:p text:style-name="P9">I<text:span text:style-name="T39">dentico</text:span>: ogni idea è identica a se stessa ma non è identica alle altre idee;</text:p>
        </text:list-item>
        <text:list-item>
          <text:p text:style-name="P9">D<text:span text:style-name="T39">iverso</text:span>: essendo ogni idea distinta dalle altre è diversa dalle altre idee, dunque le appartiene il genere del diverso;</text:p>
        </text:list-item>
        <text:list-item>
          <text:p text:style-name="P9">Q<text:span text:style-name="T39">uiete</text:span>: ogni idea ha la possibilità di stare in se stessa come identità autonoma;</text:p>
        </text:list-item>
        <text:list-item>
          <text:p text:style-name="P13">M<text:span text:style-name="T39">ovimento</text:span>: ogni idea, se non è in quiete, può entrare in rapporto con le altre.</text:p>
        </text:list-item>
      </text:list>
      <text:p text:style-name="P14"><text:soft-page-break/>Se consideriamo l’idea di “uomo”, questa idea esiste (essere), è identica a se stessa (identico), è diversa da tutte le altre idee come “donna” o “animale”, può interagire con altre idee (moto), e può rimanere in se stessa (quiete).</text:p>
      <text:p text:style-name="P15">L’idea di “virtù” esiste (essere), è identica a se stessa (identico), è diversa da altre idee come “vizio” o “ignoranza” (diverso), può interagire con altre idee come “coraggio” o “giustizia” (moto), e può rimanere anche in se stessa (quiete).</text:p>
      <text:p text:style-name="P7"><text:span text:style-name="T8">Dire infatti che </text:span><text:span text:style-name="T5">il moto è</text:span><text:span text:style-name="T8">, e che </text:span><text:span text:style-name="T5">la quiete è</text:span><text:span text:style-name="T8">, significa affermare contemporaneamente che entrambi sono l’essere e quindi che coincidono! </text:span><text:span text:style-name="T9">E</text:span><text:span text:style-name="T8">gli infatti distingue l’essere dal diverso: </text:span><text:span text:style-name="T5">non,</text:span><text:span text:style-name="T8"> non vuol dire </text:span><text:span text:style-name="T5">non essere assoluto</text:span><text:span text:style-name="T8"> (il nulla), ma vuol dire </text:span><text:span text:style-name="T5">è diverso da</text:span><text:span text:style-name="T8">; affermare che un genere non è l’altro non vuol dire negarne l’esistenza ma riconoscere che il non essere coincide con il diverso. Grazie all’introduzione dei generi sommi Platone sistema il mondo delle idee: difatti spiega il non-essere inserendo la categoria del “diverso” e salva la molteplicità delle idee. </text:span></text:p>
      <text:p text:style-name="P16">La logica parmenidea concepiva un “<text:span text:style-name="T29">e</text:span>ssere” unico e perfetto in sé concluso, che coincideva con la verità. <text:span text:style-name="T29">I</text:span>l mondo delle apparenze di Parmenide, non era in contatto con questo “<text:span text:style-name="T29">e</text:span>ssere”, <text:span text:style-name="T29">in quanto è un mondo </text:span><text:soft-page-break/><text:span text:style-name="T29">illusorio soggetto a mutamento e distruzione. E’ un mondo di molteplicità e di contraddizioni.</text:span> </text:p>
      <text:p text:style-name="P5"><text:span text:style-name="T8">Platone, al contrario, intende creare e mantenere un forte rapporto tra il mondo della percezione e il mondo delle idee, dando certamente più consistenza ontologica alle idee che alle cose, ma spiegando che la realtà in cui viviamo deriva dal mondo delle idee ed è compito dell’uomo elevarsi alla conoscenza dell’</text:span><text:span text:style-name="T10">e</text:span><text:span text:style-name="T8">ssere. </text:span>La ridefinizione dell’<text:span text:style-name="T29">e</text:span>ssere rende possibile il ribaltamento della logica parmenidea, tanto che nel Sofista, alla teoria dei generi sommi e grazie ad essa, segue una nuova formulazione di ciò che l’<text:span text:style-name="T29">e</text:span>ssere è: </text:p>
      <text:p text:style-name="P3">“<text:span text:style-name="T5">è qualunque cosa si trovi in possesso di una qualsiasi possibilità di agire o di subire, da parte di qualche altra cosa, anche insignificante, un’azione anche minima anche solo per una sola volta”</text:span> (Sofista 247c). </text:p>
      <text:p text:style-name="P5"><text:span text:style-name="T8">In questo modo Platone afferma che non solo le idee sono molteplici, ma l’</text:span><text:span text:style-name="T10">e</text:span><text:span text:style-name="T8">ssere stesso è molteplice, esso è possibilità e contiene tutto ciò che può entrare in relazione con qualcos’altro. Ne è prova il fatto che il nulla, essendo incapace di stare in relazione con qualcosa che esiste, non è.</text:span></text:p>
      <text:p text:style-name="P10"><text:span text:style-name="T22"/></text:p>
      <text:p text:style-name="P10"><text:span text:style-name="T22"/></text:p>
      <text:p text:style-name="P10"><text:soft-page-break/><text:span text:style-name="T22">Con la dialettica e il Demiurgo, Platone sistema il mondo delle idee. </text:span></text:p>
      <text:p text:style-name="P10"><text:span text:style-name="T8">La nuova definizione dell’</text:span><text:span text:style-name="T10">e</text:span><text:span text:style-name="T8">ssere e delle idee, grazie alla teoria dei generi sommi, porta Platone a definire il procedimento logico di dimostrazione della verità, grazie alla </text:span><text:span text:style-name="T17">strutturazione della dialettica.</text:span><text:span text:style-name="T8"> Se nei dialoghi del secondo periodo la dialettica figurava come scienza delle idee, nei dialoghi della maturità </text:span><text:span text:style-name="T6">Sofista e Politico</text:span><text:span text:style-name="T8"> troviamo la </text:span><text:span text:style-name="T12">messa a punto del procedimento dialettico che conduce alla verità razionale</text:span><text:span text:style-name="T8">. Giungiamo dunque alla conclusione di un lungo percorso, inaugurato da Socrate con la ricerca del concetto (il </text:span><text:span text:style-name="T17">“che cos’è”</text:span><text:span text:style-name="T8"> – </text:span><text:span text:style-name="T5">tì ésti)</text:span><text:span text:style-name="T8">, e compiuto dal suo allievo con la </text:span><text:span text:style-name="T10">definizione</text:span><text:span text:style-name="T8"> del ragionamento dialettico, basato sull’esistenza delle idee. </text:span></text:p>
      <text:p text:style-name="P2">La dialettica è per Platone la tecnica propria della filosofia, tant’è vero che egli è generalmente considerato il padre della dialettica. Il termine identifica un metodo discorsivo, cioè fondato sull’uso di concetti, parole e <text:s/>proposizioni in cui le idee vengono spiegate mettendole in relazione le une con le altre. Quando descriviamo una cosa con le parole, infatti, non facciamo altro che mettere in relazione questa cosa con le altre, individuando che cosa di essa può essere detto e che cosa no, <text:span text:style-name="T8">parte</text:span><text:span text:style-name="T11">ndo</text:span><text:span text:style-name="T8"> dal presupposto della possibile comunicazione tra le idee; tuttavia non tutte le idee </text:span><text:soft-page-break/><text:span text:style-name="T8">sono in rapporto con le altre, ma soltanto alcune sono combinabili tra loro e altre no. Pensare dialetticamente, usare cioè la scienza delle idee, significa per Platone definire un’idea mediante un processo che divide ogni idea in due possibili “sotto idee” e procede scegliendo una sola delle due possibilità; successivamente ancora viene divisa l’idea scelta in due “sotto-idee” e così via. Tale ragionamento dicotomico termina nel momento in cui si giunge a un’idea indivisibile. </text:span></text:p>
      <text:p text:style-name="P6"><text:span text:style-name="T8">Vediamo nel concreto come funziona la dialettica di Platone: una tesi di partenza viene definita nel dettaglio per poterla verificare, fino a giungere a un’idea finale che conferma la definizione di partenza, oltre a definirla. Facciamo ora un esempio di procedimento dialettico cercando di definire la </text:span><text:span text:style-name="T10">giustizia</text:span><text:span text:style-name="T8"> partendo dalla tesi iniziale che essa è </text:span><text:span text:style-name="T10">la virtù più importante.</text:span></text:p>
      <text:p text:style-name="P6"><text:span text:style-name="T21">Tesi : </text:span><text:span text:style-name="T25">La giustizia è la virtù più importante.</text:span></text:p>
      <text:p text:style-name="P7"><text:span text:style-name="T21">Antitesi: </text:span><text:span text:style-name="T25">La giustizia è solo una virtù tra le altre, e non è necessariamente la più importante.</text:span></text:p>
      <text:p text:style-name="P7"><text:span text:style-name="T21">Sintesi: </text:span><text:span text:style-name="T25">La giustizia è la virtù più importante, ma non è l'unica virtù. Altre virtù, come la saggezza, il coraggio e la temperanza, sono altrettanto importanti. </text:span></text:p>
      <text:p text:style-name="P6"><text:span text:style-name="T23">Si vede come, partendo dalla definizione di </text:span><text:span text:style-name="T25">giustizia come virtù più importante </text:span><text:span text:style-name="T23">, si giunge con la dialettica a definirla </text:span><text:span text:style-name="T25">una virtù importante insieme a tante altre ugualmente importanti.</text:span><text:span text:style-name="T23"> Ogni “sotto-idea” è stata a sua </text:span><text:soft-page-break/><text:span text:style-name="T23">volta divisa nel processo dialettico fino a quando non si è giunti a un’idea finale che definisce la tesi di partenza. Il procedimento dialettico è un processo di scomposizione e ricomposizione dei concetti. In questo caso, la tesi viene scomposta nell'antitesi, e la sintesi è il risultato della ricomposizione dei due concetti. Platone concepisce i concetti come contenuti mentali dell’uomo, che in quanto tali devono avere una corrispondenza nella realtà, ai concetti corrispondono le idee, che godono di realtà ontologica propria.</text:span></text:p>
      <text:p text:style-name="P17">L’ultimo e fondamentale elemento che serve perché Platone sistemi il mondo delle idee, è il rapporto con il mondo delle cose, che abbiamo visto essere centrale a partire dal mito della caverna. Lo sforzo di Platone, nei dialoghi del terzo periodo, è quello di dare una consistenza organica all’insieme di mondo delle idee e mondo delle cose, finora in contatto solo per mezzo dell’uomo e del suo processo di conoscenza.</text:p>
      <text:p text:style-name="P18">Per quanto la centralità dell’essere umano caratterizzi la filosofia dalla rivoluzione dei sofisti, ereditata prima da Socrate e poi da Platone, nell’ultimo periodo della sua riflessione, Platone si concentra sulla realtà, indipendentemente dall’uomo, tanto da pensare a una coincidenza tra numeri e strutture della realtà. Platone aveva una visione molto particolare della matematica. </text:p>
      <text:p text:style-name="P7"><text:span text:style-name="T23">Secondo lui, la matematica è</text:span></text:p>
      <text:p text:style-name="P4"><text:soft-page-break/><text:span text:style-name="T7">"conoscenza di ciò che esiste eternamente, non di qualche cosa che viene a essere in qualche momento e cessa di essere"</text:span><text:span text:style-name="T23">. </text:span></text:p>
      <text:p text:style-name="P18">Questa concezione è nota come platonismo matematico, per la quale la realtà matematica giace fuori di noi e la nostra funzione è quella di scoprirla e osservarla, credeva che i numeri avessero una realtà propria, indipendente dal mondo fisico. </text:p>
      <text:p text:style-name="P17">Inoltre, Platone credeva che i numeri avessero un ruolo fondamentale nella struttura della realtà. Secondo lui, le idee sono concepite con la mente e non colte con i sensi, ma ciò non significa che non siano reali. Anzi, per Platone, le idee sono la sola realtà vera e originaria, proprio perché sono stabili e assolute. In questo senso, i numeri possono essere visti come le idee che costituiscono la struttura della realtà.</text:p>
      <text:p text:style-name="P18">Questo ultimo risvolto, che avvicina Platone ai pitagorici, sembra essere centrale nell’ultimissima fase del suo pensiero, nota nella storia della filosofia come periodo delle dottrine non scritte, i cui contenuti ci sono in parte tramandati da altri filosofi <text:s/>(Aristotele). La connessione tra il mondo delle cose e il mondo delle idee la troviamo nel dialogo intitolato Timeo e nella narrazione del mito del Demiurgo.</text:p>
      <text:p text:style-name="P7"><text:span text:style-name="T23">Il "Timeo" è un dialogo scritto da Platone attorno al 360 a.C. e ha avuto una grande incidenza teorica sulla </text:span><text:soft-page-break/><text:span text:style-name="T23">filosofia e sull</text:span><text:span text:style-name="T26">e</text:span><text:span text:style-name="T23"> scienz</text:span><text:span text:style-name="T26">e</text:span><text:span text:style-name="T23"> posteriori. Il dialogo è suddiviso in diverse parti, ognuna delle quali affronta un problema specifico:</text:span></text:p>
      <text:p text:style-name="P5"><text:span text:style-name="T20">Prologo</text:span><text:span text:style-name="T23">: Platone <text:s/>presenta <text:s/>questo <text:s/>dialogo <text:s/>come <text:s text:c="2"/>il proseguimento di una discussione avvenuta il giorno prima, durante la quale sono stati affrontati alcuni degli argomenti della Repubblica.</text:span></text:p>
      <text:p text:style-name="P5"><text:span text:style-name="T20">Parte prima </text:span><text:span text:style-name="T23">Operazioni del Demiurgo: Platone si sofferma sulle verità eterne della realtà </text:span><text:span text:style-name="T25">preesistente</text:span><text:span text:style-name="T23"> </text:span><text:span text:style-name="T27">del mondo delle idee che per Platone è realtà eterna e immutabile,</text:span><text:span text:style-name="T23"> e su come questa abbia dato origine al cosmo del divenire. Viene introdotto un terzo termine mediatore, il Demiurgo, ovvero il "divino artefice", una figura che successivamente è stata paragonata a quella del Dio cristiano.</text:span></text:p>
      <text:p text:style-name="P5"><text:span text:style-name="T20">Parte seconda</text:span><text:span text:style-name="T23"> - Il principio materiale: </text:span><text:span text:style-name="T27">i</text:span><text:span text:style-name="T23">n questa parte, Platone discute la struttura fisica dell'universo.</text:span></text:p>
      <text:p text:style-name="P6"><text:span text:style-name="T20">Parte terza</text:span><text:span text:style-name="T23">-La natura umana: </text:span><text:span text:style-name="T27">q</text:span><text:span text:style-name="T23">uesta sezione del dialogo esplora la natura umana e la sua relazione con l'universo.</text:span></text:p>
      <text:p text:style-name="P6"><text:span text:style-name="T27">C</text:span><text:span text:style-name="T23">ome per il percorso di conoscenza, Platone decide di introdurre il </text:span><text:span text:style-name="T7">Demiurgo</text:span><text:span text:style-name="T23"> tramite la narrazione mitologica, di modo da rendere più intuitiva questa novità del suo pensiero. Il Demiurgo è una figura che opera a favore degli uomini per dare alla realtà materiale l’ordine e la </text:span><text:soft-page-break/><text:span text:style-name="T23">perfezione che egli realizza guardando alle idee come modello, è un artefice dotato di intelligenza e volontà che fa da mediatore tra i due mondi. Il Demiurgo platonico non crea la realtà, ma le fornisce l’ </text:span><text:span text:style-name="T7">anima del mondo</text:span><text:span text:style-name="T23"> ordinandola a immagine e somiglianza delle idee; il mondo senza l’opera del Demiurgo esiste, ma è caos informe e materia priva di vita, che esiste necessariamente e liberamente senza senso. Solo l’opera del Demiurgo le fornisce senso, riordinando l’esistente secondo i </text:span><text:span text:style-name="T25">quattro</text:span><text:span text:style-name="T23"> elementi principali già introdotti da Empedocle (terra, acqua, aria e fuoco), che sono riconducibili alle figure geometriche, a loro volta ridotte a realtà numerica. Per spiegare l’esistenza dell’imperfezione nel mondo materiale e del male, Platone teorizza che l’Artefice divino trova nella materia delle resistenze durante la plasmazione che creano le imperfezioni e i mali del mondo. L’introduzione del Demiurgo cambia sicuramente l’assetto della dottrina delle idee, dando al cosmo un senso ulteriore e chiarendo il rapporto tra il mondo delle idee e il mondo delle cose, uscito da quel dualismo che li rendeva in</text:span><text:span text:style-name="T26">conciliabili</text:span><text:span text:style-name="T23">. L’esistenza del Demiurgo, artefice divino dotato di intelligenza e volontà, viene presentata da Platone come ipotesi verosimile, necessaria a spiegare l’esistenza di ciò che percepiamo e conosciamo come uomini, viene narrata tramite il mito perché possa </text:span><text:soft-page-break/><text:span text:style-name="T23">essere compresa intuitivamente e facilmente dai suoi allievi e dai suoi lettori.</text:span></text:p>
      <text:p text:style-name="P20"><text:span text:style-name="Strong_20_Emphasis"><text:span text:style-name="T4">La teoria Politica</text:span></text:span><text:span text:style-name="Strong_20_Emphasis"><text:span text:style-name="T3"> – </text:span></text:span><text:span text:style-name="Strong_20_Emphasis"><text:span text:style-name="T4">Dalla Repubblica alle Leggi.</text:span></text:span></text:p>
      <text:p text:style-name="P7">La nuova configurazione del mondo delle idee tramite la teoria dei generi sommi, insieme alla strutturazione secondo un ordine matematico della realtà, ha dei risvolti notevoli anche nelle teorie platoniche riguardanti la morale e la politica. Nel momento in cui Platone sistema il mondo delle idee, l’idea del “<text:span text:style-name="T29">b</text:span>ene” proposta nella Repubblica richiede delle modifiche, la sua natura era infatti simile all’<text:span text:style-name="T29">e</text:span>ssere parmenideo in quanto idea suprema e oggettiva che rende conoscibili tutte le altre idee. Nel dialogo intitolato Filebo, <text:span text:style-name="T37">scritto da</text:span> Platone <text:span text:style-name="T37">nella fase finale della sua produzione (366 – 365 a.C.), </text:span>ripropone la discussione sul “<text:span text:style-name="T29">b</text:span>ene”, interrogandosi però su che cos’è il bene per l’uomo. È l'ultimo scritto in cui il filosofo attribuisce al maestro il ruolo di protagonista.</text:p>
      <text:p text:style-name="P7">Nel dialogo, Socrate discute con Filebo e Protarco sulla ricerca del “vero <text:span text:style-name="T29">b</text:span>ene” in grado di garantire una vita felice. La domanda centrale del testo è se una vita felice coincide con una vita di piaceri oppure no. Il dialogo inizia con una discussione tra Filebo, che sostiene che il bene per tutti gli esseri viventi consiste nel piacere, e Protarco, che invece sostiene che il bene consiste nell'attività dell'intelligenza. Socrate interviene nella <text:soft-page-break/>discussione e propone un'analisi più attenta dei termini del discorso, poiché i piaceri non sono tutti uguali, solo alcuni sono buoni e la maggior parte malvagi. </text:p>
      <text:p text:style-name="P7"><text:span text:style-name="T37">I</text:span>l bene per l’uomo è identificato nella misura: poiché la vita dell’uomo non è né propriamente animale né propriamente divina, il bene si baserà sulla giusta misura tra intelligenza e piacere. L’indagine del dialogo si sposta dunque sulla definizione di questa misura o giusto mezzo, giungendo a vedere nell’intelligenza ciò che dà limite al piacere, permettendo la realizzazione del giusto mezzo. La virtù viene a coincidere con la scienza della misura, basata sulla struttura numerica che il filosofo inserisce nella sua dottrina, ponendola alla base della realtà. </text:p>
      <text:p text:style-name="P6">Giunge in questo modo al termine il cammino iniziato da Socrate che puntava a fare della virtù una scienza, infatti Platone la definisce come scienza della misura, limite agli eccessi. Questo concetto di misura ha dei risvolti diretti anche nella teoria politica di questo terzo periodo dell’elaborazione filosofica di Platone, infatti nel dialogo Politico l’arte del reggitore dei popoli è proprio quella della misura, cioè la capacità di trovare il giusto mezzo, ovvero ciò che è opportuno o doveroso nelle azioni umane. Ma la centralità data all’essere umano nella realizzazione della comunità perfetta, viene superata da Platone anche in campo politico. Nella <text:soft-page-break/>Repubblica era infatti la natura dell’anima umana a stabilire a quale classe appartenesse il singolo e a strutturare la società. <text:span text:style-name="T29">L</text:span>’indole caratteriale e l’educazione erano garanzia del mantenimento della giustizia.</text:p>
      <text:p text:style-name="P7">L’ultima opera platonica si dedica dunque al problema delle <text:span text:style-name="T37">l</text:span>eggi, individuando in un codice ben scritto la sola garanzia alla realizzazione della giustizia in società. Il dialogo si intitola proprio <text:span text:style-name="T20">Le Leggi</text:span> ed è stato pubblicato dall’allievo Filippo di Opunte dopo la morte del maestro; secondo quanto scritto da Platone, il codice di leggi è in grado non solo di comandare l’uomo, realizzando bene e giustizia, ma anche di educarlo convincendolo della bontà dei suoi stessi contenuti. Il fine delle leggi sarà dunque quello di promuovere nei cittadini la virtù, che continua a identificarsi con la felicità a partire dall’intuizione di Socrate. A garantire l’osservanza delle leggi Platone mette un organo chiamato «consiglio notturno», chi ne fa parte supervisiona la vita collettiva e garantisce che le leggi vengano rispettate; questo organo prende il posto dei filosofi re che nella Repubblica erano centrali, così come viene meno nell’ultima opera politica la divisione in classi sociali: ogni cittadino deve essere educato a tutte le virtù tramite le leggi. </text:p>
      <text:p text:style-name="P19"><text:span text:style-name="Strong_20_Emphasis"><text:span text:style-name="T2">Resta comunque la strutturazione molto forte dei compiti che ognuno deve assumere in società per </text:span></text:span><text:soft-page-break/><text:span text:style-name="Strong_20_Emphasis"><text:span text:style-name="T2">contribuire al suo mantenimento e l’impostazione statalista che è propria del pensiero politico di Platone. Ma così come nella Repubblica sorgeva la domanda su chi avrebbe controllato i filosofi, che avevano un potere praticamente illimitato, così per </text:span></text:span><text:span text:style-name="Strong_20_Emphasis"><text:span text:style-name="T1">l</text:span></text:span><text:span text:style-name="Strong_20_Emphasis"><text:span text:style-name="T2">e </text:span></text:span><text:span text:style-name="Strong_20_Emphasis"><text:span text:style-name="T1">l</text:span></text:span><text:span text:style-name="Strong_20_Emphasis"><text:span text:style-name="T2">eggi viene da chiedersi cosa si ponga a garanzia della loro giustezza. Per rispondere a questa esigenza Platone inserisce una religione di Stato che fa coincidere le divinità con gli astri (il sole , la luna, le stelle). L’esistenza di un ordine cosmico cui corrisponde l’ordine delle cose del mondo, garantito dall’azione del Demiurgo che ordina a modello del mondo delle idee, è alla base delle leggi e garantisce fino in fondo la realizzazione del bene e della giustizia. </text:span></text:span><text:span text:style-name="Strong_20_Emphasis"><text:span text:style-name="T1">L’</text:span></text:span><text:span text:style-name="Strong_20_Emphasis"><text:span text:style-name="T2">uomo dotato di sapienza religioso-filosofica sull’ordine divino del mondo e della sua struttura matematica, sarà anche colui che garanti</text:span></text:span><text:span text:style-name="Strong_20_Emphasis"><text:span text:style-name="T1">rà</text:span></text:span><text:span text:style-name="Strong_20_Emphasis"><text:span text:style-name="T2"> il rispetto delle leggi. L’ultima teorizzazione di filosofia politica di Platone è dunque il tentativo finale di portare nella tormentata realtà materiale vissuta dagli uomini l’armonia e l’ordine dei cieli.</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2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799cm" fo:margin-bottom="1.499cm" fo:margin-left="1.799cm" fo:margin-right="1.7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rado tafaro</meta:initial-creator>
    <meta:creation-date>2026-01-25T16:20:44.310499176</meta:creation-date>
    <dc:date>2026-01-25T17:12:43.908607018</dc:date>
    <dc:creator>corrado tafaro</dc:creator>
    <meta:editing-duration>PT29M55S</meta:editing-duration>
    <meta:editing-cycles>4</meta:editing-cycles>
    <meta:generator>LibreOffice/24.2.7.2$Linux_X86_64 LibreOffice_project/420$Build-2</meta:generator>
    <meta:document-statistic meta:table-count="0" meta:image-count="0" meta:object-count="0" meta:page-count="17" meta:paragraph-count="54" meta:word-count="3416" meta:character-count="21862" meta:non-whitespace-character-count="18476"/>
  </office:meta>
</office:document-meta>
</file>