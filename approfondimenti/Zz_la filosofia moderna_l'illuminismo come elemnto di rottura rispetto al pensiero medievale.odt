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adornments="Normale" style:font-family-generic="swiss" style:font-pitch="variable"/>
    <style:font-face style:name="OpenSymbol" svg:font-family="OpenSymbol" style:font-charset="x-symbol"/>
  </office:font-face-decls>
  <office:automatic-styles>
    <style:style style:name="P1" style:family="paragraph" style:parent-style-name="Standard">
      <style:paragraph-properties fo:line-height="115%" fo:text-align="justify" style:justify-single-word="false"/>
      <style:text-properties style:font-name="Liberation Serif" fo:font-size="14pt" officeooo:paragraph-rsid="001c98b2" style:font-size-asian="14pt" style:font-size-complex="14pt"/>
    </style:style>
    <style:style style:name="P2"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1c98b2" style:font-size-asian="14pt" style:font-size-complex="14pt"/>
    </style:style>
    <style:style style:name="P3" style:family="paragraph" style:parent-style-name="Standard">
      <style:paragraph-properties fo:margin-top="0.199cm" fo:margin-bottom="0cm" style:contextual-spacing="false" fo:line-height="115%" fo:text-align="justify" style:justify-single-word="false"/>
      <style:text-properties style:font-name="Liberation Serif" fo:font-size="14pt" officeooo:paragraph-rsid="001c98b2" style:font-size-asian="14pt" style:font-size-complex="14pt"/>
    </style:style>
    <style:style style:name="P4"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1dab4e" style:font-size-asian="14pt" style:font-size-complex="14pt"/>
    </style:style>
    <style:style style:name="P5" style:family="paragraph" style:parent-style-name="Standard">
      <style:paragraph-properties fo:line-height="115%" fo:text-align="justify" style:justify-single-word="false"/>
      <style:text-properties style:font-name="Liberation Serif" fo:font-size="14pt" officeooo:paragraph-rsid="001e720f" style:font-size-asian="14pt" style:font-size-complex="14pt"/>
    </style:style>
    <style:style style:name="P6"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1e720f" style:font-size-asian="14pt" style:font-size-complex="14pt"/>
    </style:style>
    <style:style style:name="P7"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1efd93" style:font-size-asian="14pt" style:font-size-complex="14pt"/>
    </style:style>
    <style:style style:name="P8"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216e40" style:font-size-asian="14pt" style:font-size-complex="14pt"/>
    </style:style>
    <style:style style:name="P9"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233a25" style:font-size-asian="14pt" style:font-size-complex="14pt"/>
    </style:style>
    <style:style style:name="P10"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2369bb" style:font-size-asian="14pt" style:font-size-complex="14pt"/>
    </style:style>
    <style:style style:name="P11"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2a46e0" style:font-size-asian="14pt" style:font-size-complex="14pt"/>
    </style:style>
    <style:style style:name="P12" style:family="paragraph" style:parent-style-name="Standard">
      <style:paragraph-properties fo:line-height="100%" fo:text-align="justify" style:justify-single-word="false"/>
      <style:text-properties style:font-name="Liberation Serif" fo:font-size="16pt" officeooo:paragraph-rsid="001c98b2" style:font-size-asian="16pt" style:font-size-complex="16pt"/>
    </style:style>
    <style:style style:name="P13" style:family="paragraph" style:parent-style-name="Standard" style:list-style-name="L1">
      <style:paragraph-properties fo:line-height="115%" fo:text-align="justify" style:justify-single-word="false"/>
      <style:text-properties officeooo:paragraph-rsid="001c98b2"/>
    </style:style>
    <style:style style:name="T1" style:family="text">
      <style:text-properties fo:font-style="italic" style:font-style-asian="italic" style:font-style-complex="italic"/>
    </style:style>
    <style:style style:name="T2" style:family="text">
      <style:text-properties fo:font-size="11pt" fo:font-weight="bold" style:font-size-asian="11pt" style:font-weight-asian="bold" style:font-size-complex="11pt" style:font-weight-complex="bold"/>
    </style:style>
    <style:style style:name="T3" style:family="text">
      <style:text-properties officeooo:rsid="00216e40"/>
    </style:style>
    <style:style style:name="T4" style:family="text">
      <style:text-properties officeooo:rsid="002369bb"/>
    </style:style>
    <style:style style:name="T5" style:family="text">
      <style:text-properties officeooo:rsid="0024efb9"/>
    </style:style>
    <style:style style:name="T6" style:family="text">
      <style:text-properties officeooo:rsid="002857fa"/>
    </style:style>
    <style:style style:name="T7" style:family="text">
      <style:text-properties fo:font-weight="bold" style:font-weight-asian="bold" style:font-weight-complex="bold"/>
    </style:style>
    <style:style style:name="T8" style:family="text">
      <style:text-properties officeooo:rsid="002c83cd"/>
    </style:style>
    <style:style style:name="T9" style:family="text">
      <style:text-properties style:font-name="Liberation Serif" fo:font-size="14pt" style:font-size-asian="14pt" style:font-size-complex="14pt"/>
    </style:style>
    <style:style style:name="T10" style:family="text">
      <style:text-properties officeooo:rsid="002a46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5">L</text:span>’Illuminismo <text:span text:style-name="T6">come elemento di r</text:span>ottura sia rispetto al pensiero medievale che a quello rinascimentale.</text:p>
      <text:p text:style-name="P1"/>
      <text:p text:style-name="P1">L'Illuminismo, un movimento intellettuale e culturale del XVIII secolo, rappresenta indubbiamente una cesura significativa rispetto sia al pensiero medievale che a quello rinascimentale. Questa rottura si manifesta su diversi fronti, sia epistemologici che socio-politici.</text:p>
      <text:p text:style-name="P3">Rottura rispetto al Medioevo:</text:p>
      <text:p text:style-name="P2">Centralità della ragione: <text:span text:style-name="T8">a</text:span> differenza del Medioevo, dominato dalla fede e dalla teologia, l'Illuminismo pone la ragione al centro di tutto. La conoscenza non deriva più dalla rivelazione divina o dalla tradizione, ma dall'osservazione della natura e dall'applicazione del metodo scientifico.</text:p>
      <text:p text:style-name="P2">Critica all'autorità: <text:span text:style-name="T8">g</text:span>li illuministi mettono in discussione l'autorità della Chiesa e dei sovrani assoluti, promuovendo la libertà di pensiero e di espressione. La verità non è più dettata da un'autorità superiore, ma deve essere continuamente verificata e discussa.</text:p>
      <text:p text:style-name="P2">Progresso e miglioramento: <text:span text:style-name="T8">m</text:span>entre il Medioevo era spesso incentrato su un'idea di ordine cosmico immutabile, l'Illuminismo crede nel progresso costante e <text:soft-page-break/>nella possibilità di migliorare le condizioni umane attraverso la conoscenza e l'azione.</text:p>
      <text:p text:style-name="P2">Laicizzazione della cultura: <text:span text:style-name="T8">l</text:span>a cultura illuminista è profondamente laica, separando la ragione dalla fede e promuovendo una visione del mondo basata sulla natura e sulla storia.</text:p>
      <text:p text:style-name="P3">Rottura rispetto al Rinascimento:</text:p>
      <text:p text:style-name="P2">Universalismo vs. individualismo: <text:span text:style-name="T8">i</text:span>l Rinascimento, pur valorizzando l'individuo, era ancora legato a un'idea di ordine sociale gerarchico. L'Illuminismo, invece, promuove un'idea di uguaglianza tra gli uomini e di universalità dei diritti.</text:p>
      <text:p text:style-name="P2">Scienza e tecnica: <text:span text:style-name="T8">m</text:span>entre il Rinascimento aveva recuperato l'interesse per la scienza antica, l'Illuminismo sviluppa un metodo scientifico più rigoroso e si concentra sull'applicazione pratica della conoscenza scientifica per migliorare la vita umana.</text:p>
      <text:p text:style-name="P2">Politica e società: <text:span text:style-name="T8">l</text:span>'Illuminismo si interessa attivamente alla riforma delle istituzioni politiche e sociali, proponendo nuove forme di governo e di organizzazione della società. Il Rinascimento, invece, era più concentrato sulla cultura e sulle arti.</text:p>
      <text:p text:style-name="P3">L'Illuminismo rappresenta una rottura radicale rispetto al passato perché:</text:p>
      <text:list text:style-name="L1">
        <text:list-item>
          <text:p text:style-name="P13"><text:soft-page-break/><text:span text:style-name="T9">Sostituisce la fede con la ragione: La conoscenza non è più rivelata, ma conquistata attraverso l'osservazione e il ragionamento.</text:span></text:p>
        </text:list-item>
        <text:list-item>
          <text:p text:style-name="P13"><text:span text:style-name="T9">Sfida l'autorità: Critica le istituzioni tradizionali e promuove la libertà di pensiero.</text:span></text:p>
        </text:list-item>
        <text:list-item>
          <text:p text:style-name="P13"><text:span text:style-name="T9">Crede nel progresso: La storia è vista come un processo di miglioramento continuo.</text:span></text:p>
        </text:list-item>
        <text:list-item>
          <text:p text:style-name="P13"><text:span text:style-name="T9">È laica: Separa la ragione dalla fede e promuove una visione del mondo basata sulla natura.</text:span></text:p>
        </text:list-item>
        <text:list-item>
          <text:p text:style-name="P13"><text:span text:style-name="T9">È universalista: Crede nell'uguaglianza tra gli uomini e nei diritti universali.</text:span></text:p>
        </text:list-item>
      </text:list>
      <text:p text:style-name="P3">Le conseguenze di questa rottura sono state enormi: hanno portato alla Rivoluzione francese, all'abolizione della schiavitù e a profonde trasformazioni sociali, politiche e culturali che hanno segnato l'avvento dell'età moderna.</text:p>
      <text:p text:style-name="P11"><text:span text:style-name="T10">Tra i luminari che hanno illuminato il XVIII secolo, alcune figure si distinguono per i loro contributo fondamentale alla diffusione delle idee illuministe e per l’influenza che hanno esercitato nella storia.</text:span></text:p>
      <text:p text:style-name="P2">Kant, nel suo famoso saggio "Risposta alla domanda: Che cos'è l'illuminismo?" del 1784, definisce l'illuminismo come l'emancipazione dell'uomo dalla sua immaturità autoimposta. L'immaturità, secondo Kant, è l'incapacità di usare il proprio intelletto senza la guida di <text:soft-page-break/>qualcun altro. Egli attribuisce questa condizione non a una mancanza di intelligenza, ma piuttosto a una mancanza di coraggio e determinazione. Il celebre motto "Sapere aude!" incarna l'invito ad avere il coraggio di usare la propria ragione.</text:p>
      <text:p text:style-name="P2">Kant attribuisce alla pigrizia e alla viltà la responsabilità del rimanere in uno stato di minorità, nonostante la natura abbia fornito agli uomini gli strumenti per liberarsi dalla guida altrui. Questo stato di minorità volontaria rende facile per altre persone ergersi a "tutori" e mantenere il controllo.</text:p>
      <text:p text:style-name="P2">Kant critica duramente questa dipendenza, sottolineando come molte persone preferiscano delegare il proprio pensiero e la propria autonomia ad altri, sia esso un libro, un direttore spirituale o un medico. Questa dipendenza rende difficile e apparentemente pericoloso il passaggio allo stato di maggiorità, ossia l'uso autonomo della propria ragione.</text:p>
      <text:p text:style-name="P2">La libertà di pensiero non è solo un diritto, ma un dovere che ciascuno deve assumersi per evitare di rimanere intrappolato in uno stato di dipendenza.</text:p>
      <text:p text:style-name="P2">Kant credeva che il progresso dell'illuminismo fosse ostacolato da vari fattori sociali, come le istituzioni religiose e politiche che mantenevano le persone in una condizione di dipendenza e sottomissione. Tuttavia, <text:soft-page-break/>sosteneva che con il coraggio e la volontà di pensare autonomamente, gli individui potevano superare queste barriere e raggiungere un'autentica autonomia intellettuale e morale.</text:p>
      <text:p text:style-name="P2">Kant sottolinea come le regole e le formule, quando usate meccanicamente e senza riflessione critica, possano trasformarsi in catene che impediscono il libero uso dell'intelletto. La mancanza di pratica e di opportunità di esercitare il proprio giudizio autonomo rende difficile, se non impossibile, per molti individui emanciparsi da questo stato di dipendenza.</text:p>
      <text:p text:style-name="P4">Kant vede l'illuminismo come un processo attivo di educazione e autoeducazione, in cui l'individuo deve avere il coraggio di affrontare le sfide del pensiero autonomo. È un cammino arduo che solo pochi riescono a percorrere con successo, ma è essenziale per raggiungere una vera autonomia morale.</text:p>
      <text:p text:style-name="P4">L'immagine del "<text:span text:style-name="T1">salto malsicuro sopra i fossati</text:span>" è potente: anche quando qualcuno riesce a liberarsi delle catene della minorità, il percorso verso l'autonomia è incerto e pieno di insidie, perché non si è abituati a muoversi liberamente. Tuttavia, è un percorso necessario per raggiungere la maturità e l'indipendenza intellettuale e morale.</text:p>
      <text:p text:style-name="P5"><text:soft-page-break/>Kant distingue tra il "pubblico" e il "privato" uso della ragione per evidenziare due contesti in cui l'individuo può esercitare il proprio pensiero critico.</text:p>
      <text:p text:style-name="P6"><text:span text:style-name="T7">Pubblico uso della ragione</text:span>: Si riferisce all'uso della ragione in quanto "studioso" o "cittadino del mondo" che comunica e discute liberamente con un pubblico ampio. È l'uso della ragione in contesti come la stampa, la pubblicazione di articoli, la partecipazione a dibattiti pubblici, ecc. Qui, l'individuo è libero di esprimere le proprie idee e critiche senza restrizioni, contribuendo al progresso della conoscenza e alla formazione di un'opinione pubblica illuminata. L'illuminismo, secondo Kant, richiede che gli individui possano fare libero uso pubblico della ragione per sfidare e superare i pregiudizi.</text:p>
      <text:p text:style-name="P6"><text:span text:style-name="T7">Privato uso della ragione</text:span>: Si riferisce all'uso della ragione in un contesto ristretto e istituzionale, dove l'individuo agisce in una specifica funzione o ruolo, come ad esempio un funzionario pubblico, un soldato, un insegnante o un prete. In queste situazioni, l'individuo deve seguire determinate regole e direttive per mantenere l'ordine e la coerenza nell'organizzazione di cui fa parte. Kant riconosce che in tali contesti l'uso della ragione può essere limitato, poiché è necessario conformarsi alle norme e ai regolamenti.</text:p>
      <text:p text:style-name="P7"><text:soft-page-break/>Così sarebbe assai pernicioso che un ufficiale, cui fu dato un ordine dal suo superiore, volesse in servizio pubblicamente ragionare sull’opportunità e utilità di questo ordine: egli deve obbedire. Ma è iniquo impedirgli in qualità di studioso di fare le sue osservazioni sugli <text:s/>errori commessi nelle operazioni di guerra e di sottoporle al giudizio del suo pubblico. Il cittadino non può rifiutarsi di pagare i tributi che gli sono imposti; e un biasimo inopportuno di tali imposizioni, quando devono essere da lui eseguite, può venir punito come uno scandalo (poiché potrebbe indurre a disubbidienze generali). Tuttavia costui non agisce contro il dovere del cittadino se, come studioso, manifesta apertamente il suo pensiero sulla sconvenienza o anche sull’ingiustizia di queste imposizioni. <text:s/>Così un ecclesiastico è tenuto a insegnare il catechismo agli allievi e alla sua comunità religiosa secondo il credo della chiesa da cui dipende, perché a questa condizione egli è stato assunto: ma come studioso egli ha piena libertà e anzi il compito di comunicare al pubblico tutti i pensieri che un esame severo e benintenzionato gli ha suggerito circa i difetti di quel credo, nonché le sue proposte di riforma della religione e della chiesa. In ciò non v’è nulla di cui la coscienza possa venir incolpata. Ciò che egli insegna in conseguenza del suo ufficio, come funzionario della chiesa, lo espone come qualcosa intorno a cui non ha <text:soft-page-break/>libertà di insegnare secondo le sue proprie idee, ma che ha il compito di insegnare secondo le istruzioni e nel nome di un altro.</text:p>
      <text:p text:style-name="P8">Kant critica fortemente l'idea che una società di ecclesiastici possa obbligarsi a un credo religioso immutabile. Secondo Kant, un tale contratto sarebbe inammissibile perché contrasterebbe con il progresso dell'umanità, <text:span text:style-name="T3">con l’impossibilità </text:span>di liberarsi dagli errori e <text:span text:style-name="T3">in generale dal progredire nell</text:span>'illuminazione.</text:p>
      <text:p text:style-name="P8">Kant sostiene che la libertà di pensiero e il progresso dell'illuminismo non possono essere vincolati da autorità o istituzioni che pretendono di mantenere una tutela perpetua sulle persone. Per lui, è assurdo che coloro che dovrebbero guidare spiritualmente il popolo rimangano essi stessi in uno stato di minorità, perpetuando così l'ignoranza e l'irrazionalità.</text:p>
      <text:p text:style-name="P8">Questa visione di Kant sottolinea l'importanza del continuo esame critico e dell'apertura al cambiamento come elementi fondamentali per il progresso umano. La tutela perpetua è vista come un ostacolo alla libertà di pensiero e alla capacità degli individui di crescere e maturare intellettualmente e moralmente.</text:p>
      <text:p text:style-name="P9">Kant sottolinea l'importanza del pubblico uso della ragione per promuovere il progresso dell'umanità e liberarsi dai pregiudizi. È solo attraverso il libero <text:soft-page-break/>scambio di idee e la critica aperta che la società può avanzare verso l'illuminismo.</text:p>
      <text:p text:style-name="P10">Kant osserva che solo un sovrano illuminato, che non teme le ombre dell'ignoranza e dispone di un'adeguata forza per mantenere la pace, può permettersi di affermare: "<text:span text:style-name="T1">Ragionate quanto volete e su tutto ciò che volete; solamente obbedite!</text:span>". Questa affermazione sottolinea la possibilità di un equilibrio tra la libertà di pensiero e l'ordine pubblico, ma implica anche che la libertà di ragionare deve essere accompagnata dalla responsabilità di mantenere la coesione e la stabilità sociale.</text:p>
      <text:p text:style-name="P10">In una repubblica, dove il potere è diffuso e la governance si basa sul consenso e la partecipazione dei cittadini, tale equilibrio è più difficile da mantenere senza un forte impegno per l'educazione e l'illuminazione delle masse. Kant riconosce che la diffusione dell'illuminismo è un processo graduale che richiede tempo e sforzi collettivi per raggiungere una maturità intellettuale diffusa.</text:p>
      <text:p text:style-name="P10">Federico II di Prussia, a cui Kant si riferi<text:span text:style-name="T4">sce</text:span> nel suo saggio, è spesso visto come un esempio di monarca illuminato che promosse la libertà di pensiero e incoraggiò le riforme sociali e educative, pur mantenendo un forte esercito e un governo centrale.<text:line-break/><text:soft-page-break/>Questa dualità tra la necessità di ordine e la libertà di pensiero continua ad essere una questione rilevante nelle società moderne, dove si cerca costantemente di bilanciare i diritti individuali con le esigenze della comunità.</text:p>
      <text:p text:style-name="P10">Kant crede fermamente che il libero pensiero, una volta sviluppato e coltivato, abbia il potere di trasformare non solo gli individui, ma anche la società nel suo insieme. Questa tendenza al libero pensiero, secondo Kant, porta a una maggiore capacità di libertà di azione tra la popolazione e, col tempo, influisce anche sui principi di governo.<text:line-break/>Kant vede il libero pensiero come un germe prezioso che, una volta cresciuto, cambia il modo in cui le persone percepiscono se stesse e la loro capacità di agire liberamente. Questa evoluzione nel pensiero collettivo costringe i governi a riconoscere la dignità intrinseca degli individui, trattandoli non più come macchine, ma come esseri umani dotati di ragione e autonomia.</text:p>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adornments="Normale"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Noto Sans" fo:font-family="'Noto Sans'" style:font-style-name="Normale"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2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4-11-10T12:33:59.486000000</meta:creation-date>
    <dc:date>2026-04-04T18:46:58.928482734</dc:date>
    <dc:creator>corrado tafaro</dc:creator>
    <meta:editing-duration>PT3H47M9S</meta:editing-duration>
    <meta:editing-cycles>6</meta:editing-cycles>
    <meta:generator>LibreOffice/24.2.7.2$Linux_X86_64 LibreOffice_project/420$Build-2</meta:generator>
    <meta:document-statistic meta:table-count="0" meta:image-count="0" meta:object-count="0" meta:page-count="10" meta:paragraph-count="39" meta:word-count="1784" meta:character-count="12041" meta:non-whitespace-character-count="10299"/>
  </office:meta>
</office:document-meta>
</file>