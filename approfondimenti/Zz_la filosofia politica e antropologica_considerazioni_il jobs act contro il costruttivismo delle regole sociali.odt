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00%" fo:text-align="justify" style:justify-single-word="false"/>
      <style:text-properties fo:font-size="18pt" officeooo:rsid="001e886b" officeooo:paragraph-rsid="001e886b" style:font-size-asian="18pt" style:font-size-complex="18pt"/>
    </style:style>
    <style:style style:name="P3" style:family="paragraph" style:parent-style-name="Standard">
      <style:paragraph-properties fo:margin-top="0.101cm" fo:margin-bottom="0cm" style:contextual-spacing="false" fo:text-align="justify" style:justify-single-word="false"/>
    </style:style>
    <style:style style:name="P4" style:family="paragraph" style:parent-style-name="Standard">
      <style:paragraph-properties fo:margin-top="0.199cm" fo:margin-bottom="0cm" style:contextual-spacing="false"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margin-top="0.199cm" fo:margin-bottom="0cm" style:contextual-spacing="false" fo:line-height="115%" fo:text-align="justify" style:justify-single-word="false"/>
    </style:style>
    <style:style style:name="P9" style:family="paragraph" style:parent-style-name="Standard">
      <style:paragraph-properties fo:margin-top="0.101cm" fo:margin-bottom="0cm" style:contextual-spacing="false" fo:line-height="115%" fo:text-align="justify" style:justify-single-word="false"/>
      <style:text-properties officeooo:paragraph-rsid="001e886b"/>
    </style:style>
    <style:style style:name="P10" style:family="paragraph" style:parent-style-name="Standard">
      <style:paragraph-properties fo:margin-top="0.199cm" fo:margin-bottom="0cm" style:contextual-spacing="false" fo:line-height="115%" fo:text-align="justify" style:justify-single-word="false"/>
      <style:text-properties officeooo:paragraph-rsid="001e886b"/>
    </style:style>
    <style:style style:name="P11" style:family="paragraph" style:parent-style-name="Standard">
      <style:paragraph-properties fo:margin-top="0.101cm" fo:margin-bottom="0cm" style:contextual-spacing="false" fo:line-height="115%" fo:text-align="justify" style:justify-single-word="false"/>
    </style:style>
    <style:style style:name="P12" style:family="paragraph" style:parent-style-name="Standard" style:list-style-name="L1">
      <style:paragraph-properties fo:margin-top="0.199cm" fo:margin-bottom="0cm" style:contextual-spacing="false" fo:line-height="115%" fo:text-align="justify" style:justify-single-word="false"/>
      <style:text-properties officeooo:paragraph-rsid="0020c174"/>
    </style:style>
    <style:style style:name="P13" style:family="paragraph" style:parent-style-name="Standard" style:list-style-name="L1" style:master-page-name="">
      <loext:graphic-properties draw:fill="none"/>
      <style:paragraph-properties fo:margin-left="0cm" fo:margin-right="0cm" fo:margin-top="0.199cm" fo:margin-bottom="0cm" style:contextual-spacing="false" fo:line-height="115%" fo:text-align="justify" style:justify-single-word="false" fo:text-indent="-0.64cm" style:auto-text-indent="false" style:page-number="auto" fo:background-color="transparent"/>
      <style:text-properties officeooo:paragraph-rsid="0020c174"/>
    </style:style>
    <style:style style:name="P14" style:family="paragraph" style:parent-style-name="Standard">
      <style:paragraph-properties fo:margin-top="0.101cm" fo:margin-bottom="0cm" style:contextual-spacing="false" fo:line-height="115%" fo:text-align="justify" style:justify-single-word="false"/>
      <style:text-properties officeooo:paragraph-rsid="0020c174"/>
    </style:style>
    <style:style style:name="P15" style:family="paragraph" style:parent-style-name="Standard">
      <style:paragraph-properties fo:margin-top="0.101cm" fo:margin-bottom="0cm" style:contextual-spacing="false" fo:line-height="115%" fo:text-align="justify" style:justify-single-word="false"/>
      <style:text-properties officeooo:paragraph-rsid="00244f4a"/>
    </style:style>
    <style:style style:name="P16" style:family="paragraph" style:parent-style-name="Standard">
      <style:paragraph-properties fo:margin-top="0.199cm" fo:margin-bottom="0cm" style:contextual-spacing="false" fo:line-height="115%" fo:text-align="justify" style:justify-single-word="false"/>
      <style:text-properties officeooo:paragraph-rsid="0022a573"/>
    </style:style>
    <style:style style:name="P17" style:family="paragraph" style:parent-style-name="Standard" style:list-style-name="L1">
      <style:paragraph-properties fo:margin-top="0.101cm" fo:margin-bottom="0cm" style:contextual-spacing="false" fo:line-height="115%"/>
      <style:text-properties officeooo:paragraph-rsid="0020c174"/>
    </style:style>
    <style:style style:name="P18" style:family="paragraph" style:parent-style-name="Standard">
      <style:paragraph-properties fo:margin-top="0.199cm" fo:margin-bottom="0cm" style:contextual-spacing="false" fo:line-height="115%"/>
    </style:style>
    <style:style style:name="P19" style:family="paragraph" style:parent-style-name="Standard">
      <style:paragraph-properties fo:margin-top="0.101cm" fo:margin-bottom="0cm" style:contextual-spacing="false" fo:line-height="115%"/>
    </style:style>
    <style:style style:name="P20" style:family="paragraph" style:parent-style-name="Standard">
      <style:paragraph-properties fo:line-height="115%" fo:text-align="justify" style:justify-single-word="false"/>
      <style:text-properties officeooo:rsid="0022a573" officeooo:paragraph-rsid="0022a573"/>
    </style:style>
    <style:style style:name="P21" style:family="paragraph" style:parent-style-name="Standard">
      <style:paragraph-properties fo:margin-top="0.101cm" fo:margin-bottom="0cm" style:contextual-spacing="false" fo:line-height="115%" fo:text-align="justify" style:justify-single-word="false"/>
      <style:text-properties officeooo:rsid="0022a573" officeooo:paragraph-rsid="0022a573"/>
    </style:style>
    <style:style style:name="P22" style:family="paragraph" style:parent-style-name="Standard">
      <style:paragraph-properties fo:margin-top="0.199cm" fo:margin-bottom="0cm" style:contextual-spacing="false" fo:line-height="115%" fo:text-align="justify" style:justify-single-word="false"/>
      <style:text-properties officeooo:rsid="0022a573" officeooo:paragraph-rsid="0022a573"/>
    </style:style>
    <style:style style:name="P23" style:family="paragraph" style:parent-style-name="Standard">
      <style:paragraph-properties fo:margin-top="0.199cm" fo:margin-bottom="0cm" style:contextual-spacing="false" fo:line-height="115%"/>
      <style:text-properties officeooo:rsid="0022a573" officeooo:paragraph-rsid="0022a573"/>
    </style:style>
    <style:style style:name="P24" style:family="paragraph" style:parent-style-name="Standard">
      <style:paragraph-properties fo:margin-top="0.199cm" fo:margin-bottom="0cm" style:contextual-spacing="false" fo:line-height="115%"/>
      <style:text-properties fo:font-size="16pt" officeooo:rsid="0022a573" officeooo:paragraph-rsid="0022a573" style:font-size-asian="16pt" style:font-size-complex="16pt"/>
    </style:style>
    <style:style style:name="P25" style:family="paragraph" style:parent-style-name="Standard">
      <style:paragraph-properties fo:margin-top="0.199cm" fo:margin-bottom="0cm" style:contextual-spacing="false"/>
    </style:style>
    <style:style style:name="T1" style:family="text">
      <style:text-properties officeooo:rsid="001e886b"/>
    </style:style>
    <style:style style:name="T2" style:family="text">
      <style:text-properties officeooo:rsid="0020c174"/>
    </style:style>
    <style:style style:name="T3" style:family="text">
      <style:text-properties officeooo:rsid="0022a573"/>
    </style:style>
    <style:style style:name="T4" style:family="text">
      <style:text-properties officeooo:rsid="00244f4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era discussione con Gemini sugli argomenti trattati da Friedrich von Hayek nel suo libro <text:s/>“Leggi, Legislazione e Libertà”.</text:p>
      <text:p text:style-name="P1"/>
      <text:p text:style-name="P1"><text:span text:style-name="T1">D: </text:span><text:span text:style-name="T4">M</text:span>i è capitato di ascoltare un dibattito tra i 4 promotori del campo largo, <text:span text:style-name="T1">(Schlein, Conte, Pratoianni e Bonelli </text:span><text:span text:style-name="T2">19/06/26</text:span><text:span text:style-name="T1">) </text:span><text:span text:style-name="T2">alla presenza di una platea della Fiom, </text:span>dove si condannava quella riforma del Jobs Act voluta da un precedente capo di governo. Leggendo il libro di von Hayek "<text:span text:style-name="T1">L</text:span>egge, <text:span text:style-name="T1">L</text:span>egislazione e <text:span text:style-name="T1">L</text:span>ibertà" mi sono convinto, lo ero anche prima, che non tutto può essere pianificato secondo il costruttivismo delle regole sociali, perché, inevitabilmente una società basata su queste regole è destinata a fallire. Ricordo che negli anni antecedenti la rifirma del Job's Act , le menti libere da preconcetti politici, auspicavano una maggiore flessibilità del mercato del lavoro perché così come era stato progett<text:span text:style-name="T1">a</text:span>to, legge dopo legge, era troppo rigido <text:s/>e di ostacolo alla libera circolazione della forza lavoro. Se i dati Istat dicono il vero, la crescita dell'occupazione costante e continua può riflettersi su quella riforma che ha dato respiro all'asfittico mercato del lavoro pre-riforma? Cosa ne pensi? </text:p>
      <text:p text:style-name="P6"/>
      <text:p text:style-name="P1"><text:soft-page-break/><text:span text:style-name="T1">R: </text:span>Hai toccato un tema caldissimo che si presta a una lettura straordinariamente lucida attraverso le lenti hayekiane.</text:p>
      <text:p text:style-name="P8">Il dibattito politico attuale sul Jobs Act (la riforma del lavoro varata nel 2014-2015 dal governo Renzi) riproduce quasi millimetricamente lo scontro teorico tra il “costruttivismo della Thesis” (la pretesa di pianificare il mercato e proteggere ogni singola posizione tramite decreti) e la logica del “Nomos” (la necessità di regole astratte che permettano l'adattamento spontaneo e la circolazione delle risorse).</text:p>
      <text:p text:style-name="P9">Ecco un'analisi della questione, incrociando la teoria di Hayek con i dati della realtà economica.</text:p>
      <text:p text:style-name="P10">1. La prospettiva hayekiana: <text:span text:style-name="T4">l</text:span>a rigidità come "falsa concezione"</text:p>
      <text:p text:style-name="P8">Prima della riforma, il mercato del lavoro italiano (dominato dal vecchio impianto dell'Articolo 18 dello Statuto dei Lavoratori) era il perfetto esempio di ciò che Hayek condannava: la legge usata non per garantire una cornice di giustizia uguale per tutti, ma per garantire un “risultato economico specifico” (la stabilità assoluta del posto di lavoro per chi era già dentro).</text:p>
      <text:p text:style-name="P11">Questo approccio costruttivista produceva, secondo la logica di Hayek, due distorsioni simmetriche:</text:p>
      <text:list text:style-name="L1">
        <text:list-item>
          <text:p text:style-name="P12">L'asfissia dell'ordine spontaneo</text:p>
          <text:p text:style-name="P13"><text:soft-page-break/>Bloccando la flessibilità in uscita, si scoraggiava l'ingresso. Le imprese, non potendo calcolare il rischio di un'assunzione permanente in caso di crisi, preferivano non assumere o ricorrere a contratti precari. Il mercato smetteva di essere quel "processo di scoperta" in cui la forza lavoro si sposta spontaneamente dove è più produttiva.</text:p>
        </text:list-item>
        <text:list-item>
          <text:p text:style-name="P17">La creazione di privilegi legali</text:p>
        </text:list-item>
      </text:list>
      <text:p text:style-name="P14">Si creava una profonda asimmetria tra gli "insider" (iper-tutelati) e gli "outsider" (giovani e precari senza tutele), frammentando l'universalità del diritto.</text:p>
      <text:p text:style-name="P18">2. Il Jobs Act come parziale ritorno alla flessibilità</text:p>
      <text:p text:style-name="P11">Il Jobs Act, introducendo il contratto a tutele crescenti e superando la reintegra sul posto di lavoro per i licenziamenti economici, ha tentato di scardinare questa rigidità progettata dall'alto. L'idea di fondo era economica e fattuale: ridurre il "costo del rischio" dell'assunzione per fluidificare il mercato.</text:p>
      <text:p text:style-name="P11">I dati Istat storici e i trend consolidati mostrano effettivamente un aumento costante dell'occupazione negli anni successivi alla riforma, con il tasso di occupazione che ha raggiunto record storici anche nelle rilevazioni più recenti.</text:p>
      <text:p text:style-name="P18">La riforma è la causa di questo successo?</text:p>
      <text:p text:style-name="P18"><text:soft-page-break/>Da un punto di vista economico, la risposta richiede un distinguo che lo stesso Hayek avrebbe apprezzato:</text:p>
      <text:p text:style-name="P8">1. L'effetto di sblocco (La tesi a favore): Riducendo i vincoli burocratici e la paura del contenzioso giudiziario, la riforma ha indubbiamente rimosso una barriera psicologica e legale per le imprese. Ha permesso al mercato del lavoro di muoversi con maggiore agilità, assecondando le fasi di ripresa economica. In questo senso, ha "dato respiro" all'ordine spontaneo dello scambio.</text:p>
      <text:p text:style-name="P8">2. La variabile degli incentivi (La complessità economica): Il Jobs Act non è stato un puro esercizio di deregolamentazione hayekiana. Fu accompagnato da massicci sgravi contributivi statali per le nuove assunzioni. Molti economisti notano che la crescita iniziale dei contratti stabili fu drogata da questi incentivi. Quando gli sgravi sono terminati, il ritmo è cambiato, dimostrando che la politica aveva tentato un ennesimo micro-intervento pianificato (il sussidio) invece di fidarsi solo della flessibilità strutturale.</text:p>
      <text:p text:style-name="P15">Quando le forze politiche del "campo largo" condannano in blocco quella stagione, spesso lo fanno partendo da una premessa costruttivista: l'idea che la precarietà o i bassi salari si curino per decreto (ad esempio introducendo il salario minimo o reintroducendo i vecchi <text:soft-page-break/>vincoli sui licenziamenti). L'obiezione di chi condivide l'approccio di “Legge, legislazione e libertà” è che il lavoro non si crea imponendolo per legge, così come il valore di un bene non si stabilisce fissandone il prezzo. Se la legge impone rigidità superiori alla capacità del mercato di assorbirle, l'effetto non sarà la protezione del lavoratore, ma la contrazione delle assunzioni, il ricorso al sommerso o la paralisi della mobilità sociale.</text:p>
      <text:p text:style-name="P11">In conclusione, la riforma ha rimosso dei blocchi costruttivisti che paralizzavano il sistema. I dati positivi sull'occupazione riflettono in buona parte questa ritrovata capacità del mercato di autoregolarsi e far circolare la forza lavoro, anche se il legislatore dell'epoca non ha saputo resistere alla tentazione di mescolare la libertà delle regole con l'artificio degli incentivi fiscali.</text:p>
      <text:p text:style-name="P1"/>
      <text:p text:style-name="P1"><text:span text:style-name="T3">D: </text:span>Spiega l'analisi di Hayek sugli effetti dell'intervento statale e sindacale nella determinazione dei salari e dell'occupazione.</text:p>
      <text:p text:style-name="P16"><text:span text:style-name="T3">R: L'analisi di Friedrich von Hayek sugli effetti dell'intervento statale e sindacale nella determinazione dei salari e dell'occupazione tocca uno dei punti più critici della sua teoria economica e sociale. Per Hayek, il salario non è una variabile politica o un premio morale che si può stabilire per legge, ma un “prezzo” — il </text:span><text:soft-page-break/><text:span text:style-name="T3">prezzo del lavoro — che svolge una funzione informativa insostituibile.</text:span></text:p>
      <text:p text:style-name="P21">Quando lo Stato (attraverso leggi sul salario minimo o decreti) o i sindacati (attraverso la contrattazione collettiva monopolistica) impongono salari superiori a quelli che si fisserebbero spontaneamente sul mercato, distorcono i segnali economici reali. Il risultato, secondo Hayek, è l'esatto opposto di quanto promesso: si crea disoccupazione strutturale e si danneggiano proprio le fasce più deboli della società.</text:p>
      <text:p text:style-name="P21">Ecco come si articola la sua critica in tre punti fondamentali:</text:p>
      <text:p text:style-name="P23">1. La distruzione della funzione informativa del salario</text:p>
      <text:p text:style-name="P21">Nel libero mercato, i prezzi e i salari fluttuano per segnalare dove c'è scarsità o abbondanza di risorse.</text:p>
      <text:p text:style-name="P21">- Se in un settore c'è forte richiesta di competenze, i salari salgono, attirando lavoratori da altri comparti (processo di scoperta e circolazione spontanea).</text:p>
      <text:p text:style-name="P21">- Se lo Stato o i sindacati impongono dall'alto un livello salariale rigido e uniforme, questo meccanismo si spegne. Il salario cessa di riflettere la reale produttività del lavoro e la scarsità relativa di una competenza. Le imprese non possono più usare la leva salariale per adattarsi ai mutamenti economici dell'ordine spontaneo.</text:p>
      <text:p text:style-name="P23">2. Il legame diretto tra rigidità salariale e disoccupazione</text:p>
      <text:p text:style-name="P22"><text:soft-page-break/>Il nucleo della teoria del lavoro di Hayek è spietatamente logico: “se il prezzo del lavoro viene mantenuto artificialmente al di sopra del suo valore di mercato, la domanda di lavoro diminuirà.”</text:p>
      <text:p text:style-name="P21">“L'illusione sindacale:” I sindacati, operando come veri e propri "monopolisti" dell'offerta di lavoro, impongono contratti collettivi validi per interi settori. Se un'azienda attraversa una crisi o opera in una regione economicamente svantaggiata, non può negoziare un salario temporaneamente più basso per salvare i posti di lavoro.</text:p>
      <text:p text:style-name="P20">“La sanzione del mercato:” Non potendo abbassare il prezzo (il salario), l'impresa è costretta a ridurre la quantità (licenziando o smettendo di assumere). Per Hayek, la disoccupazione di massa del XX secolo non è un fallimento del capitalismo, ma il prodotto diretto dei salari rigidi imposti dal potere sindacale e protetti dalle leggi statali.</text:p>
      <text:p text:style-name="P22">3. La creazione di privilegi e l'esclusione degli "Outsider"</text:p>
      <text:p text:style-name="P21">L'aspetto più politicamente graffiante dell'analisi di Hayek è la denuncia delle asimmetrie sociali causate dall'interventismo. Chi beneficia davvero dei minimi salariali e delle tutele rigide?</text:p>
      <text:p text:style-name="P21"><text:soft-page-break/>I sindacati e le leggi costruttiviste proteggono gli "insider" (coloro che hanno già un impiego sicuro), scaricando l'intero costo della rigidità economica sugli "outsider" (i giovani, i disoccupati, i lavoratori meno qualificati).</text:p>
      <text:p text:style-name="P21">Se per legge un datore di lavoro non può pagare meno di una certa cifra fissa, non assumerà un giovane inesperto o un lavoratore da riqualificare, perché la loro produttività iniziale non copre quel costo minimo obbligatorio. Quel lavoratore debole viene legalmente escluso dal mercato del lavoro, condannato alla disoccupazione o al sommerso. L'intervento statale, nato con intenzioni solidali, si trasforma in una barriera d'accesso escludente.</text:p>
      <text:p text:style-name="P24">La soluzione hayekiana</text:p>
      <text:p text:style-name="P21">La via d'uscita per Hayek non è la miseria dei lavoratori, ma la “piena occupazione attraverso la flessibilità”. In un mercato dove i salari sono liberi di adattarsi, la <text:s/>disoccupazione tende a zero perché il prezzo del lavoro si adegua costantemente alle condizioni reali dell'economia.</text:p>
      <text:p text:style-name="P21">I salari reali e il tenore di vita aumentano non grazie ai decreti della politica (Thesis), ma grazie all'accumulazione di capitale, all'innovazione e all'aumento della produttività generale che solo un ordine spontaneo e libero da lacci può generare.</text:p>
      <text:p text:style-name="P1"><text:soft-page-break/>Per approfondire la teoria di Hayek su salari, occupazione e potere sindacale, non c'è un unico testo da consultare, ma un filo conduttore che attraversa tutta la sua produzione, evolvendo da un'analisi prettamente monetaria e macroeconomica negli anni '30 a una critica più prettamente istituzionale e giuridica negli anni '60 e '70.</text:p>
      <text:p text:style-name="P19">I quattro scritti fondamentali in cui Hayek affronta in modo sistematico e approfondito questa tematica sono i seguenti:</text:p>
      <text:p text:style-name="P25">1. The Constitution of Liberty (La società libera) – 1960</text:p>
      <text:p text:style-name="P8">È probabilmente il testo chiave per comprendere la sua critica sociale e politica ai sindacati. In particolare, il Capitolo 18 (Labor Unions and Employment) è interamente dedicato a questo tema.</text:p>
      <text:p text:style-name="P11">Cosa analizza: Qui Hayek spiega come i sindacati si siano trasformati da associazioni spontanee per la tutela dei lavoratori (che lui considerava legittime e persino utili all'origine) in veri e propri monopoli coercitivi protetti dallo Stato. Analizza in dettaglio come la contrat­tazione collettiva centralizzata crei disoccupazione e in­flazione, e come l'illusione di poter aumentare i salari reali per decreto o tramite sciopero danneggi in ultima istanza la classe lavoratrice nel suo complesso.</text:p>
      <text:p text:style-name="Standard"/>
      <text:p text:style-name="P5"><text:soft-page-break/>2. Law, Legislation and Liberty (Legge, legislazione e libertà) – 1973-1979</text:p>
      <text:p text:style-name="P8">Nel testo che stai leggendo, la critica si sposta sul piano del diritto e delle "false concezioni" politiche della giustizia distributiva.</text:p>
      <text:p text:style-name="P11">Cosa analizza: Soprattutto nel Volume 2 (Il miraggio della giustizia sociale), Hayek dimostra che il tentativo di pianificare la remunerazione del lavoro in base a criteri di "merito" o "bisogno" distrugge l'ordine spontaneo del mercato (Cosmos). Nel Volume 3 (L'ordine politico di un popolo libero), argomenta che la sottomissione dei governi democratici ai ricatti delle corporazioni e dei sindacati è una delle cause principali del declino delle democrazie moderne, poiché costringe il legislatore a emanare norme particolari e discriminatorie (Thesis) invece di leggi generali e astratte.</text:p>
      <text:p text:style-name="P4">3. 1980s Unemployment and the Unions (La disoccupazione negli anni '80 e i sindacati) – 1980</text:p>
      <text:p text:style-name="P3">Questo è un saggio più breve e specificamente economico, pubblicato dall'Institute of Economic Affairs (IEA) proprio all'alba della stagione delle riforme della Thatcher nel Regno Unito.</text:p>
      <text:p text:style-name="P11">Cosa analizza: È un testo di sferzante attualità per l'epoca (e per la nostra). Hayek vi espone una tesi netta: la disoccupazione di massa degli anni '70 e '80 non è causata da carenze di domanda (contro la tesi <text:soft-page-break/>keynesiana), ma dalla rigidità dei salari reali indotta dal potere sindacale. Spiega che l'unico modo per riassorbire la disoccupazione strutturale è restituire flessibilità ai prezzi del lavoro, permettendo al mercato di riequilibrarsi spontaneamente.</text:p>
      <text:p text:style-name="P25">4. Prices and Production (Prezzi e produzione) – 1931</text:p>
      <text:p text:style-name="P8">Se vuoi risalire alle radici strettamente teoriche e macroeconomiche del suo pensiero, questo è il libro (derivato dalle sue lezioni alla London School of Economics) che lo rese celebre e che accese il grande dibattito con John Maynard Keynes.</text:p>
      <text:p text:style-name="P1">Cosa analizza: Anche se incentrato sulla teoria del ciclo economico e della moneta, questo testo mostra come le politiche di "denaro facile" e tassi d'interesse artificialmente bassi (usate dai governi per stimolare artificialmente l'occupazione) creino una cattiva allocazione delle risorse (malinvestment). Per Hayek, l'occupazione artificiale creata dall'inflazione è un'illusione che prima o poi si scontra con la realtà, provocando crisi ancora più dure e disoccupazione reale.</text:p>
      <text:p text:style-name="Standard"/>
      <text:p text:style-name="P1">Una curiosità: Nel suo celebre discorso di accettazione del Premio Nobel nel 1974, intitolato The Pretence of Knowledge (La presunzione del sapere), Hayek scelse di dedicare una parte significativa della sua allocuzione proprio all'errore commesso dagli economisti nel credere <text:soft-page-break/>che esistesse una correlazione semplice e manipolabile tra inflazione e occupazione, ribadendo che la disoccupazione è causata da discrepanze nella struttura dei prezzi e dei salari relativi.</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6-13T18:39:13.297438106</meta:creation-date>
    <dc:date>2026-06-21T19:40:48.081716659</dc:date>
    <dc:creator>corrado tafaro</dc:creator>
    <meta:editing-duration>PT1H4M34S</meta:editing-duration>
    <meta:editing-cycles>6</meta:editing-cycles>
    <meta:generator>LibreOffice/24.2.7.2$Linux_X86_64 LibreOffice_project/420$Build-2</meta:generator>
    <meta:document-statistic meta:table-count="0" meta:image-count="0" meta:object-count="0" meta:page-count="12" meta:paragraph-count="55" meta:word-count="2047" meta:character-count="13746" meta:non-whitespace-character-count="11747"/>
  </office:meta>
</office:document-meta>
</file>