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svg:font-family="'Noto Serif'" style:font-adornments="Normale" style:font-family-generic="roman" style:font-pitch="variable"/>
    <style:font-face style:name="Noto Serif CJK SC" svg:font-family="'Noto Serif CJK SC'" style:font-family-generic="system" style:font-pitch="variable"/>
  </office:font-face-decls>
  <office:automatic-styles>
    <style:style style:name="P1"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paragraph-rsid="000ea709" style:font-size-asian="12pt" style:font-size-complex="12pt"/>
    </style:style>
    <style:style style:name="P2"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officeooo:paragraph-rsid="000ea709" style:font-size-asian="12pt" style:font-size-complex="12pt"/>
    </style:style>
    <style:style style:name="P3" style:family="paragraph" style:parent-style-name="Standard">
      <style:paragraph-properties fo:margin-top="0.101cm" fo:margin-bottom="0cm" style:contextual-spacing="false" fo:line-height="115%" fo:text-align="justify" style:justify-single-word="false"/>
      <style:text-properties style:font-name="Noto Sans1" fo:font-size="12pt" fo:font-style="normal" fo:font-weight="normal" officeooo:rsid="001c02ae" officeooo:paragraph-rsid="000ea709" style:font-size-asian="12pt" style:font-style-asian="normal" style:font-weight-asian="normal" style:font-size-complex="12pt" style:font-style-complex="normal" style:font-weight-complex="normal"/>
    </style:style>
    <style:style style:name="P4"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style="normal" officeooo:rsid="001c02ae" officeooo:paragraph-rsid="000ea709" style:font-size-asian="12pt" style:font-style-asian="normal" style:font-size-complex="12pt" style:font-style-complex="normal"/>
    </style:style>
    <style:style style:name="P5"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weight="bold" officeooo:paragraph-rsid="000ea709" style:font-size-asian="12pt" style:font-weight-asian="bold" style:font-size-complex="12pt" style:font-weight-complex="bold"/>
    </style:style>
    <style:style style:name="P6" style:family="paragraph" style:parent-style-name="Quotations">
      <style:paragraph-properties fo:margin-top="0.101cm" fo:margin-bottom="0cm" style:contextual-spacing="false" fo:line-height="100%" fo:text-align="center" style:justify-single-word="false"/>
      <style:text-properties fo:font-size="9pt" officeooo:paragraph-rsid="0011d62e" style:font-size-asian="9pt" style:font-size-complex="9pt"/>
    </style:style>
    <style:style style:name="P7" style:family="paragraph" style:parent-style-name="Text_20_body">
      <style:paragraph-properties fo:line-height="100%" fo:text-align="justify" style:justify-single-word="false"/>
      <style:text-properties fo:font-size="9pt" style:font-size-asian="9pt" style:font-size-complex="9pt"/>
    </style:style>
    <style:style style:name="P8" style:family="paragraph" style:parent-style-name="Text_20_body">
      <style:paragraph-properties fo:margin-top="0cm" fo:margin-bottom="0cm" style:contextual-spacing="false" fo:line-height="100%" fo:text-align="justify" style:justify-single-word="false"/>
      <style:text-properties fo:font-size="9pt" style:font-size-asian="9pt" style:font-size-complex="9pt"/>
    </style:style>
    <style:style style:name="P9" style:family="paragraph" style:parent-style-name="Text_20_body">
      <style:paragraph-properties fo:margin-top="0.101cm" fo:margin-bottom="0cm" style:contextual-spacing="false" fo:line-height="100%" fo:text-align="justify" style:justify-single-word="false"/>
    </style:style>
    <style:style style:name="P10" style:family="paragraph" style:parent-style-name="Footnote">
      <style:paragraph-properties fo:text-align="justify" style:justify-single-word="false"/>
      <style:text-properties style:font-name="Noto Sans1" officeooo:rsid="01fc8fbf" officeooo:paragraph-rsid="01fc8fbf"/>
    </style:style>
    <style:style style:name="P11" style:family="paragraph" style:parent-style-name="Footnote">
      <style:paragraph-properties fo:text-align="justify" style:justify-single-word="false"/>
      <style:text-properties fo:font-size="9pt" style:font-size-asian="9pt" style:font-size-complex="9pt"/>
    </style:style>
    <style:style style:name="P12" style:family="paragraph" style:parent-style-name="Heading_20_2">
      <style:text-properties officeooo:paragraph-rsid="0015bede"/>
    </style:style>
    <style:style style:name="P13" style:family="paragraph" style:parent-style-name="Heading_20_3">
      <style:paragraph-properties fo:line-height="115%" fo:text-align="justify" style:justify-single-word="false"/>
      <style:text-properties style:font-name="Noto Sans1" fo:font-size="12pt" officeooo:paragraph-rsid="000ea709" style:font-size-asian="12pt" style:font-size-complex="12pt"/>
    </style:style>
    <style:style style:name="P14" style:family="paragraph" style:parent-style-name="Heading_20_3">
      <style:text-properties style:font-name="Noto Sans1" fo:font-size="12pt" officeooo:paragraph-rsid="0013d0ee" style:font-size-asian="12pt" style:font-size-complex="12pt"/>
    </style:style>
    <style:style style:name="P15" style:family="paragraph" style:parent-style-name="Heading_20_3">
      <style:paragraph-properties fo:margin-top="0.199cm" fo:margin-bottom="0cm" style:contextual-spacing="false"/>
      <style:text-properties style:font-name="Noto Sans1" fo:font-size="12pt" officeooo:paragraph-rsid="0013d0ee" style:font-size-asian="12pt" style:font-size-complex="12pt"/>
    </style:style>
    <style:style style:name="P16" style:family="paragraph" style:parent-style-name="Heading_20_3">
      <style:paragraph-properties fo:margin-top="0.199cm" fo:margin-bottom="0cm" style:contextual-spacing="false"/>
      <style:text-properties officeooo:paragraph-rsid="0015bede"/>
    </style:style>
    <style:style style:name="P17"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weight="normal" officeooo:rsid="0074f4cc" officeooo:paragraph-rsid="0015bede" style:font-size-asian="10.5pt" style:font-weight-asian="normal" style:font-size-complex="12pt" style:font-weight-complex="normal"/>
    </style:style>
    <style:style style:name="P18"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weight="normal" officeooo:rsid="0074f4cc" officeooo:paragraph-rsid="0015bede" style:font-size-asian="10.5pt" style:font-weight-asian="normal" style:font-size-complex="12pt" style:font-weight-complex="normal"/>
    </style:style>
    <style:style style:name="P19"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weight="normal" officeooo:rsid="0074f4cc" officeooo:paragraph-rsid="0015bede" style:font-size-asian="10.5pt" style:font-weight-asian="normal" style:font-size-complex="12pt" style:font-weight-complex="normal"/>
    </style:style>
    <style:style style:name="P20" style:family="paragraph" style:parent-style-name="Standard" style:master-page-name="">
      <loext:graphic-properties draw:fill="none"/>
      <style:paragraph-properties fo:margin-left="0cm" fo:margin-right="0cm" fo:margin-top="0.199cm" fo:margin-bottom="0cm" style:contextual-spacing="false" fo:line-height="115%" fo:text-align="justify" style:justify-single-word="false" fo:text-indent="0cm" style:auto-text-indent="false" style:page-number="auto" fo:background-color="transparent"/>
      <style:text-properties style:font-name="Noto Sans1" fo:font-size="12pt" fo:font-weight="normal" officeooo:rsid="0074f4cc" officeooo:paragraph-rsid="0015bede" style:font-size-asian="10.5pt" style:font-weight-asian="normal" style:font-size-complex="12pt" style:font-weight-complex="normal"/>
    </style:style>
    <style:style style:name="P21"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style="normal" fo:font-weight="normal" officeooo:rsid="001c02ae" officeooo:paragraph-rsid="0015bede" style:font-size-asian="10.5pt" style:font-style-asian="normal" style:font-weight-asian="normal" style:font-size-complex="12pt" style:font-style-complex="normal" style:font-weight-complex="normal"/>
    </style:style>
    <style:style style:name="P22" style:family="paragraph" style:parent-style-name="Standard">
      <style:paragraph-properties fo:margin-top="0.101cm" fo:margin-bottom="0cm" style:contextual-spacing="false" fo:line-height="115%" fo:text-align="justify" style:justify-single-word="false"/>
      <style:text-properties style:font-name="Noto Sans1" fo:font-size="12pt" fo:font-style="normal" fo:font-weight="normal" officeooo:rsid="001c02ae" officeooo:paragraph-rsid="0015bede" style:font-size-asian="12pt" style:font-style-asian="normal" style:font-weight-asian="normal" style:font-size-complex="12pt" style:font-style-complex="normal" style:font-weight-complex="normal"/>
    </style:style>
    <style:style style:name="P23" style:family="paragraph" style:parent-style-name="Standard">
      <style:paragraph-properties fo:margin-top="0.199cm" fo:margin-bottom="0cm" style:contextual-spacing="false" fo:line-height="115%" fo:text-align="justify" style:justify-single-word="false"/>
      <style:text-properties style:font-name="Noto Sans1" fo:font-size="12pt" officeooo:paragraph-rsid="0013d0ee" style:font-size-asian="12pt" style:font-size-complex="12pt"/>
    </style:style>
    <style:style style:name="P24" style:family="paragraph" style:parent-style-name="Standard">
      <style:paragraph-properties fo:margin-top="0.101cm" fo:margin-bottom="0cm" style:contextual-spacing="false" fo:line-height="115%" fo:text-align="justify" style:justify-single-word="false"/>
      <style:text-properties style:font-name="Noto Sans1" fo:font-size="12pt" officeooo:paragraph-rsid="0013d0ee" style:font-size-asian="12pt" style:font-size-complex="12pt"/>
    </style:style>
    <style:style style:name="P25"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paragraph-rsid="0013d0ee" style:font-size-asian="12pt" style:font-size-complex="12pt"/>
    </style:style>
    <style:style style:name="P26"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officeooo:paragraph-rsid="0013d0ee" style:font-size-asian="12pt" style:font-size-complex="12pt"/>
    </style:style>
    <style:style style:name="P27"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style="normal" officeooo:rsid="001c02ae" officeooo:paragraph-rsid="0013d0ee" style:font-size-asian="12pt" style:font-style-asian="normal" style:font-size-complex="12pt" style:font-style-complex="normal"/>
    </style:style>
    <style:style style:name="P28"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499cm" style:auto-text-indent="false" fo:background-color="transparent"/>
      <style:text-properties style:font-name="Noto Sans1" fo:font-size="12pt" fo:font-weight="normal" officeooo:rsid="004370ad" officeooo:paragraph-rsid="0013d0ee" style:font-size-asian="12pt" style:font-weight-asian="normal" style:font-size-complex="12pt" style:font-weight-complex="normal"/>
    </style:style>
    <style:style style:name="P29" style:family="paragraph" style:parent-style-name="Standard">
      <style:paragraph-properties fo:margin-top="0.101cm" fo:margin-bottom="0cm" style:contextual-spacing="false" fo:line-height="115%" fo:text-align="justify" style:justify-single-word="false"/>
      <style:text-properties style:font-name="Noto Sans1" fo:font-size="12pt" fo:font-weight="normal" officeooo:rsid="004370ad" officeooo:paragraph-rsid="0013d0ee" style:font-size-asian="12pt" style:font-weight-asian="normal" style:font-size-complex="12pt" style:font-weight-complex="normal"/>
    </style:style>
    <style:style style:name="P30" style:family="paragraph" style:parent-style-name="Standard" style:master-page-name="">
      <loext:graphic-properties draw:fill="none"/>
      <style:paragraph-properties fo:margin-left="0cm" fo:margin-right="0cm" fo:margin-top="0.199cm" fo:margin-bottom="0cm" style:contextual-spacing="false" fo:line-height="115%" fo:text-align="justify" style:justify-single-word="false" fo:text-indent="0cm" style:auto-text-indent="false" style:page-number="auto" fo:background-color="transparent"/>
      <style:text-properties style:font-name="Noto Sans1" fo:font-size="12pt" fo:font-weight="normal" officeooo:rsid="004370ad" officeooo:paragraph-rsid="0013d0ee" style:font-size-asian="12pt" style:font-weight-asian="normal" style:font-size-complex="12pt" style:font-weight-complex="normal"/>
    </style:style>
    <style:style style:name="P31" style:family="paragraph" style:parent-style-name="Standard" style:master-page-name="">
      <loext:graphic-properties draw:fill="none"/>
      <style:paragraph-properties fo:margin-left="0cm" fo:margin-right="0cm" fo:margin-top="0.199cm" fo:margin-bottom="0cm" style:contextual-spacing="false" fo:line-height="115%" fo:text-align="justify" style:justify-single-word="false" fo:text-indent="0cm" style:auto-text-indent="false" style:page-number="auto" fo:background-color="transparent"/>
      <style:text-properties style:font-name="Noto Sans1" fo:font-size="12pt" fo:font-weight="normal" officeooo:rsid="004370ad" officeooo:paragraph-rsid="0013d0ee" style:font-size-asian="12pt" style:font-weight-asian="normal" style:font-size-complex="12pt" style:font-weight-complex="normal"/>
    </style:style>
    <style:style style:name="P32"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weight="normal" officeooo:rsid="004370ad" officeooo:paragraph-rsid="0013d0ee" style:font-size-asian="12pt" style:font-weight-asian="normal" style:font-size-complex="12pt" style:font-weight-complex="normal"/>
    </style:style>
    <style:style style:name="P33"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weight="normal" officeooo:rsid="004370ad" officeooo:paragraph-rsid="0013d0ee" style:font-size-asian="12pt" style:font-weight-asian="normal" style:font-size-complex="12pt" style:font-weight-complex="normal"/>
    </style:style>
    <style:style style:name="P34"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weight="normal" officeooo:rsid="004370ad" officeooo:paragraph-rsid="0013d0ee" style:font-size-asian="12pt" style:font-weight-asian="normal" style:font-size-complex="12pt" style:font-weight-complex="normal"/>
    </style:style>
    <style:style style:name="P35" style:family="paragraph" style:parent-style-name="Standard">
      <style:paragraph-properties fo:margin-top="0.101cm" fo:margin-bottom="0cm" style:contextual-spacing="false" fo:line-height="115%" fo:text-align="center" style:justify-single-word="false"/>
      <style:text-properties style:font-name="Noto Sans1" fo:font-size="12pt" fo:font-weight="normal" officeooo:rsid="004370ad" officeooo:paragraph-rsid="0013d0ee" style:font-size-asian="12pt" style:font-weight-asian="normal" style:font-size-complex="12pt" style:font-weight-complex="normal"/>
    </style:style>
    <style:style style:name="T1" style:family="text">
      <style:text-properties style:font-name="Noto Sans1"/>
    </style:style>
    <style:style style:name="T2" style:family="text">
      <style:text-properties style:font-name="Noto Sans1" fo:font-size="12pt" fo:font-style="normal" fo:font-weight="normal" officeooo:rsid="001c02ae" style:font-size-asian="12pt" style:font-style-asian="normal" style:font-weight-asian="normal" style:font-size-complex="12pt" style:font-style-complex="normal" style:font-weight-complex="normal"/>
    </style:style>
    <style:style style:name="T3" style:family="text">
      <style:text-properties style:font-name="Noto Sans1" fo:font-size="12pt" fo:font-style="normal" fo:font-weight="normal" officeooo:rsid="001c02ae" style:font-size-asian="10.5pt" style:font-style-asian="normal" style:font-weight-asian="normal" style:font-size-complex="12pt" style:font-style-complex="normal" style:font-weight-complex="normal"/>
    </style:style>
    <style:style style:name="T4" style:family="text">
      <style:text-properties style:font-name="Noto Sans1" fo:font-size="12pt" fo:font-style="italic" fo:font-weight="normal" officeooo:rsid="001c02ae" style:font-size-asian="12pt" style:font-style-asian="italic" style:font-weight-asian="normal" style:font-size-complex="12pt"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28aa31" style:font-style-asian="normal" style:font-style-complex="normal"/>
    </style:style>
    <style:style style:name="T7" style:family="text">
      <style:text-properties fo:font-style="normal" officeooo:rsid="001c02ae" style:font-style-asian="normal" style:font-style-complex="normal"/>
    </style:style>
    <style:style style:name="T8" style:family="text">
      <style:text-properties fo:font-style="normal" officeooo:rsid="00336864" style:font-style-asian="normal" style:font-style-complex="normal"/>
    </style:style>
    <style:style style:name="T9" style:family="text">
      <style:text-properties fo:font-style="normal" fo:font-weight="normal" officeooo:rsid="001c02ae" style:font-style-asian="normal" style:font-weight-asian="normal" style:font-style-complex="normal" style:font-weight-complex="normal"/>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fo:font-style="italic" fo:font-weight="normal" officeooo:rsid="001c02ae" style:font-style-asian="italic" style:font-weight-asian="normal" style:font-style-complex="italic" style:font-weight-complex="normal"/>
    </style:style>
    <style:style style:name="T13" style:family="text">
      <style:text-properties officeooo:rsid="0029c3ce"/>
    </style:style>
    <style:style style:name="T14" style:family="text">
      <style:text-properties officeooo:rsid="01d5c377"/>
    </style:style>
    <style:style style:name="T15" style:family="text">
      <style:text-properties officeooo:rsid="01d9d0ee"/>
    </style:style>
    <style:style style:name="T16" style:family="text">
      <style:text-properties style:use-window-font-color="true" loext:opacity="0%" fo:background-color="transparent" loext:char-shading-value="0"/>
    </style:style>
    <style:style style:name="T17" style:family="text">
      <style:text-properties fo:font-weight="bold"/>
    </style:style>
    <style:style style:name="T18" style:family="text">
      <style:text-properties fo:font-size="9pt" style:font-size-asian="9pt" style:font-size-complex="9pt"/>
    </style:style>
    <style:style style:name="T19" style:family="text">
      <style:text-properties fo:font-size="9pt" officeooo:rsid="0011d62e" style:font-size-asian="9pt" style:font-size-complex="9pt"/>
    </style:style>
    <style:style style:name="T20" style:family="text">
      <style:text-properties fo:language="it" fo:country="IT" fo:font-style="normal" officeooo:rsid="001c02ae" style:font-style-asian="normal" style:font-style-complex="normal"/>
    </style:style>
    <style:style style:name="T21" style:family="text">
      <style:text-properties officeooo:rsid="00876cd0"/>
    </style:style>
    <style:style style:name="T22" style:family="text">
      <style:text-properties officeooo:rsid="0045001f"/>
    </style:style>
    <style:style style:name="T23" style:family="text">
      <style:text-properties officeooo:rsid="00474f5e"/>
    </style:style>
    <style:style style:name="T24" style:family="text">
      <style:text-properties fo:font-size="12pt" fo:font-style="normal" fo:font-weight="normal" officeooo:rsid="001c02ae" style:font-size-asian="12pt" style:font-style-asian="normal" style:font-weight-asian="normal" style:font-size-complex="12pt" style:font-style-complex="normal" style:font-weight-complex="normal"/>
    </style:style>
    <style:style style:name="T25" style:family="text">
      <style:text-properties fo:font-size="12pt" fo:font-style="italic" fo:font-weight="normal" officeooo:rsid="001c02ae" style:font-size-asian="12pt" style:font-style-asian="italic" style:font-weight-asian="normal" style:font-size-complex="12pt" style:font-style-complex="italic" style:font-weight-complex="normal"/>
    </style:style>
    <style:style style:name="T26" style:family="text">
      <style:text-properties officeooo:rsid="00762f7f"/>
    </style:style>
    <style:style style:name="T27" style:family="text">
      <style:text-properties officeooo:rsid="0076667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2"><text:bookmark-start text:name="__RefHeading___Toc18182_3602757520"/>L’utopia dell’uguaglianza<text:bookmark-end text:name="__RefHeading___Toc18182_3602757520"/></text:h>
      <text:p text:style-name="P22">Egli credeva che, nonostante le differenze esteriori come la ricchezza e la posizione sociale, tutti gli uomini sono uguali nel loro potenziale per raggiungere la virtù e la saggezza. Questo punto di vista era radicale per il suo tempo, poiché contrastava con le rigide gerarchie sociali dell'antica Roma.</text:p>
      <text:h text:style-name="P16" text:outline-level="3"><text:bookmark-start text:name="__RefHeading___Toc18184_3602757520"/>Lettera 47<text:bookmark-end text:name="__RefHeading___Toc18184_3602757520"/></text:h>
      <text:p text:style-name="P20">Ho sentito con piacere da persone provenienti da Siracusa che tratti familiarmente i tuoi servi: questo comportamento si confà alla tua saggezza e alla tua istruzione. "<text:span text:style-name="T11">Sono schiavi</text:span>." No, sono uomini. "<text:span text:style-name="T11">Sono schiavi</text:span>". No, vivono nella tua stessa casa. "<text:span text:style-name="T11">Sono schiavi</text:span>". No, umili amici. "<text:span text:style-name="T11">Sono schiavi</text:span>." No, compagni di schiavitù, se pensi che la sorte ha uguale potere su noi e su loro. Perciò rido di chi giudica disonorevole cenare in compagnia del proprio schiavo; e per quale motivo, poi, se non perché è una consuetudine dettata dalla piú grande superbia che intorno al padrone, mentre mangia, ci sia una turba di servi in piedi? Egli mangia oltre la capacità del suo stomaco e con grande avidità riempie il ventre rigonfio ormai disavvezzo alle sue funzioni: è più affaticato a vomitare il cibo che a ingerirlo. Ma a quegli schiavi infelici non è permesso neppure muovere le labbra per parlare: ogni bisbiglio è represso col bastone e non sfuggono alle <text:soft-page-break/>percosse neppure i rumori casuali, la tosse, gli starnuti, il singhiozzo: interrompere il silenzio con una parola si sconta a caro prezzo; devono stare tutta la notte in piedi digiuni e zitti. Così accade che costoro, che non possono parlare in presenza del padrone, ne parlino male. Invece quei servi che potevano parlare non solo in presenza del padrone, ma anche col padrone stesso, quelli che non avevano la bocca cucita, erano pronti a offrire la testa per lui e a stornare su di sé un pericolo che lo minacciasse; parlavano durante i banchetti, ma tacevano sotto tortura. Inoltre, viene spesso ripetuto quel proverbio frutto della medesima arroganza: "<text:span text:style-name="T11">Tanti nemici, quanti schiavi</text:span>": loro non ci sono nemici, ce li rendiamo tali noi. Tralascio per ora maltrattamenti crudeli e disumani: abusiamo di loro quasi non fossero uomini, ma bestie. Quando ci mettiamo a tavola, uno deterge gli sputi, un altro, stando sotto il divano, raccoglie gli avanzi dei convitati ubriachi. Uno scalca volatili costosi; muovendo la mano esperta con tratti sicuri attraverso il petto e le cosce, ne stacca piccoli pezzi; poveraccio: vive solo per trinciare il pollame come si conviene; ma è più sventurato chi insegna tutto questo per suo piacere di chi impara per necessità. Un altro, addetto al vino, vestito da donna, lotta con l'età: non può uscire dalla fanciullezza, vi è trattenuto e, pur essendo ormai abile al servizio militare, glabro, con i peli rasati o estirpati alla radice, veglia tutta la notte, dividendola tra l'ubriachezza <text:soft-page-break/>e la libidine del padrone, e fa da uomo in camera da letto e da servo durante il pranzo. Un altro che ha il c<text:span text:style-name="T26">o</text:span>mpito di giudicare i convitati, se ne sta in piedi, sventurato, e guarda quali persone dovranno essere chiamate il giorno dopo perché hanno saputo adulare e sono stati intemperanti nel mangiare o nei discorsi. Ci sono poi quelli che si occupano delle provviste: conoscono esattamente i gusti del padrone e sanno di quale vivanda lo stuzzichi il sapore, di quale gli piaccia l'aspetto, quale piatto insolito possa sollevarlo dalla nausea, quale gli ripugni quando è sazio, cosa desideri mangiare quel giorno. Il padrone, però non sopporta di mangiare con costoro e ritiene una diminuzione della sua dignità sedersi alla stessa tavola con un suo servo. Ma buon dio! quanti padroni ha tra costoro. Ho visto stare davanti alla porta di Callisto il suo ex padrone e mentre gli altri entravano, veniva lasciato fuori proprio lui che gli aveva messo addosso un cartello di vendita e lo aveva presentato tra gli schiavi di scarto. Così quel servo che era stato messo tra i primi dieci in cui il banditore prova la voce, gli rese la pariglia: lo respinse a sua volta e non lo giudicò degno della sua casa. Il padrone vendette Callisto: ma Callisto come ha ripagato il suo padrone!</text:p>
      <text:p text:style-name="P17">Considera che costui, che tu chiami tuo schiavo, è nato dallo stesso seme, gode dello stesso cielo, respira, vive, muore come te! Tu puoi vederlo libero, come lui può vederti schiavo.</text:p>
      <text:p text:style-name="P18"><text:soft-page-break/>Con la sconfitta di Varo<text:note text:id="ftn22" text:note-class="footnote"><text:note-citation>1</text:note-citation><text:note-body><text:p text:style-name="P10">La battaglia della foresta di Teutoburgo, chiamata clades Variana, si svolse nell’anno 9 tra l’esercito romano guidato da Publio Quintilio Varo e una coalizione di tribù germaniche comandate da Arminio </text:p></text:note-body></text:note> la sorte. degradò socialmente molti uomini di nobilissima origine, che attraverso il servizio militare aspiravano al grado di senatori: qualcuno lo fece diventare pastore, qualche altro guardiano di una casa. E ora disprezza pure l'uomo che si trova in uno stato in cui, proprio mentre lo disprezzi, puoi capitare anche <text:span text:style-name="T26">a te</text:span>.</text:p>
      <text:p text:style-name="P18">Non voglio cacciarmi in un argomento tanto impegnativo e discutere sul trattamento degli schiavi: verso di loro siamo eccessivamente superbi, crudeli e insolenti. Questo è il succo dei miei insegnamenti: comportati con il tuo inferiore come vorresti che il tuo superiore agisse con te. Tutte le volte che ti verrà in mente quanto potere hai sul tuo schiavo, pensa che il tuo padrone ha su di te altrettanto potere. "<text:span text:style-name="T11">Ma io</text:span>", ribatti, <text:s/>"<text:span text:style-name="T11">non ho padrone</text:span>." Per adesso ti va bene; forse, però lo avrai. Non sai a che età Ecuba divenne schiava, e Creso, e la madre di Dario, e Platone, e Diogene?<text:note text:id="ftn23" text:note-class="footnote"><text:note-citation>2</text:note-citation><text:note-body><text:p text:style-name="P11"><text:span text:style-name="T27">S</text:span><text:span text:style-name="T1">ono tutti personaggi che hanno vissuto grandi cambiamenti nelle loro vite, spesso in età avanzata. Ecuba, regina di Troia, divenne schiava dopo la caduta della città. Creso, re della Lidia, perse il suo regno a favore di Ciro il Grande. La madre di Dario, moglie di Istaspe, dovette affrontare la sconfitta del figlio. Platone fu venduto come schiavo dopo un viaggio sfortunato a Siracusa. Diogene, noto per la sua vita ascetica, fu catturato dai pirati e venduto come schiavo.</text:span></text:p></text:note-body></text:note> Sii clemente con il tuo servo e anche <text:soft-page-break/>affabile; parla con lui, chiedigli consiglio, mangia insieme a lui.</text:p>
      <text:p text:style-name="P17">A questo punto tutta la schiera dei raffinati mi griderà: "<text:span text:style-name="T11">Non c'è niente di più umiliante, niente di più vergognoso</text:span>." Io, però potrei sorprendere proprio loro a baciare la mano di servi altrui. E neppure vi rendete conto di come i nostri antenati abbiano voluto eliminare ogni motivo di astio verso i padroni e di oltraggio verso gli schiavi? Chiamarono padre di famiglia il padrone e domestici gli schiavi, appellativo che è rimasto nei mimi; stabilirono un giorno festivo, non perché i padroni mangiassero con i servi solo in quello, ma almeno in quello; concessero loro di occupare posti di responsabilità nell'ambito familiare, di amministrare la giustizia, e considerarono la casa un piccolo stato. <text:span text:style-name="T11">"E dunque? Inviterò alla mia tavola tutti gli schiavi?</text:span>" Non più che tutti gli uomini liberi. Sbagli se pensi che respingerò qualcuno perché esercita un lavoro troppo umile, per esempio quel mulattiere o quel bifolco. Non li giudicherò in base al loro mestiere, ma in base alla loro condotta; della propria condotta ciascuno è responsabile, il mestiere, invece, lo assegna il caso. Alcuni siedano a mensa con te, perché ne sono degni, altri perché lo diventino; se c'è in loro qualche tratto servile derivante dal rapporto con gente umile, la dimestichezza con uomini più nobili lo eliminerà.</text:p>
      <text:p text:style-name="P18"><text:soft-page-break/>Non devi, caro Lucilio, cercare gli amici solo nel foro o nel senato: se farai attenzione, li troverai anche in casa. Spesso un buon materiale rimane inservibile senza un abile artefice: prova a farne esperienza. Se uno al momento di comprare un cavallo non lo esamina, ma guarda la sella e le briglie, è stupido; così è ancora più stupido chi giudica un uomo dall'abbigliamento e dalla condizione sociale, che ci sta addosso come un vestito. </text:p>
      <text:p text:style-name="P18">"<text:span text:style-name="T11">È uno schiavo</text:span>." Ma forse è libero nell'animo. "<text:span text:style-name="T11">È uno schiavo.</text:span>" E questo lo danneggerà? Mostrami chi non lo è: c'è chi è schiavo della lussuria, chi dell'avidità, chi dell'ambizione, tutti sono schiavi della speranza, tutti della paura. Ti mostrerò un ex console servo di una vecchietta, un ricco signore servo di un'ancella, giovani nobilissimi schiavi di pantomimi: nessuna schiavitù è più vergognosa di quella volontaria. Perciò codesti schizzinosi non ti devono distogliere dall'essere cordiale con i tuoi servi senza sentirti superbamente superiore: più che temerti, ti rispettino.</text:p>
      <text:p text:style-name="P18">Qualcuno ora dirà che io incito gli schiavi alla rivolta e che voglio abbattere l'autorità dei padroni, perché ho detto "<text:span text:style-name="T11">il padrone lo rispettino più che temerlo</text:span>". "<text:span text:style-name="T11">Proprio così ?</text:span>" chiederanno. "<text:span text:style-name="T11">Lo rispettino come i clienti, come le persone che fanno la visita di omaggio?</text:span>" Chi dice questo, dimentica che non è poco per i padroni quella reverenza che basta a un dio. Se uno è rispettato, è anche amato: <text:soft-page-break/>l'amore non può mescolarsi al timore. Secondo me, perciò tu fai benissimo a non volere che i tuoi servi ti temano e a correggerli solo con le parole: con la frusta si puniscono le bestie. Non tutto ciò che ci colpisce, ci danneggia; ma l'abitudine al piacere induce all'ira: tutto quello che non è come desideriamo, provoca la nostra collera. Ci comportiamo come i sovrani: anche loro, dimentichi delle proprie forze e della debolezza altrui, danno in escandescenze e infieriscono, come se fossero stati offesi, mentre l'eccezionalità della loro sorte li mette completamente al sicuro dal pericolo di una simile evenienza. Lo sanno bene, ma, lamentandosi, cercano l'occasione per fare del male; dicono di essere stati oltraggiati per poter oltraggiare.</text:p>
      <text:p text:style-name="P21"><text:span text:style-name="T3">Non voglio trattenerti più a lungo; non hai bisogno di esortazioni. La rettitudine ha, tra gli altri, questo vantaggio: piace a se stessa ed è salda. La malvagità è incostante e cambia spesso, e non in meglio, ma in direzione diversa. Stammi ben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svg:font-family="'Noto Serif'" style:font-adornments="Normale" style:font-family-generic="roman"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2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Noto Serif" fo:font-family="'Noto Serif'" style:font-style-name="Normale" style:font-family-generic="roman" style:font-pitch="variable" fo:font-size="13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Noto Serif" fo:font-family="'Noto Serif'" style:font-style-name="Normale" style:font-family-generic="roman" style:font-pitch="variable" fo:font-size="12pt" fo:font-weight="normal" style:font-size-asian="14pt" style:font-weight-asian="bold" style:font-size-complex="14pt"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4.801cm" fo:page-height="21.001cm" style:num-format="1" style:print-orientation="portrait" fo:margin-top="1.499cm" fo:margin-bottom="1.499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orrado tafaro</meta:initial-creator>
    <meta:creation-date>2026-01-28T11:35:03.377970742</meta:creation-date>
    <dc:date>2026-01-29T16:37:24.071618158</dc:date>
    <dc:creator>corrado tafaro</dc:creator>
    <meta:editing-duration>PT38M8S</meta:editing-duration>
    <meta:editing-cycles>5</meta:editing-cycles>
    <meta:generator>LibreOffice/24.2.7.2$Linux_X86_64 LibreOffice_project/420$Build-2</meta:generator>
    <meta:document-statistic meta:table-count="0" meta:image-count="0" meta:object-count="0" meta:page-count="7" meta:paragraph-count="14" meta:word-count="1611" meta:character-count="9741" meta:non-whitespace-character-count="8141"/>
  </office:meta>
</office:document-meta>
</file>