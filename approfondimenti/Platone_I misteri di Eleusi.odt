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paragraph-properties fo:margin-top="0.199cm" fo:margin-bottom="0cm" style:contextual-spacing="false" fo:text-align="justify" style:justify-single-word="false"/>
    </style:style>
    <style:style style:name="P3" style:family="paragraph" style:parent-style-name="Footnote">
      <style:paragraph-properties fo:margin-top="0.101cm" fo:margin-bottom="0cm" style:contextual-spacing="false" fo:text-align="justify" style:justify-single-word="false"/>
    </style:style>
    <style:style style:name="P4" style:family="paragraph" style:parent-style-name="Footnote">
      <style:text-properties officeooo:rsid="0020ab44" officeooo:paragraph-rsid="0020ab44"/>
    </style:style>
    <style:style style:name="P5" style:family="paragraph" style:parent-style-name="Footnote">
      <style:text-properties officeooo:rsid="00e958c2" officeooo:paragraph-rsid="00e958c2"/>
    </style:style>
    <style:style style:name="P6" style:family="paragraph" style:parent-style-name="Standard">
      <style:paragraph-properties fo:margin-top="0.101cm" fo:margin-bottom="0.199cm" style:contextual-spacing="false" fo:line-height="115%" fo:text-align="justify" style:justify-single-word="false"/>
      <style:text-properties style:font-name="Noto Sans1" fo:font-size="12pt" fo:font-style="italic" officeooo:paragraph-rsid="00146994" style:font-size-asian="12pt" style:font-style-asian="italic" style:font-size-complex="12pt" style:font-style-complex="italic"/>
    </style:style>
    <style:style style:name="P7" style:family="paragraph" style:parent-style-name="Standard">
      <style:paragraph-properties fo:margin-top="0cm" fo:margin-bottom="0.199cm" style:contextual-spacing="false" fo:line-height="115%" fo:text-align="justify" style:justify-single-word="false"/>
      <style:text-properties style:font-name="Noto Sans1" fo:font-size="12pt" fo:font-style="italic" officeooo:paragraph-rsid="00146994" style:font-size-asian="12pt" style:font-style-asian="italic" style:font-size-complex="12pt" style:font-style-complex="italic"/>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46994" style:font-size-asian="12pt" style:font-size-complex="12pt"/>
    </style:style>
    <style:style style:name="P9"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46994" style:font-size-asian="12pt" style:font-size-complex="12pt"/>
    </style:style>
    <style:style style:name="P10" style:family="paragraph" style:parent-style-name="Standard">
      <style:paragraph-properties fo:margin-top="0.101cm" fo:margin-bottom="0.199cm" style:contextual-spacing="false" fo:line-height="115%" fo:text-align="justify" style:justify-single-word="false"/>
      <style:text-properties style:font-name="Noto Sans1" fo:font-size="12pt" officeooo:paragraph-rsid="00146994" style:font-size-asian="12pt" style:font-size-complex="12pt"/>
    </style:style>
    <style:style style:name="P11" style:family="paragraph" style:parent-style-name="Standard">
      <style:paragraph-properties fo:margin-top="0cm" fo:margin-bottom="0.199cm" style:contextual-spacing="false" fo:line-height="115%" fo:text-align="justify" style:justify-single-word="false"/>
      <style:text-properties style:font-name="Noto Sans1" fo:font-size="12pt" officeooo:paragraph-rsid="00146994" style:font-size-asian="12pt" style:font-size-complex="12pt"/>
    </style:style>
    <style:style style:name="P12" style:family="paragraph" style:parent-style-name="Standard">
      <style:paragraph-properties fo:margin-top="0cm" fo:margin-bottom="0cm" style:contextual-spacing="false" fo:line-height="115%" fo:text-align="justify" style:justify-single-word="false"/>
      <style:text-properties style:font-name="Noto Sans1" fo:font-size="12pt" officeooo:rsid="001158ce" officeooo:paragraph-rsid="00146994" style:font-size-asian="12pt" style:font-size-complex="12pt"/>
    </style:style>
    <style:style style:name="P13" style:family="paragraph" style:parent-style-name="Standard">
      <style:paragraph-properties fo:margin-top="0.199cm" fo:margin-bottom="0cm" style:contextual-spacing="false" fo:line-height="115%" fo:text-align="justify" style:justify-single-word="false"/>
      <style:text-properties style:font-name="Noto Sans1" fo:font-size="12pt" officeooo:rsid="00df4420" officeooo:paragraph-rsid="00146994" style:font-size-asian="12pt" style:font-size-complex="12pt"/>
    </style:style>
    <style:style style:name="P14" style:family="paragraph" style:parent-style-name="Standard">
      <style:paragraph-properties fo:margin-top="0.101cm" fo:margin-bottom="0cm" style:contextual-spacing="false" fo:line-height="115%" fo:text-align="justify" style:justify-single-word="false"/>
      <style:text-properties style:font-name="Noto Sans1" fo:font-size="12pt" officeooo:rsid="00e0a3ca" officeooo:paragraph-rsid="00146994" style:font-size-asian="12pt" style:font-size-complex="12pt"/>
    </style:style>
    <style:style style:name="P15" style:family="paragraph" style:parent-style-name="Standard">
      <style:paragraph-properties fo:margin-top="0.101cm" fo:margin-bottom="0cm" style:contextual-spacing="false" fo:line-height="115%" fo:text-align="justify" style:justify-single-word="false"/>
      <style:text-properties style:font-name="Noto Sans1" fo:font-size="12pt" officeooo:rsid="001158ce" officeooo:paragraph-rsid="00146994" fo:background-color="transparent" style:font-size-asian="12pt" style:font-size-complex="12pt"/>
    </style:style>
    <style:style style:name="P16" style:family="paragraph" style:parent-style-name="Standard">
      <style:paragraph-properties fo:line-height="115%" fo:text-align="justify" style:justify-single-word="false"/>
      <style:text-properties style:font-name="Noto Sans1" fo:font-size="12pt" officeooo:paragraph-rsid="0012ce64" style:font-size-asian="12pt" style:font-size-complex="12pt"/>
    </style:style>
    <style:style style:name="P17" style:family="paragraph" style:parent-style-name="Text_20_body">
      <style:paragraph-properties fo:margin-top="0.199cm" fo:margin-bottom="0cm" style:contextual-spacing="false" fo:line-height="115%" fo:text-align="center" style:justify-single-word="false"/>
      <style:text-properties style:font-name="Noto Sans1" fo:font-size="12pt" officeooo:paragraph-rsid="0012ce64" style:font-size-asian="12pt" style:font-size-complex="12pt"/>
    </style:style>
    <style:style style:name="P18" style:family="paragraph" style:parent-style-name="Text_20_body">
      <style:paragraph-properties fo:margin-top="0.101cm" fo:margin-bottom="0cm" style:contextual-spacing="false" fo:line-height="115%" fo:text-align="center" style:justify-single-word="false"/>
      <style:text-properties style:font-name="Noto Sans1" fo:font-size="12pt" officeooo:paragraph-rsid="0012ce64" style:font-size-asian="12pt" style:font-size-complex="12pt"/>
    </style:style>
    <style:style style:name="P19" style:family="paragraph" style:parent-style-name="Text_20_body">
      <style:paragraph-properties fo:margin-top="0.199cm" fo:margin-bottom="0cm" style:contextual-spacing="false" fo:line-height="115%" fo:text-align="justify" style:justify-single-word="false"/>
      <style:text-properties style:font-name="Noto Sans1" fo:font-size="12pt" officeooo:paragraph-rsid="0012ce64" style:font-size-asian="12pt" style:font-size-complex="12pt"/>
    </style:style>
    <style:style style:name="P20" style:family="paragraph" style:parent-style-name="Text_20_body">
      <style:paragraph-properties fo:margin-top="0cm" fo:margin-bottom="0cm" style:contextual-spacing="false" fo:line-height="115%" fo:text-align="justify" style:justify-single-word="false"/>
      <style:text-properties style:font-name="Noto Sans1" fo:font-size="12pt" officeooo:paragraph-rsid="0012ce64" style:font-size-asian="12pt" style:font-size-complex="12pt"/>
    </style:style>
    <style:style style:name="P21"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12ce64" style:font-size-asian="12pt" style:font-size-complex="12pt"/>
    </style:style>
    <style:style style:name="P22" style:family="paragraph" style:parent-style-name="Text_20_body" style:list-style-name="L1">
      <style:paragraph-properties fo:margin-top="0.199cm" fo:margin-bottom="0.25cm" style:contextual-spacing="false" fo:line-height="115%" fo:text-align="justify" style:justify-single-word="false"/>
      <style:text-properties style:font-name="Noto Sans1" fo:font-size="12pt" officeooo:paragraph-rsid="0012ce64" style:font-size-asian="12pt" style:font-size-complex="12pt"/>
    </style:style>
    <style:style style:name="P23" style:family="paragraph" style:parent-style-name="Text_20_body" style:list-style-name="L1">
      <style:paragraph-properties fo:line-height="115%" fo:text-align="justify" style:justify-single-word="false"/>
      <style:text-properties style:font-name="Noto Sans1" fo:font-size="12pt" officeooo:paragraph-rsid="0012ce64" style:font-size-asian="12pt" style:font-size-complex="12pt"/>
    </style:style>
    <style:style style:name="P24" style:family="paragraph" style:parent-style-name="Text_20_body">
      <style:paragraph-properties fo:margin-top="0.199cm" fo:margin-bottom="0cm" style:contextual-spacing="false" fo:line-height="115%" fo:text-align="justify" style:justify-single-word="false"/>
      <style:text-properties style:font-name="Noto Sans1" fo:font-size="12pt" officeooo:paragraph-rsid="001378ec" style:font-size-asian="12pt" style:font-size-complex="12pt"/>
    </style:style>
    <style:style style:name="P25" style:family="paragraph" style:parent-style-name="Text_20_body">
      <style:paragraph-properties fo:margin-top="0.199cm" fo:margin-bottom="0cm" style:contextual-spacing="false" fo:line-height="115%" fo:text-align="justify" style:justify-single-word="false"/>
      <style:text-properties style:font-name="Noto Sans1" fo:font-size="12pt" fo:font-weight="bold" officeooo:paragraph-rsid="0012ce64" style:font-size-asian="12pt" style:font-weight-asian="bold" style:font-size-complex="12pt" style:font-weight-complex="bold"/>
    </style:style>
    <style:style style:name="P26" style:family="paragraph" style:parent-style-name="Text_20_body" style:list-style-name="L1">
      <style:paragraph-properties fo:line-height="115%" fo:text-align="justify" style:justify-single-word="false"/>
      <style:text-properties style:font-name="Noto Sans1" fo:font-size="12pt" fo:font-style="normal" fo:font-weight="normal" officeooo:paragraph-rsid="0012ce64"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top="0cm" fo:margin-bottom="0cm" style:contextual-spacing="false" fo:line-height="115%" fo:text-align="justify" style:justify-single-word="false"/>
      <style:text-properties style:font-name="Noto Sans1" fo:font-size="12pt" fo:font-style="normal" officeooo:rsid="00dbde21" officeooo:paragraph-rsid="0012ce64" style:font-size-asian="12pt" style:font-style-asian="normal" style:font-size-complex="12pt" style:font-style-complex="normal"/>
    </style:style>
    <style:style style:name="P28" style:family="paragraph" style:parent-style-name="Text_20_body">
      <style:paragraph-properties fo:margin-top="0.101cm" fo:margin-bottom="0cm" style:contextual-spacing="false" fo:line-height="115%" fo:text-align="justify" style:justify-single-word="false"/>
      <style:text-properties style:font-name="Noto Sans1" fo:font-size="12pt" fo:font-style="normal" officeooo:rsid="00dbde21" officeooo:paragraph-rsid="0012ce64" style:font-size-asian="12pt" style:font-style-asian="normal" style:font-size-complex="12pt" style:font-style-complex="normal"/>
    </style:style>
    <style:style style:name="P29" style:family="paragraph" style:parent-style-name="Text_20_body">
      <style:paragraph-properties fo:margin-top="0.101cm" fo:margin-bottom="0cm" style:contextual-spacing="false" fo:line-height="115%" fo:text-align="justify" style:justify-single-word="false"/>
      <style:text-properties style:font-name="Noto Sans1" fo:font-size="12pt" fo:font-style="normal" officeooo:paragraph-rsid="0012ce64" style:font-size-asian="12pt" style:font-style-asian="normal" style:font-size-complex="12pt" style:font-style-complex="normal"/>
    </style:style>
    <style:style style:name="P30" style:family="paragraph" style:parent-style-name="Text_20_body">
      <style:paragraph-properties fo:margin-top="0cm" fo:margin-bottom="0cm" style:contextual-spacing="false" fo:line-height="115%" fo:text-align="justify" style:justify-single-word="false"/>
      <style:text-properties style:font-name="Noto Sans1" fo:font-size="12pt" fo:font-weight="normal" officeooo:paragraph-rsid="0012ce64" style:font-size-asian="12pt" style:font-weight-asian="normal" style:font-size-complex="12pt" style:font-weight-complex="normal"/>
    </style:style>
    <style:style style:name="P31" style:family="paragraph" style:parent-style-name="Text_20_body">
      <style:paragraph-properties fo:margin-top="0.101cm" fo:margin-bottom="0cm" style:contextual-spacing="false" fo:line-height="115%" fo:text-align="justify" style:justify-single-word="false"/>
      <style:text-properties style:font-name="Noto Sans1" fo:font-size="12pt" fo:font-weight="normal" officeooo:paragraph-rsid="0012ce64" style:font-size-asian="12pt" style:font-weight-asian="normal" style:font-size-complex="12pt" style:font-weight-complex="normal"/>
    </style:style>
    <style:style style:name="P32" style:family="paragraph" style:parent-style-name="Text_20_body">
      <style:paragraph-properties fo:margin-left="0cm" fo:margin-right="0cm" fo:margin-top="0.199cm" fo:margin-bottom="0.199cm" style:contextual-spacing="false" fo:line-height="115%" fo:text-align="justify" style:justify-single-word="false" fo:orphans="2" fo:widows="2" fo:text-indent="0cm" style:auto-text-indent="false" fo:padding="0cm" fo:border="none"/>
      <style:text-properties officeooo:paragraph-rsid="00146994"/>
    </style:style>
    <style:style style:name="P33" style:family="paragraph" style:parent-style-name="Text_20_body">
      <style:paragraph-properties fo:margin-left="0cm" fo:margin-right="0cm" fo:margin-top="0.101cm" fo:margin-bottom="0cm" style:contextual-spacing="false" fo:line-height="115%" fo:text-align="justify" style:justify-single-word="false" fo:orphans="2" fo:widows="2" fo:text-indent="0cm" style:auto-text-indent="false" fo:padding="0cm" fo:border="none"/>
      <style:text-properties style:font-name="Noto Sans1" fo:font-size="12pt" officeooo:paragraph-rsid="00146994" style:font-size-asian="12pt" style:font-size-complex="12pt"/>
    </style:style>
    <style:style style:name="P34" style:family="paragraph" style:parent-style-name="Text_20_body">
      <style:paragraph-properties fo:margin-top="0cm" fo:margin-bottom="0cm" style:contextual-spacing="false" fo:line-height="115%" fo:text-align="justify" style:justify-single-word="false" fo:break-before="page"/>
      <style:text-properties style:font-name="Noto Sans1" fo:font-size="12pt" fo:font-weight="bold" officeooo:rsid="0023aa0a" officeooo:paragraph-rsid="00146994" style:font-size-asian="12pt" style:font-weight-asian="bold" style:font-size-complex="12pt" style:font-weight-complex="bold"/>
    </style:style>
    <style:style style:name="P35" style:family="paragraph" style:parent-style-name="Text_20_body">
      <style:paragraph-properties fo:margin-top="0.199cm" fo:margin-bottom="0cm" style:contextual-spacing="false"/>
      <style:text-properties officeooo:paragraph-rsid="0012ce64"/>
    </style:style>
    <style:style style:name="P3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rsid="00e79920" officeooo:paragraph-rsid="00146994"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cm" fo:margin-right="0cm" fo:margin-top="0.199cm" fo:margin-bottom="0.199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officeooo:paragraph-rsid="00146994" style:font-size-asian="12pt" style:font-size-complex="12pt"/>
    </style:style>
    <style:style style:name="P38" style:family="paragraph" style:parent-style-name="Text_20_body">
      <style:paragraph-properties fo:margin-left="0cm" fo:margin-right="0cm" fo:margin-top="0cm" fo:margin-bottom="0.101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officeooo:paragraph-rsid="00146994" style:font-size-asian="12pt" style:font-size-complex="12pt"/>
    </style:style>
    <style:style style:name="P39" style:family="paragraph" style:parent-style-name="Text_20_body">
      <style:paragraph-properties fo:margin-left="0cm" fo:margin-right="0cm" fo:margin-top="0.199cm" fo:margin-bottom="0.101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italic" officeooo:paragraph-rsid="00146994" style:font-size-asian="12pt" style:font-size-complex="12pt"/>
    </style:style>
    <style:style style:name="P40" style:family="paragraph" style:parent-style-name="Text_20_body">
      <style:paragraph-properties fo:margin-left="0cm" fo:margin-right="0cm" fo:margin-top="0cm" fo:margin-bottom="0.199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italic" officeooo:paragraph-rsid="00146994" style:font-size-asian="12pt" style:font-size-complex="12pt"/>
    </style:style>
    <style:style style:name="P41" style:family="paragraph" style:parent-style-name="Text_20_body">
      <style:paragraph-properties fo:margin-left="0cm" fo:margin-right="0cm" fo:margin-top="0.199cm" fo:margin-bottom="0.199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italic" officeooo:paragraph-rsid="00146994" style:font-size-asian="12pt" style:font-size-complex="12pt"/>
    </style:style>
    <style:style style:name="P42" style:family="paragraph" style:parent-style-name="Text_20_body">
      <style:paragraph-properties fo:margin-left="0cm" fo:margin-right="0cm" fo:margin-top="0.101cm" fo:margin-bottom="0.199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italic" officeooo:paragraph-rsid="00146994" style:font-size-asian="12pt" style:font-size-complex="12pt"/>
    </style:style>
    <style:style style:name="P43" style:family="paragraph" style:parent-style-name="Text_20_body">
      <style:paragraph-properties fo:margin-left="0cm" fo:margin-right="0cm" fo:margin-top="0.101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paragraph-rsid="00146994" style:font-size-asian="12pt" style:font-size-complex="12pt"/>
    </style:style>
    <style:style style:name="P44" style:family="paragraph" style:parent-style-name="Text_20_body">
      <style:paragraph-properties fo:margin-left="0cm" fo:margin-right="0cm" fo:margin-top="0cm" fo:margin-bottom="0.199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paragraph-rsid="00146994" style:font-size-asian="12pt" style:font-size-complex="12pt"/>
    </style:style>
    <style:style style:name="P45" style:family="paragraph" style:parent-style-name="Text_20_body">
      <style:paragraph-properties fo:margin-left="0cm" fo:margin-right="0cm" fo:margin-top="0.199cm" fo:margin-bottom="0.199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paragraph-rsid="00146994" style:font-size-asian="12pt" style:font-size-complex="12pt"/>
    </style:style>
    <style:style style:name="P4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paragraph-rsid="00146994" style:font-size-asian="12pt" style:font-size-complex="12pt"/>
    </style:style>
    <style:style style:name="P47" style:family="paragraph" style:parent-style-name="Text_20_body">
      <style:paragraph-properties fo:margin-left="0cm" fo:margin-right="0cm" fo:margin-top="0.199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paragraph-rsid="00146994" style:font-size-asian="12pt" style:font-size-complex="12pt"/>
    </style:style>
    <style:style style:name="P48" style:family="paragraph" style:parent-style-name="Text_20_body">
      <style:paragraph-properties fo:margin-left="0cm" fo:margin-right="0cm" fo:margin-top="0.101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rsid="00e79920" officeooo:paragraph-rsid="00146994"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0cm" fo:margin-right="0cm" fo:margin-top="0.101cm" fo:margin-bottom="0.199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rsid="00e79920" officeooo:paragraph-rsid="00146994"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rsid="00e79920" officeooo:paragraph-rsid="00146994"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left="0cm" fo:margin-right="0cm" fo:margin-top="0.199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rsid="00131cff" officeooo:paragraph-rsid="00146994"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normal" officeooo:rsid="00131cff" officeooo:paragraph-rsid="00146994"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0cm" fo:margin-right="0cm" fo:margin-top="0.199cm" fo:margin-bottom="0cm" style:contextual-spacing="false" fo:line-height="115%" fo:text-align="justify" style:justify-single-word="false" fo:orphans="2" fo:widows="2" fo:text-indent="0cm" style:auto-text-indent="false" fo:padding="0cm" fo:border="none"/>
      <style:text-properties fo:font-variant="normal" fo:text-transform="none" style:use-window-font-color="true" loext:opacity="0%" style:font-name="Noto Sans1" fo:font-size="12pt" fo:letter-spacing="normal" fo:font-style="normal" fo:font-weight="bold" officeooo:rsid="0023aa0a" officeooo:paragraph-rsid="00146994" style:font-size-asian="12pt" style:font-weight-asian="bold" style:font-size-complex="12pt" style:font-weight-complex="bold"/>
    </style:style>
    <style:style style:name="P5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fo:padding="0cm" fo:border="none"/>
      <style:text-properties style:use-window-font-color="true" loext:opacity="0%" style:font-name="Noto Sans1" fo:font-size="12pt" officeooo:paragraph-rsid="00146994" style:font-size-asian="12pt" style:font-size-complex="12pt"/>
    </style:style>
    <style:style style:name="P55" style:family="paragraph" style:parent-style-name="Text_20_body">
      <style:paragraph-properties fo:margin-left="0cm" fo:margin-right="0cm" fo:margin-top="0.101cm" fo:margin-bottom="0.101cm" style:contextual-spacing="false" fo:line-height="115%" fo:text-align="justify" style:justify-single-word="false" fo:orphans="2" fo:widows="2" fo:text-indent="0cm" style:auto-text-indent="false" fo:padding="0cm" fo:border="none"/>
      <style:text-properties style:use-window-font-color="true" loext:opacity="0%" style:font-name="Noto Sans1" fo:font-size="12pt" officeooo:paragraph-rsid="00146994" style:font-size-asian="12pt" style:font-size-complex="12pt"/>
    </style:style>
    <style:style style:name="P56" style:family="paragraph" style:parent-style-name="Text_20_body">
      <style:paragraph-properties fo:margin-left="0cm" fo:margin-right="0cm" fo:margin-top="0cm" fo:margin-bottom="0.199cm" style:contextual-spacing="false" fo:line-height="115%" fo:text-align="justify" style:justify-single-word="false" fo:orphans="2" fo:widows="2" fo:text-indent="0cm" style:auto-text-indent="false" fo:padding="0cm" fo:border="none"/>
      <style:text-properties style:use-window-font-color="true" loext:opacity="0%" style:font-name="Noto Sans1" fo:font-size="12pt" officeooo:paragraph-rsid="00146994" style:font-size-asian="12pt" style:font-size-complex="12pt"/>
    </style:style>
    <style:style style:name="P57" style:family="paragraph" style:parent-style-name="Text_20_body">
      <style:paragraph-properties fo:margin-left="0cm" fo:margin-right="0cm" fo:margin-top="0.101cm" fo:margin-bottom="0cm" style:contextual-spacing="false" fo:line-height="115%" fo:text-align="justify" style:justify-single-word="false" fo:orphans="2" fo:widows="2" fo:text-indent="0cm" style:auto-text-indent="false" fo:padding="0cm" fo:border="none"/>
      <style:text-properties style:use-window-font-color="true" loext:opacity="0%" style:font-name="Noto Sans1" fo:font-size="12pt" officeooo:rsid="00e79920" officeooo:paragraph-rsid="00146994" style:font-size-asian="12pt" style:font-size-complex="12pt"/>
    </style:style>
    <style:style style:name="P58" style:family="paragraph" style:parent-style-name="Text_20_body">
      <style:paragraph-properties fo:margin-left="0cm" fo:margin-right="0cm" fo:margin-top="0cm" fo:margin-bottom="0.199cm" style:contextual-spacing="false" fo:line-height="115%" fo:text-align="justify" style:justify-single-word="false" fo:orphans="2" fo:widows="2" fo:text-indent="0cm" style:auto-text-indent="false" fo:padding="0cm" fo:border="none"/>
      <style:text-properties style:use-window-font-color="true" loext:opacity="0%" style:font-name="Noto Sans1" fo:font-size="12pt" fo:font-style="italic" officeooo:paragraph-rsid="00146994" style:font-size-asian="12pt" style:font-size-complex="12pt"/>
    </style:style>
    <style:style style:name="P59" style:family="paragraph" style:parent-style-name="Text_20_body">
      <style:paragraph-properties fo:text-align="justify" style:justify-single-word="false"/>
    </style:style>
    <style:style style:name="T1" style:family="text">
      <style:text-properties fo:font-size="12pt" style:font-size-asian="12pt" style:font-size-complex="12pt"/>
    </style:style>
    <style:style style:name="T2" style:family="text">
      <style:text-properties fo:font-size="12pt" fo:font-weight="normal" officeooo:rsid="0069f188" style:font-size-asian="12pt" style:font-weight-asian="normal" style:font-size-complex="12pt" style:font-weight-complex="normal"/>
    </style:style>
    <style:style style:name="T3" style:family="text">
      <style:text-properties fo:font-size="12pt" fo:font-weight="normal" officeooo:rsid="00105638" style:font-size-asian="12pt" style:font-weight-asian="normal" style:font-size-complex="12pt" style:font-weight-complex="normal"/>
    </style:style>
    <style:style style:name="T4" style:family="text">
      <style:text-properties style:font-name="Noto Sans1"/>
    </style:style>
    <style:style style:name="T5" style:family="text">
      <style:text-properties style:font-name="Noto Sans1" fo:font-size="12pt" style:font-size-asian="12pt" style:font-size-complex="12pt"/>
    </style:style>
    <style:style style:name="T6" style:family="text">
      <style:text-properties style:font-name="Noto Sans1" fo:font-size="12pt" officeooo:rsid="001378ec" style:font-size-asian="12pt" style:font-size-complex="12pt"/>
    </style:style>
    <style:style style:name="T7" style:family="text">
      <style:text-properties fo:font-variant="normal" fo:text-transform="none" style:use-window-font-color="true" loext:opacity="0%" style:font-name="Noto Sans1" fo:font-size="12pt" fo:letter-spacing="normal" fo:font-style="normal" fo:font-weight="normal" officeooo:rsid="00131cff"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loext:opacity="0%" style:font-name="Noto Sans1" fo:font-size="12pt" fo:letter-spacing="normal" fo:font-style="normal" fo:font-weight="normal" officeooo:rsid="00e226ad" fo:background-color="transparent" loext:char-shading-value="0" style:font-size-asian="12pt" style:font-style-asian="italic" style:font-size-complex="12pt" style:font-style-complex="italic"/>
    </style:style>
    <style:style style:name="T9" style:family="text">
      <style:text-properties fo:font-variant="normal" fo:text-transform="none" style:use-window-font-color="true" loext:opacity="0%" style:font-name="Noto Sans1" fo:font-size="12pt" fo:letter-spacing="normal" fo:font-style="normal"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10" style:family="text">
      <style:text-properties fo:font-variant="normal" fo:text-transform="none" style:use-window-font-color="true" loext:opacity="0%" style:font-name="Noto Sans1" fo:font-size="12pt" fo:letter-spacing="normal" fo:font-style="normal" style:text-underline-style="solid" style:text-underline-width="auto" style:text-underline-color="font-color" fo:font-weight="normal" officeooo:rsid="00e226ad" fo:background-color="transparent" loext:char-shading-value="0" style:font-size-asian="12pt" style:font-style-asian="italic" style:font-size-complex="12pt" style:font-style-complex="italic"/>
    </style:style>
    <style:style style:name="T11" style:family="text">
      <style:text-properties fo:font-variant="normal" fo:text-transform="none" style:use-window-font-color="true" loext:opacity="0%" style:font-name="Noto Sans1" fo:font-size="12pt" fo:letter-spacing="normal" fo:font-style="normal" fo:font-weight="bold" officeooo:rsid="00e226ad" fo:background-color="transparent" loext:char-shading-value="0" style:font-size-asian="12pt" style:font-style-asian="italic" style:font-weight-asian="bold" style:font-size-complex="12pt" style:font-style-complex="italic" style:font-weight-complex="bold"/>
    </style:style>
    <style:style style:name="T12" style:family="text">
      <style:text-properties fo:font-variant="normal" fo:text-transform="none" style:use-window-font-color="true" loext:opacity="0%" style:font-name="Noto Sans1" fo:font-size="12pt" fo:letter-spacing="normal" fo:font-style="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13" style:family="text">
      <style:text-properties fo:font-variant="normal" fo:text-transform="none" style:use-window-font-color="true" loext:opacity="0%" style:font-name="Noto Sans1" fo:font-size="12pt" fo:letter-spacing="normal" fo:font-style="italic" fo:font-weight="normal" fo:background-color="transparent" loext:char-shading-value="0" style:font-size-asian="12pt" style:font-style-asian="italic" style:font-size-complex="12pt" style:font-style-complex="italic"/>
    </style:style>
    <style:style style:name="T14" style:family="text">
      <style:text-properties fo:font-variant="normal" fo:text-transform="none" style:use-window-font-color="true" loext:opacity="0%" style:font-name="Noto Sans1" fo:font-size="12pt" fo:letter-spacing="normal" fo:font-style="italic" fo:font-weight="normal" officeooo:rsid="00e226ad" fo:background-color="transparent" loext:char-shading-value="0" style:font-size-asian="12pt" style:font-style-asian="italic" style:font-size-complex="12pt" style:font-style-complex="italic"/>
    </style:style>
    <style:style style:name="T15" style:family="text">
      <style:text-properties fo:font-variant="normal" fo:text-transform="none" style:use-window-font-color="true" loext:opacity="0%" style:font-name="Noto Sans1" fo:font-size="12pt" fo:letter-spacing="normal" fo:font-style="italic"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16" style:family="text">
      <style:text-properties fo:font-variant="normal" fo:text-transform="none" style:use-window-font-color="true" loext:opacity="0%" style:font-name="Noto Sans1" fo:font-size="12pt" fo:letter-spacing="normal" fo:font-style="italic" fo:font-weight="normal" style:font-size-asian="12pt" style:font-style-asian="italic" style:font-weight-asian="normal" style:font-size-complex="12pt" style:font-style-complex="italic" style:font-weight-complex="normal"/>
    </style:style>
    <style:style style:name="T17" style:family="text">
      <style:text-properties fo:font-variant="normal" fo:text-transform="none" style:use-window-font-color="true" loext:opacity="0%" style:font-name="Noto Sans1" fo:font-size="12pt" fo:letter-spacing="normal" fo:font-style="italic"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18" style:family="text">
      <style:text-properties fo:font-variant="normal" fo:text-transform="none" style:use-window-font-color="true" loext:opacity="0%" style:font-name="Noto Sans1" fo:font-size="12pt" fo:letter-spacing="normal" style:text-underline-style="none" fo:font-weight="bold" officeooo:rsid="00e226ad" fo:background-color="transparent" loext:char-shading-value="0" style:font-size-asian="12pt" style:font-style-asian="italic" style:font-weight-asian="bold" style:font-size-complex="12pt" style:font-style-complex="italic" style:font-weight-complex="bold"/>
    </style:style>
    <style:style style:name="T19" style:family="text">
      <style:text-properties fo:font-variant="normal" fo:text-transform="none" style:use-window-font-color="true" loext:opacity="0%" style:font-name="Noto Sans1" fo:font-size="12pt" fo:letter-spacing="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fo:font-variant="normal" fo:text-transform="none" style:use-window-font-color="true" loext:opacity="0%" style:font-name="Noto Sans1" fo:font-size="11pt" fo:letter-spacing="normal" style:text-underline-style="none" fo:font-weight="bold" officeooo:rsid="00e226ad" fo:background-color="transparent" loext:char-shading-value="0" style:font-size-asian="11pt" style:font-style-asian="italic" style:font-weight-asian="bold" style:font-size-complex="11pt" style:font-style-complex="italic" style:font-weight-complex="bold"/>
    </style:style>
    <style:style style:name="T21" style:family="text">
      <style:text-properties fo:font-variant="normal" fo:text-transform="none" style:use-window-font-color="true" loext:opacity="0%" style:font-name="Noto Sans1" fo:font-size="11pt" fo:letter-spacing="normal" fo:font-weight="bold" officeooo:rsid="00e226ad" fo:background-color="transparent" loext:char-shading-value="0" style:font-size-asian="11pt" style:font-style-asian="italic" style:font-weight-asian="bold" style:font-size-complex="11pt" style:font-style-complex="italic" style:font-weight-complex="bold"/>
    </style:style>
    <style:style style:name="T22" style:family="text">
      <style:text-properties fo:font-variant="normal" fo:text-transform="none" style:use-window-font-color="true" loext:opacity="0%" fo:font-size="12pt" fo:letter-spacing="normal" fo:font-style="normal" fo:font-weight="normal" officeooo:rsid="00e79920" style:font-size-asian="12pt" style:font-style-asian="normal" style:font-weight-asian="normal" style:font-size-complex="12pt" style:font-style-complex="normal" style:font-weight-complex="normal"/>
    </style:style>
    <style:style style:name="T23" style:family="text">
      <style:text-properties fo:font-variant="normal" fo:text-transform="none" style:use-window-font-color="true" loext:opacity="0%" fo:font-size="12pt" fo:letter-spacing="normal" fo:font-style="normal" fo:font-weight="normal" officeooo:rsid="0041a0f6" style:font-size-asian="12pt" style:font-style-asian="normal" style:font-weight-asian="normal" style:font-size-complex="12pt" style:font-style-complex="normal" style:font-weight-complex="normal"/>
    </style:style>
    <style:style style:name="T24" style:family="text">
      <style:text-properties fo:font-variant="normal" fo:text-transform="none" style:use-window-font-color="true" loext:opacity="0%" fo:font-size="12pt" fo:letter-spacing="normal" fo:font-style="normal" fo:font-weight="normal" officeooo:rsid="00131cff" style:font-size-asian="12pt" style:font-style-asian="normal" style:font-weight-asian="normal" style:font-size-complex="12pt" style:font-style-complex="normal" style:font-weight-complex="normal"/>
    </style:style>
    <style:style style:name="T25" style:family="text">
      <style:text-properties fo:font-variant="normal" fo:text-transform="none" style:use-window-font-color="true" loext:opacity="0%" fo:font-size="12pt" fo:letter-spacing="normal" fo:font-style="normal" fo:font-weight="normal" officeooo:rsid="00e226ad" fo:background-color="transparent" loext:char-shading-value="0" style:font-size-asian="12pt" style:font-style-asian="italic" style:font-size-complex="12pt" style:font-style-complex="italic"/>
    </style:style>
    <style:style style:name="T26" style:family="text">
      <style:text-properties fo:font-variant="normal" fo:text-transform="none" style:use-window-font-color="true" loext:opacity="0%" fo:font-size="12pt" fo:letter-spacing="normal" fo:font-style="normal"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27" style:family="text">
      <style:text-properties fo:font-variant="normal" fo:text-transform="none" style:use-window-font-color="true" loext:opacity="0%" fo:font-size="12pt" fo:letter-spacing="normal" fo:font-style="normal" style:text-underline-style="solid" style:text-underline-width="auto" style:text-underline-color="font-color" fo:font-weight="normal" officeooo:rsid="00e226ad" fo:background-color="transparent" loext:char-shading-value="0" style:font-size-asian="12pt" style:font-style-asian="italic" style:font-size-complex="12pt" style:font-style-complex="italic"/>
    </style:style>
    <style:style style:name="T28" style:family="text">
      <style:text-properties fo:font-variant="normal" fo:text-transform="none" style:use-window-font-color="true" loext:opacity="0%" fo:font-size="12pt" fo:letter-spacing="normal" fo:font-style="normal" fo:font-weight="bold" officeooo:rsid="00e226ad" fo:background-color="transparent" loext:char-shading-value="0" style:font-size-asian="12pt" style:font-style-asian="italic" style:font-weight-asian="bold" style:font-size-complex="12pt" style:font-style-complex="italic" style:font-weight-complex="bold"/>
    </style:style>
    <style:style style:name="T29" style:family="text">
      <style:text-properties fo:font-variant="normal" fo:text-transform="none" style:use-window-font-color="true" loext:opacity="0%" fo:font-size="12pt" fo:letter-spacing="normal" fo:font-style="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30" style:family="text">
      <style:text-properties fo:font-variant="normal" fo:text-transform="none" style:use-window-font-color="true" loext:opacity="0%" fo:font-size="12pt" fo:letter-spacing="normal" fo:font-style="italic" fo:font-weight="normal" fo:background-color="transparent" loext:char-shading-value="0" style:font-size-asian="12pt" style:font-style-asian="italic" style:font-size-complex="12pt" style:font-style-complex="italic"/>
    </style:style>
    <style:style style:name="T31" style:family="text">
      <style:text-properties fo:font-variant="normal" fo:text-transform="none" style:use-window-font-color="true" loext:opacity="0%" fo:font-size="12pt" fo:letter-spacing="normal" fo:font-style="italic" fo:font-weight="normal" officeooo:rsid="00e226ad" fo:background-color="transparent" loext:char-shading-value="0" style:font-size-asian="12pt" style:font-style-asian="italic" style:font-size-complex="12pt" style:font-style-complex="italic"/>
    </style:style>
    <style:style style:name="T32" style:family="text">
      <style:text-properties fo:font-variant="normal" fo:text-transform="none" style:use-window-font-color="true" loext:opacity="0%" fo:font-size="12pt" fo:letter-spacing="normal" fo:font-style="italic"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33" style:family="text">
      <style:text-properties fo:font-variant="normal" fo:text-transform="none" style:use-window-font-color="true" loext:opacity="0%" fo:font-size="12pt" fo:letter-spacing="normal" fo:font-style="italic" fo:font-weight="normal" style:font-size-asian="12pt" style:font-style-asian="italic" style:font-weight-asian="normal" style:font-size-complex="12pt" style:font-style-complex="italic" style:font-weight-complex="normal"/>
    </style:style>
    <style:style style:name="T34" style:family="text">
      <style:text-properties fo:font-variant="normal" fo:text-transform="none" style:use-window-font-color="true" loext:opacity="0%" fo:font-size="12pt" fo:letter-spacing="normal" fo:font-style="italic"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35" style:family="text">
      <style:text-properties fo:font-variant="normal" fo:text-transform="none" style:use-window-font-color="true" loext:opacity="0%" fo:font-size="12pt" fo:letter-spacing="normal" style:text-underline-style="none" fo:font-weight="bold" officeooo:rsid="00e226ad" fo:background-color="transparent" loext:char-shading-value="0" style:font-size-asian="12pt" style:font-style-asian="italic" style:font-weight-asian="bold" style:font-size-complex="12pt" style:font-style-complex="italic" style:font-weight-complex="bold"/>
    </style:style>
    <style:style style:name="T36" style:family="text">
      <style:text-properties fo:font-variant="normal" fo:text-transform="none" style:use-window-font-color="true" loext:opacity="0%" fo:font-size="12pt" fo:letter-spacing="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37" style:family="text">
      <style:text-properties fo:font-variant="normal" fo:text-transform="none" style:use-window-font-color="true" loext:opacity="0%" fo:font-size="11pt" fo:letter-spacing="normal" style:text-underline-style="none" fo:font-weight="bold" officeooo:rsid="00e226ad" fo:background-color="transparent" loext:char-shading-value="0" style:font-size-asian="11pt" style:font-style-asian="italic" style:font-weight-asian="bold" style:font-size-complex="11pt" style:font-style-complex="italic" style:font-weight-complex="bold"/>
    </style:style>
    <style:style style:name="T38" style:family="text">
      <style:text-properties fo:font-variant="normal" fo:text-transform="none" style:use-window-font-color="true" loext:opacity="0%" fo:font-size="11pt" fo:letter-spacing="normal" fo:font-weight="bold" officeooo:rsid="00e226ad" fo:background-color="transparent" loext:char-shading-value="0" style:font-size-asian="11pt" style:font-style-asian="italic" style:font-weight-asian="bold" style:font-size-complex="11pt" style:font-style-complex="italic" style:font-weight-complex="bold"/>
    </style:style>
    <style:style style:name="T39" style:family="text">
      <style:text-properties fo:font-variant="normal" fo:text-transform="none" style:use-window-font-color="true" loext:opacity="0%" style:font-name="Noto Sans1" fo:font-size="12pt" fo:letter-spacing="normal" fo:font-style="italic"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style:use-window-font-color="true" loext:opacity="0%" style:font-name="Noto Sans1" fo:font-size="12pt" fo:letter-spacing="normal" fo:font-style="italic"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41" style:family="text">
      <style:text-properties fo:font-variant="normal" fo:text-transform="none" style:use-window-font-color="true" loext:opacity="0%" style:font-name="Noto Sans1" fo:font-size="12pt" fo:letter-spacing="normal" fo:font-style="italic"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42" style:family="text">
      <style:text-properties fo:font-variant="normal" fo:text-transform="none" style:use-window-font-color="true" loext:opacity="0%" style:font-name="Noto Sans1" fo:font-size="12pt" fo:letter-spacing="normal" fo:font-style="italic" style:text-underline-style="none" fo:font-weight="bold" officeooo:rsid="00e226ad" fo:background-color="transparent" loext:char-shading-value="0" style:font-size-asian="12pt" style:font-style-asian="italic" style:font-weight-asian="bold" style:font-size-complex="12pt" style:font-style-complex="italic" style:font-weight-complex="bold"/>
    </style:style>
    <style:style style:name="T43" style:family="text">
      <style:text-properties fo:font-variant="normal" fo:text-transform="none" style:use-window-font-color="true" loext:opacity="0%" style:font-name="Noto Sans1" fo:font-size="12pt" fo:letter-spacing="normal" fo:font-style="italic" fo:font-weight="bold" officeooo:rsid="00e226ad" fo:background-color="transparent" loext:char-shading-value="0" style:font-size-asian="12pt" style:font-style-asian="italic" style:font-weight-asian="bold" style:font-size-complex="12pt" style:font-style-complex="italic" style:font-weight-complex="bold"/>
    </style:style>
    <style:style style:name="T44" style:family="text">
      <style:text-properties fo:font-variant="normal" fo:text-transform="none" style:use-window-font-color="true" loext:opacity="0%" style:font-name="Noto Sans1" fo:font-size="12pt" fo:letter-spacing="normal" fo:font-style="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45" style:family="text">
      <style:text-properties fo:font-variant="normal" fo:text-transform="none" style:use-window-font-color="true" loext:opacity="0%" style:font-name="Noto Sans1" fo:font-size="12pt" fo:letter-spacing="normal" fo:font-style="normal" fo:font-weight="normal" officeooo:rsid="00e226ad" fo:background-color="transparent" loext:char-shading-value="0" style:font-size-asian="12pt" style:font-style-asian="italic" style:font-size-complex="12pt" style:font-style-complex="italic"/>
    </style:style>
    <style:style style:name="T46" style:family="text">
      <style:text-properties fo:font-variant="normal" fo:text-transform="none" style:use-window-font-color="true" loext:opacity="0%" style:font-name="Noto Sans1" fo:font-size="12pt" fo:letter-spacing="normal" fo:font-style="normal"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47" style:family="text">
      <style:text-properties fo:font-variant="normal" fo:text-transform="none" style:use-window-font-color="true" loext:opacity="0%" style:font-name="Noto Sans1" fo:font-size="12pt" fo:letter-spacing="normal" fo:font-style="normal" style:text-underline-style="solid" style:text-underline-width="auto" style:text-underline-color="font-color" fo:font-weight="normal" officeooo:rsid="00e226ad" fo:background-color="transparent" loext:char-shading-value="0" style:font-size-asian="12pt" style:font-style-asian="italic" style:font-size-complex="12pt" style:font-style-complex="italic"/>
    </style:style>
    <style:style style:name="T48" style:family="text">
      <style:text-properties fo:font-variant="normal" fo:text-transform="none" style:use-window-font-color="true" loext:opacity="0%" style:font-name="Noto Sans1" fo:font-size="12pt" fo:letter-spacing="normal" fo:font-style="normal" fo:font-weight="bold" officeooo:rsid="00e226ad" fo:background-color="transparent" loext:char-shading-value="0" style:font-size-asian="12pt" style:font-style-asian="italic" style:font-weight-asian="bold" style:font-size-complex="12pt" style:font-style-complex="italic" style:font-weight-complex="bold"/>
    </style:style>
    <style:style style:name="T49" style:family="text">
      <style:text-properties fo:font-variant="normal" fo:text-transform="none" style:use-window-font-color="true" loext:opacity="0%" style:font-name="Noto Sans1" fo:font-size="12pt" fo:letter-spacing="normal" style:text-underline-style="none" fo:font-weight="bold" officeooo:rsid="00e226ad" fo:background-color="transparent" loext:char-shading-value="0" style:font-size-asian="12pt" style:font-style-asian="italic" style:font-weight-asian="bold" style:font-size-complex="12pt" style:font-style-complex="italic" style:font-weight-complex="bold"/>
    </style:style>
    <style:style style:name="T50" style:family="text">
      <style:text-properties fo:font-variant="normal" fo:text-transform="none" style:use-window-font-color="true" loext:opacity="0%" style:font-name="Noto Sans1" fo:font-size="12pt" fo:letter-spacing="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51" style:family="text">
      <style:text-properties fo:font-variant="normal" fo:text-transform="none" style:use-window-font-color="true" loext:opacity="0%" style:font-name="Noto Sans1" fo:font-size="12pt" fo:letter-spacing="normal" fo:font-weight="bold" officeooo:rsid="00e226ad" fo:background-color="transparent" loext:char-shading-value="0" style:font-size-asian="12pt" style:font-style-asian="italic" style:font-weight-asian="bold" style:font-size-complex="12pt" style:font-style-complex="italic" style:font-weight-complex="bold"/>
    </style:style>
    <style:style style:name="T52" style:family="text">
      <style:text-properties fo:font-variant="normal" fo:text-transform="none" style:use-window-font-color="true" loext:opacity="0%" style:font-name="Noto Sans1" fo:letter-spacing="normal" fo:font-style="italic" fo:font-weight="normal" style:font-style-asian="italic" style:font-weight-asian="normal" style:font-style-complex="italic" style:font-weight-complex="normal"/>
    </style:style>
    <style:style style:name="T53" style:family="text">
      <style:text-properties fo:font-variant="normal" fo:text-transform="none" style:use-window-font-color="true" loext:opacity="0%" style:font-name="Noto Sans1" fo:letter-spacing="normal" fo:font-style="normal" style:text-underline-style="none" fo:font-weight="normal" officeooo:rsid="00e226ad" fo:background-color="transparent" loext:char-shading-value="0" style:font-style-asian="italic" style:font-weight-asian="normal" style:font-style-complex="italic" style:font-weight-complex="normal"/>
    </style:style>
    <style:style style:name="T54" style:family="text">
      <style:text-properties fo:font-variant="normal" fo:text-transform="none" style:use-window-font-color="true" loext:opacity="0%" fo:letter-spacing="normal" fo:font-style="italic" fo:font-weight="normal" fo:background-color="transparent" loext:char-shading-value="0" style:font-style-asian="italic" style:font-style-complex="italic"/>
    </style:style>
    <style:style style:name="T55" style:family="text">
      <style:text-properties fo:font-variant="normal" fo:text-transform="none" style:use-window-font-color="true" loext:opacity="0%" fo:letter-spacing="normal" fo:font-style="italic" fo:font-weight="normal" officeooo:rsid="00e226ad" fo:background-color="transparent" loext:char-shading-value="0" style:font-style-asian="italic" style:font-style-complex="italic"/>
    </style:style>
    <style:style style:name="T56" style:family="text">
      <style:text-properties fo:font-variant="normal" fo:text-transform="none" style:use-window-font-color="true" loext:opacity="0%" fo:letter-spacing="normal" fo:font-style="italic" fo:font-weight="normal" officeooo:rsid="00e226ad" fo:background-color="transparent" loext:char-shading-value="0" style:font-style-asian="italic" style:font-weight-asian="normal" style:font-style-complex="italic" style:font-weight-complex="normal"/>
    </style:style>
    <style:style style:name="T57" style:family="text">
      <style:text-properties fo:font-variant="normal" fo:text-transform="none" style:use-window-font-color="true" loext:opacity="0%" fo:letter-spacing="normal" fo:font-style="italic" style:text-underline-style="none" fo:font-weight="normal" officeooo:rsid="00e226ad" fo:background-color="transparent" loext:char-shading-value="0" style:font-style-asian="italic" style:font-weight-asian="normal" style:font-style-complex="italic" style:font-weight-complex="normal"/>
    </style:style>
    <style:style style:name="T58" style:family="text">
      <style:text-properties fo:font-variant="normal" fo:text-transform="none" style:use-window-font-color="true" loext:opacity="0%" fo:letter-spacing="normal" fo:font-style="normal" fo:font-weight="normal" officeooo:rsid="00e226ad" fo:background-color="transparent" loext:char-shading-value="0" style:font-style-asian="italic" style:font-style-complex="italic"/>
    </style:style>
    <style:style style:name="T59" style:family="text">
      <style:text-properties fo:font-variant="normal" fo:text-transform="none" style:use-window-font-color="true" loext:opacity="0%" fo:letter-spacing="normal" fo:font-style="normal" fo:font-weight="normal" officeooo:rsid="00e226ad" fo:background-color="transparent" loext:char-shading-value="0" style:font-style-asian="italic" style:font-weight-asian="normal" style:font-style-complex="italic" style:font-weight-complex="normal"/>
    </style:style>
    <style:style style:name="T60" style:family="text">
      <style:text-properties fo:font-variant="normal" fo:text-transform="none" style:use-window-font-color="true" loext:opacity="0%" fo:letter-spacing="normal" fo:font-style="normal" fo:font-weight="normal" officeooo:rsid="00131cff" style:font-style-asian="normal" style:font-weight-asian="normal" style:font-style-complex="normal" style:font-weight-complex="normal"/>
    </style:style>
    <style:style style:name="T61"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e226ad" fo:background-color="transparent" loext:char-shading-value="0" style:font-style-asian="italic" style:font-style-complex="italic"/>
    </style:style>
    <style:style style:name="T62"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e226ad" fo:background-color="transparent" loext:char-shading-value="0" style:font-style-asian="italic" style:font-weight-asian="bold" style:font-style-complex="italic" style:font-weight-complex="bold"/>
    </style:style>
    <style:style style:name="T63" style:family="text">
      <style:text-properties fo:font-variant="normal" fo:text-transform="none" style:use-window-font-color="true" loext:opacity="0%" fo:letter-spacing="normal" fo:font-style="normal" fo:font-weight="bold" officeooo:rsid="00e226ad" fo:background-color="transparent" loext:char-shading-value="0" style:font-style-asian="italic" style:font-weight-asian="bold" style:font-style-complex="italic" style:font-weight-complex="bold"/>
    </style:style>
    <style:style style:name="T64" style:family="text">
      <style:text-properties fo:font-variant="normal" fo:text-transform="none" style:use-window-font-color="true" loext:opacity="0%" fo:letter-spacing="normal" fo:font-style="normal" style:text-underline-style="none" fo:font-weight="normal" officeooo:rsid="00e226ad" fo:background-color="transparent" loext:char-shading-value="0" style:font-style-asian="italic" style:font-weight-asian="normal" style:font-style-complex="italic" style:font-weight-complex="normal"/>
    </style:style>
    <style:style style:name="T65" style:family="text">
      <style:text-properties fo:font-variant="normal" fo:text-transform="none" style:use-window-font-color="true" loext:opacity="0%" fo:letter-spacing="normal" style:text-underline-style="none" fo:font-weight="bold" officeooo:rsid="00e226ad" fo:background-color="transparent" loext:char-shading-value="0" style:font-style-asian="italic" style:font-weight-asian="bold" style:font-style-complex="italic" style:font-weight-complex="bold"/>
    </style:style>
    <style:style style:name="T66" style:family="text">
      <style:text-properties fo:font-variant="normal" fo:text-transform="none" style:use-window-font-color="true" loext:opacity="0%" fo:letter-spacing="normal" style:text-underline-style="none" fo:font-weight="normal" officeooo:rsid="00e226ad" fo:background-color="transparent" loext:char-shading-value="0" style:font-style-asian="italic" style:font-weight-asian="normal" style:font-style-complex="italic" style:font-weight-complex="normal"/>
    </style:style>
    <style:style style:name="T67" style:family="text">
      <style:text-properties fo:font-variant="normal" fo:text-transform="none" style:use-window-font-color="true" loext:opacity="0%" fo:letter-spacing="normal" fo:font-weight="bold" officeooo:rsid="00e226ad" fo:background-color="transparent" loext:char-shading-value="0" style:font-style-asian="italic" style:font-weight-asian="bold" style:font-style-complex="italic" style:font-weight-complex="bold"/>
    </style:style>
    <style:style style:name="T68" style:family="text">
      <style:text-properties fo:font-variant="normal" fo:text-transform="none" fo:color="#113040" loext:opacity="100%" style:font-name="Noto Sans1" fo:font-size="12pt" fo:letter-spacing="normal" fo:font-style="italic" fo:font-weight="normal" fo:background-color="transparent" loext:char-shading-value="0" style:font-size-asian="12pt" style:font-style-asian="italic" style:font-size-complex="12pt" style:font-style-complex="italic"/>
    </style:style>
    <style:style style:name="T69" style:family="text">
      <style:text-properties fo:font-variant="normal" fo:text-transform="none" fo:color="#113040" loext:opacity="100%" style:font-name="Noto Sans1" fo:font-size="12pt" fo:letter-spacing="normal" fo:font-style="italic"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70" style:family="text">
      <style:text-properties fo:font-variant="normal" fo:text-transform="none" fo:color="#113040" loext:opacity="100%" style:font-name="Noto Sans1" fo:font-size="12pt" fo:letter-spacing="normal" fo:font-style="normal" fo:font-weight="normal" officeooo:rsid="00131cff" style:font-size-asian="12pt" style:font-style-asian="normal" style:font-weight-asian="normal" style:font-size-complex="12pt" style:font-style-complex="normal" style:font-weight-complex="normal"/>
    </style:style>
    <style:style style:name="T71" style:family="text">
      <style:text-properties fo:font-variant="normal" fo:text-transform="none" fo:color="#113040" loext:opacity="100%" fo:font-size="12pt" fo:letter-spacing="normal" fo:font-style="italic" fo:font-weight="normal" fo:background-color="transparent" loext:char-shading-value="0" style:font-size-asian="12pt" style:font-style-asian="italic" style:font-size-complex="12pt" style:font-style-complex="italic"/>
    </style:style>
    <style:style style:name="T72" style:family="text">
      <style:text-properties fo:font-variant="normal" fo:text-transform="none" fo:color="#113040" loext:opacity="100%" fo:font-size="12pt" fo:letter-spacing="normal" fo:font-style="italic"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73" style:family="text">
      <style:text-properties fo:font-variant="normal" fo:text-transform="none" fo:color="#113040" loext:opacity="100%" fo:font-size="12pt" fo:letter-spacing="normal" fo:font-style="normal" fo:font-weight="normal" officeooo:rsid="00131cff" style:font-size-asian="12pt" style:font-style-asian="normal" style:font-weight-asian="normal" style:font-size-complex="12pt" style:font-style-complex="normal" style:font-weight-complex="normal"/>
    </style:style>
    <style:style style:name="T74" style:family="text">
      <style:text-properties fo:font-variant="normal" fo:text-transform="none" fo:color="#113040" loext:opacity="100%" fo:letter-spacing="normal" fo:font-style="italic" fo:font-weight="normal" fo:background-color="transparent" loext:char-shading-value="0" style:font-style-asian="italic" style:font-style-complex="italic"/>
    </style:style>
    <style:style style:name="T75" style:family="text">
      <style:text-properties fo:font-variant="normal" fo:text-transform="none" fo:color="#113040" loext:opacity="100%" fo:letter-spacing="normal" fo:font-style="italic" style:text-underline-style="none" fo:font-weight="normal" officeooo:rsid="00e226ad" fo:background-color="transparent" loext:char-shading-value="0" style:font-style-asian="italic" style:font-weight-asian="normal" style:font-style-complex="italic" style:font-weight-complex="normal"/>
    </style:style>
    <style:style style:name="T76" style:family="text">
      <style:text-properties fo:font-variant="normal" fo:text-transform="none" fo:color="#113040" loext:opacity="100%" fo:letter-spacing="normal" fo:font-style="normal" fo:font-weight="normal" officeooo:rsid="00131cff" style:font-style-asian="normal" style:font-weight-asian="normal" style:font-style-complex="normal" style:font-weight-complex="normal"/>
    </style:style>
    <style:style style:name="T77" style:family="text">
      <style:text-properties fo:font-variant="normal" fo:text-transform="none" fo:color="#113040" loext:opacity="100%" style:font-name="Noto Sans1" fo:font-size="12pt" fo:letter-spacing="normal" fo:font-style="italic"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78" style:family="text">
      <style:text-properties fo:font-variant="normal" fo:text-transform="none" fo:font-size="12pt" fo:letter-spacing="normal" fo:font-style="normal" fo:font-weight="normal" style:font-size-asian="12pt" style:font-size-complex="12pt"/>
    </style:style>
    <style:style style:name="T79"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80" style:family="text">
      <style:text-properties fo:font-variant="normal" fo:text-transform="none" fo:font-size="12pt" fo:letter-spacing="normal" fo:font-style="normal" fo:font-weight="normal" officeooo:rsid="00131cff" style:font-size-asian="12pt" style:font-style-asian="normal" style:font-weight-asian="normal" style:font-size-complex="12pt" style:font-style-complex="normal" style:font-weight-complex="normal"/>
    </style:style>
    <style:style style:name="T81" style:family="text">
      <style:text-properties fo:font-variant="normal" fo:text-transform="none" fo:font-size="12pt" fo:letter-spacing="normal" fo:font-style="normal" fo:font-weight="normal" officeooo:rsid="00eb992e" style:font-size-asian="12pt" style:font-style-asian="normal" style:font-weight-asian="normal" style:font-size-complex="12pt" style:font-style-complex="normal" style:font-weight-complex="normal"/>
    </style:style>
    <style:style style:name="T82" style:family="text">
      <style:text-properties fo:font-variant="normal" fo:text-transform="none" fo:font-size="12pt" fo:letter-spacing="normal" fo:font-style="normal" fo:font-weight="normal" officeooo:rsid="00e226ad" fo:background-color="transparent" loext:char-shading-value="0" style:font-size-asian="12pt" style:font-style-asian="italic" style:font-size-complex="12pt" style:font-style-complex="italic"/>
    </style:style>
    <style:style style:name="T83" style:family="text">
      <style:text-properties fo:font-variant="normal" fo:text-transform="none" fo:font-size="12pt" fo:letter-spacing="normal" fo:font-style="normal" style:text-underline-style="none" fo:font-weight="normal" officeooo:rsid="00e226ad"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fo:font-size="12pt" fo:letter-spacing="normal" fo:font-style="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85" style:family="text">
      <style:text-properties fo:font-variant="normal" fo:text-transform="none" fo:font-size="12pt" fo:letter-spacing="normal" fo:font-style="italic" style:font-size-asian="12pt" style:font-style-asian="italic" style:font-size-complex="12pt" style:font-style-complex="italic"/>
    </style:style>
    <style:style style:name="T86"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87" style:family="text">
      <style:text-properties fo:font-variant="normal" fo:text-transform="none" fo:font-size="12pt" fo:letter-spacing="normal" fo:font-style="italic" style:text-underline-style="none" fo:font-weight="bold" officeooo:rsid="00e226ad" fo:background-color="transparent" loext:char-shading-value="0" style:font-size-asian="12pt" style:font-style-asian="italic" style:font-weight-asian="bold" style:font-size-complex="12pt" style:font-style-complex="italic" style:font-weight-complex="bold"/>
    </style:style>
    <style:style style:name="T88" style:family="text">
      <style:text-properties fo:font-variant="normal" fo:text-transform="none" fo:font-size="12pt" fo:letter-spacing="normal" style:font-size-asian="12pt" style:font-style-asian="italic" style:font-size-complex="12pt" style:font-style-complex="italic"/>
    </style:style>
    <style:style style:name="T89" style:family="text">
      <style:text-properties fo:font-variant="normal" fo:text-transform="none" fo:font-size="12pt" fo:letter-spacing="normal" fo:font-weight="normal" style:font-size-asian="12pt" style:font-style-asian="italic" style:font-size-complex="12pt" style:font-style-complex="italic"/>
    </style:style>
    <style:style style:name="T90" style:family="text">
      <style:text-properties fo:font-variant="normal" fo:text-transform="none" fo:letter-spacing="normal" fo:font-style="normal" fo:font-weight="normal"/>
    </style:style>
    <style:style style:name="T91" style:family="text">
      <style:text-properties fo:font-variant="normal" fo:text-transform="none" fo:letter-spacing="normal" fo:font-style="normal" fo:font-weight="normal" officeooo:rsid="00e226ad" fo:background-color="transparent" loext:char-shading-value="0" style:font-style-asian="italic" style:font-style-complex="italic"/>
    </style:style>
    <style:style style:name="T92" style:family="text">
      <style:text-properties fo:font-variant="normal" fo:text-transform="none" fo:letter-spacing="normal" fo:font-style="normal" fo:font-weight="normal" officeooo:rsid="0014f199" fo:background-color="transparent" loext:char-shading-value="0" style:font-style-asian="italic" style:font-style-complex="italic"/>
    </style:style>
    <style:style style:name="T93" style:family="text">
      <style:text-properties fo:font-variant="normal" fo:text-transform="none" fo:letter-spacing="normal" fo:font-style="normal" fo:font-weight="normal" style:font-style-asian="normal" style:font-weight-asian="normal" style:font-style-complex="normal" style:font-weight-complex="normal"/>
    </style:style>
    <style:style style:name="T94" style:family="text">
      <style:text-properties fo:font-variant="normal" fo:text-transform="none" fo:letter-spacing="normal" fo:font-style="normal" fo:font-weight="normal" officeooo:rsid="00131cff" style:font-style-asian="normal" style:font-weight-asian="normal" style:font-style-complex="normal" style:font-weight-complex="normal"/>
    </style:style>
    <style:style style:name="T95" style:family="text">
      <style:text-properties fo:font-variant="normal" fo:text-transform="none" fo:letter-spacing="normal" fo:font-style="normal" fo:font-weight="normal" officeooo:rsid="00eb992e" style:font-style-asian="normal" style:font-weight-asian="normal" style:font-style-complex="normal" style:font-weight-complex="normal"/>
    </style:style>
    <style:style style:name="T96" style:family="text">
      <style:text-properties fo:font-variant="normal" fo:text-transform="none" fo:letter-spacing="normal" fo:font-style="normal" style:text-underline-style="none" fo:font-weight="normal" officeooo:rsid="00e226ad" fo:background-color="transparent" loext:char-shading-value="0" style:font-style-asian="italic" style:font-style-complex="italic"/>
    </style:style>
    <style:style style:name="T97" style:family="text">
      <style:text-properties fo:font-variant="normal" fo:text-transform="none" fo:letter-spacing="normal" fo:font-style="normal" style:text-underline-style="none" fo:font-weight="normal" officeooo:rsid="00e226ad" fo:background-color="transparent" loext:char-shading-value="0" style:font-style-asian="italic" style:font-weight-asian="normal" style:font-style-complex="italic" style:font-weight-complex="normal"/>
    </style:style>
    <style:style style:name="T98" style:family="text">
      <style:text-properties fo:font-variant="normal" fo:text-transform="none" fo:letter-spacing="normal" fo:font-style="normal" style:text-underline-style="none" fo:font-weight="normal" officeooo:rsid="00e226ad" fo:background-color="transparent" loext:char-shading-value="0" style:font-style-asian="normal" style:font-weight-asian="normal" style:font-style-complex="normal" style:font-weight-complex="normal"/>
    </style:style>
    <style:style style:name="T99" style:family="text">
      <style:text-properties fo:font-variant="normal" fo:text-transform="none" fo:letter-spacing="normal" fo:font-style="normal" style:text-underline-style="solid" style:text-underline-width="auto" style:text-underline-color="font-color" fo:font-weight="normal" officeooo:rsid="00e226ad" fo:background-color="transparent" loext:char-shading-value="0" style:font-style-asian="italic" style:font-weight-asian="bold" style:font-style-complex="italic" style:font-weight-complex="bold"/>
    </style:style>
    <style:style style:name="T100" style:family="text">
      <style:text-properties fo:font-variant="normal" fo:text-transform="none" fo:letter-spacing="normal" fo:font-style="italic" fo:font-weight="normal" officeooo:rsid="00e226ad" fo:background-color="transparent" loext:char-shading-value="0" style:font-style-asian="italic" style:font-style-complex="italic"/>
    </style:style>
    <style:style style:name="T101" style:family="text">
      <style:text-properties fo:font-variant="normal" fo:text-transform="none" fo:letter-spacing="normal" fo:font-style="italic" fo:font-weight="normal" style:font-style-asian="italic" style:font-style-complex="italic"/>
    </style:style>
    <style:style style:name="T102" style:family="text">
      <style:text-properties fo:font-variant="normal" fo:text-transform="none" fo:letter-spacing="normal" fo:font-style="italic" style:text-underline-style="none" fo:font-weight="bold" officeooo:rsid="00e226ad" fo:background-color="transparent" loext:char-shading-value="0" style:font-style-asian="italic" style:font-weight-asian="bold" style:font-style-complex="italic" style:font-weight-complex="bold"/>
    </style:style>
    <style:style style:name="T103" style:family="text">
      <style:text-properties fo:font-variant="normal" fo:text-transform="none" fo:letter-spacing="normal" fo:font-style="italic" style:font-style-asian="italic" style:font-style-complex="italic"/>
    </style:style>
    <style:style style:name="T104" style:family="text">
      <style:text-properties fo:font-variant="normal" fo:text-transform="none" fo:letter-spacing="normal" fo:font-style="italic" fo:font-weight="bold" style:font-style-asian="italic" style:font-weight-asian="bold" style:font-style-complex="italic" style:font-weight-complex="bold"/>
    </style:style>
    <style:style style:name="T105" style:family="text">
      <style:text-properties fo:font-variant="normal" fo:text-transform="none" fo:letter-spacing="normal" style:font-style-asian="italic" style:font-style-complex="italic"/>
    </style:style>
    <style:style style:name="T106" style:family="text">
      <style:text-properties fo:font-variant="normal" fo:text-transform="none" fo:letter-spacing="normal" fo:font-weight="normal" style:font-style-asian="italic" style:font-style-complex="italic"/>
    </style:style>
    <style:style style:name="T107" style:family="text">
      <style:text-properties fo:font-variant="normal" fo:text-transform="none" style:text-line-through-style="none" style:text-line-through-type="none" fo:letter-spacing="normal" fo:font-style="normal" style:text-underline-style="none" fo:font-weight="normal" officeooo:rsid="00e226ad" style:text-blinking="false" fo:background-color="transparent" loext:char-shading-value="0" style:font-style-asian="italic" style:font-style-complex="italic" loext:padding="0cm" loext:border="none"/>
    </style:style>
    <style:style style:name="T10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109" style:family="text">
      <style:text-properties fo:font-variant="normal" fo:text-transform="none" style:text-line-through-style="none" style:text-line-through-type="none" style:font-name="Noto Sans1" fo:font-size="12pt" fo:letter-spacing="normal" fo:font-style="normal" style:text-underline-style="none" fo:font-weight="normal" style:text-blinking="false" style:font-size-asian="12pt" style:font-size-complex="12pt" loext:padding="0cm" loext:border="none"/>
    </style:style>
    <style:style style:name="T110"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ize-complex="12pt" loext:padding="0cm" loext:border="none"/>
    </style:style>
    <style:style style:name="T111" style:family="text">
      <style:text-properties fo:font-variant="normal" fo:text-transform="none" fo:font-size="11pt" fo:letter-spacing="normal" fo:font-style="italic" style:text-underline-style="none" fo:font-weight="bold" officeooo:rsid="00e226ad" fo:background-color="transparent" loext:char-shading-value="0" style:font-size-asian="11pt" style:font-style-asian="italic" style:font-weight-asian="bold" style:font-size-complex="11pt" style:font-style-complex="italic" style:font-weight-complex="bold"/>
    </style:style>
    <style:style style:name="T112" style:family="text">
      <style:text-properties fo:font-variant="normal" fo:text-transform="none" fo:font-size="11pt" fo:letter-spacing="normal" fo:font-style="italic" fo:font-weight="bold" style:font-size-asian="11pt" style:font-style-asian="italic" style:font-weight-asian="bold" style:font-size-complex="11pt" style:font-style-complex="italic" style:font-weight-complex="bold"/>
    </style:style>
    <style:style style:name="T113" style:family="text">
      <style:text-properties fo:font-variant="normal" fo:text-transform="none" style:font-name="Noto Sans1" fo:font-size="12pt" fo:letter-spacing="normal" fo:font-style="normal" fo:font-weight="normal" style:font-size-asian="12pt" style:font-size-complex="12pt"/>
    </style:style>
    <style:style style:name="T114" style:family="text">
      <style:text-properties fo:font-variant="normal" fo:text-transform="none" style:font-name="Noto Sans1" fo:font-size="12pt" fo:letter-spacing="normal" fo:font-style="normal" style:text-underline-style="none" fo:font-weight="normal" officeooo:rsid="00e226ad" fo:background-color="transparent" loext:char-shading-value="0" style:font-size-asian="12pt" style:font-style-asian="italic" style:font-weight-asian="normal" style:font-size-complex="12pt" style:font-style-complex="italic" style:font-weight-complex="normal"/>
    </style:style>
    <style:style style:name="T115" style:family="text">
      <style:text-properties fo:font-variant="normal" fo:text-transform="none" style:font-name="Noto Sans1" fo:font-size="12pt" fo:letter-spacing="normal" style:font-size-asian="12pt" style:font-style-asian="italic" style:font-size-complex="12pt" style:font-style-complex="italic"/>
    </style:style>
    <style:style style:name="T116" style:family="text">
      <style:text-properties fo:font-variant="normal" fo:text-transform="none" style:font-name="Noto Sans1" fo:font-size="12pt" fo:letter-spacing="normal" fo:font-weight="normal" style:font-size-asian="12pt" style:font-style-asian="italic" style:font-size-complex="12pt" style:font-style-complex="italic"/>
    </style:style>
    <style:style style:name="T117" style:family="text">
      <style:text-properties fo:font-variant="normal" fo:text-transform="none" style:font-name="Noto Sans1" fo:font-size="11pt" fo:letter-spacing="normal" fo:font-style="italic" fo:font-weight="bold" style:font-size-asian="11pt" style:font-style-asian="italic" style:font-weight-asian="bold" style:font-size-complex="11pt" style:font-style-complex="italic" style:font-weight-complex="bold"/>
    </style:style>
    <style:style style:name="T118" style:family="text">
      <style:text-properties fo:font-style="italic"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style:font-style-asian="italic" style:font-style-complex="italic"/>
    </style:style>
    <style:style style:name="T122" style:family="text">
      <style:text-properties fo:font-style="italic" fo:font-weight="normal" officeooo:rsid="00e226ad" fo:background-color="transparent" loext:char-shading-value="0" style:font-style-asian="italic" style:font-style-complex="italic"/>
    </style:style>
    <style:style style:name="T123" style:family="text">
      <style:text-properties fo:font-style="italic" style:text-underline-style="none" fo:font-weight="bold" style:font-style-asian="italic" style:font-weight-asian="bold" style:font-style-complex="italic" style:font-weight-complex="bold"/>
    </style:style>
    <style:style style:name="T124" style:family="text">
      <style:text-properties fo:font-style="italic" style:text-underline-style="none" fo:font-weight="normal"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27" style:family="text">
      <style:text-properties fo:font-size="11pt" fo:font-weight="bold" style:font-size-asian="11pt" style:font-weight-asian="bold" style:font-size-complex="11pt" style:font-weight-complex="bold"/>
    </style:style>
    <style:style style:name="T128" style:family="text">
      <style:text-properties fo:font-size="11pt" fo:font-weight="bold" officeooo:rsid="00e0a3ca" style:font-size-asian="11pt" style:font-weight-asian="bold" style:font-size-complex="11pt" style:font-weight-complex="bold"/>
    </style:style>
    <style:style style:name="T129" style:family="text">
      <style:text-properties fo:font-size="11pt" style:font-size-asian="11pt" style:font-size-complex="11pt"/>
    </style:style>
    <style:style style:name="T130" style:family="text">
      <style:text-properties fo:font-size="11pt" fo:font-style="normal" style:text-underline-style="none" fo:font-weight="normal" style:font-size-asian="11pt" style:font-size-complex="11pt"/>
    </style:style>
    <style:style style:name="T131" style:family="text">
      <style:text-properties fo:font-size="11pt" fo:font-style="normal" style:text-underline-style="solid" style:text-underline-width="auto" style:text-underline-color="font-color" fo:font-weight="normal" style:font-size-asian="11pt" style:font-style-asian="normal" style:font-size-complex="11pt" style:font-style-complex="normal"/>
    </style:style>
    <style:style style:name="T132" style:family="text">
      <style:text-properties fo:font-style="normal" style:font-style-asian="normal" style:font-style-complex="normal"/>
    </style:style>
    <style:style style:name="T133" style:family="text">
      <style:text-properties fo:font-style="normal" officeooo:rsid="001e4ab3" style:font-style-asian="normal" style:font-style-complex="normal"/>
    </style:style>
    <style:style style:name="T134" style:family="text">
      <style:text-properties fo:font-style="normal" officeooo:rsid="0069f188" style:font-style-asian="normal" style:font-style-complex="normal"/>
    </style:style>
    <style:style style:name="T135" style:family="text">
      <style:text-properties fo:font-style="normal" officeooo:rsid="00dd9444" style:font-style-asian="normal" style:font-style-complex="normal"/>
    </style:style>
    <style:style style:name="T136" style:family="text">
      <style:text-properties fo:font-style="normal" fo:font-weight="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d8390b" style:font-style-asian="normal" style:font-weight-asian="normal" style:font-style-complex="normal" style:font-weight-complex="normal"/>
    </style:style>
    <style:style style:name="T139" style:family="text">
      <style:text-properties fo:font-style="normal" fo:font-weight="normal" officeooo:rsid="006646c2" style:font-style-asian="normal" style:font-weight-asian="normal" style:font-style-complex="normal" style:font-weight-complex="normal"/>
    </style:style>
    <style:style style:name="T140" style:family="text">
      <style:text-properties fo:font-style="normal" fo:font-weight="normal" officeooo:rsid="00dbde21" style:font-style-asian="normal" style:font-weight-asian="normal" style:font-style-complex="normal" style:font-weight-complex="normal"/>
    </style:style>
    <style:style style:name="T141" style:family="text">
      <style:text-properties fo:font-style="normal" fo:font-weight="normal" officeooo:rsid="0014f199"/>
    </style:style>
    <style:style style:name="T142" style:family="text">
      <style:text-properties fo:font-style="normal" fo:font-weight="normal" officeooo:rsid="00e226ad" fo:background-color="transparent" loext:char-shading-value="0" style:font-style-asian="italic" style:font-style-complex="italic"/>
    </style:style>
    <style:style style:name="T143" style:family="text">
      <style:text-properties fo:font-style="normal" fo:font-weight="normal" officeooo:rsid="006ab990"/>
    </style:style>
    <style:style style:name="T144" style:family="text">
      <style:text-properties fo:font-style="normal" style:text-underline-style="solid" style:text-underline-width="auto" style:text-underline-color="font-color" fo:font-weight="normal" style:font-style-asian="normal" style:font-style-complex="normal"/>
    </style:style>
    <style:style style:name="T145" style:family="text">
      <style:text-properties fo:font-style="normal" style:text-underline-style="none" fo:font-weight="normal"/>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style="normal" style:text-underline-style="none" fo:font-weight="normal" officeooo:rsid="00e226ad" fo:background-color="transparent" loext:char-shading-value="0" style:font-style-asian="italic" style:font-weight-asian="normal" style:font-style-complex="italic"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officeooo:rsid="00ae96c0"/>
    </style:style>
    <style:style style:name="T150" style:family="text">
      <style:text-properties officeooo:rsid="0062a038"/>
    </style:style>
    <style:style style:name="T151" style:family="text">
      <style:text-properties style:text-underline-style="none"/>
    </style:style>
    <style:style style:name="T152" style:family="text">
      <style:text-properties fo:font-weight="bold" style:font-weight-asian="bold" style:font-weight-complex="bold"/>
    </style:style>
    <style:style style:name="T153" style:family="text">
      <style:text-properties fo:font-weight="bold" officeooo:rsid="0069f188" style:font-weight-asian="bold" style:font-weight-complex="bold"/>
    </style:style>
    <style:style style:name="T154" style:family="text">
      <style:text-properties fo:font-weight="bold" officeooo:rsid="001378ec" style:font-weight-asian="bold" style:font-weight-complex="bold"/>
    </style:style>
    <style:style style:name="T155" style:family="text">
      <style:text-properties fo:font-weight="bold" officeooo:rsid="00e0a3ca" style:font-weight-asian="bold" style:font-weight-complex="bold"/>
    </style:style>
    <style:style style:name="T156" style:family="text">
      <style:text-properties fo:font-weight="normal" style:font-weight-asian="normal" style:font-weight-complex="normal"/>
    </style:style>
    <style:style style:name="T157" style:family="text">
      <style:text-properties fo:font-weight="normal" officeooo:rsid="007a711a" style:font-weight-asian="normal" style:font-weight-complex="normal"/>
    </style:style>
    <style:style style:name="T158" style:family="text">
      <style:text-properties fo:font-weight="normal" officeooo:rsid="0069f188" style:font-weight-asian="normal" style:font-weight-complex="normal"/>
    </style:style>
    <style:style style:name="T159" style:family="text">
      <style:text-properties fo:font-weight="normal" officeooo:rsid="00651b66" style:font-weight-asian="normal" style:font-weight-complex="normal"/>
    </style:style>
    <style:style style:name="T160" style:family="text">
      <style:text-properties fo:font-weight="normal" officeooo:rsid="00dd9444" style:font-weight-asian="normal" style:font-weight-complex="normal"/>
    </style:style>
    <style:style style:name="T161" style:family="text">
      <style:text-properties fo:font-weight="normal" officeooo:rsid="006481f6" style:font-weight-asian="normal" style:font-weight-complex="normal"/>
    </style:style>
    <style:style style:name="T162" style:family="text">
      <style:text-properties fo:font-weight="normal" style:font-style-asian="italic" style:font-style-complex="italic"/>
    </style:style>
    <style:style style:name="T163" style:family="text">
      <style:text-properties fo:font-size="10pt" fo:font-style="normal" fo:font-weight="normal" style:font-size-asian="10pt" style:font-size-complex="10pt"/>
    </style:style>
    <style:style style:name="T164" style:family="text">
      <style:text-properties style:font-name="Noto Sans1" fo:font-weight="normal" style:font-weight-asian="normal" style:font-weight-complex="normal"/>
    </style:style>
    <style:style style:name="T165" style:family="text">
      <style:text-properties style:font-name="Noto Sans1" fo:font-weight="normal" officeooo:rsid="0041a0f6" style:font-weight-asian="normal" style:font-weight-complex="normal"/>
    </style:style>
    <style:style style:name="T166" style:family="text">
      <style:text-properties style:font-name="Noto Sans1" fo:font-size="12pt" style:font-size-asian="12pt" style:font-size-complex="12pt"/>
    </style:style>
    <style:style style:name="T167" style:family="text">
      <style:text-properties officeooo:rsid="0069f188"/>
    </style:style>
    <style:style style:name="T168" style:family="text">
      <style:text-properties style:font-name="Bahnschrift SemiBold1"/>
    </style:style>
    <style:style style:name="T169" style:family="text">
      <style:text-properties style:font-name="Bahnschrift SemiBold1" fo:font-weight="normal" style:font-weight-asian="normal" style:font-weight-complex="normal"/>
    </style:style>
    <style:style style:name="T170" style:family="text">
      <style:text-properties style:font-name="Bahnschrift SemiBold1" fo:font-style="normal" fo:font-weight="normal" style:font-style-asian="normal" style:font-weight-asian="normal" style:font-style-complex="normal" style:font-weight-complex="normal"/>
    </style:style>
    <style:style style:name="T171" style:family="text">
      <style:text-properties style:font-name="Bahnschrift SemiBold1" fo:font-style="italic" fo:font-weight="normal" style:font-style-asian="italic" style:font-weight-asian="normal" style:font-style-complex="italic" style:font-weight-complex="normal"/>
    </style:style>
    <style:style style:name="T172" style:family="text">
      <style:text-properties officeooo:rsid="00d8390b"/>
    </style:style>
    <style:style style:name="T173" style:family="text">
      <style:text-properties officeooo:rsid="006646c2"/>
    </style:style>
    <style:style style:name="T174" style:family="text">
      <style:text-properties officeooo:rsid="0020ab44"/>
    </style:style>
    <style:style style:name="T175" style:family="text">
      <style:text-properties officeooo:rsid="00dd9444"/>
    </style:style>
    <style:style style:name="T176" style:family="text">
      <style:text-properties officeooo:rsid="001378ec"/>
    </style:style>
    <style:style style:name="T177" style:family="text">
      <style:text-properties officeooo:rsid="00e0a3ca"/>
    </style:style>
    <style:style style:name="T178" style:family="text">
      <style:text-properties officeooo:rsid="00495b7a"/>
    </style:style>
    <style:style style:name="T179" style:family="text">
      <style:text-properties officeooo:rsid="000b681b"/>
    </style:style>
    <style:style style:name="T180" style:family="text">
      <style:text-properties officeooo:rsid="001158ce"/>
    </style:style>
    <style:style style:name="T181" style:family="text">
      <style:text-properties officeooo:rsid="00e226ad"/>
    </style:style>
    <style:style style:name="T182" style:family="text">
      <style:text-properties officeooo:rsid="006ab990"/>
    </style:style>
    <style:style style:name="T183" style:family="text">
      <style:text-properties officeooo:rsid="0014f199"/>
    </style:style>
    <style:style style:name="T184" style:family="text">
      <style:text-properties fo:color="#113040" loext:opacity="100%" fo:font-style="italic" fo:font-weight="normal" style:font-style-asian="italic" style:font-style-complex="italic"/>
    </style:style>
    <style:style style:name="T185" style:family="text">
      <style:text-properties officeooo:rsid="00e45ab2"/>
    </style:style>
    <style:style style:name="T186" style:family="text">
      <style:text-properties style:font-style-asian="italic" style:font-style-complex="italic"/>
    </style:style>
    <style:style style:name="T187" style:family="text">
      <style:text-properties officeooo:rsid="00eb992e"/>
    </style:style>
    <style:style style:name="T188" style:family="text">
      <style:text-properties officeooo:rsid="00ae96c0" fo:background-color="transparent"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latone e i Misteri di Eleusi</text:p>
      <text:p text:style-name="P13">Per comprendere meglio <text:span text:style-name="T177">le dinamiche e l’evoluzione del pensiero filosofico di Platone, non possiamo non fare riferimento ai </text:span><text:span text:style-name="T155">Misteri di Eleusi</text:span><text:span text:style-name="T177">. </text:span></text:p>
      <text:p text:style-name="P14">Nel mondo classico si attribuivano al sostantivo “Mysteria” <text:s/>segreti e conoscenze inaccessibili alla maggioranza degli uomini e riservate solo a quei pochi, dotati delle qualità intellettive e della sensibilità spirituale necessarie per accoglierle ed interiorizzarle.</text:p>
      <text:p text:style-name="P8">Un livello di conoscenza riservato a pochi eletti (ossia persone scelte secondo un criterio rigorosamente selettivo), quindi esoterico nel senso pieno del termine ed iniziatico in quanto concernente il percorso interiore per l’inizio di una nuova vita. Gli antichi Elleni non concepiscono che si possa partecipare a chiunque, indistintamente e senza precauzioni, le dottrine spirituali e la stessa impostazione aristocratica – nel senso qualitativo dell’espressione – riguarda l’accesso alle arti ed alle scienze. Per essi, la medicina e la stessa filosofia, nei suoi aspetti più profondi, restano scienze segrete. Per la medicina, abbiamo la testimonianza di Sorano, il quale nella sua Vita di Ippocrate, scrive:</text:p>
      <text:p text:style-name="P6">“Ippocrate insegnava la sua arte a coloro che erano qualificati per apprenderla, facendo loro prestar giuramento… Infatti le cose sacre si rivelano a uomini <text:soft-page-break/>consacrati: i profani non possono occuparsene, prima di essere stati iniziati ai sacri riti di questa scienza”.</text:p>
      <text:p text:style-name="P9">Questo riferimento alla medicina può apparire estraneo all’argomento specifico delle religioni misteriche, ma non lo è affatto se ci si cala nella mentalità degli Antichi per i quali l’essere umano è un tutto unitario che si articola nei tre elementi costitutivi di <text:span text:style-name="T152">soma</text:span>, <text:span text:style-name="T152">psyché</text:span> e <text:span text:style-name="T152">nous</text:span> (corpo, anima e mente).</text:p>
      <text:p text:style-name="P9"><text:span text:style-name="T149">L</text:span>a salute del corpo e dell’anima sono strettamente connesse, ogni squilibrio fisico riflette un disordine più profondo. L’accesso alle dottrine spirituali più segrete è quindi la base per una migliore e diversa armonia dell’essere umano, anche sul piano fisico, poiché, come spiega Plotino nelle Enneadi, i piani dell’Essere sono distinti ma collegati. Per la filosofia sono illuminanti le testimonianze di Clemente d’Alessandria e di Giamblico sui Pitagorici e su Platone, nonché quella dell’imperatore Giuliano sugli Stoici.</text:p>
      <text:p text:style-name="P10">Non soltanto i Pitagorici e Platone – scrive Clemente d’Alessandria – nascondono la maggior parte dei loro princ<text:span text:style-name="T178">i</text:span>pi dottrinali, ma gli stessi Epicurei dicono di avere dei segreti, e di non permettere a chiunque di consultare i libri nei quali sono esposti. D’altra parte ancora, secondo gli Stoici, Zenone scrisse alcuni trattati che essi non danno da leggere facilmente ai loro discepoli” (Stromata, V, 9).</text:p>
      <text:p text:style-name="P7"><text:soft-page-break/>“I più importanti e universali princìpi insegnati alla loro scuola – <text:span text:style-name="T132">dice Giamblico</text:span> – i Pitagorici li conservavano sempre in loro stessi, osservando un perfetto silenzio, in guisa da non svelarli agli exoterici<text:note text:id="ftn60" text:note-class="footnote"><text:note-citation>1</text:note-citation><text:note-body><text:p text:style-name="P1">L'exoterismo è una forma di religiosità che non si avvale di riti iniziatori, e ha pertanto una valenza pubblica, essendo accessibile alle genti profane anche al di fuori di pratiche religiose o di complessi dottrinari. </text:p></text:note-body></text:note>, e affidandosi senza l’ausilio della scrittura, come divini misteri, alla memoria di quelli che dovevano succedere loro”.</text:p>
      <text:p text:style-name="P7">“Si ingiungeva a quelli del Portico di venerare gli Dei, di essere iniziati a tutti i Misteri, e di essere perfezionati dalle più sante iniziazioni (teletài)” (Giuliano, Orazioni, 108 a).</text:p>
      <text:p text:style-name="P11">La filosofia aveva dunque, nel suo nucleo più interno, un carattere misterico e spirituale, comprendendo l’accesso a verità intuitive che trascendono il pensiero logico-discorsivo, ed analogo discorso può farsi per le arti figurative e per la poesia, che avevano tutte un’ispirazione sacra ed una radice misterica. <text:span text:style-name="T179">Q</text:span>ueste precisazioni generali <text:span text:style-name="T179">si rendono necessarie </text:span>affinché <text:span text:style-name="T179">si</text:span> comprenda che questa impostazione misterica non era limitata a specifiche confraternite praticanti questo o quel culto, ma dava il tono generale a tutta una civiltà.</text:p>
      <text:p text:style-name="P12">Platone, fu uno dei molti personaggi pubblici che furono iniziati ai misteri di Eleusi. I Misteri Eleusini erano riti religiosi misterici che si celebravano ogni anno nel santuario di Demetra nell'antica città greca di Eleusi. </text:p>
      <text:p text:style-name="P9"><text:soft-page-break/><text:span text:style-name="T180">Sono considerati il "più famoso dei riti religiosi segreti dell'antica Grecia". Alla loro base vi era un antico culto agrario e ci sono alcune prove che derivavano dalle pratiche religiose del periodo miceneo. I misteri rappresentavano il mito del rapimento di Persefone dalla madre Demetra da parte del re degli inferi Ade, in un ciclo a tre fasi; la discesa (perdita), la ricerca e l'ascesa, con il tema principale che è l'ascesa di Persefone e la riunione con sua madre </text:span><text:span text:style-name="T181">che le</text:span> iscrizioni eleusine chiamano Demetra e Persefone “le due Dee.”</text:p>
      <text:p text:style-name="P12">Per gli iniziati, la rinascita di Persefone simboleggiava l'eternità della vita che scorre di generazione in generazione, e credevano che avrebbero avuto una ricompensa nell'aldilà.</text:p>
      <text:p text:style-name="P15">Ci sono molti dipinti e pezzi di ceramica che rappresentano vari aspetti dei Misteri. Poiché i Misteri coinvolgevano le visioni e l'evocazione di un aldilà, alcuni studiosi ritengono che il potere e la longevità dei Misteri Eleusini, un insieme coerente di riti, cerimonie ed esperienze che attraversavano due millenni, provenissero da sostanze psichedeliche. </text:p>
      <text:p text:style-name="P8"><text:soft-page-break/><text:span text:style-name="T188">Il testo più utile, anzi per molti aspetti fondamentale, </text:span>per comprendere la “<text:span text:style-name="T182">n</text:span>atura” dell’esperienza “epoptica”<text:note text:id="ftn61" text:note-class="footnote"><text:note-citation>2</text:note-citation><text:note-body><text:p text:style-name="P2">L'esperienza epoptica è il terzo e culminante grado di iniziazione ai Misteri Eleusini, una serie di riti religiosi che si celebravano nell'antica Grecia ad Eleusi, una città vicino ad Atene. Questo grado di iniziazione è rimasto significativamente meno testimoniato rispetto agli altri gradi.</text:p></text:note-body></text:note>, sempre di Plutarco, è il seguente:</text:p>
      <text:p text:style-name="P8">“L’anima al momento della morte, prova la medesima impressione provata da coloro che sono iniziati ai Grandi Misteri. La parola e la cosa si somigliano: si dice ‘teleutàn (morire) e teléisthai (essere iniziato). Prima vi sono delle cose a caso, penosi ritorni, inquietanti cammini interminati attraverso le tenebre. Poi, prima del termine, il fragore è al colmo, il brivido, il tremito, il sudore freddo, lo spavento. Ma poi una meravigliosa luce si offre agli occhi, si passa in puri luoghi e in<text:span text:style-name="T54"> praterie, dove risuonano voci e</text:span><text:span text:style-name="T74"> </text:span><text:span text:style-name="T54">danze. Parole sacre e divine apparizioni ispirano un religioso rispetto. Allora l’uomo, perfetto ed iniziato, divenuto libero e passeggiando senza costrizione, celebra i Misteri con una corona sul capo, vive con gli uomini puri e santi, vede sulla terra la folla di quelli che non sono iniziati e purificati schiacciarsi e pressarsi nella palude e nelle tenebre e, per timore della morte, attardarsi nei mali, per l’errore di credere nella felicità di laggiù”. (Plutarco, fr. 178</text:span><text:span text:style-name="T55">)</text:span></text:p>
      <text:p text:style-name="P37"><text:span text:style-name="T136">E Apuleio fa dire ad un iniziato sostanzialmente le medesime cose collegando l’esperienza del distacco </text:span><text:soft-page-break/><text:span text:style-name="T136">dell’anima dal corpo con la ‘visione mistica ottenuta con il santo rito. </text:span><text:span text:style-name="T141">La </text:span><text:span text:style-name="T121">teleutàn</text:span><text:span text:style-name="T136"> permette agli iniziati di non avere lo stesso terrore della morte che prova l’uomo comune poiché essi l’esperienza della morte l’hanno provata già da vivi e sanno che essa è solo un passaggio ed il preludio di una possibile felicità ultraterrena nel mondo degli dèi: </text:span><text:span text:style-name="T118">“</text:span><text:span text:style-name="T121">Raggiunsi il confine della morte, dopo aver varcato la soglia di Proserpina</text:span><text:span text:style-name="T121"><text:note text:id="ftn62" text:note-class="footnote"><text:note-citation>3</text:note-citation><text:note-body><text:p text:style-name="P3"><text:span text:style-name="T183">I</text:span>l fiume Acheronte è uno dei fiumi dell'oltretomba nella mitologia greca e romana, e rappresenta il confine tra il regno dei vivi e quello dei morti. </text:p></text:note-body></text:note></text:span><text:span text:style-name="T184"> f</text:span><text:span text:style-name="T121">ui condotto attraverso tutti gli elementi, e ritornai indietro. A metà della notte vidi un sole lampeggiante di fulgida luce. Mi presentai al cospetto degli dèi inferi e degli dèi superni, e proprio da vicino li venerai”. </text:span><text:span text:style-name="T122">(Apuleio, Metamorfosi, 11, 23)</text:span></text:p>
      <text:p text:style-name="P54"><text:span text:style-name="T90">Il mutamento di coscienza che avveniva nell’iniziato era straordinario; egli viveva dopo quell’evento di nuove certezze. Un retore</text:span><text:span text:style-name="T90"><text:note text:id="ftn63" text:note-class="footnote"><text:note-citation>4</text:note-citation><text:note-body><text:p text:style-name="P1"><text:span text:style-name="T185">O</text:span>ratore o maestro di eloquenza; <text:span text:style-name="T185">inteso </text:span>anche come appellativo."Seneca il retore"</text:p></text:note-body></text:note></text:span><text:span text:style-name="T90">, parlando dell’esperienza che aveva provato ad Eleusi, affermò:</text:span></text:p>
      <text:p text:style-name="P55"><text:span text:style-name="T103">“</text:span><text:span text:style-name="T101">Uscii dalla sala dei Misteri sentendomi totalmente diverso”</text:span><text:span text:style-name="T90"> (letteralmente: </text:span><text:span text:style-name="T101">“straniero a me stesso</text:span><text:span text:style-name="T90">”)</text:span></text:p>
      <text:p text:style-name="P54"><text:span text:style-name="T91">Ma i testi più autorevoli e famosi che ci parlano dell’esperienza epoptica sono quelli di </text:span><text:span text:style-name="T100">Platone</text:span><text:span text:style-name="T107"> </text:span><text:span text:style-name="T91">nel Fedro e nel Simposio. In un passo del Fedro il filosofo indica i due diversi destini degli uomini: quello delle persone comuni legate alla sola vita dei sensi e che </text:span><text:span text:style-name="T96">‘</text:span><text:span text:style-name="T102">si nutrono </text:span><text:soft-page-break/><text:span text:style-name="T102">del cibo dell’opinione</text:span><text:span text:style-name="T96">’, </text:span><text:span text:style-name="T91">cioè non giungono mai per quel motivo alla vera conoscenza della </text:span><text:span text:style-name="T92">r</text:span><text:span text:style-name="T91">ealtà, e coloro che, invece, iniziati (attraverso i sacri riti o la filosofia), sono capaci di pervenire alla </text:span><text:span text:style-name="T102">‘pianura della verità</text:span><text:span text:style-name="T99"> </text:span><text:span text:style-name="T91">poiché hanno nutrito la parte più elevata della loro anima, quella che </text:span><text:span text:style-name="T102">‘ha le ali’,</text:span><text:span text:style-name="T91"> cioè che tende alla dimensione metafisica. Esiste dunque per Platone una parte </text:span><text:span text:style-name="T102">‘inferiore </text:span><text:span text:style-name="T91">dell’anima ed è quella legata alla vita del corpo, quella che si può intendere come l’insieme delle forze vitali, istintive ed emozionali, ma l’uomo ha in sé anche una parte dell’anima </text:span><text:span text:style-name="T102">‘superiore’</text:span><text:span text:style-name="T98">. </text:span><text:span text:style-name="T91">Questa parte più elevata s’identifica con la consapevolezza e l’alta razionalità e si esprime nella ricerca del Bene, del Bello e del Vero. Così intesa la filosofia, nutrita dalle aspirazioni più elevate, ha la stessa funzione del rito iniziatico: quella di guidare l’anima verso il divino e per questo si può definire ‘</text:span><text:span text:style-name="T102">filosofia epoptica’</text:span><text:span text:style-name="T91">. Ecco appunto quello che ci dice il testo:</text:span></text:p>
      <text:p text:style-name="P39"><text:span text:style-name="T186">“</text:span><text:span text:style-name="T162">Tutte le anime che non sono state iniziate provando un grande tormento si allontanano dalla visione dell’Essere e, essendosi del tutto distaccate dalla Verità si nutrono con il cibo dell’opinione. Ma a causa di ciò esse provano una grande e tormentosa difficoltà a vedere la pianura della verità e scoprire dov’è: il pascolo che si addice alla parte migliore dell’anima si trae appunto dalla prateria di lassù, e di questa si nutre la natura delle penne e delle piume da </text:span><text:soft-page-break/><text:span text:style-name="T162">cui l’anima, resa leggera, viene sollevata”. </text:span><text:span text:style-name="T142">(Platone,Fedro, 244 e – 245 a.)</text:span></text:p>
      <text:p text:style-name="P38"><text:span text:style-name="T136">In un altro celebre passo, </text:span><text:span text:style-name="T143">Platone</text:span><text:span text:style-name="T136"> descrive con toni di mistico entusiasmo la condizione di beatitudine oltremondana degli iniziati che sanno elevarsi verso l’Alto grazie alla loro </text:span><text:span text:style-name="T123">‘purificazione</text:span><text:span text:style-name="T144"> </text:span><text:span text:style-name="T136">ottenuta col distacco </text:span><text:span text:style-name="T145">‘</text:span><text:span text:style-name="T123">rituale</text:span><text:span text:style-name="T145"> </text:span><text:span text:style-name="T136">dal corpo. È questo </text:span><text:span text:style-name="T124">corpo/carcere/tomba</text:span><text:span text:style-name="T145"> che ci vincola al mondo materiale, è esso che va trasceso:</text:span></text:p>
      <text:p text:style-name="P40"><text:span text:style-name="T186">“</text:span><text:span text:style-name="T162">E la Bellezza era fulgida a vedersi nel tempo in cui vedemmo, assieme al coro felice, la beata apparizione e visione, noi nel corteggio di Zeus e altri al seguito di un altro dio, ed eravamo iniziati in quella che è giusto chiamare la più beata delle iniziazioni, quel rito segreto che celebravamo, noi stessi integralmente perfetti e sottratti a tutti i mali che ci attendevano nel tempo successivo, mentre integralmente perfette e semplici e senza tremore e felici erano le apparizioni – entro uno splendore puro in cui eravamo iniziati e raggiungevamo il culmine della contemplazione: puri noi stessi, senza essere sigillati nella tomba che ora appunto portiamo in giro e chiamiamo “corpo”, avvinti strettamente a lui come l’ostrica al suo guscio”. </text:span><text:span text:style-name="T142">(Platone, Fedro, 250 b-c; )</text:span></text:p>
      <text:p text:style-name="P59"><text:span text:style-name="T8">Nella tradizione iniziatica si afferma costantemente che l’anima deve </text:span><text:span text:style-name="T18">‘ricordare </text:span><text:span text:style-name="T8">la sua origine divina e che per far ciò deve identificarsi con la sua essenza: tali concetti furono alla base, com’è noto, sia della filosofia socratica </text:span><text:soft-page-break/><text:span text:style-name="T8">del</text:span><text:span text:style-name="T5"> </text:span><text:span text:style-name="T18">‘</text:span><text:span text:style-name="T42">conosci te stesso</text:span><text:span text:style-name="T18"> </text:span><text:span text:style-name="T8">che di quella platonica, esplicitamente ‘</text:span><text:span text:style-name="T42">metafisica</text:span><text:span text:style-name="T18">’. </text:span><text:span text:style-name="T8">Così si comprende perché la connessione tra </text:span><text:span text:style-name="T43">Conoscenza</text:span><text:span text:style-name="T15"> e</text:span><text:span text:style-name="T43"> Ricordo</text:span><text:span text:style-name="T8"> sia così costante e rilevante nel pensiero del fondatore dell’Accademia: </text:span><text:span text:style-name="T15">non dobbiamo, per così dire, </text:span><text:span text:style-name="T17">‘costruirci un ‘io divino’</text:span><text:span text:style-name="T19">, </text:span><text:span text:style-name="T17">perché il nostro stesso io,</text:span><text:span text:style-name="T69"> </text:span><text:span text:style-name="T17">nelle sua profonda essenza, ’divino lo è già¸ lo deve solo ‘ricordare’, far ritornare alla luce della sua consapevolezza ‘ordinaria’.</text:span><text:span text:style-name="T12"> Per tutto questo, sempre nel Fedro, Platone collega il tema del ricordo con quello della perfetta iniziazione:</text:span></text:p>
      <text:p text:style-name="P56"><text:span text:style-name="T103">“</text:span><text:span text:style-name="T101">Un uomo che si serva correttamente di tali ricordi, iniziato ai sempre più perfetti misteri, lui solo diventa veramente perfetto. Allontanandosi poi dai comuni oggetti delle preoccupazioni umane e divenendo tutto volto alle cose divine, viene giudicato dai più come se fosse un folle, ma essi non si accorgono che ha il dio dentro di sé (entousiàzon)” </text:span><text:span text:style-name="T97">(Platone, Fedro, 249 c-d)</text:span></text:p>
      <text:p text:style-name="P54"><text:span text:style-name="T90">Tale linguaggio e tali concetti iniziatici sono presenti anche in un altro capolavoro platonico, il celebre Simposio, laddove si racconta come il grande </text:span>Socrate<text:span text:style-name="T108"> </text:span><text:span text:style-name="T90">(che l’oracolo di Delfi aveva indicato come ‘il più sapiente tra gli uomini’) chieda con l’umiltà di un qualsiasi adepto di essere iniziato ai Misteri d’Amore proprio ad una Sacerdotessa, Diotìma di Mantinea. E significativo che costei, al primo approccio, dichiara di non essere certa che il filosofo abbia le qualità per essere iniziato ai </text:span><text:soft-page-break/><text:span text:style-name="T90">misteri e, ancor più, al grado ‘epoptico’, quello più elevato. Tale passo è proprio per questo particolarmente significativo: Platone, mettendo in bocca a Diotìma quelle affermazioni lascia proprio ad intendere che le mere capacità ‘razionali’, ‘intellettuali’, di cui evidentemente Socrate era straordinariamente dotato, di per sé non sono sufficienti a che si venga accettati al rito iniziatico.</text:span></text:p>
      <text:p text:style-name="P43">Perché questo si possa compiere bisogna ‘vagliare le aspirazioni profonde dell’aspirante, saggiarne la qualità morale, verificarne insomma la tensione metafisica, cioè quella che volge l’individuo al Vero, al Bene, al Bello.</text:p>
      <text:p text:style-name="P43">Se non esistono tali presupposti, l’iniziato non saprà sublimare l’Eros e volgerlo dal piano fisico/corporeo a quello spirituale/metafisico. Così infatti Diotìma si rivolge a Socrate prima d’iniziarlo:</text:p>
      <text:p text:style-name="P32"><text:span text:style-name="Emphasis"><text:span text:style-name="T16">“A queste dottrine d’Amore (tà erotikà), dunque, forse anche tu, o Socrate, potresti essere iniziato; ma ai Misteri (tà télea) e ancor più a quelli Epoptici (epoptikà), in virtù ed in ragione dei quali esistono quelle dottrine sull’eros, se si procede correttamente, non so se ne saresti capace” </text:span></text:span><text:span text:style-name="T12">(Platone, Simposio, 209 e – 210 a)</text:span></text:p>
      <text:p text:style-name="P56"><text:span text:style-name="T90">Svelato il Mistero, compiuta l’iniziazione, Socrate comprende che l’Amore per sua natura volge al Trascendente e che quando lo si conosce nella sua </text:span><text:soft-page-break/><text:span text:style-name="T90">’</text:span><text:span text:style-name="T104">purezza</text:span><text:span text:style-name="T90">’, nella sua ‘</text:span><text:span text:style-name="T104">assolutezza</text:span><text:span text:style-name="T90"> non contaminata dalla materia e dalla volgare passionalità, si manifesterà <text:s/>‘</text:span><text:span text:style-name="T104">misticamente</text:span><text:span text:style-name="T90"> come la insopprimibile aspirazione alla Bellezza in sé. </text:span><text:span text:style-name="T97">Questa, nella sua pura essenza, s’identifica con il Divino che attrae tutti gli esseri, li affascina e li beatifica.</text:span></text:p>
      <text:p text:style-name="P44">Dopo aver illustrato i ‘gradi del processo iniziatico d’Amore, Diotìma descrive l’esperienza di chi perviene al suo livello supremo:</text:p>
      <text:p text:style-name="P58"><text:span text:style-name="T105">“</text:span><text:span text:style-name="T106">A colui che sia giunto al grado supremo (télos) della iniziazione amorosa, all’improvviso si rivelerà una realtà meravigliosa per sua natura, quella stessa, o Socrate, in vista della quale sono state sopportate tutte le fatiche precedenti: una bellezza eterna, che non nasce e non muore… E il Bello (tò kalòn) neppure si renderà visibile a lui come un volto… né apparirà come un concetto o una conoscenza di tipo razionale… si manifesterà come esso è per sé e con sé, sempre identico a se stesso…” </text:span><text:span text:style-name="T97">(Platone, Simposio, 210 e – 211 b)</text:span></text:p>
      <text:p text:style-name="P44">Una suprema illuminazione ottenuta attraverso un processo di conoscenza intuitiva: è quest<text:span text:style-name="T185">o</text:span> lo scopo vero e comune delle iniziazioni e della filosofia ‘epoptica’, cioè di quella parte della filosofia, la più essenziale, che si propone la conoscenza metafisica. Aristotele per questo chiamò la metafisica , la ‘filosofia prima o, anche, <text:soft-page-break/>‘teologia’, giacché il Principio Primo coincide con Dio stesso. Il più grande discepolo di Platone, lo afferma con grande chiarezza descrivendo l’esperienza mistica/misterica con gli stessi modi con cui si è descritta in Oriente quella del samadhi, del satori o del nirvana<text:note text:id="ftn64" text:note-class="footnote"><text:note-citation>5</text:note-citation><text:note-body><text:p text:style-name="P1"><text:span text:style-name="T185">S</text:span>ono concetti importanti nelle tradizioni spirituali buddhiste e induiste. Satori è spesso descritto come un momento improvviso e trascendente di comprensione, mentre Nirvana rappresenta uno stato sostenuto di illuminazione. </text:p><text:p text:style-name="Footnote"/></text:note-body></text:note>: questa esperienza è come l’apparire improvviso di una luce interiore all’anima:</text:p>
      <text:p text:style-name="P40"><text:span text:style-name="T186">“</text:span><text:span text:style-name="T162">La conoscenza intuitiva (noesis) del mondo spirituale, puro, santo, lampeggiando all’improvviso come un fulmine nell’anima ci permise allora di toccare e vedere (la Suprema Realtà). Perciò sia Platone, sia Aristotele chiamano questa parte della filosofia l’iniziazione suprema (epoptikòn), in quanto coloro… che hanno toccato direttamente la pura verità circa essa (la realtà metafisica), ritengono di aver conseguito il fine della filosofia (télos philosophias), lo stesso che è nella iniziazione (en teletèi)”. </text:span><text:span text:style-name="T147">(Aristotele, Eudemo, fr. 10)</text:span></text:p>
      <text:p text:style-name="P44">Nella tradizione media e neo-platonica si adottò in effetti una tripartizione progressiva della filosofia, suddivisa in <text:span text:style-name="T119">etica</text:span><text:span text:style-name="T118"> – </text:span><text:span text:style-name="T119">fisica</text:span><text:span text:style-name="T118"> – </text:span><text:span text:style-name="T119">epoptica</text:span>: l’epoptica rappresentava il punto culminante del sapere e per questo corrispondeva alla metafisica ed alla teologia.</text:p>
      <text:p text:style-name="P45"><text:soft-page-break/>Plutarco, uno dei più tipici rappresentanti del medio‑ platonismo<text:note text:id="ftn65" text:note-class="footnote"><text:note-citation>6</text:note-citation><text:note-body><text:p text:style-name="P1">Il medio platonismo è una categoria storiografica, e non una corrente di pensiero formata da esponenti che esplicitamente riconoscevano la loro differenza rispetto al passato. Non bisogna dunque mai dimenticare che tutti i filosofi medio platonici si definivano in realtà platonici se non addirittura accademici, come fa Plutarco. Per i platonici di quest'epoca la filosofia fu pensata - in linea con le correnti che prendevano piede anche nelle altre scuole.</text:p></text:note-body></text:note>, commentando la settima lettera platonica ribadisce che, la filosofia ha il compito di superare il piano delle varie opinioni prodotte dall’intelletto discorsivo per poter così giungere ad una piena apprensione mistica, sovra‑razionale, del Principio Primo. Per questo, a suo parere, il fine della filosofia è conseguire quella condizione ‘epoptica della coscienza che è stato da sempre in Grecia il fine di tutti i misteri.</text:p>
      <text:p text:style-name="P46">Bisogna attraverso l’intuizione (noesis), dice Plutarco, percepire il Principio <text:span text:style-name="T185">P</text:span>rimo del mondo che è puro e intelligibile, cioè spirituale e per questo conoscibile in virtù della sola coscienza.</text:p>
      <text:p text:style-name="P43">Tale mondo, cioè tale realtà, è ben diversa da quella sensibile, multiforme e caduca a cui ci limitano le nostre ‘corporee facoltà di percezione.</text:p>
      <text:p text:style-name="P43">Solo con l’intuizione se ne può avere conoscenza, si può contemplarlo.</text:p>
      <text:p text:style-name="P43"><text:soft-page-break/>Con la contemplazione c’è una pura estatica<text:note text:id="ftn66" text:note-class="footnote"><text:note-citation>7</text:note-citation><text:note-body><text:p text:style-name="Footnote">La parola "estatica" deriva dal greco "ekstasis", che significa "essere fuori di sé"</text:p></text:note-body></text:note> visione del Principio Divino resa possibile attraverso l’arresto di ogni processo logico-discorsivo.</text:p>
      <text:p text:style-name="P43">Ma è proprio la ragione che per giungere a tale condizione contemplativa deve superare dialetticamente le opinioni e le dottrine da essa stessa elaborate.</text:p>
      <text:p text:style-name="P43">Tale trascendimento si verifica quando ne percepisce l’inconsistenza e l’inadeguatezza ma permane lo slancio conoscitivo, il desiderio ‘erotico di conoscenza, cioè la filo‑sofìa che orienta a quel punto l’anima verso l’Alto:</text:p>
      <text:p text:style-name="P41"><text:span text:style-name="T186">“</text:span><text:span text:style-name="T162">È sempre puro il principio, non può essere mescolato ciò che è primo e intelligibile. [...] E l’intuizione dell’intelligibile, del puro e del semplice, che lampeggia attraverso l’anima come un fulmine, permette talvolta di toccarlo e di contemplarlo tutto d’un tratto. È per questo che Platone e Aristotele chiamano epopticatale settore della filosofia: alludendo cioè al fatto che quanti siano riusciti a superare con la ragione il mondo delle varie opinioni, del composto, del multiforme, si slanciano <text:s/>verso ciò che è primo, semplice e immateriale; e se giungono a toccare direttamente la verità pura che irraggia da esso, raggiungono come in una iniziazione il fine della filosofia” </text:span><text:span text:style-name="T136">(Platone, De Iside et Osiride, 382 d-e).</text:span></text:p>
      <text:p text:style-name="P47"><text:soft-page-break/>Teone di Smirne il filosofo e matematico, padre della celebre Ipazia (370/375 – 415 d. C.) la quale fu a capo della scuola neoplatonica di Alessandria sino alla sua tragica morte ad opera dei cristiani, ribadì con assoluta chiarezza tali concetti:</text:p>
      <text:p text:style-name="P42"><text:span text:style-name="T186">“</text:span><text:span text:style-name="T162">La filosofia è, possiamo dire, una iniziazione alla vera perfezione e una trasmissione dei veri misteri. Vi sono cinque parti dell’iniziazione. La prima è la purificazione. Dopo questa purificazione, viene la trasmissione dell’iniziazione. La terza viene chiamata visione. La quarta, che è la perfezione della visione, è la fasciatura e l’imposizione della corona, con la quale si è in grado di trasmettere agli altri le iniziazioni acquisite, sia attraverso il portare le fiaccole, sia attraverso il mostrare le cose sacre o qualche altro ufficio sacerdotale. Al quinto e ultimo posto, risultato di tutto quanto precede, troviamo la felicità che deriva dall’essere amato da Dio e dalla vita con gli dei”. </text:span></text:p>
      <text:p text:style-name="P53">Platone e la condizione di mistico entusiasmo</text:p>
      <text:p text:style-name="P48">La teoria delle idee di Platone, alla luce di quanto riportato nei testi dei Misteri Eleusini e nelle testimonianze dei dialoghi riportati da Plutarco, potrebbe lasciare perplessi molti di noi, lettori appassionati di filosofia. </text:p>
      <text:p text:style-name="P49">Si può accettare senza riserve tutto quello che abbiamo letto a riguardo del mondo delle idee?</text:p>
      <text:p text:style-name="P36"><text:soft-page-break/>Quando Platone descrive con toni di mistico entusiasmo la condizione di beatitudine degli iniziati che si elevano verso l’Alto grazie alla loro <text:span text:style-name="T125">purificazione,</text:span> <text:span text:style-name="T151">è sotto effetto di allucinogeni? E la pozione di ciceone assunta che gli ha rivelato il mondo delle idee?</text:span></text:p>
      <text:p text:style-name="P51">Numerosi studiosi hanno proposto che il potere dei Misteri Eleusini provenisse dal funzionamento del ciceone come agente psichedelico. L'uso di pozioni o filtri per scopi magici o religiosi era relativamente comune in Grecia e nel mondo antico. Gli iniziati, sensibilizzati dal loro digiuno e preparati dalle cerimonie precedenti, potrebbero essere stati spinti, dagli effetti di una potente pozione psichedelica, in stati mentali rivelatori, con profonde implicazioni spirituali e intellettuali. In opposizione a questa idea, altri studiosi scettici osservano la mancanza di prove solide e sottolineano il carattere collettivo piuttosto che individuale dell'iniziazione nei Misteri. </text:p>
      <text:p text:style-name="P52">I Misteri non servivano solo a vivere diversamente la vita dopo la morte. I Misteri servivano a vivere diversamen<text:span text:style-name="T182">t</text:span>e la vita nella vita. Servivano a vedere ciò che tutti vedono, in ogni istante. Non cambiavano nulla di ciò che è. Ma cambiavano tutto nella percezione di ciò che è. Eleusi fu per i Greci il luogo dove <text:s/>si subiva una mutazione. La regola era il silenzio e la metamorfosi <text:soft-page-break/>invisibile, non più percepibile dall’esterno, ma soltanto da chi la pativa. </text:p>
      <text:p text:style-name="P33"><text:span text:style-name="T60">Scrive Aristotele che l’iniziazione non è altra cosa dalla filosofia, ma una sua parte <text:s/>e precisamente l’ultima parte, quella che permette di possedere il fine ultimo della filosofia”. Ma in che cosa consiste? In una folgorazione, che attraversa l’anima balenando come un lampo ed è il pensiero</text:span><text:span text:style-name="T76"> </text:span><text:span text:style-name="T60">dell’intelligibile</text:span><text:span text:style-name="T76"><text:note text:id="ftn67" text:note-class="footnote"><text:note-citation>8</text:note-citation><text:note-body><text:p text:style-name="P5">Che può essere conosciuto e compreso attraverso l’intelletto.</text:p></text:note-body></text:note></text:span><text:span text:style-name="T76">: </text:span><text:span text:style-name="T60">occasione unica per toccare e contemplare. La teoresi non è pura visione di ciò che è, ma qualcosa che permette di toccare ciò che è.</text:span></text:p>
      <text:p text:style-name="P57"><text:span text:style-name="T94">S</text:span><text:span text:style-name="T93">e volessimo paragonare i due filosofi, evidenziando</text:span><text:span text:style-name="T95">ne</text:span><text:span text:style-name="T93"> le differenze, possiamo dire che Platone era così interessato alle forme eterne (le idee) da non curarsi affatto dei mutamenti che avvenivano in natura. Aristotele, era molto interessato a questi cambiamenti che amava definirli processi naturali.</text:span></text:p>
      <text:p text:style-name="P48">Potremmo anche dire <text:span text:style-name="T182">che, </text:span>Platone rifiutò completamente il mondo sensibile e chiuse gli occhi davanti a tutto quello che vediamo intorno a noi (voleva u<text:span text:style-name="T187">s</text:span>cire dalla caverna e andare direttamente verso il mondo delle idee).</text:p>
      <text:p text:style-name="P36"><text:span text:style-name="Strong_20_Emphasis"><text:span text:style-name="T164">Aristotele fece l’opposto: si mise carponi e studiò i pesci e le rane, gli anemoni e i papaveri. In sintesi P</text:span></text:span><text:span text:style-name="Strong_20_Emphasis"><text:span text:style-name="T165">l</text:span></text:span><text:span text:style-name="Strong_20_Emphasis"><text:span text:style-name="T164">atone si </text:span></text:span><text:soft-page-break/><text:span text:style-name="Strong_20_Emphasis"><text:span text:style-name="T164">servì esclusivamente della ragione, mentre Aristotele usò anche i sensi.</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6:20:44.310499176</meta:creation-date>
    <dc:date>2026-01-25T17:27:40.632971372</dc:date>
    <dc:creator>corrado tafaro</dc:creator>
    <meta:editing-duration>PT34M34S</meta:editing-duration>
    <meta:editing-cycles>5</meta:editing-cycles>
    <meta:generator>LibreOffice/24.2.7.2$Linux_X86_64 LibreOffice_project/420$Build-2</meta:generator>
    <meta:document-statistic meta:table-count="0" meta:image-count="0" meta:object-count="0" meta:page-count="18" meta:paragraph-count="64" meta:word-count="3557" meta:character-count="23216" meta:non-whitespace-character-count="19695"/>
  </office:meta>
</office:document-meta>
</file>