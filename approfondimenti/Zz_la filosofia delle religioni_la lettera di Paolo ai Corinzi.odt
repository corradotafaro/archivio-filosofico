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Footnote">
      <style:text-properties officeooo:rsid="0017cd33" officeooo:paragraph-rsid="0017cd33"/>
    </style:style>
    <style:style style:name="P2" style:family="paragraph" style:parent-style-name="Footnote">
      <style:paragraph-properties fo:text-align="justify" style:justify-single-word="false"/>
      <style:text-properties officeooo:rsid="0017cd33" officeooo:paragraph-rsid="0017cd33"/>
    </style:style>
    <style:style style:name="P3" style:family="paragraph" style:parent-style-name="Footnote" style:master-page-name="">
      <loext:graphic-properties draw:fill="none"/>
      <style:paragraph-properties fo:margin-left="0.7cm" fo:margin-right="0cm" fo:text-align="justify" style:justify-single-word="false" fo:text-indent="-0.6cm" style:auto-text-indent="false" style:page-number="auto" fo:background-color="transparent" text:number-lines="false" text:line-number="0"/>
    </style:style>
    <style:style style:name="P4" style:family="paragraph" style:parent-style-name="Footnote">
      <style:paragraph-properties fo:text-align="justify" style:justify-single-word="false"/>
    </style:style>
    <style:style style:name="P5" style:family="paragraph" style:parent-style-name="Standard">
      <style:paragraph-properties fo:margin-top="0cm" fo:margin-bottom="0cm" style:contextual-spacing="false" fo:line-height="115%"/>
      <style:text-properties style:font-name="Liberation Serif" fo:font-size="14pt" fo:font-weight="bold" officeooo:rsid="0015f9c8" officeooo:paragraph-rsid="0015f9c8" style:font-size-asian="14pt" style:font-weight-asian="bold" style:font-size-complex="14pt" style:font-weight-complex="bold"/>
    </style:style>
    <style:style style:name="P6" style:family="paragraph" style:parent-style-name="Standard">
      <style:paragraph-properties fo:margin-top="0.199cm" fo:margin-bottom="0cm" style:contextual-spacing="false" fo:line-height="115%" fo:text-align="justify" style:justify-single-word="false"/>
      <style:text-properties style:font-name="Liberation Serif" fo:font-size="14pt" style:font-size-asian="14pt" style:font-size-complex="14pt"/>
    </style:style>
    <style:style style:name="P7" style:family="paragraph" style:parent-style-name="Standard">
      <style:paragraph-properties fo:line-height="115%" fo:text-align="justify" style:justify-single-word="false"/>
      <style:text-properties style:font-name="Liberation Serif" fo:font-size="14pt" style:font-size-asian="14pt" style:font-size-complex="14pt"/>
    </style:style>
    <style:style style:name="P8"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17cd33" style:font-size-asian="14pt" style:font-size-complex="14pt"/>
    </style:style>
    <style:style style:name="P9" style:family="paragraph" style:parent-style-name="Standard" style:master-page-name="">
      <loext:graphic-properties draw:fill="none"/>
      <style:paragraph-properties fo:margin-left="0.7cm" fo:margin-right="0cm" fo:line-height="115%" fo:text-align="justify" style:justify-single-word="false" fo:text-indent="-0.6cm" style:auto-text-indent="false" style:page-number="auto" fo:background-color="transparent"/>
      <style:text-properties style:font-name="Liberation Serif" fo:font-size="14pt" style:font-size-asian="14pt" style:font-size-complex="14pt"/>
    </style:style>
    <style:style style:name="P10"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1a12c6" officeooo:paragraph-rsid="001a12c6" style:font-size-asian="14pt" style:font-size-complex="14pt"/>
    </style:style>
    <style:style style:name="P11" style:family="paragraph" style:parent-style-name="Standard">
      <style:paragraph-properties fo:margin-top="0cm" fo:margin-bottom="0cm" style:contextual-spacing="false" fo:line-height="115%" fo:text-align="justify" style:justify-single-word="false"/>
      <style:text-properties style:font-name="Liberation Serif" fo:font-size="14pt" officeooo:rsid="001a12c6" officeooo:paragraph-rsid="001a12c6" style:font-size-asian="14pt" style:font-size-complex="14pt"/>
    </style:style>
    <style:style style:name="P12" style:family="paragraph" style:parent-style-name="Standard" style:list-style-name="L1" style:master-page-name="">
      <loext:graphic-properties draw:fill="none"/>
      <style:paragraph-properties fo:margin-left="0.801cm" fo:margin-right="0cm" fo:margin-top="0.199cm" fo:margin-bottom="0cm" style:contextual-spacing="false" fo:line-height="115%" fo:text-align="justify" style:justify-single-word="false" fo:text-indent="-0.6cm" style:auto-text-indent="false" style:page-number="auto" fo:background-color="transparent"/>
      <style:text-properties style:font-name="Liberation Serif" fo:font-size="14pt" style:font-size-asian="14pt" style:font-size-complex="14pt"/>
    </style:style>
    <style:style style:name="P13" style:family="paragraph" style:parent-style-name="Standard" style:list-style-name="L2" style:master-page-name="">
      <loext:graphic-properties draw:fill="none"/>
      <style:paragraph-properties fo:margin-left="0.7cm" fo:margin-right="0cm" fo:margin-top="0.199cm" fo:margin-bottom="0cm" style:contextual-spacing="false" fo:line-height="115%" fo:text-align="justify" style:justify-single-word="false" fo:text-indent="-0.6cm" style:auto-text-indent="false" style:page-number="auto" fo:background-color="transparent"/>
      <style:text-properties style:font-name="Liberation Serif" fo:font-size="14pt" style:font-size-asian="14pt" style:font-size-complex="14pt"/>
    </style:style>
    <style:style style:name="P14" style:family="paragraph" style:parent-style-name="Standard" style:list-style-name="L3" style:master-page-name="">
      <loext:graphic-properties draw:fill="none"/>
      <style:paragraph-properties fo:margin-left="0.7cm" fo:margin-right="0cm" fo:margin-top="0.199cm" fo:margin-bottom="0cm" style:contextual-spacing="false" fo:line-height="115%" fo:text-align="justify" style:justify-single-word="false" fo:text-indent="-0.6cm" style:auto-text-indent="false" style:page-number="auto" fo:background-color="transparent"/>
      <style:text-properties style:font-name="Liberation Serif" fo:font-size="14pt" style:font-size-asian="14pt" style:font-size-complex="14pt"/>
    </style:style>
    <style:style style:name="P15" style:family="paragraph" style:parent-style-name="Standard" style:list-style-name="L3" style:master-page-name="">
      <loext:graphic-properties draw:fill="none"/>
      <style:paragraph-properties fo:margin-left="0.7cm" fo:margin-right="0cm" fo:margin-top="0.101cm" fo:margin-bottom="0cm" style:contextual-spacing="false" fo:line-height="115%" fo:text-align="justify" style:justify-single-word="false" fo:text-indent="-0.6cm" style:auto-text-indent="false" style:page-number="auto" fo:background-color="transparent"/>
      <style:text-properties style:font-name="Liberation Serif" fo:font-size="14pt" style:font-size-asian="14pt" style:font-size-complex="14pt"/>
    </style:style>
    <style:style style:name="P16" style:family="paragraph" style:parent-style-name="Standard" style:list-style-name="L4">
      <loext:graphic-properties draw:fill="none"/>
      <style:paragraph-properties fo:margin-left="0.7cm" fo:margin-right="0cm" fo:line-height="115%" fo:text-align="justify" style:justify-single-word="false" fo:text-indent="-0.6cm" style:auto-text-indent="false" fo:background-color="transparent"/>
      <style:text-properties style:font-name="Liberation Serif" fo:font-size="14pt" style:font-size-asian="14pt" style:font-size-complex="14pt"/>
    </style:style>
    <style:style style:name="P17" style:family="paragraph" style:parent-style-name="Standard" style:list-style-name="L4" style:master-page-name="">
      <loext:graphic-properties draw:fill="none"/>
      <style:paragraph-properties fo:margin-left="0.7cm" fo:margin-right="0cm" fo:margin-top="0.101cm" fo:margin-bottom="0cm" style:contextual-spacing="false" fo:line-height="115%" fo:text-align="justify" style:justify-single-word="false" fo:text-indent="-0.6cm" style:auto-text-indent="false" style:page-number="auto" fo:background-color="transparent"/>
      <style:text-properties style:font-name="Liberation Serif" fo:font-size="14pt" style:font-size-asian="14pt" style:font-size-complex="14pt"/>
    </style:style>
    <style:style style:name="P18" style:family="paragraph" style:parent-style-name="Standard" style:list-style-name="L5" style:master-page-name="">
      <loext:graphic-properties draw:fill="none"/>
      <style:paragraph-properties fo:margin-left="0.7cm" fo:margin-right="0cm" fo:margin-top="0.199cm" fo:margin-bottom="0cm" style:contextual-spacing="false" fo:line-height="115%" fo:text-align="justify" style:justify-single-word="false" fo:text-indent="-0.6cm" style:auto-text-indent="false" style:page-number="auto" fo:background-color="transparent"/>
      <style:text-properties style:font-name="Liberation Serif" fo:font-size="14pt" style:font-size-asian="14pt" style:font-size-complex="14pt"/>
    </style:style>
    <style:style style:name="P19" style:family="paragraph" style:parent-style-name="Standard" style:list-style-name="L5" style:master-page-name="">
      <loext:graphic-properties draw:fill="none"/>
      <style:paragraph-properties fo:margin-left="0.7cm" fo:margin-right="0cm" fo:margin-top="0.101cm" fo:margin-bottom="0cm" style:contextual-spacing="false" fo:line-height="115%" fo:text-align="justify" style:justify-single-word="false" fo:text-indent="-0.6cm" style:auto-text-indent="false" style:page-number="auto" fo:background-color="transparent"/>
      <style:text-properties style:font-name="Liberation Serif" fo:font-size="14pt" style:font-size-asian="14pt" style:font-size-complex="14pt"/>
    </style:style>
    <style:style style:name="P20" style:family="paragraph" style:parent-style-name="Standard" style:list-style-name="L6" style:master-page-name="">
      <loext:graphic-properties draw:fill="none"/>
      <style:paragraph-properties fo:margin-left="0.7cm" fo:margin-right="0cm" fo:margin-top="0.199cm" fo:margin-bottom="0cm" style:contextual-spacing="false" fo:line-height="115%" fo:text-align="justify" style:justify-single-word="false" fo:text-indent="-0.6cm" style:auto-text-indent="false" style:page-number="auto" fo:background-color="transparent"/>
      <style:text-properties style:font-name="Liberation Serif" fo:font-size="14pt" style:font-size-asian="14pt" style:font-size-complex="14pt"/>
    </style:style>
    <style:style style:name="P21" style:family="paragraph" style:parent-style-name="Standard" style:list-style-name="L7" style:master-page-name="">
      <loext:graphic-properties draw:fill="none"/>
      <style:paragraph-properties fo:margin-left="0.7cm" fo:margin-right="0cm" fo:margin-top="0.101cm" fo:margin-bottom="0cm" style:contextual-spacing="false" fo:line-height="115%" fo:text-align="justify" style:justify-single-word="false" fo:text-indent="-0.6cm" style:auto-text-indent="false" style:page-number="auto" fo:background-color="transparent"/>
      <style:text-properties style:font-name="Liberation Serif" fo:font-size="14pt" style:font-size-asian="14pt" style:font-size-complex="14pt"/>
    </style:style>
    <style:style style:name="P22" style:family="paragraph" style:parent-style-name="Standard" style:list-style-name="L8" style:master-page-name="">
      <loext:graphic-properties draw:fill="none"/>
      <style:paragraph-properties fo:margin-left="0.7cm" fo:margin-right="0.4cm" fo:margin-top="0.199cm" fo:margin-bottom="0cm" style:contextual-spacing="false" fo:line-height="115%" fo:text-align="justify" style:justify-single-word="false" fo:text-indent="-0.6cm" style:auto-text-indent="false" style:page-number="auto" fo:background-color="transparent">
        <style:tab-stops/>
      </style:paragraph-properties>
      <style:text-properties style:font-name="Liberation Serif" fo:font-size="14pt" style:font-size-asian="14pt" style:font-size-complex="14pt"/>
    </style:style>
    <style:style style:name="P23" style:family="paragraph" style:parent-style-name="Standard" style:list-style-name="L9" style:master-page-name="">
      <loext:graphic-properties draw:fill="none"/>
      <style:paragraph-properties fo:margin-left="0.7cm" fo:margin-right="0cm" fo:margin-top="0.101cm" fo:margin-bottom="0cm" style:contextual-spacing="false" fo:line-height="115%" fo:text-align="justify" style:justify-single-word="false" fo:text-indent="-0.6cm" style:auto-text-indent="false" style:page-number="auto" fo:background-color="transparent"/>
      <style:text-properties style:font-name="Liberation Serif" fo:font-size="14pt" style:font-size-asian="14pt" style:font-size-complex="14pt"/>
    </style:style>
    <style:style style:name="T1" style:family="text">
      <style:text-properties fo:font-weight="normal" style:font-weight-asian="normal" style:font-weight-complex="normal"/>
    </style:style>
    <style:style style:name="T2" style:family="text">
      <style:text-properties officeooo:rsid="0017cd33"/>
    </style:style>
    <style:style style:name="T3" style:family="text">
      <style:text-properties style:text-underline-style="solid" style:text-underline-width="auto" style:text-underline-color="font-color"/>
    </style:style>
    <style:style style:name="T4" style:family="text">
      <style:text-properties officeooo:rsid="00182a5b"/>
    </style:style>
    <style:style style:name="T5" style:family="text">
      <style:text-properties officeooo:rsid="001a369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 lettera <text:span text:style-name="T2">di Paolo </text:span>ai Corinzi</text:p>
      <text:p text:style-name="P10">Introduzione</text:p>
      <text:p text:style-name="P10">La Prima Lettera ai Corinzi è uno dei documenti più vivaci e schietti del Nuovo Testamento. Non è un trattato teologico astratto, ma una risposta d’emergenza a una comunità che stava letteralmente andando a pezzi.</text:p>
      <text:p text:style-name="P10">Ecco il quadro del perché Paolo sentì il bisogno di impugnare la penna (o meglio, dettare a uno scriba).</text:p>
      <text:p text:style-name="P10">1. Corinto non era una tranquilla cittadina di provincia. Distrutta dai Romani nel 146 a.C. e rifondata da Giulio Cesare nel 44 a.C., era diventata una metropoli cosmopolita, ricchissima e caotica.</text:p>
      <text:p text:style-name="P11">Situata sull'istmo che unisce il Peloponneso alla Grecia continentale, controllava i traffici marittimi tra Oriente e Occidente.</text:p>
      <text:p text:style-name="P11">Era un crogiolo di culture, religioni e filosofie. Vi si trovavano templi greci, culti egizi e una significativa presenza ebraica. In greco esisteva il verbo korinthiazesthai ("vivere alla corinzia"), che significava vivere nel lusso e nella sregolatezza. La città era famosa per la sua vita notturna e la prostituzione sacra legata al tempio di Afrodite.</text:p>
      <text:p text:style-name="P10">2. Perché Paolo scrive? (I motivi principali)</text:p>
      <text:p text:style-name="P10">Paolo aveva fondato la chiesa di Corinto intorno al 50-52 d.C., rimanendovi per 18 mesi. Mentre si trovava a <text:soft-page-break/>Efeso, ricevette notizie allarmanti che lo spinsero a scrivere quella che noi conosciamo come la "Prima Lettera" (in realtà era almeno la seconda, come accenna in 1 Cor 5,9).</text:p>
      <text:p text:style-name="P10">A. Divisioni Interne (Fazioni)</text:p>
      <text:p text:style-name="P10">La comunità si era frammentata in "partiti" che seguivano diversi leader cristiani. Alcuni dicevano: "Io sono di Paolo", altri "Io di Apollo", altri "Io di Cefa (Pietro)". Paolo interviene per ricordare che Cristo non può essere diviso.</text:p>
      <text:p text:style-name="P10">B. Disordini Morali e Liturgici</text:p>
      <text:p text:style-name="P10">La libertà cristiana veniva confusa con la licenza di fare tutto. Paolo deve affrontare casi di:</text:p>
      <text:p text:style-name="P10">Incesto non punito all'interno della comunità.</text:p>
      <text:p text:style-name="P10">Cause legali tra cristiani portate davanti a tribunali pagani.</text:p>
      <text:p text:style-name="P10">Caos durante l'Eucarestia, dove i ricchi mangiavano abbondantemente prima che arrivassero i poveri, trasformando la Cena del Signore in un banchetto di classe.</text:p>
      <text:p text:style-name="P10">C. Dubbi Dottrinali (I Quesiti dei Corinzi)</text:p>
      <text:p text:style-name="P10">I Corinzi avevano inviato a Paolo una lettera con domande specifiche (introdotte spesso dalla formula "Riguardo poi a..."). Paolo risponde su:</text:p>
      <text:p text:style-name="P10"><text:soft-page-break/>Il matrimonio e il celibato.</text:p>
      <text:p text:style-name="P10">Le carni sacrificate agli idoli (si possono mangiare?).</text:p>
      <text:p text:style-name="P10">L'ordine da tenere nelle assemblee e l'uso dei carismi (come il parlare in lingue).</text:p>
      <text:p text:style-name="P10">La Risurrezione: Alcuni a Corinto negavano la risurrezione dei morti, influenzati probabilmente dal dualismo greco (l'idea che solo l'anima conti e il corpo sia una prigione).</text:p>
      <text:p text:style-name="P10">3. Il cuore del messaggio: La Croce e l'Amore</text:p>
      <text:p text:style-name="P10">Per risolvere questi conflitti, Paolo non usa solo regole, ma propone due grandi pilastri:</text:p>
      <text:p text:style-name="P10">La Teologia della Croce: Contro chi cercava la "sapienza" umana o il prestigio dei leader, Paolo ricorda che Dio ha salvato il mondo attraverso la follia della Croce, che ribalta i valori del mondo.</text:p>
      <text:p text:style-name="P10">L'Inno alla Carità (Capitolo 13): Paolo spiega che senza l'agape (l'amore disinteressato), anche i doni spirituali più spettacolari non valgono nulla. È la "via superiore" per tenere unita una comunità litigiosa.</text:p>
      <text:p text:style-name="P10">Paolo scrive per richiamare una chiesa urbana, colta e arrogante all'unità e alla santità, ricordando loro che sono il "Corpo di Cristo" e che ogni azione individuale ha riflessi sull'intera comunità.</text:p>
      <text:p text:style-name="P10"/>
      <text:p text:style-name="P10"><text:soft-page-break/>Se Pietro è considerato la "roccia" su cui si fonda la struttura della Chiesa, Paolo di Tarso ne è stato il motore termico, colui che ha trasformato una piccola setta giudaica in una religione universale.</text:p>
      <text:p text:style-name="P11">Prima di Paolo, il messaggio di Gesù era rivolto quasi esclusivamente ai "circoncisi" (gli ebrei). Paolo, autodefinitosi "Apostolo delle genti" (dei pagani), rompe questo confine: <text:span text:style-name="T5">s</text:span>ostiene che per diventare cristiani non è necessario diventare ebrei (evitando l'obbligo della circoncisione e delle leggi alimentari kosher).</text:p>
      <text:p text:style-name="P10">Questo rende il Cristianesimo "esportabile" e accessibile a tutto l'Impero Romano.</text:p>
      <text:p text:style-name="P10">2. Un comunicatore "globale"</text:p>
      <text:p text:style-name="P10">Paolo possedeva un profilo unico che lo rendeva il perfetto mediatore culturale: <text:span text:style-name="T5">p</text:span>oteva discutere di Scritture nelle sinagoghe, <text:span text:style-name="T5">a</text:span>veva diritti legali e protezione che gli permettevano di viaggiare e fare appello all'Imperatore, <text:span text:style-name="T5">s</text:span>criveva in greco (la lingua franca dell'epoca) e conosceva la filosofia stoica, permettendogli di dialogare con gli intellettuali di Atene e Corinto.</text:p>
      <text:p text:style-name="P10">3. L'uso delle "Lettere" come strumento di governo</text:p>
      <text:p text:style-name="P10">Mentre gli altri apostoli agivano spesso su base locale, Paolo ideò una rete di comunità interconnesse. Le sue <text:soft-page-break/>Episole sono i primi documenti scritti del Cristianesimo (scritti prima ancora dei Vangeli).</text:p>
      <text:p text:style-name="P10">Hanno creato una teologia sistematica: ha spiegato il significato della morte e risurrezione di Gesù.</text:p>
      <text:p text:style-name="P10">Hanno stabilito un modello organizzativo: come gestire le finanze, la liturgia e i conflitti nelle chiese.</text:p>
      <text:p text:style-name="P10">Un piccolo "correttore" storico</text:p>
      <text:p text:style-name="P10">Sebbene sia stato il più influente, è importante ricordare che non fu l'unico. La tradizione tende a mettere in ombra altri missionari (come Barnaba o gli apostoli che andarono verso Oriente, in India o Etiopia) perché di loro non ci sono rimasti scritti così voluminosi. Tuttavia, l'impatto di Paolo è innegabile: circa un terzo del Nuovo Testamento è attribuito a lui o parla di lui.</text:p>
      <text:p text:style-name="P10">In un certo senso, se Gesù è il "messaggio", Paolo è stato il primo e più efficace "medium".</text:p>
      <text:p text:style-name="P10">Il tentativo di Paolo di convertire gli intellettuali greci è uno dei momenti più affascinanti della storia antica, culminato nel celebre discorso all'Areopago di Atene.</text:p>
      <text:p text:style-name="P10">Per capire come Paolo cercasse di "agganciare" i filosofi, dobbiamo immaginare uno scontro tra due mondi mentali opposti: il pensiero biblico (lineare, concreto, centrato sulla storia) e il pensiero greco (astratto, ciclico, centrato sulla superiorità dello spirito sulla materia).</text:p>
      <text:p text:style-name="P10"><text:soft-page-break/>Paolo non inizia citando la Bibbia (che gli ateniesi non conoscevano), ma usa la loro stessa curiosità.</text:p>
      <text:p text:style-name="P10">Passeggiando per Atene, Paolo nota un altare dedicato "Al Dio ignoto". Invece di condannarlo come idolatria, lo usa come gancio: "Quello che voi adorate senza conoscere, io ve lo annuncio". Paolo cita poeti e filosofi greci (come Arato ed Epimenide) per confermare le sue tesi. Dice: "In lui viviamo, ci muoviamo ed esistiamo", un concetto molto vicino allo stoicismo dell'epoca.</text:p>
      <text:p text:style-name="P10">Tutto procede bene finché Paolo non arriva al punto centrale: la risurrezione dei corpi. Qui il dialogo si rompe bruscamente. Perché?</text:p>
      <text:p text:style-name="P11">Per i Greci (influenzati da Platone), il corpo era il soma-sema (corpo-tomba). La salvezza consisteva nel liberare l'anima dalla materia. L'idea che un Dio volesse "riportare in vita" un cadavere era considerata non solo impossibile, ma disgustosa e retrograda.</text:p>
      <text:p text:style-name="P11">Gli intellettuali reagiscono con un elegante ma gelido sarcasmo: "Su questo ti ascolteremo un'altra volta". In pratica, un "le faremo sapere" dell'antichità.</text:p>
      <text:p text:style-name="P10">Dopo il parziale fallimento di Atene, Paolo si sposta a Corinto con una consapevolezza nuova. Capisce che non può "vincere" i filosofi sul loro terreno (la logica umana).</text:p>
      <text:p text:style-name="P10">Nella sua lettera ai Corinzi, infatti, scrive parole famose:</text:p>
      <text:p text:style-name="P10"><text:soft-page-break/>"Mentre i Giudei chiedono segni e i Greci cercano sapienza, noi annunciamo Cristo crocifisso: scandalo per i Giudei e stoltezza per i pagani" (1 Cor 1,22-23).</text:p>
      <text:p text:style-name="P10">Come riuscì quindi a convincerli?</text:p>
      <text:p text:style-name="P10">Invece di cercare di dimostrare la risurrezione come un teorema filosofico, Paolo iniziò a presentarla come un fatto storico garantito da testimoni oculari. L'elenco dei testimoni: In 1 Cor 15, fornisce una lista precisa di persone che avevano visto Gesù risorto, molti dei quali erano ancora vivi e interrogabili. Insegna che il corpo non è un guscio vuoto, ma il "Tempio dello Spirito Santo". Questo dava una dignità nuova alla vita quotidiana e materiale che la filosofia greca spesso disprezzava.</text:p>
      <text:p text:style-name="P10">Paolo non "vinse" l'accademia filosofica in un giorno, ma piantò il seme di una sintesi che secoli dopo avrebbe portato alla nascita della filosofia cristiana con giganti come Sant'Agostino.</text:p>
      <text:p text:style-name="P6">Paolo di Tarso, noto anche come San Paolo, è l'autore della Prima lettera ai Corinzi, uno dei testi che compongono il Nuovo Testamento. Paolo di Tarso era un apostolo e missionario cristiano, considerato uno dei più importanti teologi della storia del cristianesimo. Nato a Tarso, in Cilicia (attuale Turchia), era un cittadino romano di nascita e un fariseo di formazione. Dopo la sua conversione al cristianesimo, divenne uno <text:soft-page-break/>dei più importanti evangelizzatori del primo secolo, fondando numerose comunità cristiane in Asia Minore e in Europa. La Prima lettera ai Corinzi è una delle sue lettere più famose, indirizzata alla comunità cristiana della città greca di Corinto e scritta ad Efeso. <text:span text:style-name="T2">S</text:span>econdo gli studiosi fu composta nell'arco cronologico del 53-57 o più strettamente nel 55-56 secondo alcuni altri.</text:p>
      <text:p text:style-name="P6">Paolo scrisse questa lettera dopo aver evangelizzato Corinto per un periodo di oltre 18 mesi, dalla fine del 50 alla metà del 52. Secondo la sua consuetudine di operare nei grandi centri, voleva impiantare la fede cristiana in questo porto famoso e molto popolato, da dove si sarebbe irradiata in tutta l'Acaia. Di fatto riuscì a stabilirvi una forte comunità, soprattutto negli strati modesti della popolazione. Questa grande città era un centro di cultura greca, dove si affrontavano correnti di pensiero e di religione molto differenti tra loro, e celebre per il caratteristico rilassamento dei costumi. Secondo lo studioso H.H. Halley infatti, Corinto era: una città rinomata e voluttuosa, dove si incontravano i vizi dell'Oriente e dell'Occidente. Inoltre un noto dizionario biblico fa notare che : <text:span text:style-name="T2">l</text:span>a sua ricchezza fu tanto celebrata da divenire proverbiale; tali furono il vizio e la dissolutezza dei suoi abitanti. Il contatto della giovane fede cristiana con questa immorale capitale del paganesimo doveva porre ai neofiti numerosi e delicati <text:soft-page-break/>problemi. Paolo nella sua prima lettera ai cristiani di Corinto (così come nella Seconda lettera ai Corinzi) cerca di risolverli.</text:p>
      <text:p text:style-name="P6"><text:span text:style-name="T1">La Prima lettera ai Corinzi </text:span>è considerata una delle più importanti dal punto di vista dottrinale; vi si trovano informazioni e decisioni su numerosi problemi cruciali del Cristianesimo primitivo, sia per la sua "vita interna": purezza dei costumi, matrimonio e verginità, svolgimento delle assemblee religiose e celebrazione dell'eucaristia, uso dei carismi; sia per i rapporti con il mondo pagano: ricorso ai tribunali, carni offerte agli idoli.</text:p>
      <text:p text:style-name="P6">Paolo affronta diversi punti di vista cristiani, sulla libertà della vita cristiana, la santificazione del corpo, il primato della carità (in particolare in quello che viene chiamato Inno alla carità), l'unione al Cristo, la parus<text:span text:style-name="T2">ì</text:span>a.</text:p>
      <text:p text:style-name="P7">In merito alla parus<text:span text:style-name="T2">ì</text:span>a, "Paolo era convinto del fatto che la fine del mondo, ovvero la vittoria definitiva di Dio e di Cristo, alla quale avrebbe partecipato anche ogni cristiano, sarebbe avvenuta mentre egli era ancora in vita", per cui "alcuni testimoni [manoscritti] cancellano la negazione per rimuovere la speranza irrealizzata di Paolo di voler vivere per vedere la parus<text:span text:style-name="T2">ì</text:span>a".</text:p>
      <text:p text:style-name="P6"><text:soft-page-break/>L'orizzonte <text:span text:style-name="T3">escatologico</text:span><text:span text:style-name="T3"><text:note text:id="ftn1" text:note-class="footnote"><text:note-citation>1</text:note-citation><text:note-body><text:p text:style-name="P3">Con escatologia (dal greco antico éskhatos 'ultimo') in teologia, nelle religioni e talora anche in filosofia, si indica una dottrina volta a indagare il destino ultimo del singolo individuo, dell'intero genere umano e dell'universo; in quanto legata alle aspettative ultime dell'uomo (circa la vita ultraterrena), l'escatologia può influire in modo notevole sulla visione del mondo e la condotta di tutti i giorni.</text:p></text:note-body></text:note></text:span> è sempre presente e sottende tutta l'esposizione sulla resurrezione della carne. Questo adattamento del Vangelo al mondo nuovo si manifesta soprattutto nell'opposizione, secondo Paolo, tra il vero cristianesimo e la sapienza ellenica. Agli abitanti di Corinto, Paolo scrive che, a suo parere, c'è un solo maestro, il Cristo; un solo messaggio, la salvezza mediante il sacrificio di Cristo; e che lì si trova la sola e vera sapienza.</text:p>
      <text:p text:style-name="P6">Al tempo della composizione della lettera di Paolo ai Corinzi, nella folta comunità cristiana corinzia esistevano diversi problemi di natura spirituale.</text:p>
      <text:p text:style-name="P6">Lo scopo della lettera era evidenziare tali problemi discutendoli da un punto di vista cristiano e trovare la giusta soluzione. Paolo conosceva Corinto come città pagana e liberale. Falsi maestri e stoltezza della sapienza del mondo, divisioni, immoralità sessuale e cattive compagnie, Ebrei e Gentili<text:note text:id="ftn2" text:note-class="footnote"><text:note-citation>2</text:note-citation><text:note-body><text:p text:style-name="P2">Il termine “Gentili” designa tutte le genti non giudaiche partecipi dei costumi e della cultura greca nel mondo romano. In opposizione al popolo israelita, i gentili equivalevano a pagani. Nel linguaggio neotestamentario, il termine indica chi non appartiene alla religione ebraica o chi, nel mondo greco-romano, non era convertito al cristianesimo.</text:p><text:p text:style-name="P1"/><text:p text:style-name="P1"/></text:note-body></text:note>, idolatria e <text:soft-page-break/>matrimonio sono i più importanti temi trattati dalla lettera con il capitolo 13 che mette in evidenza come tema dominante l'amore basato sul principio che travalica ogni conoscenza ed adempie la fede. L'amore non viene mai meno ed è l'amore che rappresenta nella scala dei valori cristiani, la massima espressione del cristianesimo. È vero che la lettera di Paolo riporta il termine agápe, ma è assai errato tradurlo come amore, in quanto termine troppo generico. In ottica cristiana, infatti, il termine significa specificatamente la carità, come anche riportato nella traduzione ufficiale della C.E.I del 2008.</text:p>
      <text:p text:style-name="P6">Paolo scrive ai cristiani di Corinto chiamati ad essere santi e che nonostante i molti problemi spirituali esistenti in quella comunità, egli ama unitamente a Cristo. La composizione della comunità cristiana comprendeva sia giudei che greci, con una probabile maggioranza di greci e altri Gentili.</text:p>
      <text:p text:style-name="P8">La lettera è una delle più lunghe fra quelle scritte da Paolo, paragonabile a quella dei Romani, ambedue infatti furono suddivise in 16 capitoli. I temi affrontati dalla lettera sono molteplici, ma nonostante tutto, alcuni studiosi pensano che l'intera lettera possa essere suddivisa in uno schema che contenga 7 argomenti principali.</text:p>
      <text:p text:style-name="P8">Questi sono:</text:p>
      <text:p text:style-name="P6"><text:soft-page-break/>I. Saluti accorati ed incoraggianti di Paolo e Sostene ai Corinzi -</text:p>
      <text:list text:style-name="L1">
        <text:list-header>
          <text:p text:style-name="P12">Paolo chiamato ad essere apostolo si rivolge ai Corinzi santificati mettendo in risalto che tale santificazione non appartiene solo a loro, ma a tutti quelli che in ogni luogo invocano il nome di Gesù Cristo. Quindi enfasi su un messaggio cristiano universale e non prerogativa di un unico popolo.</text:p>
        </text:list-header>
      </text:list>
      <text:p text:style-name="P7"/>
      <text:p text:style-name="P7">II. Invocazione di ringraziamento a Dio per i doni spirituali presenti nella chiesa di Corinto - </text:p>
      <text:list text:style-name="L2">
        <text:list-header>
          <text:p text:style-name="P13">Nonostante conosca molto bene i problemi della chiesa di Corinto, Paolo non inizia la sua lettera con l'evidenziare i problemi, ma parlando dei punti positivi e lodando le buone qualità di quella chiesa. Quindi ringrazia Dio stesso perché quei corinzi erano stati arricchiti in Cristo nella piena capacità di parlare e nella conoscenza.</text:p>
        </text:list-header>
      </text:list>
      <text:p text:style-name="P7">III. Divisione nella chiesa di Corinto - </text:p>
      <text:list text:style-name="L3">
        <text:list-header>
          <text:p text:style-name="P14">Paolo evidenzia il motivo principale di divisione che consiste nel fatto che componenti della chiesa corinzia, così come gli era stato riferito da cristiani della casa di Cloe, volevano stabilire la loro appartenenza cristiana, chi al cristiano Apollo, chi allo stesso Paolo, e chi a Cristo. Il risultato era una chiesa divisa, un Cristo diviso . Anziché essere <text:soft-page-break/>compiaciuto, Paolo non si attribuisce nessun merito a parte quello di semplice collaboratore di Cristo, e quindi fa ragionare i Corinzi osservando che non era stato 'Paolo' ad essere stato sacrificato per loro (ma Cristo), e che loro non erano stati certo battezzati nel nome di Paolo (ma di Cristo). I Corinzi avevano anche una visione sbagliata di ciò che Dio reputava sapienza. Dio non scelse molti sapienti, anzi il mondo per mezzo della propria sapienza non ha conosciuto Dio, solo Cristo è sapienza di Dio.</text:p>
          <text:p text:style-name="P15">L'incoraggiamento di Paolo quindi è quello di guardare più all'uomo spirituale che a quello fisico e di assumere la mente di Cristo, unico fondamento del tempio di Dio di cui i Corinzi stessi facevano parte. Via quindi qualsiasi seduzione mentale e i ragionamenti capziosi di appartenenza a chicchessia, se non proprio a Cristo, ricordando che la sapienza di questo mondo era da considerarsi stoltezza presso Dio.</text:p>
          <text:p text:style-name="P15">Inoltre nessuno giudichi. Lui stesso è divenuto l'esempio, insieme al cristiano Apollo<text:note text:id="ftn3" text:note-class="footnote"><text:note-citation>3</text:note-citation><text:note-body><text:p text:style-name="P4">Apollo era un cristiano ebreo alessandrino del I secolo menzionato diverse volte nel Nuovo Testamento. Era un contemporaneo e collega di Paolo Apostolo e svolse un ruolo importante nello sviluppo iniziale delle chiese di Efeso e Corinto. Apollo è considerato uno dei 70 apostoli e il suo giorno di festa è l'8 dicembre nella chiesa ortodossa orientale. Non va confuso con il dio greco Apollo, che era il dio della musica, delle arti mediche, delle scienze, dell'intelletto e della profezia.</text:p><text:p text:style-name="Footnote"/><text:p text:style-name="Footnote"/></text:note-body></text:note>, di <text:soft-page-break/>subordinato fedele a Cristo e spettacolo teatrale per tutti gli uomini e gli stessi angeli. I Corinzi potevano considerarsi privilegiati rispetto agli apostoli che soffrivano per i maltrattamenti dei non credenti. Sofferenza che nonostante tutto veniva sopportata con fede: quando siamo oltraggiati, benediciamo e quando siamo perseguitati, sopportiamo. Quindi Paolo dichiara che non per denigrare egli scrive, infatti : scrivo queste cose non per farvi vergognare, ma per ammonirvi come figli diletti. Alcuni si erano gonfiati e Paolo ammonisce: Che volete? Devo venire da voi con una verga (di disciplina) o con amore e mitezza di spirito?. Un chiaro invito a cambiare condotta prima del suo arrivo fisico nella chiesa di Corinto.</text:p>
        </text:list-header>
      </text:list>
      <text:p text:style-name="P7"/>
      <text:p text:style-name="P7">IV. L'immoralità e la giustizia degli uomini a Corinto -</text:p>
      <text:list text:style-name="L4">
        <text:list-header>
          <text:p text:style-name="P16">Disciplina per un fratello immorale. Paolo rileva un associato alla chiesa di Corinto che convive con la moglie di suo padre. Il problema non era solo il peccato di costui, ma il fatto che i Corinzi si erano assopiti a una tal condizione peccaminosa, da vantarsene. Paolo corregge questa mentalità distorta il comando è <text:span text:style-name="T4">t</text:span>ogliete il malvagio di mezzo a voi! Quell'uomo andava rimosso dalla chiesa di Corinto perché rappresentava un lievito di corruzione, e <text:soft-page-break/>ricorda: Non sapete che un po' di lievito fa fermentare tutta la pasta? Il comando era chiaro, questo uomo apparteneva ad una categoria di peccatori per cui era previsto cristianamente l'allontanamento dalla chiesa, non mangiando nemmeno insieme: Vi ho scritto di non mescolarvi con chi si dice fratello, ed è impudico o avaro o idolàtra o maldicente o ubriacone o ladro; con questi tali non dovete neanche mangiare insieme.</text:p>
          <text:p text:style-name="P17">La risoluzione di controversie fra fratelli. Era consuetudine della comunità cristiana di Corinto portare le risoluzioni dei loro conflitti e controversie al di fuori della chiesa, chiedendo a giudici esterni giudizi e quindi la relativa sanzione. Un atteggiamento sbagliato e non spirituale, infatti Paolo rileva: Se dunque avete liti per cose di questo mondo, voi prendete a giudici gente senza autorità nella Chiesa? Paolo sostiene che avrebbero dovuto vergognarsi, anziché farsi guidare dall'amore e dal buon senso, richiedendo l'aiuto dei loro fratelli spirituali all'interno della chiesa, si comportavano in maniera davvero vergognosa affidando il giudizio ad increduli. Sarebbe stato molto meglio subire un'ingiustizia che portare un proprio fratello in giudizio in un tribunale del mondo.</text:p>
          <text:p text:style-name="P17"><text:soft-page-break/>La purità sessuale. Nella città di Corinto lussuriosa ed immorale ogni pratica sessuale era lecita, si, tutto era lecito. Ma i cristiani non dovevano farsi influenzare da tale mentalità accettata dai molti: O non sapete che gli ingiusti non erediteranno il regno di Dio? Non illudetevi: né immorali, né idolàtri, né adùlteri, né effeminati, né sodomiti, né ladri, né avari, né ubriaconi, né maldicenti, né rapaci erediteranno il regno di Dio. Il cristiano doveva mostrare autocontrollo per glorificare Cristo con il proprio corpo, perché Paolo scrive: «Tutto mi è lecito!». Ma non tutto giova. «Tutto mi è lecito!». Ma io non mi lascerò dominare da nulla.</text:p>
        </text:list-header>
      </text:list>
      <text:p text:style-name="P7"/>
      <text:p text:style-name="P7">V. Disposizioni cristiane - </text:p>
      <text:list text:style-name="L5">
        <text:list-header>
          <text:p text:style-name="P18">Matrimonio e Ministero. Mezze misure in campo sessuale, non esistono, se un uomo (o una donna) è incontinente, si sposi. Nessuno dei coniugi deve esercitare pressione sessuale sull'altro astenendosi dal dare il debito matrimoniale. Inoltre una fedele donna cristiana che ha il marito incredulo, non è autorizzata per questa ragione, a separarsi da lui. E anche se, per essere più liberi da ansietà, nel compiere il proprio ministero cristiano, sarebbe consigliabile rimanere come Paolo ovvero privo di vincoli matrimoniali, questo non dovrebbe <text:soft-page-break/>rappresentare una regola, infatti: ma se non sanno vivere in continenza, si sposino; è meglio sposarsi che ardere. Paolo infine, parlando del coniuge vivente che vuole risposarsi alla morte del proprio coniuge, scrive : La moglie è vincolata per tutto il tempo in cui vive il marito; ma se il marito muore è libera di sposare chi vuole, purché ciò avvenga nel Signore. Ma se rimane così, a mio parere è meglio.</text:p>
          <text:p text:style-name="P19">Libertà e tatto cristiano, conoscenza e coscienza. La libertà cristiana non deve rappresentare una pietra di inciampo per quei cristiani che hanno una coscienza debole. Per dare enfasi sull'importanza di esercitare la propria libertà in vista dell'edificazione dei propri fratelli, Paolo scrive: Perciò, se un cibo scandalizza mio fratello, non mangerò mai più carne, per non scandalizzare mio fratello. La libertà cristiana ha quindi limiti ed è subordinata agli effetti che produce sui fratelli di fede.</text:p>
          <text:p text:style-name="P19">Paolo fa un'ampia difesa del suo apostolato dimostrando un adattamento a molteplici situazioni: <text:span text:style-name="T4">p</text:span>oiché, pur essendo libero da tutti, mi sono fatto servo di tutti, per guadagnarne il maggior numero; con i Giudei, mi sono fatto giudeo, per guadagnare i Giudei; con quelli che sono sotto la legge, mi sono fatto come uno che è sotto la legge (benché io stesso non sia sottoposto alla legge), per guadagnare quelli <text:soft-page-break/>che sono sotto la legge; con quelli che sono senza legge, mi sono fatto come se fossi senza legge (pur non essendo senza la legge di Dio, ma essendo sotto la legge di Cristo), per guadagnare quelli che sono senza legge. Con i deboli mi sono fatto debole, per guadagnare i deboli; mi sono fatto ogni cosa a tutti, per salvarne ad ogni modo alcuni. E faccio tutto per il vangelo, al fine di esserne partecipe insieme ad altri.</text:p>
          <text:p text:style-name="P19">Regole della corsa cristiana. I Corinzi ben sapevano cosa rappresentassero le corse e le altre gare in uno stadio. A Corinto si disputavano i giochi istmici secondi in Grecia, solo alle Olimpiadi. Ecco quindi che Paolo sfrutta questa loro conoscenza per fare delle illustrazioni e similitudini: Non sapete che coloro i quali corrono nello stadio, corrono tutti, ma uno solo ottiene il premio? Correte in modo da riportarlo. Chiunque fa l'atleta è temperato in ogni cosa; e quelli lo fanno per ricevere una corona corruttibile; ma noi, per una incorruttibile. E ancora : Io quindi corro così; non in modo incerto; lotto al pugilato, ma non come chi batte l'aria; anzi, tratto duramente il mio corpo e lo riduco in schiavitù, perché non avvenga che, dopo aver predicato agli altri, io stesso sia squalificato.</text:p>
          <text:p text:style-name="P19"><text:soft-page-break/>Dopo aver invitato i Corinzi a non essere mormoratori come gli Israeliti nel deserto<text:note text:id="ftn4" text:note-class="footnote"><text:note-citation>4</text:note-citation><text:note-body><text:p text:style-name="P4">In questo contesto, “mormorare” significa lamentarsi o esprimere insoddisfazione. Gli Israeliti, durante il loro viaggio nel deserto dopo l’esodo dall’Egitto, si lamentarono spesso con Mosè e con Dio per le difficoltà che incontravano. Paolo sta quindi esortando i Corinzi a non comportarsi come gli Israeliti, ma ad avere fede e a non lamentarsi nelle difficoltà.</text:p></text:note-body></text:note>, l'apostolo Paolo affronta il tema dell'idolatria e conclude: Voi non potete bere il calice del Signore e il calice dei demòni; voi non potete partecipare alla mensa del Signore e alla mensa dei demòni. E ancora <text:span text:style-name="T4">s</text:span>ia dunque che mangiate, sia che beviate, sia che facciate qualche altra cosa, fate tutto alla gloria di Dio. Quindi scrive del ruolo dell'uomo e della donna nella chiesa cristiana e ancora spiega il significato della rappresentazione della cena del Signore, soffermandosi infine sulla varietà dei doni spirituali che Dio ha concesso alla chiesa primitiva : Ora a ciascuno è data la manifestazione dello Spirito per il bene comune. Infatti, a uno è data, mediante lo Spirito, parola di sapienza; a un altro parola di conoscenza, secondo il medesimo Spirito; a un altro, fede, mediante il medesimo Spirito; a un altro, doni di guarigione, per mezzo del medesimo Spirito; a un altro, potenza di operare miracoli; a un altro, profezia; a un altro, il discernimento degli spiriti; a un altro, diversità di lingue e a un altro, l'interpretazione delle lingue; ma tutte queste cose le <text:soft-page-break/>opera quell'unico e medesimo Spirito, distribuendo i doni a ciascuno in particolare come vuole.</text:p>
          <text:p text:style-name="P19">La chiesa viene quindi paragonata ad un corpo con molte membra dove tutte sono parimenti importanti. Esiste una similitudine fra un corpo carnale e membri di una chiesa in cui non ci dovrebbero essere divisioni: <text:span text:style-name="T4">t</text:span>utti dovrebbero concorrere allo stesso scopo e alla stessa meta: ma Dio ha formato il corpo in modo da dare maggior onore alla parte che ne mancava, perché non ci fosse divisione nel corpo, ma le membra avessero la medesima cura le une per le altre. Se un membro soffre, tutte le membra soffrono con lui; se un membro è onorato, tutte le membra ne gioiscono con lui.</text:p>
          <text:p text:style-name="P19">Le opere dell'amore. Il cristiano per operare sia nel mondo che con i propri fratelli di fede, deve dimostrare la qualità più importante, ossia l'amore: Se parlassi le lingue degli uomini e degli angeli, ma non avessi amore, sarei un rame risonante o uno squillante cembalo. Se avessi il dono di profezia e conoscessi tutti i misteri e tutta la scienza e avessi tutta la fede in modo da spostare i monti, ma non avessi amore, non sarei nulla. E come si manifesta tale amore? Paolo si sofferma dimostrando quali sono i campi di azione dell'amore: L'amore è paziente, è benevolo; l'amore non invidia; l'amore <text:soft-page-break/>non si vanta, non si gonfia, non si comporta in modo sconveniente, non cerca il proprio interesse, non s'inasprisce, non addebita il male, non gode dell'ingiustizia, ma gioisce con la verità; soffre ogni cosa, crede ogni cosa, spera ogni cosa, sopporta ogni cosa. L'amore non verrà mai meno, assicura l'apostolo e conclude osservando che tra le cose durature, l'amore è la qualità principale: <text:span text:style-name="T4">o</text:span>ra dunque queste tre cose durano: fede, speranza, amore; ma la più grande di esse è l'amore.</text:p>
        </text:list-header>
      </text:list>
      <text:p text:style-name="P7"/>
      <text:p text:style-name="P7">VI. La Resurrezione - </text:p>
      <text:list text:style-name="L6">
        <text:list-header>
          <text:p text:style-name="P20">Resurrezione della carne (circa 1500) di Luca Signorelli - basata su 1 Corinzi 15:52,: in un momento, in un batter d'occhio, al suono dell'ultima tromba. Perché la tromba squillerà, e i morti risusciteranno incorruttibili, e noi saremo trasformati Cappella di San Brizio, Duomo di Orvieto</text:p>
        </text:list-header>
      </text:list>
      <text:p text:style-name="P9"><text:tab/>Paolo in questo capitolo affrontando il tema principale della resurrezione, menziona il suo cruccio ricorrente in molti altri suoi scritti: ha perseguitato la chiesa di Cristo (quando era ancora Saulo) e si sente l'ultimo degli apostoli, anche se l'immeritata benignità di Dio gli permette di essere ora al Suo servizio. Il capitolo inizia con una dichiarazione sulla certezza che Cristo è risuscitato <text:soft-page-break/>dai morti. Il motivo di questa dichiarazione riguardava un ulteriore problema della chiesa di Corinto: se si predica che Cristo è risuscitato dai morti, come possono dire alcuni tra voi che non esiste risurrezione dei morti? Se non esiste resurrezione dai morti, neanche Cristo è risuscitato!. Fede e riscatto del sangue versato da Cristo erano quindi inutili? E coloro che morirono per testimoniare Cristo, se la resurrezione non esiste, morirono per quale motivo? La verità è (qui Paolo enuncia il tema principale del riscatto provveduto dalla morte e resurrezione di Cristo) che: Cristo è risuscitato dai morti, primizia di coloro che sono morti. Poiché se a causa di un uomo venne la morte, a causa di un uomo verrà anche la risurrezione dei morti; e come tutti muoiono in Adamo, così tutti riceveranno la vita in Cristo. Ciascuno però nel suo ordine: prima Cristo, che è la primizia; poi, alla sua venuta, quelli che sono di Cristo; poi sarà la fine, quando egli consegnerà il regno a Dio Padre, dopo aver ridotto al nulla ogni principato e ogni potestà e potenza. Bisogna infatti che egli regni finché non abbia posto tutti i nemici sotto i suoi piedi. L'ultimo nemico ad essere annientato sarà la morte, perché ogni cosa ha posto sotto i suoi piedi. Però quando dice che ogni cosa è stata sottoposta, è chiaro che si deve eccettuare Colui che gli ha sottomesso ogni <text:soft-page-break/>cosa. E quando tutto gli sarà stato sottomesso, anche lui, il Figlio, sarà sottomesso a Colui che gli ha sottomesso ogni cosa, perché Dio sia tutto in tutti.</text:p>
      <text:list text:style-name="L7">
        <text:list-header>
          <text:p text:style-name="P21">Se i morti non risorgono, mangiamo e beviamo, perché domani moriremo. Quello appena annunciato poteva essere solo un insegnamento sbagliato di cattivi maestri che erano nella chiesa i cui predicatori, rappresentavano di fatto, una cattiva compagnia di cui Paolo consiglia di fare a meno: Non lasciatevi ingannare: «Le cattive compagnie corrompono i buoni costumi». Ritornate in voi, come conviene, e non peccate! Alcuni infatti dimostrano di non conoscere Dio; ve lo dico a vostra vergogna.</text:p>
          <text:p text:style-name="P21">L'insegnamento cristiano sulla resurrezione era diverso: Questo vi dico, o fratelli: la carne e il sangue non possono ereditare il regno di Dio, né ciò che è corruttibile può ereditare l'incorruttibilità. <text:span text:style-name="T4">E</text:span> ancora: vi annunzio un mistero: non tutti, certo, moriremo, ma tutti saremo trasformati, in un istante, in un batter d'occhio, al suono dell'ultima tromba; suonerà infatti la tromba e i morti risorgeranno incorrotti e noi saremo trasformati. È necessario infatti che questo corpo corruttibile si vesta di incorruttibilità e questo corpo mortale si vesta di immortalità. Quando poi questo corpo corruttibile si <text:soft-page-break/>sarà vestito d'incorruttibilità e questo corpo mortale d'immortalità, si compirà la parola della Scrittura: La morte è stata ingoiata per la vittoria. Dov'è, o morte, la tua vittoria? Dov'è, o morte, il tuo pungiglione?, spiegando che: Il pungiglione della morte è il peccato e la forza del peccato è la legge. Avevano bisogno di fare molto attenzione agli insegnamenti non cristiani di questi falsi maestri, avevano bisogno di essere desti e saldi con una fede incrollabile che si concretizzava nell'opera di Cristo. L'esortazione è: <text:span text:style-name="T4">p</text:span>erciò, fratelli miei carissimi, rimanete saldi e irremovibili, prodigandovi sempre nell'opera del Signore, sapendo che la vostra fatica non è vana nel Signore.</text:p>
        </text:list-header>
      </text:list>
      <text:p text:style-name="P7"/>
      <text:p text:style-name="P7">VII. Conclusione della lettera - </text:p>
      <text:list text:style-name="L8">
        <text:list-header>
          <text:p text:style-name="P22">Molti erano i problemi della chiesa di Corinto, e Paolo in questa lettera li ha affrontati tutti, senza edulcorare minimamente i toni che sono stati decisi da una parte, ma altrettanto amorevoli ed affettuosi dall'altra. La chiesa di Corinto gli è cara, e in questa ultima parte della lettera istruzioni ed esortazioni dimostrano questo grande effetto. Ai Corinzi ricorda che quando arriverà da loro, dopo il suo viaggio in Macedonia: ma da voi forse mi fermerò alquanto, o ci trascorrerò addirittura <text:soft-page-break/>l'inverno, affinché voi mi facciate proseguire per dove mi recherò. Perché, questa volta, non voglio vedervi di passaggio; anzi spero di fermarmi qualche tempo da voi, se il Signore lo permette.</text:p>
        </text:list-header>
      </text:list>
      <text:list text:style-name="L9">
        <text:list-header>
          <text:p text:style-name="P23">Ricorda, come aveva fatto per la chiesa dei Galati, la colletta per i santi, una colletta volontaria secondo le prosperità concesse ad ogni singolo membro della comunità cristiana. Si tratterrà ancora ad Efeso, dove c'era da fare un gran lavoro di evangelizzazione nonostante l'esistenza di molti oppositori. Si preoccupa quindi di Timoteo e di Apollo, due zelanti cristiani che probabilmente sarebbero andati in tempi diversi a Corinto: Ora se viene Timoteo, guardate che stia fra voi senza timore, perché lavora nell'opera del Signore come faccio anch'io. Nessuno dunque lo disprezzi; ma fatelo proseguire in pace, perché venga da me; poiché io l'aspetto con i fratelli. Quanto al fratello Apollo, io l'ho molto esortato a recarsi da voi con i fratelli; ma egli non ha alcuna intenzione di farlo adesso; verrà però quando ne avrà l'opportunità. Raccomanda inoltre l'apprezzamento per cristiani fedeli come Stefana e la sua famiglia, Fortunato e Acaico. quindi la raccomandazione a vegliare e rimanere fermi nella fede: Vegliate, state fermi nella fede, comportatevi virilmente, fortificatevi. Tra voi si faccia ogni cosa con amore.</text:p>
          <text:p text:style-name="P23"><text:soft-page-break/>Quindi si accomiata dai Corinzi con il suo saluto, con il saluto di tutte le chiese dell'Asia, con quello di Aquila e Priscilla e quello dei fratelli cristiani di Efeso, oltre all'invito di salutarsi reciprocamente con un santo bacio. Chiude la lettera l'appello di mostrare tutti amore per il Signore : Le chiese dell'Asia vi salutano. Aquila e Prisca, con la chiesa che è in casa loro, vi salutano molto nel Signore. Tutti i fratelli vi salutano. Salutatevi gli uni gli altri con un santo bacio. Il saluto è di mia propria mano: di me, Paolo. Se qualcuno non ama il Signore, sia anatema. Marana tha. La grazia del Signore Gesù sia con voi. Il mio amore è con tutti voi in Cristo Gesù.</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Segoe UI" style:font-size-asian="10.5pt" style:language-asian="zxx" style:country-asian="none" style:font-name-complex="Tahoma1"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egoe UI" style:font-size-asian="10.5pt" style:language-asian="zxx" style:country-asian="none" style:font-name-complex="Tahoma1" style:font-size-complex="12pt" style:language-complex="ar" style:country-complex="EG"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meta:initial-creator>
    <meta:creation-date>2023-08-27T11:23:01.465000000</meta:creation-date>
    <dc:date>2026-04-02T18:35:40.379643592</dc:date>
    <dc:creator>corrado tafaro</dc:creator>
    <meta:editing-duration>PT2H2M45S</meta:editing-duration>
    <meta:editing-cycles>5</meta:editing-cycles>
    <meta:generator>LibreOffice/24.2.7.2$Linux_X86_64 LibreOffice_project/420$Build-2</meta:generator>
    <meta:document-statistic meta:table-count="0" meta:image-count="0" meta:object-count="0" meta:page-count="26" meta:paragraph-count="96" meta:word-count="5223" meta:character-count="32746" meta:non-whitespace-character-count="27634"/>
  </office:meta>
</office:document-meta>
</file>