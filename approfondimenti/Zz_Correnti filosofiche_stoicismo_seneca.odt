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Noto Sans1" fo:font-size="12pt" style:font-size-asian="12pt" style:font-size-complex="12pt"/>
    </style:style>
    <style:style style:name="P2" style:family="paragraph" style:parent-style-name="Text_20_body">
      <style:paragraph-properties fo:margin-top="0.101cm" fo:margin-bottom="0cm" style:contextual-spacing="false" fo:text-align="justify" style:justify-single-word="false"/>
      <style:text-properties style:font-name="Noto Sans1" fo:font-size="12pt" style:font-size-asian="12pt" style:font-size-complex="12pt"/>
    </style:style>
    <style:style style:name="P3"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rsid="001c02ae" officeooo:paragraph-rsid="000d5cfd" style:font-size-asian="12pt" style:font-size-complex="12pt"/>
    </style:style>
    <style:style style:name="P4" style:family="paragraph" style:parent-style-name="Standard">
      <style:paragraph-properties fo:line-height="115%" fo:text-align="justify" style:justify-single-word="false"/>
      <style:text-properties style:font-name="Noto Sans1" fo:font-size="12pt" officeooo:rsid="00145787" officeooo:paragraph-rsid="000d5cfd" style:font-size-asian="12pt" style:font-size-complex="12pt"/>
    </style:style>
    <style:style style:name="P5"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145787" officeooo:paragraph-rsid="000d5cfd" style:font-size-asian="12pt" style:font-size-complex="12pt"/>
    </style:style>
    <style:style style:name="P8"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9" style:family="paragraph" style:parent-style-name="Standard">
      <style:paragraph-properties fo:line-height="115%" fo:text-align="justify" style:justify-single-word="false"/>
      <style:text-properties style:font-name="Noto Sans1" fo:font-size="12pt" officeooo:rsid="00139a99" officeooo:paragraph-rsid="000d5cfd" style:font-size-asian="12pt" style:font-size-complex="12pt"/>
    </style:style>
    <style:style style:name="P10"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39a99" officeooo:paragraph-rsid="000d5cfd" style:font-size-asian="12pt" style:font-size-complex="12pt"/>
    </style:style>
    <style:style style:name="P11"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1c02ae" officeooo:paragraph-rsid="000d5cfd" style:font-size-asian="10.5pt" style:font-weight-asian="normal" style:font-size-complex="12pt" style:font-weight-complex="normal"/>
    </style:style>
    <style:style style:name="P12"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c02ae" officeooo:paragraph-rsid="000d5cfd"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20b17c" officeooo:paragraph-rsid="000d5cfd" style:font-size-asian="10.5pt" style:font-weight-asian="normal" style:font-size-complex="12pt" style:font-weight-complex="normal"/>
    </style:style>
    <style:style style:name="P16" style:family="paragraph" style:parent-style-name="Footnote">
      <style:paragraph-properties fo:text-align="justify" style:justify-single-word="false"/>
    </style:style>
    <style:style style:name="P17" style:family="paragraph" style:parent-style-name="Standard">
      <style:paragraph-properties fo:line-height="115%" fo:text-align="justify" style:justify-single-word="false"/>
      <style:text-properties fo:font-size="12pt" officeooo:rsid="00139a99" officeooo:paragraph-rsid="000d5cfd" style:font-size-asian="12pt" style:font-size-complex="12pt"/>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fo:font-size="12pt" officeooo:rsid="00139a99" officeooo:paragraph-rsid="000d5cfd" style:font-size-asian="12pt" style:font-size-complex="12pt"/>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2pt" officeooo:rsid="00139a99" officeooo:paragraph-rsid="000d5cfd" style:font-size-asian="12pt" style:font-size-complex="12pt"/>
    </style:style>
    <style:style style:name="P20" style:family="paragraph" style:parent-style-name="Heading_20_3">
      <style:text-properties style:font-name="Noto Sans1" fo:font-size="12pt" fo:font-weight="bold" officeooo:paragraph-rsid="000f6323" style:font-size-asian="12pt" style:font-weight-asian="bold" style:font-size-complex="12pt" style:font-weight-complex="bold"/>
    </style:style>
    <style:style style:name="P2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f6323" style:font-size-asian="12pt" style:font-size-complex="12pt"/>
    </style:style>
    <style:style style:name="P2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f6323" style:font-size-asian="12pt" style:font-size-complex="12pt"/>
    </style:style>
    <style:style style:name="P23"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f6323" style:font-size-asian="12pt" style:font-size-complex="12pt"/>
    </style:style>
    <style:style style:name="P24"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136491" officeooo:paragraph-rsid="000f6323" style:font-size-asian="12pt" style:font-size-complex="12pt"/>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36491" officeooo:paragraph-rsid="000f6323" style:font-size-asian="12pt" style:font-size-complex="12pt"/>
    </style:style>
    <style:style style:name="P2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617bc" officeooo:paragraph-rsid="000f6323" style:font-size-asian="12pt" style:font-weight-asian="normal" style:font-size-complex="12pt" style:font-weight-complex="normal"/>
    </style:style>
    <style:style style:name="P27"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617bc" officeooo:paragraph-rsid="000f6323"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139a99" style:font-style-asian="italic" style:font-style-complex="italic"/>
    </style:style>
    <style:style style:name="T3" style:family="text">
      <style:text-properties fo:font-style="italic" officeooo:rsid="0036f345" style:font-style-asian="italic" style:font-style-complex="italic"/>
    </style:style>
    <style:style style:name="T4" style:family="text">
      <style:text-properties fo:font-style="italic" officeooo:rsid="00145787" style:font-style-asian="italic" style:font-style-complex="italic"/>
    </style:style>
    <style:style style:name="T5" style:family="text">
      <style:text-properties fo:font-style="italic" officeooo:rsid="01be6cb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c02ae" style:font-style-asian="italic" style:font-weight-asian="normal" style:font-style-complex="italic" style:font-weight-complex="normal"/>
    </style:style>
    <style:style style:name="T8" style:family="text">
      <style:text-properties fo:font-style="italic" fo:font-weight="normal" officeooo:rsid="001617bc" style:font-style-asian="italic" style:font-weight-asian="normal" style:font-style-complex="italic" style:font-weight-complex="normal"/>
    </style:style>
    <style:style style:name="T9" style:family="text">
      <style:text-properties fo:font-style="italic" fo:font-weight="normal" officeooo:rsid="0017c97a" style:font-style-asian="italic" style:font-weight-asian="normal" style:font-style-complex="italic" style:font-weight-complex="normal"/>
    </style:style>
    <style:style style:name="T10" style:family="text">
      <style:text-properties fo:font-style="italic" fo:font-weight="normal" officeooo:rsid="002ee1f1" style:font-style-asian="italic" style:font-weight-asian="normal" style:font-style-complex="italic" style:font-weight-complex="normal"/>
    </style:style>
    <style:style style:name="T11" style:family="text">
      <style:text-properties fo:font-size="12pt" fo:font-style="italic" fo:font-weight="normal" officeooo:rsid="001617bc" style:font-size-asian="12pt" style:font-style-asian="italic" style:font-weight-asian="normal" style:font-size-complex="12pt" style:font-style-complex="italic" style:font-weight-complex="normal"/>
    </style:style>
    <style:style style:name="T12" style:family="text">
      <style:text-properties fo:font-size="12pt" fo:font-style="italic" fo:font-weight="normal" officeooo:rsid="002ee1f1" style:font-size-asian="12pt" style:font-style-asian="italic" style:font-weight-asian="normal" style:font-size-complex="12pt" style:font-style-complex="italic"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style:font-size-asian="12pt" style:font-size-complex="12pt"/>
    </style:style>
    <style:style style:name="T15" style:family="text">
      <style:text-properties fo:font-size="12pt" officeooo:rsid="00136491" style:font-size-asian="12pt" style:font-size-complex="12pt"/>
    </style:style>
    <style:style style:name="T16" style:family="text">
      <style:text-properties fo:font-size="12pt" officeooo:rsid="00db80f1" style:font-size-asian="12pt" style:font-size-complex="12pt"/>
    </style:style>
    <style:style style:name="T17" style:family="text">
      <style:text-properties fo:font-size="12pt" officeooo:rsid="002bb611" style:font-size-asian="12pt" style:font-size-complex="12pt"/>
    </style:style>
    <style:style style:name="T18" style:family="text">
      <style:text-properties fo:font-size="12pt" officeooo:rsid="00dc5b42" style:font-size-asian="12pt" style:font-size-complex="12pt"/>
    </style:style>
    <style:style style:name="T19" style:family="text">
      <style:text-properties fo:font-size="12pt" officeooo:rsid="0013e158" style:font-size-asian="12pt" style:font-size-complex="12pt"/>
    </style:style>
    <style:style style:name="T20" style:family="text">
      <style:text-properties fo:font-size="12pt" officeooo:rsid="0030bfb7" style:font-size-asian="12pt" style:font-size-complex="12pt"/>
    </style:style>
    <style:style style:name="T21" style:family="text">
      <style:text-properties fo:font-size="12pt" fo:font-weight="normal" officeooo:rsid="001617bc" style:font-size-asian="12pt" style:font-weight-asian="normal" style:font-size-complex="12pt" style:font-weight-complex="normal"/>
    </style:style>
    <style:style style:name="T22" style:family="text">
      <style:text-properties fo:font-size="12pt" fo:font-weight="normal" officeooo:rsid="002ee1f1" style:font-size-asian="12pt" style:font-weight-asian="normal" style:font-size-complex="12pt" style:font-weight-complex="normal"/>
    </style:style>
    <style:style style:name="T23" style:family="text">
      <style:text-properties style:font-name="Noto Sans1"/>
    </style:style>
    <style:style style:name="T24" style:family="text">
      <style:text-properties style:font-name="Noto Sans1" officeooo:rsid="00d44442"/>
    </style:style>
    <style:style style:name="T25" style:family="text">
      <style:text-properties style:font-name="Noto Sans1" officeooo:rsid="022a9003"/>
    </style:style>
    <style:style style:name="T26" style:family="text">
      <style:text-properties style:font-name="Noto Sans1" officeooo:rsid="0029e37e"/>
    </style:style>
    <style:style style:name="T27" style:family="text">
      <style:text-properties style:font-name="Noto Sans1" fo:font-style="italic" style:text-underline-style="none" officeooo:rsid="0029e37e" style:font-style-asian="italic" style:font-style-complex="italic"/>
    </style:style>
    <style:style style:name="T28" style:family="text">
      <style:text-properties style:font-name="Noto Sans1" fo:font-style="italic" style:font-style-asian="italic" style:font-style-complex="italic"/>
    </style:style>
    <style:style style:name="T29" style:family="text">
      <style:text-properties style:font-name="Noto Sans1" fo:font-style="italic" officeooo:rsid="0029e37e" style:font-style-asian="italic" style:font-style-complex="italic"/>
    </style:style>
    <style:style style:name="T30" style:family="text">
      <style:text-properties style:font-name="Noto Sans1" fo:font-style="italic" fo:font-weight="normal" officeooo:rsid="00d44442"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27935f" style:font-style-asian="normal" style:font-style-complex="normal"/>
    </style:style>
    <style:style style:name="T33" style:family="text">
      <style:text-properties fo:font-style="normal" officeooo:rsid="00294116" style:font-style-asian="normal" style:font-style-complex="normal"/>
    </style:style>
    <style:style style:name="T34" style:family="text">
      <style:text-properties fo:font-style="normal" officeooo:rsid="0025f7dd" style:font-style-asian="normal" style:font-style-complex="normal"/>
    </style:style>
    <style:style style:name="T35" style:family="text">
      <style:text-properties fo:font-style="normal" style:font-size-asian="12pt"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d44442" style:font-style-asian="normal" style:font-weight-asian="normal" style:font-style-complex="normal" style:font-weight-complex="normal"/>
    </style:style>
    <style:style style:name="T38" style:family="text">
      <style:text-properties fo:font-style="normal" fo:font-weight="normal" officeooo:rsid="00294116" style:font-style-asian="normal" style:font-weight-asian="normal" style:font-style-complex="normal" style:font-weight-complex="normal"/>
    </style:style>
    <style:style style:name="T39" style:family="text">
      <style:text-properties fo:font-style="normal" fo:font-weight="normal" officeooo:rsid="001c02ae" style:font-style-asian="normal" style:font-weight-asian="normal" style:font-style-complex="normal" style:font-weight-complex="normal"/>
    </style:style>
    <style:style style:name="T40" style:family="text">
      <style:text-properties fo:font-style="normal" fo:font-weight="normal" officeooo:rsid="0029e37e" style:font-style-asian="normal" style:font-weight-asian="normal" style:font-style-complex="normal" style:font-weight-complex="normal"/>
    </style:style>
    <style:style style:name="T41" style:family="text">
      <style:text-properties fo:font-style="normal" fo:font-weight="normal" officeooo:rsid="0036f345" style:font-style-asian="normal" style:font-weight-asian="normal" style:font-style-complex="normal" style:font-weight-complex="normal"/>
    </style:style>
    <style:style style:name="T42" style:family="text">
      <style:text-properties fo:font-style="normal" fo:font-weight="normal" officeooo:rsid="0040f61e" style:font-style-asian="normal" style:font-weight-asian="normal" style:font-style-complex="normal" style:font-weight-complex="normal"/>
    </style:style>
    <style:style style:name="T43" style:family="text">
      <style:text-properties fo:font-style="normal" fo:font-weight="normal" officeooo:rsid="00e29ca3" style:font-style-asian="normal" style:font-weight-asian="normal" style:font-style-complex="normal" style:font-weight-complex="normal"/>
    </style:style>
    <style:style style:name="T44" style:family="text">
      <style:text-properties fo:font-style="normal" fo:font-weight="normal" officeooo:rsid="00145787" style:font-style-asian="normal" style:font-weight-asian="normal" style:font-style-complex="normal" style:font-weight-complex="normal"/>
    </style:style>
    <style:style style:name="T45" style:family="text">
      <style:text-properties fo:font-style="normal" fo:font-weight="normal" officeooo:rsid="001617bc" style:font-style-asian="normal" style:font-weight-asian="normal" style:font-style-complex="normal" style:font-weight-complex="normal"/>
    </style:style>
    <style:style style:name="T46" style:family="text">
      <style:text-properties fo:font-style="normal" fo:font-weight="normal" officeooo:rsid="002bb611" style:font-style-asian="normal" style:font-weight-asian="normal" style:font-style-complex="normal" style:font-weight-complex="normal"/>
    </style:style>
    <style:style style:name="T47" style:family="text">
      <style:text-properties fo:font-style="normal" fo:font-weight="normal" officeooo:rsid="0017c97a" style:font-style-asian="normal" style:font-weight-asian="normal" style:font-style-complex="normal" style:font-weight-complex="normal"/>
    </style:style>
    <style:style style:name="T48" style:family="text">
      <style:text-properties fo:font-style="normal" fo:font-weight="bold" officeooo:rsid="001c02ae" style:font-style-asian="normal" style:font-weight-asian="bold" style:font-style-complex="normal" style:font-weight-complex="bold"/>
    </style:style>
    <style:style style:name="T49" style:family="text">
      <style:text-properties fo:font-style="normal" fo:font-weight="bold" officeooo:rsid="0029e37e" style:font-style-asian="normal" style:font-weight-asian="bold" style:font-style-complex="normal" style:font-weight-complex="bold"/>
    </style:style>
    <style:style style:name="T50" style:family="text">
      <style:text-properties fo:font-weight="normal" officeooo:rsid="001c02ae" style:font-weight-asian="normal" style:font-weight-complex="normal"/>
    </style:style>
    <style:style style:name="T51" style:family="text">
      <style:text-properties fo:font-weight="normal" officeooo:rsid="028ba1d6" style:font-weight-asian="normal" style:font-weight-complex="normal"/>
    </style:style>
    <style:style style:name="T52" style:family="text">
      <style:text-properties fo:font-weight="normal" officeooo:rsid="001617bc" style:font-weight-asian="normal" style:font-weight-complex="normal"/>
    </style:style>
    <style:style style:name="T53" style:family="text">
      <style:text-properties fo:font-weight="normal" officeooo:rsid="002ee1f1" style:font-weight-asian="normal" style:font-weight-complex="normal"/>
    </style:style>
    <style:style style:name="T54" style:family="text">
      <style:text-properties fo:font-weight="normal" officeooo:rsid="0030bfb7" style:font-weight-asian="normal" style:font-weight-complex="normal"/>
    </style:style>
    <style:style style:name="T55" style:family="text">
      <style:text-properties fo:font-weight="normal" officeooo:rsid="0029e37e" style:font-weight-asian="normal" style:font-weight-complex="normal"/>
    </style:style>
    <style:style style:name="T56" style:family="text">
      <style:text-properties fo:font-weight="normal" officeooo:rsid="002bb611" style:font-weight-asian="normal" style:font-weight-complex="normal"/>
    </style:style>
    <style:style style:name="T57" style:family="text">
      <style:text-properties fo:font-weight="normal" officeooo:rsid="00dd9e6e" style:font-weight-asian="normal" style:font-weight-complex="normal"/>
    </style:style>
    <style:style style:name="T58" style:family="text">
      <style:text-properties fo:font-weight="normal" officeooo:rsid="0017c97a" style:font-weight-asian="normal" style:font-weight-complex="normal"/>
    </style:style>
    <style:style style:name="T59" style:family="text">
      <style:text-properties fo:font-size="11pt" fo:font-weight="bold" style:font-size-asian="11pt" style:font-weight-asian="bold" style:font-size-complex="11pt" style:font-weight-complex="bold"/>
    </style:style>
    <style:style style:name="T60" style:family="text">
      <style:text-properties fo:font-size="11pt" fo:font-weight="bold" officeooo:rsid="0020b17c" style:font-size-asian="11pt" style:font-weight-asian="bold" style:font-size-complex="11pt" style:font-weight-complex="bold"/>
    </style:style>
    <style:style style:name="T61" style:family="text">
      <style:text-properties officeooo:rsid="00cdc78f"/>
    </style:style>
    <style:style style:name="T62" style:family="text">
      <style:text-properties officeooo:rsid="003afd6a"/>
    </style:style>
    <style:style style:name="T63" style:family="text">
      <style:text-properties officeooo:rsid="00ccda81"/>
    </style:style>
    <style:style style:name="T64" style:family="text">
      <style:text-properties officeooo:rsid="00d2142f"/>
    </style:style>
    <style:style style:name="T65" style:family="text">
      <style:text-properties officeooo:rsid="01274ef5" style:font-size-asian="12pt"/>
    </style:style>
    <style:style style:name="T66" style:family="text">
      <style:text-properties officeooo:rsid="012e50a3"/>
    </style:style>
    <style:style style:name="T67" style:family="text">
      <style:text-properties officeooo:rsid="02288e9b"/>
    </style:style>
    <style:style style:name="T68" style:family="text">
      <style:text-properties officeooo:rsid="0128a155"/>
    </style:style>
    <style:style style:name="T69" style:family="text">
      <style:text-properties officeooo:rsid="0027935f"/>
    </style:style>
    <style:style style:name="T70" style:family="text">
      <style:text-properties officeooo:rsid="0020b17c"/>
    </style:style>
    <style:style style:name="T71" style:family="text">
      <style:text-properties officeooo:rsid="00d223de"/>
    </style:style>
    <style:style style:name="T72" style:family="text">
      <style:text-properties officeooo:rsid="022a836c"/>
    </style:style>
    <style:style style:name="T73" style:family="text">
      <style:text-properties officeooo:rsid="001f97de"/>
    </style:style>
    <style:style style:name="T74" style:family="text">
      <style:text-properties officeooo:rsid="0036f345"/>
    </style:style>
    <style:style style:name="T75" style:family="text">
      <style:text-properties officeooo:rsid="00124bba"/>
    </style:style>
    <style:style style:name="T76" style:family="text">
      <style:text-properties officeooo:rsid="00294116"/>
    </style:style>
    <style:style style:name="T77" style:family="text">
      <style:text-properties officeooo:rsid="00d36474"/>
    </style:style>
    <style:style style:name="T78" style:family="text">
      <style:text-properties officeooo:rsid="00139a99"/>
    </style:style>
    <style:style style:name="T79" style:family="text">
      <style:text-properties officeooo:rsid="0029e37e"/>
    </style:style>
    <style:style style:name="T80" style:family="text">
      <style:text-properties officeooo:rsid="00d44442"/>
    </style:style>
    <style:style style:name="T81" style:family="text">
      <style:text-properties officeooo:rsid="00145787"/>
    </style:style>
    <style:style style:name="T82" style:family="text">
      <style:text-properties officeooo:rsid="00d4fbd8"/>
    </style:style>
    <style:style style:name="T83" style:family="text">
      <style:text-properties officeooo:rsid="0040f61e"/>
    </style:style>
    <style:style style:name="T84" style:family="text">
      <style:text-properties officeooo:rsid="0015111c"/>
    </style:style>
    <style:style style:name="T85" style:family="text">
      <style:text-properties officeooo:rsid="002ee1f1"/>
    </style:style>
    <style:style style:name="T86" style:family="text">
      <style:text-properties officeooo:rsid="002bb611"/>
    </style:style>
    <style:style style:name="T87" style:family="text">
      <style:text-properties officeooo:rsid="00db80f1"/>
    </style:style>
    <style:style style:name="T88" style:family="text">
      <style:text-properties officeooo:rsid="00dc5b42"/>
    </style:style>
    <style:style style:name="T89" style:family="text">
      <style:text-properties officeooo:rsid="0013e158"/>
    </style:style>
    <style:style style:name="T90" style:family="text">
      <style:text-properties officeooo:rsid="00136491"/>
    </style:style>
    <style:style style:name="T91" style:family="text">
      <style:text-properties officeooo:rsid="0030b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3"><text:bookmark-start text:name="__RefHeading___Toc16377_3602757520"/>Seneca<text:bookmark-end text:name="__RefHeading___Toc16377_3602757520"/></text:h>
      <text:p text:style-name="P24">Seneca è sicuramente uno dei pensatori più importanti e conosciuti dell’epoca imperiale romana, sia per alcuni aspetti biografici che lo legano agli imperatori dell’epoca, sia per il suo carattere di moralista, di critico intransigente dei vizi della società romana e promotore di nuovi valori.</text:p>
      <text:p text:style-name="P25">Lucio Annaeo Seneca (<text:span text:style-name="T86">4</text:span> a.C. circa - 65 d.C.) nacque a Cordova (Spagna) e studiò retorica e filosofia a Roma dove ebbe una carriera politica di grande successo <text:span text:style-name="T86">ma anche </text:span>piuttosto drammatica.</text:p>
      <text:p text:style-name="P22"><text:span text:style-name="T90">Nel 41 d.C. l’imperatore </text:span><text:span text:style-name="T87">Tiberio </text:span><text:span text:style-name="T90">Claudio, seguendo i consigli della moglie Valeria Messalina, lo accusò di adulterio, condannandolo </text:span><text:span text:style-name="T86">all’esilio</text:span><text:span text:style-name="T90"> in Corsica. Questo, fino al richiamo da parte di Agrippina </text:span><text:span text:style-name="T87">Minore</text:span><text:span text:style-name="T90">, che lo volle fermamente, per motivi politici, oltre che educativi, come tutore di suo figlio Nerone.</text:span></text:p>
      <text:p text:style-name="P22">Quando Seneca fu richiamato a Roma, aveva più di cinquant'anni e probabilmente non intendeva riprendere la carriera politica. Tuttavia, si ritrovò per contingenze esterne a ritornare al palazzo imperiale, e diventare consigliere di Nerone dopo la sua ascesa al trono nel 54. Seneca concepisce allora, l’ambizioso disegno di guidare il giovane allievo verso un esercizio illuminato del potere, suggerendo a Nerone una politica di rispetto per le <text:soft-page-break/>prerogative dell’aristocrazia. Tuttavia, è un periodo difficile per il filosofo, non solo per l’impegno che questa politica gli richiede, ma soprattutto per i molti compromessi che deve accettare: da un lato il carattere di Nerone, insofferente della sua tutela, e dall’altro le trame di Agrippina, che avrebbe voluto controllare il figlio attraverso Seneca e <text:span text:style-name="T87">Sesto Afranio </text:span>Burro, per gestire in questo modo il suo potere.</text:p>
      <text:p text:style-name="P22">Il dispotico imperatore infatti, comincia presto a rendersi protagonista di azioni terribili: fa uccidere il figlio di Claudio, Britannico, nel 55 d.C. e, pochi anni dopo, nel 59, la stessa madre Agrippina, in seguito a forti contrasti. Seneca peraltro rimane al fianco dell’imperatore fino al 62 d.C. quando, dopo la morte di Burro (forse avvelenato), si accentuano sempre più i contrasti sia con lo stile di vita di Nerone e di Tigellino, nuovo prefetto del pretorio, sia con una politica sempre più autoritaria.</text:p>
      <text:p text:style-name="P22">A questo punto Seneca intuisce la pericolosità della situazione e comincia a frequentare sempre meno il palazzo imperiale, soprattutto dopo l’incendio di Roma nel 64 d.C. Inoltre chiede all’imperatore di potersi ritirare dalla vita politica e, nonostante il suo rifiuto, si allontana progressivamente nelle sue ville di campagna, dedicandosi allo studio della filosofia.</text:p>
      <text:p text:style-name="P22">Proprio in questo periodo Seneca compone alcune delle sue opere maggiori: le “<text:span text:style-name="T1">Naturales quaestiones</text:span>”, il “<text:span text:style-name="T1">De </text:span><text:soft-page-break/><text:span text:style-name="T1">providentia</text:span>”, le “<text:span text:style-name="T1">Lettere morali a Lucilio</text:span>” composte <text:span text:style-name="T88">e </text:span>dedicate all'amico e discepolo Lucilio magistrato di ordine equestre e procuratore in Sicilia nel 63-64 d.C.</text:p>
      <text:p text:style-name="P22"><text:span text:style-name="T89">L’atteggiamento di progressivo distacco dalle scelte politiche di Nerone, porta Seneca ad essere guardato con sospetto e ad essere visto da molti come un oppositore del regime. Dunque, quando nel 65 d.C. è sventata una congiura senatoria ai danni di Nerone, guidata da Caio Calpurnio Pisone (detta appunto “congiura dei Pisoni”), Seneca non riesce a sfuggire al sospetto di avervi preso parte e viene condannato a morte da Nerone. Seneca fu</text:span> accusato di complicità nella cospirazione pisoniana per assassinare Nerone e costretto a suicidarsi nel 65. Seneca era noto per le sue critiche alla società romana <text:span text:style-name="T90">ed erano spesso </text:span>rivolte alla corruzione e all'immoralità che vedeva <text:span text:style-name="T90">sovrane </text:span>nella società <text:span text:style-name="T90">romana. Seneca ebbe ampie occasioni di riflettere sulle emozioni violente, sui pericoli dell’ambizione e sui modi in cui la vita della politica, differis</text:span><text:span text:style-name="T88">s</text:span><text:span text:style-name="T90">e da quella della filosofia. Gli argomenti di queste riflessioni, sono</text:span> espresse nelle sue opere filosofiche e letterarie. <text:span text:style-name="T89">Nel</text:span> celebre trattato filosofico “<text:span text:style-name="T1">De brevitate vitae</text:span>”, compreso nel decimo libro dei Dialoghi, composto da Seneca nel 50 d.C., sottolinea come la vita umana sia breve e fugace, paragonandola a un fiume in rapido scorrimento. La maggior parte delle persone, però, non si rende conto di questa preziosità e spreca il tempo in attività futili o in occupazioni che non portano a <text:soft-page-break/>una vera crescita interiore. L'unica vera realtà che l'uomo possiede è il momento presente. Il passato è già trascorso e il futuro è incerto, quindi è fondamentale concentrarsi sul presente e viverlo appieno.</text:p>
      <text:p text:style-name="P22">Seneca invita a non rimandare a domani ciò che <text:span text:style-name="T88">si può </text:span>fare oggi, perché il tempo a nostra disposizione è limitato. La consapevolezza della brevità della vita dovrebbe portare l'uomo ad affrontare la morte con serenità. Seneca non la considera come una fine, ma come un passaggio naturale ad un'altra esistenza. La filosofia può aiutare l'uomo a vivere serenamente e ad accettare la morte come parte naturale della vita. La <text:s/>morte di Seneca è narrata da Tacito, il quale la descrive prendendo spunto dalla morte di Socrate nel Fedone e nel Critone di Platone, con toni molto simili; Seneca si rivolge agli allievi e alla moglie Pompea Paolina, che vorrebbe suicidarsi con lui, ma nonostante il filosofo la spinge a non farlo, lei insiste.</text:p>
      <text:p text:style-name="P21">Tacito descrive così gli ultimi istanti di vita del filosofo:</text:p>
      <text:p text:style-name="P22">«<text:span text:style-name="T1">Seneca intanto, poiché l’attesa si prolungava e la morte era lenta a venire, pregò Stazio Anneo, della cui lunga amicizia e della cui arte medica aveva fatto esperimento, di versargli il veleno preparato da tempo, quello stesso con cui si estinguevano in Atene i condannati per sentenza popolare. Gli fu recato, ma lo bevve inutilmente; ché aveva gli arti già freddi e precluso il corpo all’azione del veleno. Da ultimo, si </text:span><text:soft-page-break/><text:span text:style-name="T1">fece mettere in una vasca d’acqua calda, e spruzzandone i servi più vicini disse ancora ch’egli offriva quella libagione a Giove liberatore. Messo infine in un bagno a vapore, fu soffocato dal caldo, e venne cremato senza alcuna cerimonia funebre. Così aveva disposto per testamento quando, ancora ricchissimo e al colmo della potenza, pur già pensava alla sua fine».</text:span></text:p>
      <text:p text:style-name="P22">Gli scritti filosofici di Seneca sono <text:span text:style-name="T91">concepiti come indagine su stesso, ma spesso </text:span>interpretati <text:span text:style-name="T89">come </text:span>sua biografia. <text:span text:style-name="T91">C</text:span>ome potrebbero le sue discussioni sui poteri curativi della filosofia non riflettere la sua stessa vita? Tuttavia, per quanto personale sia spesso lo stile di Seneca, i suoi scritti non sono autobiografici. Seneca si crea un personaggio letterario, <text:span text:style-name="T91">d</text:span>iscute le domande che lo occupano in un modo <text:span text:style-name="T91">da</text:span> invita<text:span text:style-name="T91">re</text:span> i suoi lettori a pensare alle questioni della loro vita, piuttosto che alla vita di Seneca.</text:p>
      <text:p text:style-name="P22"><text:span text:style-name="T52">Conosciamo molto del pensiero di Seneca </text:span><text:span text:style-name="T53">tramite </text:span><text:span text:style-name="T52">le lettere che scrisse ai suoi amici dando loro consigli nei momenti difficili. </text:span></text:p>
      <text:p text:style-name="P23"><text:span text:style-name="T52">“</text:span><text:span text:style-name="T8">Epistulae morales ad Lucilium</text:span><text:span text:style-name="T52">” </text:span><text:span text:style-name="T53">e “</text:span><text:span text:style-name="T10">I Dialoghi</text:span><text:span text:style-name="T53">” rappresentano le opera più ricche di vita interiore del filosofo. Nei Dialoghi primeggia la lettera consolatoria a Marcia, dove sono già presenti temi caratteristici, come quello della labilità delle cose e della precarietà della vita. </text:span></text:p>
      <text:p text:style-name="P26"><text:soft-page-break/>Le Epistole morali a Lucilio sono il capolavoro di Seneca, la sua opera più ricca di vita interiore. </text:p>
      <text:p text:style-name="P22"><text:span text:style-name="T52">Seneca aveva un amico </text:span><text:span text:style-name="T53">di nome</text:span><text:span text:style-name="T52"> Lucilio, un funzionario pubblico che lavorava in Sicilia. Un giorno Lucilio venne a conoscenza di una causa contro di lui che minacciava di porre fine alla sua carriera e disonorare il suo buon nome. Scrisse a Seneca in preda al panico. </text:span><text:span text:style-name="T8">“Potresti aspettarti che ti consiglierò di immaginare un risultato felice e di riposare nelle lusinghe della speranza.”</text:span><text:span text:style-name="T52"> </text:span><text:span text:style-name="T54">r</text:span><text:span text:style-name="T52">ispose il filosofo. </text:span><text:span text:style-name="T8">“Ma ti condurrò alla pace della mente attraverso un’altra radice che culmina nel consiglio se desideri rimandare ogni preoccupazione, presumendo che ciò che temi possa accadere, accadrà sicuramente.”</text:span></text:p>
      <text:p text:style-name="P22"><text:span text:style-name="T52">Questa è un’idea stoica essenziale. Noi dobbiamo sempre cercare di immaginare il peggio che potrebbe accadere e poi ricordare a noi stessi che al peggio si può sopravvivere. L’obiettivo non è immaginare che le cose brutte non accadono, ma </text:span><text:span text:style-name="T55">di avere la consapevolezza di essere</text:span><text:span text:style-name="T52"> capaci di sopportarle </text:span><text:span text:style-name="T55">più</text:span><text:span text:style-name="T52"> di quanto pensiamo. </text:span></text:p>
      <text:p text:style-name="P22"><text:span text:style-name="T52">Per calmare Lucilio, Seneca gli consigliò di sentirsi familiare con l’idea di umiliazione, miseria e disoccupazione attesa, </text:span><text:span text:style-name="T55">p</text:span><text:span text:style-name="T52">er imparare a vedere queste sofferenze, dalla giusta prospettiva, che non è la fine di tutto. </text:span></text:p>
      <text:p text:style-name="P22"><text:span text:style-name="T52">“</text:span><text:span text:style-name="T8">Se perdi questa causa, potrebbe accaderti qualcosa di più grave oltre l’esilio e la prigione”</text:span><text:span text:style-name="T52">? Il filosofo </text:span><text:span text:style-name="T56">continuò </text:span><text:soft-page-break/><text:span text:style-name="T56">dicendogli</text:span><text:span text:style-name="T52">: che lui stesso era sopravvissuto alla bancarotta e a otto anni di esilio in Corsica.</text:span></text:p>
      <text:p text:style-name="P22"><text:span text:style-name="T52">“</text:span><text:span text:style-name="T8">Sperare in ciò che è perfettamente giusto e prepararti per ciò che è assolutamente ingiusto”. </text:span><text:span text:style-name="T52">Seneca </text:span><text:span text:style-name="T55">chiese</text:span><text:span text:style-name="T52"> a Lucilio </text:span><text:span text:style-name="T55">di fare </text:span><text:span text:style-name="T52">una meditazione: </text:span><text:span text:style-name="T45">di pensare a </text:span><text:span text:style-name="T46">se stesso </text:span><text:span text:style-name="T45">costantemente nel lusso della sua casa, che ora rischiava di perdere. </text:span><text:span text:style-name="T8">“Potrei diventare povero; allora sarò uno tra i tanti. Potrei esser esiliato; allora mi considererò nato nel luogo in cui sarò mandato. Potrei essere incatenato; cosa importa; ora sono libero dalle catene</text:span><text:span text:style-name="T52">?</text:span><text:span text:style-name="T8"> Ecco il corpo, il peso che la natura mi ha imposto.”</text:span></text:p>
      <text:p text:style-name="P22"><text:span text:style-name="T52">Seneca ci dice che dobbiamo appropriarci e riflettere in ogni momento, non solo </text:span><text:span text:style-name="T57">de</text:span><text:span text:style-name="T52">gli eventi che ci piace pianificare o quelli dei ricordi o quelli comuni alla nostra epoca e classe, ma tutta </text:span><text:span text:style-name="T55">una serie </text:span><text:span text:style-name="T52">d</text:span><text:span text:style-name="T55">i</text:span><text:span text:style-name="T52"> contingenze, un elenco ampio e inevitabilmente molto meno accettabile </text:span><text:span text:style-name="T55">come, </text:span><text:span text:style-name="T52">incendi, catastrofi, abomini e morti premature. </text:span></text:p>
      <text:p text:style-name="P22"><text:span text:style-name="T52">“</text:span><text:span text:style-name="T8">Nulla ci deve sorprendere. Pensiamo globalmente la natura del destino umano. Non solo i guai che accadono spesso ma anche le sofferenze più terribili che potrebbero capitare. Dobbiamo riflettere pienamente sul nostro destino</text:span><text:span text:style-name="T52">”.</text:span></text:p>
      <text:p text:style-name="P22"><text:span text:style-name="T53">Nella “</text:span><text:span text:style-name="T8">Consolatio ad Marciam</text:span><text:span text:style-name="T52">” </text:span><text:span text:style-name="T53">Seneca scrive a Marcia per consolarla della perdita del figlio.</text:span><text:span text:style-name="T52"> </text:span><text:span text:style-name="T53">I</text:span><text:span text:style-name="T52"> suoi ragionamenti consolatori </text:span><text:span text:style-name="T53">mettono in evidenza la labilità delle cose e la precarietà della vita. </text:span><text:span text:style-name="T52">Marcia, dama di famiglia senatoria </text:span><text:span text:style-name="T54">e figlia dello storico Cremuzio Cordo, </text:span><text:span text:style-name="T52">fu devastata dalla </text:span><text:soft-page-break/><text:span text:style-name="T52">morte del figlio Metilio, che non aveva ancora compiuto 25 anni. Era in un periodo di lutto che sembrava non avere fine. A tre anni dalla morte, il suo dolore non si era minimamente placato. In effetti, </text:span><text:span text:style-name="T54">diventava </text:span><text:span text:style-name="T52">più forte giorno dopo giorno. Quindi Seneca le inviò un saggio in cui sperava che, visto il tempo trascorso dalla morte di Metilio, lo avrebbe perdonato per non essersi attenuto alle condoglianze </text:span><text:span text:style-name="T57">usuali</text:span><text:span text:style-name="T52">, per offrire qualcosa di più oscuro ma forse più efficace:</text:span></text:p>
      <text:p text:style-name="P22"><text:span text:style-name="T52">“</text:span><text:span text:style-name="T8">Perdere tuo figlio è stato sicuramente il dolore più grande che potesse colpire una madre.”</text:span></text:p>
      <text:p text:style-name="P22"><text:span text:style-name="T45">M</text:span><text:span text:style-name="T47">a</text:span><text:span text:style-name="T45"> data la vulnerabilità dell</text:span><text:span text:style-name="T47">a struttura</text:span><text:span text:style-name="T45"> uman</text:span><text:span text:style-name="T47">a</text:span><text:span text:style-name="T45">, </text:span><text:span text:style-name="T47">la morte prematura di Metilio trovò il suo posto in un ordine naturale spietato che offriva quotidianamente esempi della sua opera abile</text:span><text:span text:style-name="T9">.</text:span><text:span text:style-name="T58"> <text:s/>Ha scritto:</text:span></text:p>
      <text:p text:style-name="P22"><text:span text:style-name="T58">“</text:span><text:span text:style-name="T9">Non anticipiamo mai i mali prima che effettivamente arrivino. Tanti funerali sono passati davanti alle nostre porte, eppure non ci soffermiamo mai sulla morte. Molte morti sono premature, eppure facciamo progetti per i nostri bambini. Come hanno indossato bene la toga, hanno prestato servizio nell’esercito e sono succeduti alla proprietà del padre. Potrebbero finire per fare cose del genere, ma che follia amarli senza ricordare che nessuno ci aveva offerto la garanzia che sarebbero cresciuti fino alla maturità e tanto meno che sarebbero arrivati all’ora di cena.</text:span><text:span text:style-name="T58">” Se la morte di </text:span><text:soft-page-break/><text:span text:style-name="T58">Metilio era stata inaspettata per Marcia, era solo sulla base di una illusoria valutazione delle probabilità.</text:span></text:p>
      <text:p text:style-name="P22"><text:span text:style-name="T57">Tu d</text:span><text:span text:style-name="T58">ici: non pensavo che sarebbe successo, pensi che ci sia qualcosa che non accadrà quando sai che è possibile che accada. Quando vedi che è già successo a molti.</text:span></text:p>
      <text:p text:style-name="P22"><text:span text:style-name="T58">Seneca immagina di incontrare Marcia prima della su</text:span><text:span text:style-name="T54">a</text:span><text:span text:style-name="T58"> nascita e di invitarla a fare un giro sulla terra travagliata in modo che potesse valutare i termini della vita e scegliere se accettarli o meno. Da un lato, Marcia vedrebbe un pianeta di straordinaria bellezza e occasionale bontà. Dall’altro, un luogo di orrore intermittente e indicibile. Marcia sceglierebbe di entrare in un mondo del genere? La sua esistenza suggerì la sua risposta.</text:span></text:p>
      <text:p text:style-name="P22"><text:span text:style-name="T58">E’ importante sottolineare che Seneca aggiunse che se le cose fossero veramente insopportabili, non </text:span><text:span text:style-name="T56">avremmo </text:span><text:span text:style-name="T58">l’obbligo di continuare per sempre.</text:span></text:p>
      <text:p text:style-name="P27"><text:span text:style-name="T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 fo:font-family="'Noto Serif'" style:font-style-name="Normale" style:font-family-generic="roman" style:font-pitch="variable" fo:font-size="13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7T16:53:27.808056207</meta:creation-date>
    <dc:date>2026-01-27T18:14:19.388445298</dc:date>
    <dc:creator>corrado tafaro</dc:creator>
    <meta:editing-duration>PT15M1S</meta:editing-duration>
    <meta:editing-cycles>3</meta:editing-cycles>
    <meta:generator>LibreOffice/24.2.7.2$Linux_X86_64 LibreOffice_project/420$Build-2</meta:generator>
    <meta:document-statistic meta:table-count="0" meta:image-count="0" meta:object-count="0" meta:page-count="9" meta:paragraph-count="30" meta:word-count="1881" meta:character-count="11899" meta:non-whitespace-character-count="10040"/>
  </office:meta>
</office:document-meta>
</file>