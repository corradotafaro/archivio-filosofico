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Noto Sans1" fo:font-size="12pt" style:font-size-asian="12pt" style:font-size-complex="12pt"/>
    </style:style>
    <style:style style:name="P2" style:family="paragraph" style:parent-style-name="Text_20_body">
      <style:paragraph-properties fo:margin-top="0.101cm" fo:margin-bottom="0cm" style:contextual-spacing="false" fo:text-align="justify" style:justify-single-word="false"/>
      <style:text-properties style:font-name="Noto Sans1" fo:font-size="12pt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1c02ae" officeooo:paragraph-rsid="000d5cfd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Noto Sans1" fo:font-size="12pt" officeooo:rsid="00145787" officeooo:paragraph-rsid="000d5cfd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04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45787" officeooo:paragraph-rsid="000d5cfd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45787" officeooo:paragraph-rsid="000d5cfd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145787" officeooo:paragraph-rsid="000d5cfd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45787" officeooo:paragraph-rsid="000d5cfd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Noto Sans1" fo:font-size="12pt" officeooo:rsid="00139a99" officeooo:paragraph-rsid="000d5cfd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04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39a99" officeooo:paragraph-rsid="000d5cfd" style:font-size-asian="12pt" style:font-size-complex="12pt"/>
    </style:style>
    <style:style style:name="P11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weight="normal" officeooo:rsid="001c02ae" officeooo:paragraph-rsid="000d5cf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weight="normal" officeooo:rsid="001c02ae" officeooo:paragraph-rsid="000d5cfd" style:font-size-asian="10.5pt" style:font-weight-asian="normal" style:font-size-complex="12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weight="normal" officeooo:rsid="001c02ae" officeooo:paragraph-rsid="000d5cfd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weight="normal" officeooo:rsid="001c02ae" officeooo:paragraph-rsid="000d5cfd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weight="normal" officeooo:rsid="0020b17c" officeooo:paragraph-rsid="000d5cfd" style:font-size-asian="10.5pt" style:font-weight-asian="normal" style:font-size-complex="12pt" style:font-weight-complex="normal"/>
    </style:style>
    <style:style style:name="P16" style:family="paragraph" style:parent-style-name="Footnote">
      <style:paragraph-properties fo:text-align="justify" style:justify-single-word="false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139a99" officeooo:paragraph-rsid="000d5cfd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rsid="00139a99" officeooo:paragraph-rsid="000d5cfd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fo:font-size="12pt" officeooo:rsid="00139a99" officeooo:paragraph-rsid="000d5cfd" style:font-size-asian="12pt" style:font-size-complex="12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0f6323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0f6323" style:font-size-asian="12pt" style:font-size-complex="12pt"/>
    </style:style>
    <style:style style:name="P2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f6323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Noto Sans1" fo:font-size="12pt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36491" officeooo:paragraph-rsid="000f6323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36491" officeooo:paragraph-rsid="000f6323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Noto Sans1" fo:font-size="12pt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weight="normal" officeooo:rsid="001617bc" officeooo:paragraph-rsid="000f632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Sans1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9a99" style:font-style-asian="italic" style:font-style-complex="italic"/>
    </style:style>
    <style:style style:name="T3" style:family="text">
      <style:text-properties fo:font-style="italic" officeooo:rsid="0036f345" style:font-style-asian="italic" style:font-style-complex="italic"/>
    </style:style>
    <style:style style:name="T4" style:family="text">
      <style:text-properties fo:font-style="italic" officeooo:rsid="00145787" style:font-style-asian="italic" style:font-style-complex="italic"/>
    </style:style>
    <style:style style:name="T5" style:family="text">
      <style:text-properties fo:font-style="italic" officeooo:rsid="01be6cbb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c02a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617b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7c97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ee1f1" style:font-style-asian="italic" style:font-weight-asian="normal" style:font-style-complex="italic" style:font-weight-complex="normal"/>
    </style:style>
    <style:style style:name="T11" style:family="text">
      <style:text-properties fo:font-size="12pt" fo:font-style="italic" fo:font-weight="normal" officeooo:rsid="001617bc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2ee1f1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normal" fo:font-weight="normal" officeooo:rsid="01d0615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c02a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36491" style:font-size-asian="12pt" style:font-size-complex="12pt"/>
    </style:style>
    <style:style style:name="T18" style:family="text">
      <style:text-properties fo:font-size="12pt" officeooo:rsid="00db80f1" style:font-size-asian="12pt" style:font-size-complex="12pt"/>
    </style:style>
    <style:style style:name="T19" style:family="text">
      <style:text-properties fo:font-size="12pt" officeooo:rsid="002bb611" style:font-size-asian="12pt" style:font-size-complex="12pt"/>
    </style:style>
    <style:style style:name="T20" style:family="text">
      <style:text-properties fo:font-size="12pt" officeooo:rsid="00dc5b42" style:font-size-asian="12pt" style:font-size-complex="12pt"/>
    </style:style>
    <style:style style:name="T21" style:family="text">
      <style:text-properties fo:font-size="12pt" officeooo:rsid="0013e158" style:font-size-asian="12pt" style:font-size-complex="12pt"/>
    </style:style>
    <style:style style:name="T22" style:family="text">
      <style:text-properties fo:font-size="12pt" officeooo:rsid="0030bfb7" style:font-size-asian="12pt" style:font-size-complex="12pt"/>
    </style:style>
    <style:style style:name="T23" style:family="text">
      <style:text-properties fo:font-size="12pt" fo:font-weight="normal" officeooo:rsid="001617b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ee1f1" style:font-size-asian="12pt" style:font-weight-asian="normal" style:font-size-complex="12pt" style:font-weight-complex="normal"/>
    </style:style>
    <style:style style:name="T25" style:family="text">
      <style:text-properties style:font-name="Noto Sans1"/>
    </style:style>
    <style:style style:name="T26" style:family="text">
      <style:text-properties style:font-name="Noto Sans1" fo:font-size="12pt" fo:font-style="normal" fo:font-weight="normal" officeooo:rsid="01d0615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Noto Sans1" fo:font-size="12pt" fo:font-style="normal" fo:font-weight="normal" officeooo:rsid="001c02a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Noto Sans1" officeooo:rsid="00d44442"/>
    </style:style>
    <style:style style:name="T29" style:family="text">
      <style:text-properties style:font-name="Noto Sans1" officeooo:rsid="022a9003"/>
    </style:style>
    <style:style style:name="T30" style:family="text">
      <style:text-properties style:font-name="Noto Sans1" officeooo:rsid="0029e37e"/>
    </style:style>
    <style:style style:name="T31" style:family="text">
      <style:text-properties style:font-name="Noto Sans1" fo:font-style="italic" style:text-underline-style="none" officeooo:rsid="0029e37e" style:font-style-asian="italic" style:font-style-complex="italic"/>
    </style:style>
    <style:style style:name="T32" style:family="text">
      <style:text-properties style:font-name="Noto Sans1" fo:font-style="italic" style:font-style-asian="italic" style:font-style-complex="italic"/>
    </style:style>
    <style:style style:name="T33" style:family="text">
      <style:text-properties style:font-name="Noto Sans1" fo:font-style="italic" officeooo:rsid="0029e37e" style:font-style-asian="italic" style:font-style-complex="italic"/>
    </style:style>
    <style:style style:name="T34" style:family="text">
      <style:text-properties style:font-name="Noto Sans1" fo:font-style="italic" fo:font-weight="normal" officeooo:rsid="00d44442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7935f" style:font-style-asian="normal" style:font-style-complex="normal"/>
    </style:style>
    <style:style style:name="T37" style:family="text">
      <style:text-properties fo:font-style="normal" officeooo:rsid="00294116" style:font-style-asian="normal" style:font-style-complex="normal"/>
    </style:style>
    <style:style style:name="T38" style:family="text">
      <style:text-properties fo:font-style="normal" officeooo:rsid="0025f7dd" style:font-style-asian="normal" style:font-style-complex="normal"/>
    </style:style>
    <style:style style:name="T39" style:family="text">
      <style:text-properties fo:font-style="normal" style:font-size-asian="12pt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d4444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9411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c02ae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9e37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6f34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f61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e29ca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4578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617b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bb61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c97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d0615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officeooo:rsid="001c02ae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9e37e" style:font-style-asian="normal" style:font-weight-asian="bold" style:font-style-complex="normal" style:font-weight-complex="bold"/>
    </style:style>
    <style:style style:name="T55" style:family="text">
      <style:text-properties fo:font-weight="normal" officeooo:rsid="001c02ae" style:font-weight-asian="normal" style:font-weight-complex="normal"/>
    </style:style>
    <style:style style:name="T56" style:family="text">
      <style:text-properties fo:font-weight="normal" officeooo:rsid="028ba1d6" style:font-weight-asian="normal" style:font-weight-complex="normal"/>
    </style:style>
    <style:style style:name="T57" style:family="text">
      <style:text-properties fo:font-weight="normal" officeooo:rsid="001617bc" style:font-weight-asian="normal" style:font-weight-complex="normal"/>
    </style:style>
    <style:style style:name="T58" style:family="text">
      <style:text-properties fo:font-weight="normal" officeooo:rsid="002ee1f1" style:font-weight-asian="normal" style:font-weight-complex="normal"/>
    </style:style>
    <style:style style:name="T59" style:family="text">
      <style:text-properties fo:font-weight="normal" officeooo:rsid="0030bfb7" style:font-weight-asian="normal" style:font-weight-complex="normal"/>
    </style:style>
    <style:style style:name="T60" style:family="text">
      <style:text-properties fo:font-weight="normal" officeooo:rsid="0029e37e" style:font-weight-asian="normal" style:font-weight-complex="normal"/>
    </style:style>
    <style:style style:name="T61" style:family="text">
      <style:text-properties fo:font-weight="normal" officeooo:rsid="002bb611" style:font-weight-asian="normal" style:font-weight-complex="normal"/>
    </style:style>
    <style:style style:name="T62" style:family="text">
      <style:text-properties fo:font-weight="normal" officeooo:rsid="00dd9e6e" style:font-weight-asian="normal" style:font-weight-complex="normal"/>
    </style:style>
    <style:style style:name="T63" style:family="text">
      <style:text-properties fo:font-weight="normal" officeooo:rsid="0017c97a" style:font-weight-asian="normal" style:font-weight-complex="normal"/>
    </style:style>
    <style:style style:name="T64" style:family="text">
      <style:text-properties fo:font-weight="normal" officeooo:rsid="01cf55d6" style:font-weight-asian="normal" style:font-weight-complex="normal"/>
    </style:style>
    <style:style style:name="T65" style:family="text">
      <style:text-properties fo:font-size="11pt" fo:font-weight="bold" style:font-size-asian="11pt" style:font-weight-asian="bold" style:font-size-complex="11pt" style:font-weight-complex="bold"/>
    </style:style>
    <style:style style:name="T66" style:family="text">
      <style:text-properties fo:font-size="11pt" fo:font-weight="bold" officeooo:rsid="0020b17c" style:font-size-asian="11pt" style:font-weight-asian="bold" style:font-size-complex="11pt" style:font-weight-complex="bold"/>
    </style:style>
    <style:style style:name="T67" style:family="text">
      <style:text-properties officeooo:rsid="00cdc78f"/>
    </style:style>
    <style:style style:name="T68" style:family="text">
      <style:text-properties officeooo:rsid="003afd6a"/>
    </style:style>
    <style:style style:name="T69" style:family="text">
      <style:text-properties officeooo:rsid="00ccda81"/>
    </style:style>
    <style:style style:name="T70" style:family="text">
      <style:text-properties officeooo:rsid="00d2142f"/>
    </style:style>
    <style:style style:name="T71" style:family="text">
      <style:text-properties officeooo:rsid="01274ef5" style:font-size-asian="12pt"/>
    </style:style>
    <style:style style:name="T72" style:family="text">
      <style:text-properties officeooo:rsid="012e50a3"/>
    </style:style>
    <style:style style:name="T73" style:family="text">
      <style:text-properties officeooo:rsid="02288e9b"/>
    </style:style>
    <style:style style:name="T74" style:family="text">
      <style:text-properties officeooo:rsid="0128a155"/>
    </style:style>
    <style:style style:name="T75" style:family="text">
      <style:text-properties officeooo:rsid="0027935f"/>
    </style:style>
    <style:style style:name="T76" style:family="text">
      <style:text-properties officeooo:rsid="0020b17c"/>
    </style:style>
    <style:style style:name="T77" style:family="text">
      <style:text-properties officeooo:rsid="00d223de"/>
    </style:style>
    <style:style style:name="T78" style:family="text">
      <style:text-properties officeooo:rsid="022a836c"/>
    </style:style>
    <style:style style:name="T79" style:family="text">
      <style:text-properties officeooo:rsid="001f97de"/>
    </style:style>
    <style:style style:name="T80" style:family="text">
      <style:text-properties officeooo:rsid="0036f345"/>
    </style:style>
    <style:style style:name="T81" style:family="text">
      <style:text-properties officeooo:rsid="00124bba"/>
    </style:style>
    <style:style style:name="T82" style:family="text">
      <style:text-properties officeooo:rsid="00294116"/>
    </style:style>
    <style:style style:name="T83" style:family="text">
      <style:text-properties officeooo:rsid="00d36474"/>
    </style:style>
    <style:style style:name="T84" style:family="text">
      <style:text-properties officeooo:rsid="00139a99"/>
    </style:style>
    <style:style style:name="T85" style:family="text">
      <style:text-properties officeooo:rsid="0029e37e"/>
    </style:style>
    <style:style style:name="T86" style:family="text">
      <style:text-properties officeooo:rsid="00d44442"/>
    </style:style>
    <style:style style:name="T87" style:family="text">
      <style:text-properties officeooo:rsid="00145787"/>
    </style:style>
    <style:style style:name="T88" style:family="text">
      <style:text-properties officeooo:rsid="00d4fbd8"/>
    </style:style>
    <style:style style:name="T89" style:family="text">
      <style:text-properties officeooo:rsid="0040f61e"/>
    </style:style>
    <style:style style:name="T90" style:family="text">
      <style:text-properties officeooo:rsid="0015111c"/>
    </style:style>
    <style:style style:name="T91" style:family="text">
      <style:text-properties officeooo:rsid="002ee1f1"/>
    </style:style>
    <style:style style:name="T92" style:family="text">
      <style:text-properties officeooo:rsid="002bb611"/>
    </style:style>
    <style:style style:name="T93" style:family="text">
      <style:text-properties officeooo:rsid="00db80f1"/>
    </style:style>
    <style:style style:name="T94" style:family="text">
      <style:text-properties officeooo:rsid="00dc5b42"/>
    </style:style>
    <style:style style:name="T95" style:family="text">
      <style:text-properties officeooo:rsid="0013e158"/>
    </style:style>
    <style:style style:name="T96" style:family="text">
      <style:text-properties officeooo:rsid="00136491"/>
    </style:style>
    <style:style style:name="T97" style:family="text">
      <style:text-properties officeooo:rsid="0030bfb7"/>
    </style:style>
    <style:style style:name="T98" style:family="text">
      <style:text-properties officeooo:rsid="0059bde2"/>
    </style:style>
    <style:style style:name="T99" style:family="text">
      <style:text-properties officeooo:rsid="0019b8cc"/>
    </style:style>
    <style:style style:name="T100" style:family="text">
      <style:text-properties officeooo:rsid="01cf884b"/>
    </style:style>
    <style:style style:name="T101" style:family="text">
      <style:text-properties fo:language="it" fo:country="I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-start text:name="Copia __RefHeading___Toc16379_3602757520 1"/>Le Epistulae morales ad Lucilium<text:bookmark-end text:name="Copia __RefHeading___Toc16379_3602757520 1"/></text:p>
      <text:p text:style-name="P26"/>
      <text:p text:style-name="P23">"Lettere morali a Lucilio" sono una raccolta di 124 lettere suddivise in 20 libri, scritte da Lucio Anneo Seneca negli ultimi mesi di vita. L'opera venne messa a punto negli anni del disimpegno politico del filosofo, tra il 62 e il 65 d.C., ed è giunta ai posteri parzialmente incompleta.</text:p>
      <text:p text:style-name="P23">È davvero straordinario come le parole di Seneca, nonostante siano state scritte millenni fa, possano ancora trovare eco nella nostra epoca. La sua saggezza e profondità filosofica, toccano temi universali che trascendono il tempo e lo spazio come la ricerca della felicità, la gestione delle emozioni e l'importanza della virtù.</text:p>
      <text:p text:style-name="P23">La sua capacità di mettere in discussione le convenzioni e di esortare le persone a guardare dentro di sé per trovare la vera soddisfazione e serenità è qualcosa che continua a ispirare molti. Spesso ci dimentichiamo che i grandi pensatori del passato avevano già individuato le radici di molte delle nostre attuali preoccupazioni e sfide.</text:p>
      <text:p text:style-name="P23"><text:span text:style-name="T98">A</text:span><text:span text:style-name="T99">lcuni argomenti trattati nelle </text:span><text:span text:style-name="T1">Epistulae morales ad Lucilium</text:span> <text:span text:style-name="T98">sono state associate </text:span><text:span text:style-name="T99">a specifiche lettere, anche se le fonti ricordano che spesso un singolo tema viene trattato in diverse lettere e che una stessa lettera può toccare più argomenti. </text:span><text:span text:style-name="T64">Le</text:span><text:span text:style-name="T57"> Lettere a Lucilio e i trattati Sulla brevità della vita e Sulla tranquillità dell'animo, sono </text:span><text:soft-page-break/><text:span text:style-name="T57">un tesoro di riflessioni sulla condizione umana, il tempo, la virtù, la felicità e la morte.</text:span></text:p>
      <text:p text:style-name="P23">Seneca ci invita a riflettere sulla brevità della vita, spesso sprecata in attività inutili e superficiali. Il tempo è un bene prezioso che va utilizzato con saggezza, concentrandosi su ciò che è veramente importante: la ricerca della virtù, la coltivazione dell'amicizia, il distacco dai beni materiali.</text:p>
      <text:p text:style-name="P23">La virtù è il sommo bene, l'unico che può dare la felicità. Essa consiste nel dominio delle passioni, nell'accettazione del destino e nella capacità di vivere secondo ragione.</text:p>
      <text:p text:style-name="P23">Seneca ci esorta a non temere la morte, evento naturale e inevitabile. La vita è un dono che va vissuto appieno, senza rimpianti e con coraggio.</text:p>
      <text:p text:style-name="P23">Il filosofo, sottolinea l'importanza dell'amicizia, un legame sincero e disinteressato che arricchisce la nostra esistenza. L'amico è un alter ego, una persona di cui ci fidiamo e con cui possiamo condividere gioie e dolori.</text:p>
      <text:p text:style-name="P23">Seneca critica l'attaccamento ai beni materiali, che ci rendono schiavi e ci allontanano dalla vera felicità. La ricchezza non è un fine, ma un mezzo per vivere una vita dignitosa e indipendente.</text:p>
      <text:p text:style-name="P23">Il filosofo ci invita a ritirarci dalla vita pubblica per dedicarci alla contemplazione e alla riflessione. L'ozio è un momento prezioso per coltivare la nostra interiorità e trovare la pace interiore. <text:span text:style-name="T100">E’</text:span><text:span text:style-name="T101"> inteso come tempo dedicato </text:span><text:soft-page-break/><text:span text:style-name="T101">allo studio e alla contemplazione, è essenziale per la vita filosofica </text:span>. </text:p>
      <text:p text:style-name="P23">La filosofia è la guida per la vita, l'unico strumento che ci permette di comprendere il mondo e noi stessi. Essa ci insegna a vivere con saggezza, ad affrontare le difficoltà con coraggio e a trovare la felicità interiore.</text:p>
      <text:p text:style-name="P23">Le sue Lettere a Lucilio non sono solo trattati filosofici, ma vere e proprie conversazioni con un amico. Seneca condivide con Lucilio le sue riflessioni, i suoi dubbi, le sue esperienze, aprendo il suo cuore e la sua mente al lettore.</text:p>
      <text:p text:style-name="P23">Questo approccio rende i suoi scritti particolarmente coinvolgenti e attuali. Ci sentiamo interpellati direttamente dalle sue parole, come se fossimo anche noi destinatari di quei consigli e di quelle esortazioni.</text:p>
      <text:p text:style-name="P23">Seneca utilizza uno stile semplice e diretto, ricco di immagini vivide e di esempi concreti, che rendono i suoi concetti facilmente comprensibili. Non si perde in astrattezze, ma parte sempre dalla realtà concreta, dalla vita di tutti i giorni, per poi elevarsi a riflessioni più profonde.</text:p>
      <text:p text:style-name="P23">La sua scrittura è intrisa di umanità, di empatia verso le debolezze e le sofferenze umane. Seneca non si pone come un maestro distaccato, ma come un compagno di viaggio che condivide le nostre stesse difficoltà e incertezze.</text:p>
      <text:p text:style-name="P23"><text:soft-page-break/><text:span text:style-name="T52">S</text:span><text:span text:style-name="T43">embra che il tempo non sia passato, tanto sono vive e attuali le sue parole. Seneca ci parla con la stessa passione e intensità di un uomo dei nostri giorni, un uomo che ha saputo scrutare nel profondo dell'animo umano e che ha saputo trovare risposte ai grandi interrogativi della vit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>
        <style:tab-stops/>
      </style:paragraph-properties>
      <style:text-properties style:font-name="Noto Serif" fo:font-family="'Noto Serif'" style:font-style-name="Normale" style:font-family-generic="roman" style:font-pitch="variable" fo:font-size="13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erif" fo:font-family="'Noto Serif'" style:font-style-name="Normale" style:font-family-generic="roman" style:font-pitch="variable" fo:font-size="13pt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erif" fo:font-family="'Noto Serif'" style:font-style-name="Normale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7T16:53:27.808056207</meta:creation-date>
    <dc:date>2026-01-27T18:20:13.418711104</dc:date>
    <dc:creator>corrado tafaro</dc:creator>
    <meta:editing-duration>PT20M5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17" meta:word-count="689" meta:character-count="4243" meta:non-whitespace-character-count="3570"/>
  </office:meta>
</office:document-meta>
</file>