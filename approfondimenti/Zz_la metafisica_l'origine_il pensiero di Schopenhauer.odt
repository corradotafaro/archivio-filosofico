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7b5a" style:font-size-asian="12pt" style:font-size-complex="12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1" fo:font-size="12pt" fo:font-weight="bold" officeooo:rsid="02397a74" officeooo:paragraph-rsid="00137b5a"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15%"/>
      <style:text-properties style:font-name="Noto Sans1" fo:font-size="12pt" fo:font-weight="normal" officeooo:paragraph-rsid="00137b5a"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8"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officeooo:paragraph-rsid="00137b5a"/>
    </style:style>
    <style:style style:name="P10"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Noto Sans1" officeooo:paragraph-rsid="00137b5a"/>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7b5a"/>
    </style:style>
    <style:style style:name="P13" style:family="paragraph" style:parent-style-name="Footnote">
      <style:paragraph-properties fo:text-align="justify" style:justify-single-word="false"/>
    </style:style>
    <style:style style:name="P14" style:family="paragraph" style:parent-style-name="Quotations">
      <style:paragraph-properties fo:margin-top="0.3cm" fo:margin-bottom="0.199cm" style:contextual-spacing="false" fo:line-height="115%" fo:text-align="center" style:justify-single-word="false"/>
      <style:text-properties officeooo:paragraph-rsid="00137b5a"/>
    </style:style>
    <style:style style:name="P15" style:family="paragraph" style:parent-style-name="Footnote">
      <style:paragraph-properties fo:text-align="justify" style:justify-single-word="false"/>
      <style:text-properties style:font-name="Noto Sans1" officeooo:rsid="00a0b65a" officeooo:paragraph-rsid="00a0b65a"/>
    </style:style>
    <style:style style:name="P16" style:family="paragraph" style:parent-style-name="Footnote">
      <style:paragraph-properties fo:text-align="justify" style:justify-single-word="false"/>
      <style:text-properties style:font-name="Noto Sans1" fo:font-size="9pt" style:font-size-asian="9pt" style:font-size-complex="9pt"/>
    </style:style>
    <style:style style:name="P17" style:family="paragraph" style:parent-style-name="Heading_20_3">
      <style:text-properties style:font-name="Noto Sans1" fo:font-size="12pt" officeooo:paragraph-rsid="00137b5a" style:font-size-asian="12pt" style:font-size-complex="12pt"/>
    </style:style>
    <style:style style:name="P18" style:family="paragraph" style:parent-style-name="Standard">
      <style:paragraph-properties fo:line-height="115%" fo:text-align="justify" style:justify-single-word="false"/>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rsid="007b4dc3" officeooo:paragraph-rsid="001543ef"/>
    </style:style>
    <style:style style:name="P2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543ef" style:font-size-asian="12pt" style:font-size-complex="12pt"/>
    </style:style>
    <style:style style:name="P2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3ef" style:font-size-asian="12pt" style:font-size-complex="12pt"/>
    </style:style>
    <style:style style:name="P2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2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187752" officeooo:paragraph-rsid="001543ef" style:font-size-asian="12pt" style:font-size-complex="12pt"/>
    </style:style>
    <style:style style:name="P2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87752" officeooo:paragraph-rsid="001543ef" style:font-size-asian="12pt" style:font-size-complex="12pt"/>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677c9d" officeooo:paragraph-rsid="001543ef"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68feb1" officeooo:paragraph-rsid="001543ef" style:font-size-asian="12pt" style:font-size-complex="12pt"/>
    </style:style>
    <style:style style:name="P3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officeooo:rsid="007b4dc3" officeooo:paragraph-rsid="001543ef"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7b4dc3" officeooo:paragraph-rsid="001543ef" style:font-size-asian="12pt" style:font-size-complex="12pt"/>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7b4dc3" officeooo:paragraph-rsid="001543ef" style:font-size-asian="12pt" style:font-size-complex="12pt"/>
    </style:style>
    <style:style style:name="P3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7b4dc3" officeooo:paragraph-rsid="001543ef" style:font-size-asian="12pt" style:font-size-complex="12pt"/>
    </style:style>
    <style:style style:name="P3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8967e" officeooo:paragraph-rsid="001543ef" style:font-size-asian="12pt" style:font-style-asian="normal" style:font-size-complex="12pt" style:font-style-complex="normal"/>
    </style:style>
    <style:style style:name="P3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a8df3" officeooo:paragraph-rsid="001543ef" style:font-size-asian="12pt" style:font-style-asian="normal" style:font-size-complex="12pt" style:font-style-complex="normal"/>
    </style:style>
    <style:style style:name="P3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7b4dc3" officeooo:paragraph-rsid="001543ef" style:font-size-asian="12pt" style:font-style-asian="normal" style:font-size-complex="12pt" style:font-style-complex="normal"/>
    </style:style>
    <style:style style:name="P39"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4pt" officeooo:paragraph-rsid="001543ef" style:font-size-asian="14pt" style:font-size-complex="14pt"/>
    </style:style>
    <style:style style:name="P40" style:family="paragraph" style:parent-style-name="Standard" style:master-page-name="">
      <loext:graphic-properties draw:fill="none"/>
      <style:paragraph-properties fo:margin-left="0cm" fo:margin-right="0cm" fo:margin-top="0.101cm" fo:margin-bottom="0cm" style:contextual-spacing="false" fo:line-height="100%" fo:text-align="center" style:justify-single-word="false" fo:text-indent="0cm" style:auto-text-indent="false" style:page-number="auto" fo:background-color="transparent"/>
      <style:text-properties style:font-name="Noto Sans1" fo:font-size="14pt" officeooo:paragraph-rsid="001543ef" style:font-size-asian="14pt" style:font-size-complex="14pt"/>
    </style:style>
    <style:style style:name="T1" style:family="text">
      <style:text-properties style:font-name="Noto Sans1" fo:font-style="italic" officeooo:rsid="006f5299" style:font-style-asian="italic" style:font-style-complex="italic"/>
    </style:style>
    <style:style style:name="T2" style:family="text">
      <style:text-properties style:font-name="Noto Sans1" fo:font-style="italic" officeooo:rsid="00805d7d" style:font-style-asian="italic" style:font-style-complex="italic"/>
    </style:style>
    <style:style style:name="T3" style:family="text">
      <style:text-properties style:font-name="Noto Sans1" fo:font-size="12pt" officeooo:rsid="00356da2" style:font-size-asian="12pt" style:font-size-complex="12pt"/>
    </style:style>
    <style:style style:name="T4" style:family="text">
      <style:text-properties style:font-name="Noto Sans1" fo:font-style="normal" officeooo:rsid="0088e032" style:font-style-asian="normal" style:font-style-complex="normal"/>
    </style:style>
    <style:style style:name="T5" style:family="text">
      <style:text-properties style:font-name="Noto Sans1" fo:font-style="normal" officeooo:rsid="006b2135" style:font-style-asian="normal" style:font-style-complex="normal"/>
    </style:style>
    <style:style style:name="T6" style:family="text">
      <style:text-properties style:font-name="Noto Sans1" fo:font-style="normal" officeooo:rsid="006cbe1f" style:font-style-asian="normal" style:font-style-complex="normal"/>
    </style:style>
    <style:style style:name="T7" style:family="text">
      <style:text-properties style:font-name="Noto Sans1" fo:font-style="normal" officeooo:rsid="006d921d" style:font-style-asian="normal" style:font-style-complex="normal"/>
    </style:style>
    <style:style style:name="T8" style:family="text">
      <style:text-properties style:font-name="Noto Sans1" fo:font-style="normal" officeooo:rsid="00803fa4" style:font-style-asian="normal" style:font-style-complex="normal"/>
    </style:style>
    <style:style style:name="T9" style:family="text">
      <style:text-properties style:font-name="Noto Sans1" fo:font-style="normal" officeooo:rsid="006f5299" style:font-style-asian="normal" style:font-style-complex="normal"/>
    </style:style>
    <style:style style:name="T10" style:family="text">
      <style:text-properties style:font-name="Noto Sans1" fo:font-style="normal" officeooo:rsid="00701c62" style:font-style-asian="normal" style:font-style-complex="normal"/>
    </style:style>
    <style:style style:name="T11" style:family="text">
      <style:text-properties style:font-name="Noto Sans1" fo:font-style="normal" officeooo:rsid="00662632" style:font-style-asian="normal" style:font-style-complex="normal"/>
    </style:style>
    <style:style style:name="T12" style:family="text">
      <style:text-properties style:font-name="Noto Sans1" fo:font-style="normal" officeooo:rsid="00756491" style:font-style-asian="normal" style:font-style-complex="normal"/>
    </style:style>
    <style:style style:name="T13" style:family="text">
      <style:text-properties style:font-name="Noto Sans1" fo:font-style="normal" officeooo:rsid="0070bbdf" style:font-style-asian="normal" style:font-style-complex="normal"/>
    </style:style>
    <style:style style:name="T14" style:family="text">
      <style:text-properties style:font-name="Noto Sans1" fo:font-style="normal" officeooo:rsid="007295dc" style:font-style-asian="normal" style:font-style-complex="normal"/>
    </style:style>
    <style:style style:name="T15" style:family="text">
      <style:text-properties style:font-name="Noto Sans1" fo:font-style="normal" officeooo:rsid="00734ddb" style:font-style-asian="normal" style:font-style-complex="normal"/>
    </style:style>
    <style:style style:name="T16" style:family="text">
      <style:text-properties style:font-name="Noto Sans1" fo:font-style="normal" officeooo:rsid="0075f1a0" style:font-style-asian="normal" style:font-style-complex="normal"/>
    </style:style>
    <style:style style:name="T17" style:family="text">
      <style:text-properties style:font-name="Noto Sans1" fo:font-style="normal" officeooo:rsid="007775cc" style:font-style-asian="normal" style:font-style-complex="normal"/>
    </style:style>
    <style:style style:name="T18" style:family="text">
      <style:text-properties style:font-name="Noto Sans1" fo:font-style="normal" officeooo:rsid="00805d7d" style:font-style-asian="normal" style:font-style-complex="normal"/>
    </style:style>
    <style:style style:name="T19" style:family="text">
      <style:text-properties style:font-name="Noto Sans1" fo:font-style="normal" officeooo:rsid="0078967e" style:font-style-asian="normal" style:font-style-complex="normal"/>
    </style:style>
    <style:style style:name="T20" style:family="text">
      <style:text-properties style:font-name="Noto Sans1" fo:font-style="normal" officeooo:rsid="007a8df3" style:font-style-asian="normal" style:font-style-complex="normal"/>
    </style:style>
    <style:style style:name="T21" style:family="text">
      <style:text-properties style:font-name="Noto Sans1" fo:font-style="normal" officeooo:rsid="007a9368" style:font-style-asian="normal" style:font-style-complex="normal"/>
    </style:style>
    <style:style style:name="T22" style:family="text">
      <style:text-properties style:font-name="Noto Sans1" fo:font-style="normal" officeooo:rsid="007b4dc3" style:font-style-asian="normal" style:font-style-complex="normal"/>
    </style:style>
    <style:style style:name="T23" style:family="text">
      <style:text-properties style:font-name="Noto Sans1" fo:font-style="normal" officeooo:rsid="007d2424" style:font-style-asian="normal" style:font-style-complex="normal"/>
    </style:style>
    <style:style style:name="T24" style:family="text">
      <style:text-properties style:font-name="Noto Sans1" fo:font-style="normal" officeooo:rsid="007e72c4" style:font-style-asian="normal" style:font-style-complex="normal"/>
    </style:style>
    <style:style style:name="T25" style:family="text">
      <style:text-properties style:font-name="Noto Sans1" fo:font-style="normal" officeooo:rsid="008213c5" style:font-style-asian="normal" style:font-style-complex="normal"/>
    </style:style>
    <style:style style:name="T26" style:family="text">
      <style:text-properties style:font-name="Noto Sans1" fo:font-style="normal" officeooo:rsid="007f6797" style:font-style-asian="normal" style:font-style-complex="normal"/>
    </style:style>
    <style:style style:name="T27" style:family="text">
      <style:text-properties style:font-name="Noto Sans1" fo:font-style="normal" officeooo:rsid="0084804d" style:font-style-asian="normal" style:font-style-complex="normal"/>
    </style:style>
    <style:style style:name="T28" style:family="text">
      <style:text-properties style:font-name="Noto Sans1" fo:font-style="normal" officeooo:rsid="0084914c" style:font-style-asian="normal" style:font-style-complex="normal"/>
    </style:style>
    <style:style style:name="T29" style:family="text">
      <style:text-properties style:font-name="Noto Sans1" fo:font-style="normal" officeooo:rsid="0084cfc2" style:font-style-asian="normal" style:font-style-complex="normal"/>
    </style:style>
    <style:style style:name="T30" style:family="text">
      <style:text-properties style:font-name="Noto Sans1" fo:font-style="normal" officeooo:rsid="0086a161" style:font-style-asian="normal" style:font-style-complex="normal"/>
    </style:style>
    <style:style style:name="T31" style:family="text">
      <style:text-properties style:font-name="Noto Sans1" fo:font-style="normal" officeooo:rsid="0087f52a"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normal" officeooo:rsid="001c02ae" style:font-style-asian="normal" style:font-style-complex="normal"/>
    </style:style>
    <style:style style:name="T34" style:family="text">
      <style:text-properties fo:font-style="normal" officeooo:rsid="006a5a49" style:font-style-asian="normal" style:font-style-complex="normal"/>
    </style:style>
    <style:style style:name="T35" style:family="text">
      <style:text-properties fo:font-style="normal" officeooo:rsid="006b2135" style:font-style-asian="normal" style:font-style-complex="normal"/>
    </style:style>
    <style:style style:name="T36" style:family="text">
      <style:text-properties fo:font-style="normal" officeooo:rsid="006cbe1f" style:font-style-asian="normal" style:font-style-complex="normal"/>
    </style:style>
    <style:style style:name="T37" style:family="text">
      <style:text-properties fo:font-style="normal" officeooo:rsid="006d921d" style:font-style-asian="normal" style:font-style-complex="normal"/>
    </style:style>
    <style:style style:name="T38" style:family="text">
      <style:text-properties fo:font-style="normal" officeooo:rsid="00803fa4" style:font-style-asian="normal" style:font-style-complex="normal"/>
    </style:style>
    <style:style style:name="T39" style:family="text">
      <style:text-properties fo:font-style="normal" officeooo:rsid="006f5299" style:font-style-asian="normal" style:font-style-complex="normal"/>
    </style:style>
    <style:style style:name="T40" style:family="text">
      <style:text-properties fo:font-style="normal" officeooo:rsid="00701c62" style:font-style-asian="normal" style:font-style-complex="normal"/>
    </style:style>
    <style:style style:name="T41" style:family="text">
      <style:text-properties fo:font-style="normal" officeooo:rsid="00662632" style:font-style-asian="normal" style:font-style-complex="normal"/>
    </style:style>
    <style:style style:name="T42" style:family="text">
      <style:text-properties fo:font-style="normal" officeooo:rsid="00756491" style:font-style-asian="normal" style:font-style-complex="normal"/>
    </style:style>
    <style:style style:name="T43" style:family="text">
      <style:text-properties fo:font-style="normal" officeooo:rsid="0070bbdf" style:font-style-asian="normal" style:font-style-complex="normal"/>
    </style:style>
    <style:style style:name="T44" style:family="text">
      <style:text-properties fo:font-style="normal" officeooo:rsid="007295dc" style:font-style-asian="normal" style:font-style-complex="normal"/>
    </style:style>
    <style:style style:name="T45" style:family="text">
      <style:text-properties fo:font-style="normal" officeooo:rsid="00734ddb" style:font-style-asian="normal" style:font-style-complex="normal"/>
    </style:style>
    <style:style style:name="T46" style:family="text">
      <style:text-properties fo:font-style="normal" officeooo:rsid="0075f1a0" style:font-style-asian="normal" style:font-style-complex="normal"/>
    </style:style>
    <style:style style:name="T47" style:family="text">
      <style:text-properties fo:font-style="normal" officeooo:rsid="007775cc" style:font-style-asian="normal" style:font-style-complex="normal"/>
    </style:style>
    <style:style style:name="T48" style:family="text">
      <style:text-properties fo:font-style="normal" officeooo:rsid="00805d7d" style:font-style-asian="normal" style:font-style-complex="normal"/>
    </style:style>
    <style:style style:name="T49" style:family="text">
      <style:text-properties fo:font-style="normal" officeooo:rsid="0078967e" style:font-style-asian="normal" style:font-style-complex="normal"/>
    </style:style>
    <style:style style:name="T50" style:family="text">
      <style:text-properties fo:font-style="normal" officeooo:rsid="007a8df3" style:font-style-asian="normal" style:font-style-complex="normal"/>
    </style:style>
    <style:style style:name="T51" style:family="text">
      <style:text-properties fo:font-style="normal" officeooo:rsid="007a9368" style:font-style-asian="normal" style:font-style-complex="normal"/>
    </style:style>
    <style:style style:name="T52" style:family="text">
      <style:text-properties fo:font-style="normal" officeooo:rsid="007b4dc3" style:font-style-asian="normal" style:font-style-complex="normal"/>
    </style:style>
    <style:style style:name="T53" style:family="text">
      <style:text-properties fo:font-style="normal" officeooo:rsid="007d2424" style:font-style-asian="normal" style:font-style-complex="normal"/>
    </style:style>
    <style:style style:name="T54" style:family="text">
      <style:text-properties fo:font-style="normal" officeooo:rsid="007e72c4" style:font-style-asian="normal" style:font-style-complex="normal"/>
    </style:style>
    <style:style style:name="T55" style:family="text">
      <style:text-properties fo:font-style="normal" officeooo:rsid="008213c5" style:font-style-asian="normal" style:font-style-complex="normal"/>
    </style:style>
    <style:style style:name="T56" style:family="text">
      <style:text-properties fo:font-style="normal" officeooo:rsid="007f6797" style:font-style-asian="normal" style:font-style-complex="normal"/>
    </style:style>
    <style:style style:name="T57" style:family="text">
      <style:text-properties fo:font-style="normal" officeooo:rsid="0084804d" style:font-style-asian="normal" style:font-style-complex="normal"/>
    </style:style>
    <style:style style:name="T58" style:family="text">
      <style:text-properties fo:font-style="normal" officeooo:rsid="0084914c" style:font-style-asian="normal" style:font-style-complex="normal"/>
    </style:style>
    <style:style style:name="T59" style:family="text">
      <style:text-properties fo:font-style="normal" officeooo:rsid="0084cfc2" style:font-style-asian="normal" style:font-style-complex="normal"/>
    </style:style>
    <style:style style:name="T60" style:family="text">
      <style:text-properties fo:font-style="normal" officeooo:rsid="0086a161" style:font-style-asian="normal" style:font-style-complex="normal"/>
    </style:style>
    <style:style style:name="T61" style:family="text">
      <style:text-properties fo:font-style="normal" officeooo:rsid="0087f52a" style:font-style-asian="normal" style:font-style-complex="normal"/>
    </style:style>
    <style:style style:name="T62" style:family="text">
      <style:text-properties fo:font-style="normal" officeooo:rsid="0088e032" style:font-style-asian="normal" style:font-style-complex="normal"/>
    </style:style>
    <style:style style:name="T63" style:family="text">
      <style:text-properties fo:font-style="normal" officeooo:rsid="002bb611" style:font-size-asian="12pt" style:font-style-asian="normal" style:font-style-complex="normal"/>
    </style:style>
    <style:style style:name="T64" style:family="text">
      <style:text-properties fo:font-style="normal" officeooo:rsid="0088e032" style:font-size-asian="12pt" style:font-style-asian="normal" style:font-style-complex="normal"/>
    </style:style>
    <style:style style:name="T65" style:family="text">
      <style:text-properties fo:font-style="normal" officeooo:rsid="00896bfa" style:font-size-asian="12pt" style:font-style-asian="normal" style:font-style-complex="normal"/>
    </style:style>
    <style:style style:name="T66" style:family="text">
      <style:text-properties fo:font-style="normal" officeooo:rsid="008b4cae" style:font-size-asian="12pt" style:font-style-asian="normal" style:font-style-complex="normal"/>
    </style:style>
    <style:style style:name="T67" style:family="text">
      <style:text-properties fo:font-style="normal" officeooo:rsid="008a7cf2" style:font-size-asian="12pt" style:font-style-asian="normal" style:font-style-complex="normal"/>
    </style:style>
    <style:style style:name="T68" style:family="text">
      <style:text-properties fo:font-style="italic" style:font-style-asian="italic" style:font-style-complex="italic"/>
    </style:style>
    <style:style style:name="T69" style:family="text">
      <style:text-properties fo:font-style="italic" officeooo:rsid="004e4e4e" style:font-style-asian="italic" style:font-style-complex="italic"/>
    </style:style>
    <style:style style:name="T70" style:family="text">
      <style:text-properties fo:font-style="italic" officeooo:rsid="006a5a49" style:font-style-asian="italic" style:font-style-complex="italic"/>
    </style:style>
    <style:style style:name="T71" style:family="text">
      <style:text-properties fo:font-style="italic" officeooo:rsid="0044137e" style:font-style-asian="italic" style:font-style-complex="italic"/>
    </style:style>
    <style:style style:name="T72" style:family="text">
      <style:text-properties fo:font-style="italic" officeooo:rsid="006f5299" style:font-style-asian="italic" style:font-style-complex="italic"/>
    </style:style>
    <style:style style:name="T73" style:family="text">
      <style:text-properties fo:font-style="italic" officeooo:rsid="00805d7d" style:font-style-asian="italic" style:font-style-complex="italic"/>
    </style:style>
    <style:style style:name="T74" style:family="text">
      <style:text-properties fo:font-weight="bold" style:font-weight-asian="bold" style:font-weight-complex="bold"/>
    </style:style>
    <style:style style:name="T75" style:family="text">
      <style:text-properties fo:font-size="9pt" style:font-size-asian="9pt" style:font-size-complex="9pt"/>
    </style:style>
    <style:style style:name="T76" style:family="text">
      <style:text-properties fo:font-size="9pt" fo:font-weight="bold" style:font-size-asian="9pt" style:font-weight-asian="bold" style:font-size-complex="9pt" style:font-weight-complex="bold"/>
    </style:style>
    <style:style style:name="T77" style:family="text">
      <style:text-properties fo:font-size="9pt" fo:font-weight="normal" style:font-size-asian="9pt" style:font-weight-asian="normal" style:font-size-complex="9pt" style:font-weight-complex="normal"/>
    </style:style>
    <style:style style:name="T78" style:family="text">
      <style:text-properties officeooo:rsid="00356da2"/>
    </style:style>
    <style:style style:name="T7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2bb611"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186b3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df46ad"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e0caf7"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30c1a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57589f"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ddc89a"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137b5a" style:font-size-asian="12pt" style:font-style-asian="normal" style:font-weight-asian="normal" style:font-size-complex="12pt" style:font-style-complex="normal" style:font-weight-complex="normal"/>
    </style:style>
    <style:style style:name="T90" style:family="text">
      <style:text-properties fo:font-size="12pt" style:font-size-asian="12pt" style:font-size-complex="12pt"/>
    </style:style>
    <style:style style:name="T91" style:family="text">
      <style:text-properties fo:font-size="12pt" officeooo:rsid="009f6beb" style:font-size-asian="12pt" style:font-size-complex="12pt"/>
    </style:style>
    <style:style style:name="T92" style:family="text">
      <style:text-properties fo:font-size="12pt" officeooo:rsid="00187752" style:font-size-asian="12pt" style:font-size-complex="12pt"/>
    </style:style>
    <style:style style:name="T93" style:family="text">
      <style:text-properties fo:font-size="12pt" officeooo:rsid="01bd5e6c" style:font-size-asian="12pt" style:font-size-complex="12pt"/>
    </style:style>
    <style:style style:name="T94" style:family="text">
      <style:text-properties fo:font-size="12pt" officeooo:rsid="0044137e" style:font-size-asian="12pt" style:font-size-complex="12pt"/>
    </style:style>
    <style:style style:name="T9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2bb611" style:font-size-asian="12pt" style:font-style-asian="italic" style:font-weight-asian="normal" style:font-size-complex="12pt" style:font-style-complex="italic" style:font-weight-complex="normal"/>
    </style:style>
    <style:style style:name="T97" style:family="text">
      <style:text-properties fo:font-size="12pt" fo:font-style="italic" fo:font-weight="bold" style:font-size-asian="12pt" style:font-style-asian="italic" style:font-weight-asian="bold" style:font-size-complex="12pt" style:font-style-complex="italic" style:font-weight-complex="bold"/>
    </style:style>
    <style:style style:name="T98" style:family="text">
      <style:text-properties fo:font-size="12pt" fo:font-style="italic" fo:font-weight="bold" officeooo:rsid="002bb611" style:font-size-asian="12pt" style:font-style-asian="italic" style:font-weight-asian="bold" style:font-size-complex="12pt" style:font-style-complex="italic" style:font-weight-complex="bold"/>
    </style:style>
    <style:style style:name="T99" style:family="text">
      <style:text-properties fo:font-size="12pt" fo:font-style="italic" style:font-size-asian="12pt" style:font-style-asian="italic" style:font-size-complex="12pt" style:font-style-complex="italic"/>
    </style:style>
    <style:style style:name="T100" style:family="text">
      <style:text-properties officeooo:rsid="00df46ad"/>
    </style:style>
    <style:style style:name="T101" style:family="text">
      <style:text-properties officeooo:rsid="0030c1a7"/>
    </style:style>
    <style:style style:name="T102" style:family="text">
      <style:text-properties fo:font-size="14pt" officeooo:rsid="00187752" style:font-size-asian="14pt" style:font-size-complex="14pt"/>
    </style:style>
    <style:style style:name="T103" style:family="text">
      <style:text-properties fo:font-size="14pt" officeooo:rsid="009f6beb" style:font-size-asian="14pt" style:font-size-complex="14pt"/>
    </style:style>
    <style:style style:name="T104" style:family="text">
      <style:text-properties officeooo:rsid="009f6beb"/>
    </style:style>
    <style:style style:name="T105" style:family="text">
      <style:text-properties officeooo:rsid="00187752"/>
    </style:style>
    <style:style style:name="T106" style:family="text">
      <style:text-properties officeooo:rsid="01bd5e6c"/>
    </style:style>
    <style:style style:name="T107" style:family="text">
      <style:text-properties style:font-name="Liberation Serif" officeooo:rsid="0044137e"/>
    </style:style>
    <style:style style:name="T108" style:family="text">
      <style:text-properties style:font-name="Liberation Serif" fo:font-style="italic" officeooo:rsid="0044137e" style:font-style-asian="italic" style:font-style-complex="italic"/>
    </style:style>
    <style:style style:name="T109" style:family="text">
      <style:text-properties officeooo:rsid="004e4e4e"/>
    </style:style>
    <style:style style:name="T110" style:family="text">
      <style:text-properties officeooo:rsid="005d5d5c"/>
    </style:style>
    <style:style style:name="T111" style:family="text">
      <style:text-properties officeooo:rsid="004fc931"/>
    </style:style>
    <style:style style:name="T112" style:family="text">
      <style:text-properties officeooo:rsid="02bc8361"/>
    </style:style>
    <style:style style:name="T113" style:family="text">
      <style:text-properties officeooo:rsid="00542848"/>
    </style:style>
    <style:style style:name="T114" style:family="text">
      <style:text-properties officeooo:rsid="0051b186"/>
    </style:style>
    <style:style style:name="T115" style:family="text">
      <style:text-properties officeooo:rsid="00554ec0"/>
    </style:style>
    <style:style style:name="T116" style:family="text">
      <style:text-properties fo:font-weight="normal" style:font-weight-asian="normal" style:font-weight-complex="normal"/>
    </style:style>
    <style:style style:name="T117" style:family="text">
      <style:text-properties officeooo:rsid="0057e5a9"/>
    </style:style>
    <style:style style:name="T118" style:family="text">
      <style:text-properties officeooo:rsid="00749ab6"/>
    </style:style>
    <style:style style:name="T119" style:family="text">
      <style:text-properties officeooo:rsid="005eed54"/>
    </style:style>
    <style:style style:name="T120" style:family="text">
      <style:text-properties officeooo:rsid="005f5dae"/>
    </style:style>
    <style:style style:name="T121" style:family="text">
      <style:text-properties officeooo:rsid="005f7867"/>
    </style:style>
    <style:style style:name="T122" style:family="text">
      <style:text-properties officeooo:rsid="00a27fcb"/>
    </style:style>
    <style:style style:name="T123" style:family="text">
      <style:text-properties officeooo:rsid="00677c9d"/>
    </style:style>
    <style:style style:name="T124" style:family="text">
      <style:text-properties officeooo:rsid="005e7cb2"/>
    </style:style>
    <style:style style:name="T125" style:family="text">
      <style:text-properties officeooo:rsid="0068feb1"/>
    </style:style>
    <style:style style:name="T126" style:family="text">
      <style:text-properties officeooo:rsid="0094e117"/>
    </style:style>
    <style:style style:name="T127" style:family="text">
      <style:text-properties officeooo:rsid="006a5a49"/>
    </style:style>
    <style:style style:name="T128" style:family="text">
      <style:text-properties officeooo:rsid="0044137e"/>
    </style:style>
    <style:style style:name="T129" style:family="text">
      <style:text-properties style:font-name="Noto Sans1" fo:font-style="normal" officeooo:rsid="0088e032" style:font-size-asian="12pt" style:font-style-asian="normal" style:font-style-complex="normal"/>
    </style:style>
    <style:style style:name="T130" style:family="text">
      <style:text-properties style:font-name="Noto Sans1" fo:font-style="normal" officeooo:rsid="00896bfa" style:font-size-asian="12pt" style:font-style-asian="normal" style:font-style-complex="normal"/>
    </style:style>
    <style:style style:name="T131" style:family="text">
      <style:text-properties style:font-name="Noto Sans1" fo:font-style="normal" officeooo:rsid="008b4cae" style:font-size-asian="12pt" style:font-style-asian="normal" style:font-style-complex="normal"/>
    </style:style>
    <style:style style:name="T132" style:family="text">
      <style:text-properties style:font-name="Noto Sans1" fo:font-style="normal" officeooo:rsid="008a7cf2" style:font-size-asian="12pt" style:font-style-asian="normal" style:font-style-complex="normal"/>
    </style:style>
    <style:style style:name="T133" style:family="text">
      <style:text-properties style:font-name="Noto Sans1" fo:font-style="normal" officeooo:rsid="0088e032" style:font-style-asian="normal" style:font-style-complex="normal"/>
    </style:style>
    <style:style style:name="T134" style:family="text">
      <style:text-properties style:font-name="Noto Sans1" fo:font-style="normal" officeooo:rsid="00896bfa" style:font-style-asian="normal" style:font-style-complex="normal"/>
    </style:style>
    <style:style style:name="T135" style:family="text">
      <style:text-properties style:font-name="Noto Sans1" fo:font-style="normal" officeooo:rsid="008b4cae" style:font-style-asian="normal" style:font-style-complex="normal"/>
    </style:style>
    <style:style style:name="T136" style:family="text">
      <style:text-properties style:font-name="Noto Sans1" fo:font-style="normal" officeooo:rsid="008a7cf2" style:font-style-asian="normal" style:font-style-complex="normal"/>
    </style:style>
    <style:style style:name="T137" style:family="text">
      <style:text-properties style:font-name="Noto Sans1" fo:font-size="12pt" fo:font-style="normal" officeooo:rsid="0088e032" style:font-size-asian="12pt" style:font-style-asian="normal" style:font-size-complex="12pt" style:font-style-complex="normal"/>
    </style:style>
    <style:style style:name="T138" style:family="text">
      <style:text-properties style:font-name="Noto Sans1" fo:font-size="12pt" fo:font-style="normal" officeooo:rsid="00896bfa" style:font-size-asian="12pt" style:font-style-asian="normal" style:font-size-complex="12pt" style:font-style-complex="normal"/>
    </style:style>
    <style:style style:name="T139" style:family="text">
      <style:text-properties style:font-name="Noto Sans1" fo:font-size="12pt" fo:font-style="normal" officeooo:rsid="008b4cae" style:font-size-asian="12pt" style:font-style-asian="normal" style:font-size-complex="12pt" style:font-style-complex="normal"/>
    </style:style>
    <style:style style:name="T140" style:family="text">
      <style:text-properties style:font-name="Noto Sans1" fo:font-size="12pt" fo:font-style="normal" officeooo:rsid="008a7cf2" style:font-size-asian="12pt" style:font-style-asian="normal" style:font-size-complex="12pt" style:font-style-complex="normal"/>
    </style:style>
    <style:style style:name="T141" style:family="text">
      <style:text-properties style:font-name="Noto Sans1" fo:font-size="12pt" officeooo:rsid="00187752" style:font-size-asian="12pt" style:font-size-complex="12pt"/>
    </style:style>
    <style:style style:name="T142" style:family="text">
      <style:text-properties style:font-name="Noto Sans1" fo:font-size="12pt" officeooo:rsid="004e4e4e" style:font-size-asian="12pt" style:font-size-complex="12pt"/>
    </style:style>
    <style:style style:name="T143" style:family="text">
      <style:text-properties officeooo:rsid="00154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43">A</text:span><text:span text:style-name="T105">lla ricerca di un significato metafisico delle cose <text:s/>Schopenhauer</text:span></text:p>
      <text:p text:style-name="P39"><text:span text:style-name="T90">Sia Schopenhauer </text:span><text:span text:style-name="T91">che </text:span><text:span text:style-name="T90">Nietzsche, hanno offerto visioni radicalmente nuove e provocatorie della metafisica, ma le loro prospettive presentano differenze significative. </text:span><text:span text:style-name="T92">S</text:span><text:span text:style-name="T90">econdo Nietzsche </text:span><text:span text:style-name="T92">la metafisica </text:span><text:span text:style-name="T90">non è arte n</text:span><text:span text:style-name="T93">é</text:span><text:span text:style-name="T90"> religione perch</text:span><text:span text:style-name="T92">é</text:span><text:span text:style-name="T90"> non ha niente a che vedere con il </text:span><text:span text:style-name="T94">«</text:span><text:span text:style-name="T90">vero o l'essente in s</text:span><text:span text:style-name="T91">e</text:span><text:span text:style-name="T94">»</text:span><text:span text:style-name="T90">. </text:span></text:p>
      <text:p text:style-name="P18"><text:span text:style-name="T141">Arthur Schopenhauer ha una visione della metafisica che si distingue notevolmente da quella di Nietzsche, </text:span><text:span text:style-name="T142">esseno la</text:span><text:span text:style-name="T141"> metafisica una necessità umana che nasce dal bisogno di comprendere ciò che si nasconde dietro la natura e i fenomeni. Egli definisce la metafisica come una conoscenza presunta che cerca di andare oltre l’esperienza e la natura per spiegare ciò che le condiziona.</text:span></text:p>
      <text:p text:style-name="P24"><text:span text:style-name="T32">Per metafisica, scrive Schopenhauer,</text:span><text:span text:style-name="T68"> </text:span><text:span text:style-name="T71">«</text:span><text:span text:style-name="T68">io intendo ogni presunta conoscenza che oltrepassi la possibilità dell’esperienza, ossia che oltrepassi la natura, o il dato fenomenico delle cose, per conseguire una spiegazione di ciò che, in un senso o nell’altro, la condizionerebbe; o in </text:span><text:span text:style-name="T69">altre </text:span><text:span text:style-name="T68">parole, di ciò che si nasconde dietro la natura e la rende possibile</text:span>».</text:p>
      <text:p text:style-name="P24">Schopenhauer parte dalle categorie di Kant, con la nota distinzione tra fenomeno e noumeno (o cosa in sé), per rovesciarle completamente o meglio, ricongiungerle.</text:p>
      <text:p text:style-name="P24"><text:soft-page-break/>Per Kant, notoriamente, il fenomeno è la realtà, o almeno l’unica realtà conoscibile e accessibile «a priori» che informano la mente umana; per Schopenhauer invece il fenomeno è illusione, sogno e parvenza, <text:span text:style-name="T110">ma che si pone </text:span>in una prospettiva di continua e inarrestabile ricerca. È infatti conseguenza di questa definizione il fatto che la metafisica, in quanto «presunta conoscenza», è un cercare il continuo tentativo di squarciare un velo. Schopenhauer, con la sua celebre espressione "il mondo è la mia rappresentazione", ci invita a riflettere profondamente sulla natura del fenomeno. Per il filosofo tedesco, i fenomeni non sono entità oggettive e indipendenti, ma piuttosto "fantasmi" che danzano <text:span text:style-name="T111">all’altezza dei nostri occhi, </text:span>si muovono nella possibilità tanto di essere, quanto di non-essere. Essi sono le nostre percezioni, le nostre rappresentazioni soggettive del mondo, e come tali, sono intrinsecamente legati al soggetto che percepisce.</text:p>
      <text:p text:style-name="P27">I fenomeni, possono apparire e scomparire, mutare forma e sostanza, in un continuo divenire. Questa precarietà dell'esistenza fenomenica è ciò che genera in noi un profondo senso di inquietudine e di insoddisfazione. <text:span text:style-name="T111">I fenomeni</text:span> sono lo strato esterno di una realtà che non vediamo mai interamente, <text:span text:style-name="T111">sono </text:span>oggetto di studio della fisica che li guarda “dall’esterno”, sono tutto ciò che abbiamo. La metafisica, non svolazza al di sopra dei fenomeni, <text:span text:style-name="T112">l</text:span>a metafisica, nella misura in cui è <text:soft-page-break/>una “conoscenza” umana, e ogni conoscenza è esperienza – non trascende mai i fenomeni, piuttosto li osserva continuamente per dare corpo alla propria ricerca. Si chiede retoricamente Schopenhauer: «come può una scienza attinta dall’esperienza condurre al di là di quest’ultima e meritare il nome di metafisica?». Può, perché nei fenomeni essa è concentrata a rintracciare quelle sfumature che abbozzano “la cosa in sé”. Quest<text:span text:style-name="T113">o</text:span> non è dunque, un ente separato dal fenomeno, piuttosto è il fenomeno stesso guardato dall’interno, visto dalla prospettiva dell’intera rete di relazioni a cui è collegato e grazie al quale è ciò che è. <text:span text:style-name="T114">I</text:span>l mondo fenomenico è come un velo illusorio, un "velo d<text:span text:style-name="T115">ella</text:span> Maya"<text:note text:id="ftn4" text:note-class="footnote"><text:note-citation>1</text:note-citation><text:note-body><text:p text:style-name="P15">E<text:span text:style-name="T75">’ un’opera che indaga sulle </text:span><text:span text:style-name="T76">illusioni e la percezione della realtà. </text:span><text:span text:style-name="T77">Il velo di Maya rappresenta la barriera che ci impedisce di vedere la verità, nascondendola dietro un’apparenza ingannevole.</text:span></text:p></text:note-body></text:note> che nasconde la vera natura della realtà.</text:p>
      <text:p text:style-name="P24">Questo velo ci inganna, facendoci credere che il mondo sia qualcosa di solido e permanente, mentre in realtà è un fluire incessante di percezioni e rappresentazioni. La metafisica, dunque, non supera l’esperienza, la disvela, la apre a quello che rende i fenomeni interconnessi. Cos’è dunque questa Maya dalla quale ci si deve guardare per non «soffrire incoscienti e vagare senza meta»? I suoi molteplici significati sono simboleggiati, sia in Oriente sia in Occidente, da una immagine, quella del velo, il velo della Maya appunto, <text:span text:style-name="T117">d</text:span>rappeggiato sull’invisibile essenza <text:soft-page-break/>di tutti i fenomeni della realtà. <text:span text:style-name="T112">H</text:span>a il potere di farli apparire ed al tempo stesso di ricoprire la vera Natura delle cose, che però si rende accessibile dopo lo svelamento, dopo che il velo della Maya è finalmente caduto, o è divent<text:span text:style-name="T118">at</text:span>o abbastanza sottile da permetterci di gettare oltre uno sguardo <text:span text:style-name="T117">trasparente</text:span>.</text:p>
      <text:p text:style-name="P27">La metafora del velo che copre l’essenza delle cose non è solo legata alla filosofia indiana, anzi: appare esplicitamente citata anche nell’antica opera di Plutarco Iside ed Osiride, <text:span text:style-name="T119">dove </text:span>Eraclito di Efeso, in uno dei suoi frammenti più discussi, ci dice che «la Natura ama velarsi». Su quella che si diceva essere un tempo la tomba di Iside, vicino a Menfi, ci dice l’autore, era stata eretta una statua ricoperta da un velo nero. Sulla base della imponente e misteriosa figura era incisa questa iscrizione: «Io sono tutto ciò che fu, ciò che è, e ciò che sarà, e nessun mortale ha ancora osato sollevare il mio velo». Questo è il Velo di Iside, <text:span text:style-name="T119">rappresentato dal continuo fluire delle cose, </text:span><text:span text:style-name="T120">secondo la versione di Eraclito,</text:span><text:span text:style-name="T119"> mentre per Schopenhauer è la nostra mente a proiettare un'immagine distorta del mondo </text:span><text:span text:style-name="T121">(il velo della Maya) </text:span>dove il filosofo cerca di innestare sulla visione del pensiero occidentale contemporaneo, duale e scisso, quella orientale, ricongiungente e non duale. Schopenhauer parte infatti dalle categorie di Kant, con la nota distinzione tra fenomeno e noumeno (o cosa in sé), per rovesciarle completamente o meglio, ricongiungerle.</text:p>
      <text:p text:style-name="P27"><text:soft-page-break/>L’esperienza, fulcro centrale della gnoseologia schopenhaueriana, coincide con la ricerca stessa, è il suo motore: «la filosofia altro non è che la corretta comprensione universale dell’esperienza stessa». <text:s/><text:span text:style-name="T122">L</text:span>'esperienza non è un dato grezzo, ma un costrutto mentale profondamente influenzato dalle categorie a priori dello spazio e del tempo. Queste categorie, ereditate da Kant, non sono semplici schemi mentali, ma costituiscono le lenti attraverso cui percepiamo il mondo.</text:p>
      <text:p text:style-name="P27">Schopenhauer, con la sua filosofia, cerca di dare un senso all'apparente caos e contraddizione che caratterizzano il mondo che percepiamo. Secondo lui, il mondo fenomenico, ovvero il mondo come ci appare, è un groviglio di contrasti. Il mondo è segnato da una costante lotta tra bene e male, gioia e dolore, amore e odio. <text:span text:style-name="T123">Come l’uomo deve porsi di fronte al male?</text:span></text:p>
      <text:p text:style-name="P30">Esiste una qualche forma di possibile liberazione dal male?</text:p>
      <text:p text:style-name="P24">Sotto la molteplicità dei fenomeni, Schopenhauer individua una forza unica e indivisibile, la volontà, che spinge tutte le cose all'esistenza. Questa volontà <text:span text:style-name="T124">è </text:span>un impulso cieco e irrazionale che spinge ogni essere verso la soddisfazione dei propri desideri, è la causa di tutti i contrasti e le sofferenze del mondo, ma è anche ciò che unifica tutto ciò che esiste.</text:p>
      <text:p text:style-name="P27"><text:soft-page-break/><text:span text:style-name="T123">Schopenhauer riprende un concetto che risale fino ad Hobbes, sostenendo che il bene e il male sono la conseguenza di ciò che l’uomo vuole o non vuole: tutto ciò che l’uomo cerca di conseguire è considerato bene, tutto ciò che l’uomo cerca di evitare è il male. La realtà secondo Schopenhauer presenta molti aspetti che l’uomo ritiene negativi, </text:span><text:span text:style-name="T118">i</text:span><text:span text:style-name="T123">n primo luogo </text:span><text:span text:style-name="T118">vi </text:span><text:span text:style-name="T123">è </text:span><text:span text:style-name="T118">la brevità della vita e di questo ne è </text:span><text:span text:style-name="T125">terrorizzato, il tempo scorre velocemente e non può sottrarsi alla morte.</text:span></text:p>
      <text:p text:style-name="P27"><text:span text:style-name="T125">Metaforicamente, Schopenhauer afferma che ognuno di noi guida la nave della propria esistenza con cura, cerca di evitare gli scogli </text:span><text:span text:style-name="T126">e i </text:span><text:span text:style-name="T125">mari in tempesta, ma che alla fine non arriver</text:span><text:span text:style-name="T118">à</text:span><text:span text:style-name="T125"> mai ad un porto: ci sarà il naufragio della morte. </text:span></text:p>
      <text:p text:style-name="P31"><text:span text:style-name="T127">A queste condizioni oggettive che rendono difficile l’esistenza, si aggiungono poi le condizioni soggettive, </text:span><text:s/><text:span text:style-name="T127">legate alla natura stessa dell’uomo; </text:span><text:span text:style-name="T118">o</text:span><text:span text:style-name="T127">gni uomo è lupo a se stesso (</text:span><text:span text:style-name="T70">homo homini lupus). </text:span><text:span text:style-name="T34">Con questa frase Schopenhauer fa sua la frase attribuita ad Hobbes per caratterizzare l’uomo aggressivo, violento, </text:span><text:span text:style-name="T35">egoista e crudele</text:span><text:span text:style-name="T34"> nei confronti degli altri uomini. </text:span><text:span text:style-name="T35">Gli uomini sono reciprocamente ostili, quando possono, cercano di danneggiare gli altri a proprio vantaggio e questo perché l’uomo ha un carattere immutabile, non migliorabile: come nasce, tale muore. Se è criminale alla nascita criminale rimarrà per tutta la vita e in questa ottica, si </text:span><text:soft-page-break/><text:span text:style-name="T35">oppone all’idea che le pene abbiano come scopo la rieducazione morale dei condannati, uno scopo assolutamente irraggiungibile.</text:span></text:p>
      <text:p text:style-name="P21"><text:span text:style-name="T35">Dal punto di vista antropologico, Schopenhauer vede l’uomo come un essere che cerca costantemente di soddisfare i propri desideri, ma è inevitabilmente destinato a fallire, poiché ogni desiderio soddisfatto ne genera immediatamente un altro. Questo ciclo infinito di desideri e sofferenze è ciò che caratterizza la condizione umana. </text:span><text:span text:style-name="T36">A questa concezione si collega la tesi del carattere negativo del piacere: quando l’uomo prova piacere significa che </text:span><text:span text:style-name="T37">non si trova in una condizione positiva in sé, ma piuttosto nella condizione di assenza di dolore. Il conseguimento del piacere è sempre preceduto da una situazione di disagio e sofferenza, per cui, il piacere è leopardianamente “figlio d’affanno”.</text:span></text:p>
      <text:p text:style-name="P20"><text:span text:style-name="T37">Schopenhauer aveva una profonda sensibilità verso la sofferenza degli animali che considerava spesso più innocenti e puri rispetto agli esseri umani. Schopenhauer utilizza la vita degli animali per illustrare la natura cieca e irrazionale della “volontà di vivere” </text:span><text:span text:style-name="T38">destinata al ciclo continuo della riproduzione</text:span><text:span text:style-name="T37">. Gli animali, come gli esseri umani, sono guidati da questa forza che li spinge a riprodursi e a lottare per la sopravvivenza, spesso in condizioni di grande sofferenza. Questo mette in </text:span><text:soft-page-break/><text:span text:style-name="T37">evidenza l’insensatezza e la crudeltà della vita, dominata dalla volontà.</text:span></text:p>
      <text:p text:style-name="P20"><text:span text:style-name="T37">D</text:span><text:span text:style-name="T39">are un senso </text:span><text:span text:style-name="T40">a tutto questo e </text:span><text:span text:style-name="T39">cercare di comprender</text:span><text:span text:style-name="T40">ne il significato è </text:span><text:span text:style-name="T39">compito specifico della filosofia, è la sofferenza che scorgiamo nel mondo, la vera molla della riflessione filosofica e non la </text:span><text:span text:style-name="T72">meraviglia</text:span><text:span text:style-name="T39"> </text:span><text:span text:style-name="T40">come sosteneva Aristotele.</text:span></text:p>
      <text:p text:style-name="P21"><text:span text:style-name="T41">Schopenhauer, </text:span><text:span text:style-name="T40">pur considerandosi un discepolo di Kant, in quanto </text:span><text:span text:style-name="T42">ne condivide il pensiero, </text:span><text:span text:style-name="T40">ritiene impossibile avere qualsiasi conoscenza sufficientemente provata e convincente riguardo a realtà che vanno al di là della nostra esperienza. </text:span><text:span text:style-name="T43">Secondo Kant noi conosciamo soltanto la superficie della realtà, ma quello che sta dietro, la cosa in sé, il fondamento metafisico di questa realtà è irraggiungibile. Kant non ha dunque risolto il problema del fondamento metafisico della realtà, mentre Schopenhauer </text:span><text:span text:style-name="T44">ritiene di averlo trovato nella volontà.</text:span></text:p>
      <text:p text:style-name="P21"><text:span text:style-name="T44">P</text:span><text:span text:style-name="T45">er spiegare questo </text:span><text:span text:style-name="T46">concetto</text:span><text:span text:style-name="T45">, Schopenhauer utilizza anche la metafora del libro scritto in una lingua sconosciuta </text:span><text:span text:style-name="T46">e questo per illustrare i limiti </text:span><text:span text:style-name="T45">della nostra comprensione del mondo. In questa metafora, il mondo è paragonato a un libro scritto in una lingua che non conosciamo completamente, </text:span><text:span text:style-name="T38">tranne </text:span><text:span text:style-name="T45">alcune parole </text:span><text:span text:style-name="T38">che </text:span><text:span text:style-name="T45">ci sono familiari. Queste parole rappresentano le poche cose che possiamo comprendere e </text:span><text:span text:style-name="T46">tramite queste,</text:span><text:span text:style-name="T45"> pian piano arriviamo a decifrare la lingua e il senso </text:span><text:soft-page-break/><text:span text:style-name="T45">dell’enigmatico testo. </text:span><text:span text:style-name="T46">E’ la volontà la parola che ci permette di decifrare l’oscuro testo del mondo; </text:span><text:span text:style-name="T47">è</text:span><text:span text:style-name="T46"> come se fosse la grammatica, la sintassi di questo linguaggio universale </text:span><text:span text:style-name="T47">che ci permette</text:span><text:span text:style-name="T45"> di comprendere la forza motrice che sta dietro ogni fenomeno. Schopenhauer sottolinea l'importanza dell'esperienza personale, </text:span><text:span text:style-name="T47">n</text:span><text:span text:style-name="T45">on basta studiare la volontà in modo teorico, ma è necessario viverla in prima persona </text:span><text:span text:style-name="T48">che </text:span><text:span text:style-name="T47">a</text:span><text:span text:style-name="T45">ttraverso le nostre azioni, le nostre passioni, i nostri desideri, entriamo in contatto diretto con questa forza fondamentale che ci spinge a vivere.</text:span></text:p>
      <text:p text:style-name="P36">Nonostante le loro apparenti affinità, Kant e Schopenhauer divergono profondamente nel modo di intendere la volontà. Per Kant, la volontà è strettamente legata alla ragione. L'individuo, attraverso l'uso della ragione pratica, è in grado di determinare la propria volontà, agendo in modo morale e seguendo l'imperativo categorico. La volontà, quindi, è una facoltà attiva e autonoma, capace di autodeterminarsi.</text:p>
      <text:p text:style-name="P20"><text:span text:style-name="T49">Schopenhauer, invece, offre una visione radicalmente diversa. La volontà, per lui, è una forza cieca e inconscia, un impulso fondamentale che spinge ogni essere vivente all'esistenza. È un principio irrazionale e incontrollabile, che si manifesta nelle nostre azioni, nei nostri desideri e nelle nostre passioni. Tale forza si presenta come qualcosa di impenetrabile alla coscienza dell’uomo </text:span><text:soft-page-break/><text:span text:style-name="T49">stesso. In </text:span><text:span text:style-name="T50">un’altra metafora, quella del servo e del padrone, Schopenhauer ci offre una immagine potente e chiarificatrice del rapporto tra individuo e la volontà.</text:span></text:p>
      <text:p text:style-name="P37">L'individuo è rappresentato come un servo, sottoposto al volere di un altro. In questo caso, il "padrone" è la volontà, una forza cieca e inconscia che guida le nostre azioni. <text:s/>Le motivazioni che il servo presenta al padrone corrispondono ai nostri pensieri, alle nostre ragioni, ai nostri desideri consapevoli. Tuttavia, queste motivazioni non determinano la decisione finale. La decisione finale spetta alla volontà, che spesso agisce in modo impulsivo e irrazionale, trascendendo la nostra ragione.</text:p>
      <text:p text:style-name="P20"><text:span text:style-name="T50">Con questa metafora, Schopenhauer vuole sottolineare come la nostra sensazione di libertà sia in realtà un'illusione. Crediamo di prendere decisioni libere e autonome, ma in realtà siamo guidati da forze inconsce che sfuggono al nostro controllo. La volontà è una forza cieca, che non ha un fine preciso, </text:span><text:span text:style-name="T51">s</text:span><text:span text:style-name="T50">pinge gli individui ad agire, ma non ha una comprensione razionale delle conseguenze delle proprie azioni. Questa visione della volontà spiega anche la ragione della sofferenza umana. La volontà, infatti, ci spinge a desideri insaziabili, generando un</text:span><text:span text:style-name="T48">a </text:span><text:span text:style-name="T50">insoddisfazione continua, un senso di vuoto </text:span><text:span text:style-name="T52">e di dolore.</text:span></text:p>
      <text:p text:style-name="P38">La massiccia e continua presenza del dolore rende difficile pensare che questo mondo sia opera di un Dio.</text:p>
      <text:p text:style-name="P20"><text:soft-page-break/><text:span text:style-name="T52">Schopenhauer, pur dichiarandosi </text:span><text:span text:style-name="T48">filosofo cristianissimo, lo dice in occasione della presentazione al suo editore del manoscritto “</text:span><text:span text:style-name="T73">Mondo come volontà e rappresentazione</text:span><text:span text:style-name="T48">”, </text:span><text:span text:style-name="T52">non abbraccia una visione tradizionale di Dio come creatore benevolo e provvidente. Egli sostiene che un Dio che abbia creato un mondo così pieno di sofferenza e ingiustizia non possa essere un Dio personale e coinvolto nelle vicende umane. Per lui, un Dio, se esiste, deve essere necessariamente trascendente, completamente al di là della nostra comprensione e non interessato al destino degli individui. </text:span><text:span text:style-name="T53">Il pessimismo cosmico di </text:span><text:span text:style-name="T52">Schopenhauer </text:span><text:span text:style-name="T54">lo porta a pensare che il mondo </text:span><text:span text:style-name="T52">è intrinsecamente malvagio, </text:span><text:span text:style-name="T54">un</text:span><text:span text:style-name="T52"> Dio che avrebbe creato un mondo così, </text:span><text:span text:style-name="T55">sarebbe stato </text:span><text:span text:style-name="T52">Egli stesso <text:s/>responsabile di tutta la sofferenza umana e animale. </text:span></text:p>
      <text:p text:style-name="P20"><text:span text:style-name="T54">Nel rapporto con il cristianesimo, e in particolare con le religioni, </text:span><text:span text:style-name="T55">Schopenhauer </text:span><text:span text:style-name="T54">afferma che le religioni sono una metafisica popolare, nel senso che l’uomo ha bisogno di dare un senso complessivo alla realtà in cui vive. <text:s/>Schopenhauer considera le religioni come delle "stampelle" per l'umanità, delle costruzioni mentali che servono a dare un senso a un mondo altrimenti privo di significato. La fede in un Dio creatore e benevolo è, secondo lui, un'illusione consolatoria, ma non corrisponde alla realtà. </text:span></text:p>
      <text:p text:style-name="P33"><text:soft-page-break/><text:span text:style-name="T54">Schopenhauer, nel suo profondo pessimismo cosmico, operò una distinzione tra le religioni, classificandole in base alla loro concezione della vita e della sofferenza. </text:span><text:span text:style-name="T56">Schopenhauer divide le religioni in due grandi categorie: le religioni ottimistiche e quelle pessimistiche, religioni che sostengono che il mondo è stato creato da un Dio buono e quelle che sostengono che il mondo è una valle di lacrime e sofferenze. </text:span></text:p>
      <text:p text:style-name="P33"><text:span text:style-name="T56">L’ebraismo e l’islamismo sono quelle ottimistiche</text:span><text:span text:style-name="T56"><text:note text:id="ftn5" text:note-class="footnote"><text:note-citation>2</text:note-citation><text:note-body><text:p text:style-name="P16">Entrambe le religioni presentano un Dio che ha creato il mondo e l'umanità secondo un piano divino. Sia l'ebraismo che l'islam offrono promesse di ricompensa per i giusti e di punizione per i peccatori. Questa visione, secondo Schopenhauer, alimenta l'illusione di un ordine cosmico e di una giustizia divina, attenuando la consapevolezza della sofferenza presente.</text:p></text:note-body></text:note></text:span><text:span text:style-name="T56">, quelle pessimistiche</text:span><text:span text:style-name="T56"><text:note text:id="ftn6" text:note-class="footnote"><text:note-citation>3</text:note-citation><text:note-body><text:p text:style-name="P16">Sia il cristianesimo che le religioni indiane (induismo e buddismo) pongono una forte enfasi sulla sofferenza umana. La vita terrena è vista come un'illusione, un'esistenza provvisoria e segnata dal dolore.</text:p></text:note-body></text:note></text:span><text:span text:style-name="T56"> sono il cristianesimo e tutte le religioni indiane.</text:span></text:p>
      <text:p text:style-name="P35"><text:span text:style-name="T56">Le religioni ottimistiche, promettendo una ricompensa futura e incoraggiando l'attivismo, attenuano la consapevolezza del dolore presente. Le religioni pessimistiche, invece, affrontano direttamente il problema della sofferenza, proponendo una via di fuga dalla realtà illusoria. </text:span><text:span text:style-name="T57">Cristo è vissuto nel mondo ebraico e non ha potuto fare a meno di collegare a questa sua religione pessimistica una parte dell’ebraismo, facendo propria l’idea </text:span><text:span text:style-name="T58">di un Dio buono e provvidente.</text:span></text:p>
      <text:p text:style-name="P32"><text:soft-page-break/><text:span text:style-name="T58">Se si prende il cristianesimo e gli si toglie il Dio buono e provvidente, la redenzione, l’immortalità dell’anima, quello che resta non è altro che la filosofia di Schopenhauer: un mondo visto come una valle di lacrime, un uomo malvagio incapace di correggersi e di salvarsi da solo. Di tutta la teologia ebraica, Schopenhauer salva solo l’idea del peccato originale, </text:span><text:span text:style-name="T59">perché introduce l’idea che l’umanità sia caduta in peccato e abbia bisogno della salvezza. </text:span><text:span text:style-name="T60">La radice del male non risiede tanto in un atto originario di disobbedienza (come nel racconto biblico), quanto nella “volontà di vivere”, una forza cieca e irrazionale che spinge ogni essere umano verso l’esistenza e genera sofferenza. </text:span><text:span text:style-name="T59">La sofferenza, in questa prospettiva, viene vista non solo come un male da evitare, ma anche come un mezzo per purificarsi e avvicinarsi a Dio.</text:span></text:p>
      <text:p text:style-name="P35"><text:span text:style-name="T61">D</text:span><text:span text:style-name="T59">i fronte alla sua visione pessimista della vita dominata dalla "volontà" cieca e irrazionale, </text:span><text:span text:style-name="T61">Schopenhauer </text:span><text:span text:style-name="T59">propone la "noluntas" come via d'uscita dalla sofferenza. Se la "volontas" è la radice di ogni desiderio, e quindi di ogni sofferenza (poiché il desiderio è sempre destinato a non essere pienamente soddisfatto), la "noluntas" rappresenta la negazione attiva di questa volontà. Negando la volontà, l'individuo si libera dal ciclo infinito del desiderio e della delusione, raggiungendo una sorta di serenità e distacco dal mondo. La "noluntas" non implica l'annullamento della volontà, ma piuttosto la sua </text:span><text:soft-page-break/><text:span text:style-name="T59">negazione attiva; </text:span><text:span text:style-name="T61">è</text:span><text:span text:style-name="T59"> una scelta consapevole di non lasciarsi guidare dai propri desideri. </text:span><text:span text:style-name="T61">Da qui il sorprendente ricorso ai mistici, che seguono che seguono un tipo di vita che nega la soddisfazione dei bisogni. </text:span><text:span text:style-name="T62">Fra gli altri viene citato san Francesco, che rimane indifferente agli stimoli interni ed esterni, non mangiano da giorni e non reagiscono alla stimolazione del cibo, non si proteggono dal caldo e dal freddo. L’elemento <text:s/>comune è l’esperienza di una condizione di pace e serenità.</text:span></text:p>
      <text:p text:style-name="P19"><text:span text:style-name="Citation"><text:span text:style-name="T137">L</text:span></text:span><text:span text:style-name="Citation"><text:span text:style-name="T138">a dottrina della noluntas (negazione del volere) </text:span></text:span><text:span text:style-name="Citation"><text:span text:style-name="T139">è</text:span></text:span><text:span text:style-name="Citation"><text:span text:style-name="T138"> legata alla interpretazione che Schopenhauer dà della dottrina kantiana della libertà. Kant con il suo imperativo categorico, attribuisce all’uomo un libero arbitrio incondizionato che l’uomo è libero di seguire o meno. Schopenhauer, pur riconoscendo la capacità </text:span></text:span><text:span text:style-name="Citation"><text:span text:style-name="T140">di scelta dell’individuo, la limita fortemente. La volontà come forza fondamentale, condiziona profondamente le scelte umane, rendendo difficile una completa libertà. Schopenhauer si colloca quindi in un punto di mezzo tra il determinismo assoluto ed il libero arbitrio incondizionato di Kant. L’uomo è si condizionato dalla sua natura, ma conserva una certa capacità di scelta e di autodeterminaz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Norm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1"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1"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31T17:29:36.194460330</dc:date>
    <dc:creator>corrado tafaro</dc:creator>
    <meta:editing-duration>PT33M43S</meta:editing-duration>
    <meta:editing-cycles>4</meta:editing-cycles>
    <meta:generator>LibreOffice/24.2.7.2$Linux_X86_64 LibreOffice_project/420$Build-2</meta:generator>
    <meta:document-statistic meta:table-count="0" meta:image-count="0" meta:object-count="0" meta:page-count="14" meta:paragraph-count="37" meta:word-count="2949" meta:character-count="19227" meta:non-whitespace-character-count="16302"/>
  </office:meta>
</office:document-meta>
</file>