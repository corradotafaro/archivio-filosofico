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paragraph-properties fo:text-align="justify" style:justify-single-word="false"/>
      <style:text-properties officeooo:paragraph-rsid="00495b7a"/>
    </style:style>
    <style:style style:name="P2" style:family="paragraph" style:parent-style-name="Footnote">
      <style:paragraph-properties fo:text-align="justify" style:justify-single-word="false" fo:break-before="page"/>
      <style:text-properties officeooo:paragraph-rsid="00495b7a"/>
    </style:style>
    <style:style style:name="P3" style:family="paragraph" style:parent-style-name="Footnote">
      <style:paragraph-properties fo:text-align="justify" style:justify-single-word="false"/>
    </style:style>
    <style:style style:name="P4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3pt" fo:font-style="normal" officeooo:rsid="00572710" officeooo:paragraph-rsid="0000975a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3pt" fo:font-style="normal" officeooo:rsid="0028adfc" officeooo:paragraph-rsid="0000f2d3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3pt" fo:font-style="normal" fo:font-weight="normal" officeooo:rsid="002994d3" officeooo:paragraph-rsid="0002cf35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3pt" fo:font-style="normal" fo:font-weight="normal" officeooo:rsid="002994d3" officeooo:paragraph-rsid="0002cf35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style:font-name="Noto Sans1" fo:font-size="13pt" fo:font-style="normal" fo:font-weight="normal" officeooo:rsid="002994d3" officeooo:paragraph-rsid="0002cf35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top="0.101cm" fo:margin-bottom="0cm" style:contextual-spacing="false" fo:line-height="115%" fo:text-align="center" style:justify-single-word="false" fo:break-before="page"/>
      <style:text-properties style:font-name="Noto Sans1" fo:font-size="13pt" fo:font-style="normal" fo:font-weight="normal" officeooo:rsid="00495b7a" officeooo:paragraph-rsid="0003c2d1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3pt" officeooo:rsid="0027e024" officeooo:paragraph-rsid="0000975a" style:font-size-asian="13pt" style:font-size-complex="13pt"/>
    </style:style>
    <style:style style:name="P11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3pt" officeooo:rsid="0028adfc" officeooo:paragraph-rsid="0000f2d3" style:font-size-asian="13pt" style:font-size-complex="13pt"/>
    </style:style>
    <style:style style:name="P12" style:family="paragraph" style:parent-style-name="Standard">
      <style:paragraph-properties fo:margin-top="0.199cm" fo:margin-bottom="0cm" style:contextual-spacing="false" fo:line-height="115%" fo:text-align="justify" style:justify-single-word="false"/>
      <style:text-properties style:font-name="Noto Sans1" fo:font-size="13pt" officeooo:paragraph-rsid="0003c2d1" style:font-size-asian="13pt" style:font-size-complex="13pt"/>
    </style:style>
    <style:style style:name="P13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style:font-name="Noto Sans1" fo:font-size="13pt" officeooo:paragraph-rsid="0003c2d1" style:font-size-asian="13pt" style:font-size-complex="13pt"/>
    </style:style>
    <style:style style:name="P14" style:family="paragraph" style:parent-style-name="Standard">
      <style:paragraph-properties fo:margin-top="0.3cm" fo:margin-bottom="0cm" style:contextual-spacing="false" fo:line-height="115%" fo:text-align="center" style:justify-single-word="false"/>
      <style:text-properties style:font-name="Noto Sans1" fo:font-size="13pt" fo:font-style="italic" fo:font-weight="normal" officeooo:rsid="0028adfc" officeooo:paragraph-rsid="0000f2d3" style:font-size-asian="13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>
      <style:paragraph-properties fo:margin-top="0.199cm" fo:margin-bottom="0cm" style:contextual-spacing="false" fo:line-height="100%" fo:text-align="center" style:justify-single-word="false"/>
      <style:text-properties style:font-name="Noto Sans1" fo:font-size="13pt" fo:font-style="italic" fo:font-weight="normal" officeooo:rsid="002994d3" officeooo:paragraph-rsid="0002cf35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Noto Sans1" fo:font-size="13pt" fo:font-style="italic" fo:font-weight="normal" officeooo:rsid="002994d3" officeooo:paragraph-rsid="0002cf35" style:font-size-asian="13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style:font-name="Noto Sans1" fo:font-size="13pt" fo:font-weight="bold" officeooo:paragraph-rsid="0003c2d1" style:font-size-asian="13pt" style:font-weight-asian="bold" style:font-size-complex="13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style:font-name="Noto Sans1" fo:font-size="13pt" fo:font-style="italic" fo:text-shadow="none" fo:font-weight="normal" officeooo:paragraph-rsid="0000f2d3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Text_20_body">
      <style:paragraph-properties fo:margin-top="0.199cm" fo:margin-bottom="0cm" style:contextual-spacing="false" fo:line-height="115%" fo:text-align="center" style:justify-single-word="false"/>
      <style:text-properties style:font-name="Noto Sans1" fo:font-size="13pt" fo:font-style="italic" fo:text-shadow="none" fo:font-weight="bold" officeooo:paragraph-rsid="0000f2d3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Text_20_body">
      <style:paragraph-properties fo:margin-top="0.101cm" fo:margin-bottom="0cm" style:contextual-spacing="false" fo:line-height="115%" fo:text-align="justify" style:justify-single-word="false"/>
      <style:text-properties style:font-name="Noto Sans1" fo:font-size="13pt" fo:font-style="normal" fo:font-weight="normal" officeooo:rsid="00495b7a" officeooo:paragraph-rsid="0003c2d1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ize="11pt" fo:font-style="normal" fo:font-weight="bold" officeooo:rsid="00495b7a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font-size="11pt" fo:font-style="normal" fo:font-weight="bold" officeooo:rsid="007a711a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font-size="11pt" fo:font-style="normal" style:font-size-asian="11pt" style:font-style-asian="normal" style:font-size-complex="11pt" style:font-style-complex="normal"/>
    </style:style>
    <style:style style:name="T5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28adfc"/>
    </style:style>
    <style:style style:name="T9" style:family="text">
      <style:text-properties officeooo:rsid="004c2768"/>
    </style:style>
    <style:style style:name="T10" style:family="text">
      <style:text-properties style:font-name="Noto Sans" fo:font-style="italic" officeooo:rsid="0028adfc" style:font-style-asian="italic" style:font-style-complex="italic"/>
    </style:style>
    <style:style style:name="T11" style:family="text">
      <style:text-properties style:font-name="Noto Sans" fo:font-style="italic" officeooo:rsid="00850878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8adfc" style:font-style-asian="italic" style:font-style-complex="italic"/>
    </style:style>
    <style:style style:name="T14" style:family="text">
      <style:text-properties fo:font-style="italic" officeooo:rsid="0083b457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8adfc" style:font-style-asian="normal" style:font-style-complex="normal"/>
    </style:style>
    <style:style style:name="T17" style:family="text">
      <style:text-properties fo:font-style="normal" officeooo:rsid="0083b457" style:font-style-asian="normal" style:font-style-complex="normal"/>
    </style:style>
    <style:style style:name="T18" style:family="text">
      <style:text-properties fo:font-style="normal" officeooo:rsid="00572710" style:font-style-asian="normal" style:font-style-complex="normal"/>
    </style:style>
    <style:style style:name="T19" style:family="text">
      <style:text-properties fo:font-style="normal" officeooo:rsid="004c2768" style:font-style-asian="normal" style:font-style-complex="normal"/>
    </style:style>
    <style:style style:name="T20" style:family="text">
      <style:text-properties fo:font-style="normal" officeooo:rsid="0002cf35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officeooo:rsid="00495b7a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7a711a" style:font-style-asian="normal" style:font-weight-asian="bold" style:font-style-complex="normal" style:font-weight-complex="bold"/>
    </style:style>
    <style:style style:name="T24" style:family="text">
      <style:text-properties officeooo:rsid="0083b457"/>
    </style:style>
    <style:style style:name="T25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officeooo:rsid="0002cf35"/>
    </style:style>
    <style:style style:name="T27" style:family="text">
      <style:text-properties officeooo:rsid="002d221f"/>
    </style:style>
    <style:style style:name="T28" style:family="text">
      <style:text-properties officeooo:rsid="00495b7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7c37aa"/>
    </style:style>
    <style:style style:name="T31" style:family="text">
      <style:text-properties officeooo:rsid="0011e120"/>
    </style:style>
    <style:style style:name="T32" style:family="text">
      <style:text-properties officeooo:rsid="004b3136"/>
    </style:style>
    <style:style style:name="T33" style:family="text">
      <style:text-properties officeooo:rsid="007a71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Zenone <text:span text:style-name="T33">e i suoi paradossi</text:span></text:p>
      <text:p text:style-name="P12">Zenone <text:s/>nacque ad Elea verso la fine del VI secolo a.C. Fu discepolo di Parmenide e suo successore alla Scuola. Uomo coraggiosissimo, dal temperamento focoso. Di lui si narra che contro il tiranno Nearco progettò una cospirazione. Catturato e sottoposto ad interrogatorio pare si fosse tagliato la lingua con i denti e l’avesse sputata in faccia al tiranno. Si tratta ovviamente di ricostruzioni al con<text:span text:style-name="T22">Zenone </text:span><text:span text:style-name="T23">e i suoi paradossi</text:span></text:p>
      <text:p text:style-name="P12">Zenone <text:s/>nacque ad Elea verso la fine del VI secolo a.C. Fu discepolo di Parmenide e suo successore alla Scuola. Uomo coraggiosissimo, dal temperamento focoso. Di lui si narra che contro il tiranno Nearco progettò una cospirazione. Catturato e sottoposto ad interrogatorio pare si fosse tagliato la lingua con i denti e l’avesse sputata in faccia al tiranno. Si tratta ovviamente di ricostruzioni al confine con il mito. Rendono tuttavia l’idea di un temperamento <text:span text:style-name="T32">mordace</text:span> e poco propenso al compromesso. Questo aspetto in qualche misura torna nelle sue dottrine. Fu tenace difensore delle teorie di Parmenide e non concesse nulla ai suoi avversari.</text:p>
      <text:p text:style-name="P20"><text:soft-page-break/>Le sue teorie furono probabilmente oggetto di molte critiche. <text:span text:style-name="T32">Ricordiamo che l’</text:span>essere di Parmenide, era immobile, eterno, immutabile, racchiuso in una sfera <text:span text:style-name="T32">e </text:span>anche unico. Le contestazioni più importanti riguardavano dunque il movimento e la molteplicità. Erano quelle che più contraddicevano la tangibilità dell’esperienza quotidiana. Quest’ultima era infatti stata ridotta da Parmenide a fonte di inganno. </text:p>
      <text:p text:style-name="P13">Il metodo con il quale Zenone procede alle sue dimostrazioni è confutatorio. Consiste nel dimostrare la falsità della tesi contraria alla propria. Ha una sua validità soltanto se si riconosce che per ogni posizione esiste una e una sola posizione contraria. Nello specifico l’operazione è quella di ridurre al paradosso <text:span text:style-name="T32">le argomentazioni </text:span>dell’avversario, in modo da impressionare l’interlocutore. Per questa ragione Aristotele lo considerò il fondatore della dialettica. In effetti di questo metodo si servirono più in là tanto i sofisti come Protagora o Gorgia, quanto lo stesso Socrate e Platone, <text:span text:style-name="T32">la cui argomentazione filosofica era fondata sul dialogo.</text:span></text:p>
      <text:p text:style-name="P13"><text:soft-page-break/>Le ragioni di questo modello argomentativo risiedono innanzitutto nel fatto che le affermazioni di Parmenide sono tautologiche<text:note text:id="ftn1" text:note-class="footnote"><text:note-citation>1</text:note-citation><text:note-body><text:p text:style-name="P3"><text:span text:style-name="T28">L</text:span>a tautologia è una figura retorica che si contraddistingue per il fatto di inserire un contenuto ripetitivo o quantomeno ridonante all’interno di una frase allo scopo di conferirle maggiore enfasi; in alcuni casi con essa non si fa altro che ribadire un qualcosa di ovvio (per esempio, la guerra è guerra); in sostanza può essere un argomento che nelle sue conclusioni ribadisce quello che già era implicito nella premessa oppure una frase che, nel predicato, non fa che ripetere inutilmente ciò che è già indicato nel soggetto.</text:p></text:note-body></text:note>. <text:s/>Dire che “l’essere è” è infatti un’affermazione sempre vera. A ben vedere queste affermazioni non vanno dunque dimostrate ma spiegate, <text:span text:style-name="T32">in quanto rappresentano </text:span>le premesse del ragionamento e per questa ragione non possono a loro volta essere dimostrate. </text:p>
      <text:p text:style-name="P13">Le implicazioni che si deducono dall’affermazione principale sono invece dette analitiche. Si limitano cioè a ricavare dalla definizione principale le sue proprietà fondamentali per scomposizione (o analisi) del concetto stesso. Legando assieme un concetto ad uno dei suoi predicati essenziali si ottengono proposizioni sempre vere e necessarie. <text:span text:style-name="T32">Un</text:span> esempio esplicativo <text:span text:style-name="T32">potrebbe essere questo</text:span>: se definiamo il concetto di "triangolo" come una figura geometrica con tre lati, allora possiamo legare il predicato "ha tre lati" al concetto di triangolo. In <text:soft-page-break/>questo modo, la proposizione "un triangolo ha tre lati" è sempre vera e necessaria, poiché è implicita nella definizione stessa del concetto di triangolo. Questo tipo di ragionamento è definito <text:span text:style-name="T12">analitico–deduttivo</text:span>. Né Parmenide, né lo stesso Zenone arrivarono così in là sulla via della teorizzazione logica. Bisognerà attendere Aristotele per definizioni così compiute. </text:p>
      <text:p text:style-name="P17">La salvaguardia dell’essere (e del ragionamento)</text:p>
      <text:p text:style-name="P12">Il problema posto dagli Eleati è dunque quello di giustificare la molteplicità, posta l’unità dell’essere<text:note text:id="ftn2" text:note-class="footnote"><text:note-citation>2</text:note-citation><text:note-body><text:p text:style-name="P1">Il problema filosofico della m<text:span text:style-name="T31">olteplicità</text:span> è avvertito già dai filosofi presocratici, e in partic<text:span text:style-name="T31">olare</text:span> nella scuola eleatica, che, nell’obiettivo di dimostrare l’unità dell’essere, elabora una serie di argomentazioni volte a mostrare le contraddizioni insite nel concetto stesso di molteplicità. Considerato l’ente parmenideo, soprattutto nel suo predicato di unità, esso viene infatti a contrapporsi al mondo delle cose apparenti, costituendo con quest’ultimo l’antitetico binomio dell’unità e della m<text:span text:style-name="T31">olteplicità</text:span>: Zenone dimostra quindi i paradossi derivanti dal presupposto della realtà molteplice. Tuttavia, già nella critica di Platone all’eleatismo zenoniano esposta nel Parmenide, si chiarisce come il carattere intrinsecamente contraddittorio della <text:span text:style-name="T31">molteplicità</text:span> si estenda sotto certi aspetti anche all’unità, che, se da un lato si contrappone assolutamente alla m<text:span text:style-name="T31">olteplicità</text:span>, dall’altro è anche suo elemento costitutivo, sia come unità base di ogni molteplice, sia come unità risultante dal complesso e facente sì che ogni m<text:span text:style-name="T31">olteplicità</text:span> sia allo stesso tempo <text:span text:style-name="Strong_20_Emphasis">‘una’</text:span> molteplicità. Questo problema che nel mondo antico si presenta come «problema dell’uno e dei molti», è così già chiaramente posto dal pensiero classico, il quale non riesce a risolverlo compiutamente in quanto considera unità e m<text:span text:style-name="T31">olteplicità </text:span>come egualmente oggettive e contrapposte al pensiero.</text:p><text:p text:style-name="P2"/></text:note-body></text:note>. Se le proprietà dell’essere sono <text:span text:style-name="T32">l’unicità e </text:span><text:soft-page-break/><text:span text:style-name="T32">l’immutabilità, la molteplicità delle cose che vediamo intorno a noi è solo illusione. Poiché </text:span>le affermazioni sull’essere, come detto, non hanno una vera dimostrazione, l’unica via per salvaguardarle dalle critiche dell’interlocutore è dimostrare la fallacia della posizione contrari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99cm" fo:margin-bottom="1.499cm" fo:margin-left="1.799cm" fo:margin-right="1.7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rado tafaro</meta:initial-creator>
    <meta:creation-date>2026-01-21T16:48:54.959560843</meta:creation-date>
    <dc:date>2026-01-21T17:14:20.559647408</dc:date>
    <dc:creator>corrado tafaro</dc:creator>
    <meta:editing-duration>PT25M2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5" meta:paragraph-count="11" meta:word-count="861" meta:character-count="5850" meta:non-whitespace-character-count="4995"/>
  </office:meta>
</office:document-meta>
</file>