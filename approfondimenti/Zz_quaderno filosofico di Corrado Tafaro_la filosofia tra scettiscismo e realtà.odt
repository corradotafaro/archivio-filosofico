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line-height="80%" fo:text-align="justify" style:justify-single-word="false"/>
      <style:text-properties style:font-name="Liberation Serif"/>
    </style:style>
    <style:style style:name="P2" style:family="paragraph" style:parent-style-name="Heading_20_4" style:master-page-name="Standard">
      <style:paragraph-properties fo:text-align="center" style:justify-single-word="false" style:page-number="15" fo:break-before="page"/>
      <style:text-properties style:font-name="Liberation Serif" fo:font-size="14pt" fo:font-style="normal" fo:font-weight="normal" officeooo:paragraph-rsid="000beaea" style:font-size-asian="14pt" style:font-style-asian="normal" style:font-weight-asian="normal" style:font-size-complex="14pt" style:font-style-complex="normal" style:font-weight-complex="normal"/>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beaea"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beaea" style:font-size-asian="14pt" style:font-size-complex="14pt"/>
    </style:style>
    <style:style style:name="P5" style:family="paragraph" style:parent-style-name="Standard">
      <style:paragraph-properties fo:line-height="115%" fo:text-align="justify" style:justify-single-word="false"/>
      <style:text-properties style:font-name="Liberation Serif" fo:font-size="14pt" officeooo:paragraph-rsid="000beaea" style:font-size-asian="14pt" style:font-size-complex="14pt"/>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011735" officeooo:paragraph-rsid="000beaea" style:font-size-asian="14pt" style:font-size-complex="14pt"/>
    </style:style>
    <style:style style:name="P7"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011735" officeooo:paragraph-rsid="000beaea" style:font-size-asian="14pt" style:font-size-complex="14pt"/>
    </style:style>
    <style:style style:name="P8"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officeooo:rsid="0018abec" officeooo:paragraph-rsid="000beaea" style:font-size-asian="14pt" style:font-style-asian="normal" style:font-size-complex="14pt" style:font-style-complex="normal"/>
    </style:style>
    <style:style style:name="P9"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officeooo:rsid="0018abec" officeooo:paragraph-rsid="000beaea" style:font-size-asian="14pt" style:font-style-asian="normal" style:font-size-complex="14pt" style:font-style-complex="normal"/>
    </style:style>
    <style:style style:name="P10"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rsid="0018abec" officeooo:paragraph-rsid="000beaea" style:font-size-asian="14pt" style:font-style-asian="normal" style:font-size-complex="14pt" style:font-style-complex="normal"/>
    </style:style>
    <style:style style:name="P11"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officeooo:paragraph-rsid="000beaea" style:font-size-asian="14pt" style:font-style-asian="normal" style:font-size-complex="14pt" style:font-style-complex="normal"/>
    </style:style>
    <style:style style:name="P12"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officeooo:paragraph-rsid="000beaea" style:font-size-asian="14pt" style:font-style-asian="normal" style:font-size-complex="14pt" style:font-style-complex="normal"/>
    </style:style>
    <style:style style:name="P13"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Liberation Serif" fo:font-size="14pt" fo:font-style="normal" officeooo:paragraph-rsid="000beaea" style:font-size-asian="14pt" style:font-style-asian="normal" style:font-size-complex="14pt" style:font-style-complex="normal"/>
    </style:style>
    <style:style style:name="P14"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bold" officeooo:rsid="001ab9ac" officeooo:paragraph-rsid="000beaea" style:font-size-asian="14pt" style:font-style-asian="normal" style:font-weight-asian="bold" style:font-size-complex="14pt" style:font-style-complex="normal" style:font-weight-complex="bold"/>
    </style:style>
    <style:style style:name="P15"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bold" officeooo:rsid="001ab9ac" officeooo:paragraph-rsid="000beaea" style:font-size-asian="14pt" style:font-style-asian="normal" style:font-weight-asian="bold" style:font-size-complex="14pt" style:font-style-complex="normal" style:font-weight-complex="bold"/>
    </style:style>
    <style:style style:name="P16"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bold" officeooo:rsid="001ab9ac" officeooo:paragraph-rsid="000beaea" style:font-size-asian="14pt" style:font-style-asian="normal" style:font-weight-asian="bold" style:font-size-complex="14pt" style:font-style-complex="normal" style:font-weight-complex="bold"/>
    </style:style>
    <style:style style:name="P17"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bold" officeooo:rsid="00209e56" officeooo:paragraph-rsid="000beaea" style:font-size-asian="14pt" style:font-style-asian="normal" style:font-weight-asian="bold" style:font-size-complex="14pt" style:font-style-complex="normal" style:font-weight-complex="bold"/>
    </style:style>
    <style:style style:name="P18"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bold" officeooo:rsid="00262152" officeooo:paragraph-rsid="000beaea" style:font-size-asian="14pt" style:font-style-asian="normal" style:font-weight-asian="bold" style:font-size-complex="14pt" style:font-style-complex="normal" style:font-weight-complex="bold"/>
    </style:style>
    <style:style style:name="P19"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bold" officeooo:rsid="00262152" officeooo:paragraph-rsid="000beaea" style:font-size-asian="14pt" style:font-style-asian="normal" style:font-weight-asian="bold" style:font-size-complex="14pt" style:font-style-complex="normal" style:font-weight-complex="bold"/>
    </style:style>
    <style:style style:name="P20"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bold" officeooo:rsid="00262152" officeooo:paragraph-rsid="000beaea" style:font-size-asian="14pt" style:font-style-asian="normal" style:font-weight-asian="bold" style:font-size-complex="14pt" style:font-style-complex="normal" style:font-weight-complex="bold"/>
    </style:style>
    <style:style style:name="P21"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1ab9ac" officeooo:paragraph-rsid="000beaea" style:font-size-asian="14pt" style:font-style-asian="normal" style:font-weight-asian="normal" style:font-size-complex="14pt" style:font-style-complex="normal" style:font-weight-complex="normal"/>
    </style:style>
    <style:style style:name="P22"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1ab9ac" officeooo:paragraph-rsid="000beaea" style:font-size-asian="14pt" style:font-style-asian="normal" style:font-weight-asian="normal" style:font-size-complex="14pt" style:font-style-complex="normal" style:font-weight-complex="normal"/>
    </style:style>
    <style:style style:name="P23"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Liberation Serif" fo:font-size="14pt" fo:font-style="normal" fo:font-weight="normal" officeooo:rsid="001c74a7" officeooo:paragraph-rsid="000beaea" style:font-size-asian="14pt" style:font-style-asian="normal" style:font-weight-asian="normal" style:font-size-complex="14pt" style:font-style-complex="normal" style:font-weight-complex="normal"/>
    </style:style>
    <style:style style:name="P24"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1c74a7" officeooo:paragraph-rsid="000beaea" style:font-size-asian="14pt" style:font-style-asian="normal" style:font-weight-asian="normal" style:font-size-complex="14pt" style:font-style-complex="normal" style:font-weight-complex="normal"/>
    </style:style>
    <style:style style:name="P25"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1c74a7" officeooo:paragraph-rsid="000beaea" style:font-size-asian="14pt" style:font-style-asian="normal" style:font-weight-asian="normal" style:font-size-complex="14pt" style:font-style-complex="normal"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1c74a7" officeooo:paragraph-rsid="000beaea" style:font-size-asian="14pt" style:font-style-asian="normal" style:font-weight-asian="normal" style:font-size-complex="14pt" style:font-style-complex="normal" style:font-weight-complex="normal"/>
    </style:style>
    <style:style style:name="P27"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209e56" officeooo:paragraph-rsid="000beaea" style:font-size-asian="14pt" style:font-style-asian="normal" style:font-weight-asian="normal" style:font-size-complex="14pt" style:font-style-complex="normal" style:font-weight-complex="normal"/>
    </style:style>
    <style:style style:name="P28"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09e56" officeooo:paragraph-rsid="000beaea" style:font-size-asian="14pt" style:font-style-asian="normal" style:font-weight-asian="normal" style:font-size-complex="14pt" style:font-style-complex="normal" style:font-weight-complex="normal"/>
    </style:style>
    <style:style style:name="P29"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10ec10" officeooo:paragraph-rsid="000beaea" style:font-size-asian="14pt" style:font-style-asian="normal" style:font-weight-asian="normal" style:font-size-complex="14pt" style:font-style-complex="normal" style:font-weight-complex="normal"/>
    </style:style>
    <style:style style:name="P30"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232d7c" officeooo:paragraph-rsid="000beaea" style:font-size-asian="14pt" style:font-style-asian="normal" style:font-weight-asian="normal" style:font-size-complex="14pt" style:font-style-complex="normal" style:font-weight-complex="normal"/>
    </style:style>
    <style:style style:name="P31" style:family="paragraph" style:parent-style-name="Standard">
      <style:paragraph-properties fo:margin-top="0cm" fo:margin-bottom="0cm" style:contextual-spacing="false" fo:line-height="115%" fo:text-align="justify" style:justify-single-word="false"/>
      <style:text-properties style:font-name="Liberation Serif" fo:font-size="14pt" fo:font-style="normal" fo:font-weight="normal" officeooo:rsid="00262152" officeooo:paragraph-rsid="000beaea" style:font-size-asian="14pt" style:font-style-asian="normal" style:font-weight-asian="normal" style:font-size-complex="14pt" style:font-style-complex="normal" style:font-weight-complex="normal"/>
    </style:style>
    <style:style style:name="P32"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262152" officeooo:paragraph-rsid="000beaea" style:font-size-asian="14pt" style:font-style-asian="normal" style:font-weight-asian="normal" style:font-size-complex="14pt" style:font-style-complex="normal" style:font-weight-complex="normal"/>
    </style:style>
    <style:style style:name="P33"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fo:font-weight="normal" officeooo:rsid="00262152" officeooo:paragraph-rsid="000beaea" style:font-size-asian="14pt" style:font-style-asian="normal" style:font-weight-asian="normal" style:font-size-complex="14pt" style:font-style-complex="normal" style:font-weight-complex="normal"/>
    </style:style>
    <style:style style:name="P34"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2a4d67" officeooo:paragraph-rsid="000beaea" style:font-size-asian="14pt" style:font-style-asian="normal" style:font-weight-asian="normal" style:font-size-complex="14pt" style:font-style-complex="normal" style:font-weight-complex="normal"/>
    </style:style>
    <style:style style:name="P35"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fo:font-weight="normal" officeooo:rsid="002c9788" officeooo:paragraph-rsid="000beaea" style:font-size-asian="14pt" style:font-style-asian="normal" style:font-weight-asian="normal" style:font-size-complex="14pt" style:font-style-complex="normal" style:font-weight-complex="normal"/>
    </style:style>
    <style:style style:name="T1" style:family="text">
      <style:text-properties officeooo:rsid="00039505"/>
    </style:style>
    <style:style style:name="T2" style:family="text">
      <style:text-properties officeooo:rsid="00058855"/>
    </style:style>
    <style:style style:name="T3" style:family="text">
      <style:text-properties officeooo:rsid="00199bb5"/>
    </style:style>
    <style:style style:name="T4" style:family="text">
      <style:text-properties officeooo:rsid="00011735"/>
    </style:style>
    <style:style style:name="T5" style:family="text">
      <style:text-properties officeooo:rsid="001f8875"/>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19263b" style:font-size-asian="11pt" style:font-weight-asian="bold" style:font-size-complex="11pt" style:font-weight-complex="bold"/>
    </style:style>
    <style:style style:name="T8" style:family="text">
      <style:text-properties fo:font-size="11pt" fo:font-weight="bold" officeooo:rsid="00011735" style:font-size-asian="11pt" style:font-weight-asian="bold" style:font-size-complex="11pt" style:font-weight-complex="bold"/>
    </style:style>
    <style:style style:name="T9" style:family="text">
      <style:text-properties fo:font-size="11pt" fo:font-weight="bold" officeooo:rsid="001ab9ac" style:font-size-asian="11pt" style:font-weight-asian="bold" style:font-size-complex="11pt" style:font-weight-complex="bold"/>
    </style:style>
    <style:style style:name="T10" style:family="text">
      <style:text-properties fo:font-size="11pt" fo:font-weight="bold" officeooo:rsid="001dc308" style:font-size-asian="11pt" style:font-weight-asian="bold" style:font-size-complex="11pt" style:font-weight-complex="bold"/>
    </style:style>
    <style:style style:name="T11" style:family="text">
      <style:text-properties fo:font-size="11pt" fo:font-weight="bold" officeooo:rsid="001e661a" style:font-size-asian="11pt" style:font-weight-asian="bold" style:font-size-complex="11pt" style:font-weight-complex="bold"/>
    </style:style>
    <style:style style:name="T12" style:family="text">
      <style:text-properties fo:font-size="11pt" fo:font-weight="bold" officeooo:rsid="0027a4cb" style:font-size-asian="11pt" style:font-weight-asian="bold" style:font-size-complex="11pt" style:font-weight-complex="bold"/>
    </style:style>
    <style:style style:name="T13" style:family="text">
      <style:text-properties fo:font-size="11pt" fo:font-weight="bold" officeooo:rsid="002a4d67" style:font-size-asian="11pt" style:font-weight-asian="bold" style:font-size-complex="11pt" style:font-weight-complex="bold"/>
    </style:style>
    <style:style style:name="T14" style:family="text">
      <style:text-properties fo:font-size="11pt" fo:font-weight="bold" officeooo:rsid="0017bcdb" style:font-size-asian="11pt" style:font-weight-asian="bold" style:font-size-complex="11pt" style:font-weight-complex="bold"/>
    </style:style>
    <style:style style:name="T15" style:family="text">
      <style:text-properties fo:font-size="11pt" fo:font-style="normal" fo:font-weight="bold" style:font-size-asian="11pt" style:font-style-asian="normal" style:font-weight-asian="bold" style:font-size-complex="11pt" style:font-style-complex="normal" style:font-weight-complex="bold"/>
    </style:style>
    <style:style style:name="T16" style:family="text">
      <style:text-properties fo:font-size="11pt" fo:font-style="normal" fo:font-weight="bold" officeooo:rsid="0018abec" style:font-size-asian="11pt" style:font-style-asian="normal" style:font-weight-asian="bold" style:font-size-complex="11pt" style:font-style-complex="normal" style:font-weight-complex="bold"/>
    </style:style>
    <style:style style:name="T17" style:family="text">
      <style:text-properties officeooo:rsid="001b62b9"/>
    </style:style>
    <style:style style:name="T18" style:family="text">
      <style:text-properties officeooo:rsid="002313c9"/>
    </style:style>
    <style:style style:name="T19" style:family="text">
      <style:text-properties officeooo:rsid="0024e3db"/>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ize="12pt" fo:font-style="normal" officeooo:rsid="0018abec" style:font-size-asian="12pt" style:font-style-asian="normal" style:font-size-complex="12pt" style:font-style-complex="normal"/>
    </style:style>
    <style:style style:name="T22" style:family="text">
      <style:text-properties fo:font-size="12pt" fo:font-style="normal" officeooo:rsid="001b62b9" style:font-size-asian="12pt" style:font-style-asian="normal" style:font-size-complex="12pt" style:font-style-complex="normal"/>
    </style:style>
    <style:style style:name="T23" style:family="text">
      <style:text-properties fo:font-size="12pt" fo:font-style="normal" officeooo:rsid="001f8875" style:font-size-asian="12pt" style:font-style-asian="normal" style:font-size-complex="12pt" style:font-style-complex="normal"/>
    </style:style>
    <style:style style:name="T24" style:family="text">
      <style:text-properties fo:font-size="12pt" fo:font-style="normal" officeooo:rsid="0024e3db" style:font-size-asian="12pt" style:font-style-asian="normal" style:font-size-complex="12pt" style:font-style-complex="normal"/>
    </style:style>
    <style:style style:name="T25" style:family="text">
      <style:text-properties fo:font-size="12pt" style:font-size-asian="12pt" style:font-size-complex="12pt"/>
    </style:style>
    <style:style style:name="T26" style:family="text">
      <style:text-properties fo:font-size="12pt" officeooo:rsid="0018c04c"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0f657b" style:font-size-asian="12pt" style:font-weight-asian="normal" style:font-size-complex="12pt" style:font-weight-complex="normal"/>
    </style:style>
    <style:style style:name="T29" style:family="text">
      <style:text-properties fo:font-size="12pt" fo:font-weight="normal" officeooo:rsid="0010ec10" style:font-size-asian="12pt" style:font-weight-asian="normal" style:font-size-complex="12pt" style:font-weight-complex="normal"/>
    </style:style>
    <style:style style:name="T30" style:family="text">
      <style:text-properties fo:font-size="12pt" fo:font-weight="normal" officeooo:rsid="0021817a" style:font-size-asian="12pt" style:font-weight-asian="normal" style:font-size-complex="12pt" style:font-weight-complex="normal"/>
    </style:style>
    <style:style style:name="T31" style:family="text">
      <style:text-properties fo:font-size="12pt" fo:font-weight="normal" officeooo:rsid="00115d2b" style:font-size-asian="12pt" style:font-weight-asian="normal" style:font-size-complex="12pt" style:font-weight-complex="normal"/>
    </style:style>
    <style:style style:name="T32" style:family="text">
      <style:text-properties fo:font-size="12pt" fo:font-weight="normal" officeooo:rsid="0021ef05" style:font-size-asian="12pt" style:font-weight-asian="normal" style:font-size-complex="12pt" style:font-weight-complex="normal"/>
    </style:style>
    <style:style style:name="T33" style:family="text">
      <style:text-properties fo:font-size="12pt" fo:font-weight="normal" officeooo:rsid="0031a9b7" style:font-size-asian="12pt" style:font-weight-asian="normal" style:font-size-complex="12pt" style:font-weight-complex="normal"/>
    </style:style>
    <style:style style:name="T34" style:family="text">
      <style:text-properties fo:font-size="12pt" fo:font-weight="normal" officeooo:rsid="003393c0" style:font-size-asian="12pt" style:font-weight-asian="normal" style:font-size-complex="12pt" style:font-weight-complex="normal"/>
    </style:style>
    <style:style style:name="T35" style:family="text">
      <style:text-properties fo:font-size="12pt" fo:font-weight="normal" officeooo:rsid="00125b8c" style:font-size-asian="12pt" style:font-weight-asian="normal" style:font-size-complex="12pt" style:font-weight-complex="normal"/>
    </style:style>
    <style:style style:name="T36" style:family="text">
      <style:text-properties fo:font-size="12pt" fo:font-weight="normal" officeooo:rsid="00232d7c" style:font-size-asian="12pt" style:font-weight-asian="normal" style:font-size-complex="12pt" style:font-weight-complex="normal"/>
    </style:style>
    <style:style style:name="T37" style:family="text">
      <style:text-properties fo:font-size="12pt" fo:font-weight="normal" officeooo:rsid="0065d2b1" style:font-size-asian="12pt" style:font-weight-asian="normal" style:font-size-complex="12pt" style:font-weight-complex="normal"/>
    </style:style>
    <style:style style:name="T38" style:family="text">
      <style:text-properties fo:font-size="12pt" fo:font-weight="normal" officeooo:rsid="0013529c" style:font-size-asian="12pt" style:font-weight-asian="normal" style:font-size-complex="12pt" style:font-weight-complex="normal"/>
    </style:style>
    <style:style style:name="T39" style:family="text">
      <style:text-properties fo:font-size="12pt" fo:font-weight="normal" officeooo:rsid="002489b1" style:font-size-asian="12pt" style:font-weight-asian="normal" style:font-size-complex="12pt" style:font-weight-complex="normal"/>
    </style:style>
    <style:style style:name="T40" style:family="text">
      <style:text-properties fo:font-size="12pt" fo:font-weight="normal" officeooo:rsid="0013a62e" style:font-size-asian="12pt" style:font-weight-asian="normal" style:font-size-complex="12pt" style:font-weight-complex="normal"/>
    </style:style>
    <style:style style:name="T41" style:family="text">
      <style:text-properties fo:font-size="12pt" fo:font-weight="normal" officeooo:rsid="0037b7c6" style:font-size-asian="12pt" style:font-weight-asian="normal" style:font-size-complex="12pt" style:font-weight-complex="normal"/>
    </style:style>
    <style:style style:name="T42" style:family="text">
      <style:text-properties fo:font-size="12pt" fo:font-weight="normal" officeooo:rsid="00262152" style:font-size-asian="12pt" style:font-weight-asian="normal" style:font-size-complex="12pt" style:font-weight-complex="normal"/>
    </style:style>
    <style:style style:name="T43" style:family="text">
      <style:text-properties fo:font-size="12pt" fo:font-weight="normal" officeooo:rsid="00676bb8" style:font-size-asian="12pt" style:font-weight-asian="normal" style:font-size-complex="12pt" style:font-weight-complex="normal"/>
    </style:style>
    <style:style style:name="T44" style:family="text">
      <style:text-properties fo:font-size="12pt" fo:font-weight="normal" officeooo:rsid="00279f51" style:font-size-asian="12pt" style:font-weight-asian="normal" style:font-size-complex="12pt" style:font-weight-complex="normal"/>
    </style:style>
    <style:style style:name="T45" style:family="text">
      <style:text-properties fo:font-size="12pt" fo:font-weight="normal" officeooo:rsid="0038e883" style:font-size-asian="12pt" style:font-weight-asian="normal" style:font-size-complex="12pt" style:font-weight-complex="normal"/>
    </style:style>
    <style:style style:name="T46" style:family="text">
      <style:text-properties fo:font-size="12pt" fo:font-weight="normal" officeooo:rsid="0067bb2d" style:font-size-asian="12pt" style:font-weight-asian="normal" style:font-size-complex="12pt" style:font-weight-complex="normal"/>
    </style:style>
    <style:style style:name="T47" style:family="text">
      <style:text-properties fo:font-size="12pt" fo:font-weight="normal" officeooo:rsid="00152317" style:font-size-asian="12pt" style:font-weight-asian="normal" style:font-size-complex="12pt" style:font-weight-complex="normal"/>
    </style:style>
    <style:style style:name="T48" style:family="text">
      <style:text-properties fo:font-size="12pt" fo:font-weight="normal" officeooo:rsid="0069c2fa" style:font-size-asian="12pt" style:font-weight-asian="normal" style:font-size-complex="12pt" style:font-weight-complex="normal"/>
    </style:style>
    <style:style style:name="T49" style:family="text">
      <style:text-properties fo:font-size="12pt" fo:font-weight="normal" officeooo:rsid="001c74a7" style:font-size-asian="10.5pt" style:font-weight-asian="normal" style:font-size-complex="12pt" style:font-weight-complex="normal"/>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font-weight="bold" style:font-weight-asian="bold" style:font-weight-complex="bold"/>
    </style:style>
    <style:style style:name="T52" style:family="text">
      <style:text-properties fo:font-weight="bold" officeooo:rsid="0018c04c" style:font-weight-asian="bold" style:font-weight-complex="bold"/>
    </style:style>
    <style:style style:name="T53" style:family="text">
      <style:text-properties fo:font-weight="bold" officeooo:rsid="00011735" style:font-weight-asian="bold" style:font-weight-complex="bold"/>
    </style:style>
    <style:style style:name="T54" style:family="text">
      <style:text-properties fo:font-weight="bold" officeooo:rsid="0019263b" style:font-weight-asian="bold" style:font-weight-complex="bold"/>
    </style:style>
    <style:style style:name="T55" style:family="text">
      <style:text-properties fo:font-weight="bold" officeooo:rsid="001ab9ac" style:font-weight-asian="bold" style:font-weight-complex="bold"/>
    </style:style>
    <style:style style:name="T56" style:family="text">
      <style:text-properties fo:font-weight="bold" officeooo:rsid="001dc308" style:font-weight-asian="bold" style:font-weight-complex="bold"/>
    </style:style>
    <style:style style:name="T57" style:family="text">
      <style:text-properties fo:font-weight="bold" officeooo:rsid="001e661a" style:font-weight-asian="bold" style:font-weight-complex="bold"/>
    </style:style>
    <style:style style:name="T58" style:family="text">
      <style:text-properties fo:font-weight="bold" officeooo:rsid="0027a4cb" style:font-weight-asian="bold" style:font-weight-complex="bold"/>
    </style:style>
    <style:style style:name="T59" style:family="text">
      <style:text-properties fo:font-weight="bold" officeooo:rsid="002a4d67" style:font-weight-asian="bold" style:font-weight-complex="bold"/>
    </style:style>
    <style:style style:name="T60" style:family="text">
      <style:text-properties fo:font-weight="bold" officeooo:rsid="0017bcdb" style:font-weight-asian="bold" style:font-weight-complex="bold"/>
    </style:style>
    <style:style style:name="T61" style:family="text">
      <style:text-properties officeooo:rsid="0018c04c"/>
    </style:style>
    <style:style style:name="T62" style:family="text">
      <style:text-properties officeooo:rsid="0019263b"/>
    </style:style>
    <style:style style:name="T63" style:family="text">
      <style:text-properties fo:font-style="italic"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officeooo:rsid="0007014a"/>
    </style:style>
    <style:style style:name="T66" style:family="text">
      <style:text-properties officeooo:rsid="001ab9ac"/>
    </style:style>
    <style:style style:name="T67" style:family="text">
      <style:text-properties officeooo:rsid="000aaa0e"/>
    </style:style>
    <style:style style:name="T68" style:family="text">
      <style:text-properties officeooo:rsid="001c828a"/>
    </style:style>
    <style:style style:name="T69" style:family="text">
      <style:text-properties officeooo:rsid="000c03b0"/>
    </style:style>
    <style:style style:name="T70" style:family="text">
      <style:text-properties officeooo:rsid="001dc308"/>
    </style:style>
    <style:style style:name="T71" style:family="text">
      <style:text-properties officeooo:rsid="000d804c"/>
    </style:style>
    <style:style style:name="T72" style:family="text">
      <style:text-properties officeooo:rsid="001e661a"/>
    </style:style>
    <style:style style:name="T73" style:family="text">
      <style:text-properties officeooo:rsid="000f657b"/>
    </style:style>
    <style:style style:name="T74" style:family="text">
      <style:text-properties officeooo:rsid="0021817a"/>
    </style:style>
    <style:style style:name="T75" style:family="text">
      <style:text-properties officeooo:rsid="0021ef05"/>
    </style:style>
    <style:style style:name="T76" style:family="text">
      <style:text-properties officeooo:rsid="00232d7c"/>
    </style:style>
    <style:style style:name="T77" style:family="text">
      <style:text-properties officeooo:rsid="0035c87e"/>
    </style:style>
    <style:style style:name="T78" style:family="text">
      <style:text-properties officeooo:rsid="002489b1"/>
    </style:style>
    <style:style style:name="T79" style:family="text">
      <style:text-properties officeooo:rsid="00262152"/>
    </style:style>
    <style:style style:name="T80" style:family="text">
      <style:text-properties officeooo:rsid="00279f51"/>
    </style:style>
    <style:style style:name="T81" style:family="text">
      <style:text-properties officeooo:rsid="0027a4cb"/>
    </style:style>
    <style:style style:name="T82" style:family="text">
      <style:text-properties officeooo:rsid="002a4d67"/>
    </style:style>
    <style:style style:name="T83" style:family="text">
      <style:text-properties officeooo:rsid="001704cd"/>
    </style:style>
    <style:style style:name="T84" style:family="text">
      <style:text-properties fo:font-weight="normal" style:font-weight-asian="normal" style:font-weight-complex="normal"/>
    </style:style>
    <style:style style:name="T85" style:family="text">
      <style:text-properties fo:font-weight="normal" officeooo:rsid="001c74a7" style:font-weight-asian="normal" style:font-weight-complex="normal"/>
    </style:style>
    <style:style style:name="T86" style:family="text">
      <style:text-properties fo:font-weight="normal" officeooo:rsid="000f657b" style:font-weight-asian="normal" style:font-weight-complex="normal"/>
    </style:style>
    <style:style style:name="T87" style:family="text">
      <style:text-properties fo:font-weight="normal" officeooo:rsid="0010ec10" style:font-weight-asian="normal" style:font-weight-complex="normal"/>
    </style:style>
    <style:style style:name="T88" style:family="text">
      <style:text-properties fo:font-weight="normal" officeooo:rsid="0021817a" style:font-weight-asian="normal" style:font-weight-complex="normal"/>
    </style:style>
    <style:style style:name="T89" style:family="text">
      <style:text-properties fo:font-weight="normal" officeooo:rsid="00115d2b" style:font-weight-asian="normal" style:font-weight-complex="normal"/>
    </style:style>
    <style:style style:name="T90" style:family="text">
      <style:text-properties fo:font-weight="normal" officeooo:rsid="0021ef05" style:font-weight-asian="normal" style:font-weight-complex="normal"/>
    </style:style>
    <style:style style:name="T91" style:family="text">
      <style:text-properties fo:font-weight="normal" officeooo:rsid="0031a9b7" style:font-weight-asian="normal" style:font-weight-complex="normal"/>
    </style:style>
    <style:style style:name="T92" style:family="text">
      <style:text-properties fo:font-weight="normal" officeooo:rsid="003393c0" style:font-weight-asian="normal" style:font-weight-complex="normal"/>
    </style:style>
    <style:style style:name="T93" style:family="text">
      <style:text-properties fo:font-weight="normal" officeooo:rsid="00125b8c" style:font-weight-asian="normal" style:font-weight-complex="normal"/>
    </style:style>
    <style:style style:name="T94" style:family="text">
      <style:text-properties fo:font-weight="normal" officeooo:rsid="00232d7c" style:font-weight-asian="normal" style:font-weight-complex="normal"/>
    </style:style>
    <style:style style:name="T95" style:family="text">
      <style:text-properties fo:font-weight="normal" officeooo:rsid="0065d2b1" style:font-weight-asian="normal" style:font-weight-complex="normal"/>
    </style:style>
    <style:style style:name="T96" style:family="text">
      <style:text-properties fo:font-weight="normal" officeooo:rsid="0013529c" style:font-weight-asian="normal" style:font-weight-complex="normal"/>
    </style:style>
    <style:style style:name="T97" style:family="text">
      <style:text-properties fo:font-weight="normal" officeooo:rsid="002489b1" style:font-weight-asian="normal" style:font-weight-complex="normal"/>
    </style:style>
    <style:style style:name="T98" style:family="text">
      <style:text-properties fo:font-weight="normal" officeooo:rsid="0013a62e" style:font-weight-asian="normal" style:font-weight-complex="normal"/>
    </style:style>
    <style:style style:name="T99" style:family="text">
      <style:text-properties fo:font-weight="normal" officeooo:rsid="0037b7c6" style:font-weight-asian="normal" style:font-weight-complex="normal"/>
    </style:style>
    <style:style style:name="T100" style:family="text">
      <style:text-properties fo:font-weight="normal" officeooo:rsid="00262152" style:font-weight-asian="normal" style:font-weight-complex="normal"/>
    </style:style>
    <style:style style:name="T101" style:family="text">
      <style:text-properties fo:font-weight="normal" officeooo:rsid="00676bb8" style:font-weight-asian="normal" style:font-weight-complex="normal"/>
    </style:style>
    <style:style style:name="T102" style:family="text">
      <style:text-properties fo:font-weight="normal" officeooo:rsid="00279f51" style:font-weight-asian="normal" style:font-weight-complex="normal"/>
    </style:style>
    <style:style style:name="T103" style:family="text">
      <style:text-properties fo:font-weight="normal" officeooo:rsid="0038e883" style:font-weight-asian="normal" style:font-weight-complex="normal"/>
    </style:style>
    <style:style style:name="T104" style:family="text">
      <style:text-properties fo:font-weight="normal" officeooo:rsid="0067bb2d" style:font-weight-asian="normal" style:font-weight-complex="normal"/>
    </style:style>
    <style:style style:name="T105" style:family="text">
      <style:text-properties fo:font-weight="normal" officeooo:rsid="00152317" style:font-weight-asian="normal" style:font-weight-complex="normal"/>
    </style:style>
    <style:style style:name="T106" style:family="text">
      <style:text-properties fo:font-weight="normal" officeooo:rsid="0069c2fa" style:font-weight-asian="normal" style:font-weight-complex="normal"/>
    </style:style>
    <style:style style:name="T107" style:family="text">
      <style:text-properties officeooo:rsid="0017bcdb"/>
    </style:style>
    <style:style style:name="T108" style:family="text">
      <style:text-properties fo:font-style="normal" style:font-style-asian="normal" style:font-style-complex="normal"/>
    </style:style>
    <style:style style:name="T109" style:family="text">
      <style:text-properties fo:font-style="normal" officeooo:rsid="0018abec" style:font-style-asian="normal" style:font-style-complex="normal"/>
    </style:style>
    <style:style style:name="T110" style:family="text">
      <style:text-properties fo:font-style="normal" officeooo:rsid="001b62b9" style:font-style-asian="normal" style:font-style-complex="normal"/>
    </style:style>
    <style:style style:name="T111" style:family="text">
      <style:text-properties fo:font-style="normal" officeooo:rsid="001f8875" style:font-style-asian="normal" style:font-style-complex="normal"/>
    </style:style>
    <style:style style:name="T112" style:family="text">
      <style:text-properties fo:font-style="normal" officeooo:rsid="0024e3db"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18abec"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bookmark-start text:name="__RefHeading___Toc4097_3560524389"/>La filosofia tra scetticismo e realtà<text:bookmark-end text:name="__RefHeading___Toc4097_3560524389"/></text:h>
      <text:p text:style-name="P3">In un salottino privato, intimo e accogliente, due vec­chi amici si ritrovano dopo molto tempo. Uno, con la calma e la riflessività di chi ha dedicato la propria vita professionale alla filosofia, si appoggia alla poltrona con un sorriso affettuoso. L'altro, con l'entusiasmo di chi ha trovato il tempo, nonostante le pieghe della vita, per dedicarsi allo studio di questa disciplina, lo osserva con una certa complicità e curiosità, <text:span text:style-name="T1">ma </text:span><text:span text:style-name="T2">anche </text:span><text:span text:style-name="T1">deciso ad </text:span><text:span text:style-name="T3">affrontare una discussione sul ruolo della filosofia oggi, con </text:span><text:span text:style-name="T1">una </text:span><text:span text:style-name="T3">lieve e </text:span><text:span text:style-name="T1">sana provocazione. </text:span></text:p>
      <text:p text:style-name="P4">La stanza, arredata con scaffali carichi di libri, è attra­versata da una luce soffusa che accompagna il ritmo tranquillo della conversazione. Dopo un momento di silenzio, interrotto solo dal tintinnio delle tazze di tè, il neofita <text:span text:style-name="T4">(che chiameremo Corrado)</text:span> posa la sua tazza e si rivolge all’amico con un’espressione pensierosa:</text:p>
      <text:p text:style-name="P4">"Dimmi, amico <text:span text:style-name="T5">mio</text:span>, quale pensi che sia il ruolo della filosofia nel risolvere o almeno nel comprendere le difficoltà del vivere? Mi domando se sia una guida uni­versale o piuttosto un sentiero riservato solo a chi ha la fortuna di potervi accedere."</text:p>
      <text:p text:style-name="P5">L'amico, con un sorriso caldo e una punta di ironia negli occhi, risponde: "Ah, la tua è una domanda che sembra semplice, ma che porta con sé il peso di secoli di riflessione. La filosofia, mio caro, non offre soluzioni <text:soft-page-break/>confezionate, ma ci insegna come abbracciare la com­plessità delle domande stesse. Ma dimmi, cosa ti ha spinto ad approfondirla, dopo tutto questo tempo?"</text:p>
      <text:p text:style-name="P6"><text:span text:style-name="T51">Corrado</text:span>: <text:s/><text:span text:style-name="T17">Mi sono avvicinato alla filosofia diversi anni </text:span><text:span text:style-name="T18">or sono, </text:span><text:span text:style-name="T17">quando, attraversando un periodo critico della mia vita, ne cercavo delle possibili soluzioni </text:span><text:span text:style-name="T19">per venirne fuori</text:span><text:span text:style-name="T17">. Le letture su Seneca sono state utili, altre un po’ meno, anche noiose, tanto da </text:span><text:span text:style-name="T109">riman</text:span><text:span text:style-name="T110">ere un </text:span><text:span text:style-name="T111">p</text:span><text:span text:style-name="T112">o’</text:span><text:span text:style-name="T111"> </text:span><text:span text:style-name="T109">scettico sul valore della filosofia che si possa ap­plicare </text:span><text:span text:style-name="T112">per risolvere </text:span><text:span text:style-name="T109">i problemi della vita quotidiana. </text:span><text:span text:style-name="T108">S</text:span><text:span text:style-name="T109">ono convinto che tutte queste discussioni, tutti questi ragionamenti, tutte queste riflessioni, acute quanto si voglia, non portano a nessuna conclusione; i nostri veri problemi rimangono, come sempre, inso­luti; meglio è rinunziare a proporseli.</text:span></text:p>
      <text:p text:style-name="P6"><text:span text:style-name="T114">L</text:span><text:span text:style-name="T113">'amico filosofo</text:span><text:span text:style-name="T108">: </text:span><text:span text:style-name="T109">Capisco il tuo scetticismo, Corrado. È vero che la filosofia a volte può sembrare un esercizio di astrazione, distante dai problemi concreti. Ma per­mettimi di proporre un punto di vista diverso: la filosofia non è sempre orientata a fornire soluzioni de­finitive ai problemi, bensì a offrirci strumenti per com­prendere meglio la realtà, noi stessi e le nostre rela­zioni con il mondo. E, in fondo, non è anche questa una forma di aiuto per affrontare i nostri problemi quotidiani?</text:span></text:p>
      <text:p text:style-name="P8">Prendiamo per esempio i pensieri di filosofi come Socrate, che ci esortava a mettere in discussione le <text:soft-page-break/>nostre certezze. Questo atteggiamento critico può aiutarti a vedere le tue sfide sotto una luce diversa e forse a trovare nuove strade da percorrere. Oppure considera la "logoterapia" di Viktor Frankl, che esplora il significato come fonte di resilienza. Anche nei mo­menti più difficili, tale ricerca del significato può offrir­ti una forza concreta e pratica.</text:p>
      <text:p text:style-name="P7"><text:span text:style-name="T109">La filosofia non cancella i problemi, è vero, ma li ridefi­nisce, ci dà un linguaggio per discuterne e ci invita a guardare oltre le soluzioni immediate. In qualche modo, ci rende più preparati ad affrontare l'incertezza e la complessità della vita. Non è proprio questo, in fondo, ciò di cui abbiamo spesso bisogno?</text:span><text:span text:style-name="T108"> </text:span></text:p>
      <text:p text:style-name="P9"><text:span text:style-name="T52">Corrado</text:span>: Quante intelligenze (e sono, certe volte, le più acute e le più profonde), quante energie, quante fatiche, tutte sprecate nella ricerca di cose che non si possono mai trovare.</text:p>
      <text:p text:style-name="P9"><text:span text:style-name="T51">L</text:span><text:span text:style-name="T53">'amico filosofo</text:span><text:span text:style-name="T61">: La tua è</text:span> una riflessione profonda e, per certi versi, inquietante, ma merita di essere esplo­rata. È vero, ci sono esempi innumerevoli di menti bril­lanti che hanno dedicato la loro vita a perseguire sco­pi che sembrano irraggiungibili o risposte che paiono sempre sfuggire. Tuttavia, la domanda che mi viene spontanea è: davvero si può considerare uno spreco?</text:p>
      <text:p text:style-name="P8">Spesso, è proprio l'atto della ricerca, il percorso stesso, che arricchisce l'umanità. Galileo, ad esempio, non ha <text:soft-page-break/>forse trasformato il nostro modo di concepire l'universo, pur sapendo che non avrebbe mai risposto a tutte le domande? E gli sforzi dei filosofi, degli scien­ziati, dei poeti che hanno cercato di capire l'essenza della vita o i misteri dell'anima non ci hanno forse la­sciato in eredità nuovi strumenti di pensiero, nuovi lin­guaggi, nuove prospettive? La bellezza, Corrado, è che anche nei tentativi apparentemente vani, possiamo trovare ispirazione, creatività e un senso di scopo. Non è l'arrivo che conta, ma il viaggio. Non ti sembra che, anche quando non troviamo "le risposte", possia­mo comunque scoprire noi stessi?</text:p>
      <text:p text:style-name="P9"><text:span text:style-name="T54">Corrado</text:span><text:span text:style-name="T62">: </text:span>Quanti uomini <text:span text:style-name="T1">si sono affannati </text:span>per anni e anni a cercare e cercare, a meditare e a riflettere, per non arrivare mai ad una conclusione.</text:p>
      <text:p text:style-name="P9"><text:span text:style-name="T51">L</text:span><text:span text:style-name="T53">'amico filosofo</text:span><text:span text:style-name="T62">: </text:span>È vero, molti uomini e donne hanno trascorso la loro vita immersi nella riflessione, senza mai raggiungere una "conclusione definitiva." Ma ti in­vito a considerare una possibilità: e se il valore della loro ricerca non risiedesse nel risultato, ma nel viag­gio stesso?</text:p>
      <text:p text:style-name="P10">Il filosofo Søren Kierkegaard, per esempio, non cerca­va risposte universali, ma incoraggiava un'esplorazio­ne personale dell'esistenza. Nietzsche affermava che "<text:span text:style-name="T63">non ci sono fatti, solo interpretazioni</text:span>," e in questo sen­so il <text:soft-page-break/>processo del pensare, meditare e riflettere diven­ta un fine, non un mezzo.</text:p>
      <text:p text:style-name="P8">Kierkegaard, con il suo concetto di "esistenza", sottoli­nea l'importanza del divenire, del processo di auto-costruzione individuale. Per lui, la verità non è un dato oggettivo, ma un percorso personale, un "diventare ciò che si è".</text:p>
      <text:p text:style-name="P8">Nietzsche, con la sua critica alle verità assolute e la sua affermazione che "non ci sono fatti, solo interpre­tazioni", rafforza questa idea. Il pensiero diventa un'attività creativa, un modo per dare senso al mondo attraverso la propria prospettiva.</text:p>
      <text:p text:style-name="P8">Entrambi i filosofi si oppongono alle tendenze che cer­cano di ridurre l'individuo a un'entità anonima, parte di una massa. Kierkegaard critica la "folla", mentre Nietzsche denuncia il "gregge".</text:p>
      <text:p text:style-name="P8">Kierkegaard esplora le "sfere dell'esistenza" (estetica, etica, religiosa) come tappe di un percorso interiore, dove la passione e la scelta individuale sono fondamentali.<text:line-break/>Nietzsche, con il suo concetto di "volontà di potenza", invita a superare i valori tradizionali e a creare i propri valori, basati sulla propria forza interiore.</text:p>
      <text:p text:style-name="P8">Anche nella scienza, spesso le grandi scoperte nasco­no da fallimenti e domande irrisolte. La penicillina fu scoperta "per caso," ma ciò fu possibile solo grazie alla dedizione di ricercatori curiosi. Persino il non arri­vare a <text:soft-page-break/>una conclusione può generare nuove doman­de, stimolare altri pensatori o arricchire il panorama delle idee. <text:span text:style-name="T65">I</text:span>n fondo, non è la capacità di continuare a cercare, nonostante l'incertezza, una delle più straor­dinarie qualità dell'essere umano?</text:p>
      <text:p text:style-name="P11"><text:span text:style-name="T55">Corrado</text:span><text:span text:style-name="T66">: </text:span>Alcune volte questi filosofi pongono, è vero, dei problemi veri, autentici, che interessano un po’ tutti; però si sa in partenza che la soluzione che ne darà un Kant dopo trent'anni di meditazione non è più sicura di quella che ne darà un individuo <text:span text:style-name="T67">con poca cultura</text:span>.</text:p>
      <text:p text:style-name="P11"><text:span text:style-name="T51">L'amico filosofo</text:span>: <text:span text:style-name="T68">Questa </text:span>è una critica interessante, e comprensibile, Corrado. La filosofia, con tutta la sua profondità, a volte può sembrare distante dall'intuizio­ne immediata che anche una persona priva di forma­zione accademica potrebbe avere. Ma c'è qualcosa di significativo che differenzia le due prospettive: il metodo.</text:p>
      <text:p text:style-name="P12">Kant, ad esempio, non cercava di fornire una "risposta facile" ai problemi; piuttosto, sviluppava un sistema ri­goroso per indagare i fondamenti della conoscenza, della morale e della libertà. Questo metodo, anche se complesso, non è tanto mirato a giungere a una "verità certa" quanto a esplorare le condizioni che rendono possibile il nostro pensare e agire. L'indivi­duo incolto, pur capace di intuizioni valide, potrebbe non avere gli strumenti per analizzare e sistematiz­zare quelle <text:soft-page-break/>intuizioni in modo da poterle applicare universalmente o comprenderne le implicazioni.</text:p>
      <text:p text:style-name="P13">In altre parole, la filosofia non si limita a rispondere ai problemi, ma li approfondisce, li esplora in modo da arricchire il nostro modo di pensare e di vivere. Anche se le conclusioni non sono "più sicure," il viaggio intel­lettuale che Kant (o altri filosofi) ci invita a intrapren­dere rimane, in sé, un potente strumento di crescita. E non è forse questa esplorazione, questo approfondi­mento, un valore inestimabile?</text:p>
      <text:p text:style-name="P11"><text:span text:style-name="T55">Corrado: </text:span>Se quella data idea, Kant la derivò da Tizio oppure da Caio, che cosa alla fine egli ci mise di suo?</text:p>
      <text:p text:style-name="P14">L'amico filosofo: <text:span text:style-name="T84">Una domanda intrigante e cruciale, Corrado. È vero che nessun filosofo, Kant incluso, opera in un vuoto. Ogni pensatore è inevitabilmente influenzato dalle idee del suo tempo, dai predecessori e persino dall'ambiente culturale in cui si trova. Ma ciò che distingue un Kant da un "Tizio" o un "Caio" è pro­prio il contributo unico che egli apporta a quelle idee.</text:span></text:p>
      <text:p text:style-name="P15"><text:span text:style-name="T84">Kant, ad esempio, ha preso spunti dai razionalisti come </text:span><text:span text:style-name="T64">Leibniz</text:span><text:span text:style-name="T84"> e dai empiristi come </text:span><text:span text:style-name="T64">Hume</text:span><text:span text:style-name="T84">, ma ciò che "mise di suo" fu una sintesi innovativa: il suo sistema critico. Con la sua "Critica della Ragion Pura," Kant ri­voluzionò il modo in cui comprendiamo la conoscen­za, proponendo che essa non derivi solo dai sensi o dall'intelletto, ma dalla loro interazione attraverso le </text:span><text:soft-page-break/><text:span text:style-name="T84">categorie a priori. Non si tratta quindi solo di "deri­vare" un'idea, ma di trasformarla in qualcosa di radi­calmente nuovo.</text:span></text:p>
      <text:p text:style-name="P21">In un certo senso, ogni grande pensatore contribuisce con una prospettiva unica, un metodo, o una struttura che cambia il paradigma. Non è forse in questa capa­cità di rielaborare, reinterpretare e innovare che si ri­conosce il genio filosofico?</text:p>
      <text:p text:style-name="P21">Il rapporto di Kant con Hume e Leibniz è complesso e illuminante, poiché entrambi hanno avuto un ruolo cruciale nel plasmare il pensiero kantiano.</text:p>
      <text:p text:style-name="P21">Kant stesso ammise che Hume lo "svegliò dal sonno dogmatico." Hume, con il suo scetticismo radicale, mise in discussione la causalità, sostenendo che non possiamo conoscere con certezza il legame necessario tra causa ed effetto, ma solo basarci sull'abitudine. Questo spinse Kant a riflettere profondamente sul problema della conoscenza e a sviluppare la sua teo­ria critica. Kant cercò di superare lo scetticismo di Hume proponendo che la causalità non è un fatto em­pirico, ma una categoria a priori della mente umana, necessaria per organizzare l'esperienza.</text:p>
      <text:p text:style-name="P21">Kant fu influenzato dal razionalismo di Leibniz, ma lo criticò per il suo "dogmatismo." Leibniz sosteneva che la conoscenza deriva da principi razionali innati e che il mondo è il "migliore dei mondi possibili." Kant, pur apprezzando l'importanza della ragione, rifiutò l'idea <text:soft-page-break/>che la conoscenza potesse essere interamente dedot­ta dalla logica. Invece, propose una sintesi tra raziona­lismo ed empirismo: la conoscenza deriva dall'intera­zione tra intuizioni sensibili e categorie razionali.</text:p>
      <text:p text:style-name="P21">In sintesi, Kant prese il meglio di entrambi: da Hume, la consapevolezza dei limiti dell'empirismo; da Leibniz, l'importanza della ragione. Ma ciò che "mise di suo" fu una rivoluzione: la sua filosofia critica, che esplora come la mente umana struttura l'esperienza. Non è affascinante come Kant abbia trasformato queste in­fluenze in qualcosa di completamente nuovo?</text:p>
      <text:p text:style-name="P22"><text:span text:style-name="T51">Corrado: </text:span>Ma dimmi, <text:span text:style-name="T69">caro amico</text:span>, a cosa serve tutta questa filosofia? Ore e ore a parlare di idee astratte, concetti che non portano a niente di concreto. Non ca­pisco come possano esistere ancora posti di lavoro per i filosofi, pagati per insegnare cose che nessuno capisce e che non hanno alcuna applicazione pratica.</text:p>
      <text:p text:style-name="P16">L'amico filosofo: <text:span text:style-name="T85"><text:s/>Capisco il punto di vista che sollevi, Corrado, e si tratta di una riflessione legittima, che tocca temi come il valore del lavoro intellettuale. Però, permettimi di offrire una prospettiva diversa: ciò che a prima vista può sembrare "inutile" o "inconsistente" potrebbe, in realtà, avere un impatto significativo, anche se non immediatamente visibile.</text:span></text:p>
      <text:p text:style-name="P23">Prendiamo, ad esempio, la ricerca teorica in campo scientifico o filosofico. Alcune delle più grandi scoper­te <text:soft-page-break/>e innovazioni nella storia sono nate da studi ap­parentemente scollegati dalla realtà pratica. La teoria della relatività di Einstein, ad esempio, era un'elabora­zione estremamente teorica, ma ha posto le basi per tecnologie come il GPS, che usiamo ogni giorno. Allo stesso modo, la filosofia può sembrare "astratta," ma le idee che genera spesso influenzano il nostro modo di vedere il mondo, le nostre leggi, e persino i sistemi educativi e politici. Per quanto riguarda l'insegnamen­to, non si tratta solo di "trasmettere idee," ma di insegnare il pensiero criti­co, la capacità di analisi e l'immaginazione. Anche se non tutti gli studenti utilizzeranno queste competenze per produrre "risultati tangibili," molti troveranno nel pensiero filosofico o teorico strumenti per affrontare problemi complessi, innovare in altri campi o sempli­cemente vivere una vita più consapevole.</text:p>
      <text:p text:style-name="P24">La filosofia è come l'aria che respiriamo: invisibile, ma essenziale per la nostra esistenza. Ci aiuta a capire chi siamo, da dove veniamo e dove stiamo andando. E in un mondo sempre più complesso e incerto, questa è una delle cose più utili che possiamo fare.</text:p>
      <text:p text:style-name="P25"><text:span text:style-name="T56">Corrado</text:span><text:span text:style-name="T70">: </text:span>Quello della filosofia è un bisogno artificiale, creato nell'ambito del mondo della cultura, e un biso­gno, direi, semplicemente culturale. Colui che studia filosofia, con quale scopo lo fa (quando, s'intende, non <text:soft-page-break/>sia solo per ottenere una professione)? Lo fa per acquistare una cultura: nessuno cerca, nessuno spera di trovare nei libri dei filosofi una risposta agli interro­gativi che la sua vita continuamente gli pone. Nessuna filosofia, nemmeno quella che dice di occuparsi pro­prio di questi problemi, è capace di dare una risposta. Cosi la filosofia rimane un semplice bisogno culturale, un bisogno dell'uomo colto il quale ha il compito di sapere tante cose, di conoscere che cosa scrisse Platone e che cosa scrisse Hegel.</text:p>
      <text:p text:style-name="P25"><text:span text:style-name="T55">L'amico filosofo:</text:span><text:span text:style-name="T70"> </text:span>Capisco il tuo punto di vista, Corrado, ed è una critica spesso rivolta alla filosofia. Si pensa che essa rimanga confinata a<text:span text:style-name="T71">d</text:span> un ambito puramente culturale, un lusso intellettuale piuttosto che una di­sciplina con implicazioni pratiche per la vita quotidia­na. Tuttavia, vorrei offrirti una visione diversa: forse la filosofia non è tanto destinata a fornire risposte defi­nitive quanto a potenziare il modo in cui affrontiamo le domande.</text:p>
      <text:p text:style-name="P24">Chi studia filosofia, infatti, non cerca solo di accumu­lare cultura o conoscere i testi di Platone e Hegel; piuttosto, si esercita a pensare, a mettere in discussio­ne, a guardare i problemi da prospettive nuove. Questo allenamento mentale ha delle ricadute tangi­bili, anche se meno evidenti. Ad esempio, come pos­siamo navigare le complessità etiche del mondo mo­derno senza attingere, <text:soft-page-break/>almeno implicitamente, al pen­siero di filosofi come Kant o Aristotele? Come discutia­mo di giustizia, libertà o verità senza un lessico e un quadro concettuale fornito dalla filosofia?</text:p>
      <text:p text:style-name="P24">Inoltre, anche se nessuna filosofia può risolvere "defi­nitivamente" gli interrogativi della vita, può comun­que aiutarci a formulare meglio queste domande, a vi­vere con maggiore consapevolezza e persino a trovare conforto nell'incertezza. Per molti, questa è già una forma di risposta. Non pensi che il valore della filoso­fia, allora, non risieda tanto nelle risposte che dà, quanto nel modo in cui ci insegna a pensare?</text:p>
      <text:p text:style-name="P25"><text:span text:style-name="T57">Corrado</text:span><text:span text:style-name="T72">: Secondo me, il</text:span> bisogno della filosofia c'è, ma noi abbiamo sostituito al vero, reale bisogno, un biso­gno semplicemente culturale, e quest'ultimo molte volte finisce per soffocare quell'altro. La filosofia per potere rispondere veramente ai nostri bisogni dovreb­be essere coltivata, come viene coltivata l'arte.</text:p>
      <text:p text:style-name="P26"><text:span text:style-name="T55">L'amico filosofo:</text:span><text:span text:style-name="T57"> </text:span>Questa è una riflessione profonda e, a mio avviso, molto stimolante. Concordo che c'è un ri­schio nel ridurre la filosofia a un puro esercizio cultu­rale, un'attività confinata a circoli accademici o un mezzo per ottenere "erudizione" senza un impatto reale sulla vita. La tua idea di coltivare la filosofia come si coltiva l'arte è incredibilmente affascinante.</text:p>
      <text:p text:style-name="P24"><text:soft-page-break/>L'arte, infatti, non ha come scopo principale quello di fornire risposte definitive, ma di toccare l'animo uma­no, di emozionare, provocare e risvegliare in noi intui­zioni profonde. La filosofia, se vissuta nello stesso modo, può diventare non solo un atto di pensiero, ma un'esperienza esistenziale, un dialogo continuo con noi stessi e con il mondo. In questo senso, non è qual­cosa di "scolastico," ma una pratica viva, che ci aiuta ad affrontare i nostri bisogni più autentici.</text:p>
      <text:p text:style-name="P24">Pensa, ad esempio, all'approccio di filosofi come Kier­kegaard o Nietzsche, che più che costruire sistemi teo­rici, cercavano di rispondere alle ansie e alle do­mande fondamentali dell'esistenza umana. Essi hanno reso la filosofia un atto creativo, personale, quasi arti­stico. Coltivare la filosofia come si coltiva l'arte signifi­cherebbe allora avvicinarla al cuore dell'essere uma­no, renderla meno rigida, più vissuta e, in ultima ana­lisi, più significativa.</text:p>
      <text:p text:style-name="P24">Non è forse questo il modo in cui la filosofia potrebbe riacquistare il suo vero valore? Un dialogo continuo, come lo stiamo avendo adesso, che risponda non solo alla mente, ma anche all'anima.</text:p>
      <text:p text:style-name="P17">Corrado: <text:span text:style-name="T84">Non esiste nell'uomo il bisogno della filosofia come esiste invece, innegabilmente, il bisogno dell' arte. Quello della filosofia è un bisogno artificiale, creato nell'ambito del mondo della cultura. Colui che studia </text:span><text:soft-page-break/><text:span text:style-name="T84">filosofia, con quale scopo lo fa, quando s'inten­de, non sia solo per ottenere una professione? </text:span><text:span text:style-name="T86">Lo fa per un vanto personale che rimane circoscritto in al­cuni salotti della borghesia bene. </text:span></text:p>
      <text:p text:style-name="P17"><text:span text:style-name="T66">L'amico filosofo</text:span><text:span text:style-name="T84">: La tua riflessione è acuta, Corrado, e merita una risposta sfumata. È vero che il bisogno dell’arte è più immediato e viscerale: l’arte parla diret­tamente ai sensi e alle emozioni, creando un legame spontaneo. La filosofia, invece, sembra essere un bi­sogno “coltivato” e complesso, meno immediato. Ma potremmo dire che la filosofia, sebbene meno istinti­va, tocca un altro aspetto profondamente umano: la capacità e il desiderio di riflettere sul significato delle cose, di interrogarsi su se stessi e sul mondo.</text:span></text:p>
      <text:p text:style-name="P27">Chi studia filosofia spesso lo fa non per ottenere ri­sposte definitive, ma per affinare domande, allenare il pensiero critico e sviluppare una forma di consapevo­lezza che va oltre l’utilità immediata. Ad esempio, la fi­losofia aiuta a mettere in discussione le premesse na­scoste dietro le nostre scelte quotidiane, personali e collettive. È come uno strumento che affina la mente, ci aiuta a riconoscere il peso delle idee e delle convin­zioni. </text:p>
      <text:p text:style-name="P27">Forse il bisogno della filosofia non si manifesta nella stessa intensità emozionale dell’arte, ma prova a pen­sare: quante delle conquiste umane, etiche, scientifi­che, politiche, hanno un fondamento filosofico? Dalla <text:soft-page-break/>democrazia ai diritti umani, persino alle innovazioni scientifiche, le idee filosofiche hanno fornito una struttura al pensiero e all’azione. <text:span text:style-name="T73">Perciò ti chiedo: l’apparente “artificialità” del bisogno filosofico potreb­be non essere una limitazione, ma piuttosto la sua forza? Un bisogno che nasce dalla cul­tura e che ci aiuta a plasmare il futuro con maggiore consapevolezza?</text:span></text:p>
      <text:p text:style-name="P17"><text:span text:style-name="T73">Corrado</text:span><text:span text:style-name="T86">: Va bene, però nessuno spera di trovare nei libri dei filosofi una risposta agli interrogativi che la vita continuamente ci pone. Nessuna filosofia, nem­meno quella che dice di occuparsi proprio di questi problemi, è capace di dare una risposta. Così la filosofia rimane un semplice bisogno culturale, un bi­sogno dell'uomo colto il quale ha il compito di sapere tante cose, di conoscere </text:span><text:span text:style-name="T87">cosa intendesse dire Platone con il mito della caverna.</text:span></text:p>
      <text:p text:style-name="P17"><text:span text:style-name="T66">L'amico filosofo</text:span><text:span text:style-name="T84">: Hai ragione, Corrado, e il tuo scettici­smo tocca un punto essenziale: la filosofia non forni­sce risposte definitive, né pretende di farlo. Tuttavia, forse è proprio questa la sua forza: il valore della filo­sofia non sta tanto nel rispondere, ma nel porre do­mande migliori e nel creare uno spazio per il dubbio e il dialogo. È un esercizio che allena la mente ad affron­tare le incertezze della vita con maggiore lucidità.</text:span></text:p>
      <text:p text:style-name="P27">I grandi filosofi – da Platone a Hegel, passando per molti altri – non ci danno soluzioni preconfezionate, ma ci offrono strumenti per riflettere in modo critico. È <text:soft-page-break/>come leggere una mappa senza la certezza di quale strada scegliere: non ci indicano dove andare, ma ci mostrano le possibilità, ci danno il linguaggio per esprimere ciò che prima era forse indistinto.</text:p>
      <text:p text:style-name="P27">In questo senso, la filosofia non è solo per gli "uomini colti". Anche chi non si accosta formalmente ai testi fi­losofici, quando si interroga sul senso della propria esistenza o sul giusto e lo sbagliato, di fatto compie un atto filosofico. La differenza, forse, è che chi studia filosofia professionalmente ha il compito di sistema­tizzare queste riflessioni, rendendole accessibili e utili al dibattito umano.</text:p>
      <text:p text:style-name="P17"><text:span text:style-name="T74">Corrado</text:span><text:span text:style-name="T88">: </text:span><text:span text:style-name="T84">lo penso che questo divario che c'è, fra la vera vita e la filosofia dipende dal modo con cui noi ci dedichiamo alla filosofia. II biso­gno della filosofia c'è, secondo me, ma noi abbiamo sostituito al vero, reale bisogno, un bisogno semplice­mente culturale, e quest'ultimo molte volte finisce per soffocare </text:span><text:span text:style-name="T89">l’altro</text:span><text:span text:style-name="T84">.</text:span></text:p>
      <text:p text:style-name="P17"><text:span text:style-name="T66">L'amico filosofo</text:span><text:span text:style-name="T84">:</text:span><text:span text:style-name="T88"> </text:span><text:span text:style-name="T84">Corrado, questa tua osservazione è profonda e mette in luce una problematica autentica. È vero, c'è il rischio che la filosofia venga relegata a un mero esercizio intellettuale, scollegato dalla vita reale e dai suoi dilemmi concreti. Questo accade spesso quando la filosofia viene trattata come un oggetto di studio accademico, piuttosto che come uno strumen­to per vivere con maggiore consapevolezza.</text:span></text:p>
      <text:p text:style-name="P28"><text:soft-page-break/>Tuttavia, immagina se provassimo a riavvicinare la fi­losofia alla quotidianità, restituendole il suo scopo ori­ginario: quello di essere una guida pratica per affron­tare l'esistenza. Filosofi come i cinici, gli stoici o persi­no Socrate hanno cercato di far dialogare la filosofia con la vita di tutti i giorni. Lo stoicismo, ad esempio, insegna a coltivare la resilienza di fronte alle difficoltà, e molte persone trovano ancora oggi nei suoi principi un sostegno concreto.</text:p>
      <text:p text:style-name="P29">Forse il compito della nostra epoca è proprio quello di recuperare il “bisogno reale” di filosofia che tu citi, dando meno peso alla sua funzione puramente cultu­rale e più importanza al suo potere di trasformare il nostro modo di pensare e agire. Come pensi che la fi­losofia potrebbe riavvicinarsi al quotidiano per rispon­dere ai bisogni reali dell’uomo? Sarebbe un modo di “soffiare via” la polvere culturale per ritrovare la sua essenza più autentica.</text:p>
      <text:p text:style-name="P17"><text:span text:style-name="T75">Corrado</text:span><text:span text:style-name="T90">: </text:span><text:span text:style-name="T91">Come detto poc’anzi, l</text:span><text:span text:style-name="T84">a filosofia per potere ri­spondere veramente ai nostri bisogni dovrebbe esse­re coltivata, </text:span><text:span text:style-name="T91">abituare l’orecchio al suono di certe paro­le, così come avviene con l’arte della musica. </text:span><text:span text:style-name="T84">Colui che ama la musica cosa fa? Stabilisce di mettersi ad ascol­tare poco per volta la musica che </text:span><text:span text:style-name="T92">viene proposta con un ordine preciso.</text:span><text:span text:style-name="T84"> Apre la radio e si mette ad ascol­tare e dice : questo mi piace e questo non mi piace. Poi sente </text:span><text:soft-page-break/><text:span text:style-name="T84">un altro pezzo e dice «</text:span><text:span text:style-name="T92">n</text:span><text:span text:style-name="T84">on mi piace» e gli fanno notare «</text:span><text:span text:style-name="T92">m</text:span><text:span text:style-name="T84">a </text:span><text:span text:style-name="T92">questo </text:span><text:span text:style-name="T84">è di Wagner» si tratta di un grande musicista; e vorresti ignorarlo? Lui risponde: io non ascolto la musica per cultura, questo non mi pia­ce, non risponde al mio gusto. Sar</text:span><text:span text:style-name="T93">à</text:span><text:span text:style-name="T84"> colpa mia che non lo capisco, ma non è una ragione questa per tormen­tarmi ad ascoltarlo. Fatemi sentire dell'altro. E quando sente la musica, il nostro amatore, non si preoccupa di sapere che cosa veramente lì voglia esprimere il compositore e se quello che ci trova lui corrisponde proprio a ciò che voleva dire l'autore. A lui quella mu­sica parla in un modo preciso e dice certe determinate cose, e per questo gli piace. Gli piacciono alcuni autori ed altri no; e quelli che non gli piacciono, non sì mette a fare sforzi per riuscire, a qualunque costo, a capirli; ascolta ciò che risponde alle sue preferenze e ai suoi bisogni, e interpreta così come gli viene, e non si pre­occupa di ignorare o di trascurare musicisti anche più grandi di quelli, o di chiedersi se egli interpreta bene e se i pregi che trova in quella musica sono i veri pregi di essa e se la sua bellezza non stia per caso in qual­che altra cosa. Ora io penso che nella stessa maniera dovrebbe essere coltivata la filosofia. Alla mente di un uomo si affaccia un problema; egli si interessa ad esso e sente il bisogno di dargli una risposta. Riflette, pen­sa. Poi apre un libro dove si esamina quel problema e se ne da una certa soluzione; legge. No, non gli va: non è così che lui sente </text:span><text:soft-page-break/><text:span text:style-name="T84">quel problema. </text:span><text:span text:style-name="T93">I</text:span><text:span text:style-name="T84">l problema lo vedo e lo sento in un altro modo; sarà un modo più superficiale, ma il mio problema è questo: è questo problema che mi interessa di risolvere.</text:span></text:p>
      <text:p text:style-name="P17"><text:span text:style-name="T66">L'amico filosofo</text:span><text:span text:style-name="T75">:</text:span><text:span text:style-name="T90"> </text:span><text:span text:style-name="T84">Trovo affascinante questa tua analo­gia con la musica, Corrado. La filosofia, proprio come l'arte, dovrebbe essere un'esperienza personale e ap­pagante, piuttosto che un obbligo culturale o accade­mico. Quando un problema filosofico ci tocca, è natu­rale cercare una risposta che risuoni con il nostro sen­tire e la nostra prospettiva, proprio come un brano musicale che parla al nostro cuore senza bisogno di una spiegazione tecnica.</text:span></text:p>
      <text:p text:style-name="P27">Il tuo approccio valorizza l'aspetto soggettivo e auten­tico della filosofia: non si tratta di aderire passivamen­te alle grandi tradizioni o agli autori canonici, ma di la­sciarsi guidare da ciò che ci colpisce, ci appassiona, e ci aiuta a comprendere il nostro personale viaggio nel mondo. Non importa se una soluzione trovata nei libri non ci convince; ciò che conta è che le idee ci invitino a pensare, a rispondere, a riformulare. Forse, quindi, la filosofia potrebbe essere coltivata con più sponta­neità e immediatezza, proprio come la mu­sica che scegliamo di ascoltare: leggendo ciò che ci in­teressa, accettando di ignorare ciò che non ci parla, interpretando i testi in base alla nostra esperienza di vita. Questo <text:soft-page-break/>atteggiamento, lungi dall'essere superfi­ciale, potrebbe ridare alla filosofia una dimensione viva e vibrante. </text:p>
      <text:p text:style-name="P27">Pensi che un approccio così "personale" alla filosofia possa convivere con l'idea di una filosofia che offre strumenti universali per riflettere sui grandi temi? Sarebbe interessante vedere come queste due dimen­sioni possano arricchirsi a vicenda.</text:p>
      <text:p text:style-name="P17"><text:span text:style-name="T76">Corrado:</text:span><text:span text:style-name="T94"> Il mio </text:span><text:span text:style-name="T95">modo di vedere le cose,</text:span><text:span text:style-name="T94"> nasce quando leggendo un autore e cap</text:span><text:span text:style-name="T95">endone</text:span><text:span text:style-name="T94"> in qualche modo il suo pensiero, io continuo a legger</text:span><text:span text:style-name="T95">lo</text:span><text:span text:style-name="T94">, altrimenti passo oltre. Non mi pre­occupo di sapere se poi quella mia interpretazione è esatta o se non è più corretto intendere il suo pensie­ro in un altro modo. Si può obiettare che tutto questo non è scientifico , che a questo modo si rischia di prendere lucciole per lanterne; ma è così però che la filosofia può fare parte veramente della nostra vita. </text:span><text:span text:style-name="T96">I filosofi professionisti </text:span><text:span text:style-name="T94">dicono: vi volete occupare di filo­sofia? Cominciate con lo studiare tutta la storia del pensiero, prima Talete che cercava nell'acqua il princi­pio di tutte le cose, poi Epicuro che indicava all'uomo le massime della saggezza, e cosi via fino agli esisten­zialisti che mettono l'uomo di fronte al </text:span><text:span text:style-name="T95">proprio</text:span><text:span text:style-name="T94"> destino.</text:span></text:p>
      <text:p text:style-name="P17"><text:span text:style-name="T66">L'amico filosofo</text:span><text:span text:style-name="T75">:</text:span><text:span text:style-name="T94"> La tua osservazione, Corrado, tocca un punto centrale: il modo in cui ci accostiamo alla fi­losofia è cruciale per determinarne l’impatto nella no­</text:span><text:soft-page-break/><text:span text:style-name="T94">stra vita. Da un lato c'è l'approccio "scientifico", che studia sistematicamente la storia del pensiero e le in­terpretazioni accademiche; dall'altro, c'è un approccio più personale e immediato, che privilegia ciò che ci parla direttamente, anche a rischio di "prendere luc­ciole per lanterne".</text:span></text:p>
      <text:p text:style-name="P30">Questa tensione non è necessariamente negativa. Anzi, potrebbe rappresentare il cuore pulsante della filosofia stessa: da un lato, la filosofia come disciplina che mira alla precisione, dall’altro, la filosofia come esperienza che risponde ai nostri bisogni più intimi. Non è un caso, per esempio, che pensatori come Montaigne o Kierkegaard scrivessero in modo intimo e personale, rivolgendosi al lettore quasi come a un interlocutore diretto.</text:p>
      <text:p text:style-name="P30">Montaigne, con i suoi Essais, inaugurò un modo di scrivere profondamente riflessivo, in cui il lettore veniva coinvolto quasi come un confidente. Non cercava di dimostrare verità assolute, ma di esplorare i suoi pensieri e le sue esperienze con onestà e vulnerabilità. Kierkegaard, invece, usava una varietà di pseudonimi per creare dialoghi interiori e mettere in discussione le certezze del lettore, rendendo la sua scrittura un'esperienza quasi esistenziale. La filosofia, così intesa, diventa un dialogo e non una lezione.</text:p>
      <text:p text:style-name="P30">Per quanto riguarda il consiglio de<text:span text:style-name="T77">i</text:span> "<text:span text:style-name="T77">filosofi professio­nisti</text:span>" di studiare l’intera storia del pensiero, è vero che <text:soft-page-break/>una conoscenza di base può aiutare a orientarsi nel vasto panorama delle idee. Tuttavia, questo non do­vrebbe mai soffocare il bisogno autentico che ognuno di noi sente di fronte alle domande della vita. Se leg­giamo Talete, Epicuro o gli esistenzialisti, lo facciamo non per un senso di dovere culturale, ma per trovare quelle voci che risuonano con la nostra esperienza e i nostri interrogativi.</text:p>
      <text:p text:style-name="P30">Forse, alla fine, il valore della filosofia non sta tanto nella “scientificità” del nostro approccio, ma nella pos­sibilità di farla parlare alla nostra vita, senza preoccu­parci troppo se la nostra interpretazione sia “giusta” o “corretta”. È questo che la rende viva.</text:p>
      <text:p text:style-name="P17"><text:span text:style-name="T78">Corrado</text:span><text:span text:style-name="T97">: </text:span><text:span text:style-name="T94">E' vero che la filosofia non si occupa di risol­vere i problemi delle persone, però se </text:span><text:span text:style-name="T98">ci</text:span><text:span text:style-name="T94"> consente di occupar</text:span><text:span text:style-name="T99">ci</text:span><text:span text:style-name="T94"> di un problema, diciamo, a nostra scelta, ri­mane comunque inteso che anche questa scelta è de­limitata, in quanto ci sono problemi che ormai sono superati ed è inutile riproporli ancora. </text:span><text:span text:style-name="T97">M</text:span><text:span text:style-name="T94">a poi c'è tutta una procedura da seguire per la trattazione del problema preso in esame: vedere in che modo esso è stato posto e si è andato prospettando attraverso il pensiero dei vari autori, e le critiche che sono state mosse a questo o a quel filosofo che se ne è occupato, e via via, in modo che alla fine, quando siamo in grado e autorizzati a dire la nostra parola a riguardo (perché prima si doveva </text:span><text:soft-page-break/><text:span text:style-name="T94">tacere e rimanere prudentemente in ascolto di quello che dicevano gli altri) forse l'interes­se vivo per quel problema è in </text:span><text:span text:style-name="T97">noi</text:span><text:span text:style-name="T94"> già scomparso e la vita stessa </text:span><text:span text:style-name="T97">ci</text:span><text:span text:style-name="T94"> fa sentire ora in modo più urgente altri problemi.</text:span></text:p>
      <text:p text:style-name="P17"><text:span text:style-name="T66">L'amico filosofo</text:span><text:span text:style-name="T75">:</text:span><text:span text:style-name="T78"> </text:span><text:span text:style-name="T94">Corrado, trovo che tu abbia descritto con grande precisione una delle tensioni centrali della filosofia, e cioè il rapporto tra il tempo e l'urgenza dei problemi. È vero: il processo filosofico, con la sua na­tura metodica e analitica, può sembrare distante dalla velocità con cui la vita ci pone continuamente nuove sfide. Il rischio è che, una volta giunti al punto in cui possiamo finalmente “dire la nostra parola”, la vita ci abbia già spostato altrove, verso altri interrogativi più pressanti. Ma c’è anche una bellezza in questa "lentezza" della fi­losofia. Essa non si preoccupa di risolvere subito i problemi, come farebbe una scienza applicata, ma di creare un percorso di riflessione profondo e rigoroso. Questo approccio può sembrarci scomodo, ma forse è proprio lì che la filosofia trova la sua forza: nel propor­re non risposte immediate, ma strumenti duraturi per affrontare le domande che il tempo e la vita inevitabil­mente ci porranno di nuovo, sotto forme diverse.</text:span></text:p>
      <text:p text:style-name="P30">E se accettassimo che non tutto il pensiero filosofico deve essere trattato con l’intera "procedura accademi­ca"? Forse potremmo scegliere un approccio ibrido: da <text:soft-page-break/>un lato la libertà di esplorare i problemi che ci inte­ressano ora, senza preoccuparci troppo della "corret­tezza" storica o culturale, e dall’altro il rispetto per l’ampiezza del dibattito filosofico, da utilizzare solo quando ne sentiamo il bisogno o il desiderio.</text:p>
      <text:p text:style-name="P30">In fondo, potremmo vivere la filosofia più come un dialogo che come una strada da percorrere con proce­dure predefinite. Che ne pensi? Questo potrebbe for­se conciliare il rigore filosofico con la vitalità della no­stra esperienza personale? </text:p>
      <text:p text:style-name="P17"><text:span text:style-name="T79">Corrado</text:span><text:span text:style-name="T100">: </text:span><text:span text:style-name="T94">Quello che proponi, potrebbe essere applica­to alle varie teorie dell'esistenzialismo? Che cosa fa il filosofo esistenzialista? Ha di fronte dei problemi, già posti e in un dato modo, e li studia, ne fa la storia, esamina tutto quello che si è detto a riguardo e alla fine viene a una conclusione che sia capace d</text:span><text:span text:style-name="T98">i</text:span><text:span text:style-name="T94"> soste­nersi in tutto quel mare di tesi, di critiche e di polemi­che. La sua preoccupazione e il suo vero problema è di vedere se sul piano della cultura quello che egli dice si regge. E se alla fine, dopo dieci anni di studio, si ac­corgerà di non avere nulla da aggiungere o da codifi­care alla concezione di un certo autore tanto che non gli rimane che accettarla in pieno, come filosofo si considererà fallito perché niente avrà da dire di suo e quei dieci anni lì avrà impiegati inutilmente, mentre come uomo dovrebbe sentirsi contento di avere trova­to una </text:span><text:soft-page-break/><text:span text:style-name="T94">concezione che lo soddisfa pienamente; ma questo, appunto, se egli avesse cercato la soluzione di un suo problema e se è questa la soluzione che gli stava veramente a cuore.</text:span></text:p>
      <text:p text:style-name="P18"><text:span text:style-name="T66">L'amico filosofo</text:span><text:span text:style-name="T84">: Corrado, trovo che tu abbia colto un nodo fondamentale del dilemma dell'esistenzialismo e, più in generale, del pensiero filosofico: il sottile equilibrio tra il contributo culturale e la soddisfazione personale. Nel contesto dell'esistenzialismo, questa tensione appare ancora più marcata, poiché l'esisten­zialismo pone proprio l'individuo e la sua esperienza soggettiva al centro della riflessione. Un filosofo esi­stenzialista, come dici giustamente, a</text:span><text:span text:style-name="T101">f</text:span><text:span text:style-name="T84">fronta problemi preesistenti, si immerge nella loro storia, analizza ciò che altri hanno detto, e si pone il problema di "dire qualcosa di suo". Questo percorso può sembrare frustrante se lo si valuta solo in termini di "novità culturale". Tuttavia, l'esistenzialismo stesso ci invita a considerare un'altra prospettiva: ciò che conta non è tanto aggiungere qualcosa di nuovo per il mondo della cultura, ma trovare un significato personale in questo processo. La filosofia, così smette di essere solo un'impresa per "dire qualcosa di originale" e diventa un cammino esistenziale.</text:span></text:p>
      <text:p text:style-name="P31">Pensiamo a Søren Kierkegaard, che scriveva per ri­spondere ai propri tormenti spirituali e per trovare autenticità nella propria vita. Anche Jean-Paul Sartre e <text:soft-page-break/>Albert Camus, pur avendo influenzato intere genera­zioni, non scrivevano tanto per "innovare", quanto per esplorare il significato della libertà, della responsabili­tà e dell'assurdo nelle loro esperienze personali. La loro filosofia non si misura solo dal valore accademi­co, ma anche da quanto ha trasformato il loro approc­cio alla vita.</text:p>
      <text:p text:style-name="P30">Forse il "fallimento" che descrivi esiste solo se misu­riamo il valore del filosofo in termini esterni, culturali. Ma se invece adottassimo una prospettiva più esisten­zialista, potremmo vedere quel percorso di dieci anni come un successo umano: una conquista di consape­volezza, anche se non rivoluzionaria per la filosofia ac­cademica. La vera domanda diventa allora: ciò che il filosofo esistenzialista scopre, lo aiuta a vivere? Se sì, non potrebbe già essere questo il trionfo della filoso­fia?</text:p>
      <text:p text:style-name="P19"><text:span text:style-name="T80">Corrado</text:span><text:span text:style-name="T102">: </text:span><text:span text:style-name="T103">Trionfo o non trionfo, </text:span><text:span text:style-name="T84">rimane sempre il di­vario fra la filosofia e la vita. E' un fatto del resto che noi possiamo constatare facilmente. Per chi scrive il fi­losofo? </text:span><text:span text:style-name="T104">(m</text:span><text:span text:style-name="T105">olti non scrivono più</text:span><text:span text:style-name="T104">)</text:span><text:span text:style-name="T84"> Solo per coloro che fanno professione di filosofia. Sono </text:span><text:span text:style-name="T105">loro</text:span><text:span text:style-name="T84"> che leggono i suoi libri, che apprendono le sue idee. E cosi la filoso­fia rimane chiusa entro una cerchia di persone che ne fanno professione e non passa mai, non viene a con­tatto con la vita vissuta e con i suoi reali problemi. Considerate l’arte invece. Per chi compone l'artista? Per il pubblico, </text:span><text:soft-page-break/><text:span text:style-name="T84">per gente cioè per la quale l'arte non è una professione; gente che si occupa di altro e per la quale tuttavia l'arte è una parte della vita stessa. L'arte entra cosi nella vera vita di ognuno e non rimane, come la filosofia, un semplice fenomeno culturale. Certo anche questo pubblico di profani al quale l'arti­sta si rivolge sarà più meno esteso a seconda della qualità dell'arte; ma anche quando esso è relativa- mente ristretto sarà sempre un pubblico di profani, non di iniziati come è per la filosofia.</text:span></text:p>
      <text:p text:style-name="P19"><text:span text:style-name="T66">L'amico filosofo</text:span><text:span text:style-name="T84">:</text:span><text:span text:style-name="T102"> </text:span><text:span text:style-name="T84">Corrado, hai evidenziato una distin­zione cruciale tra filosofia e arte che spesso viene tra­scurata. L’arte ha il potere straordinario di parlare di­rettamente alle emozioni, di attraversare le barriere della professione e della formazione, toccando le vite di tutti, indipendentemente dal contesto. La filosofia, invece, rischia di rimanere confinata a una cerchia di specialisti, incapace di raggiungere quella connessio­ne immediata con il "pubblico profano" che l'arte pos­siede.</text:span></text:p>
      <text:p text:style-name="P31">Ma forse il divario che sottolinei non è insormontabi­le. Pensa, ad esempio, a quei filosofi che hanno cerca­to di rompere la barriera accademica e di rivolgersi al pubblico in generale. Marco Aurelio, con i suoi "Pen­sieri", scriveva per sé stesso, ma il tono è così intimo e umano che ancora oggi parla a milioni di persone. Si­mone Weil, con la sua combinazione di riflessione filo­<text:soft-page-break/>sofica e impegno concreto, cercava di unire pensiero e azione. Albert Camus scriveva romanzi e saggi che trattano questioni filosofiche in un linguaggio accessi­bile e potente, toccando problemi che riguardano tutti noi, non solo gli iniziati. Forse la sfida della filosofia contemporanea è proprio questa: rendersi più permeabile alla vita vissuta, tro­vare un linguaggio capace di entrare nelle vite delle persone, senza perdere il suo rigore. Non è impossibile immaginare una filosofia che, come l’arte, tocchi corde emotive, parli al cuore oltre che alla mente, e risulti una parte integrante dell'esperienza umana. </text:p>
      <text:p text:style-name="P31">È possibile una filosofia che non parli solo ai profes­sionisti, ma diventi davvero una guida universale, come l'arte lo è per il cuore?</text:p>
      <text:p text:style-name="P32"><text:span text:style-name="T58">Corrado</text:span><text:span text:style-name="T81">: </text:span>Alcune volte si fa fatica a credere <text:span text:style-name="T81">c</text:span>he furono Telesio e Bacone a insegnare agli scienziati la via che dovevano seguire nelle loro ricerche e che senza quei due filosofi la scienza moderna non avrebbe fatto probabilmente i progressi che ha fatto. Forse Aristote­le ebbe un grande merito; insegnò agli uomini l'arte del ragionare: insegnò soprattutto che se una cosa è rossa non può, nello stesso senso in cui si dice che è rossa, essere non rossa; questo è stato un insegna­mento utilissimo perché riferito al veleno significa che il veleno non può nello stesso tempo che è veleno non <text:soft-page-break/>essere veleno; e cosi molti uomini per merito di Aristotele sono stati salvati dalla morte. Forse le con­quiste scientifiche avrebbero avuto il loro corso natu­rale <text:span text:style-name="T81">anche </text:span>senza il bisogno dei filosofi.</text:p>
      <text:p text:style-name="P32"><text:span text:style-name="T55">L'amico filosofo</text:span>: È una prospettiva interessante, Corrado, e non priva di fondamento. È possibile che la scienza, spinta dalla curiosità umana e dal bisogno pratico, avrebbe comunque trovato la sua strada. Gli esseri umani hanno una naturale propensione a esplorare e innovare, e le necessità della vita spesso spingono verso scoperte pratiche, anche in assenza di una riflessione filosofica strutturata.</text:p>
      <text:p text:style-name="P33">Tuttavia, possiamo anche chiederci se i filosofi abbia­no contribuito a rendere più chiaro e consapevole il cammino della scienza. Per esempio, senza il pensiero sistematico di Bacone o le riflessioni epistemologiche di Cartesio, la scienza avrebbe potuto svilupparsi con la stessa metodologia rigorosa che conosciamo oggi? Forse sì, ma altrettanto forse no: i filosofi hanno spes­so fornito quel linguaggio concettuale e quei principi fondanti come l'importanza dell'osservazione empi­rica o della razionalità che hanno aiutato la scienza a organizzarsi come disciplina.</text:p>
      <text:p text:style-name="P31">Aristotele, con la sua straordinaria capacità di siste­matizzare il pensiero, ha dato un contributo immorta­le al nostro modo di comprendere il mondo. La logica <text:soft-page-break/>aristotelica, come il principio di non contraddizione che hai citato, ha influenzato non solo il pensiero filo­sofico, ma anche il modo in cui formuliamo ipotesi, analizziamo dati e costruiamo teorie. Pensare che un ragionamento così apparentemente "semplice" come distinguere ciò che è da ciò che non può essere abbia avuto applicazioni concrete, persino vitali come nel caso del veleno, dimostra la portata universale di cer­te intuizioni filosofiche.</text:p>
      <text:p text:style-name="P31">Il punto, però, non è solo storico. Anche oggi la filosofia gioca un ruolo importante, soprattutto nei di­battiti etici e nei limiti dell'innovazione scientifica. Pen­sa alle questioni legate all'intelligenza artificiale, alla genetica, o al cambiamento climatico: senza un ap­proccio filosofico, sarebbe difficile affrontare le impli­cazioni morali e sociali di questi temi.</text:p>
      <text:p text:style-name="P31">Forse la scienza avrebbe trovato un suo corso natura­le, ma sarebbe stata priva di una guida per interpre­tarne il significato e il valore più profondo.</text:p>
      <text:p text:style-name="P32"><text:span text:style-name="T59">Corrado</text:span><text:span text:style-name="T82">: </text:span>Io farei una certa distinzione tra filosofi. Quelli classici dell'antica Grecia che già da tempi mol­to remoti, più 2500 anni fa, si ponevano delle questio­ni che oggi sorprendentemente sono attualissime, da quelli più moderni. Si crede davvero che Carlo Marx per costruire la sua concezione rivoluzionaria della so­cietà e per credere nel futuro della classe proletari<text:span text:style-name="T83">a</text:span> avesse <text:soft-page-break/>bisogno davvero della dialettica di Hegel? Che forse Mazzini, per convincersi e per convincere gli altri che l'Italia era divisa ma presto sarebbe diventata una e si sarebbe resa indipendente, ebbe bisogno di ap­poggiarsi alla dialettica degli opposti? O che gli autori della rivoluzione francese che volevano abbattere un regime e capovolgere il sistema di cose esistente ave­vano forse sentito parlare di affermazione, negazione e negazione della negazione<text:note text:id="ftn2" text:note-class="footnote"><text:note-citation>1</text:note-citation><text:note-body><text:p text:style-name="P1">Il concetto dialettico di affermazione, negazione e negazione della negazione è strettamente legato alla filosofia hegeliana, anche se ha radici precedenti. È il processo attraverso cui la realtà si sviluppa: si parte da una tesi (affermazione), che viene messa in discussione da un’antitesi (negazione), e da questa opposizione nasce una sintesi che supera entrambe (negazione della negazione).</text:p></text:note-body></text:note>?</text:p>
      <text:p text:style-name="P32"><text:span text:style-name="T55">L'amico filosofo</text:span>:<text:span text:style-name="T82"> </text:span>Hai sollevato una questione davvero interessante, Corrado, e che invita a riflettere sul rap­porto tra filosofia teorica e azione pratica. La distinzio­ne che fai tra i filosofi dell'antica Grecia e quelli più moderni è significativa, perché i primi sembrano porsi domande fondamentali sull'essere umano e il mondo, domande che, come dici tu, sono ancora attualissi­me, mentre i secondi spesso si muovono in un conte­sto storico più specifico, legato a sistemi filosofici complessi e articolati.</text:p>
      <text:p text:style-name="P31">Per quanto riguarda Marx e Mazzini, il tuo dubbio è le­gittimo: fino a che punto avevano realmente biso­gno delle teorie filosofiche per sviluppare le loro idee rivoluzionarie o politiche? Marx, certamente, ha co­<text:soft-page-break/>struito il suo sistema sul fondamento della dialettica di Hegel, ma il suo approccio era profondamente pra­tico: adattò e trasformò la dialettica hegeliana per in­terpretare i processi storici e sociali, non per un mero esercizio intellettuale. Nel caso di Mazzini, invece, il suo pensiero era più ispirato dall'ideale romantico e dalla fede nel destino dell'umanità, che da un'adesio­ne a una precisa teoria filosofica.</text:p>
      <text:p text:style-name="P31">Lo stesso vale per gli autori della Rivoluzione france­se: la loro azione non derivava direttamente da una teoria filosofica sistematica, ma era piuttosto il risulta­to di circostanze storiche, economiche e sociali, in­fluenzate da idee illuministiche che permeavano il loro tempo. La filosofia, in questi casi, ha agito più come ispirazione culturale che come guida metodica.</text:p>
      <text:p text:style-name="P31">Questo ci porta a un punto cruciale: la filosofia non è sempre il motore diretto dell'azione, ma spesso forni­sce un quadro di riferimento, un linguaggio, un insie­me di valori o convinzioni che possono influenzare, consapevolmente o inconsapevolmente, coloro che agiscono. Il problema non è se Marx o Mazzini "aves­sero bisogno" della dialettica, ma quanto queste idee abbiano contribuito a dare struttura e profondità al loro pensiero. <text:span text:style-name="T76">Forse la domanda più intrigante è: in che misura la filosofia dovrebbe guidare l'azione, e in che misura l'azione dovrebbe ispirare la filosofia?</text:span></text:p>
      <text:p text:style-name="P34"><text:soft-page-break/><text:span text:style-name="T51">Corrado</text:span>: Accetto la tua domanda. In che misura la filosofia dovrebbe guidare l'azione, e in che misura l'azione dovrebbe ispirare la filosofia?</text:p>
      <text:p text:style-name="P19"><text:span text:style-name="T66">L'amico filosofo</text:span><text:span text:style-name="T84">: La filosofia, in una certa misura, deve guidare l'azione, poiché i suoi principi e valori forni­scono un orientamento etico e intellettuale. Ad esempio, molti movimenti per i diritti civili o l'ugua­glianza sociale sono stati ispirati da idee filosofiche: il concetto di libertà, giustizia e dignità umana, che tro­viamo in filosofi come Locke, Rousseau o Kant, ha pla­smato intere generazioni di attivisti e leader. In questi casi, la filosofia agisce come una bussola morale e in­tellettuale che dà coerenza e profondità all'azione.</text:span></text:p>
      <text:p text:style-name="P20"><text:span text:style-name="T84">Allo stesso tempo, però, la filosofia deve lasciarsi ispi­rare dall'azione. È l'esperienza vissuta, l'urgenza dei problemi concreti, che spesso porta la filosofia a rin­novarsi e a evolversi. Pensa a filosofi come Marx o Dewey, che hanno cercato di rispondere direttamente alle sfide del loro tempo: Marx si confrontava con le condizioni sociali della classe operaia, Dewey rifletteva sull'importanza dell'educazione e della democrazia nel mondo moderno. L'azione reale, le lotte, i fallimenti e le conquiste delle persone, sono state la scintilla che ha acceso il loro pensiero. In questo senso, possiamo immaginare un dialogo continuo: la filosofia guida l'azione offrendo principi e prospettive, ma l'azione, a </text:span><text:soft-page-break/><text:span text:style-name="T84">sua volta, arricchisce la filosofia, costringendola a confrontarsi con la realtà e a evolversi. Se la filosofia si limita a un esercizio teor</text:span><text:span text:style-name="T106">ico</text:span><text:span text:style-name="T84">, rischia di perdere contatto con la vita; se l'azione non ha una base filosofica, rischia di smarrire la direzione.</text:span></text:p>
      <text:p text:style-name="P31">Forse il segreto sta nel trovare un equilibrio: una filosofia che sappia essere pragmatica senza perdere la sua profondità, e un'azione che sappia ispirarsi a valori profondi senza farsi imprigionare dalla teoria. Tu come immagineresti questo equilibrio, Corrado?</text:p>
      <text:p text:style-name="P35"><text:span text:style-name="T60">Corrado:</text:span><text:span text:style-name="T107"> </text:span>L'equilibrio ideale è una danza continua tra pensiero e azione, un dialogo costante tra la teoria e la pratica. È un equilibrio che richiede saggezza, co­raggio e un pizzico di umiltà, la consapevolezza che la verità è un viaggio, non una destinazione. È quindi im­portante che la filosofia non diventi mai dogmatica, e che l'azione non diventi mai cieca.</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3T18:28:40.136583059</meta:creation-date>
    <dc:date>2026-04-03T18:31:27.835513685</dc:date>
    <dc:creator>corrado tafaro</dc:creator>
    <meta:editing-duration>PT2M48S</meta:editing-duration>
    <meta:editing-cycles>1</meta:editing-cycles>
    <meta:document-statistic meta:table-count="0" meta:image-count="0" meta:object-count="0" meta:page-count="34" meta:paragraph-count="96" meta:word-count="7200" meta:character-count="46363" meta:non-whitespace-character-count="39248"/>
    <meta:generator>LibreOffice/24.2.7.2$Linux_X86_64 LibreOffice_project/420$Build-2</meta:generator>
  </office:meta>
</office:document-meta>
</file>