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text-properties officeooo:paragraph-rsid="0039a1a0"/>
    </style:style>
    <style:style style:name="P3" style:family="paragraph" style:parent-style-name="Standard">
      <style:paragraph-properties fo:line-height="115%" fo:text-align="justify" style:justify-single-word="false"/>
      <style:text-properties style:font-name="Liberation Serif" fo:font-size="14pt" officeooo:rsid="000ef158" officeooo:paragraph-rsid="000ef158" style:font-size-asian="14pt" style:font-size-complex="14pt"/>
    </style:style>
    <style:style style:name="P4"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ef158" officeooo:paragraph-rsid="000ef158" style:font-size-asian="14pt" style:font-size-complex="14pt"/>
    </style:style>
    <style:style style:name="P5"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ef158" officeooo:paragraph-rsid="000ef158" style:font-size-asian="14pt" style:font-size-complex="14pt"/>
    </style:style>
    <style:style style:name="P6"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0ef158" officeooo:paragraph-rsid="0013fe06" style:font-size-asian="14pt" style:font-size-complex="14pt"/>
    </style:style>
    <style:style style:name="P7"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ef158" officeooo:paragraph-rsid="0013fe06" style:font-size-asian="14pt" style:font-size-complex="14pt"/>
    </style:style>
    <style:style style:name="P8"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ef158" officeooo:paragraph-rsid="0013fe06" style:font-size-asian="14pt" style:font-size-complex="14pt"/>
    </style:style>
    <style:style style:name="P9"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ef158" officeooo:paragraph-rsid="001454ae" style:font-size-asian="14pt" style:font-size-complex="14pt"/>
    </style:style>
    <style:style style:name="P10"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ef158" officeooo:paragraph-rsid="00167476" style:font-size-asian="14pt" style:font-size-complex="14pt"/>
    </style:style>
    <style:style style:name="P11"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ef158" officeooo:paragraph-rsid="00167476" style:font-size-asian="14pt" style:font-size-complex="14pt"/>
    </style:style>
    <style:style style:name="P12"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ef158" officeooo:paragraph-rsid="0013bde2" style:font-size-asian="14pt" style:font-size-complex="14pt"/>
    </style:style>
    <style:style style:name="P13"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ef158" officeooo:paragraph-rsid="0013bde2" style:font-size-asian="14pt" style:font-size-complex="14pt"/>
    </style:style>
    <style:style style:name="P14"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ef158" officeooo:paragraph-rsid="001fc970" style:font-size-asian="14pt" style:font-size-complex="14pt"/>
    </style:style>
    <style:style style:name="P15"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ef158" officeooo:paragraph-rsid="001fc970" style:font-size-asian="14pt" style:font-size-complex="14pt"/>
    </style:style>
    <style:style style:name="P16"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ef158" officeooo:paragraph-rsid="00261bf9" style:font-size-asian="14pt" style:font-size-complex="14pt"/>
    </style:style>
    <style:style style:name="P17"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24e34c" officeooo:paragraph-rsid="0024e34c" style:font-size-asian="14pt" style:font-size-complex="14pt"/>
    </style:style>
    <style:style style:name="P18"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24e34c" officeooo:paragraph-rsid="00261bf9" style:font-size-asian="14pt" style:font-size-complex="14pt"/>
    </style:style>
    <style:style style:name="P19"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261bf9" officeooo:paragraph-rsid="003679b0" style:font-size-asian="14pt" style:font-size-complex="14pt"/>
    </style:style>
    <style:style style:name="P20"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0ef158" officeooo:paragraph-rsid="0013bde2" style:font-size-asian="14pt" style:font-style-asian="normal" style:font-weight-asian="normal" style:font-size-complex="14pt" style:font-style-complex="normal" style:font-weight-complex="normal"/>
    </style:style>
    <style:style style:name="P21"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2ebdc8" officeooo:paragraph-rsid="002ebdc8" style:font-size-asian="14pt" style:font-style-asian="normal" style:font-weight-asian="normal" style:font-size-complex="14pt" style:font-style-complex="normal" style:font-weight-complex="normal"/>
    </style:style>
    <style:style style:name="P22"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261bf9" officeooo:paragraph-rsid="002c0903" style:font-size-asian="14pt" style:font-style-asian="normal" style:font-weight-asian="normal" style:font-size-complex="14pt" style:font-style-complex="normal" style:font-weight-complex="normal"/>
    </style:style>
    <style:style style:name="P23"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261bf9" officeooo:paragraph-rsid="003aca8a" style:font-size-asian="14pt" style:font-style-asian="normal" style:font-weight-asian="normal" style:font-size-complex="14pt" style:font-style-complex="normal" style:font-weight-complex="normal"/>
    </style:style>
    <style:style style:name="P24"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261bf9" officeooo:paragraph-rsid="003679b0" style:font-size-asian="14pt" style:font-style-asian="normal" style:font-weight-asian="normal" style:font-size-complex="14pt" style:font-style-complex="normal" style:font-weight-complex="normal"/>
    </style:style>
    <style:style style:name="P25" style:family="paragraph" style:parent-style-name="Standard">
      <style:paragraph-properties fo:line-height="100%" fo:text-align="justify" style:justify-single-word="false"/>
      <style:text-properties style:font-name="Liberation Serif" fo:font-size="16pt" officeooo:rsid="000ef158" officeooo:paragraph-rsid="000ef158" style:font-size-asian="16pt" style:font-size-complex="16pt"/>
    </style:style>
    <style:style style:name="P26" style:family="paragraph" style:parent-style-name="Footnote">
      <style:text-properties officeooo:rsid="003ec65f" officeooo:paragraph-rsid="003ec65f"/>
    </style:style>
    <style:style style:name="T1" style:family="text">
      <style:text-properties officeooo:rsid="00108459"/>
    </style:style>
    <style:style style:name="T2" style:family="text">
      <style:text-properties officeooo:rsid="00114e89"/>
    </style:style>
    <style:style style:name="T3" style:family="text">
      <style:text-properties fo:font-style="italic" style:font-style-asian="italic" style:font-style-complex="italic"/>
    </style:style>
    <style:style style:name="T4" style:family="text">
      <style:text-properties fo:font-style="italic" officeooo:rsid="0012849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dbedf"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e1916" style:font-style-asian="italic" style:font-weight-asian="normal" style:font-style-complex="italic" style:font-weight-complex="normal"/>
    </style:style>
    <style:style style:name="T9" style:family="text">
      <style:text-properties fo:font-style="italic" fo:font-weight="normal" officeooo:rsid="001ef472" style:font-style-asian="italic" style:font-weight-asian="normal" style:font-style-complex="italic" style:font-weight-complex="normal"/>
    </style:style>
    <style:style style:name="T10" style:family="text">
      <style:text-properties officeooo:rsid="00128499"/>
    </style:style>
    <style:style style:name="T11" style:family="text">
      <style:text-properties officeooo:rsid="0013fe06"/>
    </style:style>
    <style:style style:name="T12" style:family="text">
      <style:text-properties officeooo:rsid="001454ae"/>
    </style:style>
    <style:style style:name="T13" style:family="text">
      <style:text-properties officeooo:rsid="00163f58"/>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ef472" style:font-style-asian="normal" style:font-weight-asian="normal" style:font-style-complex="normal" style:font-weight-complex="normal"/>
    </style:style>
    <style:style style:name="T17" style:family="text">
      <style:text-properties fo:font-style="normal" fo:font-weight="normal" officeooo:rsid="002ebdc8" style:font-style-asian="normal" style:font-weight-asian="normal" style:font-style-complex="normal" style:font-weight-complex="normal"/>
    </style:style>
    <style:style style:name="T18" style:family="text">
      <style:text-properties fo:font-style="normal" fo:font-weight="normal" officeooo:rsid="00225c70" style:font-style-asian="normal" style:font-weight-asian="normal" style:font-style-complex="normal" style:font-weight-complex="normal"/>
    </style:style>
    <style:style style:name="T19" style:family="text">
      <style:text-properties fo:font-style="normal" fo:font-weight="normal" officeooo:rsid="002269ef" style:font-style-asian="normal" style:font-weight-asian="normal" style:font-style-complex="normal" style:font-weight-complex="normal"/>
    </style:style>
    <style:style style:name="T20" style:family="text">
      <style:text-properties fo:font-style="normal" fo:font-weight="normal" officeooo:rsid="0022a33c" style:font-style-asian="normal" style:font-weight-asian="normal" style:font-style-complex="normal" style:font-weight-complex="normal"/>
    </style:style>
    <style:style style:name="T21" style:family="text">
      <style:text-properties officeooo:rsid="0017bf76"/>
    </style:style>
    <style:style style:name="T22" style:family="text">
      <style:text-properties officeooo:rsid="00186607"/>
    </style:style>
    <style:style style:name="T23" style:family="text">
      <style:text-properties officeooo:rsid="0019743a"/>
    </style:style>
    <style:style style:name="T24" style:family="text">
      <style:text-properties officeooo:rsid="001c3f84"/>
    </style:style>
    <style:style style:name="T25" style:family="text">
      <style:text-properties fo:font-size="11pt" fo:font-style="italic" fo:font-weight="bold" style:font-size-asian="11pt" style:font-style-asian="italic" style:font-weight-asian="bold" style:font-size-complex="11pt" style:font-style-complex="italic" style:font-weight-complex="bold"/>
    </style:style>
    <style:style style:name="T26" style:family="text">
      <style:text-properties fo:font-size="11pt" fo:font-style="italic" fo:font-weight="bold" officeooo:rsid="001dbedf" style:font-size-asian="11pt" style:font-style-asian="italic" style:font-weight-asian="bold" style:font-size-complex="11pt" style:font-style-complex="italic" style:font-weight-complex="bold"/>
    </style:style>
    <style:style style:name="T27" style:family="text">
      <style:text-properties fo:font-size="11pt" fo:font-weight="bold" style:font-size-asian="11pt" style:font-weight-asian="bold" style:font-size-complex="11pt" style:font-weight-complex="bold"/>
    </style:style>
    <style:style style:name="T28" style:family="text">
      <style:text-properties officeooo:rsid="001dbedf"/>
    </style:style>
    <style:style style:name="T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fo:font-size="12pt" fo:font-style="italic" fo:font-weight="normal" officeooo:rsid="001e1916" style:font-size-asian="12pt" style:font-style-asian="italic" style:font-weight-asian="normal" style:font-size-complex="12pt" style:font-style-complex="italic" style:font-weight-complex="normal"/>
    </style:style>
    <style:style style:name="T31" style:family="text">
      <style:text-properties fo:font-size="12pt" fo:font-style="italic" fo:font-weight="normal" officeooo:rsid="001ef472" style:font-size-asian="12pt" style:font-style-asian="italic" style:font-weight-asian="normal" style:font-size-complex="12pt" style:font-style-complex="italic" style:font-weight-complex="normal"/>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1ef472"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225c70"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officeooo:rsid="002269ef"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22a33c"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2ebdc8" style:font-size-asian="12pt" style:font-style-asian="normal" style:font-weight-asian="normal" style:font-size-complex="12pt" style:font-style-complex="normal" style:font-weight-complex="normal"/>
    </style:style>
    <style:style style:name="T38" style:family="text">
      <style:text-properties officeooo:rsid="001e1916"/>
    </style:style>
    <style:style style:name="T39" style:family="text">
      <style:text-properties officeooo:rsid="001ff11c"/>
    </style:style>
    <style:style style:name="T40" style:family="text">
      <style:text-properties officeooo:rsid="0021d9a1"/>
    </style:style>
    <style:style style:name="T41" style:family="text">
      <style:text-properties officeooo:rsid="002d8215"/>
    </style:style>
    <style:style style:name="T42" style:family="text">
      <style:text-properties officeooo:rsid="0032a9e1"/>
    </style:style>
    <style:style style:name="T43" style:family="text">
      <style:text-properties officeooo:rsid="003679b0"/>
    </style:style>
    <style:style style:name="T44" style:family="text">
      <style:text-properties officeooo:rsid="003aca8a"/>
    </style:style>
    <style:style style:name="T4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me nasce il dubbio di Cartesio? <text:span text:style-name="T21">Qual è la sua posizione sull’esistenza di Dio? </text:span><text:span text:style-name="T38">L’argomento morale di Kant per Dio, </text:span><text:span text:style-name="T41">come viene affrontato?</text:span></text:p>
      <text:p text:style-name="P4">Cartesio amava la verità, ma insieme a questa nutriva grande <text:span text:style-name="T13">prudenza </text:span>e <text:span text:style-name="T13">riflessione</text:span>.</text:p>
      <text:p text:style-name="P3">Avendo come principio il bene per la verità, iniziò ad esaminare con critica inesorabile, un gran numero di cognizioni per vedere se queste av<text:span text:style-name="T1">essero </text:span>resistito ad ogni dubbio.</text:p>
      <text:p text:style-name="P5"><text:span text:style-name="T1">Questo esame lo portò a considerare la possibilità di dubitare di quelle verità accettate per autorità, né di </text:span>quelle fondate sul senso, perch<text:span text:style-name="T1">é</text:span> le autorità si contraddicono fra di loro, come si contraddicono i dati del senso; e non possiamo neppur esser certi di quelle verità che, per la testimonianza generale dei sensi, o per la loro evidenza, sono ammesse da tutti, potendo in noi sorgere il timore di essere in uno stato di sogno o di delirio, o di esser ingannati da un Essere maligno ed onnipotente che si prende gi<text:span text:style-name="T1">o</text:span>co di noi.</text:p>
      <text:p text:style-name="P6">Il dubbio di Cartesio ha dunque per intento di trovare il vero, ed è ben diverso dal <text:span text:style-name="T14">dubbio scettico</text:span> dei Pirronisti che volevano la sospensione definitiva di ogni giudizio ; il primo prende il nome di <text:span text:style-name="T3">dubbio metodico</text:span>, ed è per sua natura provvisorio, durando finch<text:span text:style-name="T2">é</text:span> non si è trovato un principio <text:span text:style-name="T2">stabile e irremovibile,</text:span> su cui fondare le nostre <text:soft-page-break/>cognizioni. <text:span text:style-name="T10">Il dubbio di Cartesio trae ispirazione da Sant’Agostino, il quale, nel suo "</text:span><text:span text:style-name="T4">Confessioni</text:span><text:span text:style-name="T10">", esplora il tema del dubbio e della fede, sostenendo che la fede è un passo necessario verso la comprensione razionale</text:span>. La sua famosa frase "<text:span text:style-name="T3">crede ut intelligas</text:span>" (credi per capire) sottolinea l'importanza della fede come base per la conoscenza. <text:span text:style-name="T10">Cartesio, amplia la portata di questo ragionamento affermando che: « Noi possiamo dubitare di tutto, osserva </text:span>Cartesio, ma non possiamo dubitare di dubitare, e quindi di pensare». Il dubbio, e quindi il pensiero, è dato direttamente alla nostra coscienza, e con questo ci è pur data necessariamente la certezza della nostra esistenza. Penso, dunque sono <text:span text:style-name="T3">(Cogito, ergo sum)</text:span> : ecco il principio inconcusso<text:note text:id="ftn0" text:note-class="footnote"><text:note-citation>1</text:note-citation><text:note-body><text:p text:style-name="P26">Aggettivo letterario che descrive qualcosa di fermo, stabile e irremovibile.</text:p></text:note-body></text:note> di Cartesio.</text:p>
      <text:p text:style-name="P7"><text:span text:style-name="T11">M</text:span>olti critici hanno sostenuto che la famosa frase "<text:span text:style-name="T3">Cogito, ergo sum</text:span>" potrebbe essere applicata ad altre azioni, come "<text:span text:style-name="T3">ambulo, ergo sum</text:span>" (cammino, dunque sono).</text:p>
      <text:p text:style-name="P7">Cartesio difende la sua famosa frase, sostene<text:span text:style-name="T11">ndo</text:span> che il pensiero, e non altre attività fisiche, era fondamentale per l'esistenza perché si trattava di un'attività mentale che non poteva essere messa in dubbio.</text:p>
      <text:p text:style-name="P7"><text:span text:style-name="T11">M</text:span>entre si potrebbe dubitare della realtà fisica di camminare (<text:span text:style-name="T11">si potrebbe </text:span>sognare di camminare, ad <text:soft-page-break/>esempio), il pensiero stesso è indubitabile, perché anche il dubbio è un atto di pensiero. Quindi, secondo Cartesio, è il pensiero che costituisce la prova della nostra esistenza in modo più fondamentale rispetto a qualsiasi altra attività fisica.</text:p>
      <text:p text:style-name="P7">Cartesio si pone la domanda: <text:span text:style-name="T3">come potrò argomentare l'esistenza di altre cose, fuori dall'esistenza del mio pensiero</text:span>?</text:p>
      <text:p text:style-name="P9">Cartesio affronta questa questione attraverso quello che è noto come il dualismo cartesiano. Partendo dal "<text:span text:style-name="T3">Cogito, ergo sum</text:span>", si chiede come possiamo essere certi dell'esistenza di altre cose al di fuori del nostro pensiero. <text:span text:style-name="T12">Il percorso che segue Cartesio è il seguente:</text:span></text:p>
      <text:p text:style-name="P9"><text:span text:style-name="T3">Chiarezza e Distinzione</text:span>: Cartesio afferma che ciò che percepiamo chiaramente e distintamente è vero. Questa chiarezza e distinzione nelle idee diventa un criterio di verità.</text:p>
      <text:p text:style-name="P9"><text:span text:style-name="T3">Esistenza di Dio</text:span>: Cartesio usa l'idea di un Dio perfetto come garanzia contro l'inganno. Egli argomenta che l'idea di un essere perfetto non potrebbe originare da un essere imperfetto come l'uomo. Quindi, Dio esiste e non è un ingannatore.</text:p>
      <text:p text:style-name="P8"><text:span text:style-name="T3">Validità delle Percezioni</text:span>: Poiché Dio non è un ingannatore, possiamo fidarci delle nostre percezioni sensoriali quando queste sono chiare e distinte. Questo <text:soft-page-break/>consente di affermare che le cose al di fuori del nostro pensiero esistono realmente.</text:p>
      <text:p text:style-name="P10">Dio non solo esiste come ente perfetto e supremo, ma garantisce anche la veridicità delle nostre percezioni e del nostro ragionamento. Se Dio non fosse perfetto e benevolente, potremmo sempre essere ingannati, e quindi non potremmo mai essere certi di nulla.</text:p>
      <text:p text:style-name="P11">Questo è il fondamento della certezza cartesiana: un Dio perfetto assicura che ciò che percepiamo chiaramente e distintamente è vero. Cartesio, così, cerca di superare ogni forma di dubbio radicale legato alla nostra conoscenza e alle nostre evidenze. Avere Dio come garante della verità rende possibile una conoscenza solida e affidabile del mondo esterno.</text:p>
      <text:p text:style-name="P12"><text:span text:style-name="T45">Immanuel Kant</text:span> (1724-1804) aveva una visione diversa rispetto a Cartesio sull'esistenza di Dio. Invece di cercare di provare l'esistenza di Dio attraverso argomenti razionali, <text:span text:style-name="T22">argomenti ontologici e cosmologici</text:span> <text:span text:style-name="T21">(critica della ragion pura),</text:span> Kant propose un argomento morale per la sua esistenza. Secondo Kant, la moralità e la legge morale presuppongono l'esistenza di un Dio supremo e perfetto, poiché solo un essere perfetto può garantire che la legge morale abbia un valore assoluto e universale.</text:p>
      <text:p text:style-name="P13">Kant era irremovibile sul fatto che Dio non potesse essere provato in alcun modo positivo. Né con la ragione, <text:soft-page-break/>né con la "rivelazione", <text:span text:style-name="T22">tuttavia, n</text:span>el suo "Critica della ragion pratica", Kant sostiene che la nostra capacità di agire moralmente e il nostro senso di dovere implicano l'esistenza di Dio come garante della moralità, la nostra esperienza morale ci porta a credere in Dio, non viceversa. Quindi, non si può dimostrare che Dio esiste, ma si può supporre che esista attraverso la ragione.</text:p>
      <text:p text:style-name="P13">Per comprendere appieno l'argomentazione, è necessario comprendere la sua filosofia, in particolare la sua ontologia (teoria dell'esistenza), l'epistemologia (teoria della conoscenza, che è collegata alla sua ontologia) e la sua teoria etica.</text:p>
      <text:p text:style-name="P13"><text:span text:style-name="T23">P</text:span>er Kant l'eticità di un'azione non si misura in base alle sue conseguenze, bensì in base all'intenzione che la muove. Ciò che rende un'azione moralmente buona è il fatto che sia compiuta in conformità a un principio morale universale, indipendentemente dal bene o dal male che potrebbe derivarne.</text:p>
      <text:p text:style-name="P13">Il principio cardine della morale kantiana è l'imperativo categorico, una legge morale che comanda incondizionatamente e che ogni essere razionale deve seguire. Una delle formulazioni più celebri di questo imperativo è: "<text:span text:style-name="T3">Agisci in modo che la massima della tua azione possa valere allo stesso tempo come legge universale</text:span>". In altre parole, agisci sempre in modo tale <text:soft-page-break/>che la regola che guida la tua azione possa essere elevata a legge valida per tutti, senza contraddizioni.</text:p>
      <text:p text:style-name="P13">L'azione moralmente giusta è quella che è compiuta per dovere, cioè per rispetto alla legge morale in sé, e non per ottenere un qualche vantaggio personale o per evitare una punizione.</text:p>
      <text:p text:style-name="P13">Immagin<text:span text:style-name="T23">iamo</text:span> di dover mentire per salvare la vita di un amico che è ricercato dalla polizia. Secondo un'etica consequenzialista, mentire in questo caso sarebbe moralmente giustificabile, poiché le conseguenze positive (salvare la vita dell'amico) superano quelle negative (dire una menzogna).</text:p>
      <text:p text:style-name="P13">Per Kant, invece, mentire è sempre sbagliato, anche se potesse portare a un bene apparentemente maggiore. Questo perché la massima "mentire per ottenere un vantaggio" non può essere universalizzata senza generare una contraddizione: se tutti mentissero, la fiducia reciproca verrebbe meno e la comunicazione diventerebbe impossibile.</text:p>
      <text:p text:style-name="P13">La morale di Kant si basa sulle intenzioni e per alcuni qui nasce un problema. Se tutto nell'universo <text:span text:style-name="T39">è </text:span>causato da qualcos'altro, allora le azioni che compiamo sono determinate <text:s/><text:span text:style-name="T24">d</text:span>a <text:span text:style-name="T24">cause precedenti?</text:span></text:p>
      <text:p text:style-name="P13">Se accettiamo l'idea che ogni evento, compresa ogni nostra azione, sia determinato da una catena di cause <text:soft-page-break/>precedenti, allora l'intenzione sembra perdere il suo valore di scelta autonoma. In altre parole, se le nostre azioni sono già scritte nel libro della causalità, come possiamo essere ritenuti moralmente responsabili delle nostre scelte? <text:span text:style-name="T28">La soluzione al quesito è:</text:span></text:p>
      <text:p text:style-name="P13"><text:span text:style-name="T5">“</text:span><text:span text:style-name="T6">A</text:span><text:span text:style-name="T5">ffinché la moralità sia possibile, deve esistere il libero arbitrio”, </text:span><text:span text:style-name="T8">s</text:span><text:span text:style-name="T7">e non ci fosse libertà sarebbe impossibile rintracciare la legge morale in noi stessi.</text:span></text:p>
      <text:p text:style-name="P20">Kant, pur non offrendo una dimostrazione metafisica del libero arbitrio, lo considera un postulato pratico della ragione. In altre parole, il libero arbitrio è una condizione necessaria per poter parlare di moralità. Se negassimo il libero arbitrio, la stessa idea di responsabilità morale diventerebbe priva di senso.</text:p>
      <text:p text:style-name="P21">Partendo dalla definizione di pratico, Kant precisa tale definizione distinguendo tra libero arbitrio e arbitrio animale. Mentre l’arbitrio animale si caratterizza per il fatto di poter essere determinato mediante impulsi sensibili, il libero arbitrio si caratterizza per il fatto di poter essere determinato, indipendentemente da ogni stimolo sensibile, solo per «motivi» presentati dalla ragione pura, ovvero in virtù della «legge morale» che prescrive ciò che è bene e ciò che è male.</text:p>
      <text:p text:style-name="P14"><text:soft-page-break/><text:span text:style-name="T15">Molti filosofi e scienziati non credono nel libero arbitrio a causa di diversi tipi di determinismo</text:span><text:span text:style-name="T15"><text:note text:id="ftn1" text:note-class="footnote"><text:note-citation>2</text:note-citation><text:note-body><text:p text:style-name="P1">Tutto ciò che accade, secondo <text:span text:style-name="T40">il determinismo</text:span>, è predeterminato da cause precedenti e da leggi naturali immutabili. Non c'è spazio per il caso o per il libero arbitrio.</text:p></text:note-body></text:note></text:span><text:span text:style-name="T15">. Potre</text:span><text:span text:style-name="T16">mmo</text:span><text:span text:style-name="T15"> essere determinat</text:span><text:span text:style-name="T16">i</text:span><text:span text:style-name="T15"> ad agire socialmente, biologicamente, persino logicamente: la convinzione che ogni effetto nell'universo debba essere stato causato da qualcos'altro </text:span><text:span text:style-name="T16">(causalità).</text:span></text:p>
      <text:p text:style-name="P16"><text:span text:style-name="T16">Kant respin</text:span><text:span text:style-name="T17">ge</text:span><text:span text:style-name="T16"> tale argomentazione per la stessa ragione per cui rifiuta la confutazione del libero arbitrio: Kant credeva effettivamente sia nella causalità che nel libero arbitrio, </text:span><text:span text:style-name="T18">e questo poté farlo </text:span><text:span text:style-name="T16">grazie alla sua ontologia. Divise la realtà in due: </text:span><text:span text:style-name="T9">fenomeni </text:span><text:span text:style-name="T16">(apparenze) e </text:span><text:span text:style-name="T9">noumeni</text:span><text:span text:style-name="T16"> (cose in sé). </text:span></text:p>
      <text:p text:style-name="P16"><text:span text:style-name="T16">La causalità esiste nel mondo fenomenico, il mondo dell'empirismo </text:span><text:span text:style-name="T18">e della </text:span><text:span text:style-name="T16">scienza naturale. Ma il libero arbitrio esiste nel mondo noumenico e quindi le intenzioni non sono causate da cose fisiche fenomeniche. Questa limitazione ci dice che la nostra conoscenza è sempre mediata dalle nostre percezioni e concetti a priori. Non possiamo avere una conoscenza diretta della realtà ultima.</text:span></text:p>
      <text:p text:style-name="P15"><text:span text:style-name="T16"/></text:p>
      <text:p text:style-name="P15"><text:soft-page-break/><text:span text:style-name="T16">Kant unisce empirismo e razionalismo attraverso ciò che chiama trascendentalismo</text:span><text:span text:style-name="T16"><text:note text:id="ftn2" text:note-class="footnote"><text:note-citation>3</text:note-citation><text:note-body><text:p text:style-name="P1">Per Kant, il trascendentalismo significa che il modo in cui comprendiamo la realtà è determinato dai nostri strumenti di conoscenza. Le nostre menti impongono strutture come lo spazio e il tempo e categorie come causalità al mondo sensibile, rendendo possibile l'esperienza e la conoscenza.</text:p></text:note-body></text:note></text:span><text:span text:style-name="T16">. Nell'ontologia kantiana, le nostre menti non sono semplicemente passive nell'assorbire informazioni dal mondo esterno; piuttosto, strutturiamo e interpretiamo queste informazioni attraverso concetti a priori. </text:span><text:span text:style-name="T19">Ad esempio, lo spazio e il tempo non esistono nel mondo noumenico; provengono piuttosto dalla nostra mente e vengono proiettati sulla "realtà" affinché possiamo percepire le cose nello spazio e nel tempo.</text:span></text:p>
      <text:p text:style-name="P15"><text:span text:style-name="T19">Tempo e spazio </text:span><text:span text:style-name="T20">sono </text:span><text:span text:style-name="T19">concetti che la nostra mente applica per organizzare l'esperienza. Non esistono nel mondo noumenico, ma sono essenziali per la nostra esperienza del mondo fenomenico.</text:span></text:p>
      <text:p text:style-name="P17"><text:span text:style-name="T19">A</text:span><text:span text:style-name="T15">ltro concetto puro dell’intelletto, oltre al tempo e allo spazio, è la causalità che si applica al mondo fenomenico. E’ uno di quei concetti che la nostra mente applica per interpretare l’esperienza, questo vuol dire che la nostra comprensione di causa ed effetto non deriva dall'esperienza, ma è una struttura mentale innata che usiamo per organizzare le percezioni.</text:span></text:p>
      <text:p text:style-name="P18"><text:soft-page-break/><text:span text:style-name="T15">Facendo questa mossa ontologica, Kant rende possibile la moralità. Kant ritiene che le strutture a priori della mente, come la causalità, siano fondamentali anche per la moralità. La sua "Critica della ragion pratica" stabilisce che i principi morali non derivano dall'esperienza, ma sono innati e universali. </text:span></text:p>
      <text:p text:style-name="P22">Kant cerca di conciliare la ragione e la fede, proponendo che la nostra esperienza morale ci porta a credere in Dio, ma senza basarsi su argomenti razionali che possano dimostrare la sua esistenza in modo definitivo.</text:p>
      <text:p text:style-name="P22">Kant affronta la teologia in vari modi, ma uno dei suoi lavori più importanti su questo tema è "La religione nei limiti della semplice ragione" (1793). In questo libro, Kant esplora come la ragione possa giungere a certe conclusioni teologiche senza ricorrere a rivelazioni divine.</text:p>
      <text:p text:style-name="P23">Dio non è un ente dimostrabile ontologicamente, ma rappresenta un ideale regolativo della ragione. È il sommo bene <text:span text:style-name="T42">(summum bonum), </text:span>una combinazione di virtù e felicità, l'essere perfetto che la nostra ragione è portata a postulare<text:note text:id="ftn3" text:note-class="footnote"><text:note-citation>4</text:note-citation><text:note-body><text:p text:style-name="P2">Kant non offre una prova dell'esistenza di Dio nel senso tradizionale, ma piuttosto postula, ovvero suppone, l'esistenza di un essere supremo come una necessità pratica per la nostra vita morale.</text:p></text:note-body></text:note>. In questo senso, Dio è un concetto limite, un punto di riferimento che trascende la nostra esperienza sensibile e le nostre categorie del pensiero. <text:soft-page-break/>L'etica kantiana è fondata sulla legge morale, che è universale e necessaria. Dio, in questo contesto, rappresenta la garanzia della felicità per coloro che agiscono moralmente. In altre parole, la fede in Dio è una <text:span text:style-name="T3">speranza razionale</text:span> che giustifica la nostra perseveranza nel bene, anche di fronte alle avversità. Kant sostiene che la felicità non può essere il fine ultimo dell'azione morale, ma piuttosto un effetto collaterale della vita virtuosa, <text:span text:style-name="T44">e p</text:span><text:span text:style-name="T43">oiché </text:span>il summum bonum non viene spesso raggiunto (in questa vita), Kant <text:span text:style-name="T43">è portato a </text:span>postulare due cose: <text:span text:style-name="T45">l’immortalità dell’anima</text:span> e <text:span text:style-name="T45">Dio</text:span>.</text:p>
      <text:p text:style-name="P24">La postulazione di Dio garantisce la possibilità che la virtù sia ricompensata con la felicità nell'aldilà.</text:p>
      <text:p text:style-name="P22">Poiché la moralità si basa sulla ragione, e la moralità richiede logicamente il summum bonum, allora il fatto che non venga raggiunto nella nostra vita fenomenica implica che la nostra anima debba continuare a vivere dopo la morte fenomenica in modo che il summum bonum possa essere raggiunto in seguito. Quindi la moralità implica l'immortalità dell'anima.</text:p>
      <text:p text:style-name="P22">Kant chiama questa postulazione di Dio una “<text:span text:style-name="T45">ipotesi necessaria</text:span>”, <text:span text:style-name="T43">n</text:span>on è conoscenza, ma assunzione <text:span text:style-name="T44">e </text:span>pur postulando l'esistenza di Dio, nega la possibilità di dimostrarla in modo rigorosamente scientifico. La fede in Dio è, per lui, un atto di libertà della ragione, non una <text:soft-page-break/>conclusione deduttiva. La conoscenza richiede che la comprensione sia combinata con la percezione <text:span text:style-name="T43">e</text:span> un essere metafisico non può essere percepito per definizione.</text:p>
      <text:p text:style-name="P19"><text:span text:style-name="T15">“…</text:span><text:span text:style-name="T7">è moralmente necessario presupporre l’esistenza di Dio… Non intendo con questo neppure che sia necessario presupporre l’esistenza di Dio come fondamento di ogni obbligazione in quanto tale</text:span><text:span text:style-name="T15"> (</text:span><text:span text:style-name="T7">perché tale fondamento poggia, come è stato sufficientemente dimostrato, unicamente sull’autonomia della ragione stessa</text:span><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4-10-14T18:57:26.974000000</meta:creation-date>
    <dc:date>2026-04-04T18:20:16.080730080</dc:date>
    <dc:creator>corrado tafaro</dc:creator>
    <meta:editing-duration>PT3H41M54S</meta:editing-duration>
    <meta:editing-cycles>19</meta:editing-cycles>
    <meta:generator>LibreOffice/24.2.7.2$Linux_X86_64 LibreOffice_project/420$Build-2</meta:generator>
    <meta:document-statistic meta:table-count="0" meta:image-count="0" meta:object-count="0" meta:page-count="12" meta:paragraph-count="46" meta:word-count="2224" meta:character-count="14496" meta:non-whitespace-character-count="12315"/>
  </office:meta>
</office:document-meta>
</file>