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0ea709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0ea709" style:font-size-asian="12pt" style:font-size-complex="12pt"/>
    </style:style>
    <style:style style:name="P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c02ae" officeooo:paragraph-rsid="000ea70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rsid="001c02ae" officeooo:paragraph-rsid="000ea709" style:font-size-asian="12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bold" officeooo:paragraph-rsid="000ea709" style:font-size-asian="12pt" style:font-weight-asian="bold" style:font-size-complex="12pt" style:font-weight-complex="bold"/>
    </style:style>
    <style:style style:name="P6" style:family="paragraph" style:parent-style-name="Quotations">
      <style:paragraph-properties fo:margin-top="0.101cm" fo:margin-bottom="0cm" style:contextual-spacing="false" fo:line-height="100%" fo:text-align="center" style:justify-single-word="false"/>
      <style:text-properties fo:font-size="9pt" officeooo:paragraph-rsid="0011d62e" style:font-size-asian="9pt" style:font-size-complex="9pt"/>
    </style:style>
    <style:style style:name="P7" style:family="paragraph" style:parent-style-name="Text_20_body">
      <style:paragraph-properties fo:line-height="100%" fo:text-align="justify" style:justify-single-word="false"/>
      <style:text-properties fo:font-size="9pt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style:font-size-asian="9pt" style:font-size-complex="9pt"/>
    </style:style>
    <style:style style:name="P9" style:family="paragraph" style:parent-style-name="Text_20_body">
      <style:paragraph-properties fo:margin-top="0.101cm" fo:margin-bottom="0cm" style:contextual-spacing="false" fo:line-height="100%" fo:text-align="justify" style:justify-single-word="false"/>
    </style:style>
    <style:style style:name="P10" style:family="paragraph" style:parent-style-name="Footnote">
      <style:paragraph-properties fo:text-align="justify" style:justify-single-word="false"/>
    </style:style>
    <style:style style:name="P11" style:family="paragraph" style:parent-style-name="Heading_20_2" style:master-page-name="">
      <style:paragraph-properties fo:text-align="center" style:justify-single-word="false" style:page-number="auto"/>
      <style:text-properties officeooo:paragraph-rsid="0013a3d9"/>
    </style:style>
    <style:style style:name="P12" style:family="paragraph" style:parent-style-name="Heading_20_3">
      <style:paragraph-properties fo:line-height="115%" fo:text-align="justify" style:justify-single-word="false"/>
      <style:text-properties style:font-name="Noto Sans1" fo:font-size="12pt" officeooo:paragraph-rsid="000ea709" style:font-size-asian="12pt" style:font-size-complex="12pt"/>
    </style:style>
    <style:style style:name="P13" style:family="paragraph" style:parent-style-name="Heading_20_3">
      <style:text-properties style:font-name="Noto Sans1" fo:font-size="12pt" officeooo:paragraph-rsid="00137b5a" style:font-size-asian="12pt" style:font-size-complex="12pt"/>
    </style:style>
    <style:style style:name="P14" style:family="paragraph" style:parent-style-name="Heading_20_3">
      <style:text-properties style:font-name="Noto Sans1" fo:font-size="12pt" officeooo:paragraph-rsid="0013a3d9" style:font-size-asian="12pt" style:font-size-complex="12pt"/>
    </style:style>
    <style:style style:name="P15" style:family="paragraph" style:parent-style-name="Quotations">
      <style:paragraph-properties fo:margin-top="0.3cm" fo:margin-bottom="0.199cm" style:contextual-spacing="false" fo:line-height="115%" fo:text-align="center" style:justify-single-word="false"/>
      <style:text-properties officeooo:paragraph-rsid="00137b5a"/>
    </style:style>
    <style:style style:name="P16" style:family="paragraph" style:parent-style-name="Quotations">
      <style:paragraph-properties fo:margin-top="0.101cm" fo:margin-bottom="0cm" style:contextual-spacing="false" fo:line-height="115%"/>
      <style:text-properties style:font-name="Noto Sans1" fo:font-size="12pt" fo:font-weight="normal" officeooo:paragraph-rsid="00137b5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officeooo:paragraph-rsid="00137b5a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37b5a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7b5a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a3d9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3a3d9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a3d9"/>
    </style:style>
    <style:style style:name="P3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tyle="normal" officeooo:paragraph-rsid="0013a3d9" style:font-style-asian="normal" style:font-style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tyle="normal" officeooo:paragraph-rsid="0013a3d9" style:font-style-asian="normal" style:font-style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font-name="Noto Sans1" fo:font-style="italic" officeooo:paragraph-rsid="0013a3d9" style:font-style-asian="italic" style:font-style-complex="italic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italic" officeooo:paragraph-rsid="00137b5a" style:font-size-asian="12pt" style:font-style-asian="italic" style:font-size-complex="12pt" style:font-style-complex="italic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italic" officeooo:paragraph-rsid="00137b5a" style:font-size-asian="12pt" style:font-style-asian="italic" style:font-size-complex="12pt" style:font-style-complex="italic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italic" fo:font-weight="normal" officeooo:rsid="0040f61e" officeooo:paragraph-rsid="0013a3d9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137b5a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137b5a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7b5a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7b5a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7b5a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7b5a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7b5a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7b5a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a3d9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a3d9" style:font-size-asian="12pt" style:font-size-complex="12pt"/>
    </style:style>
    <style:style style:name="P4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weight="bold" officeooo:rsid="02397a74" officeooo:paragraph-rsid="00137b5a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40f61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T1" style:family="text">
      <style:text-properties style:font-name="Noto Sans1"/>
    </style:style>
    <style:style style:name="T2" style:family="text">
      <style:text-properties style:font-name="Noto Sans1" fo:font-style="italic" style:font-style-asian="italic" style:font-style-complex="italic"/>
    </style:style>
    <style:style style:name="T3" style:family="text">
      <style:text-properties style:font-name="Noto Sans1" fo:font-size="12pt" fo:font-style="normal" fo:font-weight="normal" officeooo:rsid="002bb61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Noto Sans1" fo:font-size="12pt" style:font-size-asian="12pt" style:font-size-complex="12pt"/>
    </style:style>
    <style:style style:name="T5" style:family="text">
      <style:text-properties style:font-name="Noto Sans1" fo:font-size="12pt" officeooo:rsid="003c6cfa" style:font-size-asian="12pt" style:font-size-complex="12pt"/>
    </style:style>
    <style:style style:name="T6" style:family="text">
      <style:text-properties style:font-name="Noto Sans1" fo:font-size="12pt" officeooo:rsid="003fde63" style:font-size-asian="12pt" style:font-size-complex="12pt"/>
    </style:style>
    <style:style style:name="T7" style:family="text">
      <style:text-properties style:font-name="Noto Sans1" fo:font-size="11pt" officeooo:rsid="00356da2" style:font-size-asian="11pt" style:font-size-complex="11pt"/>
    </style:style>
    <style:style style:name="T8" style:family="text">
      <style:text-properties style:font-name="Noto Sans1" officeooo:rsid="0030c1a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8aa31" style:font-style-asian="normal" style:font-style-complex="normal"/>
    </style:style>
    <style:style style:name="T11" style:family="text">
      <style:text-properties fo:font-style="normal" officeooo:rsid="001c02ae" style:font-style-asian="normal" style:font-style-complex="normal"/>
    </style:style>
    <style:style style:name="T12" style:family="text">
      <style:text-properties fo:font-style="normal" officeooo:rsid="00336864" style:font-style-asian="normal" style:font-style-complex="normal"/>
    </style:style>
    <style:style style:name="T13" style:family="text">
      <style:text-properties fo:font-style="normal" officeooo:rsid="002bb611" style:font-size-asian="12pt" style:font-style-asian="normal" style:font-style-complex="normal"/>
    </style:style>
    <style:style style:name="T14" style:family="text">
      <style:text-properties fo:font-style="normal" officeooo:rsid="00432f8e" style:font-size-asian="12pt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ddc89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0c1a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bb61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c02ae" style:font-style-asian="normal" style:font-weight-asian="normal" style:font-style-complex="normal" style:font-weight-complex="normal"/>
    </style:style>
    <style:style style:name="T20" style:family="text">
      <style:text-properties fo:font-style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0f61e" style:font-style-asian="italic" style:font-weight-asian="normal" style:font-style-complex="italic" style:font-weight-complex="normal"/>
    </style:style>
    <style:style style:name="T24" style:family="text">
      <style:text-properties fo:font-style="italic" officeooo:rsid="00432f8e" style:font-size-asian="12pt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fo:font-weight="normal" officeooo:rsid="001c02ae" style:font-style-asian="italic" style:font-weight-asian="normal" style:font-style-complex="italic" style:font-weight-complex="normal"/>
    </style:style>
    <style:style style:name="T27" style:family="text">
      <style:text-properties officeooo:rsid="0029c3ce"/>
    </style:style>
    <style:style style:name="T28" style:family="text">
      <style:text-properties officeooo:rsid="01d5c377"/>
    </style:style>
    <style:style style:name="T29" style:family="text">
      <style:text-properties officeooo:rsid="01d9d0ee"/>
    </style:style>
    <style:style style:name="T30" style:family="text">
      <style:text-properties style:use-window-font-color="true" loext:opacity="0%" fo:background-color="transparent" loext:char-shading-value="0"/>
    </style:style>
    <style:style style:name="T31" style:family="text">
      <style:text-properties fo:font-weight="bol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11d62e" style:font-size-asian="9pt" style:font-size-complex="9pt"/>
    </style:style>
    <style:style style:name="T34" style:family="text">
      <style:text-properties officeooo:rsid="00356da2"/>
    </style:style>
    <style:style style:name="T35" style:family="text">
      <style:text-properties fo:font-size="12pt" fo:font-style="normal" fo:font-weight="normal" officeooo:rsid="002bb61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186b3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df46a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e0caf7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36f34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356da2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30c1a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157589f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ddc89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6120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e34ab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94bb8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1f97de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6f345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1c02ae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3c6cfa" style:font-size-asian="12pt" style:font-size-complex="12pt"/>
    </style:style>
    <style:style style:name="T52" style:family="text">
      <style:text-properties fo:font-size="12pt" officeooo:rsid="003fde63" style:font-size-asian="12pt" style:font-size-complex="12pt"/>
    </style:style>
    <style:style style:name="T53" style:family="text">
      <style:text-properties fo:font-size="12pt" fo:font-style="italic" fo:font-weight="normal" officeooo:rsid="002bb611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italic" fo:font-weight="normal" officeooo:rsid="00356da2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fo:font-weight="normal" officeooo:rsid="0040f61e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italic" style:text-underline-style="none" fo:font-weight="normal" officeooo:rsid="001c02ae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356da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2911370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37501e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1c02ae" style:font-size-asian="10.5pt" style:font-weight-asian="normal" style:font-size-complex="12pt" style:font-weight-complex="normal"/>
    </style:style>
    <style:style style:name="T62" style:family="text">
      <style:text-properties officeooo:rsid="00df46ad"/>
    </style:style>
    <style:style style:name="T63" style:family="text">
      <style:text-properties officeooo:rsid="0030c1a7"/>
    </style:style>
    <style:style style:name="T64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size="11pt" fo:font-style="italic" fo:font-weight="bold" officeooo:rsid="002bb611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fo:font-size="11pt" fo:font-style="italic" style:font-size-asian="11pt" style:font-style-asian="italic" style:font-size-complex="11pt" style:font-style-complex="italic"/>
    </style:style>
    <style:style style:name="T67" style:family="text">
      <style:text-properties fo:font-size="11pt" fo:font-style="italic" fo:font-weight="normal" officeooo:rsid="002bb611" style:font-size-asian="11pt" style:font-style-asian="italic" style:font-weight-asian="normal" style:font-size-complex="11pt" style:font-style-complex="italic" style:font-weight-complex="normal"/>
    </style:style>
    <style:style style:name="T68" style:family="text">
      <style:text-properties fo:font-size="11pt" fo:font-style="italic" fo:font-weight="normal" officeooo:rsid="0040f61e" style:font-size-asian="11pt" style:font-style-asian="italic" style:font-weight-asian="normal" style:font-size-complex="11pt" style:font-style-complex="italic" style:font-weight-complex="normal"/>
    </style:style>
    <style:style style:name="T69" style:family="text">
      <style:text-properties fo:font-size="11pt" officeooo:rsid="00356da2" style:font-size-asian="11pt" style:font-size-complex="11pt"/>
    </style:style>
    <style:style style:name="T70" style:family="text">
      <style:text-properties fo:font-size="11pt" fo:font-weight="normal" officeooo:rsid="00356da2" style:font-size-asian="11pt" style:font-weight-asian="normal" style:font-size-complex="11pt" style:font-weight-complex="normal"/>
    </style:style>
    <style:style style:name="T71" style:family="text">
      <style:text-properties style:font-name="Noto Sans1" fo:font-size="11pt" officeooo:rsid="00356da2" style:font-size-asian="11pt" style:font-size-complex="11pt"/>
    </style:style>
    <style:style style:name="T72" style:family="text">
      <style:text-properties style:font-name="Noto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style:font-name="Noto Sans1" fo:font-size="11pt" fo:font-style="italic" fo:font-weight="bold" officeooo:rsid="002bb611" style:font-size-asian="11pt" style:font-style-asian="italic" style:font-weight-asian="bold" style:font-size-complex="11pt" style:font-style-complex="italic" style:font-weight-complex="bold"/>
    </style:style>
    <style:style style:name="T74" style:family="text">
      <style:text-properties style:font-name="Noto Sans1" fo:font-size="11pt" fo:font-style="italic" style:font-size-asian="11pt" style:font-style-asian="italic" style:font-size-complex="11pt" style:font-style-complex="italic"/>
    </style:style>
    <style:style style:name="T75" style:family="text">
      <style:text-properties style:font-name="Noto Sans1" fo:font-size="11pt" fo:font-style="italic" fo:font-weight="normal" officeooo:rsid="002bb611" style:font-size-asian="11pt" style:font-style-asian="italic" style:font-weight-asian="normal" style:font-size-complex="11pt" style:font-style-complex="italic" style:font-weight-complex="normal"/>
    </style:style>
    <style:style style:name="T76" style:family="text">
      <style:text-properties style:font-name="Noto Sans1" fo:font-size="11pt" fo:font-weight="normal" officeooo:rsid="00356da2" style:font-size-asian="11pt" style:font-weight-asian="normal" style:font-size-complex="11pt" style:font-weight-complex="normal"/>
    </style:style>
    <style:style style:name="T77" style:family="text">
      <style:text-properties style:font-name="Noto Sans1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style:font-name="Noto Sans1" fo:font-style="normal" fo:font-weight="normal" officeooo:rsid="00ddc89a" style:font-style-asian="normal" style:font-weight-asian="normal" style:font-style-complex="normal" style:font-weight-complex="normal"/>
    </style:style>
    <style:style style:name="T79" style:family="text">
      <style:text-properties style:font-name="Noto Sans1" fo:font-style="normal" fo:font-weight="normal" officeooo:rsid="0030c1a7" style:font-style-asian="normal" style:font-weight-asian="normal" style:font-style-complex="normal" style:font-weight-complex="normal"/>
    </style:style>
    <style:style style:name="T80" style:family="text">
      <style:text-properties style:font-name="Noto Sans1" fo:font-style="normal" fo:font-weight="normal" officeooo:rsid="002bb611" style:font-style-asian="normal" style:font-weight-asian="normal" style:font-style-complex="normal" style:font-weight-complex="normal"/>
    </style:style>
    <style:style style:name="T81" style:family="text">
      <style:text-properties style:font-name="Noto Sans1" fo:font-style="normal" fo:font-weight="normal" officeooo:rsid="00186b32" style:font-style-asian="normal" style:font-weight-asian="normal" style:font-style-complex="normal" style:font-weight-complex="normal"/>
    </style:style>
    <style:style style:name="T82" style:family="text">
      <style:text-properties style:font-name="Noto Sans1" fo:font-style="normal" fo:font-weight="normal" officeooo:rsid="00df46ad" style:font-style-asian="normal" style:font-weight-asian="normal" style:font-style-complex="normal" style:font-weight-complex="normal"/>
    </style:style>
    <style:style style:name="T83" style:family="text">
      <style:text-properties style:font-name="Noto Sans1" fo:font-style="normal" fo:font-weight="normal" officeooo:rsid="00e0caf7" style:font-style-asian="normal" style:font-weight-asian="normal" style:font-style-complex="normal" style:font-weight-complex="normal"/>
    </style:style>
    <style:style style:name="T84" style:family="text">
      <style:text-properties style:font-name="Noto Sans1" fo:font-style="normal" fo:font-weight="normal" officeooo:rsid="0036f345" style:font-style-asian="normal" style:font-weight-asian="normal" style:font-style-complex="normal" style:font-weight-complex="normal"/>
    </style:style>
    <style:style style:name="T85" style:family="text">
      <style:text-properties style:font-name="Noto Sans1" fo:font-style="normal" fo:font-weight="normal" officeooo:rsid="00356da2" style:font-style-asian="normal" style:font-weight-asian="normal" style:font-style-complex="normal" style:font-weight-complex="normal"/>
    </style:style>
    <style:style style:name="T86" style:family="text">
      <style:text-properties style:font-name="Noto Sans1" fo:font-style="normal" fo:font-weight="normal" officeooo:rsid="0157589f" style:font-style-asian="normal" style:font-weight-asian="normal" style:font-style-complex="normal" style:font-weight-complex="normal"/>
    </style:style>
    <style:style style:name="T87" style:family="text">
      <style:text-properties style:font-name="Noto Sans1" fo:font-style="normal" fo:font-weight="normal" officeooo:rsid="00361202" style:font-style-asian="normal" style:font-weight-asian="normal" style:font-style-complex="normal" style:font-weight-complex="normal"/>
    </style:style>
    <style:style style:name="T88" style:family="text">
      <style:text-properties style:font-name="Noto Sans1" fo:font-style="normal" fo:font-weight="normal" officeooo:rsid="00e34ab2" style:font-style-asian="normal" style:font-weight-asian="normal" style:font-style-complex="normal" style:font-weight-complex="normal"/>
    </style:style>
    <style:style style:name="T89" style:family="text">
      <style:text-properties style:font-name="Noto Sans1" fo:font-style="normal" fo:font-weight="normal" officeooo:rsid="00394bb8" style:font-style-asian="normal" style:font-weight-asian="normal" style:font-style-complex="normal" style:font-weight-complex="normal"/>
    </style:style>
    <style:style style:name="T90" style:family="text">
      <style:text-properties style:font-name="Noto Sans1" fo:font-style="normal" fo:font-weight="normal" officeooo:rsid="001f97de" style:font-style-asian="normal" style:font-weight-asian="normal" style:font-style-complex="normal" style:font-weight-complex="normal"/>
    </style:style>
    <style:style style:name="T91" style:family="text">
      <style:text-properties style:font-name="Noto Sans1" fo:font-style="normal" fo:font-weight="normal" officeooo:rsid="001c02ae" style:font-style-asian="normal" style:font-weight-asian="normal" style:font-style-complex="normal" style:font-weight-complex="normal"/>
    </style:style>
    <style:style style:name="T92" style:family="text">
      <style:text-properties style:font-name="Noto Sans1" fo:font-style="normal" officeooo:rsid="002bb611" style:font-size-asian="12pt" style:font-style-asian="normal" style:font-style-complex="normal"/>
    </style:style>
    <style:style style:name="T93" style:family="text">
      <style:text-properties style:font-name="Noto Sans1" fo:font-style="normal" officeooo:rsid="00432f8e" style:font-size-asian="12pt" style:font-style-asian="normal" style:font-style-complex="normal"/>
    </style:style>
    <style:style style:name="T94" style:family="text">
      <style:text-properties style:font-name="Noto Sans1" fo:font-style="normal" style:font-style-asian="normal" style:font-style-complex="normal"/>
    </style:style>
    <style:style style:name="T95" style:family="text">
      <style:text-properties style:font-name="Noto Sans1" fo:font-style="normal" officeooo:rsid="002bb611" style:font-style-asian="normal" style:font-style-complex="normal"/>
    </style:style>
    <style:style style:name="T96" style:family="text">
      <style:text-properties style:font-name="Noto Sans1" fo:font-style="normal" officeooo:rsid="00432f8e" style:font-style-asian="normal" style:font-style-complex="normal"/>
    </style:style>
    <style:style style:name="T97" style:family="text">
      <style:text-properties style:font-name="Noto Sans1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style:font-name="Noto Sans1" fo:font-style="italic" fo:font-weight="normal" officeooo:rsid="002bb611" style:font-style-asian="italic" style:font-weight-asian="normal" style:font-style-complex="italic" style:font-weight-complex="normal"/>
    </style:style>
    <style:style style:name="T99" style:family="text">
      <style:text-properties style:font-name="Noto Sans1" fo:font-style="italic" fo:font-weight="normal" officeooo:rsid="00356da2" style:font-style-asian="italic" style:font-weight-asian="normal" style:font-style-complex="italic" style:font-weight-complex="normal"/>
    </style:style>
    <style:style style:name="T100" style:family="text">
      <style:text-properties style:font-name="Noto Sans1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style:font-name="Noto Sans1" fo:font-style="italic" fo:font-weight="bold" officeooo:rsid="002bb611" style:font-style-asian="italic" style:font-weight-asian="bold" style:font-style-complex="italic" style:font-weight-complex="bold"/>
    </style:style>
    <style:style style:name="T102" style:family="text">
      <style:text-properties style:font-name="Noto Sans1" fo:font-style="italic" style:font-style-asian="italic" style:font-style-complex="italic"/>
    </style:style>
    <style:style style:name="T103" style:family="text">
      <style:text-properties style:font-name="Noto Sans1" fo:font-style="italic" officeooo:rsid="00432f8e" style:font-style-asian="italic" style:font-style-complex="italic"/>
    </style:style>
    <style:style style:name="T104" style:family="text">
      <style:text-properties style:font-name="Noto Sans1" fo:font-style="italic" officeooo:rsid="00432f8e" style:font-size-asian="12pt" style:font-style-asian="italic" style:font-style-complex="italic"/>
    </style:style>
    <style:style style:name="T105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Noto Sans1" fo:font-size="12pt" fo:font-style="normal" fo:font-weight="normal" officeooo:rsid="002bb611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Noto Sans1" fo:font-size="12pt" fo:font-style="normal" fo:font-weight="normal" officeooo:rsid="00186b32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Noto Sans1" fo:font-size="12pt" fo:font-style="normal" fo:font-weight="normal" officeooo:rsid="00df46ad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Noto Sans1" fo:font-size="12pt" fo:font-style="normal" fo:font-weight="normal" officeooo:rsid="00e0caf7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Noto Sans1" fo:font-size="12pt" fo:font-style="normal" fo:font-weight="normal" officeooo:rsid="0036f345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Noto Sans1" fo:font-size="12pt" fo:font-style="normal" fo:font-weight="normal" officeooo:rsid="00356da2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Noto Sans1" fo:font-size="12pt" fo:font-style="normal" fo:font-weight="normal" officeooo:rsid="0030c1a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Noto Sans1" fo:font-size="12pt" fo:font-style="normal" fo:font-weight="normal" officeooo:rsid="0157589f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Noto Sans1" fo:font-size="12pt" fo:font-style="normal" fo:font-weight="normal" officeooo:rsid="00ddc89a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Noto Sans1" fo:font-size="12pt" fo:font-style="normal" fo:font-weight="normal" officeooo:rsid="00137b5a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Noto Sans1" fo:font-size="12pt" fo:font-style="normal" fo:font-weight="normal" officeooo:rsid="00361202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Noto Sans1" fo:font-size="12pt" fo:font-style="normal" fo:font-weight="normal" officeooo:rsid="00e34ab2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Noto Sans1" fo:font-size="12pt" fo:font-style="normal" fo:font-weight="normal" officeooo:rsid="00394bb8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Noto Sans1" fo:font-size="12pt" fo:font-style="normal" fo:font-weight="normal" officeooo:rsid="001f97de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Noto Sans1" fo:font-size="12pt" fo:font-style="normal" fo:font-weight="normal" officeooo:rsid="001c02ae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Noto Sans1" fo:font-size="12pt" fo:font-style="normal" fo:font-weight="normal" officeooo:rsid="001f97de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Noto Sans1" fo:font-size="12pt" fo:font-style="normal" fo:font-weight="normal" officeooo:rsid="0036f345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Noto Sans1" fo:font-size="12pt" fo:font-style="normal" fo:font-weight="normal" officeooo:rsid="001c02ae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Noto Sans1" fo:font-size="12pt" fo:font-style="normal" style:font-size-asian="12pt" style:font-style-asian="normal" style:font-size-complex="12pt" style:font-style-complex="normal"/>
    </style:style>
    <style:style style:name="T125" style:family="text">
      <style:text-properties style:font-name="Noto Sans1" fo:font-size="12pt" fo:font-style="normal" officeooo:rsid="002bb611" style:font-size-asian="12pt" style:font-style-asian="normal" style:font-size-complex="12pt" style:font-style-complex="normal"/>
    </style:style>
    <style:style style:name="T126" style:family="text">
      <style:text-properties style:font-name="Noto Sans1" fo:font-size="12pt" fo:font-style="normal" officeooo:rsid="00432f8e" style:font-size-asian="12pt" style:font-style-asian="normal" style:font-size-complex="12pt" style:font-style-complex="normal"/>
    </style:style>
    <style:style style:name="T127" style:family="text">
      <style:text-properties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style:font-name="Noto Sans1" fo:font-size="12pt" fo:font-style="italic" fo:font-weight="normal" officeooo:rsid="002bb611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style:font-name="Noto Sans1" fo:font-size="12pt" fo:font-style="italic" fo:font-weight="normal" officeooo:rsid="00356da2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style:font-name="Noto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1" style:family="text">
      <style:text-properties style:font-name="Noto Sans1" fo:font-size="12pt" fo:font-style="italic" fo:font-weight="bold" officeooo:rsid="002bb611" style:font-size-asian="12pt" style:font-style-asian="italic" style:font-weight-asian="bold" style:font-size-complex="12pt" style:font-style-complex="italic" style:font-weight-complex="bold"/>
    </style:style>
    <style:style style:name="T132" style:family="text">
      <style:text-properties style:font-name="Noto Sans1" fo:font-size="12pt" fo:font-style="italic" style:font-size-asian="12pt" style:font-style-asian="italic" style:font-size-complex="12pt" style:font-style-complex="italic"/>
    </style:style>
    <style:style style:name="T133" style:family="text">
      <style:text-properties style:font-name="Noto Sans1" fo:font-size="12pt" fo:font-style="italic" officeooo:rsid="00432f8e" style:font-size-asian="12pt" style:font-style-asian="italic" style:font-size-complex="12pt" style:font-style-complex="italic"/>
    </style:style>
    <style:style style:name="T134" style:family="text">
      <style:text-properties style:font-name="Noto Sans1" fo:font-size="12pt" officeooo:rsid="00356da2" style:font-size-asian="12pt" style:font-size-complex="12pt"/>
    </style:style>
    <style:style style:name="T135" style:family="text">
      <style:text-properties style:font-name="Noto Sans1" fo:font-size="12pt" fo:font-weight="normal" officeooo:rsid="00356da2" style:font-size-asian="12pt" style:font-weight-asian="normal" style:font-size-complex="12pt" style:font-weight-complex="normal"/>
    </style:style>
    <style:style style:name="T136" style:family="text">
      <style:text-properties style:font-name="Noto Sans1" officeooo:rsid="00356da2"/>
    </style:style>
    <style:style style:name="T137" style:family="text">
      <style:text-properties style:font-name="Noto Sans1" fo:font-weight="normal" officeooo:rsid="00356da2" style:font-weight-asian="normal" style:font-weight-complex="normal"/>
    </style:style>
    <style:style style:name="T138" style:family="text">
      <style:text-properties style:font-name="Noto Sans1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Noto Sans1" fo:font-size="14pt" fo:font-style="normal" officeooo:rsid="002bb611" style:font-size-asian="14pt" style:font-style-asian="normal" style:font-size-complex="14pt" style:font-style-complex="normal"/>
    </style:style>
    <style:style style:name="T140" style:family="text">
      <style:text-properties style:font-name="Noto Sans1" fo:font-size="14pt" fo:font-style="normal" officeooo:rsid="00432f8e" style:font-size-asian="14pt" style:font-style-asian="normal" style:font-size-complex="14pt" style:font-style-complex="normal"/>
    </style:style>
    <style:style style:name="T141" style:family="text">
      <style:text-properties style:font-name="Noto Sans1" fo:font-size="14pt" fo:font-style="normal" fo:font-weight="normal" officeooo:rsid="00356da2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style:font-name="Noto Sans1" fo:font-size="14pt" fo:font-style="normal" fo:font-weight="normal" officeooo:rsid="00361202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font-name="Noto Sans1" fo:font-size="14pt" fo:font-style="normal" fo:font-weight="normal" officeooo:rsid="00e34ab2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font-name="Noto Sans1" fo:font-size="14pt" fo:font-style="normal" fo:font-weight="normal" officeooo:rsid="00394bb8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font-name="Noto Sans1" fo:font-size="14pt" fo:font-style="normal" fo:font-weight="normal" officeooo:rsid="0036f345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font-name="Noto Sans1" fo:font-size="14pt" fo:font-style="normal" fo:font-weight="normal" officeooo:rsid="001f97de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font-name="Noto Sans1" fo:font-size="14pt" fo:font-style="normal" fo:font-weight="normal" officeooo:rsid="001c02ae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style:font-name="Noto Sans1" fo:font-size="14pt" fo:font-weight="normal" officeooo:rsid="00356da2" style:font-size-asian="14pt" style:font-weight-asian="normal" style:font-size-complex="14pt" style:font-weight-complex="normal"/>
    </style:style>
    <style:style style:name="T149" style:family="text">
      <style:text-properties style:font-name="Noto Sans1" fo:font-size="14pt" fo:font-style="italic" fo:font-weight="normal" officeooo:rsid="00356da2" style:font-size-asian="14pt" style:font-style-asian="italic" style:font-weight-asian="normal" style:font-size-complex="14pt" style:font-style-complex="italic" style:font-weight-complex="normal"/>
    </style:style>
    <style:style style:name="T150" style:family="text">
      <style:text-properties style:font-name="Noto Sans1" fo:font-size="14pt" fo:font-style="italic" officeooo:rsid="00432f8e" style:font-size-asian="14pt" style:font-style-asian="italic" style:font-size-complex="14pt" style:font-style-complex="italic"/>
    </style:style>
    <style:style style:name="T151" style:family="text">
      <style:text-properties officeooo:rsid="00432f8e"/>
    </style:style>
    <style:style style:name="T152" style:family="text">
      <style:text-properties style:font-size-asian="10.5pt"/>
    </style:style>
    <style:style style:name="T153" style:family="text">
      <style:text-properties officeooo:rsid="001f97de" style:font-size-asian="10.5pt"/>
    </style:style>
    <style:style style:name="T154" style:family="text">
      <style:text-properties officeooo:rsid="003fde63"/>
    </style:style>
    <style:style style:name="T155" style:family="text">
      <style:text-properties officeooo:rsid="0040f61e"/>
    </style:style>
    <style:style style:name="T156" style:family="text">
      <style:text-properties officeooo:rsid="02911370"/>
    </style:style>
    <style:style style:name="T157" style:family="text">
      <style:text-properties officeooo:rsid="004218ee"/>
    </style:style>
    <style:style style:name="T158" style:family="text">
      <style:text-properties officeooo:rsid="001f97de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1c02ae" style:font-weight-asian="normal" style:font-weight-complex="normal"/>
    </style:style>
    <style:style style:name="T161" style:family="text">
      <style:text-properties fo:font-weight="normal" officeooo:rsid="02911370" style:font-weight-asian="normal" style:font-weight-complex="normal"/>
    </style:style>
    <style:style style:name="T162" style:family="text">
      <style:text-properties fo:font-weight="normal" officeooo:rsid="0037501e" style:font-weight-asian="normal" style:font-weight-complex="normal"/>
    </style:style>
    <style:style style:name="T163" style:family="text">
      <style:text-properties officeooo:rsid="003c6c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-start text:name="__RefHeading___Toc18730_2330915828"/><text:span text:style-name="Citation"><text:span text:style-name="T138">Marco Aurelio</text:span></text:span><text:bookmark-end text:name="__RefHeading___Toc18730_2330915828"/></text:h>
      <text:p text:style-name="P32"><text:span text:style-name="Citation"><text:span text:style-name="T135">“Se sei angosciato da qualcosa di esterno, il dolore non è dovuto alla cosa stessa, ma alla tua stima di essa; e questo hai il potere di revocare in ogni momento” - Marco Aurelio </text:span></text:span></text:p>
      <text:p text:style-name="P31"><text:span text:style-name="Citation"><text:span text:style-name="T111">Marco Aurelio, noto anche come Marco Aurelio Antonino Augusto, fu imperatore, filosofo e scrittore romano. Nacque a Roma </text:span></text:span><text:span text:style-name="Citation"><text:span text:style-name="T116">nel </text:span></text:span><text:span text:style-name="Citation"><text:span text:style-name="T111">121 e regnò dal 161 fino alla sua morte </text:span></text:span><text:span text:style-name="Citation"><text:span text:style-name="T117">avvenuta </text:span></text:span><text:span text:style-name="Citation"><text:span text:style-name="T111">nel 180. </text:span></text:span><text:span text:style-name="Citation"><text:span text:style-name="T116">Durante la sua reggenza,</text:span></text:span><text:span text:style-name="Citation"><text:span text:style-name="T111"> intrapre</text:span></text:span><text:span text:style-name="Citation"><text:span text:style-name="T116">se</text:span></text:span><text:span text:style-name="Citation"><text:span text:style-name="T111"> una lunga e sanguinosa guerra contro le tribù germaniche lungo la frontiera del Danubio </text:span></text:span><text:span text:style-name="Citation"><text:span text:style-name="T116">e dovette affrontare un’</text:span></text:span><text:span text:style-name="Citation"><text:span text:style-name="T111">epidemia di peste </text:span></text:span><text:span text:style-name="Citation"><text:span text:style-name="T116">che </text:span></text:span><text:span text:style-name="Citation"><text:span text:style-name="T111">devastò l'Europa occidentale. Di fronte a queste disgrazie, afflitt</text:span></text:span><text:span text:style-name="Citation"><text:span text:style-name="T116">o</text:span></text:span><text:span text:style-name="Citation"><text:span text:style-name="T111"> dalla vecchiaia e dai pensieri di morte, l'imperatore trovò rifugio nella filosofia, </text:span></text:span><text:span text:style-name="Citation"><text:span text:style-name="T116">lasciando in eredità il suo pensiero, che andò</text:span></text:span><text:span text:style-name="Citation"><text:span text:style-name="T111"> oltre il suo ruolo di sovrano.</text:span></text:span></text:p>
      <text:p text:style-name="P27"><text:span text:style-name="Citation"><text:span text:style-name="T111">Quelle che oggi chiamiamo Meditazioni assumono la forma di un quaderno personale, che non era destinato alla pubblicazione. Aurelio li chiamava “</text:span></text:span><text:span text:style-name="Citation"><text:span text:style-name="T129">Scritti a me stesso</text:span></text:span><text:span text:style-name="Citation"><text:span text:style-name="T111">”. Furono scritti in greco, sebbene la sua lingua madre fosse il latino, e furono probabilmente composti </text:span></text:span><text:span text:style-name="Citation"><text:span text:style-name="T118">di notte, nella sua tenda, </text:span></text:span><text:span text:style-name="Citation"><text:span text:style-name="T111">mentre era impegnato in campagne militari nell'Europa centrale, <text:s/>(171-175 d.C.)</text:span></text:span></text:p>
      <text:p text:style-name="P28"><text:span text:style-name="Citation"><text:span text:style-name="T111">Oggi è ampiamente considerata come una delle opere più importanti di tutta la letteratura occidentale. Morì, </text:span></text:span><text:soft-page-break/><text:span text:style-name="Citation"><text:span text:style-name="T111">molto probabilmente di peste o di cancro, durante una campagna militare nell'attuale Austria. </text:span></text:span></text:p>
      <text:p text:style-name="P27"><text:span text:style-name="Citation"><text:span text:style-name="T111">L'opera è divisa in 12 brevi libri </text:span></text:span><text:span text:style-name="Citation"><text:span text:style-name="T110">in cui</text:span></text:span><text:span text:style-name="T119"> </text:span><text:span text:style-name="T110">i</text:span><text:span text:style-name="T120"> temi principali sono l'importanza della virtù, la necessità di accettare la realtà, la ricerca della pace interiore e la consapevolezza della finitezza della vita.</text:span></text:p>
      <text:p text:style-name="P44"><text:span text:style-name="T26">L'importanza della virtù,</text:span><text:span text:style-name="T19"> è l'unica cosa che conta nella vita. È la qualità che ci permette di vivere in armonia con la natura e con noi stessi. La virtù è una scelta, una decisione di vivere secondo i principi del bene, della giustizia e della saggezza.</text:span></text:p>
      <text:p text:style-name="P47"><text:span text:style-name="T25">La necessità di accettare la realtà</text:span>, <text:span text:style-name="T158">poiché</text:span> la realtà è ciò che è, e che non possiamo cambiarla. L'unica cosa che possiamo fare è accettarla, anche se è difficile o dolorosa. L'accettazione della realtà ci permette di liberarci dalla sofferenza e di vivere in pace con noi stessi. </text:p>
      <text:p text:style-name="P48"><text:span text:style-name="T25">La ricerca della pace interiore, </text:span>è il fine ultimo della vita. La possiamo raggiungere coltivando la virtù, accettando la realtà e concentrandoci sul presente. La pace interiore ci permette di affrontare le difficoltà della vita con serenità e fiducia.</text:p>
      <text:p text:style-name="P51"><text:span text:style-name="T26">La consapevolezza della finitezza della vita,</text:span><text:span text:style-name="T160"> porta a vivere ogni momento con intensità e a non sprecare il tempo in cose inutili. La consapevolezza della morte ci aiuta a mettere le cose in prospettiva e a dare valore alla vita.</text:span></text:p>
      <text:p text:style-name="P49"><text:soft-page-break/>Tra i 12 libri che compongono quest'opera, alcuni sono particolarmente rappresentativi della filosofia stoica:</text:p>
      <text:h text:style-name="P14" text:outline-level="3"><text:bookmark-start text:name="__RefHeading___Toc18732_2330915828"/>Libro II <text:bookmark-end text:name="__RefHeading___Toc18732_2330915828"/></text:h>
      <text:p text:style-name="P45">Al mattino comincia col dire a te stesso: incontrerò un indiscreto, un ingrato, un prepotente, un impostore, un invidioso, un individualista. Il loro comportamento deriva dall'ignoranza di ciò che è bene e ciò che è male. Quanto a me, poiché riflettendo sulla natura del bene e del male, ho concluso che si tratta rispettivamente di ciò che è bello o brutto in senso morale, e, riflettendo sulla natura di chi sbaglia, ho concluso che si tratta di un mio parente, non perché derivi dallo stesso sangue o dallo stesso seme, ma in quanto compartecipe dell'intelletto e di una particella divina, ebbene, io non posso ricevere danno da nessuno di essi, perché nessuno potrà coinvolgermi in turpitudini, e nemmeno posso adirarmi con un parente né odiarlo. Infatti siamo nati per la collaborazione, come i piedi, le mani, le palpebre, i denti superiori e inferiori. Pertanto agire l'uno contro l'altro è contro natura: e adirarsi e respingere sdegnosamente qualcuno è agire contro di lui. <text:span text:style-name="T163">S</text:span>iamo tutti solo frammenti di <text:span text:style-name="T154">carne, soffio vitale e principio dirigente</text:span><text:span text:style-name="T154"><text:note text:id="ftn36" text:note-class="footnote"><text:note-citation>1</text:note-citation><text:note-body><text:p text:style-name="P10">Per Marco Aurelio, il principio dirigente, <text:s/>è la parte razionale della mente umana che ha la capacità di governare le altre parti dell'anima, come le emozioni e gli impulsi. È la facoltà che ci permette di ragionare, di fare scelte morali e di vivere secondo natura.</text:p></text:note-body></text:note></text:span>; la nostra vita è fugace; i nostri corpi si decomporranno. Quanto alla morte, non <text:soft-page-break/>c'è nulla da temere; non può farci del male. Ma ciò che è più importante per noi è la nostra mente. Non dovremmo lasciare che siano schiavi di passioni egoistiche, litighino con il destino, o siano ansiosi per il presente o spaventati dal futuro. Non possiamo garantire fama o fortuna, ma possiamo mantenere la nostra mente calma e libera da ferite, uno stato superiore sia al piacere che al dolore. La libertà è il controllo delle nostre menti.</text:p>
      <text:h text:style-name="P14" text:outline-level="3"><text:bookmark-start text:name="__RefHeading___Toc18734_2330915828"/><text:span text:style-name="T159">Libro IV</text:span> <text:bookmark-end text:name="__RefHeading___Toc18734_2330915828"/></text:h>
      <text:p text:style-name="P53">Marco Aurelio riflette sulla natura dell'universo, definendolo come un "sistema ordinato" governato da una "legge divina". Sottolinea l'importanza di vivere in armonia con la natura e di accettare il corso degli eventi, che sono predeterminati dal logos universale. L'imperatore dedica ampio spazio all'introspezione e all'analisi del proprio animo. Cerca di coltivare la razionalità e di dominare le passioni, per raggiungere un equilibrio interiore e una vita virtuosa. Se le nostre menti sono serene, troveremo pace e felicità. Marco Aurelio invita a coltivare relazioni positive con gli altri, basate sulla benevolenza e sul rispetto reciproco. Sottolinea l'importanza di perdonare le offese e di non nutrire rancore verso il prossimo. Ma la virtù è pur sempre virtù anche se non viene riconosciuta. Ricorda, affronta il tema della morte con serenità, considerandola come un <text:soft-page-break/>evento naturale e necessario. Invita a non temere la morte e a concentrarsi sul vivere bene il tempo presente. Quindi agisci in modo virtuoso, usa bene il tuo tempo e sii allegro. Allora, quando cadrai dall'albero della vita, cadrai come un frutto maturo.</text:p>
      <text:h text:style-name="P14" text:outline-level="3"><text:bookmark-start text:name="__RefHeading___Toc18736_2330915828"/><text:span text:style-name="T161">L</text:span><text:span text:style-name="T159">ibro V</text:span><text:span text:style-name="T162">I</text:span> <text:bookmark-end text:name="__RefHeading___Toc18736_2330915828"/></text:h>
      <text:p text:style-name="P53">Aurelio sconfessa la vendetta: meglio non imitare l'offesa. Dovremmo fare il nostro dovere, agire rettamente e non essere disturbati dal resto, perché nella vastità dello spazio e del tempo siamo insignificanti. <text:span text:style-name="T154">Marco Aurelio </text:span>si concentra sulla natura della mente e sul controllo dei pensieri, sostiene che la mente è l'unica cosa che è veramente nostra e che i pensieri sono sotto il nostro controllo. Egli ci invita a imparare a distinguere tra i pensieri giusti e quelli sbagliati, a concentrarci sui pensieri che sono in nostro potere e ad eliminare i pensieri negativi e distruttivi. Coltivando pensieri positivi e costruttivi, possiamo migliorare la nostra vita e raggiungere la felicità.</text:p>
      <text:h text:style-name="P14" text:outline-level="3"><text:bookmark-start text:name="__RefHeading___Toc18738_2330915828"/>Libro VIII<text:bookmark-end text:name="__RefHeading___Toc18738_2330915828"/></text:h>
      <text:p text:style-name="P53">Aurelio sostiene che essere disconnessi dall'umanità è come tagliarsi un arto, vivi connesso alla natura e alle altre persone. Qualunque cosa incontri, mantieni una mente moderata e controllata. Se sei maledetto da altri, non lasciare che ciò ti influenzi più di quanto il tuo maledire la primavera influenzi la primavera. Il libro VIII <text:soft-page-break/>di Aurelio è una guida pratica per vivere una vita più serena e felice. Offre consigli su come controllare i pensieri, gestire le emozioni e raggiungere la tranquillità interiore. I principi contenuti in questo libro sono ancora validi oggi e possono essere applicati da chiunque desideri migliorare la propria vita. <text:span text:style-name="T155">Tra le massime più significative dobbiamo menzionare:</text:span></text:p>
      <text:p text:style-name="P52"><text:span text:style-name="T155"><text:s/></text:span><text:span text:style-name="T23"><text:s/>"La mente è come una fortezza: se non la presidi, chiunque può entrarvi e saccheggiarla."</text:span></text:p>
      <text:p text:style-name="P50">Questa frase sottolinea l’importanza di essere vigili e consapevoli dei nostri pensieri e sentimenti. Se non controlliamo la nostra mente, potremmo diventare vulnerabili a influenze negative o distruttive. È un promemoria potente per rimanere presenti e attenti alla nostra vita interiore. E ancora: </text:p>
      <text:p text:style-name="P35">"Non permettere che i tuoi pensieri vadano a zonzo senza meta, ma indirizzali verso un obiettivo preciso." </text:p>
      <text:p text:style-name="P50">Questa citazione sottolinea l’importanza di avere un obiettivo o una direzione per i nostri pensieri. Senza un obiettivo, i nostri pensieri possono divagare senza meta, il che può portare a confusione o indecisione. Invece, se indirizziamo i nostri pensieri verso un obiettivo preciso, possiamo utilizzare la nostra mente come uno strumento potente per raggiungerli.</text:p>
      <text:h text:style-name="P14" text:outline-level="3"><text:bookmark-start text:name="__RefHeading___Toc18740_2330915828"/><text:soft-page-break/><text:span text:style-name="T156">L</text:span><text:span text:style-name="T157">ibr</text:span><text:span text:style-name="T151">o</text:span><text:span text:style-name="T157"> </text:span>X<text:bookmark-end text:name="__RefHeading___Toc18740_2330915828"/></text:h>
      <text:p text:style-name="P30"><text:span text:style-name="Citation"><text:span text:style-name="T125">Marco Aurelio affronta alcuni dei temi più importanti della sua filosofia. Riflette sulla natura divina, </text:span></text:span><text:span text:style-name="Citation"><text:span text:style-name="T126">e </text:span></text:span><text:span text:style-name="Citation"><text:span text:style-name="T125">sulla provvidenza, sulla </text:span></text:span><text:span text:style-name="Citation"><text:span text:style-name="T126">natura dell’uomo</text:span></text:span><text:span text:style-name="Citation"><text:span text:style-name="T125">. Le sue considerazioni sono ispirate alla filosofia stoica, che insegna a vivere in armonia con la natura e con la ragione. Aurelio, </text:span></text:span><text:span text:style-name="Citation"><text:span text:style-name="T126">credeva che l’universo fosse governato da una forza razionale e ordinata, chiamata Logos, che nella rappresentazione stoica, rappresenta la ragione universale, la legge naturale che governa tutto. La provvidenza divina, può essere vista come l’azione del Logos e non come un intervento arbitrario o miracoloso, ma come l’espressione della legge naturale. </text:span></text:span><text:span text:style-name="Citation"><text:span text:style-name="T133">“Valga la dottrina degli atomi o quella della natura, devono essere chiari due punti, il primo dev'essere che io sono parte dell'universo governato dalla natura; il secondo, che sono in un qualche rapporto di parentela</text:span></text:span><text:span text:style-name="Citation"><text:span text:style-name="T126"> </text:span></text:span><text:span text:style-name="Citation"><text:span text:style-name="T133">con le parti della mia stessa specie. <text:s/>Ricordando questi punti, non sarò in dissidio - in quanto sono una parte - con nulla di ciò che mi viene assegnato entro l'ordine universale: nulla che rechi vantaggio al tutto è dannoso per la parte.”</text:span></text:span><text:span text:style-name="Citation"><text:span text:style-name="T126"> <text:s/>Quando Aurelio affronta il problema del male e del bene, lo fa con una massima: “ </text:span></text:span><text:span text:style-name="Citation"><text:span text:style-name="T133">Il male è come il letame: nutre il bene</text:span></text:span><text:span text:style-name="Citation"><text:span text:style-name="T126">” per dire che le esperienze negative, che possono essere considerate </text:span></text:span><text:span text:style-name="Citation"><text:span text:style-name="T133">“cattive” </text:span></text:span><text:span text:style-name="Citation"><text:span text:style-name="T126">possono in realtà nutrire e rafforzare il bene. Il letame, sebbene abbia un odore sgradevole e </text:span></text:span><text:soft-page-break/><text:span text:style-name="Citation"><text:span text:style-name="T126">sia considerato un rifiuto, è un fertilizzante naturale che arricchisce il terreno e lo rende più fertile. Allo stesso modo, le avversità e le sfide che affrontiamo nella vita possono farci crescere e diventare persone più forti e resilienti. La massima di Aurelio non implica che il male sia una cosa positiva in sé. Piuttosto, ci invita a considerare che le esperienze negative possono avere un effetto positivo se le affrontiamo con la giusta mentalità. Marco Aurelio ci invita a non soccombere alle avversità della vita, ma a usarle come opportunità per crescere e diventare persone migliori. Oggi diremmo: </text:span></text:span><text:span text:style-name="Citation"><text:span text:style-name="T133">“Non tutto il male viene per nuocere”</text:span></text:span><text:span text:style-name="Citation"><text:span text:style-name="T126"> oppure </text:span></text:span><text:span text:style-name="Citation"><text:span text:style-name="T133">“sbagliando s’ impara”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erif" fo:font-family="'Noto Serif'" style:font-style-name="Normale" style:font-family-generic="roman" style:font-pitch="variable" fo:font-size="13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erif" fo:font-family="'Noto Serif'" style:font-style-name="Normale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8T11:35:03.377970742</meta:creation-date>
    <dc:date>2026-01-29T17:36:57.387324147</dc:date>
    <dc:creator>corrado tafaro</dc:creator>
    <meta:editing-duration>PT36M4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8" meta:paragraph-count="26" meta:word-count="1611" meta:character-count="10052" meta:non-whitespace-character-count="8453"/>
  </office:meta>
</office:document-meta>
</file>