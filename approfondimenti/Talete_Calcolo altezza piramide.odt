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C0000020F6A66859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" officeooo:paragraph-rsid="0001b652"/>
    </style:style>
    <style:style style:name="P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" officeooo:paragraph-rsid="0001b652"/>
    </style:style>
    <style:style style:name="P3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" officeooo:paragraph-rsid="0002260b"/>
    </style:style>
    <style:style style:name="P4" style:family="paragraph" style:parent-style-name="Standard">
      <style:paragraph-properties fo:line-height="115%" fo:text-align="center" style:justify-single-word="false"/>
      <style:text-properties style:font-name="Noto Sans" officeooo:paragraph-rsid="0001b652"/>
    </style:style>
    <style:style style:name="P5" style:family="paragraph" style:parent-style-name="Standard">
      <style:paragraph-properties fo:margin-top="0.199cm" fo:margin-bottom="0cm" style:contextual-spacing="false" fo:line-height="115%" fo:text-align="center" style:justify-single-word="false"/>
      <style:text-properties style:font-name="Noto Sans" fo:font-size="10pt" fo:font-weight="bold" officeooo:paragraph-rsid="0002260b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.199cm" fo:margin-bottom="0cm" style:contextual-spacing="false" fo:line-height="115%" fo:text-align="center" style:justify-single-word="false"/>
      <style:text-properties style:font-name="Noto Sans" fo:font-size="10pt" fo:font-weight="bold" officeooo:rsid="0002260b" officeooo:paragraph-rsid="0002260b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Noto Sans" officeooo:paragraph-rsid="0001b652"/>
    </style:style>
    <style:style style:name="T1" style:family="text">
      <style:text-properties officeooo:rsid="0001b6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b652" style:font-weight-asian="bold" style:font-weight-complex="bold"/>
    </style:style>
    <style:style style:name="T4" style:family="text">
      <style:text-properties officeooo:rsid="0002260b"/>
    </style:style>
    <style:style style:name="T5" style:family="text">
      <style:text-properties officeooo:rsid="000373ee"/>
    </style:style>
    <style:style style:name="T6" style:family="text">
      <style:text-properties officeooo:rsid="0004a51b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4a51b"/>
    </style:style>
    <style:style style:name="T9" style:family="text">
      <style:text-properties style:text-underline-style="none" officeooo:rsid="00060e61"/>
    </style:style>
    <style:style style:name="T10" style:family="text">
      <style:text-properties officeooo:rsid="00060e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Calcolo dell'altezza della Grande Piramide di Giza </text:span><text:span text:style-name="T3">u</text:span><text:span text:style-name="T2">tilizzando un bastone e la lunghezza delle ombre sul pavimento.</text:span> </text:p>
      <text:p text:style-name="P4"><text:span text:style-name="T1">I</text:span>llustrazione del teorema dell'intercetta<text:span text:style-name="T1">zione</text:span> geometrica, attribuita a Talete. </text:p>
      <text:p text:style-name="P1">Altezza della Piramide di Cheope Secondo alcune fonti storiche il matematico greco Talete applicò il teorema dell'intercetta<text:span text:style-name="T5">zione </text:span>per determinare l'altezza della piramide di Cheope. La seguente descrizione illustra l'uso del teorema dell'intercetta<text:span text:style-name="T6">zione </text:span><text:s/>per calcolare l'altezza della piramide di Cheope. Non racconta però l'opera originale di Talete, che è andata perduta. Talete misurò la lunghezza della base della piramide e l'altezza del suo palo. Poi, alla stessa ora del giorno, misurò la lunghezza dell'ombra della piramide e quella del palo. Ciò ha prodotto i seguenti dati: </text:p>
      <text:p text:style-name="P1">altezza del palo (A): 1,63 m </text:p>
      <text:p text:style-name="P2">ombra del palo (B): 2 m </text:p>
      <text:p text:style-name="P2">lunghezza della base della piramide: 230 m </text:p>
      <text:p text:style-name="P2">ombra della piramide: 65 m </text:p>
      <text:p text:style-name="P2">Da questo calcolò <text:span text:style-name="T1">c</text:span>onoscendo A, B e C era ora in grado di applicare il teorema dell'intercettazione al calcolo.</text:p>
      <text:p text:style-name="P2"/>
      <text:p text:style-name="P3"><draw:frame draw:style-name="fr1" draw:name="Immagine1" text:anchor-type="char" svg:width="17cm" svg:height="10.418cm" draw:z-index="0"><draw:image xlink:href="Pictures/100000000000035C0000020F6A668595.jpg" xlink:type="simple" xlink:show="embed" xlink:actuate="onLoad" draw:mime-type="image/jpeg"/></draw:frame><text:soft-page-break/></text:p>
      <text:p text:style-name="P5"><text:span text:style-name="T4">l</text:span>unghezza ombra 1 : lunghezza ombra 2 = altezza asta : altezza incognita della piramide</text:p>
      <text:p text:style-name="P6"><text:span text:style-name="T6">2</text:span><text:span text:style-name="T5"> </text:span>: <text:span text:style-name="T6">1,63</text:span> = <text:span text:style-name="T10">180</text:span><text:span text:style-name="T6"> </text:span><text:span text:style-name="T5">: </text:span>x <text:s/>; <text:s/><text:span text:style-name="T7"><text:s/></text:span><text:span text:style-name="T8">x = 1,63 x </text:span><text:span text:style-name="T9">180</text:span><text:span text:style-name="T8">/2 ; x = </text:span><text:span text:style-name="T9">146,7 metri</text:span></text:p>
      <text:p text:style-name="P6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2:56:44.991000000</meta:creation-date>
    <dc:date>2026-01-23T17:26:49.600120458</dc:date>
    <meta:editing-duration>PT3H1M27S</meta:editing-duration>
    <meta:editing-cycles>6</meta:editing-cycles>
    <meta:generator>LibreOffice/24.2.7.2$Linux_X86_64 LibreOffice_project/420$Build-2</meta:generator>
    <dc:creator>corrado tafaro</dc:creator>
    <meta:document-statistic meta:table-count="0" meta:image-count="1" meta:object-count="0" meta:page-count="2" meta:paragraph-count="10" meta:word-count="186" meta:character-count="1159" meta:non-whitespace-character-count="972"/>
  </office:meta>
</office:document-meta>
</file>