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style:contextual-spacing="false" fo:line-height="115%" fo:text-align="justify" style:justify-single-word="false"/>
    </style:style>
    <style:style style:name="P2"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d90a4" style:font-size-asian="12pt" style:font-size-complex="12pt"/>
    </style:style>
    <style:style style:name="P3" style:family="paragraph" style:parent-style-name="Standard">
      <style:paragraph-properties fo:margin-top="0cm" fo:margin-bottom="0cm" style:contextual-spacing="false" fo:line-height="115%" fo:text-align="justify" style:justify-single-word="false"/>
      <style:text-properties style:font-name="Noto Sans1" fo:font-size="12pt" style:font-size-asian="12pt" style:font-size-complex="12pt"/>
    </style:style>
    <style:style style:name="P4" style:family="paragraph" style:parent-style-name="Standard">
      <style:paragraph-properties fo:margin-top="0.101cm" fo:margin-bottom="0cm" style:contextual-spacing="false" fo:line-height="115%" fo:text-align="justify" style:justify-single-word="false"/>
      <style:text-properties style:font-name="Noto Sans1" fo:font-size="12pt" style:font-size-asian="12pt" style:font-size-complex="12pt"/>
    </style:style>
    <style:style style:name="P5"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e657b" style:font-size-asian="12pt" style:font-size-complex="12pt"/>
    </style:style>
    <style:style style:name="P6" style:family="paragraph" style:parent-style-name="Standard">
      <style:paragraph-properties fo:margin-top="0.199cm" fo:margin-bottom="0cm" style:contextual-spacing="false" fo:line-height="115%" fo:text-align="justify" style:justify-single-word="false"/>
      <style:text-properties style:font-name="Noto Sans1" fo:font-size="12pt" style:font-size-asian="12pt" style:font-size-complex="12pt"/>
    </style:style>
    <style:style style:name="P7"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00e6b" style:font-size-asian="12pt" style:font-size-complex="12pt"/>
    </style:style>
    <style:style style:name="P8" style:family="paragraph" style:parent-style-name="Standard">
      <style:paragraph-properties fo:margin-top="0.199cm" fo:margin-bottom="0cm" style:contextual-spacing="false" fo:line-height="115%" fo:text-align="center" style:justify-single-word="false"/>
      <style:text-properties style:font-name="Noto Sans1" fo:font-size="12pt" style:font-size-asian="12pt" style:font-size-complex="12pt"/>
    </style:style>
    <style:style style:name="P9" style:family="paragraph" style:parent-style-name="Standard">
      <style:paragraph-properties fo:margin-top="0cm" fo:margin-bottom="0cm" style:contextual-spacing="false" fo:line-height="115%" fo:text-align="justify" style:justify-single-word="false"/>
      <style:text-properties style:font-name="Noto Sans1" fo:font-size="12pt" fo:language="it" fo:country="IT" style:font-size-asian="12pt" style:font-size-complex="12pt"/>
    </style:style>
    <style:style style:name="P10" style:family="paragraph" style:parent-style-name="Standard">
      <style:paragraph-properties fo:margin-top="0cm" fo:margin-bottom="0.353cm" style:contextual-spacing="false" fo:line-height="115%" fo:text-align="justify" style:justify-single-word="false"/>
      <style:text-properties style:font-name="Noto Sans1" fo:font-size="12pt" fo:language="it" fo:country="IT" fo:font-weight="bold" style:font-size-asian="12pt" style:font-weight-asian="bold" style:font-size-complex="12pt" style:font-weight-complex="bold"/>
    </style:style>
    <style:style style:name="P11" style:family="paragraph" style:parent-style-name="Standard">
      <style:paragraph-properties fo:margin-top="0.199cm" fo:margin-bottom="0cm" style:contextual-spacing="false" fo:line-height="115%" fo:text-align="justify" style:justify-single-word="false"/>
      <style:text-properties style:font-name="Noto Sans1" fo:font-size="12pt" fo:language="it" fo:country="IT" fo:font-weight="bold" officeooo:rsid="00100e6b" officeooo:paragraph-rsid="00100e6b" style:font-size-asian="12pt" style:font-weight-asian="bold" style:font-size-complex="12pt" style:font-weight-complex="bold"/>
    </style:style>
    <style:style style:name="P12" style:family="paragraph" style:parent-style-name="Standard">
      <style:paragraph-properties fo:margin-top="0cm" fo:margin-bottom="0cm" style:contextual-spacing="false" fo:line-height="115%" fo:text-align="justify" style:justify-single-word="false"/>
      <style:text-properties style:font-name="Noto Sans1" fo:font-size="12pt" fo:language="it" fo:country="IT" officeooo:paragraph-rsid="000d90a4" style:font-size-asian="12pt" style:font-size-complex="12pt"/>
    </style:style>
    <style:style style:name="P13" style:family="paragraph" style:parent-style-name="Standard">
      <style:paragraph-properties fo:margin-top="0cm" fo:margin-bottom="0cm" style:contextual-spacing="false" fo:line-height="115%" fo:text-align="justify" style:justify-single-word="false"/>
      <style:text-properties style:font-name="Noto Sans1" fo:font-size="12pt" fo:language="it" fo:country="IT" style:font-size-asian="12pt" style:font-size-complex="12pt"/>
    </style:style>
    <style:style style:name="P14" style:family="paragraph" style:parent-style-name="Standard">
      <style:paragraph-properties fo:margin-top="0.101cm" fo:margin-bottom="0cm" style:contextual-spacing="false" fo:line-height="115%" fo:text-align="justify" style:justify-single-word="false"/>
      <style:text-properties style:font-name="Noto Sans1" fo:font-size="12pt" fo:language="it" fo:country="IT" style:font-size-asian="12pt" style:font-size-complex="12pt"/>
    </style:style>
    <style:style style:name="P15" style:family="paragraph" style:parent-style-name="Standard">
      <style:paragraph-properties fo:margin-top="0.101cm" fo:margin-bottom="0cm" style:contextual-spacing="false" fo:line-height="115%" fo:text-align="justify" style:justify-single-word="false"/>
      <style:text-properties style:font-name="Noto Sans1" fo:font-size="12pt" fo:language="it" fo:country="IT" officeooo:paragraph-rsid="000e657b" style:font-size-asian="12pt" style:font-size-complex="12pt"/>
    </style:style>
    <style:style style:name="P16" style:family="paragraph" style:parent-style-name="Standard">
      <style:paragraph-properties fo:margin-top="0.199cm" fo:margin-bottom="0cm" style:contextual-spacing="false" fo:line-height="115%" fo:text-align="justify" style:justify-single-word="false"/>
      <style:text-properties style:font-name="Noto Sans1" fo:font-size="12pt" fo:language="it" fo:country="IT" officeooo:paragraph-rsid="00100e6b" style:font-size-asian="12pt" style:font-size-complex="12pt"/>
    </style:style>
    <style:style style:name="P17" style:family="paragraph" style:parent-style-name="Standard">
      <style:paragraph-properties fo:margin-top="0.101cm" fo:margin-bottom="0cm" style:contextual-spacing="false" fo:line-height="115%" fo:text-align="justify" style:justify-single-word="false"/>
      <style:text-properties style:font-name="Noto Sans1" fo:font-size="12pt" fo:language="it" fo:country="IT" officeooo:paragraph-rsid="00100e6b" style:font-size-asian="12pt" style:font-size-complex="12pt"/>
    </style:style>
    <style:style style:name="P18" style:family="paragraph" style:parent-style-name="Standard">
      <style:paragraph-properties fo:margin-top="0.199cm" fo:margin-bottom="0cm" style:contextual-spacing="false" fo:line-height="115%" fo:text-align="justify" style:justify-single-word="false"/>
      <style:text-properties style:font-name="Noto Sans1" fo:font-size="12pt" fo:language="it" fo:country="IT" style:font-size-asian="12pt" style:font-size-complex="12pt"/>
    </style:style>
    <style:style style:name="P19" style:family="paragraph" style:parent-style-name="Standard">
      <style:paragraph-properties fo:margin-top="0.199cm" fo:margin-bottom="0cm" style:contextual-spacing="false" fo:line-height="115%" fo:text-align="justify" style:justify-single-word="false"/>
      <style:text-properties style:font-name="Noto Sans1" fo:font-size="12pt" fo:language="it" fo:country="IT" fo:font-style="italic" officeooo:paragraph-rsid="000d90a4" style:font-size-asian="12pt" style:font-style-asian="italic" style:font-size-complex="12pt" style:font-style-complex="italic"/>
    </style:style>
    <style:style style:name="P20" style:family="paragraph" style:parent-style-name="Standard">
      <style:paragraph-properties fo:margin-top="0.199cm" fo:margin-bottom="0cm" style:contextual-spacing="false" fo:line-height="115%" fo:text-align="justify" style:justify-single-word="false"/>
      <style:text-properties style:font-name="Noto Sans1" fo:font-size="12pt" fo:language="it" fo:country="IT" fo:font-style="italic" officeooo:paragraph-rsid="000e657b" style:font-size-asian="12pt" style:font-style-asian="italic" style:font-size-complex="12pt" style:font-style-complex="italic"/>
    </style:style>
    <style:style style:name="P21" style:family="paragraph" style:parent-style-name="Standard">
      <style:paragraph-properties fo:margin-top="0.101cm" fo:margin-bottom="0cm" style:contextual-spacing="false" fo:line-height="115%" fo:text-align="justify" style:justify-single-word="false"/>
      <style:text-properties style:font-name="Noto Sans1" fo:font-size="12pt" style:font-size-asian="12pt" style:font-size-complex="12pt"/>
    </style:style>
    <style:style style:name="P22" style:family="paragraph" style:parent-style-name="Standard">
      <style:paragraph-properties fo:margin-top="0.199cm" fo:margin-bottom="0cm" style:contextual-spacing="false" fo:line-height="115%" fo:text-align="justify" style:justify-single-word="false"/>
      <style:text-properties style:font-name="Noto Sans1" fo:font-size="12pt" style:font-size-asian="12pt" style:font-size-complex="12pt"/>
    </style:style>
    <style:style style:name="T1" style:family="text">
      <style:text-properties style:font-name="Noto Sans1" fo:font-size="12pt" fo:language="it" fo:country="IT" style:font-size-asian="12pt" style:font-size-complex="12pt"/>
    </style:style>
    <style:style style:name="T2" style:family="text">
      <style:text-properties fo:language="it" fo:country="IT"/>
    </style:style>
    <style:style style:name="T3" style:family="text">
      <style:text-properties fo:language="it" fo:country="IT" officeooo:rsid="000d90a4"/>
    </style:style>
    <style:style style:name="T4" style:family="text">
      <style:text-properties fo:language="it" fo:country="IT" fo:font-style="italic" style:font-style-asian="italic" style:font-style-complex="italic"/>
    </style:style>
    <style:style style:name="T5" style:family="text">
      <style:text-properties fo:language="it" fo:country="IT" officeooo:rsid="00100e6b"/>
    </style:style>
    <style:style style:name="T6" style:family="text">
      <style:text-properties officeooo:rsid="00127ab8"/>
    </style:style>
    <style:style style:name="T7" style:family="text">
      <style:text-properties officeooo:rsid="0012e960"/>
    </style:style>
    <style:style style:name="T8" style:family="text">
      <style:text-properties officeooo:rsid="001446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Wittgenstein, un alieno che sconvolse la filosofia. </text:p>
      <text:p text:style-name="P12">Wittgenstein non era il tipico accademico da scrivania. La sua vita fu segnata da scelte radicali che riflettono la sua ricerca di onestà intellettuale.</text:p>
      <text:p text:style-name="P2"><text:span text:style-name="T2">N</text:span><text:span text:style-name="T3">acque</text:span><text:span text:style-name="T2"> a Vienna nel 1889 in una delle famiglie più ricche e colte d'Europa (suo padre era un magnate dell'acciaio). Tre dei suoi fratelli si suicidarono.</text:span></text:p>
      <text:p text:style-name="P3"><text:span text:style-name="T2">Studiò ingegneria aeronautica a Manchester, ma si appassionò alla logica. Andò a Cambridge da Bertrand Russell, che disse di lui: "</text:span><text:span text:style-name="T4">È l'esempio più perfetto di genio che io abbia mai conosciuto</text:span><text:span text:style-name="T2">".</text:span></text:p>
      <text:p text:style-name="P9">Scrisse la sua prima opera, il Tractatus, mentre combatteva in trincea nella Prima Guerra Mondiale. Dopo la guerra, rinunciò alla sua immensa eredità, fece il maestro elementare in paesini sperduti, il giardiniere in un convento e l'architetto.</text:p>
      <text:p text:style-name="P9">Tornò alla filosofia anni dopo, convinto di aver sbagliato tutto nel suo primo libro, dando vita a una seconda fase di pensiero completamente opposta alla prima.</text:p>
      <text:p text:style-name="P14">Nel suo primo capolavoro, il Tractatus Logico-Philosophicus (1921), Wittgenstein cerca di tracciare un confine netto tra ciò che si può dire e ciò che non si può dire.</text:p>
      <text:p text:style-name="P19">Teoria dell'immagine</text:p>
      <text:p text:style-name="P2"><text:span text:style-name="T2">Il linguaggio è una "proiezione" della realtà. Una frase </text:span><text:soft-page-break/><text:span text:style-name="T2">ha senso solo se "raffigura" uno stato di cose possibile nel mondo.</text:span></text:p>
      <text:p text:style-name="P20">Il limite del linguaggio</text:p>
      <text:p text:style-name="P15">Tutto ciò che non è un fatto scientifico (etica, estetica, religione, il senso della vita) non può essere espresso logicamente.</text:p>
      <text:p text:style-name="P20">La conclusione celebre</text:p>
      <text:p text:style-name="P15">L'opera si chiude con la frase: "Su ciò di cui non si può parlare, si deve tacere". Per lui, la filosofia era finita lì.</text:p>
      <text:p text:style-name="P14">Dopo anni di silenzio, Wittgenstein capisce che il linguaggio non è solo uno specchio della realtà, ma qualcosa di molto più vivo e "sporco". Nelle Ricerche Filosofiche (pubblicate postume nel 1953) introduce concetti rivoluzionari:</text:p>
      <text:p text:style-name="P20">I Giochi Linguistici</text:p>
      <text:p text:style-name="P15">Il significato di una parola non è l'oggetto a cui si riferisce, ma il suo uso in un contesto. Parlare è come giocare a scacchi o a calcio: le regole dipendono dal "gioco" che stiamo facendo (pregare, bestemmiare, dare ordini, scherzare).</text:p>
      <text:p text:style-name="P20">Somiglianze di famiglia</text:p>
      <text:p text:style-name="P5"><text:span text:style-name="T2">Non esiste un'essenza comune a tutte le cose che chiamiamo "gioco" o "sedia". C'è solo una rete di somiglianze che si sovrappongono, come i tratti del viso </text:span><text:soft-page-break/><text:span text:style-name="T2">tra parenti.</text:span></text:p>
      <text:p text:style-name="P20">Contro il linguaggio privato</text:p>
      <text:p text:style-name="P15">Non possiamo avere un linguaggio che descriva solo le nostre sensazioni interne (come un dolore) senza riferirci a regole pubbliche e sociali. Il linguaggio è un fatto collettivo.</text:p>
      <text:p text:style-name="P14">L'aspetto più "alieno" del suo pensiero è l'idea che la filosofia non debba spiegare nulla, ma solo descrivere.</text:p>
      <text:p text:style-name="P4"><text:span text:style-name="T2">"</text:span><text:span text:style-name="T4">Qual è il tuo scopo in filosofia? — Indicare alla mosca la via d'uscita dalla trappola di vetro.</text:span><text:span text:style-name="T2">"</text:span></text:p>
      <text:p text:style-name="P6"><text:span text:style-name="T2">Per Wittgenstein, i filosofi sono come mosche intrappolate in un bicchiere: sbattono contro le pareti perché usano le parole fuori dal loro contesto quotidiano. Il compito del filosofo è pulire il linguaggio, mostrare dove ci siamo ingarbugliati e riportare le parole al loro uso normale. Una volta fatto questo, il "</text:span><text:span text:style-name="T4">problema</text:span><text:span text:style-name="T2">" filosofico non viene risolto: </text:span><text:span text:style-name="T4">sparisce</text:span><text:span text:style-name="T2">.</text:span></text:p>
      <text:p text:style-name="P8"><text:span text:style-name="T2">"</text:span><text:span text:style-name="T4">Smettetela di cercare verità profonde dietro le parole; la verità è tutta in superficie, nel modo in cui viviamo e parliamo ogni giorno</text:span><text:span text:style-name="T2">"</text:span></text:p>
      <text:p text:style-name="P6"><text:span text:style-name="T2">L'affermazione che Ludwig Wittgenstein fosse "</text:span><text:span text:style-name="T4">un alieno che sconvolse la filosofia</text:span><text:span text:style-name="T2">" è una metafora efficace per descrivere il suo impatto rivoluzionario e spesso enigmatico sul pensiero filosofico del XX secolo. Non era, ovviamente, un alieno nel senso letterale, ma la sua </text:span><text:soft-page-break/><text:span text:style-name="T2">prospettiva e il suo approccio erano così radicalmente diversi da ciò che lo aveva preceduto, e persino da alcune delle sue stesse idee iniziali, da renderlo una figura quasi ultraterrena nel panorama intellettuale.</text:span></text:p>
      <text:p text:style-name="P4"><text:span text:style-name="T2">Perché Wittgenstein è stato </text:span><text:span text:style-name="T3">definito</text:span><text:span text:style-name="T2"> come un "alieno" della filosofia? Ecco alcuni motivi per cui la sua influenza è stata così dirompente:</text:span></text:p>
      <text:p text:style-name="P4"><text:span text:style-name="T2">Il "Giro Linguistico": Wittgenstein è stato una figura centrale di quello che viene chiamato il "</text:span><text:span text:style-name="T4">linguistic turn</text:span><text:span text:style-name="T2">" (la svolta linguistica) nella filosofia. Prima di lui, molti filosofi si concentravano su questioni metafisiche, epistemologiche o etiche, spesso assumendo che il linguaggio fosse un mezzo trasparente per esprimere pensieri e realtà. Wittgenstein, invece, mise il linguaggio al centro della sua indagine. Egli sostenne che molti problemi filosofici tradizionali non erano veri problemi, ma piuttosto confusioni derivanti da un uso improprio o frainteso del linguaggio. Questo spostamento di focus fu sconvolgente per molti.</text:span></text:p>
      <text:p text:style-name="P9">Due Fasi Distinte e Contraddittorie: La sua opera è divisa in due periodi principali, spesso in apparente contraddizione tra loro.</text:p>
      <text:p text:style-name="P4"><text:span text:style-name="T2"><text:tab/>Il primo Wittgenstein (del Tractatus Logico-Philosophicus) cercò di definire i limiti di ciò che può essere detto in modo significativo. Vedeva il mondo come una totalità di fatti e il linguaggio come una </text:span><text:soft-page-break/><text:span text:style-name="T2">"immagine" logica di questi fatti. L'obiettivo era mostrare cosa può essere detto con senso e cosa, invece, è "</text:span><text:span text:style-name="T4">mistico</text:span><text:span text:style-name="T2">" o "</text:span><text:span text:style-name="T4">indicibile</text:span><text:span text:style-name="T2">". Questa visione, seppur complessa, era ancora radicata in una concezione piuttosto rigida e formale della logica e del linguaggio.</text:span></text:p>
      <text:p text:style-name="P4"><text:span text:style-name="T2"><text:tab/>Il secondo Wittgenstein (delle Ricerche Filosofiche) </text:span><text:span text:style-name="T5">ebbe un in</text:span><text:span text:style-name="T2">credibile ripensamento, abbandonò gran parte delle sue idee precedenti </text:span><text:span text:style-name="T5">e nelle</text:span><text:span text:style-name="T2"> </text:span><text:span text:style-name="T5">r</text:span><text:span text:style-name="T2">icerche, introdusse il concetto di "</text:span><text:span text:style-name="T4">giochi linguistici</text:span><text:span text:style-name="T2">", sostenendo che il significato delle parole non è fissato da una relazione diretta con la realtà, ma è determinato dal loro uso in specifici contesti sociali e pratiche umane. Il linguaggio è come una cassetta degli attrezzi, e il significato di un "</text:span><text:span text:style-name="T4">attrezzo</text:span><text:span text:style-name="T2">" dipende da come viene utilizzato. Questo approccio ha minato l'idea di un linguaggio universale o di una logica fondamentale che sottostia a tutta la realtà, aprendo la strada a una visione più fluida e contestuale del significato.</text:span></text:p>
      <text:p text:style-name="P16">Il Metodo "Terapeutico"</text:p>
      <text:p text:style-name="P7"><text:span text:style-name="T2">Per Wittgenstein, il ruolo della filosofia non era quello di costruire teorie o sistemi, ma di dissolvere le confusioni concettuali. La filosofia era vista come una sorta di terapia linguistica, che aiuta a sciogliere i nodi mentali creati dal linguaggio stesso. Anziché rispondere a domande, Wittgenstein cercava di mostrare che le domande stesse erano mal poste. Questa negazione del </text:span><text:soft-page-break/><text:span text:style-name="T2">ruolo tradizionale della filosofia come disciplina che fornisce risposte definitive è stata estremamente radicale.</text:span></text:p>
      <text:p text:style-name="P16">L'Impatto Transdisciplinare</text:p>
      <text:p text:style-name="P17">Le sue idee hanno avuto risonanza non solo in filosofia (logica, filosofia del linguaggio, filosofia della mente, etica), ma anche in campi come la linguistica, la psicologia, l'antropologia e persino la teologia, contribuendo a un cambiamento nel modo di pensare la conoscenza, il significato e la comunicazione.</text:p>
      <text:p text:style-name="P9">In sintesi, Wittgenstein fu un "alieno" perché le sue riflessioni sul linguaggio e sulla natura dei problemi filosofici erano così profondamente originali e provocatorie da costringere i filosofi a riconsiderare le fondamenta stesse della loro disciplina. Non ha semplicemente aggiunto un altro capitolo alla storia della filosofia; ha riscritto le regole del gioco, lasciando un'eredità che continua a essere dibattuta e a influenzare il pensiero contemporaneo.</text:p>
      <text:p text:style-name="P11">Da qui, inizia un dibattito tra me e Gemini, con l’intento di consolidare meglio il pensiero filosofico di Wittgenstein.</text:p>
      <text:p text:style-name="P18">D: Hai degli esempi per dimostrare l'importanza delle riflessioni di Wittgenstein.</text:p>
      <text:p text:style-name="P3"><text:span text:style-name="T2">R: Certo, le riflessioni di Wittgenstein, soprattutto quelle </text:span><text:soft-page-break/><text:span text:style-name="T2">del "secondo Wittgenstein" delle Ricerche Filosofiche, hanno avuto un impatto enorme e possono essere illustrate con esempi molto concreti. La sua idea che il significato sia l'uso e che il linguaggio sia un insieme di "giochi linguistici" ci aiuta a capire meglio come funziona la comunicazione e a risolvere molte "confusioni filosofiche".</text:span></text:p>
      <text:p text:style-name="P18">1. Il significato come uso: "Acqua!" o "Ahia!"</text:p>
      <text:p text:style-name="P18">Immagina di essere in una situazione di sete estrema e di urlare "Acqua! Acqua!". In questo contesto, la parola "acqua" non sta "denotando" un oggetto specifico che hai davanti, né sta descrivendo uno stato di fatto. Stai usando la parola per esprimere un bisogno urgente, per chiedere aiuto. Il suo significato non è dato da una "corrispondenza" con qualcosa nel mondo, ma dalla sua funzione in quella specifica interazione.</text:p>
      <text:p text:style-name="P9">Un altro esempio comune è quando sbattiamo il mignolo contro un mobile e diciamo "Ahia!". Questa interiezione non è una proposizione vera o falsa, non descrive un fatto esterno. È un'espressione di dolore, un gesto vocale. Il suo significato risiede interamente nel suo uso in quella circostanza: comunicare immediata­mente un'emozione o una sensazione.</text:p>
      <text:p text:style-name="P3"><text:span text:style-name="T2">Wittgenstein ci spinge a guardare come usiamo le parole nella vita reale, anziché cercare un'essenza o un riferimento fisso per ogni termine. Questo ha </text:span><text:soft-page-break/><text:span text:style-name="T2">rivoluzionato la filosofia del linguaggio, spostando l'attenzione dalle strutture logiche ideali alle pratiche linguistiche quotidiane.</text:span></text:p>
      <text:p text:style-name="P18">2. I "giochi linguistici": il trapano e il martello</text:p>
      <text:p text:style-name="P14">Wittgenstein usa la metafora degli "attrezzi nella cassetta" per illustrare i giochi linguistici. Pensa a un trapano e a un martello. Entrambi sono attrezzi, ma hanno funzioni completamente diverse. Non ha senso chiedersi "qual è l'essenza dell'attrezzo" in astratto; ciò che conta è come vengono usati per svolgere compiti specifici.</text:p>
      <text:p text:style-name="P9">Allo stesso modo, le parole e le frasi sono come attrezzi del linguaggio. La frase "Passami il sale" funziona in modo molto diverso da "Prometto di venire domani" o "Il sole è una stella". Ognuna di queste frasi fa parte di un "gioco linguistico" diverso, con le sue regole implicite e il suo scopo specifico.</text:p>
      <text:p text:style-name="P4"><text:span text:style-name="T2">Questa prospettiva ci aiuta a capire che non esiste un'unica logica sottostante a tutto il linguaggio. Ogni "gioco" ha le sue regole, comprese e seguite dai partecipanti a quella forma di vita. Questo ha implicazioni profonde per la comprensione della comunicazione interculturale, della psicologia (perché certi "problemi" mentali possono derivare da confusione tra giochi linguistici diversi) e persino del diritto (dove le parole assumono significati specifici </text:span><text:soft-page-break/><text:span text:style-name="T2">all'interno di "giochi" legali).</text:span></text:p>
      <text:p text:style-name="P18">3. L'argomento del linguaggio privato: il "coleottero nella scatola"</text:p>
      <text:p text:style-name="P14">Uno degli esempi più celebri di Wittgenstein è quello del "coleottero nella scatola" (o "scatola degli scarabei"). Immagina che ognuno abbia una scatola e che dentro ci sia un "coleottero". Nessuno può guardare nella scatola di un altro, può solo guardare nella propria. Tutti chiamano ciò che c'è nella loro scatola "coleottero", ma nessuno sa cosa ci sia veramente nella scatola degli altri. Potrebbe essere qualsiasi cosa, o addirittura niente. Il termine "coleottero" acquista significato solo attraverso l'uso pubblico e condiviso.</text:p>
      <text:p text:style-name="P9">Questo esperimento mentale sfida l'idea che possiamo avere un linguaggio puramente privato per descrivere le nostre sensazioni interne (come il dolore). Se solo io potessi accedere alla mia sensazione di dolore, come potrei mai essere sicuro di usare la parola "dolore" correttamente? E come potrei insegnarla agli altri? Wittgenstein argomenta che il significato delle nostre parole, anche quelle che descrivono esperienze interne, deve essere ancorato a pratiche e criteri pubblici e osservabili. Ciò ha avuto un impatto enorme sulla filosofia della mente e sul dibattito sul comportamentismo e sul dualismo mente-corpo.</text:p>
      <text:p text:style-name="P3"><text:span text:style-name="T2">4. La filosofia come terapia: risolvere enigmi, non </text:span><text:soft-page-break/><text:span text:style-name="T2">risolverli.</text:span></text:p>
      <text:p text:style-name="P9">Wittgenstein vedeva la filosofia non come una disciplina che produce teorie e risposte a problemi profondi, ma come un'attività terapeutica che dissolve le confusioni concettuali. Per esempio, i filosofi si sono a lungo interrogati sulla natura della "libertà" o della "conoscenza" come se fossero entità misteriose da scoprire.</text:p>
      <text:p text:style-name="P9">Wittgenstein suggerirebbe di guardare a come usiamo le parole "libertà" o "conoscenza" nelle diverse situazioni della vita. Quando diciamo "Sono libero di scegliere" o "So che sta piovendo", stiamo partecipando a giochi linguistici specifici che hanno regole e scopi definiti. I "problemi" filosofici sorgono quando tentiamo di usare queste parole al di fuori dei loro contesti d'uso naturali, come se fossero nomi di entità metafisiche.</text:p>
      <text:p text:style-name="P9">Questa visione ha influenzato la filosofia analitica e ha incoraggiato un approccio più pragmatico alla filosofia, focalizzato sull'analisi del linguaggio ordinario per chiarire i concetti. Ha anche avuto risonanze in campi come la psicoterapia, dove la chiarificazione del linguaggio e delle narrazioni personali può aiutare a risolvere problemi psicologici.</text:p>
      <text:p text:style-name="P3"><text:span text:style-name="T2">In definitiva, gli esempi di Wittgenstein non sono solo illustrazioni accademiche; sono strumenti potenti che ci invitano a guardare il linguaggio e la realtà con occhi </text:span><text:soft-page-break/><text:span text:style-name="T2">nuovi, a uscire dalle "mosche nel vasetto" delle confusioni concettuali e a riconoscere la profondità e la complessità delle nostre pratiche linguistiche quotidiane.</text:span></text:p>
      <text:p text:style-name="P18">D: <text:span text:style-name="T6">N</text:span>on ho ben capito dove risiede la diversità con il passato. Aristotele ha speso gran parte del suo tempo ad elencare, specificare, dare un senso alle parole e allo studio delle cose da analizzare.</text:p>
      <text:p text:style-name="P14">R: Comprendo benissimo il tuo dubbio! È un punto cruciale per capire la portata della rivoluzione wittgensteiniana. Hai ragione, anche Aristotele dedicò enorme attenzione al linguaggio, alla classificazione e alla definizione. La differenza, però, non sta tanto nel fatto che si occupasse di linguaggio, ma nel modo in cui lo concepiva e nel ruolo che gli attribuiva rispetto alla conoscenza e alla realtà.</text:p>
      <text:p text:style-name="P9">Aristotele e la "Teoria Referenziale" del Significato</text:p>
      <text:p text:style-name="P9">Per Aristotele (e gran parte della tradizione filosofica successiva, fino a Wittgenstein), il linguaggio era visto principalmente come uno specchio o un'immagine della realtà. Le parole, per Aristotele, sono simboli (o "segni") di concetti presenti nella nostra mente, e questi concetti a loro volta riflettono le cose come sono nel mondo.</text:p>
      <text:p text:style-name="P3"><text:span text:style-name="T2">Punti chiave dell'approccio aristotelico:</text:span></text:p>
      <text:p text:style-name="P9">1. <text:s/>Corrispondenza tra Linguaggio, Pensiero e Realtà (Realismo Gnoseologico): Per Aristotele, c'è una <text:soft-page-break/>corrispondenza diretta tra la struttura del linguaggio, la struttura del nostro pensiero e la struttura della realtà stessa. Il nostro modo di parlare e di ragionare riflette le categorie fondamentali dell'essere. Se diciamo "l'uomo è un animale razionale", queste parole corrispondono a un concetto nella mente che, a sua volta, corrisponde a una realtà oggettiva.</text:p>
      <text:p text:style-name="P9">2. <text:s/>Il Linguaggio come Strumento di Verità: La logica aristotelica (l'Organon) è lo strumento per ragionare correttamente e per raggiungere la verità. Le proposizioni ("giudizi") sono vere o false a seconda che corrispondano o meno ai fatti nel mondo. La definizione delle parole è fondamentale perché ci permette di cogliere l'essenza delle cose e di costruire ragionamenti validi (i sillogismi).</text:p>
      <text:p text:style-name="P9">3. <text:s/>Priorità della "Cosa" o del Concetto: Per Aristotele, il significato di una parola è in ultima analisi legato all'oggetto o all'essenza che essa designa. Il linguaggio serve a "denominare" o "descrivere" la realtà. Le "categorie" aristoteliche (sostanza, quantità, qualità, ecc.) sono sia modi di dire le cose, sia modi in cui le cose esistono nel mondo.</text:p>
      <text:p text:style-name="P9">Wittgenstein e il "Significato come Uso"</text:p>
      <text:p text:style-name="P3"><text:span text:style-name="T2">Wittgenstein, specialmente nel suo secondo periodo, capovolge questa prospettiva. Non nega che le parole possano riferirsi a cose, ma sostiene che questa non è la </text:span><text:soft-page-break/><text:span text:style-name="T2">funzione primaria o unica del linguaggio, né la più importante per capire come funziona il significato.</text:span></text:p>
      <text:p text:style-name="P9">Punti chiave dell'approccio wittgensteiniano (secondo periodo):</text:p>
      <text:p text:style-name="P9">1. <text:s/>Linguaggio come Attività Umana, non Specchio della Realtà: Per Wittgenstein, il linguaggio non è uno specchio che riflette una realtà esterna, ma uno strumento (o una "cassetta degli attrezzi") che usiamo per compiere azioni nella nostra vita. Il suo focus non è sulla relazione tra parola e oggetto, ma sulla relazione tra parola e azione/pratica.</text:p>
      <text:p text:style-name="P9">2. <text:s/>Il Significato è l'Uso: Questo è il punto cruciale. Il significato di una parola non è qualcosa che la parola "contiene" in sé (come un'essenza o un oggetto a cui si riferisce), ma è determinato da come e in quali contesti quella parola viene usata. Pensa alla differenza tra il significato di "fuoco!" detto da un vigile del fuoco e "fuoco!" detto da un cuoco che sta accendendo il fornello. La stessa parola, ma usi e significati completamente diversi in base al "gioco linguistico" in cui è inserita.</text:p>
      <text:p text:style-name="P3"><text:span text:style-name="T2">3. <text:s/>I "Giochi Linguistici": Il linguaggio è un insieme di attività variegate, come giochi con regole proprie. Quando parliamo, giochiamo a diversi "giochi": dare ordini, fare promesse, descrivere, scherzare, chiedere scusa. Il significato delle parole è compreso solo </text:span><text:soft-page-break/><text:span text:style-name="T2">all'interno di questi giochi. Aristotele avrebbe cercato l'essenza di "promessa"; Wittgenstein ci invita a guardare a cosa facciamo quando "facciamo una promessa".</text:span></text:p>
      <text:p text:style-name="P9">4. <text:s/>La Filosofia come "Terapia" del Linguaggio: Questo è l'aspetto più "alieno" e sconvolgente. Mentre Aristotele usava la logica per costruire una conoscenza vera sul mondo, Wittgenstein sostiene che molti problemi filosofici tradizionali nascono proprio da un cattivo uso o fraintendimento del linguaggio. I filosofi si ingarbugliano perché usano le parole fuori dai loro contesti d'uso originali, come se "libertà" o "verità" fossero oggetti misteriosi da scoprire anziché concetti la cui comprensione risiede nelle pratiche umane. La filosofia, per Wittgenstein, non deve risolvere questi problemi, ma dissolverli, mostrando che sono pseudo-problemi generati dalla confusione linguistica.</text:p>
      <text:p text:style-name="P9"><text:s/>Un Esempio Concreto della Differenza: la "Sedia"</text:p>
      <text:p text:style-name="P9">Per Aristotele, la parola "sedia" si riferisce all'essenza della sedia, a ciò che rende una sedia una sedia (la sua forma, la sua funzione di essere un oggetto su cui ci si siede). La definizione di "sedia" mirerebbe a catturare questa essenza universale.</text:p>
      <text:p text:style-name="P3"><text:span text:style-name="T2">Per Wittgenstein, non esiste un'unica essenza condivisa da tutte le sedie. Cosa hanno in comune una sedia da ufficio, una sedia a dondolo, uno sgabello e una </text:span><text:soft-page-break/><text:span text:style-name="T2">poltrona? Potremmo trovare delle "somiglianze di famiglia", ma non una singola caratteristica definitoria. Il significato di "sedia" non è dato da una qualche "sedia ideale" nel mondo o nella mente, ma dal modo in cui usiamo la parola "sedia" in vari contesti: "Prendimi quella sedia", "Questa sedia è scomoda", "Disegna una sedia", "La sedia del presidente". Il significato emerge dall'uso pratico.</text:span></text:p>
      <text:p text:style-name="P9">In sintesi, mentre Aristotele (e la tradizione) vedeva il linguaggio come una strada per arrivare alla verità sulla realtà, Wittgenstein lo vede come un'attività intrinsecamente umana le cui regole e significati sono radicati nelle nostre forme di vita. Non è un mezzo trasparente per accedere a un mondo preesistente, ma una pratica che modella il nostro modo di interagire con il mondo e di capirlo.</text:p>
      <text:p text:style-name="P6"><text:span text:style-name="T2">D: Con l'esempio che hai portato, a mio modesto parere, non mi sembra che sia stato esaustivo per dipanare il dubbio che in me rimane. E' Platone che ci ha insegnato a usare le parole per dare senso ad una frase e questo deriva dalla conoscenza che abbiamo degli oggetti. Un bambino che ha in mano un pennarello, lo può usare indistintamente come un ciuccio o come arma di offesa proprio perché non ha la conoscenza dell'oggetto che ha in mano.</text:span></text:p>
      <text:p text:style-name="P9">R: Capisco perfettamente la tua perplessità e ti ringrazio <text:soft-page-break/>per averla espressa con chiarezza. È un punto eccellente, perché mi permette di approfondire la differenza tra la prospettiva di Platone/Aristotele e quella di Wittgenstein in un modo che spero sarà più illuminante.</text:p>
      <text:p text:style-name="P9">La tua osservazione sul bambino e il pennarello è perfetta per questo. Hai ragione: un bambino, senza la conoscenza di un oggetto, può usarlo in modi non convenzionali. E qui sta il nodo cruciale della distinzione.</text:p>
      <text:p text:style-name="P9">La Conoscenza degli Oggetti e il "Gius<text:span text:style-name="T7">t</text:span>o Uso" per Platone/Aristotele</text:p>
      <text:p text:style-name="P9">Per Platone e Aristotele, la conoscenza di un oggetto (o di un'idea) è primaria. Quando conosciamo l'essenza o la funzione propria di un oggetto, allora sappiamo "come usarlo correttamente" o "come parlarne correttamente".</text:p>
      <text:p text:style-name="P3"><text:span text:style-name="T2">Il Pennarello: Per loro, il pennarello ha una sua natura intrinseca, una sua essenza (per Platone sarebbe l'Idea di Pennarello, per Aristotele la sua forma e funzione). Questa natura include il suo scopo principale: scrivere, disegnare.</text:span></text:p>
      <text:p text:style-name="P9">Il Linguaggio: Le parole che usiamo per descrivere il pennarello ("pennarello", "scrive", "ha inchiostro") traggono il loro significato da questa conoscenza dell'essenza dell'oggetto. Un bambino che usa il pennarello come ciuccio dimostra di non avere la <text:soft-page-break/>conoscenza adeguata dell'oggetto e, di conseguenza, il suo uso è "sbagliato" rispetto alla sua funzione propria. Il suo linguaggio (o la sua azione) è impreciso perché la sua conoscenza dell'oggetto è incompleta.</text:p>
      <text:p text:style-name="P9">La Verità: La verità di una frase come "Questo è un pennarello" dipende dalla corrispondenza tra la parola e l'oggetto così come esso è nella sua essenza o natura.</text:p>
      <text:p text:style-name="P9">In questa visione, l'uso corretto (sia dell'oggetto che della parola) deriva dalla conoscenza dell'oggetto e della sua vera natura/funzione.</text:p>
      <text:p text:style-name="P9">L'Uso e il Significato per Wittgenstein: La Comunità e la Forma di Vita</text:p>
      <text:p text:style-name="P9">Ora, vediamo come Wittgenstein rovescia questa prospettiva. Per lui, non è la conoscenza dell'essenza intrinseca dell'oggetto a determinare l'uso o il significato, ma è l'uso all'interno di una comunità di parlanti che costituisce il significato stesso e la nostra "conoscenza" di esso.</text:p>
      <text:p text:style-name="P3"><text:span text:style-name="T2"><text:s/>Il Pennarello e la Comunità: Quando un bambino riceve un pennarello, non lo conosce per una qualche "essenza" metafisica del pennarello. Lo conosce osservando come gli adulti lo usano, sentendo le parole che gli adulti usano in relazione ad esso ("Scrivi!", "Non lo mettere in bocca!", "È per colorare"). Impara a usarlo "correttamente" non perché scopre la sua essenza, ma perché viene introdotto a una pratica, a un "gioco </text:span><text:soft-page-break/><text:span text:style-name="T2">linguistico", dove il pennarello ha un ruolo e delle regole d'uso.</text:span></text:p>
      <text:p text:style-name="P9">Il Linguaggio come Apprendimento Sociale: Se il bambino usa il pennarello come ciuccio, non è perché "non ha la conoscenza dell'oggetto", ma perché non è ancora stato completamente introdotto alle regole e alle pratiche del "gioco del pennarello" che sono condivise dalla sua comunità. La parola "pennarello" acquista significato per lui man mano che partecipa a questo gioco, impara le sue regole (non si succhia, si tiene così, serve per scrivere).</text:p>
      <text:p text:style-name="P9">Non un "Errore", ma un "Altro Gioco": Per Wittgenstein, l'uso del pennarello come ciuccio da parte del bambino non è necessariamente un "errore" in senso assoluto o una "mancanza di conoscenza dell'essenza". È semplicemente un uso al di fuori del gioco linguistico convenzionale. Se il bambino dovesse continuare a usarlo solo come ciuccio e non apprendesse mai la sua funzione di scrittura, per lui il "pennarello" sarebbe, di fatto, un "ciuccio".</text:p>
      <text:p text:style-name="P3"><text:span text:style-name="T2">La Priorità dell'Uso sulla Conoscenza (Intrinseca): Questo è il punto chiave. Non è che conosciamo il pennarello e quindi sappiamo come usarlo. Piuttosto, il significato del "pennarello" e la sua "vera funzione" emergono dall'insieme degli usi che una comunità ne fa. La "conoscenza" del pennarello è la padronanza delle </text:span><text:soft-page-break/><text:span text:style-name="T2">pratiche e dei giochi linguistici in cui il pennarello è impiegato. Non c'è una verità metafisica sul pennarello da scoprire; c'è un insieme di regole e pratiche che lo definiscono nella nostra "forma di vita".</text:span></text:p>
      <text:p text:style-name="P9">La Rivoluzione di Wittgenstein in Sintesi:</text:p>
      <text:p text:style-name="P9">Mentre Platone/Aristotele vedevano il linguaggio e l'uso come dipendenti da una verità o essenza preesistente degli oggetti, Wittgenstein vede il significato e la funzione (e quindi la "verità") emergere dalle pratiche condivise e dall'uso sociale del linguaggio.</text:p>
      <text:p text:style-name="P9">Non è che Platone o Aristotele non avrebbero riconosciuto che un pennarello si usa per scrivere. Ma per loro, quella funzione deriva dalla natura intrinseca del pennarello. Per Wittgenstein, quella funzione è stabilita dalle convenzioni, dalle regole e dalle pratiche che una comunità ha sviluppato attorno all'oggetto e alla parola "pennarello".</text:p>
      <text:p text:style-name="P3"><text:span text:style-name="T2">La sua intuizione è che se nessuno al mondo avesse mai usato un pennarello per scrivere, ma solo come ciuccio, allora "pennarello" significherebbe "oggetto da succhiare", e non ci sarebbe nessun errore o deviazione da una sua "vera" funzione. La funzione è data dal nostro uso.</text:span></text:p>
      <text:p text:style-name="P9">È un cambio di paradigma: dal cercare l'essenza alla quale il linguaggio deve conformarsi, all'osservare le pratiche linguistiche che costituiscono il significato.</text:p>
      <text:p text:style-name="P9"><text:soft-page-break/>D: Ok, accetto la tua semplificazione dell'argomento e ne condivido il significato, ma rimango scettico sul fatto che Wittgenstein venga considerato l'alieno che sconvolse la filosofia.</text:p>
      <text:p text:style-name="P18">R: Comprendo il tuo scetticismo, ed è una posizione molto ragionevole. Parlare di Wittgenstein come un "alieno che sconvolse la filosofia" è, come abbiamo detto, una metafora forte, usata per sottolineare l'impatto radicale delle sue idee. È naturale sentirsi scettici di fronte a un'affermazione così decisa, specialmente quando si riconosce la profondità del pensiero che lo ha preceduto.</text:p>
      <text:p text:style-name="P9">Perché la Metafora dell'"Alieno" <text:span text:style-name="T8">p</text:span>ersiste</text:p>
      <text:p text:style-name="P3"><text:span text:style-name="T2">Il punto non è che Wittgenstein fosse l'unico a pensare al linguaggio o a proporre idee originali – questo sarebbe assurdo. Piuttosto, l'idea dell'"alieno" si riferisce a una combinazione di fattori che lo distinguono nettamente dalla maggior parte della tradizione filosofica occidentale e lo rendono una figura unica.</text:span></text:p>
      <text:p text:style-name="P14">Non era un Costruttore di Sistemi: A differenza di molti filosofi (da Platone ad Aristotele, da Kant a Hegel), che si proponevano di costruire grandi sistemi filosofici per spiegare il mondo o la conoscenza, Wittgenstein si vedeva come un "distruttore" di castelli di sabbia concettuali. Il suo obiettivo non era edificare, ma mostrare le fondamenta fragili su cui poggiavano molte <text:soft-page-break/>delle domande filosofiche tradizionali. Questo approccio anti-sistematico era ed è ancora sconcertante per molti.</text:p>
      <text:p text:style-name="P14">La Filosofia come Terapia e Non come Ricerca di Verità Eterne: Abbiamo discusso il suo approccio terapeutico. Per Wittgenstein, la filosofia non doveva scoprire verità nascoste o proporre nuove teorie sul mondo, ma piuttosto chiarire il linguaggio per dissolvere le "malattie" concettuali. È una visione profondamente diversa dal compito che la filosofia si è data per millenni. Immagina uno scienziato che, anziché fare scoperte, ti dicesse che i tuoi problemi scientifici sono solo un fraintendimento di come usi gli strumenti. Sarebbe un modo "alieno" di fare scienza, no?</text:p>
      <text:p text:style-name="P4"><text:span text:style-name="T2">Il Rovesciamento del Rapporto Mente-Mondo-Linguaggio: Come abbiamo visto con l'esempio del pennarello, Wittgenstein ha invertito la freccia della dipendenza. Per gran parte della tradizione, si pensava che il linguaggio fosse un riflesso di una mente che pensa a un mondo già strutturato. Wittgenstein suggerisce che il linguaggio stesso, nelle sue pratiche d'uso condivise, struttura il nostro modo di percepire il mondo e di pensare. Non è che noi pensiamo e poi usiamo il linguaggio per esprimere i pensieri; spesso, è nel linguaggio (nelle nostre forme di vita linguistiche) che i nostri pensieri e concetti si radicano e prendono forma. Questo è un rovesciamento radicale.</text:span></text:p>
      <text:p text:style-name="P9"><text:soft-page-break/>L'Impatto sul Modello Filosofico Dominante: Wittgenstein ha contribuito a spostare il centro di gravità della filosofia da questioni metafisiche ed epistemologiche astratte all'analisi del linguaggio ordinario. Questo ha avuto un'influenza massiccia sulla filosofia analitica anglosassone e ha generato nuove scuole di pensiero, ma anche forti resistenze. Ha costretto la filosofia a guardarsi allo specchio e a riflettere sulla propria natura e sul proprio metodo.</text:p>
      <text:p text:style-name="P9">Lo Scetticismo è Salutare</text:p>
      <text:p text:style-name="P3"><text:span text:style-name="T2">Il tuo scetticismo è del tutto giustificato perché, da un lato, le idee non nascono dal nulla e Wittgenstein è certamente debitore a tradizioni precedenti (come il pragmatismo, l'empirismo, o la logica di Frege e Russell). Dall'altro, l'idea di "sconvolgimento" può essere percepita come un'iperbole, sminuendo il lavoro di altri giganti.</text:span></text:p>
      <text:p text:style-name="P9">Tuttavia, ciò che rende Wittgenstein "alieno" e "sconvolgente" non è tanto la presenza di singole intuizioni (anche altri hanno parlato dell'uso del linguaggio), quanto la radicalità e la coerenza con cui ha portato avanti queste intuizioni, arrivando a ripensare l'intera natura del fare filosofia. Non ha solo aggiunto un nuovo capitolo; ha suggerito che l'intero libro andava riletto sotto una luce completamente diversa, o che forse molte delle domande del libro erano mal <text:soft-page-break/>poste.</text:p>
      <text:p text:style-name="P9">Il suo modo di pensare, spesso aforistico e non sistematico, che non offre risposte ma invita a vedere le cose diversamente, è ciò che molti trovano così unico e, per certi versi, "alieno" rispetto alle aspettative tradizionali della filosofia.</text:p>
      <text:p text:style-name="P9">Spero che questo ti aiuti a capire meglio perché, nonostante la validità del tuo scetticismo, quella metafora continui a essere utilizzata per descrivere il suo impatto. È proprio la discussione e il dibattito sulle sue idee che ne testimoniano l'importanza.</text:p>
      <text:p text:style-name="P9"/>
      <text:p text:style-name="P1"><text:a xlink:type="simple" xlink:href="https://disf.org/abbiamo-studiato-per-voi/8806138170" text:style-name="ListLabel_20_1" text:visited-style-name="ListLabel_20_1"><text:span text:style-name="T1">https://disf.org/abbiamo-studiato-per-voi/8806138170</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ListLabel_20_1" style:display-name="ListLabel 1" style:family="text">
      <style:text-properties style:font-name="Garamond" fo:font-family="Garamond" style:font-family-generic="roman" style:font-pitch="variable" fo:font-size="14pt" fo:language="it" fo:country="IT" style:font-size-asian="14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08T18:47:02.761356454</dc:date>
    <dc:creator>corrado tafaro</dc:creator>
    <meta:editing-duration>PT8M17S</meta:editing-duration>
    <meta:editing-cycles>2</meta:editing-cycles>
    <meta:generator>LibreOffice/24.2.7.2$Linux_X86_64 LibreOffice_project/420$Build-2</meta:generator>
    <meta:document-statistic meta:table-count="0" meta:image-count="0" meta:object-count="0" meta:page-count="23" meta:paragraph-count="107" meta:word-count="4382" meta:character-count="28711" meta:non-whitespace-character-count="24422"/>
  </office:meta>
</office:document-meta>
</file>