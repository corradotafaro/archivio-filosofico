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aa57c" style:font-size-asian="14pt" style:font-size-complex="14pt"/>
    </style:style>
    <style:style style:name="P2" style:family="paragraph" style:parent-style-name="Standard">
      <style:paragraph-properties fo:margin-top="0.101cm" fo:margin-bottom="0cm" style:contextual-spacing="false" fo:line-height="115%" fo:text-align="justify" style:justify-single-word="false"/>
      <style:text-properties officeooo:paragraph-rsid="00106ff1"/>
    </style:style>
    <style:style style:name="P3"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f1f34" style:font-size-asian="14pt" style:font-size-complex="14pt"/>
    </style:style>
    <style:style style:name="P4"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0f1f34" style:font-size-asian="14pt" style:font-size-complex="14pt"/>
    </style:style>
    <style:style style:name="P5" style:family="paragraph" style:parent-style-name="Standard">
      <style:paragraph-properties fo:margin-top="0cm" fo:margin-bottom="0cm" style:contextual-spacing="false" fo:line-height="115%" fo:text-align="justify" style:justify-single-word="false"/>
      <style:text-properties style:font-name="Liberation Serif" fo:font-size="14pt" officeooo:paragraph-rsid="000f1f34" style:font-size-asian="14pt" style:font-size-complex="14pt"/>
    </style:style>
    <style:style style:name="P6" style:family="paragraph" style:parent-style-name="Standard">
      <style:paragraph-properties fo:line-height="100%" fo:text-align="start" style:justify-single-word="false"/>
      <style:text-properties style:font-name="Liberation Serif" fo:font-size="16pt" officeooo:rsid="000c3fed" officeooo:paragraph-rsid="000c3fed" style:font-size-asian="16pt" style:font-size-complex="16pt"/>
    </style:style>
    <style:style style:name="T1" style:family="text">
      <style:text-properties officeooo:rsid="000f1f34"/>
    </style:style>
    <style:style style:name="T2" style:family="text">
      <style:text-properties officeooo:rsid="00106ff1"/>
    </style:style>
    <style:style style:name="T3" style:family="text">
      <style:text-properties style:font-name="Liberation Serif" fo:font-size="14pt" style:font-size-asian="14pt" style:font-size-complex="14pt"/>
    </style:style>
    <style:style style:name="T4" style:family="text">
      <style:text-properties style:font-name="Liberation Serif" fo:font-size="14pt" officeooo:rsid="00106ff1" style:font-size-asian="14pt" style:font-size-complex="14pt"/>
    </style:style>
    <style:style style:name="T5" style:family="text">
      <style:text-properties officeooo:rsid="001101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Goethe e Schopenhaur due visioni della</text:span> natura e <text:span text:style-name="T1">del</text:span>la morte <text:span text:style-name="T1">completamente diverse.</text:span></text:p>
      <text:p text:style-name="P3">Goethe elabora la sua visione all’interno di un naturalismo vitalistico tipico del tardo Illuminismo e del primo Romanticismo tedesco.</text:p>
      <text:p text:style-name="P5">È il Goethe scienziato, autore di studi sulla metamorfosi delle piante, sulla teoria dei colori, sulla morfologia comparata. Per lui la Natura è un organismo vivente, creativo, dinamico, incessantemente produttivo.</text:p>
      <text:p text:style-name="P4">Goethe, nella sua opera "Faust", <text:span text:style-name="T5">opera concepita in diverse fasi e conclusa con la sua morte nel 1832</text:span>, afferma che la Natura ha escogitato la morte come meccanismo necessario per generare vita in abbondanza. La morte, secondo questa visione, non rappresenta una fine assoluta, ma piuttosto un passaggio obbligato in un ciclo continuo di trasformazione e rinnovamento. In questo senso, la morte diviene strumento per la Natura di preservare la vitalità e la diversità del mondo organico.</text:p>
      <text:p text:style-name="P3">Schopenhauer scrive Il mondo come volontà e rappresentazione (1818) in un clima post-kantiano, influenzato da<text:span text:style-name="T1">l</text:span> pessimismo di Buddha e delle Upaniṣad, la metafisica del dolore, la critica alla ragione illuministica.</text:p>
      <text:p text:style-name="P4">La sua filosofia nasce come reazione all’ottimismo idealista (Hegel, Fichte, Schelling) e alla fiducia <text:soft-page-break/>romantica nella Natura. Schopenhauer, invece, nella sua opera principale "Il mondo come volontà e rappresentazione", assume una prospettiva più cupa e pessimistica. Egli vede nella realtà una "volontà di vivere" cieca e irrazionale che spinge la materia a perpetuarsi in un ciclo incessante di nascita, dolore e morte. La morte, in questa visione, non è solo un passaggio necessario, ma la manifestazione ultima del carattere effimero e illusorio dell'esistenza. La "demonìa" a cui Schopenhauer fa riferimento è proprio questa cieca forza vitale che, pur animando l'universo, lo condanna a un'eterna sofferenza.</text:p>
      <text:p text:style-name="P4">La differenza etica tra Goethe e Schopenhauer è enorme: non riguarda solo la morte, ma il valore della vita, il ruolo dell’individuo nella Natura e il senso dell’agire umano. </text:p>
      <text:p text:style-name="P5">Se la morte è un ingranaggio della metamorfosi, l’etica goethiana invita a<text:span text:style-name="T2">d </text:span>accettare la finitudine, collaborare con la Natura, non opporsi al cambiamento.</text:p>
      <text:p text:style-name="P2"><text:span text:style-name="T3">Schopenhauer, al contrario, costruisce una vera e propria etica del distacco, fondata sulla diagnosi metafisica della Volontà. Se la Volontà è cieca e incessante, ogni desiderio genera sofferenza.</text:span></text:p>
      <text:p text:style-name="P5">Schopenhauer è sorprendentemente “moralista”, la compassione è l’unico vero principio etico, perché riconosce che tutti soffrono.</text:p>
      <text:p text:style-name="P1"><text:soft-page-break/>Nonostante le differenze di approccio, entrambi i filosofi tedeschi sottolineano l'intrinseca connessione tra la vita e la morte. La morte non è un evento esterno alla vita, ma ne costituisce un aspetto fondamentale, un elemento imprescindibile per la sua stessa persistenza. In questa prospettiva, la riflessione sulla morte assume un valore profondo, invitandoci a comprendere meglio la natura della realtà e il nostro posto all'interno di es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be1bb"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fbe1bb"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4-06-10T18:31:42.783000000</meta:creation-date>
    <dc:date>2026-07-10T11:53:51.866513463</dc:date>
    <meta:editing-duration>PT31M54S</meta:editing-duration>
    <meta:editing-cycles>4</meta:editing-cycles>
    <meta:generator>LibreOffice/24.2.7.2$Linux_X86_64 LibreOffice_project/420$Build-2</meta:generator>
    <dc:creator>corrado tafaro</dc:creator>
    <meta:document-statistic meta:table-count="0" meta:image-count="0" meta:object-count="0" meta:page-count="3" meta:paragraph-count="11" meta:word-count="436" meta:character-count="2946" meta:non-whitespace-character-count="2520"/>
  </office:meta>
</office:document-meta>
</file>