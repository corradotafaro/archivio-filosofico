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paragraph-properties fo:text-align="justify" style:justify-single-word="false"/>
      <style:text-properties officeooo:rsid="00fcd2f9" officeooo:paragraph-rsid="00fcd2f9"/>
    </style:style>
    <style:style style:name="P2" style:family="paragraph" style:parent-style-name="Heading_20_1">
      <style:paragraph-properties fo:break-before="page"/>
    </style:style>
    <style:style style:name="P3" style:family="paragraph" style:parent-style-name="Standard">
      <style:paragraph-properties fo:margin-top="0.199cm" fo:margin-bottom="0cm" style:contextual-spacing="false"/>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top="0.199cm" fo:margin-bottom="0cm" style:contextual-spacing="false"/>
      <style:text-properties fo:font-weight="normal" style:font-weight-asian="normal" style:font-weight-complex="normal"/>
    </style:style>
    <style:style style:name="P6" style:family="paragraph" style:parent-style-name="Standard">
      <style:paragraph-properties fo:margin-top="0.199cm" fo:margin-bottom="0cm" style:contextual-spacing="false"/>
      <style:text-properties fo:font-weight="normal" officeooo:paragraph-rsid="000f12fe" style:font-weight-asian="normal" style:font-weight-complex="normal"/>
    </style:style>
    <style:style style:name="P7" style:family="paragraph" style:parent-style-name="Standard">
      <style:text-properties fo:font-weight="normal" officeooo:paragraph-rsid="000f12fe" style:font-weight-asian="normal" style:font-weight-complex="normal"/>
    </style:style>
    <style:style style:name="P8" style:family="paragraph" style:parent-style-name="Standard">
      <style:paragraph-properties fo:margin-top="0.101cm" fo:margin-bottom="0cm" style:contextual-spacing="false"/>
      <style:text-properties fo:font-weight="normal" officeooo:paragraph-rsid="000f12fe" style:font-weight-asian="normal" style:font-weight-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style:font-name="Noto Sans1" fo:font-style="normal" fo:font-weight="normal" officeooo:rsid="00fe3cc5" style:font-style-asian="normal" style:font-weight-asian="normal" style:font-style-complex="normal" style:font-weight-complex="normal"/>
    </style:style>
    <style:style style:name="T3" style:family="text">
      <style:text-properties style:font-name="Noto Sans1" fo:font-style="normal" fo:font-weight="normal" officeooo:rsid="00fcd2f9" style:font-style-asian="normal" style:font-weight-asian="normal" style:font-style-complex="normal" style:font-weight-complex="normal"/>
    </style:style>
    <style:style style:name="T4" style:family="text">
      <style:text-properties style:font-name="Noto Sans1" fo:font-style="normal" fo:font-weight="normal" officeooo:rsid="006f614c" style:font-style-asian="normal" style:font-weight-asian="normal" style:font-style-complex="normal" style:font-weight-complex="normal"/>
    </style:style>
    <style:style style:name="T5" style:family="text">
      <style:text-properties fo:font-variant="normal" fo:text-transform="none" style:use-window-font-color="true" loext:opacity="0%" fo:font-size="12pt" fo:letter-spacing="normal" fo:font-weight="normal" officeooo:rsid="00fe3cc5" fo:background-color="transparent" loext:char-shading-value="0" style:font-size-asian="12pt" style:font-weight-asian="normal" style:font-size-complex="12pt" style:font-weight-complex="normal" loext:padding="0cm" loext:border="none"/>
    </style:style>
    <style:style style:name="T6" style:family="text">
      <style:text-properties fo:font-variant="normal" fo:text-transform="none" style:use-window-font-color="true" loext:opacity="0%" fo:font-size="12pt" fo:letter-spacing="normal" fo:font-weight="normal" officeooo:rsid="00fcd2f9" fo:background-color="transparent" loext:char-shading-value="0" style:font-size-asian="12pt" style:font-weight-asian="normal" style:font-size-complex="12pt" style:font-weight-complex="normal" loext:padding="0cm" loext:border="none"/>
    </style:style>
    <style:style style:name="T7" style:family="text">
      <style:text-properties fo:font-variant="normal" fo:text-transform="none" style:use-window-font-color="true" loext:opacity="0%" fo:font-size="12pt" fo:letter-spacing="normal" fo:font-weight="normal" officeooo:rsid="006dc650" fo:background-color="transparent" loext:char-shading-value="0" style:font-size-asian="12pt" style:font-weight-asian="normal" style:font-size-complex="12pt" style:font-weight-complex="normal" loext:padding="0cm" loext:border="none"/>
    </style:style>
    <style:style style:name="T8" style:family="text">
      <style:text-properties fo:font-variant="normal" fo:text-transform="none" style:use-window-font-color="true" loext:opacity="0%" fo:font-size="12pt" fo:letter-spacing="normal" fo:font-weight="normal" officeooo:rsid="006f614c" fo:background-color="transparent" loext:char-shading-value="0" style:font-size-asian="12pt" style:font-weight-asian="normal" style:font-size-complex="12pt" style:font-weight-complex="normal" loext:padding="0cm" loext:border="none"/>
    </style:style>
    <style:style style:name="T9" style:family="text">
      <style:text-properties fo:font-variant="normal" fo:text-transform="none" style:use-window-font-color="true" loext:opacity="0%" fo:font-size="12pt" fo:letter-spacing="normal" fo:font-weight="normal" officeooo:rsid="00fcd2f9" style:font-size-asian="12pt" style:font-weight-asian="normal" style:font-size-complex="12pt" style:font-weight-complex="normal" loext:padding="0cm" loext:border="none"/>
    </style:style>
    <style:style style:name="T10" style:family="text">
      <style:text-properties fo:font-variant="normal" fo:text-transform="none" style:use-window-font-color="true" loext:opacity="0%" fo:font-size="12pt" fo:letter-spacing="normal" fo:font-style="italic" fo:font-weight="normal" officeooo:rsid="00fcd2f9" fo:background-color="transparent" loext:char-shading-value="0" style:font-size-asian="12pt" style:font-style-asian="italic" style:font-weight-asian="normal" style:font-size-complex="12pt" style:font-style-complex="italic" style:font-weight-complex="normal" loext:padding="0cm" loext:border="none"/>
    </style:style>
    <style:style style:name="T11" style:family="text">
      <style:text-properties fo:font-variant="normal" fo:text-transform="none" fo:color="#222222" loext:opacity="100%" fo:font-size="12pt" fo:letter-spacing="normal" fo:font-weight="normal" officeooo:rsid="00fcd2f9" style:font-size-asian="12pt" style:font-weight-asian="normal" style:font-size-complex="12pt" style:font-weight-complex="normal" loext:padding="0cm" loext:border="none"/>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officeooo:rsid="000e3b6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L’etica di Aristotele</text:h>
      <text:p text:style-name="P4">Secondo Aristotele, la forma dell’uomo è di possedere un’anima vegetativa, un’anima sensitiva e un’anima intellettiva o razionale.</text:p>
      <text:p text:style-name="P5">A questo punto Aristotele si pone alcune domande: “come dovrebbe vivere un uomo?”, “ cosa è necessario per un uomo affinché viva una vita felice?”</text:p>
      <text:p text:style-name="P5">La risposta che si diede fu: “l’essere umano è felice solo quando si serve di tutte le sue capacità e di tutte le sue possibilità.”</text:p>
      <text:p text:style-name="P6">Nell'etica, Aristotele identifica tre forme di vita che caratterizzano l'essere umano:</text:p>
      <text:p text:style-name="P6">“La vita dedita al piacere”: questa forma di vita è incentrata sulla ricerca del piacere sensoriale e fisico. È una vita in cui la felicità è cercata principalmente attraverso la gratificazione dei sensi.</text:p>
      <text:p text:style-name="P6">“La vita dedita all'onore”: in questa forma di vita, la felicità è ricercata attraverso il riconoscimento e l'apprezzamento degli altri. L'onore e il rispetto degli altri sono visti come la massima realizzazione.</text:p>
      <text:p text:style-name="P6">“La vita votata alla contemplazione”: questa è considerata da Aristotele la forma di vita più alta. In essa, la felicità è ricercata attraverso l'esercizio dell'intelletto e la comprensione del mondo. Questa forma di vita richiede un impegno verso l'apprendimento e la saggezza.</text:p>
      <text:p text:style-name="P7"><text:soft-page-break/>Per Aristotele, la felicità o "eudaimonia" che letteralmente significa “essere in compagnia di un buon demone” non può essere raggiunta semplicemente attraverso il piacere sensoriale o l'onore sociale, ma richiede una vita dedicata alla virtù e alla saggezza.</text:p>
      <text:p text:style-name="P8">La virtù o "arete" è vista come un mezzo per raggiungere un fine, che è la felicità. La virtù non è solo un comportamento etico, ma anche un modo di vivere che porta alla realizzazione del potenziale umano.</text:p>
      <text:p text:style-name="P8">L’etica non è per Aristotele una scienza esatta e non aspira né alla verità assoluta, né alla precisione delle dimostrazioni matematiche come nel modello platonico.</text:p>
      <text:p text:style-name="P8">L’etica, secondo il filosofo, si occupa di questioni relative ai costumi e alle abitudini propri degli uomini, che sono di per sé mutevoli e relativi e non rendono possibili giudizi rigorosi e definitivi. I giudizi etici pertanto si devono adattare alle situazioni concrete della società e non aspirano alla verità assoluta, in quanto valgono solo “in linea di massima” o, come dice lo stesso Aristotele, “per lo più”, cioè nella maggior parte dei casi, senza escludere che le cose possano andare diversamente.</text:p>
      <text:p text:style-name="P3"><text:span text:style-name="Strong_20_Emphasis"><text:span text:style-name="T12">Il rapporto con gli altri deve conciliare “il giusto mezzo”, non bisogna essere né codardi né temerari, ma coraggiosi, un coraggio insufficiente ci fa apparire vigliacchi, mentre un coraggio eccessivo sconfina nella spavalderia. Analogamente, non bisogna essere né avari né spreconi, bensì generosi, la mancanza di generosità ci fa diventare gretti, il suo eccesso ci trasforma in scialacquatori. Lo stesso vale per il cibo: è pericoloso </text:span></text:span><text:soft-page-break/><text:span text:style-name="Strong_20_Emphasis"><text:span text:style-name="T12">sia mangiare troppo poco sia mangiare troppo. L’etica di Platone e quella di Aristotele riecheggiano la scienza medica greca: solo usando equilibrio e moderazione si diventa felici e armonici.</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5T17:42:15.158494688</meta:creation-date>
    <dc:date>2026-07-18T17:36:35.854897904</dc:date>
    <dc:creator>corrado tafaro</dc:creator>
    <meta:editing-duration>PT25M9S</meta:editing-duration>
    <meta:editing-cycles>5</meta:editing-cycles>
    <meta:generator>LibreOffice/24.2.7.2$Linux_X86_64 LibreOffice_project/420$Build-2</meta:generator>
    <meta:document-statistic meta:table-count="0" meta:image-count="0" meta:object-count="0" meta:page-count="3" meta:paragraph-count="13" meta:word-count="466" meta:character-count="2977" meta:non-whitespace-character-count="2524"/>
  </office:meta>
</office:document-meta>
</file>