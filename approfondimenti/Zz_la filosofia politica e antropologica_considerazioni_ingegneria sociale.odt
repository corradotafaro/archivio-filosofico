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note">
      <style:paragraph-properties fo:text-align="justify" style:justify-single-word="false"/>
    </style:style>
    <style:style style:name="P2" style:family="paragraph" style:parent-style-name="Standard">
      <style:paragraph-properties fo:margin-top="0.101cm" fo:margin-bottom="0cm" style:contextual-spacing="false"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top="0.199cm" fo:margin-bottom="0cm" style:contextual-spacing="false" fo:text-align="justify" style:justify-single-word="false"/>
    </style:style>
    <style:style style:name="P5" style:family="paragraph" style:parent-style-name="Standard">
      <style:paragraph-properties fo:margin-top="0.199cm" fo:margin-bottom="0cm" style:contextual-spacing="false" fo:text-align="justify" style:justify-single-word="false"/>
      <style:text-properties officeooo:paragraph-rsid="00282f04"/>
    </style:style>
    <style:style style:name="P6" style:family="paragraph" style:parent-style-name="Standard">
      <style:paragraph-properties fo:margin-top="0.101cm" fo:margin-bottom="0cm" style:contextual-spacing="false" fo:text-align="justify" style:justify-single-word="false"/>
      <style:text-properties officeooo:paragraph-rsid="00282f04"/>
    </style:style>
    <style:style style:name="P7" style:family="paragraph" style:parent-style-name="Standard">
      <style:paragraph-properties fo:line-height="100%" fo:text-align="justify" style:justify-single-word="false"/>
      <style:text-properties officeooo:paragraph-rsid="001e886b"/>
    </style:style>
    <style:style style:name="P8" style:family="paragraph" style:parent-style-name="Standard">
      <style:paragraph-properties fo:margin-top="0.101cm" fo:margin-bottom="0cm" style:contextual-spacing="false" fo:line-height="100%" fo:text-align="justify" style:justify-single-word="false"/>
      <style:text-properties officeooo:paragraph-rsid="00265e06"/>
    </style:style>
    <style:style style:name="P9" style:family="paragraph" style:parent-style-name="Standard">
      <style:paragraph-properties fo:line-height="100%" fo:text-align="justify" style:justify-single-word="false"/>
      <style:text-properties officeooo:paragraph-rsid="00265e06"/>
    </style:style>
    <style:style style:name="P10" style:family="paragraph" style:parent-style-name="Standard" style:list-style-name="L5">
      <style:paragraph-properties fo:margin-top="0.101cm" fo:margin-bottom="0cm" style:contextual-spacing="false" fo:line-height="100%" fo:text-align="justify" style:justify-single-word="false"/>
      <style:text-properties officeooo:paragraph-rsid="00265e06"/>
    </style:style>
    <style:style style:name="P11" style:family="paragraph" style:parent-style-name="Standard" style:list-style-name="L6">
      <style:paragraph-properties fo:margin-top="0.101cm" fo:margin-bottom="0cm" style:contextual-spacing="false" fo:line-height="100%" fo:text-align="justify" style:justify-single-word="false"/>
      <style:text-properties officeooo:paragraph-rsid="00265e06"/>
    </style:style>
    <style:style style:name="P12" style:family="paragraph" style:parent-style-name="Standard">
      <style:paragraph-properties fo:line-height="115%" fo:text-align="justify" style:justify-single-word="false"/>
      <style:text-properties officeooo:paragraph-rsid="00247284"/>
    </style:style>
    <style:style style:name="P13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officeooo:paragraph-rsid="00247284"/>
    </style:style>
    <style:style style:name="P14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247284"/>
    </style:style>
    <style:style style:name="P15" style:family="paragraph" style:parent-style-name="Standard" style:list-style-name="L2">
      <style:paragraph-properties fo:margin-top="0.101cm" fo:margin-bottom="0cm" style:contextual-spacing="false" fo:line-height="115%" fo:text-align="justify" style:justify-single-word="false"/>
      <style:text-properties officeooo:paragraph-rsid="00247284"/>
    </style:style>
    <style:style style:name="P16" style:family="paragraph" style:parent-style-name="Standard" style:list-style-name="L3">
      <style:paragraph-properties fo:margin-top="0cm" fo:margin-bottom="0cm" style:contextual-spacing="false" fo:line-height="115%" fo:text-align="justify" style:justify-single-word="false"/>
      <style:text-properties officeooo:paragraph-rsid="00247284"/>
    </style:style>
    <style:style style:name="P17" style:family="paragraph" style:parent-style-name="Standard" style:list-style-name="L4">
      <style:paragraph-properties fo:margin-top="0cm" fo:margin-bottom="0cm" style:contextual-spacing="false" fo:line-height="115%" fo:text-align="justify" style:justify-single-word="false"/>
      <style:text-properties officeooo:paragraph-rsid="00247284"/>
    </style:style>
    <style:style style:name="P18" style:family="paragraph" style:parent-style-name="Standard">
      <style:paragraph-properties fo:margin-top="0.199cm" fo:margin-bottom="0cm" style:contextual-spacing="false" fo:line-height="115%" fo:text-align="justify" style:justify-single-word="false"/>
    </style:style>
    <style:style style:name="P19" style:family="paragraph" style:parent-style-name="Standard">
      <style:paragraph-properties fo:margin-top="0.101cm" fo:margin-bottom="0cm" style:contextual-spacing="false" fo:line-height="115%" fo:text-align="justify" style:justify-single-word="false"/>
    </style:style>
    <style:style style:name="P20" style:family="paragraph" style:parent-style-name="Standard">
      <style:paragraph-properties fo:line-height="115%" fo:text-align="justify" style:justify-single-word="false"/>
    </style:style>
    <style:style style:name="P21" style:family="paragraph" style:parent-style-name="Standard">
      <style:paragraph-properties fo:line-height="100%" fo:text-align="justify" style:justify-single-word="false"/>
      <style:text-properties fo:font-size="16pt" officeooo:rsid="00247284" officeooo:paragraph-rsid="00247284" style:font-size-asian="16pt" style:font-size-complex="16pt"/>
    </style:style>
    <style:style style:name="P22" style:family="paragraph" style:parent-style-name="Standard">
      <style:paragraph-properties fo:margin-top="0.199cm" fo:margin-bottom="0cm" style:contextual-spacing="false"/>
    </style:style>
    <style:style style:name="P23" style:family="paragraph" style:parent-style-name="Standard" style:list-style-name="L7">
      <style:paragraph-properties fo:margin-top="0.101cm" fo:margin-bottom="0cm" style:contextual-spacing="false"/>
    </style:style>
    <style:style style:name="P24" style:family="paragraph" style:parent-style-name="Standard" style:list-style-name="L8">
      <style:paragraph-properties fo:margin-top="0.101cm" fo:margin-bottom="0cm" style:contextual-spacing="false"/>
    </style:style>
    <style:style style:name="T1" style:family="text">
      <style:text-properties officeooo:rsid="00265e06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Cosa si intende per “Ingegneria sociale”</text:p>
      <text:p text:style-name="P7"/>
      <text:p text:style-name="P12">Per Friedrich Hayek, l'ingegneria sociale è il tentativo illusorio di plasmare e riorganizzare deliberatamente la società "dall'alto", basandosi sull'arroganza della ragione umana. </text:p>
      <text:p text:style-name="P13">Hayek definisce questo approccio costruttivismo, considerandolo la premessa teorica ed etica di tutti i totalitarismi e delle economie pianificate.</text:p>
      <text:p text:style-name="P13">I capisaldi della critica di Hayek sono:</text:p>
      <text:list text:style-name="L2">
        <text:list-item>
          <text:p text:style-name="P15">L'illusione della conoscenza </text:p>
        </text:list-item>
      </text:list>
      <text:p text:style-name="P14">Il pianificatore sociale presume di poter raccogliere e comprendere tutte le informazioni necessarie per dirigere l'intera società. Per Hayek, invece, la conoscenza è inevitabilmente dispersa e frammentata tra milioni di individui, e non può essere centralizzata in una singola mente o comitato.</text:p>
      <text:list text:style-name="L3">
        <text:list-item>
          <text:p text:style-name="P16">L'Ordine Spontaneo</text:p>
        </text:list-item>
      </text:list>
      <text:p text:style-name="P14">Istituzioni complesse come il mercato, il linguaggio, il diritto e le tradizioni non sono state progettate a tavolino (ingegneria sociale), ma si sono evolute spontaneamente attraverso le interazioni e le scoperte di innumerevoli generazioni.</text:p>
      <text:list text:style-name="L4">
        <text:list-item>
          <text:p text:style-name="P17">Gli esiti disastrosi</text:p>
        </text:list-item>
      </text:list>
      <text:p text:style-name="P14">Nel tentativo di imporre un ordine razionale (spesso mascherato da concetti astratti come la "giustizia <text:soft-page-break/>sociale"), gli ingegneri sociali finiscono per distruggere le libertà individuali. Questo processo, come spiegato nella sua opera più celebre “La via della schiavitù”, conduce inevitabilmente a regimi autoritari, poiché per far rispettare un piano centrale unico è necessario reprimere ogni dissenso.</text:p>
      <text:p text:style-name="P13">Per Hayek, l'ingegneria sociale è l'azione di un'autorità centrale (lo Stato) che impone dall'alto regole coatte per guidare la società verso un fine specifico. </text:p>
      <text:p text:style-name="P8"><text:span text:style-name="T1">D: Il caso recente della quotazione in borsa di SpaceX di Elon Mask è strumento di ingegneria sociale? Qual è la tua opinione?</text:span></text:p>
      <text:p text:style-name="P8"><text:span text:style-name="T1">R: </text:span>Sotto questo aspetto, l'IPO di SpaceX presenta elementi che appartengono invece al “Cosmos” (l'ordine spontaneo)</text:p>
      <text:list text:style-name="L5">
        <text:list-item>
          <text:p text:style-name="P10">Scelta e coordinamento spontaneo</text:p>
        </text:list-item>
      </text:list>
      <text:p text:style-name="P9">Nessuno è obbligato a comprare azioni SPCX. L'enorme domanda istituzionale e retail (a cui è stato riservato un insolito 30% del flottante) è il risultato di milioni di decisioni individuali decentralizzate. Gli investitori scelgono volontariamente di allocare il proprio capitale scommettendo sul futuro dell'esplorazione spaziale e dell'infrastruttura di Starlink.</text:p>
      <text:list text:style-name="L6">
        <text:list-item>
          <text:p text:style-name="P11">Assunzione del rischio</text:p>
        </text:list-item>
      </text:list>
      <text:p text:style-name="P8">I bilanci emersi dal documento S-1 della SEC mostrano perdite nette miliardarie causate dagli ingenti investimenti nell'infrastruttura AI e nella fusione con xAI. Nel libero mercato hayekiano, gli individui hanno il <text:soft-page-break/>diritto di rischiare i propri fondi in imprese altamente speculative senza che lo Stato pianifichi il loro successo o fallimento.</text:p>
      <text:p text:style-name="P18">Analizzare il debutto record di SpaceX a Wall Street alla luce del pensiero di Friedrich von Hayek offre una prospettiva affascinante. L'operazione ha riscritto le regole dei mercati finanziari: una quotazione lampo a un prezzo fisso di 135 dollari ad azione, senza la classica "forchetta di prezzo" contrattata, che ha spinto la valutazione oltre i 2.000 miliardi di dollari e proiettato Elon Musk nello status di primo "trilionario" della storia.</text:p>
      <text:p text:style-name="P19">Ma se guardiamo questo evento con le lenti hayekiane, la risposta alla tua domanda è sottile: la quotazione in sé non è ingegneria sociale pura, ma flirta pericolosamente con il "costruttivismo" e l'arbitrio che Hayek ha sempre denunciato.</text:p>
      <text:p text:style-name="P2">Ecco come si può scomporre la questione secondo la logica dell'ordine spontaneo contro l'ordine pianificato.</text:p>
      <text:p text:style-name="P2">Perché SÌ, mostra derive di "Costruttivismo" e Arbitrio (La distorsione delle regole)</text:p>
      <text:p text:style-name="P5"><text:span text:style-name="T2">Hayek ha spiegato che lo sviluppo moderno è spesso guidato da "false concezioni economiche", dove l'ambizione di una mente (o di un pianificatore) pretende di piegare le normali leggi di mercato. L'operazione </text:span></text:p>
      <text:p text:style-name="P6"><text:span text:style-name="T2">SpaceX mostra proprio queste crepe:</text:span></text:p>
      <text:list text:style-name="L7">
        <text:list-item>
          <text:p text:style-name="P23">1. La determinazione arbitraria del valore</text:p>
        </text:list-item>
      </text:list>
      <text:p text:style-name="P20"><text:soft-page-break/>Hayek criticava l'idea che i prezzi potessero essere stabiliti per decreto anziché dall'interazione spontanea di domanda e offerta. Nel caso di SpaceX, l'azienda ha letteralmente aggirato le convenzioni standard delle IPO: ha consegnato al mercato un prezzo fisso ($135), forte di un potere quasi monopolistico sulla narrativa tecnologica e spaziale. Il valore riflette l'immensa "fede" in un solo uomo e la sua capacità di generare accordi interni (come il controverso legame tra SpaceX e xAI), evocando l'immagine di un "pianificatore centrale privato" che modella la realtà economica a proprio piacimento.</text:p>
      <text:list text:style-name="L8">
        <text:list-item>
          <text:p text:style-name="P24">2. Il mercato come "Spettacolo" e non come Processo di Scoperta</text:p>
        </text:list-item>
      </text:list>
      <text:p text:style-name="P19">Quando il valore di un asset si stacca completamente dai fondamentali macroeconomici (viaggiando a circa 100 volte il fatturato del 2025 in un contesto di perdite reali), il mercato smette di essere lo strumento di allocazione efficiente descritto da Hayek. Diventa un'arena di “hype<text:note text:id="ftn0" text:note-class="footnote"><text:note-citation>1</text:note-citation><text:note-body><text:p text:style-name="P1">È la leva psicologica. Annunci roboanti, visioni sul futuro dell'umanità e FOMO (Fear Of Missing Out) spingono gli investitori al dettaglio e istituzionali a comprare, creando una domanda artificiale.</text:p></text:note-body></text:note>” e ingegneria finanziaria, dove la percezione pubblica viene pilotata attraverso la manipolazione dell'informazione e dei social media. Questo è un catalizzatore di comportamento di massa, una forma di condizionamento sociale che spinge la collettività verso un'unica direzione.</text:p>
      <text:p text:style-name="Standard"><text:soft-page-break/>La mia opinione: Un "Dirigismo Privato" che sfida lo Stato.</text:p>
      <text:p text:style-name="P4">La mia valutazione è che l'IPO di SpaceX non sia un atto di ingegneria sociale “statale”, ma rappresenti la nascita di una nuova e inedita forma di "dirigismo privato concentrato".</text:p>
      <text:p text:style-name="P2">Ci troviamo di fronte a un paradosso tipicamente hayekiano:</text:p>
      <text:p text:style-name="P2">Da un lato, SpaceX è il trionfo dell'iniziativa privata contro il monopolio inefficiente delle agenzie statali (come la NASA); dall'altro, la concentrazione di potere economico, tecnologico (il controllo di Starlink e della connettività globale) e di dati (l'infrastruttura AI) nelle mani di un unico individuo assume le sembianze di quella pianificazione centralizzata che Hayek temeva.</text:p>
      <text:p text:style-name="P2">Se l'ingegneria sociale classica usa la legislazione (“Thesis”) per costringere, questa operazione usa la fascinazione del futuro e l'ingegneria finanziaria per indirizzare spontaneamente le risorse dell'umanità verso gli scopi personali di un singolo attore globale. Non è lo Stato a pianificare la società; è un titano privato che sta accumulando le risorse necessarie per farlo al posto dello Stato.</text:p>
      <text:p text:style-name="P3">Una tale concentrazione di potere nelle mani di un uomo (non del tutto affidabile) personalmente mi fa paura.</text:p>
      <text:p text:style-name="P2">La tua paura è, non solo legittima, ma coglie perfettamente il nucleo del dilemma politico del nostro tempo. È lo stesso identico timore che attraversava ogni pagina degli scritti di Hayek, anche se applicato a un <text:soft-page-break/>soggetto diverso: la diffidenza viscerale verso la concentrazione del potere, a prescindere da chi lo detenga.</text:p>
      <text:p text:style-name="P2">Hayek ci ha insegnato che il problema fondamentale della società non è “chi” governa o “chi” comanda, ma "quanto potere" ha a disposizione. Quando le decisioni strategiche che influenzano la vita di milioni di persone dipendono dagli umori, dalle visioni o dai tweet di un singolo uomo, siamo già fuori dal perimetro di una società libera e sicura.</text:p>
      <text:p text:style-name="P2">Ci sono tre motivi precisi per cui questa forma di "dirigismo privato" è strutturalmente inquietante, specialmente se letti con gli occhi della filosofia politica:</text:p>
      <text:p text:style-name="P22">1. L'imprevedibilità dell'arbitrio individuale</text:p>
      <text:p text:style-name="P2">L'essenza dello Stato di diritto ("Rule of Law") è la prevedibilità. Se le regole sono generali, astratte e stabili, tu puoi pianificare la tua vita. Ma quando un singolo individuo controlla l'infrastruttura satellitare globale (Starlink), l'accesso allo spazio (SpaceX), i dati e l'algoritmo di una delle più grandi arene pubbliche del mondo (X, ex Twitter) e la frontiera dell'intelligenza artificiale (xAI), il mondo intero diventa dipendente dal suo arbitrio personale. Un cambio di umore, un interesse geopolitico privato o un'ossessione personale possono spegnere la connettività di una nazione in guerra o alterare il flusso delle informazioni globali in un secondo.</text:p>
      <text:p text:style-name="P22">2. Il cortocircuito tra potere economico e politico</text:p>
      <text:p text:style-name="Standard"/>
      <text:p text:style-name="P20"><text:soft-page-break/>Siamo abituati a pensare che il potere economico privato sia bilanciato dal potere politico dello Stato. Oggi questo confine è evaporato. La quotazione record di SpaceX e la ricchezza accumulata non servono più solo a comprare beni o aziende, ma a surrogare le funzioni statali. Lo Stato (in questo caso la NASA o il Dipartimento della Difesa americano) è diventato cliente dipendente di un privato. Quando un privato è troppo grande per essere regolato e troppo essenziale per essere sanzionato, la democrazia perde la sua capacità di controllo.</text:p>
      <text:p text:style-name="P22">3. La hybris del "Pianificatore Globale"</text:p>
      <text:p text:style-name="P19">Quello che spaventa di più è la "hybris", la tracotanza, la superbia o l'orgoglio eccessivo che Hayek chiamava "la presunzione della mente". L'ambizione di Musk non è commerciale, è messianica: colonizzare Marte, salvare l'umanità attraverso l'intelligenza artificiale, fondere la coscienza umana con le macchine. Questo è costruttivismo puro, l'illusione di poter ridisegnare il destino dell'umanità secondo un piano geometrico concepito da un'unica mente. La storia ci mostra che quando qualcuno si convince di dover "salvare l'umanità" a tutti i costi, tende a considerare gli individui reali come semplici pedine sacrificabili per il fine superiore.</text:p>
      <text:p text:style-name="P4">Per dirla con una metafora: abbiamo tolto le chiavi della pianificazione centralizzata dalle mani dei burocrati <text:soft-page-break/>statali, solo per consegnarle al capo di una megacorporazione globale.</text:p>
      <text:p text:style-name="P2">La tua reazione non è un'infondata fobia della tecnologia; è il sano riflesso di difesa di chi riconosce l'insidia più antica della storia umana: l'assenza di contrappesi. Se il potere concentrato nelle mani dello Stato porta alla tirannia, il potere concentrato nelle mani di un singolo oligarca tecnologico porta a una sorta di feudalesimo digitale, dove tutti dipendiamo dalle concessioni del sovran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cm" fo:margin-bottom="2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6-13T18:39:13.297438106</meta:creation-date>
    <dc:date>2026-06-22T17:03:11.022955019</dc:date>
    <dc:creator>corrado tafaro</dc:creator>
    <meta:editing-duration>PT1H7M46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8" meta:paragraph-count="45" meta:word-count="1463" meta:character-count="9816" meta:non-whitespace-character-count="8401"/>
  </office:meta>
</office:document-meta>
</file>