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Noto Serif1" svg:font-family="'Noto Serif'" style:font-adornments="Normale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note">
      <style:paragraph-properties fo:text-align="justify" style:justify-single-word="false"/>
      <style:text-properties style:font-name="Noto Sans1" officeooo:rsid="00a0b65a" officeooo:paragraph-rsid="00a0b65a"/>
    </style:style>
    <style:style style:name="P2" style:family="paragraph" style:parent-style-name="Footnote">
      <style:paragraph-properties fo:text-align="justify" style:justify-single-word="false"/>
      <style:text-properties style:font-name="Noto Sans1"/>
    </style:style>
    <style:style style:name="P3" style:family="paragraph" style:parent-style-name="Footnote">
      <style:paragraph-properties fo:text-align="justify" style:justify-single-word="false"/>
      <style:text-properties style:font-name="Noto Sans1" fo:font-size="9pt" style:font-size-asian="9pt" style:font-size-complex="9pt"/>
    </style:style>
    <style:style style:name="P4" style:family="paragraph" style:parent-style-name="Footnote">
      <style:paragraph-properties fo:text-align="justify" style:justify-single-word="false"/>
      <style:text-properties style:font-name="Noto Sans1" fo:font-size="9pt" officeooo:rsid="0012949f" officeooo:paragraph-rsid="0012949f" style:font-size-asian="9pt" style:font-size-complex="9pt"/>
    </style:style>
    <style:style style:name="P5" style:family="paragraph" style:parent-style-name="Footnote">
      <style:text-properties style:font-name="Noto Sans1" fo:font-size="9pt" officeooo:rsid="0227752e" officeooo:paragraph-rsid="0227752e" style:font-size-asian="9pt" style:font-size-complex="9pt"/>
    </style:style>
    <style:style style:name="P6" style:family="paragraph" style:parent-style-name="Footnote">
      <style:paragraph-properties fo:text-align="justify" style:justify-single-word="false"/>
      <style:text-properties style:font-name="Noto Sans1" fo:font-size="9pt" officeooo:rsid="0027935f" officeooo:paragraph-rsid="0027935f" style:font-size-asian="9pt" style:font-size-complex="9pt"/>
    </style:style>
    <style:style style:name="P7" style:family="paragraph" style:parent-style-name="Footnote">
      <style:text-properties style:font-name="Noto Sans1" officeooo:rsid="000f8dec" officeooo:paragraph-rsid="000f8dec"/>
    </style:style>
    <style:style style:name="P8" style:family="paragraph" style:parent-style-name="Heading_20_3" style:master-page-name="">
      <style:paragraph-properties style:page-number="auto"/>
      <style:text-properties style:font-name="Noto Sans1" fo:font-size="14pt" fo:font-weight="normal" officeooo:paragraph-rsid="00172c54" style:font-size-asian="14pt" style:font-weight-asian="normal" style:font-size-complex="14pt" style:font-weight-complex="normal"/>
    </style:style>
    <style:style style:name="P9" style:family="paragraph" style:parent-style-name="Quotations" style:list-style-name="L4">
      <loext:graphic-properties draw:fill="none"/>
      <style:paragraph-properties fo:margin-top="0.199cm" fo:margin-bottom="0cm" style:contextual-spacing="false" fo:line-height="115%" fo:text-align="justify" style:justify-single-word="false" fo:background-color="transparent"/>
      <style:text-properties officeooo:paragraph-rsid="00172c54"/>
    </style:style>
    <style:style style:name="P10" style:family="paragraph" style:parent-style-name="Quotations" style:master-page-name="">
      <loext:graphic-properties draw:fill="none"/>
      <style:paragraph-properties fo:margin-left="0cm" fo:margin-right="0cm" fo:margin-top="0.199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officeooo:paragraph-rsid="00172c54"/>
    </style:style>
    <style:style style:name="P11" style:family="paragraph" style:parent-style-name="Quotations">
      <loext:graphic-properties draw:fill="none"/>
      <style:paragraph-properties fo:margin-left="0cm" fo:margin-right="0cm" fo:margin-top="0.199cm" fo:margin-bottom="0cm" style:contextual-spacing="false" fo:line-height="115%" fo:text-align="justify" style:justify-single-word="false" fo:text-indent="0cm" style:auto-text-indent="false" fo:background-color="transparent"/>
      <style:text-properties officeooo:paragraph-rsid="00172c54"/>
    </style:style>
    <style:style style:name="P12" style:family="paragraph" style:parent-style-name="Quotations" style:master-page-name="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officeooo:paragraph-rsid="00172c54"/>
    </style:style>
    <style:style style:name="P13" style:family="paragraph" style:parent-style-name="Quotations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officeooo:paragraph-rsid="00172c54"/>
    </style:style>
    <style:style style:name="P14" style:family="paragraph" style:parent-style-name="Quotations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officeooo:paragraph-rsid="00172c54"/>
    </style:style>
    <style:style style:name="P15" style:family="paragraph" style:parent-style-name="Quotations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officeooo:paragraph-rsid="00172c54"/>
    </style:style>
    <style:style style:name="P16" style:family="paragraph" style:parent-style-name="Quotations" style:master-page-name="">
      <loext:graphic-properties draw:fill="none"/>
      <style:paragraph-properties fo:margin-left="0cm" fo:margin-right="0cm" fo:margin-top="0.199cm" fo:margin-bottom="0.199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fo:font-style="italic" fo:font-weight="normal" officeooo:rsid="001461e0" officeooo:paragraph-rsid="00172c54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line-height="115%" fo:text-align="justify" style:justify-single-word="false"/>
    </style:style>
    <style:style style:name="P18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officeooo:paragraph-rsid="00172c54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officeooo:paragraph-rsid="00172c54"/>
    </style:style>
    <style:style style:name="P20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officeooo:paragraph-rsid="001543ef" style:font-size-asian="12pt" style:font-size-complex="12pt"/>
    </style:style>
    <style:style style:name="P21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officeooo:paragraph-rsid="001543ef" style:font-size-asian="12pt" style:font-size-complex="12pt"/>
    </style:style>
    <style:style style:name="P22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officeooo:paragraph-rsid="001543ef" style:font-size-asian="12pt" style:font-size-complex="12pt"/>
    </style:style>
    <style:style style:name="P23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officeooo:paragraph-rsid="001543ef" style:font-size-asian="12pt" style:font-size-complex="12pt"/>
    </style:style>
    <style:style style:name="P24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2pt" officeooo:paragraph-rsid="0016b592" style:font-size-asian="12pt" style:font-size-complex="12pt"/>
    </style:style>
    <style:style style:name="P25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officeooo:paragraph-rsid="0016b592" style:font-size-asian="12pt" style:font-size-complex="12pt"/>
    </style:style>
    <style:style style:name="P26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officeooo:paragraph-rsid="0016b592" style:font-size-asian="12pt" style:font-size-complex="12pt"/>
    </style:style>
    <style:style style:name="P27" style:family="paragraph" style:parent-style-name="Standard" style:list-style-name="L3">
      <style:paragraph-properties fo:margin-top="0.101cm" fo:margin-bottom="0cm" style:contextual-spacing="false" fo:line-height="115%" fo:text-align="justify" style:justify-single-word="false"/>
      <style:text-properties style:font-name="Noto Sans1" fo:font-size="12pt" officeooo:paragraph-rsid="0016b592" style:font-size-asian="12pt" style:font-size-complex="12pt"/>
    </style:style>
    <style:style style:name="P28" style:family="paragraph" style:parent-style-name="Standard" style:master-page-name="">
      <style:paragraph-properties fo:margin-top="0.199cm" fo:margin-bottom="0cm" style:contextual-spacing="false" fo:line-height="115%" fo:text-align="justify" style:justify-single-word="false" style:page-number="auto"/>
      <style:text-properties style:font-name="Noto Sans1" fo:font-size="12pt" officeooo:paragraph-rsid="00172c54" style:font-size-asian="12pt" style:font-size-complex="12pt"/>
    </style:style>
    <style:style style:name="P29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officeooo:paragraph-rsid="00172c54" style:font-size-asian="12pt" style:font-size-complex="12pt"/>
    </style:style>
    <style:style style:name="P30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officeooo:rsid="00187752" officeooo:paragraph-rsid="001543ef" style:font-size-asian="12pt" style:font-size-complex="12pt"/>
    </style:style>
    <style:style style:name="P31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officeooo:rsid="00187752" officeooo:paragraph-rsid="001543ef" style:font-size-asian="12pt" style:font-size-complex="12pt"/>
    </style:style>
    <style:style style:name="P32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officeooo:rsid="00187752" officeooo:paragraph-rsid="001543ef" style:font-size-asian="12pt" style:font-size-complex="12pt"/>
    </style:style>
    <style:style style:name="P33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officeooo:rsid="00187752" officeooo:paragraph-rsid="001543ef" style:font-size-asian="12pt" style:font-size-complex="12pt"/>
    </style:style>
    <style:style style:name="P34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officeooo:rsid="00187752" officeooo:paragraph-rsid="001543ef" style:font-size-asian="12pt" style:font-size-complex="12pt"/>
    </style:style>
    <style:style style:name="P35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officeooo:rsid="00187752" officeooo:paragraph-rsid="001543ef" style:font-size-asian="12pt" style:font-size-complex="12pt"/>
    </style:style>
    <style:style style:name="P36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officeooo:rsid="00187752" officeooo:paragraph-rsid="0016b592" style:font-size-asian="12pt" style:font-size-complex="12pt"/>
    </style:style>
    <style:style style:name="P37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officeooo:rsid="00187752" officeooo:paragraph-rsid="0016b592" style:font-size-asian="12pt" style:font-size-complex="12pt"/>
    </style:style>
    <style:style style:name="P38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officeooo:rsid="00187752" officeooo:paragraph-rsid="0016b592" style:font-size-asian="12pt" style:font-size-complex="12pt"/>
    </style:style>
    <style:style style:name="P39" style:family="paragraph" style:parent-style-name="Standard" style:list-style-name="L1">
      <style:paragraph-properties fo:margin-top="0.199cm" fo:margin-bottom="0cm" style:contextual-spacing="false" fo:line-height="115%" fo:text-align="justify" style:justify-single-word="false"/>
      <style:text-properties style:font-name="Noto Sans1" fo:font-size="12pt" officeooo:rsid="00187752" officeooo:paragraph-rsid="0016b592" style:font-size-asian="12pt" style:font-size-complex="12pt"/>
    </style:style>
    <style:style style:name="P40" style:family="paragraph" style:parent-style-name="Standard" style:list-style-name="L3">
      <style:paragraph-properties fo:margin-top="0.199cm" fo:margin-bottom="0cm" style:contextual-spacing="false" fo:line-height="115%" fo:text-align="justify" style:justify-single-word="false"/>
      <style:text-properties style:font-name="Noto Sans1" fo:font-size="12pt" officeooo:rsid="00187752" officeooo:paragraph-rsid="0016b592" style:font-size-asian="12pt" style:font-size-complex="12pt"/>
    </style:style>
    <style:style style:name="P41" style:family="paragraph" style:parent-style-name="Standard" style:list-style-name="L3">
      <style:paragraph-properties fo:margin-top="0.101cm" fo:margin-bottom="0cm" style:contextual-spacing="false" fo:line-height="115%" fo:text-align="justify" style:justify-single-word="false"/>
      <style:text-properties style:font-name="Noto Sans1" fo:font-size="12pt" officeooo:rsid="00187752" officeooo:paragraph-rsid="0016b592" style:font-size-asian="12pt" style:font-size-complex="12pt"/>
    </style:style>
    <style:style style:name="P42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officeooo:rsid="00677c9d" officeooo:paragraph-rsid="001543ef" style:font-size-asian="12pt" style:font-size-complex="12pt"/>
    </style:style>
    <style:style style:name="P43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officeooo:rsid="0068feb1" officeooo:paragraph-rsid="001543ef" style:font-size-asian="12pt" style:font-size-complex="12pt"/>
    </style:style>
    <style:style style:name="P44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.499cm" style:auto-text-indent="false" fo:background-color="transparent"/>
      <style:text-properties style:font-name="Noto Sans1" fo:font-size="12pt" officeooo:rsid="007b4dc3" officeooo:paragraph-rsid="001543ef" style:font-size-asian="12pt" style:font-size-complex="12pt"/>
    </style:style>
    <style:style style:name="P45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officeooo:rsid="007b4dc3" officeooo:paragraph-rsid="001543ef" style:font-size-asian="12pt" style:font-size-complex="12pt"/>
    </style:style>
    <style:style style:name="P46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officeooo:rsid="007b4dc3" officeooo:paragraph-rsid="001543ef" style:font-size-asian="12pt" style:font-size-complex="12pt"/>
    </style:style>
    <style:style style:name="P47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officeooo:rsid="007b4dc3" officeooo:paragraph-rsid="001543ef" style:font-size-asian="12pt" style:font-size-complex="12pt"/>
    </style:style>
    <style:style style:name="P48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officeooo:rsid="00979b03" officeooo:paragraph-rsid="0016b592" style:font-size-asian="12pt" style:font-size-complex="12pt"/>
    </style:style>
    <style:style style:name="P49" style:family="paragraph" style:parent-style-name="Standard" style:list-style-name="L3">
      <style:paragraph-properties fo:margin-top="0.101cm" fo:margin-bottom="0cm" style:contextual-spacing="false" fo:line-height="115%" fo:text-align="justify" style:justify-single-word="false"/>
      <style:text-properties style:font-name="Noto Sans1" fo:font-size="12pt" officeooo:rsid="00922438" officeooo:paragraph-rsid="0016b592" style:font-size-asian="12pt" style:font-size-complex="12pt"/>
    </style:style>
    <style:style style:name="P50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style:font-name="Noto Sans1" fo:font-size="12pt" officeooo:rsid="00922438" officeooo:paragraph-rsid="0016b592" style:font-size-asian="12pt" style:font-size-complex="12pt"/>
    </style:style>
    <style:style style:name="P51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officeooo:rsid="00922438" officeooo:paragraph-rsid="0016b592" style:font-size-asian="12pt" style:font-size-complex="12pt"/>
    </style:style>
    <style:style style:name="P52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officeooo:rsid="00922438" officeooo:paragraph-rsid="0016b592" style:font-size-asian="12pt" style:font-size-complex="12pt"/>
    </style:style>
    <style:style style:name="P53" style:family="paragraph" style:parent-style-name="Standard">
      <style:text-properties style:font-name="Noto Sans1" fo:font-size="12pt" officeooo:paragraph-rsid="00172c54" style:font-size-asian="12pt" style:font-size-complex="12pt"/>
    </style:style>
    <style:style style:name="P54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officeooo:rsid="0005cc21" officeooo:paragraph-rsid="00172c54" style:font-size-asian="12pt" style:font-size-complex="12pt"/>
    </style:style>
    <style:style style:name="P55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officeooo:rsid="0005cc21" officeooo:paragraph-rsid="00172c54" style:font-size-asian="12pt" style:font-size-complex="12pt"/>
    </style:style>
    <style:style style:name="P56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officeooo:rsid="0005cc21" officeooo:paragraph-rsid="00172c54" style:font-size-asian="12pt" style:font-size-complex="12pt"/>
    </style:style>
    <style:style style:name="P57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officeooo:rsid="0012949f" officeooo:paragraph-rsid="00172c54" style:font-size-asian="12pt" style:font-size-complex="12pt"/>
    </style:style>
    <style:style style:name="P58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officeooo:rsid="00078d9f" officeooo:paragraph-rsid="00172c54" style:font-size-asian="12pt" style:font-size-complex="12pt"/>
    </style:style>
    <style:style style:name="P59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officeooo:rsid="00078d9f" officeooo:paragraph-rsid="00172c54" style:font-size-asian="12pt" style:font-size-complex="12pt"/>
    </style:style>
    <style:style style:name="P60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officeooo:rsid="00078d9f" officeooo:paragraph-rsid="00172c54" style:font-size-asian="12pt" style:font-size-complex="12pt"/>
    </style:style>
    <style:style style:name="P61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officeooo:rsid="000f8dec" officeooo:paragraph-rsid="00172c54" style:font-size-asian="12pt" style:font-size-complex="12pt"/>
    </style:style>
    <style:style style:name="P62" style:family="paragraph" style:parent-style-name="Standard">
      <style:paragraph-properties fo:margin-top="0.3cm" fo:margin-bottom="0cm" style:contextual-spacing="false" fo:line-height="115%" fo:text-align="justify" style:justify-single-word="false"/>
      <style:text-properties style:font-name="Noto Sans1" fo:font-size="12pt" officeooo:rsid="000f8dec" officeooo:paragraph-rsid="00172c54" style:font-size-asian="12pt" style:font-size-complex="12pt"/>
    </style:style>
    <style:style style:name="P63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officeooo:rsid="0078967e" officeooo:paragraph-rsid="001543ef" style:font-size-asian="12pt" style:font-style-asian="normal" style:font-size-complex="12pt" style:font-style-complex="normal"/>
    </style:style>
    <style:style style:name="P64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officeooo:rsid="007a8df3" officeooo:paragraph-rsid="001543ef" style:font-size-asian="12pt" style:font-style-asian="normal" style:font-size-complex="12pt" style:font-style-complex="normal"/>
    </style:style>
    <style:style style:name="P65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style="normal" officeooo:rsid="007b4dc3" officeooo:paragraph-rsid="001543ef" style:font-size-asian="12pt" style:font-style-asian="normal" style:font-size-complex="12pt" style:font-style-complex="normal"/>
    </style:style>
    <style:style style:name="P66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weight="normal" officeooo:paragraph-rsid="00172c54" style:font-size-asian="12pt" style:font-weight-asian="normal" style:font-size-complex="12pt" style:font-weight-complex="normal"/>
    </style:style>
    <style:style style:name="P67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fo:font-weight="normal" officeooo:paragraph-rsid="00172c54" style:font-size-asian="12pt" style:font-weight-asian="normal" style:font-size-complex="12pt" style:font-weight-complex="normal"/>
    </style:style>
    <style:style style:name="P68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fo:font-weight="normal" officeooo:paragraph-rsid="00172c54" style:font-size-asian="12pt" style:font-weight-asian="normal" style:font-size-complex="12pt" style:font-weight-complex="normal"/>
    </style:style>
    <style:style style:name="P69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fo:font-weight="normal" officeooo:paragraph-rsid="00172c54" style:font-size-asian="12pt" style:font-weight-asian="normal" style:font-size-complex="12pt" style:font-weight-complex="normal"/>
    </style:style>
    <style:style style:name="P70" style:family="paragraph" style:parent-style-name="Standard" style:master-page-name="">
      <loext:graphic-properties draw:fill="none"/>
      <style:paragraph-properties fo:margin-left="0cm" fo:margin-right="0cm" fo:margin-top="0.199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Noto Sans1" fo:font-size="12pt" fo:font-weight="normal" officeooo:paragraph-rsid="00172c54" style:font-size-asian="12pt" style:font-weight-asian="normal" style:font-size-complex="12pt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2pt" fo:font-weight="normal" officeooo:rsid="001461e0" officeooo:paragraph-rsid="00172c54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Noto Sans1" fo:font-size="12pt" fo:font-weight="bold" officeooo:paragraph-rsid="00172c54" style:font-size-asian="12pt" style:font-weight-asian="bold" style:font-size-complex="12pt" style:font-weight-complex="bold"/>
    </style:style>
    <style:style style:name="P73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4pt" officeooo:paragraph-rsid="001543ef" style:font-size-asian="14pt" style:font-size-complex="14pt"/>
    </style:style>
    <style:style style:name="P74" style:family="paragraph" style:parent-style-name="Standard">
      <style:paragraph-properties fo:margin-top="0.101cm" fo:margin-bottom="0cm" style:contextual-spacing="false"/>
      <style:text-properties style:font-name="Noto Sans1" fo:font-size="14pt" officeooo:paragraph-rsid="00172c54" style:font-size-asian="14pt" style:font-size-complex="14pt"/>
    </style:style>
    <style:style style:name="P75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style:font-name="Noto Sans1" fo:font-size="14pt" fo:font-weight="normal" officeooo:paragraph-rsid="00172c54" style:font-size-asian="14pt" style:font-weight-asian="normal" style:font-size-complex="14pt" style:font-weight-complex="normal"/>
    </style:style>
    <style:style style:name="P76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0pt" fo:font-weight="bold" officeooo:paragraph-rsid="00172c54" style:font-size-asian="10pt" style:font-weight-asian="bold" style:font-size-complex="10pt" style:font-weight-complex="bold"/>
    </style:style>
    <style:style style:name="P77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0pt" officeooo:rsid="00078d9f" officeooo:paragraph-rsid="00172c54" style:font-size-asian="10pt" style:font-size-complex="10pt"/>
    </style:style>
    <style:style style:name="P78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style:font-name="Noto Sans1" fo:font-size="10pt" officeooo:rsid="00078d9f" officeooo:paragraph-rsid="00172c54" style:font-size-asian="10pt" style:font-size-complex="10pt"/>
    </style:style>
    <style:style style:name="P79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style:font-name="Noto Sans1" fo:font-size="10pt" officeooo:rsid="00078d9f" officeooo:paragraph-rsid="00172c54" style:font-size-asian="10pt" style:font-size-complex="10pt"/>
    </style:style>
    <style:style style:name="P80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0pt" officeooo:rsid="00078d9f" officeooo:paragraph-rsid="00172c54" style:font-size-asian="10pt" style:font-size-complex="10pt"/>
    </style:style>
    <style:style style:name="T1" style:family="text">
      <style:text-properties style:font-name="Noto Sans1"/>
    </style:style>
    <style:style style:name="T2" style:family="text">
      <style:text-properties style:font-name="Noto Sans1" fo:font-style="italic" style:font-style-asian="italic" style:font-style-complex="italic"/>
    </style:style>
    <style:style style:name="T3" style:family="text">
      <style:text-properties style:font-name="Noto Sans1" fo:font-style="italic" officeooo:rsid="0010a83a" style:font-style-asian="italic" style:font-style-complex="italic"/>
    </style:style>
    <style:style style:name="T4" style:family="text">
      <style:text-properties style:font-name="Noto Sans1" fo:font-style="italic" officeooo:rsid="0027935f" style:font-style-asian="italic" style:font-style-complex="italic"/>
    </style:style>
    <style:style style:name="T5" style:family="text">
      <style:text-properties style:font-name="Noto Sans1" fo:font-size="12pt" fo:font-style="normal" fo:font-weight="normal" officeooo:rsid="025f87ad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Noto Sans1" fo:font-size="12pt" fo:font-style="normal" officeooo:rsid="00187752" style:font-size-asian="12pt" style:font-style-asian="normal" style:font-size-complex="12pt" style:font-style-complex="normal"/>
    </style:style>
    <style:style style:name="T7" style:family="text">
      <style:text-properties style:font-name="Noto Sans1" fo:font-size="12pt" fo:font-style="normal" officeooo:rsid="0010a83a" style:font-size-asian="12pt" style:font-style-asian="normal" style:font-size-complex="12pt" style:font-style-complex="normal"/>
    </style:style>
    <style:style style:name="T8" style:family="text">
      <style:text-properties style:font-name="Noto Sans1" fo:font-size="12pt" fo:font-style="normal" officeooo:rsid="0012949f" style:font-size-asian="12pt" style:font-style-asian="normal" style:font-size-complex="12pt" style:font-style-complex="normal"/>
    </style:style>
    <style:style style:name="T9" style:family="text">
      <style:text-properties style:font-name="Noto Sans1" fo:font-size="12pt" style:font-size-asian="12pt" style:font-size-complex="12pt"/>
    </style:style>
    <style:style style:name="T10" style:family="text">
      <style:text-properties style:font-name="Noto Sans1" fo:font-size="12pt" officeooo:rsid="0040f61e" style:font-size-asian="12pt" style:font-size-complex="12pt"/>
    </style:style>
    <style:style style:name="T11" style:family="text">
      <style:text-properties style:font-name="Noto Sans1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font-name="Noto Sans1" fo:font-size="12pt" fo:font-weight="normal" officeooo:rsid="0018b1b7" style:font-size-asian="12pt" style:font-weight-asian="normal" style:font-size-complex="12pt" style:font-weight-complex="normal"/>
    </style:style>
    <style:style style:name="T13" style:family="text">
      <style:text-properties style:font-name="Noto Sans1" fo:font-size="12pt" fo:font-weight="normal" officeooo:rsid="001b16f4" style:font-size-asian="12pt" style:font-weight-asian="normal" style:font-size-complex="12pt" style:font-weight-complex="normal"/>
    </style:style>
    <style:style style:name="T14" style:family="text">
      <style:text-properties style:font-name="Noto Sans1" fo:font-size="12pt" fo:font-weight="normal" officeooo:rsid="00294116" style:font-size-asian="12pt" style:font-weight-asian="normal" style:font-size-complex="12pt" style:font-weight-complex="normal"/>
    </style:style>
    <style:style style:name="T15" style:family="text">
      <style:text-properties style:font-name="Noto Sans1" fo:font-size="12pt" fo:font-weight="normal" officeooo:rsid="0012949f" style:font-size-asian="12pt" style:font-weight-asian="normal" style:font-size-complex="12pt" style:font-weight-complex="normal"/>
    </style:style>
    <style:style style:name="T16" style:family="text">
      <style:text-properties style:font-name="Noto Sans1" fo:font-style="normal" officeooo:rsid="0010a83a" style:font-style-asian="normal" style:font-style-complex="normal"/>
    </style:style>
    <style:style style:name="T17" style:family="text">
      <style:text-properties style:font-name="Noto Sans1" fo:font-style="normal" officeooo:rsid="0012949f" style:font-style-asian="normal" style:font-style-complex="normal"/>
    </style:style>
    <style:style style:name="T18" style:family="text">
      <style:text-properties style:font-name="Noto Sans1" fo:font-style="normal" officeooo:rsid="025f87ad" style:font-style-asian="normal" style:font-style-complex="normal"/>
    </style:style>
    <style:style style:name="T19" style:family="text">
      <style:text-properties style:font-name="Noto Sans1" fo:font-style="normal" officeooo:rsid="00eec7f4" style:font-style-asian="normal" style:font-style-complex="normal"/>
    </style:style>
    <style:style style:name="T20" style:family="text">
      <style:text-properties style:font-name="Noto Sans1" fo:font-style="normal" officeooo:rsid="0018b1b7" style:font-style-asian="normal" style:font-style-complex="normal"/>
    </style:style>
    <style:style style:name="T21" style:family="text">
      <style:text-properties style:font-name="Noto Sans1" officeooo:rsid="00187752"/>
    </style:style>
    <style:style style:name="T22" style:family="text">
      <style:text-properties style:font-name="Noto Sans1" officeooo:rsid="00922438"/>
    </style:style>
    <style:style style:name="T23" style:family="text">
      <style:text-properties style:font-name="Noto Sans1" officeooo:rsid="00078d9f"/>
    </style:style>
    <style:style style:name="T24" style:family="text">
      <style:text-properties style:font-name="Noto Sans1" officeooo:rsid="000f8dec"/>
    </style:style>
    <style:style style:name="T25" style:family="text">
      <style:text-properties style:font-name="Noto Sans1" officeooo:rsid="0018b1b7"/>
    </style:style>
    <style:style style:name="T26" style:family="text">
      <style:text-properties style:font-name="Noto Sans1" officeooo:rsid="001461e0"/>
    </style:style>
    <style:style style:name="T27" style:family="text">
      <style:text-properties style:font-name="Noto Sans1" officeooo:rsid="001b16f4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6a5a49" style:font-style-asian="normal" style:font-style-complex="normal"/>
    </style:style>
    <style:style style:name="T30" style:family="text">
      <style:text-properties fo:font-style="normal" officeooo:rsid="006b2135" style:font-style-asian="normal" style:font-style-complex="normal"/>
    </style:style>
    <style:style style:name="T31" style:family="text">
      <style:text-properties fo:font-style="normal" officeooo:rsid="006cbe1f" style:font-style-asian="normal" style:font-style-complex="normal"/>
    </style:style>
    <style:style style:name="T32" style:family="text">
      <style:text-properties fo:font-style="normal" officeooo:rsid="006d921d" style:font-style-asian="normal" style:font-style-complex="normal"/>
    </style:style>
    <style:style style:name="T33" style:family="text">
      <style:text-properties fo:font-style="normal" officeooo:rsid="00803fa4" style:font-style-asian="normal" style:font-style-complex="normal"/>
    </style:style>
    <style:style style:name="T34" style:family="text">
      <style:text-properties fo:font-style="normal" officeooo:rsid="006f5299" style:font-style-asian="normal" style:font-style-complex="normal"/>
    </style:style>
    <style:style style:name="T35" style:family="text">
      <style:text-properties fo:font-style="normal" officeooo:rsid="00701c62" style:font-style-asian="normal" style:font-style-complex="normal"/>
    </style:style>
    <style:style style:name="T36" style:family="text">
      <style:text-properties fo:font-style="normal" officeooo:rsid="00662632" style:font-style-asian="normal" style:font-style-complex="normal"/>
    </style:style>
    <style:style style:name="T37" style:family="text">
      <style:text-properties fo:font-style="normal" officeooo:rsid="00756491" style:font-style-asian="normal" style:font-style-complex="normal"/>
    </style:style>
    <style:style style:name="T38" style:family="text">
      <style:text-properties fo:font-style="normal" officeooo:rsid="0070bbdf" style:font-style-asian="normal" style:font-style-complex="normal"/>
    </style:style>
    <style:style style:name="T39" style:family="text">
      <style:text-properties fo:font-style="normal" officeooo:rsid="007295dc" style:font-style-asian="normal" style:font-style-complex="normal"/>
    </style:style>
    <style:style style:name="T40" style:family="text">
      <style:text-properties fo:font-style="normal" officeooo:rsid="00734ddb" style:font-style-asian="normal" style:font-style-complex="normal"/>
    </style:style>
    <style:style style:name="T41" style:family="text">
      <style:text-properties fo:font-style="normal" officeooo:rsid="0075f1a0" style:font-style-asian="normal" style:font-style-complex="normal"/>
    </style:style>
    <style:style style:name="T42" style:family="text">
      <style:text-properties fo:font-style="normal" officeooo:rsid="007775cc" style:font-style-asian="normal" style:font-style-complex="normal"/>
    </style:style>
    <style:style style:name="T43" style:family="text">
      <style:text-properties fo:font-style="normal" officeooo:rsid="00805d7d" style:font-style-asian="normal" style:font-style-complex="normal"/>
    </style:style>
    <style:style style:name="T44" style:family="text">
      <style:text-properties fo:font-style="normal" officeooo:rsid="0078967e" style:font-style-asian="normal" style:font-style-complex="normal"/>
    </style:style>
    <style:style style:name="T45" style:family="text">
      <style:text-properties fo:font-style="normal" officeooo:rsid="007a8df3" style:font-style-asian="normal" style:font-style-complex="normal"/>
    </style:style>
    <style:style style:name="T46" style:family="text">
      <style:text-properties fo:font-style="normal" officeooo:rsid="007a9368" style:font-style-asian="normal" style:font-style-complex="normal"/>
    </style:style>
    <style:style style:name="T47" style:family="text">
      <style:text-properties fo:font-style="normal" officeooo:rsid="007b4dc3" style:font-style-asian="normal" style:font-style-complex="normal"/>
    </style:style>
    <style:style style:name="T48" style:family="text">
      <style:text-properties fo:font-style="normal" officeooo:rsid="007d2424" style:font-style-asian="normal" style:font-style-complex="normal"/>
    </style:style>
    <style:style style:name="T49" style:family="text">
      <style:text-properties fo:font-style="normal" officeooo:rsid="007e72c4" style:font-style-asian="normal" style:font-style-complex="normal"/>
    </style:style>
    <style:style style:name="T50" style:family="text">
      <style:text-properties fo:font-style="normal" officeooo:rsid="008213c5" style:font-style-asian="normal" style:font-style-complex="normal"/>
    </style:style>
    <style:style style:name="T51" style:family="text">
      <style:text-properties fo:font-style="normal" officeooo:rsid="007f6797" style:font-style-asian="normal" style:font-style-complex="normal"/>
    </style:style>
    <style:style style:name="T52" style:family="text">
      <style:text-properties fo:font-style="normal" officeooo:rsid="0084804d" style:font-style-asian="normal" style:font-style-complex="normal"/>
    </style:style>
    <style:style style:name="T53" style:family="text">
      <style:text-properties fo:font-style="normal" officeooo:rsid="0084914c" style:font-style-asian="normal" style:font-style-complex="normal"/>
    </style:style>
    <style:style style:name="T54" style:family="text">
      <style:text-properties fo:font-style="normal" officeooo:rsid="0084cfc2" style:font-style-asian="normal" style:font-style-complex="normal"/>
    </style:style>
    <style:style style:name="T55" style:family="text">
      <style:text-properties fo:font-style="normal" officeooo:rsid="0086a161" style:font-style-asian="normal" style:font-style-complex="normal"/>
    </style:style>
    <style:style style:name="T56" style:family="text">
      <style:text-properties fo:font-style="normal" officeooo:rsid="0087f52a" style:font-style-asian="normal" style:font-style-complex="normal"/>
    </style:style>
    <style:style style:name="T57" style:family="text">
      <style:text-properties fo:font-style="normal" officeooo:rsid="0088e032" style:font-style-asian="normal" style:font-style-complex="normal"/>
    </style:style>
    <style:style style:name="T58" style:family="text">
      <style:text-properties fo:font-style="normal" officeooo:rsid="025f87ad" style:font-style-asian="normal" style:font-style-complex="normal"/>
    </style:style>
    <style:style style:name="T59" style:family="text">
      <style:text-properties fo:font-style="normal" officeooo:rsid="0010a83a" style:font-style-asian="normal" style:font-style-complex="normal"/>
    </style:style>
    <style:style style:name="T60" style:family="text">
      <style:text-properties fo:font-style="normal" officeooo:rsid="0012949f" style:font-style-asian="normal" style:font-style-complex="normal"/>
    </style:style>
    <style:style style:name="T61" style:family="text">
      <style:text-properties fo:font-style="normal" officeooo:rsid="00eec7f4" style:font-style-asian="normal" style:font-style-complex="normal"/>
    </style:style>
    <style:style style:name="T62" style:family="text">
      <style:text-properties fo:font-style="normal" officeooo:rsid="0018b1b7" style:font-style-asian="normal" style:font-style-complex="normal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officeooo:rsid="004e4e4e" style:font-style-asian="italic" style:font-style-complex="italic"/>
    </style:style>
    <style:style style:name="T65" style:family="text">
      <style:text-properties fo:font-style="italic" officeooo:rsid="006a5a49" style:font-style-asian="italic" style:font-style-complex="italic"/>
    </style:style>
    <style:style style:name="T66" style:family="text">
      <style:text-properties fo:font-style="italic" officeooo:rsid="0044137e" style:font-style-asian="italic" style:font-style-complex="italic"/>
    </style:style>
    <style:style style:name="T67" style:family="text">
      <style:text-properties fo:font-style="italic" officeooo:rsid="006f5299" style:font-style-asian="italic" style:font-style-complex="italic"/>
    </style:style>
    <style:style style:name="T68" style:family="text">
      <style:text-properties fo:font-style="italic" officeooo:rsid="00805d7d" style:font-style-asian="italic" style:font-style-complex="italic"/>
    </style:style>
    <style:style style:name="T69" style:family="text">
      <style:text-properties fo:font-style="italic" officeooo:rsid="008fc87a" style:font-style-asian="italic" style:font-style-complex="italic"/>
    </style:style>
    <style:style style:name="T70" style:family="text">
      <style:text-properties fo:font-style="italic" officeooo:rsid="000f8dec" style:font-style-asian="italic" style:font-style-complex="italic"/>
    </style:style>
    <style:style style:name="T71" style:family="text">
      <style:text-properties fo:font-style="italic" officeooo:rsid="0010a83a" style:font-style-asian="italic" style:font-style-complex="italic"/>
    </style:style>
    <style:style style:name="T72" style:family="text">
      <style:text-properties fo:font-style="italic" officeooo:rsid="0027935f" style:font-style-asian="italic" style:font-style-complex="italic"/>
    </style:style>
    <style:style style:name="T73" style:family="text">
      <style:text-properties fo:font-size="9pt" style:font-size-asian="9pt" style:font-size-complex="9pt"/>
    </style:style>
    <style:style style:name="T74" style:family="text">
      <style:text-properties fo:font-size="9pt" officeooo:rsid="0015bcdd" style:font-size-asian="9pt" style:font-size-complex="9pt"/>
    </style:style>
    <style:style style:name="T75" style:family="text">
      <style:text-properties fo:font-size="9pt" fo:font-weight="bold" style:font-size-asian="9pt" style:font-weight-asian="bold" style:font-size-complex="9pt" style:font-weight-complex="bold"/>
    </style:style>
    <style:style style:name="T76" style:family="text">
      <style:text-properties fo:font-size="9pt" fo:font-weight="normal" style:font-size-asian="9pt" style:font-weight-asian="normal" style:font-size-complex="9pt" style:font-weight-complex="normal"/>
    </style:style>
    <style:style style:name="T77" style:family="text">
      <style:text-properties fo:font-size="12pt" fo:font-style="normal" fo:font-weight="normal" officeooo:rsid="000f8dec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fo:font-size="12pt" fo:font-style="normal" fo:font-weight="normal" officeooo:rsid="00078d9f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fo:font-size="12pt" fo:font-style="normal" fo:font-weight="normal" officeooo:rsid="025f87ad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fo:font-size="12pt" fo:font-style="normal" officeooo:rsid="00187752" style:font-size-asian="12pt" style:font-style-asian="normal" style:font-size-complex="12pt" style:font-style-complex="normal"/>
    </style:style>
    <style:style style:name="T81" style:family="text">
      <style:text-properties fo:font-size="12pt" fo:font-style="normal" officeooo:rsid="0010a83a" style:font-size-asian="12pt" style:font-style-asian="normal" style:font-size-complex="12pt" style:font-style-complex="normal"/>
    </style:style>
    <style:style style:name="T82" style:family="text">
      <style:text-properties fo:font-size="12pt" fo:font-style="normal" officeooo:rsid="0012949f" style:font-size-asian="12pt" style:font-style-asian="normal" style:font-size-complex="12pt" style:font-style-complex="normal"/>
    </style:style>
    <style:style style:name="T83" style:family="text">
      <style:text-properties fo:font-size="12pt" style:font-size-asian="12pt" style:font-size-complex="12pt"/>
    </style:style>
    <style:style style:name="T84" style:family="text">
      <style:text-properties fo:font-size="12pt" officeooo:rsid="009f6beb" style:font-size-asian="12pt" style:font-size-complex="12pt"/>
    </style:style>
    <style:style style:name="T85" style:family="text">
      <style:text-properties fo:font-size="12pt" officeooo:rsid="00187752" style:font-size-asian="12pt" style:font-size-complex="12pt"/>
    </style:style>
    <style:style style:name="T86" style:family="text">
      <style:text-properties fo:font-size="12pt" officeooo:rsid="01bd5e6c" style:font-size-asian="12pt" style:font-size-complex="12pt"/>
    </style:style>
    <style:style style:name="T87" style:family="text">
      <style:text-properties fo:font-size="12pt" officeooo:rsid="0044137e" style:font-size-asian="12pt" style:font-size-complex="12pt"/>
    </style:style>
    <style:style style:name="T88" style:family="text">
      <style:text-properties fo:font-size="12pt" officeooo:rsid="000ff805" style:font-size-asian="12pt" style:font-size-complex="12pt"/>
    </style:style>
    <style:style style:name="T89" style:family="text">
      <style:text-properties fo:font-size="12pt" officeooo:rsid="000bdd5e" style:font-size-asian="12pt" style:font-size-complex="12pt"/>
    </style:style>
    <style:style style:name="T90" style:family="text">
      <style:text-properties fo:font-size="12pt" officeooo:rsid="00eec7f4" style:font-size-asian="12pt" style:font-size-complex="12pt"/>
    </style:style>
    <style:style style:name="T91" style:family="text">
      <style:text-properties fo:font-size="12pt" officeooo:rsid="0040f61e" style:font-size-asian="12pt" style:font-size-complex="12pt"/>
    </style:style>
    <style:style style:name="T92" style:family="text">
      <style:text-properties fo:font-size="12pt" fo:font-weight="normal" style:font-size-asian="12pt" style:font-weight-asian="normal" style:font-size-complex="12pt" style:font-weight-complex="normal"/>
    </style:style>
    <style:style style:name="T93" style:family="text">
      <style:text-properties fo:font-size="12pt" fo:font-weight="normal" officeooo:rsid="000f8dec" style:font-size-asian="12pt" style:font-weight-asian="normal" style:font-size-complex="12pt" style:font-weight-complex="normal"/>
    </style:style>
    <style:style style:name="T94" style:family="text">
      <style:text-properties fo:font-size="12pt" fo:font-weight="normal" officeooo:rsid="0009d89c" style:font-size-asian="12pt" style:font-weight-asian="normal" style:font-size-complex="12pt" style:font-weight-complex="normal"/>
    </style:style>
    <style:style style:name="T95" style:family="text">
      <style:text-properties fo:font-size="12pt" fo:font-weight="normal" officeooo:rsid="0012949f" style:font-size-asian="12pt" style:font-weight-asian="normal" style:font-size-complex="12pt" style:font-weight-complex="normal"/>
    </style:style>
    <style:style style:name="T96" style:family="text">
      <style:text-properties fo:font-size="12pt" fo:font-weight="normal" officeooo:rsid="00e9a05b" style:font-size-asian="12pt" style:font-weight-asian="normal" style:font-size-complex="12pt" style:font-weight-complex="normal"/>
    </style:style>
    <style:style style:name="T97" style:family="text">
      <style:text-properties fo:font-size="12pt" fo:font-weight="normal" officeooo:rsid="001461e0" style:font-size-asian="12pt" style:font-weight-asian="normal" style:font-size-complex="12pt" style:font-weight-complex="normal"/>
    </style:style>
    <style:style style:name="T98" style:family="text">
      <style:text-properties fo:font-size="12pt" fo:font-weight="normal" officeooo:rsid="00169239" style:font-size-asian="12pt" style:font-weight-asian="normal" style:font-size-complex="12pt" style:font-weight-complex="normal"/>
    </style:style>
    <style:style style:name="T99" style:family="text">
      <style:text-properties fo:font-size="12pt" fo:font-weight="normal" officeooo:rsid="0018b1b7" style:font-size-asian="12pt" style:font-weight-asian="normal" style:font-size-complex="12pt" style:font-weight-complex="normal"/>
    </style:style>
    <style:style style:name="T100" style:family="text">
      <style:text-properties fo:font-size="12pt" fo:font-weight="normal" officeooo:rsid="001b16f4" style:font-size-asian="12pt" style:font-weight-asian="normal" style:font-size-complex="12pt" style:font-weight-complex="normal"/>
    </style:style>
    <style:style style:name="T101" style:family="text">
      <style:text-properties fo:font-size="12pt" fo:font-weight="normal" officeooo:rsid="00294116" style:font-size-asian="12pt" style:font-weight-asian="normal" style:font-size-complex="12pt" style:font-weight-complex="normal"/>
    </style:style>
    <style:style style:name="T102" style:family="text">
      <style:text-properties fo:font-size="11pt" style:text-underline-style="none" fo:font-weight="bold" style:font-size-asian="9.60000038146973pt" style:font-weight-asian="bold" style:font-size-complex="11pt" style:font-weight-complex="bold"/>
    </style:style>
    <style:style style:name="T103" style:family="text">
      <style:text-properties fo:font-size="14pt" officeooo:rsid="00187752" style:font-size-asian="14pt" style:font-size-complex="14pt"/>
    </style:style>
    <style:style style:name="T104" style:family="text">
      <style:text-properties fo:font-size="14pt" officeooo:rsid="00a28f32" style:font-size-asian="14pt" style:font-size-complex="14pt"/>
    </style:style>
    <style:style style:name="T105" style:family="text">
      <style:text-properties officeooo:rsid="009f6beb"/>
    </style:style>
    <style:style style:name="T106" style:family="text">
      <style:text-properties officeooo:rsid="00187752"/>
    </style:style>
    <style:style style:name="T107" style:family="text">
      <style:text-properties officeooo:rsid="01bd5e6c"/>
    </style:style>
    <style:style style:name="T108" style:family="text">
      <style:text-properties officeooo:rsid="005d5d5c"/>
    </style:style>
    <style:style style:name="T109" style:family="text">
      <style:text-properties officeooo:rsid="004fc931"/>
    </style:style>
    <style:style style:name="T110" style:family="text">
      <style:text-properties officeooo:rsid="02bc8361"/>
    </style:style>
    <style:style style:name="T111" style:family="text">
      <style:text-properties officeooo:rsid="00542848"/>
    </style:style>
    <style:style style:name="T112" style:family="text">
      <style:text-properties officeooo:rsid="0051b186"/>
    </style:style>
    <style:style style:name="T113" style:family="text">
      <style:text-properties officeooo:rsid="00554ec0"/>
    </style:style>
    <style:style style:name="T114" style:family="text">
      <style:text-properties fo:font-weight="normal" style:font-weight-asian="normal" style:font-weight-complex="normal"/>
    </style:style>
    <style:style style:name="T115" style:family="text">
      <style:text-properties fo:font-weight="normal" officeooo:rsid="000f8dec" style:font-weight-asian="normal" style:font-weight-complex="normal"/>
    </style:style>
    <style:style style:name="T116" style:family="text">
      <style:text-properties fo:font-weight="normal" officeooo:rsid="0009d89c" style:font-weight-asian="normal" style:font-weight-complex="normal"/>
    </style:style>
    <style:style style:name="T117" style:family="text">
      <style:text-properties fo:font-weight="normal" officeooo:rsid="0012949f" style:font-weight-asian="normal" style:font-weight-complex="normal"/>
    </style:style>
    <style:style style:name="T118" style:family="text">
      <style:text-properties fo:font-weight="normal" officeooo:rsid="00e9a05b" style:font-weight-asian="normal" style:font-weight-complex="normal"/>
    </style:style>
    <style:style style:name="T119" style:family="text">
      <style:text-properties fo:font-weight="normal" officeooo:rsid="001461e0" style:font-weight-asian="normal" style:font-weight-complex="normal"/>
    </style:style>
    <style:style style:name="T120" style:family="text">
      <style:text-properties fo:font-weight="normal" officeooo:rsid="0018b1b7" style:font-weight-asian="normal" style:font-weight-complex="normal"/>
    </style:style>
    <style:style style:name="T121" style:family="text">
      <style:text-properties fo:font-weight="normal" officeooo:rsid="001b16f4" style:font-weight-asian="normal" style:font-weight-complex="normal"/>
    </style:style>
    <style:style style:name="T122" style:family="text">
      <style:text-properties fo:font-weight="normal" officeooo:rsid="00294116" style:font-weight-asian="normal" style:font-weight-complex="normal"/>
    </style:style>
    <style:style style:name="T123" style:family="text">
      <style:text-properties fo:font-weight="normal" officeooo:rsid="00169239" style:font-weight-asian="normal" style:font-weight-complex="normal"/>
    </style:style>
    <style:style style:name="T124" style:family="text">
      <style:text-properties officeooo:rsid="0057e5a9"/>
    </style:style>
    <style:style style:name="T125" style:family="text">
      <style:text-properties officeooo:rsid="00749ab6"/>
    </style:style>
    <style:style style:name="T126" style:family="text">
      <style:text-properties officeooo:rsid="005eed54"/>
    </style:style>
    <style:style style:name="T127" style:family="text">
      <style:text-properties officeooo:rsid="005f5dae"/>
    </style:style>
    <style:style style:name="T128" style:family="text">
      <style:text-properties officeooo:rsid="005f7867"/>
    </style:style>
    <style:style style:name="T129" style:family="text">
      <style:text-properties officeooo:rsid="00a27fcb"/>
    </style:style>
    <style:style style:name="T130" style:family="text">
      <style:text-properties officeooo:rsid="00677c9d"/>
    </style:style>
    <style:style style:name="T131" style:family="text">
      <style:text-properties officeooo:rsid="005e7cb2"/>
    </style:style>
    <style:style style:name="T132" style:family="text">
      <style:text-properties officeooo:rsid="0068feb1"/>
    </style:style>
    <style:style style:name="T133" style:family="text">
      <style:text-properties officeooo:rsid="0094e117"/>
    </style:style>
    <style:style style:name="T134" style:family="text">
      <style:text-properties officeooo:rsid="006a5a49"/>
    </style:style>
    <style:style style:name="T135" style:family="text">
      <style:text-properties officeooo:rsid="0044137e"/>
    </style:style>
    <style:style style:name="T136" style:family="text">
      <style:text-properties style:font-name="Noto Sans1"/>
    </style:style>
    <style:style style:name="T137" style:family="text">
      <style:text-properties style:font-name="Noto Sans1" fo:font-style="normal" officeooo:rsid="00187752" style:font-style-asian="normal" style:font-style-complex="normal"/>
    </style:style>
    <style:style style:name="T138" style:family="text">
      <style:text-properties style:font-name="Noto Sans1" fo:font-style="normal" officeooo:rsid="025f87ad" style:font-style-asian="normal" style:font-style-complex="normal"/>
    </style:style>
    <style:style style:name="T139" style:family="text">
      <style:text-properties style:font-name="Noto Sans1" fo:font-style="normal" officeooo:rsid="0010a83a" style:font-style-asian="normal" style:font-style-complex="normal"/>
    </style:style>
    <style:style style:name="T140" style:family="text">
      <style:text-properties style:font-name="Noto Sans1" fo:font-style="normal" officeooo:rsid="0012949f" style:font-style-asian="normal" style:font-style-complex="normal"/>
    </style:style>
    <style:style style:name="T141" style:family="text">
      <style:text-properties style:font-name="Noto Sans1" fo:font-style="normal" officeooo:rsid="00eec7f4" style:font-style-asian="normal" style:font-style-complex="normal"/>
    </style:style>
    <style:style style:name="T142" style:family="text">
      <style:text-properties style:font-name="Noto Sans1" fo:font-style="normal" officeooo:rsid="0018b1b7" style:font-style-asian="normal" style:font-style-complex="normal"/>
    </style:style>
    <style:style style:name="T143" style:family="text">
      <style:text-properties style:font-name="Noto Sans1" fo:font-style="normal" fo:font-weight="normal" officeooo:rsid="000f8dec" style:font-style-asian="normal" style:font-weight-asian="normal" style:font-style-complex="normal" style:font-weight-complex="normal"/>
    </style:style>
    <style:style style:name="T144" style:family="text">
      <style:text-properties style:font-name="Noto Sans1" fo:font-style="normal" fo:font-weight="normal" officeooo:rsid="00078d9f" style:font-style-asian="normal" style:font-weight-asian="normal" style:font-style-complex="normal" style:font-weight-complex="normal"/>
    </style:style>
    <style:style style:name="T145" style:family="text">
      <style:text-properties style:font-name="Noto Sans1" fo:font-style="normal" fo:font-weight="normal" officeooo:rsid="025f87ad" style:font-style-asian="normal" style:font-weight-asian="normal" style:font-style-complex="normal" style:font-weight-complex="normal"/>
    </style:style>
    <style:style style:name="T146" style:family="text">
      <style:text-properties style:font-name="Noto Sans1" fo:font-size="12pt" fo:font-style="normal" officeooo:rsid="0088e032" style:font-size-asian="12pt" style:font-style-asian="normal" style:font-size-complex="12pt" style:font-style-complex="normal"/>
    </style:style>
    <style:style style:name="T147" style:family="text">
      <style:text-properties style:font-name="Noto Sans1" fo:font-size="12pt" fo:font-style="normal" officeooo:rsid="00896bfa" style:font-size-asian="12pt" style:font-style-asian="normal" style:font-size-complex="12pt" style:font-style-complex="normal"/>
    </style:style>
    <style:style style:name="T148" style:family="text">
      <style:text-properties style:font-name="Noto Sans1" fo:font-size="12pt" fo:font-style="normal" officeooo:rsid="008b4cae" style:font-size-asian="12pt" style:font-style-asian="normal" style:font-size-complex="12pt" style:font-style-complex="normal"/>
    </style:style>
    <style:style style:name="T149" style:family="text">
      <style:text-properties style:font-name="Noto Sans1" fo:font-size="12pt" fo:font-style="normal" officeooo:rsid="008a7cf2" style:font-size-asian="12pt" style:font-style-asian="normal" style:font-size-complex="12pt" style:font-style-complex="normal"/>
    </style:style>
    <style:style style:name="T150" style:family="text">
      <style:text-properties style:font-name="Noto Sans1" fo:font-size="12pt" fo:font-style="normal" officeooo:rsid="00187752" style:font-size-asian="12pt" style:font-style-asian="normal" style:font-size-complex="12pt" style:font-style-complex="normal"/>
    </style:style>
    <style:style style:name="T151" style:family="text">
      <style:text-properties style:font-name="Noto Sans1" fo:font-size="12pt" fo:font-style="normal" officeooo:rsid="0010a83a" style:font-size-asian="12pt" style:font-style-asian="normal" style:font-size-complex="12pt" style:font-style-complex="normal"/>
    </style:style>
    <style:style style:name="T152" style:family="text">
      <style:text-properties style:font-name="Noto Sans1" fo:font-size="12pt" fo:font-style="normal" officeooo:rsid="0012949f" style:font-size-asian="12pt" style:font-style-asian="normal" style:font-size-complex="12pt" style:font-style-complex="normal"/>
    </style:style>
    <style:style style:name="T153" style:family="text">
      <style:text-properties style:font-name="Noto Sans1" fo:font-size="12pt" fo:font-style="normal" officeooo:rsid="025f87ad" style:font-size-asian="12pt" style:font-style-asian="normal" style:font-size-complex="12pt" style:font-style-complex="normal"/>
    </style:style>
    <style:style style:name="T154" style:family="text">
      <style:text-properties style:font-name="Noto Sans1" fo:font-size="12pt" fo:font-style="normal" officeooo:rsid="00eec7f4" style:font-size-asian="12pt" style:font-style-asian="normal" style:font-size-complex="12pt" style:font-style-complex="normal"/>
    </style:style>
    <style:style style:name="T155" style:family="text">
      <style:text-properties style:font-name="Noto Sans1" fo:font-size="12pt" fo:font-style="normal" officeooo:rsid="0018b1b7" style:font-size-asian="12pt" style:font-style-asian="normal" style:font-size-complex="12pt" style:font-style-complex="normal"/>
    </style:style>
    <style:style style:name="T156" style:family="text">
      <style:text-properties style:font-name="Noto Sans1" fo:font-size="12pt" fo:font-style="normal" fo:font-weight="normal" officeooo:rsid="000f8dec" style:font-size-asian="12pt" style:font-style-asian="normal" style:font-weight-asian="normal" style:font-size-complex="12pt" style:font-style-complex="normal" style:font-weight-complex="normal"/>
    </style:style>
    <style:style style:name="T157" style:family="text">
      <style:text-properties style:font-name="Noto Sans1" fo:font-size="12pt" fo:font-style="normal" fo:font-weight="normal" officeooo:rsid="00078d9f" style:font-size-asian="12pt" style:font-style-asian="normal" style:font-weight-asian="normal" style:font-size-complex="12pt" style:font-style-complex="normal" style:font-weight-complex="normal"/>
    </style:style>
    <style:style style:name="T158" style:family="text">
      <style:text-properties style:font-name="Noto Sans1" fo:font-size="12pt" fo:font-style="normal" fo:font-weight="normal" officeooo:rsid="025f87ad" style:font-size-asian="12pt" style:font-style-asian="normal" style:font-weight-asian="normal" style:font-size-complex="12pt" style:font-style-complex="normal" style:font-weight-complex="normal"/>
    </style:style>
    <style:style style:name="T159" style:family="text">
      <style:text-properties style:font-name="Noto Sans1" fo:font-size="12pt" style:font-size-asian="12pt" style:font-size-complex="12pt"/>
    </style:style>
    <style:style style:name="T160" style:family="text">
      <style:text-properties style:font-name="Noto Sans1" fo:font-size="12pt" officeooo:rsid="00187752" style:font-size-asian="12pt" style:font-size-complex="12pt"/>
    </style:style>
    <style:style style:name="T161" style:family="text">
      <style:text-properties style:font-name="Noto Sans1" fo:font-size="12pt" officeooo:rsid="004e4e4e" style:font-size-asian="12pt" style:font-size-complex="12pt"/>
    </style:style>
    <style:style style:name="T162" style:family="text">
      <style:text-properties style:font-name="Noto Sans1" fo:font-size="12pt" officeooo:rsid="0040f61e" style:font-size-asian="12pt" style:font-size-complex="12pt"/>
    </style:style>
    <style:style style:name="T163" style:family="text">
      <style:text-properties style:font-name="Noto Sans1" fo:font-size="12pt" officeooo:rsid="0018b1b7" style:font-size-asian="12pt" style:font-size-complex="12pt"/>
    </style:style>
    <style:style style:name="T164" style:family="text">
      <style:text-properties style:font-name="Noto Sans1" fo:font-size="12pt" officeooo:rsid="001461e0" style:font-size-asian="12pt" style:font-size-complex="12pt"/>
    </style:style>
    <style:style style:name="T165" style:family="text">
      <style:text-properties style:font-name="Noto Sans1" fo:font-size="12pt" officeooo:rsid="00078d9f" style:font-size-asian="12pt" style:font-size-complex="12pt"/>
    </style:style>
    <style:style style:name="T166" style:family="text">
      <style:text-properties style:font-name="Noto Sans1" fo:font-size="12pt" fo:font-style="italic" style:font-size-asian="12pt" style:font-style-asian="italic" style:font-size-complex="12pt" style:font-style-complex="italic"/>
    </style:style>
    <style:style style:name="T167" style:family="text">
      <style:text-properties style:font-name="Noto Sans1" fo:font-size="12pt" fo:font-style="italic" officeooo:rsid="0010a83a" style:font-size-asian="12pt" style:font-style-asian="italic" style:font-size-complex="12pt" style:font-style-complex="italic"/>
    </style:style>
    <style:style style:name="T168" style:family="text">
      <style:text-properties style:font-name="Noto Sans1" fo:font-size="12pt" fo:font-style="italic" officeooo:rsid="0027935f" style:font-size-asian="12pt" style:font-style-asian="italic" style:font-size-complex="12pt" style:font-style-complex="italic"/>
    </style:style>
    <style:style style:name="T169" style:family="text">
      <style:text-properties style:font-name="Noto Sans1" officeooo:rsid="0018b1b7"/>
    </style:style>
    <style:style style:name="T170" style:family="text">
      <style:text-properties style:font-name="Noto Sans1" fo:font-style="italic" style:font-style-asian="italic" style:font-style-complex="italic"/>
    </style:style>
    <style:style style:name="T171" style:family="text">
      <style:text-properties style:font-name="Noto Sans1" fo:font-style="italic" officeooo:rsid="0010a83a" style:font-style-asian="italic" style:font-style-complex="italic"/>
    </style:style>
    <style:style style:name="T172" style:family="text">
      <style:text-properties style:font-name="Noto Sans1" fo:font-style="italic" officeooo:rsid="0027935f" style:font-style-asian="italic" style:font-style-complex="italic"/>
    </style:style>
    <style:style style:name="T173" style:family="text">
      <style:text-properties style:font-name="Noto Sans1" officeooo:rsid="001461e0"/>
    </style:style>
    <style:style style:name="T174" style:family="text">
      <style:text-properties style:font-name="Noto Sans1" officeooo:rsid="00078d9f"/>
    </style:style>
    <style:style style:name="T175" style:family="text">
      <style:text-properties style:font-name="Noto Sans1" officeooo:rsid="0040f61e"/>
    </style:style>
    <style:style style:name="T176" style:family="text">
      <style:text-properties officeooo:rsid="001543ef"/>
    </style:style>
    <style:style style:name="T177" style:family="text">
      <style:text-properties officeooo:rsid="008c2ed6"/>
    </style:style>
    <style:style style:name="T178" style:family="text">
      <style:text-properties officeooo:rsid="008ce2dd"/>
    </style:style>
    <style:style style:name="T179" style:family="text">
      <style:text-properties officeooo:rsid="008fc87a"/>
    </style:style>
    <style:style style:name="T180" style:family="text">
      <style:text-properties officeooo:rsid="0096241b"/>
    </style:style>
    <style:style style:name="T181" style:family="text">
      <style:text-properties officeooo:rsid="00979b03"/>
    </style:style>
    <style:style style:name="T182" style:family="text">
      <style:text-properties officeooo:rsid="008edef0"/>
    </style:style>
    <style:style style:name="T183" style:family="text">
      <style:text-properties officeooo:rsid="009a3585"/>
    </style:style>
    <style:style style:name="T184" style:family="text">
      <style:text-properties officeooo:rsid="00922438"/>
    </style:style>
    <style:style style:name="T185" style:family="text">
      <style:text-properties officeooo:rsid="00a28f32"/>
    </style:style>
    <style:style style:name="T186" style:family="text">
      <style:text-properties officeooo:rsid="0016b592"/>
    </style:style>
    <style:style style:name="T187" style:family="text">
      <style:text-properties officeooo:rsid="000f8dec"/>
    </style:style>
    <style:style style:name="T188" style:family="text">
      <style:text-properties officeooo:rsid="0005cc21"/>
    </style:style>
    <style:style style:name="T189" style:family="text">
      <style:text-properties officeooo:rsid="0012949f"/>
    </style:style>
    <style:style style:name="T190" style:family="text">
      <style:text-properties officeooo:rsid="02251020"/>
    </style:style>
    <style:style style:name="T191" style:family="text">
      <style:text-properties officeooo:rsid="0010a83a"/>
    </style:style>
    <style:style style:name="T192" style:family="text">
      <style:text-properties officeooo:rsid="00ea5943"/>
    </style:style>
    <style:style style:name="T193" style:family="text">
      <style:text-properties officeooo:rsid="001b16f4"/>
    </style:style>
    <style:style style:name="T194" style:family="text">
      <style:text-properties officeooo:rsid="001461e0"/>
    </style:style>
    <style:style style:name="T195" style:family="text">
      <style:text-properties officeooo:rsid="0018b1b7"/>
    </style:style>
    <style:style style:name="T196" style:family="text">
      <style:text-properties officeooo:rsid="00ed7220"/>
    </style:style>
    <style:style style:name="T197" style:family="text">
      <style:text-properties officeooo:rsid="0015bcdd"/>
    </style:style>
    <style:style style:name="T198" style:family="text">
      <style:text-properties officeooo:rsid="0014f3f1"/>
    </style:style>
    <style:style style:name="T199" style:family="text">
      <style:text-properties officeooo:rsid="00169239"/>
    </style:style>
    <style:style style:name="T200" style:family="text">
      <style:text-properties officeooo:rsid="0027935f"/>
    </style:style>
    <style:style style:name="T201" style:family="text">
      <style:text-properties officeooo:rsid="00078d9f"/>
    </style:style>
    <style:style style:name="T202" style:family="text">
      <style:text-properties style:text-underline-style="none" fo:font-weight="bold" style:font-weight-asian="bold" style:font-weight-complex="bold"/>
    </style:style>
    <style:style style:name="T203" style:family="text">
      <style:text-properties officeooo:rsid="000ff805"/>
    </style:style>
    <style:style style:name="T204" style:family="text">
      <style:text-properties officeooo:rsid="000bdd5e"/>
    </style:style>
    <style:style style:name="T205" style:family="text">
      <style:text-properties officeooo:rsid="00eec7f4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101cm" fo:text-indent="-0.801cm" fo:margin-left="1.10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101cm" fo:text-indent="-0.801cm" fo:margin-left="1.10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101cm" fo:text-indent="-0.801cm" fo:margin-left="1.10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3"><text:bookmark-start text:name="__RefHeading___Toc19918_4287692119"/>Epicureismo<text:bookmark-end text:name="__RefHeading___Toc19918_4287692119"/></text:h>
      <text:p text:style-name="P55">La prima delle grandi scuole ellenistiche, in ordine cronologico, sorse ad Atene verso la fine del IV secolo a.C. a<text:span text:style-name="T187">d</text:span> opera di Epicuro <text:span text:style-name="T114">(341-270 a.C.) na</text:span><text:span text:style-name="T115">to </text:span><text:span text:style-name="T114">a Samo e mor</text:span><text:span text:style-name="T115">to </text:span><text:span text:style-name="T114">ad Atene.</text:span></text:p>
      <text:p text:style-name="P55"><text:span text:style-name="T116">L’atto di sfida di </text:span><text:span text:style-name="T114">Epicuro </text:span><text:span text:style-name="T116">nei confronti dell’Accademia </text:span><text:span text:style-name="T115">di Platone, </text:span><text:span text:style-name="T116">ebbe inizio n</text:span><text:span text:style-name="T114">el 306-307 </text:span><text:span text:style-name="T115">quando,</text:span><text:span text:style-name="T114"> acquist</text:span><text:span text:style-name="T115">ata </text:span><text:span text:style-name="T114">una casa </text:span><text:span text:style-name="T117">a </text:span><text:span text:style-name="T114">Gàdara, una piccola città situata in una zona rurale e tranquilla della Grecia, </text:span><text:span text:style-name="T117">fondò una scuola filosofica chiamata “Giardino” che divenne il</text:span><text:span text:style-name="T114"> luogo </text:span><text:span text:style-name="T117">propizio alla ricerca filosofica e alla contemplazione della natura. </text:span><text:span text:style-name="T118">Fu</text:span><text:span text:style-name="T117"> luogo </text:span><text:span text:style-name="T114">di incontro e di studio per i suoi discepoli che potevano dedicarsi alla pratica della virtù in un ambiente protetto dalle influenze negative della società. </text:span><text:span text:style-name="T119">La scuola era aperta a tutti, uomini, donne</text:span><text:span text:style-name="T114"> </text:span><text:span text:style-name="T119">e schiavi e all’ingresso troneggiava la scritta:</text:span></text:p>
      <text:p text:style-name="P16">« Straniero, qui farai bene a fermarti; qui il nostro sommo bene è il piacere. Sarà pronto per te il custode di quella dimora, un ospite gentile; ti accoglierà con pane e ti servirà anche acqua in abbondanza, con queste parole: "Non vi siete divertiti bene? Questo giardino non stuzzica il tuo appetito; ma lo spegne. "</text:p>
      <text:p text:style-name="P57">La scelta di Epicuro di vivere isolato dalla città fu una decisione radicale per l'epoca. La maggior parte dei filosofi greci viveva infatti in città, dove potevano <text:soft-page-break/>interagire con altri intellettuali e partecipare alla vita politica. Epicuro invece, preferì vivere una vita appartata e ritirata in un ambiente semplice e tranquillo, incentrata sulla ricerca della felicità individuale <text:s/>e di <text:s/>mantenere <text:span text:style-name="T188">la mente libera da preoccupazioni e desideri. La vita nella città </text:span>era <text:span text:style-name="T188">invece <text:s/>caratterizzata da rumori, confusione, competizione, </text:span>conflitti e passioni <text:span text:style-name="T188"><text:s/>che rendevano difficile </text:span>avere la giusta <text:span text:style-name="T188">concentrazione, </text:span>tutte cose che indubbiamente <text:span text:style-name="T188">porta</text:span>vano<text:span text:style-name="T188"> alla sofferenza. Epicuro era un uomo semplice e frugale. Non aveva bisogno di grandi ricchezze o di un alto status sociale per essere felice. Diogene Laerzio nella sua “Vita dei filosofi”, </text:span><text:span text:style-name="T187">ha redatto il Sillabo</text:span><text:span text:style-name="T187"><text:note text:id="ftn10" text:note-class="footnote"><text:note-citation>1</text:note-citation><text:note-body><text:p text:style-name="P7">T<text:span text:style-name="T73">ermine arcaico che identifica una raccolta o sommario.</text:span></text:p></text:note-body></text:note></text:span><text:span text:style-name="T187"> delle dottrine di Epicuro, composto da 40 massime, che possono essere raggruppate in tre categorie principali :</text:span></text:p>
      <text:p text:style-name="P54"><text:span text:style-name="T202">Logica</text:span><text:span text:style-name="T114">:</text:span> le massime <text:span text:style-name="T189">da </text:span>1 <text:span text:style-name="T189">a </text:span>14 si occupano della teoria della conoscenza, e sostengono che il criterio di verità è costituito dalle sensazioni, cioè l'esperienza, dalle anticipazioni e dalle emozioni.</text:p>
      <text:p text:style-name="P54"><text:span text:style-name="T202">Fisica</text:span><text:span text:style-name="T114">:</text:span> le massime <text:span text:style-name="T189">da </text:span>15 <text:span text:style-name="T189">a </text:span>31 si occupano della teoria della natura, e sostengono che la materia è composta da particelle indivisibili chiamate atomi, che si muovono nello spazio vuoto.</text:p>
      <text:p text:style-name="P54"><text:span text:style-name="T202">Etica</text:span><text:span text:style-name="T114">:</text:span> le massime <text:span text:style-name="T189">da </text:span>32 <text:span text:style-name="T189">a </text:span>40 si occupano della teoria del comportamento, e sostengono che il fine ultimo della <text:soft-page-break/>vita è la felicità, che è raggiunta attraverso la ricerca dei piaceri naturali e necessari.</text:p>
      <text:p text:style-name="P59"><text:span text:style-name="T190">La logica di </text:span><text:span text:style-name="T187">Platone </text:span>afferma<text:span text:style-name="T190">va</text:span> che la sensazione confonde l’anima e <text:span text:style-name="T189">la </text:span>distoglie dall’essere; Epicuro capovolge questa posizione, affermando che essa e solo essa "coglie l’essere" in modo infallibile: nessuna sensazione può mai fallire. </text:p>
      <text:p text:style-name="P61">Le massime del Sillabo della logica:</text:p>
      <text:section text:style-name="Sect1" text:name="Sezione1">
        <text:p text:style-name="P77">1. Le sensazioni sono la prima norma di verità.</text:p>
        <text:p text:style-name="P78">2. Le anticipazioni sono seconde alla sensazione.</text:p>
        <text:p text:style-name="P78">3. Le emozioni sono vere o false a seconda che siano fondate o meno sulla sensazione.</text:p>
        <text:p text:style-name="P78">4. La sensazione non può essere ingannevole.</text:p>
        <text:p text:style-name="P78">5. L'errore nasce dall'associazione di sensazioni false o ingannevoli.</text:p>
        <text:p text:style-name="P78">6. L'errore nasce anche dall'ignoranza delle cause delle sensazioni.</text:p>
        <text:p text:style-name="P78">7. La conoscenza è la sensazione congiunta alla previsione.</text:p>
        <text:p text:style-name="P78">8. La previsione è la sensazione congiunta alla memoria.</text:p>
        <text:p text:style-name="P78">9. La conoscenza è la percezione di ciò che è presente.</text:p>
        <text:p text:style-name="P78">10. La scienza è la conoscenza delle cause.</text:p>
        <text:p text:style-name="P78">11. L'ateismo è la causa di ogni male.</text:p>
        <text:p text:style-name="P78">12. La divinità è benevola e immortale.</text:p>
        <text:p text:style-name="P78">13. La divinità non si interessa alle cose umane.</text:p>
        <text:p text:style-name="P78">14. La morte non è nulla per noi.</text:p>
      </text:section>
      <text:p text:style-name="P58"/>
      <text:p text:style-name="P58"><text:span text:style-name="T190">Il fondamento della fisica epicurea è: <text:s/></text:span>“<text:span text:style-name="T63">Nulla nasce dal non essere</text:span>”<text:span text:style-name="T187">. </text:span><text:span text:style-name="T70">“P</text:span><text:span text:style-name="T63">erché, </text:span><text:span text:style-name="T70">se così non fosse</text:span><text:span text:style-name="T63">, ogni cosa potrebbe assurdamente generarsi da qualsiasi cosa senza bisogno di </text:span><text:soft-page-break/><text:span text:style-name="T63">nessun seme generatore; e nessuna cosa si dissolve nel nulla, perché, altrimenti, a questo momento, tutto sarebbe ormai perito e nulla più sarebbe. E poiché nulla nasce e nulla perisce, così il tutto, cioè la realtà nella sua totalità, fu sempre quale ora è, e sarà tale sempre; infatti, oltre il tutto, non vi è nulla in cui esso possa mutarsi, né vi è nulla da cui possa essere mutato.” </text:span>Questo "<text:span text:style-name="T63">tutto</text:span>", ossia la totalità della realtà, è determinato da due costitutivi essenziali: i corpi e il vuoto.</text:p>
      <text:p text:style-name="P59">L’esistenza dei corpi è provata dai sensi stessi, mentre l’esistenza dello spazio e del vuoto è <text:span text:style-name="T191">causata</text:span> dal fatto che esiste il movimento; infatti, perché ci sia movimento, è necessario che ci sia uno spazio vuoto in cui i corpi possano spostarsi. Il vuoto <text:span text:style-name="T187">è </text:span>spazio o, come dice Epicuro, <text:span text:style-name="T63">"natura intangibile"</text:span>. Oltre i corpi e il vuoto <text:span text:style-name="T63">tertium non datur</text:span>, <text:s/><text:span text:style-name="T187">u</text:span>na terza cosa non è data, perché null’altro è pensabile che sia di per s<text:span text:style-name="T192">e</text:span> esistente e che non sia affezione dei corpi.</text:p>
      <text:p text:style-name="P58">La teoria di Epicuro è basata sull'atomismo, una teoria secondo cui la materia è composta da particelle indivisibili chiamate atomi. Gli atomi sono eterni, indivisibili e solidi. Si muovono nello spazio vuoto, e si combinano per formare i corpi. <text:span text:style-name="T191">Tuttavia, l</text:span>a teoria di Epicuro presenta alcune differenze rispetto all'atomismo di Democrito, suo predecessore. La differenza più significativa è la teoria del <text:span text:style-name="T63">clinamen</text:span>, <text:span text:style-name="T187">ovvero quella </text:span><text:soft-page-break/><text:span text:style-name="T187">declinazione che fa deviare gli atomi dalla loro caduta verticale, provocando tra loro gli urti che portano alla formazione dei corpi.</text:span> Questa deviazione è necessaria per spiegare la formazione del mondo, perché altrimenti gli atomi continuerebbero a muoversi in linea retta e non si sarebbero mai combinati. La fisica di Epicuro è importante per la sua teoria etica, perché fornisce una spiegazione del mondo naturale che non implica l'esistenza di divinità o di altri esseri soprannaturali.</text:p>
      <text:p text:style-name="P62">Massime del Sillabo della fisica:</text:p>
      <text:section text:style-name="Sect1" text:name="Sezione2">
        <text:p text:style-name="P79">15. La materia è composta da atomi.</text:p>
        <text:p text:style-name="P80">16. Gli atomi sono eterni e indivisibili.</text:p>
        <text:p text:style-name="P80">17. Gli atomi hanno forma, peso e dimensioni.</text:p>
        <text:p text:style-name="P80">18. Gli atomi si muovono nello spazio vuoto.</text:p>
        <text:p text:style-name="P80">19. Il vuoto è reale.</text:p>
        <text:p text:style-name="P80">20. Il movimento degli atomi è casuale.</text:p>
        <text:p text:style-name="P80">21. Il mondo è composto da un'infinità di mondi.</text:p>
        <text:p text:style-name="P80">22. Il cosmo è eterno.</text:p>
        <text:p text:style-name="P80">23. Le divinità non interferiscono con il mondo.</text:p>
        <text:p text:style-name="P80">24. Il destino non esiste.</text:p>
        <text:p text:style-name="P80">25. Il fato è il risultato del movimento degli atomi.</text:p>
        <text:p text:style-name="P80">26. Il libero arbitrio esiste.</text:p>
        <text:p text:style-name="P80">27. Il corpo è composto da atomi.</text:p>
        <text:p text:style-name="P80">28. L'anima è composta da atomi.</text:p>
        <text:p text:style-name="P80">29. L'anima è mortale.</text:p>
        <text:p text:style-name="P76"/>
      </text:section>
      <text:p text:style-name="P72"/>
      <text:p text:style-name="P53"><text:bookmark-start text:name="__RefHeading___Toc19920_4287692119"/><text:span text:style-name="T201">Etica </text:span><text:span text:style-name="T187">e la</text:span> virtù del piacere<text:bookmark-end text:name="__RefHeading___Toc19920_4287692119"/></text:p>
      <text:p text:style-name="P70">Epicuro e la sua filosofia del piacere sono controversi da oltre 2000 anni. Uno dei motivi, è la nostra tendenza a <text:soft-page-break/>rifiutare il piacere come bene morale. Di solito pensiamo alla carità, alla compassione, all'umiltà, alla saggezza, all'onore, alla giustizia e ad altre virtù come moralmente buone, mentre il piacere è, nella migliore delle ipotesi, moralmente neutro, ma per Epicuro il comportamento alla ricerca del piacere assicurava una vita retta.</text:p>
      <text:p text:style-name="P18"><text:span text:style-name="Citation"><text:span text:style-name="T9">" È impossibile vivere una vita piacevole senza vivere saggiamente, onorevolmente e giustamente, ed è impossibile vivere saggiamente, onorevolmente e giustamente senza vivere piacevolmente. Ogni volta che manca qualcuno di questi, quando, per esempio, l'uomo non è capace vivere saggiamente, anche se vive onorevolmente e giustamente, non gli è possibile vivere una vita piacevole.” <text:s/></text:span></text:span><text:span text:style-name="Citation"><text:span text:style-name="T10">da</text:span></text:span><text:span text:style-name="Citation"><text:span text:style-name="T9"> <text:s/>Principali Dottrine</text:span></text:span></text:p>
      <text:p text:style-name="P18"><text:span text:style-name="T163">Q</text:span><text:span text:style-name="T9">uando sentiamo il nome di Epicuro, </text:span><text:span text:style-name="T163">molti di noi </text:span><text:span text:style-name="T9"><text:s/></text:span><text:span text:style-name="T163">lo associano al termine </text:span><text:span text:style-name="T166">edonismo</text:span><text:span text:style-name="T9">, </text:span><text:span text:style-name="T163">cioè </text:span><text:span text:style-name="T9">una vita dedicata al piacere. </text:span><text:span text:style-name="T163">M</text:span><text:span text:style-name="T9">a </text:span><text:span text:style-name="T163">è</text:span><text:span text:style-name="T9"> l'</text:span><text:span text:style-name="T166">atarassia</text:span><text:span text:style-name="T9"><text:note text:id="ftn11" text:note-class="footnote"><text:note-citation>2</text:note-citation><text:note-body><text:p text:style-name="P4">Termine usato dagli epicurei e scettici per indicare quello stato di perfetta tranquillità e serenità d’animo, raggiunto dal saggio una volta libero dalle passioni.</text:p></text:note-body></text:note></text:span><text:span text:style-name="T9">, l'esperienza di un piacere ottimale e duraturo, ciò che dovremmo associare al filosofo. Epicuro </text:span><text:span text:style-name="T164">afferma</text:span><text:span text:style-name="T9"> che non dovremmo cercare di aumentare il nostro piacere oltre il punto di massima intensità, </text:span><text:span text:style-name="T164">e fa un esempio molto calzante. </text:span><text:span text:style-name="T9">Pensate </text:span><text:span text:style-name="T164">al piacere</text:span><text:span text:style-name="T9"> in termini di cibo. Se hai fame, c'è dolore. Se mangi per soddisfare la fame, ti senti bene e ti comporti secondo l'epicureismo. Al contrario, se ti ingozzi, provi </text:span><text:soft-page-break/><text:span text:style-name="T9">nuovamente dolore. </text:span><text:span text:style-name="Citation"><text:span text:style-name="T9">"La grandezza del piacere raggiunge il suo limite nella rimozione di ogni dolore. Quando tale piacere è presente, finché è ininterrotto, non c'è dolore né del corpo né della mente o di entrambi insieme."</text:span></text:span></text:p>
      <text:p text:style-name="P29"><text:span text:style-name="T120">Anche </text:span><text:span text:style-name="T114">la stravaganza porta al dolore, </text:span><text:span text:style-name="T121">poich</text:span><text:span text:style-name="T122">é</text:span><text:span text:style-name="T114"> stravaganza è una forma di dipendenza che porta a un circolo vizioso di desiderio e di insoddisfazione. Il desiderio di piacere, infatti, è insaziabile, e più si cerca di soddisfare il desiderio, più questo si intensifica. La stravaganza quindi, non porta alla felicità, ma al contrario, al dolore e alla sofferenza.</text:span></text:p>
      <text:p text:style-name="P29"><text:span text:style-name="T114">Un </text:span><text:span text:style-name="T117">uomo </text:span><text:span text:style-name="T114">ricco che spende tutte le sue ricchezze in abiti costosi e in feste sfarzose, può finire in povertà e nella miseria.</text:span></text:p>
      <text:p text:style-name="P66">Un giovane che si droga per provare piaceri intensi, può finire dipendente dalla droga e rovinarsi la vita. Un politico che cerca di ottenere potere e ricchezza a tutti i costi, può finire coinvolto in scandali e in corruzione.</text:p>
      <text:p text:style-name="P67">Dovremmo quindi evitare stravaganze. I piaceri sensuali ci spingono verso l'atarassia , che è di per sé piacevole. Non dovremmo perseguire stimoli senza fine, ma piuttosto cercare una sazietà duratura.</text:p>
      <text:p text:style-name="P18"><text:span text:style-name="Citation"><text:span text:style-name="T9">"Tutti i desideri che non provocano dolore quando rimangono insoddisfatti non sono necessari, ma il desiderio si libera facilmente quando la cosa desiderata è difficile da ottenere o i desideri sembrano suscettibili di produrre </text:span></text:span><text:soft-page-break/><text:span text:style-name="Citation"><text:span text:style-name="T9">danno." </text:span></text:span><text:span text:style-name="T165">L'etica, </text:span><text:span text:style-name="T163">nella filosofia di Epicuro, </text:span><text:span text:style-name="T165">è la scienza che si occupa del bene e del male, </text:span><text:span text:style-name="T163">ed essendo </text:span><text:span text:style-name="T165">il fine ultimo della vita la felicità, </text:span><text:span text:style-name="T163">questa si raggiunge, </text:span><text:span text:style-name="T165">attraverso la ricerca dei piaceri naturali e necessari.</text:span></text:p>
      <text:p text:style-name="P58">I piaceri naturali sono quelli che sono necessari per la sopravvivenza, come il cibo, il sesso e il riposo. I piaceri necessari sono quelli che sono utili per la felicità, come la conoscenza e l'amicizia.</text:p>
      <text:p text:style-name="P29"><text:span text:style-name="T201">La teoria etica di Epicuro è importante perché offre una visione del mondo ottimistica e serena. </text:span><text:span text:style-name="T195">L</text:span><text:span text:style-name="T201">a felicità, </text:span><text:span text:style-name="T195">intesa come uno stato interiore di profonda gioia e benessere</text:span><text:span text:style-name="T201"> </text:span><text:span text:style-name="T193">è</text:span><text:span text:style-name="T201"> possibile </text:span><text:span text:style-name="T193">e accessibile a </text:span><text:span text:style-name="T201">tutti, e </text:span><text:span text:style-name="T193">può</text:span><text:span text:style-name="T201"> essere raggiunta attraverso una vita semplice e modesta.</text:span></text:p>
      <text:p text:style-name="P28"><text:span text:style-name="T201">Massime del Sillabo dell’</text:span><text:span text:style-name="T187">etica</text:span><text:span text:style-name="T201">:</text:span></text:p>
      <text:section text:style-name="Sect1" text:name="Sezione3">
        <text:p text:style-name="P80">30. Il fine ultimo della vita è la felicità.</text:p>
        <text:p text:style-name="P80">31. La felicità è raggiunta attraverso la ricerca dei piaceri naturali e necessari.</text:p>
        <text:p text:style-name="P80">32. I piaceri naturali sono quelli che sono necessari alla vita, come il cibo, il sesso e il riposo.</text:p>
        <text:p text:style-name="P80">33. I piaceri necessari sono quelli che sono utili alla vita, come la conoscenza e la compagnia.</text:p>
        <text:p text:style-name="P80">34. I piaceri superflui sono dannosi.</text:p>
        <text:p text:style-name="P80">35. La sofferenza è causata dal desiderio e dalla paura.</text:p>
        <text:p text:style-name="P80">36. L'atarassia è la condizione di assenza di dolore o turbamento.</text:p>
        <text:p text:style-name="P80">37. L'amicizia è necessaria per la felicità.</text:p>
        <text:p text:style-name="P80">38. La saggezza è necessaria per raggiungere la felicità.</text:p>
        <text:p text:style-name="P80">39. La morte non è nulla per noi.</text:p>
        <text:p text:style-name="P80">40. La vita è breve, quindi è importante viverla al meglio.</text:p>
      </text:section>
      <text:p text:style-name="P19"><text:soft-page-break/><text:span text:style-name="Citation"><text:span text:style-name="T156">Epicuro </text:span></text:span><text:span text:style-name="Citation"><text:span text:style-name="T157">non solo propose, ma impose ai suoi seguaci la dottrina con fermissima disciplina, al punto che nel Giardino non poterono aver luogo conflitti di idee e sviluppi dottrinari di rilievo, almeno sulle questioni di fondo.</text:span></text:span></text:p>
      <text:p text:style-name="P74"><text:bookmark-start text:name="__RefHeading___Toc19922_4287692119"/>La diffusione dell'epicureismo<text:bookmark-end text:name="__RefHeading___Toc19922_4287692119"/></text:p>
      <text:p text:style-name="P67">Epicuro garantì nel suo testamento la sopravvivenza della sua scuola ( Il Giardino ). Le sfide derivanti dalla competizione per le filosofie ellenistiche, in particolare lo stoicismo e lo scetticismo, spinsero gli epicurei a sviluppare alcune delle loro dottrine in modo molto più dettagliato, in particolare <text:span text:style-name="T193">sul</text:span>l’epistemologia, e<text:span text:style-name="T194">d</text:span> alcune delle loro teorie etiche, in particolare su<text:span text:style-name="T193">ll’amicizia</text:span>. Gli epicurei sostenevano che la conoscenza si basa<text:span text:style-name="T194">va</text:span> sui sensi e sulla ragione, <text:span text:style-name="T195">mentre per</text:span> gli scettici, la conoscenza sensoriale <text:span text:style-name="T194">era</text:span> <text:span text:style-name="T195">ingannevole</text:span>, e che la ragione non p<text:span text:style-name="T194">oteva</text:span> essere utilizzata per raggiungere la verità.</text:p>
      <text:p text:style-name="P66">In risposta a questa sfida, gli epicurei svilupparono una teoria della conoscenza che si basava sull'idea di "prassis". La parola greca "prassis" significa "azione" o "pratica". Gli epicurei sosten<text:span text:style-name="T195">nero</text:span> che la conoscenza si acquisis<text:span text:style-name="T195">se</text:span> attraverso l'esperienza diretta, attraverso l'azione e l'interazione con il mondo. Ad esempio, sappiamo che il fuoco è caldo perché lo abbiamo toccato e abbiamo provato dolore. Sappiamo che il cibo è buono perché lo abbiamo mangiato e abbiamo provato piacere.</text:p>
      <text:p text:style-name="P66"><text:soft-page-break/>La "prassis" è <text:span text:style-name="T194">quindi una</text:span> forma di conoscenza immediata, che si basa sull'esperienza diretta dei principi fondamentali della realtà.</text:p>
      <text:p text:style-name="P66">In effetti, per gli epicurei la prenozione e la prassi sono strettamente legate. La prenozione<text:note text:id="ftn12" text:note-class="footnote"><text:note-citation>3</text:note-citation><text:note-body><text:p text:style-name="P5">Concetto non ancora scientifico, fondato su una generalizzazione approssimativa.</text:p></text:note-body></text:note> è la conoscenza anticipata che ci permette di evitare il dolore e di raggiungere il piacere, mentre la prassi è l'azione che deriva dalla prenozione. In altre parole, la prenozione ci consente di prevedere gli eventi futuri e di agire di conseguenza, mentre la prassi è l'azione che mette in pratica la prenozione. <text:span text:style-name="T196">E</text:span>ntrambe sono necessarie per raggiungere la felicità.</text:p>
      <text:p text:style-name="P66"><text:span text:style-name="T194">Anche sul tema dell’amicizia ci furono dei pensieri discordanti tra epicurei, </text:span><text:span text:style-name="T196">stoici e </text:span><text:span text:style-name="T194">scettici.</text:span></text:p>
      <text:p text:style-name="P71">Gli stoici ritenevano che l'amicizia fosse un modo per vivere in conformità con la ragione e con la natura, ma parimenti sostenevano che l'amicizia poteva essere di ostacolo alla felicità, a causa di persone che potevano causarci dolore.</text:p>
      <text:p text:style-name="P66"><text:span text:style-name="T194">Gli epicurei allora svilupparono una teoria dell'amicizia che si basava sull'idea di "philia</text:span><text:span text:style-name="T194"><text:note text:id="ftn13" text:note-class="footnote"><text:note-citation>4</text:note-citation><text:note-body><text:p text:style-name="P2"><text:span text:style-name="T73">La philìa è una forma di amore descritta nella letteratura e filosofia greche antiche, in cui prevale la dimensione fraterna e amichevole della relazione tra gli amanti, traducibile pertanto come «amicizia», o «affetto», in quanto legame basato sulla stima, la simpatia e la fiducia. Si distingue dall'amore erotico (eros), la cui caratteristica principale è</text:span> <text:span text:style-name="T73">l'intenso desiderio dell'amante, e dall'agape, amore alt</text:span><text:span text:style-name="T74">r</text:span><text:span text:style-name="T73">uistico e disinteressato, particolarmente in voga tra gli autori cristiani, e che non presuppone necessariamente un rapporto d'amicizia.</text:span></text:p></text:note-body></text:note></text:span><text:span text:style-name="T194">". La "philia" </text:span><text:span text:style-name="T195">era</text:span><text:span text:style-name="T194"> una </text:span><text:soft-page-break/><text:span text:style-name="T194">forma di amore razionale, che si basa</text:span><text:span text:style-name="T195">va </text:span><text:span text:style-name="T194">sulla condivisione di valori e di interessi comuni. </text:span><text:span text:style-name="T198">Per gli</text:span><text:span text:style-name="T194"> epicurei la "philia" </text:span><text:span text:style-name="T195">era</text:span><text:span text:style-name="T194"> una fonte di gioia e di soddisfazione, e quindi elemento essenziale per la felicità. </text:span></text:p>
      <text:p text:style-name="P75">Catone antiepicureo</text:p>
      <text:p text:style-name="P67">Nel 155 a.C., Atene esportò alcuni dei suoi principali filosofi a Roma, dove l'epicureismo, <text:span text:style-name="T195">dapprima </text:span>offe<text:span text:style-name="T195">se</text:span> conservatori come Marco Porcio Catone <text:span text:style-name="T198">noto anche come Catone il Censore. </text:span></text:p>
      <text:p text:style-name="P66"><text:span text:style-name="T198">Catone era un conservatore, che credeva nei valori tradizionali romani </text:span><text:span text:style-name="T199">che enfatizzavano il dovere verso la famiglia, la patria e la religione</text:span><text:span text:style-name="T198">. Durante una seduta del Senato romano, pronunciò un discorso contro gli Epicurei, sostenendo che </text:span><text:span text:style-name="T195">lo stile di vita che essi diffondevano, </text:span><text:span text:style-name="T198">promuoveva l'ozio e la pigrizia, e che i suoi seguaci non erano utili alla società. Inoltre, Catone affermò che gli Epicurei non credevano </text:span><text:span text:style-name="T200">in una </text:span><text:span text:style-name="T198">ulteriore vita dopo la morte, e quindi non avevano alcun motivo per comportarsi bene in questa vita.</text:span></text:p>
      <text:p text:style-name="P66"><text:span text:style-name="T198">Il discorso di Catone fu molto influente nella cultura romana, e contribuì a diffondere l'idea che la filosofia dovesse essere al servizio della società e della politica. </text:span><text:span text:style-name="T199">Nonostante tutto, </text:span>l'epicureismo mise radici a Roma <text:span text:style-name="T199">e fu </text:span><text:soft-page-break/>particolarmente popolare tra la classe media romana, che era alla ricerca di una filosofia che potesse offrire una visione del mondo realistica e una guida per la vita quotidiana.</text:p>
      <text:p text:style-name="P29"><text:span text:style-name="T114">L'epicureismo fu introdotto a Roma nel I secolo a.C. da Fedro, un filosofo greco che fu amico e maestro di Cicerone. Fedro fondò una scuola epicurea a Roma, che fu frequentata da molti esponenti, tra cui Cicerone stesso. </text:span><text:span text:style-name="T123">L</text:span><text:span text:style-name="T114">'epicureismo offriva una guida per la vita quotidiana </text:span><text:span text:style-name="T123">e </text:span><text:span text:style-name="T114">insegnava che il piacere è il bene supremo, e che la felicità si raggiunge attraverso la pratica della virtù e della conoscenza. </text:span><text:span text:style-name="T123">I</text:span><text:span text:style-name="T114">nsegnava che l'individuo è libero di perseguire la propria felicità, senza essere vincolato da regole o doveri sociali.</text:span></text:p>
      <text:p text:style-name="P29"><text:span text:style-name="T201">Il contributo più cospicuo all’Epicureismo venne da Tito Lucrezio Caro che costituisce un unicum nella storia della filosofia di tutti i tempi. Il “De rerum natura”, che egli compose cantando in mirabili versi il verbo di Epicuro, rappresenta il più grande poema filosofico di tutti i tempi. </text:span><text:span text:style-name="T203">E’</text:span><text:span text:style-name="T204"> un poema didascalico</text:span><text:span text:style-name="T204"><text:note text:id="ftn14" text:note-class="footnote"><text:note-citation>5</text:note-citation><text:note-body><text:p text:style-name="P6">Componimento letterario, in versi o in prosa, che si propone fini di insegnamento o divulgativi.</text:p></text:note-body></text:note></text:span><text:span text:style-name="T204"> in sei libri, scritto nel I secolo a.C. </text:span><text:span text:style-name="T205">e</text:span><text:span text:style-name="T204"> </text:span><text:span text:style-name="T203">b</text:span><text:span text:style-name="T204">asato sulla filosofia di Epicuro. </text:span><text:span text:style-name="T205">I</text:span><text:span text:style-name="T204">l poema fornisce una spiegazione esauriente della natura atomica dell'universo, delle origini del cosmo e della condizione umana.</text:span></text:p>
      <text:p text:style-name="P10"><text:span text:style-name="Citation"><text:span text:style-name="T5"/></text:span></text:p>
      <text:p text:style-name="P11"><text:soft-page-break/><text:span text:style-name="Citation"><text:span text:style-name="T5">Nota personale:</text:span></text:span></text:p>
      <text:p text:style-name="P12"><text:span text:style-name="Citation"><text:span text:style-name="T153">i</text:span></text:span><text:span text:style-name="Citation"><text:span text:style-name="T7">n una delle sue ultime udienze, (17 gen. 24) Papa Francesco ha detto: “</text:span></text:span><text:span text:style-name="Citation"><text:span text:style-name="T167">Il piacere sessuale è un dono di Dio. </text:span></text:span><text:span text:style-name="Citation"><text:span text:style-name="T168">T</text:span></text:span><text:span text:style-name="Citation"><text:span text:style-name="T167">ra tutti i piaceri dell’uomo, la sessualità ha una voce potente. Coinvolge tutti i sensi; dimora sia nel corpo che nella psiche; e questo è bellissimo, ma se non disciplinata e disciplinata con pazienza, se non </text:span></text:span><text:span text:style-name="Citation"><text:span text:style-name="T168">è</text:span></text:span><text:span text:style-name="Citation"><text:span text:style-name="T167"> iscritta in una relazione e in una storia dove due individui la trasformano in una danza amorosa, essa si muta in una catena che priva l’uomo di libertà</text:span></text:span><text:span text:style-name="Citation"><text:span text:style-name="T7">”.</text:span></text:span></text:p>
      <text:p text:style-name="P13"><text:span text:style-name="Citation"><text:span text:style-name="T7">Potremmo dire che sull’argomento del piacere </text:span></text:span><text:span text:style-name="Citation"><text:span text:style-name="T8">sessuale</text:span></text:span><text:span text:style-name="Citation"><text:span text:style-name="T7">, </text:span></text:span><text:span text:style-name="Citation"><text:span text:style-name="T8">sia Papa Francesco che Epicuro, </text:span></text:span><text:span text:style-name="Citation"><text:span text:style-name="T154">la pensano nello stesso modo, </text:span></text:span><text:span text:style-name="Citation"><text:span text:style-name="T8">pur essendo vissuto quest’ultimo circa 2300 anni or sono.</text:span></text:span></text:p>
      <text:p text:style-name="P13"><text:span text:style-name="Citation"><text:span text:style-name="T7">Epicuro sosteneva che il piacere sessuale è un aspetto importante della vita umana, ma che deve essere vissuto in modo equilibrato e armonioso. Il piacere sessuale non deve essere una fonte di dolore e di sofferenza, ma un mezzo per raggiungere la felicità.</text:span></text:span></text:p>
      <text:p text:style-name="P13"><text:span text:style-name="Citation"><text:span text:style-name="T155">Questi che seguono, sono</text:span></text:span><text:span text:style-name="Citation"><text:span text:style-name="T7"> alcuni consigli di Epicuro per vivere il piacere sessuale in modo sano e soddisfacente:</text:span></text:span></text:p>
      <text:list text:style-name="L4">
        <text:list-item>
          <text:p text:style-name="P9"><text:span text:style-name="Citation"><text:span text:style-name="T7">Sii consapevole dei tuoi desideri e dei tuoi limiti. Non cercare di soddisfare desideri irrealizzabili o che possono portare a conseguenze negative.</text:span></text:span></text:p>
        </text:list-item>
        <text:list-item>
          <text:p text:style-name="P9"><text:soft-page-break/><text:span text:style-name="Citation"><text:span text:style-name="T7">Pratica la moderazione. Non esagerare con il piacere sessuale, altrimenti potresti finire per sentirti sazio e insoddisfatto.</text:span></text:span></text:p>
        </text:list-item>
        <text:list-item>
          <text:p text:style-name="P9"><text:span text:style-name="Citation"><text:span text:style-name="T7">Concentrati sul piacere mentale. Il piacere fisico è importante, ma il piacere mentale è più duraturo e appagante.</text:span></text:span></text:p>
        </text:list-item>
        <text:list-item>
          <text:p text:style-name="P9"><text:span text:style-name="Citation"><text:span text:style-name="T7">Sii rispettoso del tuo partner. Il piacere sessuale deve essere condiviso, non imposto.</text:span></text:span></text:p>
        </text:list-item>
      </text:list>
      <text:p text:style-name="P11"><text:span text:style-name="Citation"><text:span text:style-name="T7">La Chiesa cattolica ha avuto diverse posizioni sulla sessualità nel corso della storia. In generale, la Chiesa ha tradizionalmente considerato il sesso come un atto finalizzato alla procreazione e ha condannato l'uso del sesso per il piacere personale, tranne all’interno del matrimonio ma </text:span></text:span><text:span text:style-name="Citation"><text:span text:style-name="T8">comunque </text:span></text:span><text:span text:style-name="Citation"><text:span text:style-name="T7">finalizzato sempre alla procreazione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Noto Serif1" svg:font-family="'Noto Serif'" style:font-adornments="Normale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4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2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Noto Serif1" fo:font-family="'Noto Serif'" style:font-style-name="Normale" style:font-family-generic="roman" style:font-pitch="variable" fo:font-size="13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Noto Serif1" fo:font-family="'Noto Serif'" style:font-style-name="Normale" style:font-family-generic="roman" style:font-pitch="variable" fo:font-size="12pt" fo:font-weight="normal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21.001cm" style:num-format="1" style:print-orientation="portrait" fo:margin-top="1.499cm" fo:margin-bottom="1.499cm" fo:margin-left="1.7cm" fo:margin-right="1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rrado tafaro</meta:initial-creator>
    <meta:creation-date>2026-01-28T11:35:03.377970742</meta:creation-date>
    <dc:date>2026-01-31T18:14:08.664826483</dc:date>
    <dc:creator>corrado tafaro</dc:creator>
    <meta:editing-duration>PT1H18M14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14" meta:paragraph-count="96" meta:word-count="2901" meta:character-count="18107" meta:non-whitespace-character-count="15294"/>
  </office:meta>
</office:document-meta>
</file>