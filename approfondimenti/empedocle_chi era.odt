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B000001118450F67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text-properties officeooo:paragraph-rsid="00495b7a"/>
    </style:style>
    <style:style style:name="P2" style:family="paragraph" style:parent-style-name="Footnote">
      <style:paragraph-properties fo:text-align="justify" style:justify-single-word="false" fo:break-before="page"/>
      <style:text-properties officeooo:paragraph-rsid="00495b7a"/>
    </style:style>
    <style:style style:name="P3" style:family="paragraph" style:parent-style-name="Footnote">
      <style:paragraph-properties fo:text-align="justify" style:justify-single-word="false"/>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officeooo:rsid="00572710" officeooo:paragraph-rsid="0000975a" style:font-size-asian="13pt" style:font-style-asian="normal" style:font-size-complex="13pt" style:font-style-complex="normal"/>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officeooo:rsid="0028adfc" officeooo:paragraph-rsid="0000f2d3" style:font-size-asian="13pt" style:font-style-asian="normal" style:font-size-complex="13pt" style:font-style-complex="normal"/>
    </style:style>
    <style:style style:name="P6" style:family="paragraph" style:parent-style-name="Standard">
      <loext:graphic-properties draw:fill="none"/>
      <style:paragraph-properties fo:margin-left="0cm" fo:margin-right="0cm" fo:margin-top="0.101cm" fo:margin-bottom="0.101cm" style:contextual-spacing="false" fo:line-height="115%" fo:text-align="center" style:justify-single-word="false" fo:text-indent="0.199cm" style:auto-text-indent="false" fo:background-color="transparent"/>
      <style:text-properties style:font-name="Noto Sans1" fo:font-size="13pt" fo:font-style="normal" fo:font-weight="bold" officeooo:rsid="00321e26" officeooo:paragraph-rsid="0004e9a1" style:font-size-asian="13pt" style:font-style-asian="normal" style:font-weight-asian="bold" style:font-size-complex="13pt" style:font-style-complex="normal" style:font-weight-complex="bold"/>
    </style:style>
    <style:style style:name="P7"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994d3" officeooo:paragraph-rsid="0002cf35" style:font-size-asian="13pt" style:font-style-asian="normal" style:font-weight-asian="normal" style:font-size-complex="13pt" style:font-style-complex="normal" style:font-weight-complex="normal"/>
    </style:style>
    <style:style style:name="P8"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994d3" officeooo:paragraph-rsid="0002cf35" style:font-size-asian="13pt" style:font-style-asian="normal" style:font-weight-asian="normal" style:font-size-complex="13pt" style:font-style-complex="normal" style:font-weight-complex="normal"/>
    </style:style>
    <style:style style:name="P9"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994d3" officeooo:paragraph-rsid="0004275d" style:font-size-asian="13pt" style:font-style-asian="normal" style:font-weight-asian="normal" style:font-size-complex="13pt" style:font-style-complex="normal" style:font-weight-complex="normal"/>
    </style:style>
    <style:style style:name="P10" style:family="paragraph" style:parent-style-name="Standard">
      <style:paragraph-properties fo:margin-top="0.199cm" fo:margin-bottom="0cm" style:contextual-spacing="false" fo:line-height="100%" fo:text-align="justify" style:justify-single-word="false"/>
      <style:text-properties style:font-name="Noto Sans1" fo:font-size="13pt" fo:font-style="normal" fo:font-weight="normal" officeooo:rsid="002994d3" officeooo:paragraph-rsid="0002cf35" style:font-size-asian="13pt" style:font-style-asian="normal" style:font-weight-asian="normal" style:font-size-complex="13pt" style:font-style-complex="normal" style:font-weight-complex="normal"/>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0"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1"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2"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3"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4" style:family="paragraph" style:parent-style-name="Standard">
      <style:paragraph-properties fo:margin-top="0cm" fo:margin-bottom="0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5" style:family="paragraph" style:parent-style-name="Standard">
      <style:paragraph-properties fo:margin-top="0.101cm" fo:margin-bottom="0.101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6"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2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3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31"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32" style:family="paragraph" style:parent-style-name="Standard">
      <loext:graphic-properties draw:fill="none"/>
      <style:paragraph-properties fo:margin-left="0cm" fo:margin-right="0cm" fo:margin-top="0.101cm" fo:margin-bottom="0cm" style:contextual-spacing="false" fo:line-height="115%" fo:text-align="center" style:justify-single-word="false" fo:text-indent="0cm" style:auto-text-indent="false"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33" style:family="paragraph" style:parent-style-name="Standard">
      <style:paragraph-properties fo:margin-top="0.101cm" fo:margin-bottom="0cm" style:contextual-spacing="false" fo:line-height="115%" fo:text-align="center"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3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275d" style:font-size-asian="13pt" style:font-style-asian="normal" style:font-weight-asian="normal" style:font-size-complex="13pt" style:font-style-complex="normal" style:font-weight-complex="normal"/>
    </style:style>
    <style:style style:name="P35"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3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3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3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3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4" style:family="paragraph" style:parent-style-name="Standard">
      <style:paragraph-properties fo:margin-top="0.499cm" fo:margin-bottom="0cm" style:contextual-spacing="false" fo:line-height="115%" fo:text-align="center" style:justify-single-word="false"/>
      <style:text-properties style:font-name="Noto Sans1" fo:font-size="13pt" fo:font-style="normal" fo:font-weight="normal" officeooo:rsid="00301597" officeooo:paragraph-rsid="0004275d" style:font-size-asian="13pt" style:font-style-asian="normal" style:font-weight-asian="normal" style:font-size-complex="13pt" style:font-style-complex="normal" style:font-weight-complex="normal"/>
    </style:style>
    <style:style style:name="P45" style:family="paragraph" style:parent-style-name="Standard">
      <style:paragraph-properties fo:margin-top="0.199cm" fo:margin-bottom="0cm" style:contextual-spacing="false" fo:line-height="115%" fo:text-align="justify" style:justify-single-word="false"/>
      <style:text-properties style:font-name="Noto Sans1" fo:font-size="13pt" officeooo:rsid="0027e024" officeooo:paragraph-rsid="0000975a" style:font-size-asian="13pt" style:font-size-complex="13pt"/>
    </style:style>
    <style:style style:name="P46" style:family="paragraph" style:parent-style-name="Standard">
      <style:paragraph-properties fo:margin-top="0.199cm" fo:margin-bottom="0cm" style:contextual-spacing="false" fo:line-height="115%" fo:text-align="justify" style:justify-single-word="false"/>
      <style:text-properties style:font-name="Noto Sans1" fo:font-size="13pt" officeooo:rsid="0028adfc" officeooo:paragraph-rsid="0000f2d3" style:font-size-asian="13pt" style:font-size-complex="13pt"/>
    </style:style>
    <style:style style:name="P47" style:family="paragraph" style:parent-style-name="Standard">
      <style:paragraph-properties fo:margin-top="0.199cm" fo:margin-bottom="0cm" style:contextual-spacing="false" fo:line-height="115%" fo:text-align="justify" style:justify-single-word="false"/>
      <style:text-properties style:font-name="Noto Sans1" fo:font-size="13pt" officeooo:paragraph-rsid="0003c2d1" style:font-size-asian="13pt" style:font-size-complex="13pt"/>
    </style:style>
    <style:style style:name="P48" style:family="paragraph" style:parent-style-name="Standard">
      <style:paragraph-properties fo:margin-top="0.101cm" fo:margin-bottom="0cm" style:contextual-spacing="false" fo:line-height="115%" fo:text-align="justify" style:justify-single-word="false"/>
      <style:text-properties style:font-name="Noto Sans1" fo:font-size="13pt" officeooo:paragraph-rsid="0003c2d1" style:font-size-asian="13pt" style:font-size-complex="13pt"/>
    </style:style>
    <style:style style:name="P49" style:family="paragraph" style:parent-style-name="Standard">
      <style:paragraph-properties fo:margin-top="0.3cm" fo:margin-bottom="0cm" style:contextual-spacing="false" fo:line-height="115%" fo:text-align="center" style:justify-single-word="false"/>
      <style:text-properties style:font-name="Noto Sans1" fo:font-size="13pt" fo:font-style="italic" fo:font-weight="normal" officeooo:rsid="0028adfc" officeooo:paragraph-rsid="0000f2d3" style:font-size-asian="13pt" style:font-style-asian="italic" style:font-weight-asian="normal" style:font-size-complex="13pt" style:font-style-complex="italic" style:font-weight-complex="normal"/>
    </style:style>
    <style:style style:name="P50" style:family="paragraph" style:parent-style-name="Standard">
      <style:paragraph-properties fo:margin-top="0.199cm" fo:margin-bottom="0cm" style:contextual-spacing="false" fo:line-height="100%" fo:text-align="center" style:justify-single-word="false"/>
      <style:text-properties style:font-name="Noto Sans1" fo:font-size="13pt" fo:font-style="italic" fo:font-weight="normal" officeooo:rsid="002994d3" officeooo:paragraph-rsid="0002cf35" style:font-size-asian="13pt" style:font-style-asian="italic" style:font-weight-asian="normal" style:font-size-complex="13pt" style:font-style-complex="italic" style:font-weight-complex="normal"/>
    </style:style>
    <style:style style:name="P51" style:family="paragraph" style:parent-style-name="Standard">
      <style:paragraph-properties fo:margin-top="0cm" fo:margin-bottom="0cm" style:contextual-spacing="false" fo:line-height="100%" fo:text-align="center" style:justify-single-word="false"/>
      <style:text-properties style:font-name="Noto Sans1" fo:font-size="13pt" fo:font-style="italic" fo:font-weight="normal" officeooo:rsid="002994d3" officeooo:paragraph-rsid="0002cf35" style:font-size-asian="13pt" style:font-style-asian="italic" style:font-weight-asian="normal" style:font-size-complex="13pt" style:font-style-complex="italic" style:font-weight-complex="normal"/>
    </style:style>
    <style:style style:name="P52" style:family="paragraph" style:parent-style-name="Standard">
      <style:paragraph-properties fo:margin-top="0.3cm" fo:margin-bottom="0cm" style:contextual-spacing="false" fo:line-height="115%" fo:text-align="center" style:justify-single-word="false"/>
      <style:text-properties style:font-name="Noto Sans1" fo:font-size="13pt" fo:font-style="italic" fo:font-weight="normal" officeooo:rsid="002b633f" officeooo:paragraph-rsid="0004275d" style:font-size-asian="13pt" style:font-style-asian="italic" style:font-weight-asian="normal" style:font-size-complex="13pt" style:font-style-complex="italic" style:font-weight-complex="normal"/>
    </style:style>
    <style:style style:name="P53" style:family="paragraph" style:parent-style-name="Standard">
      <style:paragraph-properties fo:margin-top="0.101cm" fo:margin-bottom="0cm" style:contextual-spacing="false" fo:line-height="115%" fo:text-align="center" style:justify-single-word="false"/>
      <style:text-properties style:font-name="Noto Sans1" fo:font-size="13pt" fo:font-style="italic" fo:font-weight="normal" officeooo:rsid="002b633f" officeooo:paragraph-rsid="0004275d" style:font-size-asian="13pt" style:font-style-asian="italic" style:font-weight-asian="normal" style:font-size-complex="13pt" style:font-style-complex="italic" style:font-weight-complex="normal"/>
    </style:style>
    <style:style style:name="P54" style:family="paragraph" style:parent-style-name="Standard">
      <style:paragraph-properties fo:margin-top="0.199cm" fo:margin-bottom="0cm" style:contextual-spacing="false" fo:line-height="115%" fo:text-align="center" style:justify-single-word="false"/>
      <style:text-properties style:font-name="Noto Sans1" fo:font-size="13pt" fo:font-weight="bold" officeooo:paragraph-rsid="0003c2d1" style:font-size-asian="13pt" style:font-weight-asian="bold" style:font-size-complex="13pt" style:font-weight-complex="bold"/>
    </style:style>
    <style:style style:name="P55" style:family="paragraph" style:parent-style-name="Standard">
      <style:paragraph-properties fo:margin-top="0.101cm" fo:margin-bottom="0cm" style:contextual-spacing="false" fo:line-height="115%" fo:text-align="center" style:justify-single-word="false" fo:break-before="page"/>
      <style:text-properties style:font-name="Noto Sans1" fo:font-size="14pt" fo:font-style="normal" fo:font-weight="normal" officeooo:rsid="00b5a6bc" officeooo:paragraph-rsid="0004e9a1" style:font-size-asian="14pt" style:font-style-asian="normal" style:font-weight-asian="normal" style:font-size-complex="14pt" style:font-style-complex="normal" style:font-weight-complex="normal"/>
    </style:style>
    <style:style style:name="P56" style:family="paragraph" style:parent-style-name="Text_20_body">
      <style:paragraph-properties fo:margin-top="0cm" fo:margin-bottom="0cm" style:contextual-spacing="false" fo:line-height="115%" fo:text-align="center" style:justify-single-word="false"/>
      <style:text-properties style:font-name="Noto Sans1" fo:font-size="13pt" fo:font-style="italic" fo:text-shadow="none" fo:font-weight="normal" officeooo:paragraph-rsid="0000f2d3" style:font-size-asian="13pt" style:font-style-asian="italic" style:font-weight-asian="normal" style:font-size-complex="13pt" style:font-style-complex="italic" style:font-weight-complex="normal"/>
    </style:style>
    <style:style style:name="P57" style:family="paragraph" style:parent-style-name="Text_20_body">
      <style:paragraph-properties fo:margin-top="0.199cm" fo:margin-bottom="0cm" style:contextual-spacing="false" fo:line-height="115%" fo:text-align="center" style:justify-single-word="false"/>
      <style:text-properties style:font-name="Noto Sans1" fo:font-size="13pt" fo:font-style="italic" fo:text-shadow="none" fo:font-weight="bold" officeooo:paragraph-rsid="0000f2d3" style:font-size-asian="13pt" style:font-style-asian="italic" style:font-weight-asian="bold" style:font-size-complex="13pt" style:font-style-complex="italic" style:font-weight-complex="bold"/>
    </style:style>
    <style:style style:name="P58" style:family="paragraph" style:parent-style-name="Text_20_body">
      <style:paragraph-properties fo:margin-top="0.101cm" fo:margin-bottom="0cm" style:contextual-spacing="false" fo:line-height="115%" fo:text-align="justify" style:justify-single-word="false"/>
      <style:text-properties style:font-name="Noto Sans1" fo:font-size="13pt" fo:font-style="normal" fo:font-weight="normal" officeooo:rsid="00495b7a" officeooo:paragraph-rsid="0003c2d1" style:font-size-asian="13pt" style:font-style-asian="normal" style:font-weight-asian="normal" style:font-size-complex="13pt" style:font-style-complex="normal" style:font-weight-complex="normal"/>
    </style:style>
    <style:style style:name="T1" style:family="text">
      <style:text-properties fo:font-size="11pt" fo:font-style="normal" fo:font-weight="bold" style:font-size-asian="11pt" style:font-style-asian="normal" style:font-weight-asian="bold" style:font-size-complex="11pt" style:font-style-complex="normal" style:font-weight-complex="bold"/>
    </style:style>
    <style:style style:name="T2" style:family="text">
      <style:text-properties fo:font-size="11pt" fo:font-style="normal" fo:font-weight="bold" officeooo:rsid="00495b7a" style:font-size-asian="11pt" style:font-style-asian="normal" style:font-weight-asian="bold" style:font-size-complex="11pt" style:font-style-complex="normal" style:font-weight-complex="bold"/>
    </style:style>
    <style:style style:name="T3" style:family="text">
      <style:text-properties fo:font-size="11pt" fo:font-style="normal" fo:font-weight="bold" officeooo:rsid="007a711a" style:font-size-asian="11pt" style:font-style-asian="normal" style:font-weight-asian="bold" style:font-size-complex="11pt" style:font-style-complex="normal" style:font-weight-complex="bold"/>
    </style:style>
    <style:style style:name="T4" style:family="text">
      <style:text-properties fo:font-size="11pt" fo:font-style="normal" style:font-size-asian="11pt" style:font-style-asian="normal" style:font-size-complex="11pt" style:font-style-complex="normal"/>
    </style:style>
    <style:style style:name="T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officeooo:rsid="002b633f" style:font-size-asian="11pt" style:font-weight-asian="bold" style:font-size-complex="11pt" style:font-weight-complex="bold"/>
    </style:style>
    <style:style style:name="T8" style:family="text">
      <style:text-properties fo:font-size="11pt" fo:font-weight="bold" officeooo:rsid="00495b7a" style:font-size-asian="11pt" style:font-weight-asian="bold" style:font-size-complex="11pt" style:font-weight-complex="bold"/>
    </style:style>
    <style:style style:name="T9" style:family="text">
      <style:text-properties fo:font-size="11pt" style:font-size-asian="11pt" style:font-size-complex="11pt"/>
    </style:style>
    <style:style style:name="T10" style:family="text">
      <style:text-properties fo:font-size="11pt" officeooo:rsid="002b633f" style:font-size-asian="11pt" style:font-size-complex="11pt"/>
    </style:style>
    <style:style style:name="T11" style:family="text">
      <style:text-properties fo:font-size="11pt" officeooo:rsid="00495b7a" style:font-size-asian="11pt" style:font-size-complex="11pt"/>
    </style:style>
    <style:style style:name="T12" style:family="text">
      <style:text-properties officeooo:rsid="0028adfc"/>
    </style:style>
    <style:style style:name="T13" style:family="text">
      <style:text-properties officeooo:rsid="004c2768"/>
    </style:style>
    <style:style style:name="T14" style:family="text">
      <style:text-properties style:font-name="Noto Sans" fo:font-style="italic" officeooo:rsid="0028adfc" style:font-style-asian="italic" style:font-style-complex="italic"/>
    </style:style>
    <style:style style:name="T15" style:family="text">
      <style:text-properties style:font-name="Noto Sans" fo:font-style="italic" officeooo:rsid="00850878"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officeooo:rsid="0028adfc" style:font-style-asian="italic" style:font-style-complex="italic"/>
    </style:style>
    <style:style style:name="T18" style:family="text">
      <style:text-properties fo:font-style="italic" officeooo:rsid="0083b457" style:font-style-asian="italic" style:font-style-complex="italic"/>
    </style:style>
    <style:style style:name="T19" style:family="text">
      <style:text-properties fo:font-style="italic" officeooo:rsid="002b633f" style:font-style-asian="italic" style:font-style-complex="italic"/>
    </style:style>
    <style:style style:name="T20" style:family="text">
      <style:text-properties fo:font-style="italic" officeooo:rsid="003a784d"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8adfc" style:font-style-asian="normal" style:font-style-complex="normal"/>
    </style:style>
    <style:style style:name="T23" style:family="text">
      <style:text-properties fo:font-style="normal" officeooo:rsid="0083b457" style:font-style-asian="normal" style:font-style-complex="normal"/>
    </style:style>
    <style:style style:name="T24" style:family="text">
      <style:text-properties fo:font-style="normal" officeooo:rsid="00572710" style:font-style-asian="normal" style:font-style-complex="normal"/>
    </style:style>
    <style:style style:name="T25" style:family="text">
      <style:text-properties fo:font-style="normal" officeooo:rsid="004c2768" style:font-style-asian="normal" style:font-style-complex="normal"/>
    </style:style>
    <style:style style:name="T26" style:family="text">
      <style:text-properties fo:font-style="normal" officeooo:rsid="0002cf35"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officeooo:rsid="00495b7a" style:font-style-asian="normal" style:font-weight-asian="bold" style:font-style-complex="normal" style:font-weight-complex="bold"/>
    </style:style>
    <style:style style:name="T29" style:family="text">
      <style:text-properties fo:font-style="normal" fo:font-weight="bold" officeooo:rsid="007a711a" style:font-style-asian="normal" style:font-weight-asian="bold" style:font-style-complex="normal" style:font-weight-complex="bold"/>
    </style:style>
    <style:style style:name="T30" style:family="text">
      <style:text-properties officeooo:rsid="0083b457"/>
    </style:style>
    <style:style style:name="T3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2" style:family="text">
      <style:text-properties officeooo:rsid="0002cf35"/>
    </style:style>
    <style:style style:name="T33" style:family="text">
      <style:text-properties officeooo:rsid="002d221f"/>
    </style:style>
    <style:style style:name="T34" style:family="text">
      <style:text-properties officeooo:rsid="00495b7a"/>
    </style:style>
    <style:style style:name="T35" style:family="text">
      <style:text-properties fo:font-weight="bold" style:font-weight-asian="bold" style:font-weight-complex="bold"/>
    </style:style>
    <style:style style:name="T36" style:family="text">
      <style:text-properties officeooo:rsid="007c37aa"/>
    </style:style>
    <style:style style:name="T37" style:family="text">
      <style:text-properties officeooo:rsid="0011e120"/>
    </style:style>
    <style:style style:name="T38" style:family="text">
      <style:text-properties officeooo:rsid="004b3136"/>
    </style:style>
    <style:style style:name="T39" style:family="text">
      <style:text-properties officeooo:rsid="007a711a"/>
    </style:style>
    <style:style style:name="T40" style:family="text">
      <style:text-properties officeooo:rsid="002b633f"/>
    </style:style>
    <style:style style:name="T41" style:family="text">
      <style:text-properties officeooo:rsid="0081234e"/>
    </style:style>
    <style:style style:name="T42" style:family="text">
      <style:text-properties officeooo:rsid="00301597"/>
    </style:style>
    <style:style style:name="T43" style:family="text">
      <style:text-properties officeooo:rsid="00a50fb3"/>
    </style:style>
    <style:style style:name="T44" style:family="text">
      <style:text-properties officeooo:rsid="00321e26"/>
    </style:style>
    <style:style style:name="T45" style:family="text">
      <style:text-properties officeooo:rsid="0004275d"/>
    </style:style>
    <style:style style:name="T46" style:family="text">
      <style:text-properties officeooo:rsid="0043445d"/>
    </style:style>
    <style:style style:name="T47" style:family="text">
      <style:text-properties officeooo:rsid="00819ed2"/>
    </style:style>
    <style:style style:name="T48" style:family="text">
      <style:text-properties officeooo:rsid="0031386f"/>
    </style:style>
    <style:style style:name="T49" style:family="text">
      <style:text-properties officeooo:rsid="0004e9a1"/>
    </style:style>
    <style:style style:name="fr1" style:family="graphic" style:parent-style-name="Graphics">
      <style:graphic-properties style:vertical-pos="from-top" style:vertical-rel="paragraph" style:horizontal-pos="from-left" style:horizontal-rel="paragraph" style:mirror="none" fo:clip="rect(0cm, 0.289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49">Empedocle - </text:span>I quattro elementi</text:p>
      <text:p text:style-name="P35">Fu E<text:span text:style-name="T34">m</text:span>pedocle di Agrigento <text:span text:style-name="T44">(al tempo Akragas) </text:span>a dipanare l’intricata matassa in cui si trovava aggrovigliata la filosofia. </text:p>
      <text:p text:style-name="P36">Secondo Empedocle, sia Parmenide sia Eraclito avevano ragione in una delle loro affermazioni ma entrambi sbagliavano nel dare per scontato che esistesse un solo principio. E’ naturale che l’acqua non possa trasformarsi in uccello, l’acqua rimane acqua e quindi Parmenide aveva ragione nel dire che niente può cambiare.</text:p>
      <text:p text:style-name="P36"><text:span text:style-name="T44">Similarmente</text:span> Empedocle era d’accordo anche con Eraclito nel sostenere che bisogna fidarsi di quello che rimane impresso nei nostri sensi <text:span text:style-name="T44">per ciò che </text:span>in natura, <text:span text:style-name="T44">soggetta a </text:span><text:s/>continui mutamenti.</text:p>
      <text:p text:style-name="P36">Empedocle arrivò alla conclusione che bisognava respingere l’idea che esistesse un solo principio originario, né l’acqua né l’aria sono in grado di trasformarsi da sole in un uccello, per cui la natura non può avere un solo elemento costituente.</text:p>
      <text:p text:style-name="P36">Empedocle concepisce il nascere e il morire non come un passaggio dall'essere al non essere (come fanno Parmenide e la scuola di Elea), ma come un <text:soft-page-break/>aggregarsi o disgregarsi di quattro principi-elementi (l'aria, l'acqua, la terra e il fuoco). Ogni elemento è considerato indistruttibile, eterno e inalterabile, allo stesso modo dell'essere di Parmenide. Quando un <text:span text:style-name="T44">essere</text:span> muore, le quattro radici si separano e questo è un cambiamento che possiamo vedere con i nostri occhi. <text:span text:style-name="T44">L</text:span>’aria, l’acqua, la terra ed il fuoco rimangono sempre uguali o inalterati non<text:span text:style-name="T34">o</text:span>stante tutte le mescolanze cui prendono parte, <text:span text:style-name="T44">q</text:span>uindi parrebbe sbagliato dire che tutto cambia perché in realtà niente <text:span text:style-name="T44">cambia</text:span>.</text:p>
      <text:p text:style-name="P36">Prima di Empedocle anche Tale<text:span text:style-name="T34">t</text:span>e e Anassimene avevano sostenuto che l’aria e l’acqua ed il fuoco fossero elementi fondamentali in natura ed erano consapevoli anche dell’importanza del sole per la vita, della natura e naturalmente sapeva<text:span text:style-name="T44">no</text:span> anche che il corpo di un uomo o di un animale emana<text:span text:style-name="T44">va</text:span>no calore.</text:p>
      <text:p text:style-name="P36"><text:span text:style-name="T44">Nelle sue sperimentazioni,</text:span> Empedocle <text:span text:style-name="T44">sicuramente aveva</text:span> osservato come bruciava un pezzo di legno, prima si sent<text:span text:style-name="T44">iva</text:span> un crepitio e uno scoppiettare: si tratta<text:span text:style-name="T44">va</text:span> dell’acqua; qualcosa si alza<text:span text:style-name="T44">va </text:span>sotto forma di fumo: <text:span text:style-name="T44">era</text:span> l’aria; il fuoco lo <text:span text:style-name="T44">si vedeva chiaramente</text:span> e <text:soft-page-break/>quando si spegne<text:span text:style-name="T44">va</text:span> rimane<text:span text:style-name="T44">va </text:span>qualcosa: la cenere (cioè la terra).</text:p>
      <text:p text:style-name="P36">Dopo aver sostenuto che i mutamenti <text:span text:style-name="T44">erano</text:span> dovuti alle quattro radici che si mescola<text:span text:style-name="T44">va</text:span>no e si separa<text:span text:style-name="T44">va</text:span>no, rimaneva da chiarire quale fosse la causa che spingeva <text:s/>le radici a mescolarsi in modo da far nascere una nuova vita e a separarsi nuovamente <text:span text:style-name="T44">quando si moriva</text:span>?</text:p>
      <text:p text:style-name="P36">Empedocle arriv<text:span text:style-name="T44">ò</text:span> alla conclusione che i principi-elementi <text:span text:style-name="T44">erano</text:span> messi in moto da due forze cosmiche antagoniste, <text:span text:style-name="T16">l'amore</text:span> (o amicizia) e <text:span text:style-name="T16">l'odio</text:span> (o discordia), che tendono rispettivamente a unire e separare gli elementi.</text:p>
      <text:p text:style-name="P27"><draw:frame draw:style-name="fr1" draw:name="Immagine1" text:anchor-type="paragraph" svg:x="0.026cm" svg:y="0.284cm" svg:width="6.26cm" svg:height="5.099cm" draw:z-index="0"><draw:image xlink:href="Pictures/100000000000018B000001118450F679.jpg" xlink:type="simple" xlink:show="embed" xlink:actuate="onLoad" draw:mime-type="image/jpeg"/></draw:frame></text:p>
      <text:p text:style-name="P31"><text:span text:style-name="T16">La fase dello sfero</text:span> è <text:span text:style-name="T46">una fase del ciclo cosmico,</text:span><text:span text:style-name="T44"> </text:span>in cui tutti gli elementi sono uniti e legati nella più completa <text:span text:style-name="T46">armonia. </text:span>Non ci sono né il sole, né la terra, né il mare; non c’è la vita, <text:span text:style-name="T46">ma solo la divinità Amore che si gode l’armonia in solitudine.</text:span></text:p>
      <text:p text:style-name="P31"><text:soft-page-break/>Segue poi la fase della contesa tra amore e odio, che genera la vita: l’unità si rompe e si separano gli elementi. Si crea così un movimento ciclico, regolato dal destino, che si evolve dallo sfero (fase in cui prevale in maniera totale l'amore) al caos (fase in cui prevale assolutamente l'odio), passando attraverso la tappa intermedia del cosmo (fase di relativo predominio dell'odio). <text:span text:style-name="T44">Fin</text:span>ché l’odio continua ad agire, le cose si dissolvono ed è il regno del <text:span text:style-name="T47">c</text:span>aos. Spetta, poi, all’<text:span text:style-name="T46">A</text:span>more ricominciare l’unificazione degli elementi. E così via in un processo continuo.</text:p>
      <text:p text:style-name="P28">Empedocle afferma che i poteri conoscitivi dell’uomo sono limitati perché l’uomo vede solo una piccola parte di una vita che non è vita <text:span text:style-name="T47">(</text:span>perché subito sfugge<text:span text:style-name="T47">)</text:span> e conosce solo ciò in cui si imbatte per caso. Motivo per cui deve servirsi tanto dei sensi quanto dell’intelletto per vedere ogni cosa nella sua chiarezza.</text:p>
      <text:p text:style-name="P28">Empedocle pone il principio fondamentale della conoscenza nella formula “il simile si conosce con il simile”. Noi conosciamo la terra con la terra, l’acqua con l’acqua, l’etere divino con l’etere, il fuoco distruttore con il fuoco, l’amore con l’amore e l’odio funesto con l’odio.</text:p>
      <text:p text:style-name="P28"><text:soft-page-break/>La conoscenza, quindi, avviene mediante l’incontro tra l’elemento che è nell’uomo e lo stesso elemento che si trova al di fuori dell’uomo: quando gli e<text:span text:style-name="T48">f</text:span>flu<text:span text:style-name="T48">vi</text:span> che provengono dalle cose si adattano ai pori degli organi dei sensi, producono la sensazione; altrimenti rimangono inavvertiti. Anche la conoscenza dell’intelletto, secondo Empedocle, avviene allo stesso modo con un incontro di elementi esterni e interni.</text:p>
      <text:p text:style-name="P27">Al pari di Parmenide, Empedocle ritiene che l’essere non può né nascere né morire, ma intende spiegare l’apparenza della nascita e della morte: l’unione degli elementi che compongono la realtà è la nascita delle cose, la loro disunione la morte.</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1T16:48:54.959560843</meta:creation-date>
    <dc:date>2026-01-21T17:27:54.601474394</dc:date>
    <dc:creator>corrado tafaro</dc:creator>
    <meta:editing-duration>PT38M58S</meta:editing-duration>
    <meta:editing-cycles>6</meta:editing-cycles>
    <meta:generator>LibreOffice/24.2.7.2$Linux_X86_64 LibreOffice_project/420$Build-2</meta:generator>
    <meta:document-statistic meta:table-count="0" meta:image-count="1" meta:object-count="0" meta:page-count="5" meta:paragraph-count="16" meta:word-count="761" meta:character-count="4765" meta:non-whitespace-character-count="4017"/>
  </office:meta>
</office:document-meta>
</file>