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a709"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0ea709" style:font-size-asian="12pt" style:font-style-asian="normal" style:font-weight-asian="normal" style:font-size-complex="12pt" style:font-style-complex="normal" style:font-weight-complex="normal"/>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1c02ae" officeooo:paragraph-rsid="000ea709" style:font-size-asian="12pt" style:font-style-asian="normal" style:font-size-complex="12pt" style:font-style-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paragraph-rsid="000ea709"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00%" fo:text-align="center" style:justify-single-word="false"/>
      <style:text-properties fo:font-size="9pt" officeooo:paragraph-rsid="0011d62e" style:font-size-asian="9pt" style:font-size-complex="9pt"/>
    </style:style>
    <style:style style:name="P7" style:family="paragraph" style:parent-style-name="Text_20_body">
      <style:paragraph-properties fo:line-height="100%" fo:text-align="justify" style:justify-single-word="false"/>
      <style:text-properties fo:font-size="9pt" style:font-size-asian="9pt" style:font-size-complex="9pt"/>
    </style:style>
    <style:style style:name="P8" style:family="paragraph" style:parent-style-name="Text_20_body">
      <style:paragraph-properties fo:margin-top="0cm" fo:margin-bottom="0cm" style:contextual-spacing="false" fo:line-height="100%" fo:text-align="justify" style:justify-single-word="false"/>
      <style:text-properties fo:font-size="9pt" style:font-size-asian="9pt" style:font-size-complex="9pt"/>
    </style:style>
    <style:style style:name="P9" style:family="paragraph" style:parent-style-name="Text_20_body">
      <style:paragraph-properties fo:margin-top="0.101cm" fo:margin-bottom="0cm" style:contextual-spacing="false" fo:line-height="100%" fo:text-align="justify" style:justify-single-word="false"/>
    </style:style>
    <style:style style:name="P10" style:family="paragraph" style:parent-style-name="Footnote">
      <style:paragraph-properties fo:text-align="justify" style:justify-single-word="false"/>
      <style:text-properties style:font-name="Noto Sans1" officeooo:rsid="01fc8fbf" officeooo:paragraph-rsid="01fc8fbf"/>
    </style:style>
    <style:style style:name="P11" style:family="paragraph" style:parent-style-name="Footnote">
      <style:paragraph-properties fo:line-height="100%" fo:text-align="justify" style:justify-single-word="false"/>
      <style:text-properties style:font-name="Noto Sans1" fo:font-size="9pt" style:font-size-asian="9pt" style:font-size-complex="9pt"/>
    </style:style>
    <style:style style:name="P12" style:family="paragraph" style:parent-style-name="Footnote">
      <style:paragraph-properties fo:text-align="justify" style:justify-single-word="false"/>
      <style:text-properties style:font-name="Noto Sans1" fo:font-size="9pt" style:font-size-asian="9pt" style:font-size-complex="9pt"/>
    </style:style>
    <style:style style:name="P13" style:family="paragraph" style:parent-style-name="Footnote">
      <style:paragraph-properties fo:text-align="justify" style:justify-single-word="false"/>
      <style:text-properties fo:font-size="9pt" style:font-size-asian="9pt" style:font-size-complex="9pt"/>
    </style:style>
    <style:style style:name="P14" style:family="paragraph" style:parent-style-name="Footnote">
      <style:paragraph-properties fo:text-align="justify" style:justify-single-word="false"/>
    </style:style>
    <style:style style:name="P15" style:family="paragraph" style:parent-style-name="Heading_20_2" style:master-page-name="">
      <style:paragraph-properties style:page-number="auto"/>
      <style:text-properties style:font-name="Noto Sans1" fo:font-size="12pt" officeooo:paragraph-rsid="001878db" style:font-size-asian="12pt" style:font-size-complex="12pt"/>
    </style:style>
    <style:style style:name="P16" style:family="paragraph" style:parent-style-name="Heading_20_3">
      <style:paragraph-properties fo:line-height="115%" fo:text-align="justify" style:justify-single-word="false"/>
      <style:text-properties style:font-name="Noto Sans1" fo:font-size="12pt" officeooo:paragraph-rsid="000ea709" style:font-size-asian="12pt" style:font-size-complex="12pt"/>
    </style:style>
    <style:style style:name="P17" style:family="paragraph" style:parent-style-name="Heading_20_3">
      <style:text-properties style:font-name="Noto Sans1" fo:font-size="12pt" officeooo:paragraph-rsid="0013d0ee" style:font-size-asian="12pt" style:font-size-complex="12pt"/>
    </style:style>
    <style:style style:name="P18" style:family="paragraph" style:parent-style-name="Heading_20_3">
      <style:paragraph-properties fo:margin-top="0.199cm" fo:margin-bottom="0cm" style:contextual-spacing="false"/>
      <style:text-properties style:font-name="Noto Sans1" fo:font-size="12pt" officeooo:paragraph-rsid="0013d0ee" style:font-size-asian="12pt" style:font-size-complex="12pt"/>
    </style:style>
    <style:style style:name="P19" style:family="paragraph" style:parent-style-name="Heading_20_3">
      <style:text-properties style:font-name="Noto Sans1" fo:font-size="12pt" officeooo:paragraph-rsid="001878db" style:font-size-asian="12pt" style:font-size-complex="12pt"/>
    </style:style>
    <style:style style:name="P20" style:family="paragraph" style:parent-style-name="Heading_20_3">
      <style:paragraph-properties fo:margin-top="0.199cm" fo:margin-bottom="0cm" style:contextual-spacing="false"/>
      <style:text-properties style:font-name="Noto Sans1" fo:font-size="12pt" officeooo:paragraph-rsid="001878db" style:font-size-asian="12pt" style:font-size-complex="12pt"/>
    </style:style>
    <style:style style:name="P21" style:family="paragraph" style:parent-style-name="Heading_20_3">
      <style:paragraph-properties fo:margin-top="0.199cm" fo:margin-bottom="0cm" style:contextual-spacing="false"/>
      <style:text-properties officeooo:paragraph-rsid="0015bede"/>
    </style:style>
    <style:style style:name="P2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15bede" style:font-size-asian="12pt" style:font-style-asian="normal" style:font-weight-asian="normal" style:font-size-complex="12pt" style:font-style-complex="normal" style:font-weight-complex="normal"/>
    </style:style>
    <style:style style:name="P27"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3d0ee" style:font-size-asian="12pt" style:font-size-complex="12pt"/>
    </style:style>
    <style:style style:name="P2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d0ee" style:font-size-asian="12pt" style:font-size-complex="12pt"/>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d0ee" style:font-size-asian="12pt" style:font-size-complex="12pt"/>
    </style:style>
    <style:style style:name="P3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d0ee" style:font-size-asian="12pt" style:font-size-complex="12pt"/>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878db" style:font-size-asian="12pt" style:font-size-complex="12pt"/>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rsid="001c02ae" officeooo:paragraph-rsid="0013d0ee" style:font-size-asian="12pt" style:font-style-asian="normal" style:font-size-complex="12pt" style:font-style-complex="normal"/>
    </style:style>
    <style:style style:name="P3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4"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4370ad" officeooo:paragraph-rsid="0013d0ee"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6"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40" style:family="paragraph" style:parent-style-name="Standard">
      <style:paragraph-properties fo:margin-top="0.101cm" fo:margin-bottom="0cm" style:contextual-spacing="false" fo:line-height="115%" fo:text-align="center" style:justify-single-word="false"/>
      <style:text-properties style:font-name="Noto Sans1" fo:font-size="12pt" fo:font-weight="normal" officeooo:rsid="004370ad" officeooo:paragraph-rsid="0013d0ee"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49932d" officeooo:paragraph-rsid="001878db" style:font-size-asian="12pt" style:font-weight-asian="normal" style:font-size-complex="12pt" style:font-weight-complex="normal"/>
    </style:style>
    <style:style style:name="P42"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9932d" officeooo:paragraph-rsid="001878db"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margin-top="0.101cm" fo:margin-bottom="0cm" style:contextual-spacing="false" fo:line-height="115%" fo:text-align="center" style:justify-single-word="false" fo:text-indent="0.499cm" style:auto-text-indent="false"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language="it" fo:country="IT" fo:font-weight="normal" officeooo:rsid="0049932d" officeooo:paragraph-rsid="001878db" style:font-size-asian="12pt" style:font-weight-asian="normal" style:font-size-complex="12pt" style:font-weight-complex="normal"/>
    </style:style>
    <style:style style:name="T1" style:family="text">
      <style:text-properties style:font-name="Noto Sans1"/>
    </style:style>
    <style:style style:name="T2" style:family="text">
      <style:text-properties style:font-name="Noto Sans1" fo:font-style="normal" fo:font-weight="normal" officeooo:rsid="001c02ae" style:font-style-asian="normal" style:font-weight-asian="normal" style:font-style-complex="normal" style:font-weight-complex="normal"/>
    </style:style>
    <style:style style:name="T3" style:family="text">
      <style:text-properties style:font-name="Noto Sans1" fo:font-style="italic" fo:font-weight="normal" officeooo:rsid="001c02ae" style:font-style-asian="italic" style:font-weight-asian="normal" style:font-style-complex="italic" style:font-weight-complex="normal"/>
    </style:style>
    <style:style style:name="T4" style:family="text">
      <style:text-properties style:font-name="Noto Sans1" fo:font-size="12pt" fo:font-style="normal" fo:font-weight="normal" officeooo:rsid="001c02ae" style:font-size-asian="12pt" style:font-style-asian="normal" style:font-weight-asian="normal" style:font-size-complex="12pt" style:font-style-complex="normal" style:font-weight-complex="normal"/>
    </style:style>
    <style:style style:name="T5" style:family="text">
      <style:text-properties style:font-name="Noto Sans1" fo:font-size="12pt" fo:font-style="normal" fo:font-weight="normal" officeooo:rsid="001c02ae" style:font-size-asian="10.5pt" style:font-style-asian="normal" style:font-weight-asian="normal" style:font-size-complex="12pt" style:font-style-complex="normal" style:font-weight-complex="normal"/>
    </style:style>
    <style:style style:name="T6" style:family="text">
      <style:text-properties style:font-name="Noto Sans1" fo:font-size="12pt" fo:font-style="italic" fo:font-weight="normal" officeooo:rsid="001c02ae" style:font-size-asian="12pt" style:font-style-asian="italic" style:font-weight-asian="normal" style:font-size-complex="12pt" style:font-style-complex="italic" style:font-weight-complex="normal"/>
    </style:style>
    <style:style style:name="T7" style:family="text">
      <style:text-properties style:font-name="Noto Sans1" fo:font-size="12pt" fo:font-style="italic" fo:font-weight="normal" officeooo:rsid="001c02ae" style:font-size-asian="10.5pt" style:font-style-asian="italic" style:font-weight-asian="normal" style:font-size-complex="12pt"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8aa31" style:font-style-asian="normal" style:font-style-complex="normal"/>
    </style:style>
    <style:style style:name="T10" style:family="text">
      <style:text-properties fo:font-style="normal" officeooo:rsid="001c02ae" style:font-style-asian="normal" style:font-style-complex="normal"/>
    </style:style>
    <style:style style:name="T11" style:family="text">
      <style:text-properties fo:font-style="normal" officeooo:rsid="00336864" style:font-style-asian="normal" style:font-style-complex="normal"/>
    </style:style>
    <style:style style:name="T12" style:family="text">
      <style:text-properties fo:font-style="normal" fo:font-weight="normal" officeooo:rsid="001c02ae" style:font-style-asian="normal" style:font-weight-asian="normal" style:font-style-complex="normal" style:font-weight-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officeooo:rsid="001c02ae" style:font-style-asian="italic" style:font-weight-asian="normal" style:font-style-complex="italic" style:font-weight-complex="normal"/>
    </style:style>
    <style:style style:name="T16" style:family="text">
      <style:text-properties officeooo:rsid="0029c3ce"/>
    </style:style>
    <style:style style:name="T17" style:family="text">
      <style:text-properties officeooo:rsid="01d5c377"/>
    </style:style>
    <style:style style:name="T18" style:family="text">
      <style:text-properties officeooo:rsid="01d9d0ee"/>
    </style:style>
    <style:style style:name="T19" style:family="text">
      <style:text-properties style:use-window-font-color="true" loext:opacity="0%" fo:background-color="transparent" loext:char-shading-value="0"/>
    </style:style>
    <style:style style:name="T20" style:family="text">
      <style:text-properties fo:font-weight="bold"/>
    </style:style>
    <style:style style:name="T21" style:family="text">
      <style:text-properties fo:font-size="9pt" style:font-size-asian="9pt" style:font-size-complex="9pt"/>
    </style:style>
    <style:style style:name="T22" style:family="text">
      <style:text-properties fo:font-size="9pt" officeooo:rsid="0011d62e" style:font-size-asian="9pt" style:font-size-complex="9pt"/>
    </style:style>
    <style:style style:name="T23" style:family="text">
      <style:text-properties fo:language="it" fo:country="IT"/>
    </style:style>
    <style:style style:name="T24" style:family="text">
      <style:text-properties fo:language="it" fo:country="IT" fo:font-style="normal" officeooo:rsid="001c02ae" style:font-style-asian="normal" style:font-style-complex="normal"/>
    </style:style>
    <style:style style:name="T25" style:family="text">
      <style:text-properties fo:language="it" fo:country="IT" fo:font-style="italic" style:font-style-asian="italic" style:font-style-complex="italic"/>
    </style:style>
    <style:style style:name="T26" style:family="text">
      <style:text-properties officeooo:rsid="00876cd0"/>
    </style:style>
    <style:style style:name="T27" style:family="text">
      <style:text-properties officeooo:rsid="0045001f"/>
    </style:style>
    <style:style style:name="T28" style:family="text">
      <style:text-properties officeooo:rsid="00474f5e"/>
    </style:style>
    <style:style style:name="T29"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30" style:family="text">
      <style:text-properties fo:font-size="12pt" fo:font-style="italic" fo:font-weight="normal" officeooo:rsid="001c02ae" style:font-size-asian="12pt" style:font-style-asian="italic" style:font-weight-asian="normal" style:font-size-complex="12pt" style:font-style-complex="italic" style:font-weight-complex="normal"/>
    </style:style>
    <style:style style:name="T31" style:family="text">
      <style:text-properties officeooo:rsid="00762f7f"/>
    </style:style>
    <style:style style:name="T32" style:family="text">
      <style:text-properties officeooo:rsid="0076667a"/>
    </style:style>
    <style:style style:name="T33" style:family="text">
      <style:text-properties fo:font-size="11pt" fo:font-weight="bold" officeooo:rsid="0049932d" style:font-size-asian="11pt" style:font-weight-asian="bold" style:font-size-complex="11pt" style:font-weight-complex="bold"/>
    </style:style>
    <style:style style:name="T34" style:family="text">
      <style:text-properties officeooo:rsid="0049e52c"/>
    </style:style>
    <style:style style:name="T35" style:family="text">
      <style:text-properties officeooo:rsid="00524e22"/>
    </style:style>
    <style:style style:name="T36" style:family="text">
      <style:text-properties officeooo:rsid="004b7642"/>
    </style:style>
    <style:style style:name="T37" style:family="text">
      <style:text-properties officeooo:rsid="0055b5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start text:name="__RefHeading___Toc18186_3602757520"/>L'importanza dell'amicizia<text:bookmark-end text:name="__RefHeading___Toc18186_3602757520"/></text:h>
      <text:p text:style-name="P31"><text:span text:style-name="T23">L'amicizia è uno dei più grandi beni della vita. Seneca celebra l'amicizia come fonte di supporto, crescita e compagnia spirituale.</text:span></text:p>
      <text:h text:style-name="P19" text:outline-level="3"><text:bookmark-start text:name="__RefHeading___Toc18188_3602757520"/>Lettera 3<text:bookmark-end text:name="__RefHeading___Toc18188_3602757520"/></text:h>
      <text:p text:style-name="P42"><text:span text:style-name="T23">Mi scrivi che hai dato a un tuo amico delle lettere da consegnarmi; mi inviti poi a non discutere con lui di tutto quello che ti riguarda, poiché tu stesso non ne hai l'abitudine. Così nella stessa lettera affermi e poi neghi che quello è tuo amico. Se usi una parola specifica in senso generico e lo chiami amico come noi chiamiamo "</text:span><text:span text:style-name="T25">onorevoli</text:span><text:span text:style-name="T23">" tutti quelli che aspirano a una carica pubblica, oppure salutiamo con un "</text:span><text:span text:style-name="T25">caro</text:span><text:span text:style-name="T23">" chi incontriamo, se il nome non ci viene in mente, lasciamo perdere. Ma se consideri amico uno e non ti fidi di lui come di te stesso, sbagli di grosso e non conosci abbastanza il valore della vera amicizia. Con un amico decidi tranquillamente di tutto, ma prima decidi se è un amico: una volta che hai fatto amicizia, ti devi fidare; prima, però, devi decidere se è vera amicizia. Confondono i doveri dell'amicizia sovvertendone l'ordine le persone che, contrariamente agli insegnamenti di Teofrasto</text:span><text:span text:style-name="T23"><text:note text:id="ftn24" text:note-class="footnote"><text:note-citation>1</text:note-citation><text:note-body><text:p text:style-name="P12"><text:span text:style-name="T34">E’</text:span> stato un filosofo e botanico greco antico. Fu discepolo di Aristotele, al quale succedette come scolarca nella direzione del Liceo (il Peripato) nel 322 a.C. <text:span text:style-name="T34">Tra le sue opere primeggiano due ampi trattati botanici.</text:span></text:p></text:note-body></text:note></text:span><text:span text:style-name="T23">, dopo aver concesso il loro affetto, cominciano a giudicare e, avendo giudicato, </text:span><text:soft-page-break/><text:span text:style-name="T23">non mantengono l'affetto. Rifletti a lungo se è il caso di accogliere qualcuno come amico, ma, una volta deciso, accoglilo con tutto il cuore e parla con lui apertamente come con te stesso. Vivi in modo da non aver segreti nemmeno per i tuoi nemici. Poiché, però ci sono cose che è abitudine tener nascoste, dividi con l'amico ogni tua preoccupazione, ogni tuo pensiero. Se lo giudichi fidato, lo renderai anche tale. Chi ha paura di essere ingannato insegna a ingannare e i suoi sospetti autorizzano ad agire disonestamente. Perché di fronte a un amico dovrei pesare le parole? Perché davanti a lui non dovrei sentirmi come se fossi solo? C'è gente che racconta al primo venuto fatti che si dovrebbero confidare solo agli amici e scarica nelle orecchie di uno qualunque i propri tormenti.</text:span></text:p>
      <text:p text:style-name="P48">Altri invece, temono persino che le persone più care vengano a sapere le cose e nascondono sempre più dentro ogni segreto, per non confidarlo, se potessero, neppure a se stessi. Sono due comportamenti da evitare perché è un errore sia credere a tutti, sia non credere a nessuno, ma direi che il primo è un difetto più onesto, il secondo più sicuro. Allo stesso modo meritano di essere biasimati sia gli eterni irrequieti, sia gli eterni flemmatici.</text:p>
      <text:p text:style-name="P41"><text:span text:style-name="T23">Non è operosità godere dello scompiglio, ma lo smaniare di una mente esagitata, come non è quiete giudicare fastidiosa ogni attività, bensì fiacchezza e indolenza. Ricordala bene, perciò questa frase che ho letto in </text:span><text:soft-page-break/><text:span text:style-name="T23">Pomponio: "</text:span><text:span text:style-name="T25">C'è chi si tiene così ben nascosto che gli sembra tempesta tutto ciò che succede sotto il sole.</text:span><text:span text:style-name="T23">" Bisogna saper conciliare queste due opposte tendenze: chi è flemmatico deve agire e deve calmarsi chi è sempre in attività. Consigliati con la natura: ti dirà che ha creato il giorno e la notte. Stammi bene.</text:span></text:p>
      <text:h text:style-name="P20" text:outline-level="3"><text:bookmark-start text:name="__RefHeading___Toc18190_3602757520"/>Lettera 9<text:bookmark-end text:name="__RefHeading___Toc18190_3602757520"/></text:h>
      <text:p text:style-name="P46">Tu vuoi sapere se Epicuro ha ragione a criticare in una sua lettera quanti dicono che il saggio basta a se stesso e che perciò non ha bisogno di amici. È un rimprovero che Epicuro rivolge a Stilbone e a chi è convinto che il sommo bene sia un animo che non patisce. </text:p>
      <text:p text:style-name="P44">È inevitabile cadere nell'equivoco se si vuole sbrigativamente tradurre con una sola parola e precisamente: impatientia. Può infatti, intendersi il contrario di quello che vogliamo sottolineare. Per noi si tratta dell'uomo che rifiuta la sensazione di qualsiasi male: c'è il rischio di interpretarlo, invece, come uno che non può sopportare nessun male. Vedi, dunque, se non è preferibile parlare o di un animo invulnerabile o di un animo al di là di ogni sofferenza. </text:p>
      <text:p text:style-name="P44">Questa è la differenza tra noi e loro: il nostro saggio vince ogni avversità, ma l'avverte; il loro neppure l'avverte. In comune abbiamo l'opinione che il saggio è autosufficiente; e tuttavia, egli vuole avere un amico, un vicino di casa, un compagno di vita. E guarda quanto è <text:soft-page-break/>autosufficiente: certe volte di sé gli basta una sola parte. Se una malattia o un nemico lo hanno privato di una mano, se per sventura ha perso uno o tutt'e due gli occhi, anche così ridotto, sarà soddisfatto, e il corpo sconciato e mutilato gli andrà bene non meno di quando era integro. Ma se non rimpiange ciò che gli è venuto a mancare, questo non significa che preferisce la menomazione. Il saggio è autosufficiente non nel senso che vuole essere senza amici, ma che può stare senza amici; e questo "<text:span text:style-name="T14">può</text:span>" significa che, se perde un amico, sopporta con animo sereno. Ma non sarà mai senza amici: può crearsene altri in breve tempo.</text:p>
      <text:p text:style-name="P44">Come Fidia<text:note text:id="ftn25" text:note-class="footnote"><text:note-citation>2</text:note-citation><text:note-body><text:p text:style-name="Footnote">Fidia, scultore e architetto ateniese, attivo dal 470 a.C. circa ad Atene, Pellene, Platea, Tebe e Olimpia.</text:p></text:note-body></text:note>, persa una statua, ne avrebbe fatta subito un'altra, così questo artefice di amicizie, perduto un amico, lo sostituirà con un altro. Mi chiedi come si possa stringere presto un'amicizia? Te lo dirò se stabiliamo che io ti paghi subito il mio debito e per questa lettera facciamo pari. Dice Ecatone<text:note text:id="ftn26" text:note-class="footnote"><text:note-citation>3</text:note-citation><text:note-body><text:p text:style-name="P14"><text:span text:style-name="T35">C</text:span>ome i primi stoici Cleante e Crisippo, Ecatone ritenne che la virtù può essere insegnata. </text:p></text:note-body></text:note>: "<text:span text:style-name="T14">Ti indicherò un filtro amoroso, senza pozioni, senza erbe, senza formule magiche: se vuoi essere amato, ama.</text:span>" Non solo dalle amicizie sicure e di vecchia data si ricava grande piacere, ma anche dal cominciarne e dal procurarsene di nuove. </text:p>
      <text:p text:style-name="P44">Tra chi ha un amico e chi lo cerca c'è differenza, come tra il contadino che miete e quello che semina. Il filosofo <text:soft-page-break/>Attalo era solito dire che farsi un amico dà più gioia che averlo, "<text:span text:style-name="T14">come al pittore procura più gioia l'atto di dipingere che l'opera finita.</text:span>" L'attendere con zelo a un lavoro dà di per sé un grande piacere: non ne prova, invece, uno uguale chi, finita un'opera, toglie mano. Gode ormai del frutto della sua arte: dipingendo, invece, godeva dell'arte stessa. I figli adolescenti d<text:span text:style-name="T36">a</text:span>nno più frutti, ma da piccoli ci d<text:span text:style-name="T36">a</text:span>nno una felicità più dolce.</text:p>
      <text:p text:style-name="P44">Ritorniamo ora al nostro tema. Il saggio, anche se è autosufficiente, vuole, però avere un amico, se non altro per esercitare l'amicizia, e perché una virtù così nobile non languisca; non lo fa per il motivo dichiarato da Epicuro nella medesima lettera, e cioè "<text:span text:style-name="T14">per avere chi lo assista se ammalato, chi lo soccorra in carcere o in miseria</text:span>", ma per avere qualcuno da assistere lui stesso, nelle malattie, o da liberare se prigioniero dei nemici. Se uno si preoccupa solo di sé e perciò fa amicizia, sbaglia. L'amicizia finirà, come è cominciata: si è procurato un amico perché lo aiutasse nella prigionia: non appena ci sarà rumore di catene, costui sparirà. Sono le amicizie cosiddette opportunistiche: un'amicizia fatta per interesse sarà gradita finché sarà utile. Così se uno ha successo, lo circonda una folla di amici, mentre rimane solo se cade in disgrazia: gli amici fuggono al momento della prova; per questo ci sono tanti esempi infami di persone che abbandonano l'amico per paura, e di altre che per paura lo tradiscono. L'inizio e la fine fatalmente <text:soft-page-break/>concordano. Chi è diventato amico per convenienza, per convenienza finirà di esserlo. Se nell'amicizia si ricerca un utile, per ottenerlo si andrà contro l'amicizia stessa. </text:p>
      <text:p text:style-name="P43">"<text:span text:style-name="T14">Perché, dunque, ti fai un amico?</text:span>" Per avere qualcuno per cui morire, qualcuno da seguire in esilio, da strappare alla morte anche a prezzo della mia vita: quella che tu descrivi non è amicizia, ma traffico, che mira a un profitto e guarda ai possibili vantaggi. L'amore senza dubbio somiglia un po' all'amicizia; lo si potrebbe definire un'amicizia dissennata. Si ama forse per denaro? Per ambizione o per desiderio di gloria? L'amore di per sé trascura tutto il resto e accende negli animi un desiderio di bellezza e la speranza di un mutuo affetto. Ma come? Da una più onesta causa può nascere un sentimento ignobile? "<text:span text:style-name="T14">Ma ora non stiamo discutendo</text:span>," potresti ribattere, "<text:span text:style-name="T14">se l'amicizia si debba ricercare per se stessa</text:span>." E, invece, è questa la prima cosa da dimostrare, poiché, in tal caso, vi si può accostare chi è autosufficiente. "<text:span text:style-name="T14">E come, dunque, ci si accosta ad essa?</text:span>" Come a un sentimento bellissimo, non per lucro, né per timore dell'instabilità della sorte; se uno stringe amicizia per opportunismo le toglie la sua grandezza. "<text:span text:style-name="T14">Il saggio è autosufficiente</text:span>". I più, caro Lucilio, interpretano male questa espressione: allontanano il saggio da tutto e lo costringono dentro il suo guscio. </text:p>
      <text:p text:style-name="P45">Bisogna allora chiarire il significato e i limiti di questa frase: il saggio è autosufficiente per vivere felice, non per <text:soft-page-break/>vivere; a questo scopo gli occorrono, infatti, molti elementi, per vivere felice solo un animo onesto, fiero e noncurante della sorte. Voglio ora indicarti anche la distinzione fatta da Crisippo. Egli dice che il saggio non sente la mancanza di niente e, tuttavia, ha bisogno di molte cose: "<text:span text:style-name="T14">Lo sciocco, invece, non ha bisogno di niente, perché non sa servirsi di niente, ma sente la mancanza di tutto.</text:span>" Il saggio ha bisogno delle mani, degli occhi e di molte altre cose indispensabili alle attività di ogni giorno, ma di nessuna sente la mancanza; sentire la mancanza di qualcosa deriva dalla necessità, mentre al saggio niente è necessario. Quindi, per quanto sia autosufficiente, ha bisogno di amici e desidera averne il più possibile, ma non per vivere felice: è felice anche senza amici. Il sommo bene, cioè la felicità, non cerca al di fuori mezzi per realizzarsi; è un bene interiore e nasce tutto da se stesso; diventa schiavo della sorte se ricerca una parte di sé all'esterno. "<text:span text:style-name="T14">Quale sarà la vita del saggio se, gettato in carcere o relegato in terra straniera o costretto a una lunga navigazione o sbattuto su una spiaggia deserta, rimane senza amici?</text:span>" Sarà simile a quella di Giove, quando alla fine del mondo, scomparsi gli dèi in un tutt'uno e cessando per qualche tempo l'ordine naturale delle cose, si riposerà chiuso in sé abbandonandosi ai suoi pensieri.</text:p>
      <text:p text:style-name="P44">Il saggio fa qualcosa di simile: si ritira in sé, sta solo con se stesso. Finché gli è possibile ordinare le sue faccende a suo piacere, è autosufficiente e prende moglie; è <text:soft-page-break/>autosufficiente e genera figli; è autosufficiente e tuttavia non potrebbe vivere se dovesse vivere senza nessuno. </text:p>
      <text:p text:style-name="P44">All'amicizia non lo porta nessun interesse personale, ma una naturale inclinazione; come in altri sentimenti, anche nell'amicizia c'è un'innata attrattiva. Come esiste l'odio per la solitudine e la ricerca di associazione, come la natura lega uomo a uomo, così anche in questo sentimento c'è uno stimolo che ci spinge a ricercare le amicizie. E tuttavia, pur amando molto gli amici, che mette sul suo stesso piano, o che spesso addirittura antepone, il saggio delimiterà in sé ogni bene e ripeterà le parole di quel famoso Stilbone, lo stesso che Epicuro critica nella sua lettera. Costui, dopo la caduta della sua città, in cui aveva perso moglie e figli, uscì da solo, e tuttavia sereno, dall'incendio generale; gli fu chiesto da Demetrio, che ebbe poi il soprannome di Poliorcete per le città da lui distrutte, se avesse perso qualcosa. "<text:span text:style-name="T14">Tutti i miei beni,</text:span>" rispose, "<text:span text:style-name="T14">li ho con me.</text:span>" Ecco un uomo forte e valoroso! Egli vinse il nemico vincitore. "<text:span text:style-name="T14">Non ho perso nulla,</text:span>" disse: e costrinse il nemico a dubitare della propria vittoria. "<text:span text:style-name="T14">Tutti i miei beni li ho con me"</text:span>: senso di giustizia, virtù, saggezza e soprattutto l'intelligenza di non ritenere un bene ciò che può essere tolto. Ci meravigliamo vedendo certi animali che attraversano indenni il fuoco; quanto è più ammirevole quest'uomo che uscì illeso e indenne dalle armi, le rovine, le fiamme! Vedi quanto è più facile vincere tutto un popolo che un <text:soft-page-break/>solo uomo? Sono parole uguali a quelle del filosofo stoico: anch'egli porta i suoi beni intatti attraverso la città in fiamme: è autosufficiente e in questi confini delimita la sua felicità.</text:p>
      <text:p text:style-name="P44">Non pensare che solo noi pronunciamo nobili parole; lo stesso Epicuro, censore di Stilbone, proferì una frase simile, e tu prendila per buona, anche se per oggi ho già pagato il mio debito<text:note text:id="ftn27" text:note-class="footnote"><text:note-citation>4</text:note-citation><text:note-body><text:p text:style-name="P11"><text:span text:style-name="T37">Questo</text:span> passaggio è affascinante e può sembrare che Seneca stia proponendo uno scambio di valore in maniera quasi contrattuale. Seneca spesso usa l'ironia e il paradosso per enfatizzare i suoi insegnamenti filosofici, come modo per esprimere il valore della saggezza che sta condividendo. È un modo elegante per dire che il valore dell'amicizia e della saggezza è così grande che non può essere misurato in termini materiali.</text:p></text:note-body></text:note>: "<text:span text:style-name="T14">Se pure è padrone del mondo intero, è un infelice l'uomo che non giudica ingentissimi i propri beni.</text:span>" Oppure, se in questo modo ti sembra espresso meglio (bisogna badare più al significato che alle parole): "<text:span text:style-name="T14">Chi non si ritiene molto felice, anche se è padrone del mondo, è un poveretto.</text:span>" Perché tu sappia poi che questo è un concetto comune, appunto perché dettato dalla natura, leggerai nei versi di un poeta comico:</text:p>
      <text:p text:style-name="P47">Non è felice chi non pensa di esserlo.</text:p>
      <text:p text:style-name="P44"><text:span text:style-name="T12">Che importa qual è il tuo stato, se a te non sembra buono? "</text:span><text:span text:style-name="T15">E come?</text:span><text:span text:style-name="T12">" ribatti "</text:span><text:span text:style-name="T15">se si definirà felice uno vergognosamente ricco e quell'altro, padrone di molti schiavi, ma schiavo di più persone ancora, diventeranno </text:span><text:soft-page-break/><text:span text:style-name="T15">felici per la loro frase?</text:span><text:span text:style-name="T12">" Non importa quello che dicono, ma quel che pensano, e non quello che pensano un giorno solo, ma quello che pensano sempre</text:span><text:span text:style-name="T12"><text:note text:id="ftn28" text:note-class="footnote"><text:note-citation>5</text:note-citation><text:note-body><text:p text:style-name="P11">Seneca solleva la questione che chi è vergognosamente ricco o chi possiede molti schiavi potrebbe sembrare, agli occhi degli altri, felice e realizzato. Tuttavia, se queste persone sono insoddisfatte e infelici nella loro condizione, la loro ricchezza e il loro potere non apporteranno loro la felicità. Questo riflette uno dei principi fondamentali dello stoicismo: la felicità e la serenità derivano dalla virtù e dal controllo delle proprie emozioni e desideri, piuttosto che dal possesso di beni materiali o dal dominio sugli altri. </text:p></text:note-body></text:note></text:span><text:span text:style-name="T12">. Non temere, poi, che un bene tanto grande tocchi ad un uomo indegno: solo il saggio è contento delle cose sue; gli sciocchi, invece, sono tormentati dal disgusto di se stessi.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6:42:25.698041764</dc:date>
    <dc:creator>corrado tafaro</dc:creator>
    <meta:editing-duration>PT43M9S</meta:editing-duration>
    <meta:editing-cycles>6</meta:editing-cycles>
    <meta:generator>LibreOffice/24.2.7.2$Linux_X86_64 LibreOffice_project/420$Build-2</meta:generator>
    <meta:document-statistic meta:table-count="0" meta:image-count="0" meta:object-count="0" meta:page-count="10" meta:paragraph-count="25" meta:word-count="2370" meta:character-count="14099" meta:non-whitespace-character-count="11746"/>
  </office:meta>
</office:document-meta>
</file>