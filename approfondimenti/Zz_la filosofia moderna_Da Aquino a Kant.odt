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Standard">
      <style:text-properties style:font-name="Noto Sans" fo:font-weight="bold" style:font-weight-asian="bold" style:font-weight-complex="bold"/>
    </style:style>
    <style:style style:name="P2" style:family="paragraph" style:parent-style-name="Standard">
      <style:text-properties style:font-name="Noto Sans" fo:font-weight="bold" officeooo:paragraph-rsid="000ec116" style:font-weight-asian="bold" style:font-weight-complex="bold"/>
    </style:style>
    <style:style style:name="P3" style:family="paragraph" style:parent-style-name="Standard">
      <style:paragraph-properties fo:margin-top="0.199cm" fo:margin-bottom="0cm" style:contextual-spacing="false" fo:line-height="115%" fo:text-align="justify" style:justify-single-word="false"/>
      <style:text-properties style:font-name="Noto Sans" fo:font-size="11pt" officeooo:paragraph-rsid="000ec116" style:font-size-asian="11pt" style:font-size-complex="11pt"/>
    </style:style>
    <style:style style:name="P4" style:family="paragraph" style:parent-style-name="Standard">
      <style:text-properties style:font-name="Noto Sans" fo:font-size="11pt" officeooo:paragraph-rsid="000ec116" style:font-size-asian="11pt" style:font-size-complex="11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 fo:font-size="11pt" fo:font-weight="bold" style:font-size-asian="11pt" style:font-weight-asian="bold" style:font-size-complex="11pt" style:font-weight-complex="bold"/>
    </style:style>
    <style:style style:name="P6" style:family="paragraph" style:parent-style-name="Standard">
      <style:paragraph-properties fo:margin-top="0.199cm" fo:margin-bottom="0cm" style:contextual-spacing="false" fo:line-height="115%" fo:text-align="justify" style:justify-single-word="false"/>
      <style:text-properties style:font-name="Noto Sans" fo:font-size="12pt" style:font-size-asian="12pt" style:font-size-complex="12pt"/>
    </style:style>
    <style:style style:name="P7" style:family="paragraph" style:parent-style-name="Standard">
      <style:paragraph-properties fo:margin-top="0.101cm" fo:margin-bottom="0cm" style:contextual-spacing="false" fo:line-height="115%" fo:text-align="justify" style:justify-single-word="false"/>
      <style:text-properties style:font-name="Noto Sans" fo:font-size="12pt" style:font-size-asian="12pt" style:font-size-complex="12pt"/>
    </style:style>
    <style:style style:name="P8" style:family="paragraph" style:parent-style-name="Standard">
      <style:paragraph-properties fo:margin-top="0.199cm" fo:margin-bottom="0cm" style:contextual-spacing="false" fo:line-height="115%" fo:text-align="justify" style:justify-single-word="false"/>
      <style:text-properties style:font-name="Noto Sans" fo:font-size="11pt" style:font-size-asian="11pt" style:font-size-complex="11pt"/>
    </style:style>
    <style:style style:name="T1" style:family="text">
      <style:text-properties officeooo:rsid="000ec116"/>
    </style:style>
    <style:style style:name="T2" style:family="text">
      <style:text-properties fo:font-size="12pt" style:font-size-asian="12pt" style:font-size-complex="12pt"/>
    </style:style>
    <style:style style:name="T3" style:family="text">
      <style:text-properties fo:font-size="12pt" officeooo:rsid="000ec116" style:font-size-asian="12pt" style:font-size-complex="12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prima filosofia moderna</text:p>
      <text:p text:style-name="P4">Da Aquino (1225) a Kant (1804)</text:p>
      <text:p text:style-name="P3"><text:span text:style-name="T2">La prima età moderna fu uno dei momenti più innovativi della filosofia occidentale, durante il quale furono proposte nuove teorie della mente e della materia, del divino e della società civile, tra le altre. Sebbene i suoi confini non siano facilmente </text:span><text:span text:style-name="T3">collocabili</text:span><text:span text:style-name="T2">, il periodo va approssimativamente dalla fine del 1400 alla fine del XVIII secolo. Tra i suoi protagonisti, </text:span><text:span text:style-name="T3">vi furono personaggi come </text:span><text:span text:style-name="T2">Cartesio, Locke, Hume e Kant, pubblicarono libri che avrebbero plasmato la nostra moderna comprensione della filosofia.</text:span></text:p>
      <text:p text:style-name="P5">Definizione dell'inizio e della fine del periodo</text:p>
      <text:p text:style-name="P7">Le radici della prima filosofia moderna possono essere fatte risalire al 1200, al momento più maturo della tradizione scolastica. Le filosofie di autori come Tommaso d'Aquino (1225-1274), Occam (1288-1348) e Buridano (1300-1358) accordavano piena fiducia alle facoltà razionali umane: se Dio ci ha dato la facoltà di ragionare allora confideremo che attraverso tale facoltà possiamo raggiungere una piena comprensione delle questioni mondane e divine.</text:p>
      <text:p text:style-name="P6">Probabilmente, tuttavia, l’impulso filosofico più innovativo arrivò durante il 1400 con l’ascesa dei movimenti umanistici e rinascimentali. Grazie all’intensificarsi dei rapporti con le società extraeuropee, alla conoscenza preesistente della filosofia greca e alla generosità dei magnati che <text:soft-page-break/>sostenevano le loro ricerche, gli umanisti riscoprirono testi centrali del periodo greco antico: nuove ondate di platonismo, aristotelismo, stoicismo, scetticismo, e <text:span text:style-name="T1">a seguire</text:span> l’epicureismo, la cui influenza avrebbe avuto un grande impatto sulle figure chiave della prima modernità.</text:p>
      <text:p text:style-name="P5">Cartesio e la modernità</text:p>
      <text:p text:style-name="P7">Cartesio è spesso considerato il primo filosofo della modernità. Non solo era uno scienziato di prim'ordine all'avanguardia nelle nuove teorie della matematica e della materia, ma aveva anche visioni radicalmente nuove del rapporto tra mente e corpo e dell'onnipotenza di Dio. La sua filosofia, tuttavia, non si è sviluppata in modo isolato. Fu invece una reazione a secoli di filosofia scolastica che confutò le idee anti-scolastiche di alcuni dei suoi contemporanei. Tra questi, ad esempio, troviamo Michel de Montaigne (1533-1592), statista e scrittore, i cui "Essais" stabilirono un nuovo genere nell'Europa moderna, che presumibilmente suscitò in Cartesio il fascino per il dubbio scettico.</text:p>
      <text:p text:style-name="P6">Altrove in Europa, la filosofia post-cartesiana occupò un capitolo centrale della prima filosofia moderna. Insieme alla Francia, l'Olanda e la Germania divennero luoghi centrali della produzione filosofica e i loro rappresentanti più illustri raggiunsero grande fama. Tra questi, Spinoza (1632-1677) e Leibniz (1646-1716) occuparono ruoli chiave, esprimendo entrambi sistemi che potevano essere letti <text:soft-page-break/>come tentativi di correggere i principali <text:span text:style-name="T1">errori</text:span> del cartesian<text:span text:style-name="T1">ismo</text:span>.</text:p>
      <text:p text:style-name="P5">Empirismo britannico</text:p>
      <text:p text:style-name="P7">La rivoluzione scientifica – rappresentata da Cartesio in Francia – ha avuto una grande influenza anche sulla filosofia britannica. Nel corso del 1500 si sviluppò in Gran Bretagna una nuova tradizione empirista. Il movimento comprende diverse figure importanti della prima età moderna tra cui Francis Bacon (1561-1626) John Locke (1632-1704), Adam Smith (1723-1790) e David Hume (1711-1776).</text:p>
      <text:p text:style-name="P7">L’empirismo britannico è probabilmente anche alle radici della cosiddetta “filosofia analitica” – una tradizione filosofica contemporanea incentrata sull’analisi o la dissezione dei problemi filosofici piuttosto che affrontarli tutti in una volta. Anche se difficilmente è possibile fornire una definizione unica e incontrovertibile della filosofia analitica, essa può essere efficacemente caratterizzata includendo le opere dei grandi empiristi britannici dell'epoca.</text:p>
      <text:p text:style-name="P8"><text:span text:style-name="T4">Illuminismo e Kant</text:span></text:p>
      <text:p text:style-name="P7">Nel 1700 la filosofia europea fu pervasa da un nuovo movimento filosofico: l’Illuminismo. Conosciuto anche come "L'Età della Ragione" per via dell'ottimismo nella capacità dell'uomo di migliorare le proprie condizioni esistenziali attraverso la sola scienza. <text:span text:style-name="T1">L</text:span>'Illuminismo può <text:soft-page-break/>essere visto come il culmine di alcune idee avanzate dai filosofi medievali: Dio ha dato la ragione agli esseri umani come uno dei nostri strumenti più preziosi e poiché Dio è buono, la ragione – che è l'opera di Dio – è nella sua essenza buona; solo attraverso la ragione, quindi, gli esseri umani possono ottenere il bene. </text:p>
      <text:p text:style-name="P7">Ma quell’illuminazione portò a un grande risveglio nelle società umane, espresso attraverso l’arte, l’innovazione, i progressi tecnologici e l’espansione della filosofia. Infatti, proprio alla fine della prima filosofia moderna, il lavoro di Immanuel Kant (1724-1804) gettò le basi per la filosofia moderna stessa.</text:p>
      <text:p text:style-name="P6"/>
      <text:p text:style-name="P2"><text:a xlink:type="simple" xlink:href="https://www.thoughtco.com/early-modern-philosophy-2670496" text:style-name="Internet_20_link" text:visited-style-name="Visited_20_Internet_20_Link">Early Modern Philosophy: From Aquinas to Kant (thoughtco.com)</text:a>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7:10:05.170000000</meta:creation-date>
    <dc:date>2026-05-24T17:38:07.454657033</dc:date>
    <meta:editing-duration>PT1H20M33S</meta:editing-duration>
    <meta:editing-cycles>3</meta:editing-cycles>
    <meta:generator>LibreOffice/24.2.7.2$Linux_X86_64 LibreOffice_project/420$Build-2</meta:generator>
    <dc:creator>corrado tafaro</dc:creator>
    <meta:document-statistic meta:table-count="0" meta:image-count="0" meta:object-count="0" meta:page-count="4" meta:paragraph-count="16" meta:word-count="665" meta:character-count="4708" meta:non-whitespace-character-count="4052"/>
  </office:meta>
</office:document-meta>
</file>