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Z003" svg:font-family="Z003" style:font-pitch="variable"/>
  </office:font-face-decls>
  <office:automatic-styles>
    <style:style style:name="P1" style:family="paragraph" style:parent-style-name="Standard">
      <style:paragraph-properties fo:margin-top="0cm" fo:margin-bottom="0cm" style:contextual-spacing="false" fo:text-align="center" style:justify-single-word="false"/>
      <style:text-properties style:font-name="Z003" fo:font-size="18pt" fo:font-weight="normal" officeooo:paragraph-rsid="002443b1" style:font-size-asian="18pt" style:font-weight-asian="normal" style:font-size-complex="18pt" style:font-weight-complex="normal"/>
    </style:style>
    <style:style style:name="P2" style:family="paragraph" style:parent-style-name="Quotations">
      <style:paragraph-properties fo:margin-top="0cm" fo:margin-bottom="0.3cm" style:contextual-spacing="false" fo:line-height="115%" fo:text-align="center" style:justify-single-word="false"/>
      <style:text-properties style:font-name="Noto Sans1" fo:font-size="12pt" fo:font-style="italic" style:font-size-asian="12pt" style:font-size-complex="12pt"/>
    </style:style>
    <style:style style:name="P3" style:family="paragraph" style:parent-style-name="Text_20_body">
      <style:paragraph-properties fo:margin-top="0.101cm" fo:margin-bottom="0cm" style:contextual-spacing="false" fo:line-height="115%"/>
      <style:text-properties style:font-name="Noto Sans1" fo:font-size="12pt" fo:font-style="italic" officeooo:rsid="002e5324" officeooo:paragraph-rsid="002e5324" style:font-size-asian="12pt" style:font-style-asian="italic" style:font-size-complex="12pt" style:font-style-complex="italic"/>
    </style:style>
    <style:style style:name="P4" style:family="paragraph" style:parent-style-name="Text_20_body">
      <style:paragraph-properties fo:margin-top="0.101cm" fo:margin-bottom="0.101cm" style:contextual-spacing="false" fo:line-height="115%" fo:text-align="justify" style:justify-single-word="false"/>
      <style:text-properties style:font-name="Noto Sans1" fo:font-size="12pt" style:font-size-asian="12pt" style:font-size-complex="12pt"/>
    </style:style>
    <style:style style:name="P5" style:family="paragraph" style:parent-style-name="Text_20_body">
      <style:paragraph-properties fo:margin-top="0cm" fo:margin-bottom="0.101cm" style:contextual-spacing="false" fo:line-height="115%" fo:text-align="justify" style:justify-single-word="false"/>
      <style:text-properties style:font-name="Noto Sans1" fo:font-size="12pt" officeooo:paragraph-rsid="002c7775" style:font-size-asian="12pt" style:font-size-complex="12pt"/>
    </style:style>
    <style:style style:name="P6" style:family="paragraph" style:parent-style-name="Text_20_body">
      <style:paragraph-properties fo:margin-top="0.101cm" fo:margin-bottom="0cm" style:contextual-spacing="false" fo:line-height="115%" fo:text-align="justify" style:justify-single-word="false"/>
      <style:text-properties style:font-name="Noto Sans1" fo:font-size="12pt" officeooo:paragraph-rsid="00332284" style:font-size-asian="12pt" style:font-size-complex="12pt"/>
    </style:style>
    <style:style style:name="P7" style:family="paragraph" style:parent-style-name="Text_20_body">
      <style:paragraph-properties fo:margin-top="0.101cm" fo:margin-bottom="0cm" style:contextual-spacing="false" fo:line-height="115%" fo:text-align="justify" style:justify-single-word="false"/>
      <style:text-properties style:font-name="Noto Sans1" fo:font-size="12pt" officeooo:paragraph-rsid="002b04d9" style:font-size-asian="12pt" style:font-size-complex="12pt"/>
    </style:style>
    <style:style style:name="P8" style:family="paragraph" style:parent-style-name="Text_20_body">
      <style:paragraph-properties fo:line-height="115%" fo:text-align="justify" style:justify-single-word="false"/>
      <style:text-properties style:font-name="Noto Sans1" fo:font-size="12pt" officeooo:paragraph-rsid="002b04d9" style:font-size-asian="12pt" style:font-size-complex="12pt"/>
    </style:style>
    <style:style style:name="P9" style:family="paragraph" style:parent-style-name="Text_20_body">
      <style:paragraph-properties fo:margin-top="0.101cm" fo:margin-bottom="0cm" style:contextual-spacing="false" fo:line-height="115%" fo:text-align="justify" style:justify-single-word="false"/>
      <style:text-properties style:font-name="Noto Sans1" fo:font-size="12pt" officeooo:paragraph-rsid="0033cd3a" style:font-size-asian="12pt" style:font-size-complex="12pt"/>
    </style:style>
    <style:style style:name="P10" style:family="paragraph" style:parent-style-name="Text_20_body">
      <style:paragraph-properties fo:margin-top="0cm" fo:margin-bottom="0cm" style:contextual-spacing="false" fo:line-height="115%" fo:text-align="justify" style:justify-single-word="false"/>
      <style:text-properties style:font-name="Noto Sans1" fo:font-size="12pt" officeooo:paragraph-rsid="003810f6" style:font-size-asian="12pt" style:font-size-complex="12pt"/>
    </style:style>
    <style:style style:name="P11" style:family="paragraph" style:parent-style-name="Text_20_body">
      <style:paragraph-properties fo:margin-top="0.101cm" fo:margin-bottom="0cm" style:contextual-spacing="false" fo:line-height="115%" fo:text-align="justify" style:justify-single-word="false"/>
      <style:text-properties style:font-name="Noto Sans1" fo:font-size="12pt" officeooo:paragraph-rsid="003810f6" style:font-size-asian="12pt" style:font-size-complex="12pt"/>
    </style:style>
    <style:style style:name="P12" style:family="paragraph" style:parent-style-name="Text_20_body">
      <style:paragraph-properties fo:margin-top="0.101cm" fo:margin-bottom="0cm" style:contextual-spacing="false" fo:line-height="115%" fo:text-align="justify" style:justify-single-word="false"/>
      <style:text-properties style:font-name="Noto Sans1" fo:font-size="12pt" style:font-size-asian="12pt" style:font-size-complex="12pt"/>
    </style:style>
    <style:style style:name="P13" style:family="paragraph" style:parent-style-name="Text_20_body">
      <style:paragraph-properties fo:margin-top="0cm" fo:margin-bottom="0cm" style:contextual-spacing="false" fo:line-height="115%" fo:text-align="justify" style:justify-single-word="false"/>
      <style:text-properties style:font-name="Noto Sans1" fo:font-size="12pt" officeooo:paragraph-rsid="003845bd" style:font-size-asian="12pt" style:font-size-complex="12pt"/>
    </style:style>
    <style:style style:name="P14" style:family="paragraph" style:parent-style-name="Text_20_body">
      <style:paragraph-properties fo:margin-top="0.101cm" fo:margin-bottom="0cm" style:contextual-spacing="false" fo:line-height="115%" fo:text-align="justify" style:justify-single-word="false"/>
      <style:text-properties style:font-name="Noto Sans1" fo:font-size="12pt" officeooo:paragraph-rsid="003845bd" style:font-size-asian="12pt" style:font-size-complex="12pt"/>
    </style:style>
    <style:style style:name="P15" style:family="paragraph" style:parent-style-name="Heading_20_2">
      <style:paragraph-properties fo:line-height="115%" fo:text-align="justify" style:justify-single-word="false"/>
      <style:text-properties style:use-window-font-color="true" loext:opacity="0%" style:font-name="Noto Sans1" fo:font-size="12pt" officeooo:paragraph-rsid="002443b1" style:font-size-asian="12pt" style:font-size-complex="12pt"/>
    </style:style>
    <style:style style:name="P16" style:family="paragraph" style:parent-style-name="Text_20_body">
      <style:paragraph-properties fo:margin-top="0.3cm" fo:margin-bottom="0cm" style:contextual-spacing="false" fo:line-height="115%" fo:text-align="justify" style:justify-single-word="false"/>
      <style:text-properties style:use-window-font-color="true" loext:opacity="0%" style:font-name="Noto Sans1" fo:font-size="12pt" style:font-size-asian="12pt" style:font-size-complex="12pt"/>
    </style:style>
    <style:style style:name="P17" style:family="paragraph" style:parent-style-name="Text_20_body">
      <style:paragraph-properties fo:margin-top="0cm" fo:margin-bottom="0cm" style:contextual-spacing="false" fo:line-height="115%" fo:text-align="justify" style:justify-single-word="false"/>
      <style:text-properties style:use-window-font-color="true" loext:opacity="0%" style:font-name="Noto Sans1" fo:font-size="12pt" style:font-size-asian="12pt" style:font-size-complex="12pt"/>
    </style:style>
    <style:style style:name="P18" style:family="paragraph" style:parent-style-name="Text_20_body">
      <style:paragraph-properties fo:margin-top="0cm" fo:margin-bottom="0cm" style:contextual-spacing="false" fo:line-height="115%" fo:text-align="justify" style:justify-single-word="false"/>
      <style:text-properties style:use-window-font-color="true" loext:opacity="0%" style:font-name="Noto Sans1" fo:font-size="12pt" officeooo:paragraph-rsid="003542d4" style:font-size-asian="12pt" style:font-size-complex="12pt"/>
    </style:style>
    <style:style style:name="P19" style:family="paragraph" style:parent-style-name="Text_20_body">
      <style:paragraph-properties fo:line-height="115%" fo:text-align="justify" style:justify-single-word="false"/>
      <style:text-properties style:use-window-font-color="true" loext:opacity="0%" style:font-name="Noto Sans1" fo:font-size="12pt" style:font-size-asian="12pt" style:font-size-complex="12pt"/>
    </style:style>
    <style:style style:name="P20" style:family="paragraph" style:parent-style-name="Text_20_body">
      <style:paragraph-properties fo:margin-top="0.101cm" fo:margin-bottom="0cm" style:contextual-spacing="false" fo:line-height="115%" fo:text-align="justify" style:justify-single-word="false"/>
      <style:text-properties style:use-window-font-color="true" loext:opacity="0%" style:font-name="Noto Sans1" fo:font-size="12pt" officeooo:paragraph-rsid="002bb69e" style:font-size-asian="12pt" style:font-size-complex="12pt"/>
    </style:style>
    <style:style style:name="P21" style:family="paragraph" style:parent-style-name="Text_20_body">
      <style:paragraph-properties fo:margin-top="0.101cm" fo:margin-bottom="0cm" style:contextual-spacing="false" fo:line-height="115%" fo:text-align="justify" style:justify-single-word="false"/>
      <style:text-properties style:use-window-font-color="true" loext:opacity="0%" style:font-name="Noto Sans1" fo:font-size="12pt" officeooo:paragraph-rsid="002c1260" style:font-size-asian="12pt" style:font-size-complex="12pt"/>
    </style:style>
    <style:style style:name="P22" style:family="paragraph" style:parent-style-name="Text_20_body">
      <style:paragraph-properties fo:margin-top="0cm" fo:margin-bottom="0.101cm" style:contextual-spacing="false" fo:line-height="115%" fo:text-align="justify" style:justify-single-word="false"/>
      <style:text-properties style:use-window-font-color="true" loext:opacity="0%" style:font-name="Noto Sans1" fo:font-size="12pt" style:font-size-asian="12pt" style:font-size-complex="12pt"/>
    </style:style>
    <style:style style:name="P23" style:family="paragraph" style:parent-style-name="Text_20_body">
      <style:paragraph-properties fo:margin-top="0.101cm" fo:margin-bottom="0cm" style:contextual-spacing="false" fo:line-height="115%" fo:text-align="justify" style:justify-single-word="false"/>
      <style:text-properties style:use-window-font-color="true" loext:opacity="0%" style:font-name="Noto Sans1" fo:font-size="12pt" style:font-size-asian="12pt" style:font-size-complex="12pt"/>
    </style:style>
    <style:style style:name="P24" style:family="paragraph" style:parent-style-name="Text_20_body">
      <style:paragraph-properties fo:margin-top="0.101cm" fo:margin-bottom="0cm" style:contextual-spacing="false" fo:line-height="115%" fo:text-align="justify" style:justify-single-word="false"/>
      <style:text-properties style:use-window-font-color="true" loext:opacity="0%" style:font-name="Noto Sans1" fo:font-size="12pt" officeooo:paragraph-rsid="0035bdd2" style:font-size-asian="12pt" style:font-size-complex="12pt"/>
    </style:style>
    <style:style style:name="P25" style:family="paragraph" style:parent-style-name="Text_20_body">
      <style:paragraph-properties fo:margin-top="0.101cm" fo:margin-bottom="0cm" style:contextual-spacing="false" fo:line-height="115%" fo:text-align="justify" style:justify-single-word="false"/>
      <style:text-properties style:use-window-font-color="true" loext:opacity="0%" style:font-name="Noto Sans1" fo:font-size="12pt" officeooo:paragraph-rsid="00365444" style:font-size-asian="12pt" style:font-size-complex="12pt"/>
    </style:style>
    <style:style style:name="P26" style:family="paragraph" style:parent-style-name="Text_20_body">
      <style:paragraph-properties fo:margin-top="0cm" fo:margin-bottom="0cm" style:contextual-spacing="false" fo:line-height="115%" fo:text-align="justify" style:justify-single-word="false"/>
      <style:text-properties style:use-window-font-color="true" loext:opacity="0%" style:font-name="Noto Sans1" fo:font-size="12pt" officeooo:paragraph-rsid="00365444" style:font-size-asian="12pt" style:font-size-complex="12pt"/>
    </style:style>
    <style:style style:name="P27" style:family="paragraph" style:parent-style-name="Text_20_body">
      <style:paragraph-properties fo:margin-top="0.101cm" fo:margin-bottom="0.101cm" style:contextual-spacing="false" fo:line-height="115%" fo:text-align="justify" style:justify-single-word="false"/>
      <style:text-properties style:use-window-font-color="true" loext:opacity="0%" style:font-name="Noto Sans1" fo:font-size="12pt" style:font-size-asian="12pt" style:font-size-complex="12pt"/>
    </style:style>
    <style:style style:name="P28" style:family="paragraph" style:parent-style-name="Text_20_body">
      <style:paragraph-properties fo:margin-top="0.101cm" fo:margin-bottom="0cm" style:contextual-spacing="false" fo:line-height="115%" fo:text-align="justify" style:justify-single-word="false"/>
      <style:text-properties style:use-window-font-color="true" loext:opacity="0%" style:font-name="Noto Sans1"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Text_20_body">
      <style:paragraph-properties fo:margin-top="0.101cm" fo:margin-bottom="0cm" style:contextual-spacing="false" fo:line-height="115%" fo:text-align="justify" style:justify-single-word="false"/>
      <style:text-properties style:use-window-font-color="true" loext:opacity="0%" style:font-name="Noto Sans1" fo:font-size="12pt" fo:font-style="italic" style:font-size-asian="12pt" style:font-style-asian="italic" style:font-size-complex="12pt" style:font-style-complex="italic"/>
    </style:style>
    <style:style style:name="P30" style:family="paragraph" style:parent-style-name="Text_20_body">
      <style:paragraph-properties fo:margin-top="0.199cm" fo:margin-bottom="0cm" style:contextual-spacing="false" fo:line-height="115%" fo:text-align="justify" style:justify-single-word="false"/>
      <style:text-properties style:use-window-font-color="true" loext:opacity="0%" style:font-name="Noto Sans1" fo:font-size="12pt" fo:font-style="italic" style:font-size-asian="12pt" style:font-style-asian="italic" style:font-size-complex="12pt" style:font-style-complex="italic"/>
    </style:style>
    <style:style style:name="P31" style:family="paragraph" style:parent-style-name="Text_20_body">
      <style:paragraph-properties fo:margin-top="0cm" fo:margin-bottom="0.101cm" style:contextual-spacing="false" fo:line-height="115%" fo:text-align="justify" style:justify-single-word="false"/>
      <style:text-properties fo:font-variant="normal" fo:text-transform="none" style:use-window-font-color="true" loext:opacity="0%" style:font-name="Noto Sans1" fo:font-size="12pt" fo:letter-spacing="normal" fo:font-style="normal" fo:font-weight="normal" officeooo:paragraph-rsid="002c7775" style:font-size-asian="12pt" style:font-size-complex="12pt"/>
    </style:style>
    <style:style style:name="P32" style:family="paragraph" style:parent-style-name="Text_20_body">
      <style:paragraph-properties fo:margin-left="0cm" fo:margin-right="0cm" fo:margin-top="0.101cm" fo:margin-bottom="0cm" style:contextual-spacing="false" fo:line-height="115%" fo:text-align="justify" style:justify-single-word="false" fo:orphans="2" fo:widows="2" fo:text-indent="0cm" style:auto-text-indent="false"/>
      <style:text-properties officeooo:paragraph-rsid="002e5324"/>
    </style:style>
    <style:style style:name="P33" style:family="paragraph" style:parent-style-name="Text_20_body">
      <style:paragraph-properties fo:margin-top="0.101cm" fo:margin-bottom="0cm" style:contextual-spacing="false" fo:line-height="115%" fo:text-align="justify" style:justify-single-word="false"/>
      <style:text-properties officeooo:paragraph-rsid="0034f418"/>
    </style:style>
    <style:style style:name="P34" style:family="paragraph" style:parent-style-name="Text_20_body">
      <style:paragraph-properties fo:margin-top="0cm" fo:margin-bottom="0cm" style:contextual-spacing="false" fo:line-height="115%" fo:text-align="justify" style:justify-single-word="false"/>
      <style:text-properties officeooo:paragraph-rsid="0035bdd2"/>
    </style:style>
    <style:style style:name="P35" style:family="paragraph" style:parent-style-name="Heading_20_2">
      <style:paragraph-properties fo:margin-top="0cm" fo:margin-bottom="0cm" style:contextual-spacing="false" fo:text-align="justify" style:justify-single-word="false"/>
      <style:text-properties fo:font-variant="normal" fo:text-transform="none" style:use-window-font-color="true" loext:opacity="0%" style:font-name="Noto Sans1" fo:font-size="12pt" fo:letter-spacing="normal" fo:font-style="normal" fo:font-weight="normal" officeooo:paragraph-rsid="0034f418" style:font-size-asian="12pt" style:font-weight-asian="normal" style:font-size-complex="12pt" style:font-weight-complex="normal"/>
    </style:style>
    <style:style style:name="P36" style:family="paragraph" style:parent-style-name="Text_20_body" style:list-style-name="L2">
      <style:paragraph-properties fo:margin-top="0.101cm" fo:margin-bottom="0cm" style:contextual-spacing="false" fo:line-height="115%"/>
      <style:text-properties style:font-name="Noto Sans1" fo:font-size="12pt" style:font-size-asian="12pt" style:font-size-complex="12pt"/>
    </style:style>
    <style:style style:name="P37" style:family="paragraph" style:parent-style-name="Text_20_body" style:list-style-name="L2">
      <style:paragraph-properties fo:line-height="115%"/>
      <style:text-properties style:font-name="Noto Sans1" fo:font-size="12pt" style:font-size-asian="12pt" style:font-size-complex="12pt"/>
    </style:style>
    <style:style style:name="P38" style:family="paragraph" style:parent-style-name="Text_20_body" style:list-style-name="L3">
      <style:paragraph-properties fo:margin-top="0.199cm" fo:margin-bottom="0cm" style:contextual-spacing="false" fo:line-height="115%"/>
      <style:text-properties style:font-name="Noto Sans1" fo:font-size="12pt" style:font-size-asian="12pt" style:font-size-complex="12pt"/>
    </style:style>
    <style:style style:name="P39" style:family="paragraph" style:parent-style-name="Text_20_body" style:list-style-name="L3">
      <style:paragraph-properties fo:margin-top="0cm" fo:margin-bottom="0cm" style:contextual-spacing="false" fo:line-height="115%"/>
      <style:text-properties style:font-name="Noto Sans1" fo:font-size="12pt" style:font-size-asian="12pt" style:font-size-complex="12pt"/>
    </style:style>
    <style:style style:name="P40" style:family="paragraph" style:parent-style-name="Text_20_body" style:list-style-name="L1">
      <style:paragraph-properties fo:margin-top="0.101cm" fo:margin-bottom="0cm" style:contextual-spacing="false" fo:line-height="115%" fo:text-align="justify" style:justify-single-word="false"/>
      <style:text-properties style:use-window-font-color="true" loext:opacity="0%" style:font-name="Noto Sans1" fo:font-size="12pt" officeooo:paragraph-rsid="003542d4" style:font-size-asian="12pt" style:font-size-complex="12pt"/>
    </style:style>
    <style:style style:name="P41" style:family="paragraph" style:parent-style-name="Text_20_body" style:list-style-name="L1">
      <style:paragraph-properties fo:margin-top="0cm" fo:margin-bottom="0cm" style:contextual-spacing="false" fo:line-height="115%" fo:text-align="justify" style:justify-single-word="false"/>
      <style:text-properties style:use-window-font-color="true" loext:opacity="0%" style:font-name="Noto Sans1" fo:font-size="12pt" style:font-size-asian="12pt" style:font-size-complex="12pt"/>
    </style:style>
    <style:style style:name="P42" style:family="paragraph" style:parent-style-name="Text_20_body" style:list-style-name="L1">
      <style:paragraph-properties fo:margin-top="0cm" fo:margin-bottom="0cm" style:contextual-spacing="false" fo:line-height="115%" fo:text-align="justify" style:justify-single-word="false"/>
      <style:text-properties style:use-window-font-color="true" loext:opacity="0%" style:font-name="Noto Sans1" fo:font-size="12pt" officeooo:paragraph-rsid="0035bdd2" style:font-size-asian="12pt" style:font-size-complex="12pt"/>
    </style:style>
    <style:style style:name="T1" style:family="text">
      <style:text-properties fo:font-variant="normal" fo:text-transform="none" style:use-window-font-color="true" loext:opacity="0%" style:font-name="Noto Sans1"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style:use-window-font-color="true" loext:opacity="0%" style:font-name="Noto Sans1" fo:font-size="12pt" fo:letter-spacing="normal" fo:font-style="normal" fo:font-weight="normal" officeooo:rsid="002e5324" style:font-size-asian="12pt" style:font-weight-asian="normal" style:font-size-complex="12pt" style:font-weight-complex="normal"/>
    </style:style>
    <style:style style:name="T3" style:family="text">
      <style:text-properties fo:font-variant="normal" fo:text-transform="none" style:use-window-font-color="true" loext:opacity="0%" style:font-name="Noto Sans1" fo:font-size="12pt" fo:letter-spacing="normal" fo:font-style="normal" fo:font-weight="normal" style:font-size-asian="12pt" style:font-size-complex="12pt"/>
    </style:style>
    <style:style style:name="T4" style:family="text">
      <style:text-properties fo:font-variant="normal" fo:text-transform="none" style:use-window-font-color="true" loext:opacity="0%" style:font-name="Noto Sans1" fo:font-size="12pt" fo:letter-spacing="normal" fo:font-style="normal" fo:font-weight="normal" officeooo:rsid="0033cd3a" style:font-size-asian="12pt" style:font-size-complex="12pt"/>
    </style:style>
    <style:style style:name="T5" style:family="text">
      <style:text-properties fo:font-variant="normal" fo:text-transform="none" style:use-window-font-color="true" loext:opacity="0%" style:font-name="Noto Sans1" fo:font-size="12pt" fo:letter-spacing="normal" fo:font-style="normal" fo:font-weight="bold" style:font-size-asian="12pt" style:font-size-complex="12pt"/>
    </style:style>
    <style:style style:name="T6" style:family="text">
      <style:text-properties fo:font-variant="normal" fo:text-transform="none" style:use-window-font-color="true" loext:opacity="0%" style:font-name="Noto Sans1" fo:font-size="12pt" fo:letter-spacing="normal" fo:font-style="italic" fo:font-weight="normal" style:font-size-asian="12pt" style:font-style-asian="italic" style:font-weight-asian="normal" style:font-size-complex="12pt" style:font-style-complex="italic" style:font-weight-complex="normal"/>
    </style:style>
    <style:style style:name="T7" style:family="text">
      <style:text-properties fo:font-variant="normal" fo:text-transform="none" style:use-window-font-color="true" loext:opacity="0%" style:font-name="Noto Sans1" fo:font-size="12pt" fo:letter-spacing="normal" fo:font-style="italic" fo:font-weight="normal" officeooo:rsid="0033cd3a" style:font-size-asian="12pt" style:font-style-asian="italic" style:font-weight-asian="normal" style:font-size-complex="12pt" style:font-style-complex="italic" style:font-weight-complex="normal"/>
    </style:style>
    <style:style style:name="T8" style:family="text">
      <style:text-properties fo:font-variant="normal" fo:text-transform="none" fo:letter-spacing="normal" fo:font-style="italic" fo:font-weight="normal" style:font-style-asian="italic" style:font-style-complex="italic"/>
    </style:style>
    <style:style style:name="T9" style:family="text">
      <style:text-properties fo:font-variant="normal" fo:text-transform="none" fo:letter-spacing="normal" fo:font-style="normal" fo:font-weight="normal"/>
    </style:style>
    <style:style style:name="T10" style:family="text">
      <style:text-properties fo:font-weight="bold"/>
    </style:style>
    <style:style style:name="T11" style:family="text">
      <style:text-properties officeooo:rsid="00231172"/>
    </style:style>
    <style:style style:name="T12" style:family="text">
      <style:text-properties officeooo:rsid="00240656"/>
    </style:style>
    <style:style style:name="T13" style:family="text">
      <style:text-properties fo:font-style="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officeooo:rsid="003810f6" style:font-style-asian="italic" style:font-style-complex="italic"/>
    </style:style>
    <style:style style:name="T17" style:family="text">
      <style:text-properties fo:font-style="italic" officeooo:rsid="002e5324"/>
    </style:style>
    <style:style style:name="T18" style:family="text">
      <style:text-properties officeooo:rsid="002443b1"/>
    </style:style>
    <style:style style:name="T19" style:family="text">
      <style:text-properties officeooo:rsid="00262bb7"/>
    </style:style>
    <style:style style:name="T20" style:family="text">
      <style:text-properties officeooo:rsid="002750f9"/>
    </style:style>
    <style:style style:name="T21" style:family="text">
      <style:text-properties style:use-window-font-color="true" loext:opacity="0%"/>
    </style:style>
    <style:style style:name="T22" style:family="text">
      <style:text-properties style:use-window-font-color="true" loext:opacity="0%" fo:font-weight="bold"/>
    </style:style>
    <style:style style:name="T23" style:family="text">
      <style:text-properties style:use-window-font-color="true" loext:opacity="0%" officeooo:rsid="002913f0"/>
    </style:style>
    <style:style style:name="T24" style:family="text">
      <style:text-properties style:use-window-font-color="true" loext:opacity="0%" fo:font-style="italic" officeooo:rsid="002913f0" style:font-style-asian="italic" style:font-style-complex="italic"/>
    </style:style>
    <style:style style:name="T25" style:family="text">
      <style:text-properties style:use-window-font-color="true" loext:opacity="0%" officeooo:rsid="002b04d9"/>
    </style:style>
    <style:style style:name="T26" style:family="text">
      <style:text-properties style:use-window-font-color="true" loext:opacity="0%" style:font-name="Noto Sans1" fo:font-size="12pt" style:font-size-asian="12pt" style:font-size-complex="12pt"/>
    </style:style>
    <style:style style:name="T27" style:family="text">
      <style:text-properties style:use-window-font-color="true" loext:opacity="0%" style:font-name="Noto Sans1" fo:font-size="12pt" officeooo:rsid="0035bdd2" style:font-size-asian="12pt" style:font-size-complex="12pt"/>
    </style:style>
    <style:style style:name="T28" style:family="text">
      <style:text-properties officeooo:rsid="002b04d9"/>
    </style:style>
    <style:style style:name="T29" style:family="text">
      <style:text-properties officeooo:rsid="002bb69e"/>
    </style:style>
    <style:style style:name="T30" style:family="text">
      <style:text-properties fo:font-style="normal" style:font-style-asian="normal" style:font-style-complex="normal"/>
    </style:style>
    <style:style style:name="T31" style:family="text">
      <style:text-properties fo:font-style="normal" officeooo:rsid="002bb69e" style:font-style-asian="normal" style:font-style-complex="normal"/>
    </style:style>
    <style:style style:name="T32" style:family="text">
      <style:text-properties fo:font-style="normal" officeooo:rsid="002e5324" style:font-style-asian="normal" style:font-style-complex="normal"/>
    </style:style>
    <style:style style:name="T33" style:family="text">
      <style:text-properties fo:font-style="normal" officeooo:rsid="0035bdd2" style:font-style-asian="normal" style:font-style-complex="normal"/>
    </style:style>
    <style:style style:name="T34" style:family="text">
      <style:text-properties fo:font-style="normal" officeooo:rsid="00365444" style:font-style-asian="normal" style:font-style-complex="normal"/>
    </style:style>
    <style:style style:name="T35" style:family="text">
      <style:text-properties officeooo:rsid="002c1260"/>
    </style:style>
    <style:style style:name="T36" style:family="text">
      <style:text-properties officeooo:rsid="002c5498"/>
    </style:style>
    <style:style style:name="T37" style:family="text">
      <style:text-properties officeooo:rsid="002e5324"/>
    </style:style>
    <style:style style:name="T38" style:family="text">
      <style:text-properties officeooo:rsid="00332284"/>
    </style:style>
    <style:style style:name="T39" style:family="text">
      <style:text-properties officeooo:rsid="0033cd3a"/>
    </style:style>
    <style:style style:name="T40" style:family="text">
      <style:text-properties fo:font-weight="normal" style:font-weight-asian="normal" style:font-weight-complex="normal"/>
    </style:style>
    <style:style style:name="T41" style:family="text">
      <style:text-properties officeooo:rsid="0035bdd2"/>
    </style:style>
    <style:style style:name="T42" style:family="text">
      <style:text-properties officeooo:rsid="00365444"/>
    </style:style>
    <style:style style:name="T43" style:family="text">
      <style:text-properties officeooo:rsid="003871d5"/>
    </style:style>
    <style:style style:name="fr1" style:family="graphic" style:parent-style-name="Frame">
      <style:graphic-properties style:wrap="parallel" style:number-wrapped-paragraphs="no-limit" style:vertical-pos="from-top" style:vertical-rel="paragraph" style:horizontal-pos="from-left" style:horizontal-rel="paragraph" fo:padding="0.55cm" fo:border="0.06pt solid #000000" style:shadow="#808080 0.176cm -0.176cm" draw:shadow-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Cornice1" text:anchor-type="paragraph" svg:x="-0.161cm" svg:y="0.277cm" svg:width="11.592cm" draw:z-index="0"><draw:text-box fo:min-height="3.149cm"><text:h text:style-name="P35" text:outline-level="2">Talete di Mileto, annoverato tra i Sette savi della Grecia antica, gettò le basi della filosofia occidentale con un monito di sorprendente attualità.</text:h></draw:text-box></draw:frame>«La cosa più difficile è conoscere noi stessi; la più facile è parlare male degli altri».</text:p>
      <text:p text:style-name="P16"><text:span text:style-name="T11">I</text:span>l precetto "<text:span text:style-name="T33">c</text:span><text:span text:style-name="T30">onosci te stesso</text:span>" è una delle pietre miliari della filosofia occidentale, ma la sua paternità è avvolta nel mistero e nel mito.</text:p>
      <text:p text:style-name="P24">Sebbene oggi lo associamo istintivamente a Socrate, la tradizione antica lo attribuisce spesso proprio a Talete di Mileto, considerato il primo filosofo della storia.</text:p>
      <text:p text:style-name="P24">Nell'antichità, il motto era inciso sul frontone del Tempio di Apollo a Delfi. Molti autori antichi (tra cui Diogene Laerzio) sostengono che la frase fosse farina del sacco di uno dei "Sette Sapienti" <text:span text:style-name="T41">e </text:span>Talete, essendo il più celebre di questo gruppo, è spesso indicato come l'autore originale.</text:p>
      <text:p text:style-name="P24">C'è un aneddoto molto famoso che mette in luce l'ironia dietro questa attribuzione. Si dice che Talete, mentre camminava guardando le stelle per studiare il cielo, cadde in un pozzo. Una serva tracia lo derise dicendo:</text:p>
      <text:p text:style-name="P17">"Ti preoccupi di conoscere le cose del cielo, ma non vedi nemmeno cosa c'è sotto i tuoi piedi!"</text:p>
      <text:p text:style-name="P17"><text:soft-page-break/>Questo contrasto rende il "conosci te stesso" ancora più potente: invita l'uomo a non perdersi solo nelle astrazioni del cosmo, ma a comprendere i propri limiti e la propria natura umana.</text:p>
      <text:p text:style-name="P18">A differenza dell'interpretazione moderna (che è psicologica o introspettiva), per un sapiente dell'epoca di Talete "conosci te stesso" significava probabilmente:</text:p>
      <text:list text:style-name="L1">
        <text:list-item>
          <text:p text:style-name="P40">Ricordati che sei un uomo e non un dio.</text:p>
        </text:list-item>
        <text:list-item>
          <text:p text:style-name="P41">Non eccedere, trova l'equilibrio.</text:p>
        </text:list-item>
        <text:list-item>
          <text:p text:style-name="P42">Comprendi la tua posizione all'interno dell'ordine naturale (Physis).</text:p>
        </text:list-item>
      </text:list>
      <text:p text:style-name="P34"><text:span text:style-name="T26">È curioso notare come la risposta di Talete alla domanda "Cosa c'è di più difficile?" fosse proprio "</text:span><text:span text:style-name="T27">c</text:span><text:span text:style-name="T26">onoscere se stessi", mentre alla domanda "</text:span><text:span text:style-name="T27">c</text:span><text:span text:style-name="T26">osa c'è di più facile?" rispondesse "Dare consigli agli altri".</text:span></text:p>
      <text:p text:style-name="P23"><text:span text:style-name="T11">N</text:span>elle fonti antiche (come Diogene Laerzio), alla domanda su cosa fosse più facile, Talete risponde spesso <text:span text:style-name="T10">"dare consigli agli altri"</text:span>, ma la versione <text:span text:style-name="T10">"parlar male degli altri"</text:span> è una variante molto diffusa che sottolinea quanto sia facile giudicare l'esterno piuttosto che guardarsi dentro.</text:p>
      <text:p text:style-name="P23"><text:span text:style-name="T12">I</text:span>l passaggio di questo concetto da Talete a <text:span text:style-name="T40">Socrate</text:span> segna una vera e propria rivoluzione nel pensiero occidentale. Se per Talete era un "massima di saggezza", per Socrate diventa il cuore pulsante di tutta la vita.</text:p>
      <text:p text:style-name="P23"><text:soft-page-break/>Per Talete e i Sette Sapienti, "<text:span text:style-name="T41">c</text:span>onosci te stesso" era un monito di umiltà: "<text:span text:style-name="T41">r</text:span>icordati che sei un uomo, non un dio; conosci i tuoi limiti e non eccedere". Socrate trasforma questo limite in uno stimolo positivo. Non è più solo un "stai al tuo posto", ma un "scava dentro di te". Per Socrate, conoscere se stessi significa scoprire che la verità non è fuori, tra le stelle o nell'acqua, ma risiede nell'anima (Psyché).</text:p>
      <text:p text:style-name="P23">Prima di Socrate, la parola "anima" indicava spesso solo il soffio vitale. Con Socrate, l'anima diventa il <text:span text:style-name="T40">centro della personalità morale.</text:span></text:p>
      <text:list text:style-name="L2">
        <text:list-item>
          <text:p text:style-name="P36"><text:span text:style-name="T40">Talete:</text:span> <text:span text:style-name="T41">g</text:span>uardava la <text:span text:style-name="T13">Physis</text:span> (la natura). Il "sé" era parte del cosmo.</text:p>
        </text:list-item>
        <text:list-item>
          <text:p text:style-name="P37"><text:span text:style-name="T40">Socrate</text:span><text:span text:style-name="T10">:</text:span> <text:span text:style-name="T41">g</text:span>uarda l'<text:span text:style-name="T13">Anthropos</text:span> (l'uomo). Il "sé" è l'essenza intelligente e morale. Conoscere se stessi significa capire cosa è bene e cosa è male per la propria anima.</text:p>
        </text:list-item>
      </text:list>
      <text:p text:style-name="P17">Mentre per Talete il motto era una verità statica scolpita nella pietra, per Socrate è un <text:span text:style-name="T40">processo dinamico.</text:span> Socrate non "insegna" la conoscenza di sé, ma aiuta gli altri a "partorirla" attraverso il dialogo (la <text:span text:style-name="T13">maieutica</text:span>). Egli sostiene di essere ignorante "so di non sapere", e proprio questa consapevolezza è il primo passo del "conosci te stesso": liberarsi dalle false certezze per iniziare la ricerca.</text:p>
      <text:p text:style-name="P25"><text:soft-page-break/>La variante citat<text:span text:style-name="T12">a</text:span> ("parlar male degli altri") è particolarmente calzante per il metodo socratico. </text:p>
      <text:p text:style-name="P26">Socrate passava le giornate a interrogare persone che credevano di sapere tutto (politici, poeti, artigiani) e che spesso usavano la parola per criticare o convincere gli altri. Socrate dimostrava loro che, pur essendo abilissimi a parlare degli altri o del mondo, erano totalmente incapaci di spiegare <text:span text:style-name="T40">chi fossero </text:span>o cosa fosse la <text:span text:style-name="T40">virtù</text:span>.</text:p>
      <text:p text:style-name="P23"><text:span text:style-name="T12">Questo rappresenta </text:span>il punto di rottura tra la filosofia arcaica e quella classica che gli storici della filosofia chiamano la "svolta antropologica".</text:p>
      <text:p text:style-name="P23"><text:span text:style-name="T42">Punti chiave di </text:span>questa differenza metodologica:</text:p>
      <text:p text:style-name="P28">1. Talete: La ragione rivolta verso l'esterno (Macrocosmo)</text:p>
      <text:p text:style-name="P26">Talete è il padre del pensiero razionale perché per primo cercò una spiegazione del mondo che non dipendesse dagli dei, ma dall'osservazione della natura (physis).</text:p>
      <text:p text:style-name="P26"><text:span text:style-name="T29">Il suo metodo e</text:span>ra basato sull'osservazione empirica (l'acqua che si trasforma, il nutrimento umido degli esseri viventi) e sull'induzione.</text:p>
      <text:p text:style-name="P23"><text:span text:style-name="T42">L</text:span>'invito a conoscere se stessi era quasi un esercizio di classificazione, <text:span text:style-name="T42">l</text:span>'uomo doveva capire "cosa" fosse nel catalogo della natura: un essere mortale, limitato, soggetto alle leggi del cosmo. La ragione di Talete serviva a misurare il mondo e, di riflesso, a misurare la distanza tra l'uomo e l'infinito.</text:p>
      <text:p text:style-name="P29">2. Socrate: La ragione rivolta verso l'interno (Microcosmo)</text:p>
      <text:p text:style-name="P20"><text:soft-page-break/>Con Socrate, la ragione cambia bersaglio. Non gli interessa più sapere se l'origine di tutto sia l'acqua o l'aria (questioni che considerava sterili e insolubili), ma come l'uomo debba vivere. L'indagine non avviene più osservando i fenomeni naturali, ma attraverso il dialogo (logos). La verità non si cerca in un pozzo o nelle stelle, ma nell'interazione tra due coscienze. <text:span text:style-name="T31">“</text:span><text:span text:style-name="T34">C</text:span><text:span text:style-name="T30">onoscere se stessi” </text:span>significa esaminare i propri valori. Se Talete usava la ragione per capire il funzionamento del mondo, Socrate la usa come un bisturi per scrostare le false opinioni e arrivare all'essenza dell'anima (psyché).</text:p>
      <text:p text:style-name="P30">Il ribaltamento del concetto di "Difficoltà" <text:span text:style-name="T18">di </text:span>conoscere se stessi.</text:p>
      <text:p text:style-name="P21">Per Talete, è difficile capire chi siamo perché siamo una piccola parte di un meccanismo cosmico immenso, la difficoltà era oggettiva e conoscitiva.</text:p>
      <text:p text:style-name="P21">Per Socrate, <text:s/>è difficile conoscere se stessi perché richiede il coraggio di ammettere la propria ignoranza e di mettere in discussione ogni nostra certezza, la difficoltà è morale e psicologica.</text:p>
      <text:p text:style-name="P23">La citazione incisa sull'architrave del Teatro Massimo di Palermo, è un monito potente che si sposa perfettamente con il concetto socratico di "conoscere se stessi".</text:p>
      <text:p text:style-name="P19">L'iscrizione completa recita:</text:p>
      <text:p text:style-name="P2"><text:soft-page-break/>"Vano delle scene il diletto ove non miri a preparar l'avvenire. Non fia l'arte che a l'arte per diletto, se non mira a l'eccelso e al ver perfetto."</text:p>
      <text:p text:style-name="P17">Il messaggio è chiaro, l'arte (o lo spettacolo, la scena) non deve essere puro intrattenimento fine a se stesso. Se l'arte non ci trasforma, se non ci spinge a guardare "all'eccelso e al ver perfetto", allora è inutile.</text:p>
      <text:p text:style-name="P21"><text:span text:style-name="T35">La </text:span><text:span text:style-name="T19">preoccupazione di Socrate </text:span><text:span text:style-name="T35">esprime </text:span>esattamente la stessa <text:span text:style-name="T35">cosa, </text:span><text:span text:style-name="T19">l</text:span>e "scene" (il diletto) corrispondono alle "apparenze" e ai "filtri" moderni di cui <text:span text:style-name="T19">si parla oggi, </text:span><text:span text:style-name="T35">s</text:span>ono distrazioni che ci tengono sulla superficie delle cose.</text:p>
      <text:p text:style-name="P17">Preparare l'avvenire <text:span text:style-name="T19">per </text:span>Socrate, non significava accumulare ricchezze, ma "prendersi cura dell'anima". Solo chi si conosce può agire bene e, quindi, costruire un futuro autentico.</text:p>
      <text:p text:style-name="P29">Perché è così difficile guardarsi dentro oggi?</text:p>
      <text:p text:style-name="P27"><text:span text:style-name="T20">L</text:span>'introspezione oggi è quasi un atto rivoluzionario, <text:span text:style-name="T35">g</text:span>uardarsi dentro richiede silenzio. In un'epoca di notifiche costanti e stimoli digitali, il silenzio ci spaventa perché ci mette di fronte a quelle domande a cui non abbiamo ancora risposto. I social media ci spingono a costruire un "io" ideale e filtrato. Quando chiudiamo le app e ci guardiamo allo specchio interiore, la discrepanza tra l'immagine curata e la complessità dei nostri conflitti può essere dolorosa.</text:p>
      <text:p text:style-name="P22"><text:soft-page-break/>Come diceva Talete, è la cosa più difficile perché non sappiamo cosa troveremo. Guardarsi dentro significa scoprire anche le proprie ombre, le proprie fragilità e i propri fallimenti.</text:p>
      <text:p text:style-name="P22"><text:span text:style-name="T20">S</text:span>e Talete è stato il primo a dire "Guarda te stesso per capire i tuoi limiti" e Socrate ha aggiunto "Interroga te stesso per trovare la virtù", l'iscrizione del Teatro Massimo chiude il cerchio dicendo: "<text:span text:style-name="T15">Usa la bellezza e l'arte per elevare te stesso, altrimenti è solo tempo perso</text:span>".</text:p>
      <text:p text:style-name="P4"><text:span text:style-name="T22">Carl Jung</text:span><text:span text:style-name="T22"><text:note text:id="ftn1" text:note-class="footnote"><text:note-citation>1</text:note-citation><text:note-body><text:p text:style-name="Footnote"><text:span text:style-name="T36">E’</text:span> stato una delle principali figure intellettuali del pensiero psicologico, psicoanalitico e filosofico. La sua teoria <text:span text:style-name="T36">è </text:span>di derivazione psicoanalitica chiamata "psicologia analitica" o "psicologia del profondo".</text:p></text:note-body></text:note></text:span><text:span text:style-name="T21">, ha toccato il vertice psicologico di quel percorso iniziato con Talete e Socrate. Se Socrate ha spostato l'indagine dal cosmo all'anima, Jung ha esplorato i "meccanismi di difesa" che rendono quella stessa indagine così spaventosa. </text:span><text:span text:style-name="T23">Jung diceva: “</text:span><text:span text:style-name="T24">q</text:span><text:span text:style-name="T8">uello che neghi ti sottomette e quello che accetti ti trasforma</text:span><text:span text:style-name="T9">”.</text:span></text:p>
      <text:p text:style-name="P31">Guardare dentro di sé implica confrontarsi con le nostre paure, le nostre contraddizioni, le nostre ferite e persino le nostre ombre. Non è qualcosa di confortevole. Certa­mente, quando rimaniamo all’oscuro di noi stessi, è mol­to più facile erigere un piedistallo e credere di essere migliori di quanto realmente siamo.</text:p>
      <text:p text:style-name="P5"><text:span text:style-name="T10">Talete</text:span> diceva che conoscere se stessi è difficile, <text:span text:style-name="T10">Jung</text:span> ci spiega perché conoscere se stessi significa illuminare l'Ombra. Negare queste parti non le elimina; le rende <text:soft-page-break/>solo più forti nel subconscio, finché non finiscono per "sottometterci", guidando le nostre scelte a nostra insaputa (quello che spesso chiamiamo "destino").</text:p>
      <text:p text:style-name="P5">L'idea di Jung che "quello che accetti ti trasforma" è l'evoluzione moderna della <text:span text:style-name="T14">Maieutica socratica</text:span>. Socrate non voleva che i suoi interlocutori diventassero "perfetti", ma che diventassero "consapevoli". Solo quando accetti di "non sapere" (o di avere dei difetti, o di provare certe emozioni) smetti di sprecare energia nel nasconderli. Quell'energia si libera e diventa forza creativa per il cambiamento.</text:p>
      <text:p text:style-name="P10">Tornando alla scritta <text:span text:style-name="T37">del Teatro Massimo </text:span>di Palermo: <text:span text:style-name="T13">"Vano delle scene il diletto ove non miri a preparar l'avvenire" </text:span><text:span text:style-name="T32">equivale a dire che guardando</text:span><text:span text:style-name="T17"> </text:span>uno spettacolo e neg<text:span text:style-name="T37">ando</text:span> le emozioni scomode che ci suscita, restiamo nel "diletto vano". Se invece accettiamo quelle emozioni, l'opera d'arte diventa lo specchio junghiano che ci permette di integrare la nostra <text:span text:style-name="T16">o</text:span><text:span text:style-name="T15">mbra</text:span>. Solo così "prepariamo l'avvenire", perché diventiamo individui interi e non frammentati dalle nostre stesse negazioni.</text:p>
      <text:p text:style-name="P11"><text:span text:style-name="T25">Nell’epoca delle apparenze i filtri </text:span>sono strumenti tecnologici per negare il reale <text:span text:style-name="T28">e</text:span> Jung ci avverte che questa negazione collettiva ci sottomette a una profonda insoddisfazione. Siamo diventati, per certi versi, degli "schiavi della reazione, <text:span text:style-name="T28">n</text:span>on agiamo più in base a un'introspezione (il "conosci te stesso"), ma reagiamo a <text:soft-page-break/>stimoli esterni (notifiche, trend, aspettative sociali) <text:span text:style-name="T28">c</text:span>ome in ogni forma di schiavitù, il soggetto viene separato dalla propria essenza. Se sono costretto a rispondere costantemente a sollecitazioni esterne, non ho più il tempo né l'energia per abitare il mio spazio interiore.</text:p>
      <text:p text:style-name="P12">È un'ironia tragica, siamo la società più "connessa" della storia, ma forse la più "disconnessa" da se stessa.</text:p>
      <text:list text:style-name="L3">
        <text:list-item>
          <text:p text:style-name="P38"><text:span text:style-name="T10">Talete</text:span> guardava le stelle e cadeva nel pozzo, ma era una caduta verso la conoscenza.</text:p>
        </text:list-item>
        <text:list-item>
          <text:p text:style-name="P39"><text:span text:style-name="T10">Noi</text:span> guardiamo lo schermo e cadiamo nella banalità, una caduta che spesso non porta a nessuna consapevolezza, ma solo a un senso di vuoto.</text:p>
        </text:list-item>
      </text:list>
      <text:p text:style-name="P3">Cosa ci dice Talete in merito all’educazione moderna.</text:p>
      <text:p text:style-name="P32"><text:span text:style-name="Strong_20_Emphasis"><text:span text:style-name="T2">N</text:span></text:span><text:span text:style-name="Strong_20_Emphasis"><text:span text:style-name="T1">eanche il nostro contesto ci rende le cose facili</text:span></text:span><text:span text:style-name="T3">. Basti pensare al sistema educativo moderno, incentrato su prove standardizzate e risultati da quantificare numericamente, che ha lasciato poco spazio all’introspezione. Integrare pratiche di riflessione, apprendimento emotivo e sviluppo del carattere può aiutare i giovani non solo a comprendere il mondo, ma anche se stessi: “</text:span><text:span text:style-name="Strong_20_Emphasis"><text:span text:style-name="T6">uno strumento per giungere al vero apprendimento della vita”</text:span></text:span><text:span text:style-name="Strong_20_Emphasis"><text:span text:style-name="T5">, </text:span></text:span><text:span text:style-name="T3">che richiede onestà, coraggio e impegno verso la verità, non verso l’immagine. In definitiva, significa farsi carico della propria esistenza e assumersi delle responsabilità.</text:span></text:p>
      <text:p text:style-name="P6"><text:soft-page-break/>L’era digitale, caratterizzata da un sapere esterno infinito e da una connessione costante, sembra aver acuito quel distacco tra l’immagine che proiettiamo e la nostra verità interiore. La tendenza a definirci attraverso i social media riflette quello che oggi viene chiamato l'obbligo di essere vincenti.</text:p>
      <text:p text:style-name="P6">La dimensione online acutizza il problema della proiezione di ciò che vorremmo essere, spesso nascondendo la nostra realtà. Questo crea un "velo" di illusioni e fantasmi di potere che si frappone tra noi e il mondo. Nella società competitiva odierna, fatic<text:span text:style-name="T38">h</text:span>iamo ad accettare i nostri errori. Invece di esplorare la nostra "finitezza", tendiamo a rimuoverla o ad attribuire i fallimenti a cause esterne (un meccanismo simile al “ressentiment” nietzschiano).</text:p>
      <text:p text:style-name="P7">Il fatto che non esista più silenzio e che ci definiamo in base a come veniamo visti dagli altri è un segnale di quella che Nietzsche definisce "morale del gregge".</text:p>
      <text:p text:style-name="P8">Chi non appartiene a se stesso ha bisogno di costante approvazione esterna. Al contrario, l'uomo "nobile" o autonomo è colui che crea i propri valori e non teme di essere sincero, perché è abbastanza forte da non dover mentire o mascherarsi.</text:p>
      <text:p text:style-name="P13">Heidegger sottolinea come l'uomo debba costantemente confrontarsi con i codici della società, ma la vera sfida consiste nel saper ascoltare la propria "voce autentica" in <text:soft-page-break/>un equilibrio precario tra adattamento e preservazione del sé.</text:p>
      <text:p text:style-name="P14">Il ripiegamento narcisistico sull'io, tipico della nostra epoca, porta paradossalmente a una solitudine sterile, <text:span text:style-name="T39">s</text:span>enza un ideale di vita condiviso o un lavoro di "scultura" su se stessi, la coscienza rischia di ridursi a mero riflesso dei propri istinti e desideri momentanei. Diventare adulti e autonomi significa, per Kant, uscire dallo "stato di minorità" e assumersi la responsabilità di "farsi una coscienza" alla quale rispondere personalmente.</text:p>
      <text:p text:style-name="P33"><text:span text:style-name="T4">Viviamo in un’epoca in cui </text:span><text:span text:style-name="Strong_20_Emphasis"><text:span text:style-name="T7">il sapere esterno è infinito</text:span></text:span><text:span text:style-name="T4">: abbiamo accesso a milioni di dati ventiquattro ore al giorno, senza sosta, ma dedichiamo poco tempo a esplorare ciò che c’è dentro di noi. Non esiste silenzio. Sembra che ci definiamo per ciò che pubblichiamo sui social e per come vogliamo essere visti, non per chi siamo veramente.</text:span></text:p>
      <text:p text:style-name="P9"><text:span text:style-name="T39">Pensiamo a quello </text:span><text:span text:style-name="T43">c</text:span><text:span text:style-name="T39">he accade se fossimo all’interno di una stanza piena di specchi deformanti (i social media) che <text:s/>riflettono versioni abbellite o distorte di noi, passiamo tutto il tempo a guardare quei riflessi e a cercare di sistemarli, dimenticandoci che per vedere chi siamo davvero dovremmo smettere di guardare gli specchi e chiudere gli occhi per ascoltare il battito del nostro cuore nel silenzio.</text:span></text:p>
      <text:p text:style-name="P19"/>
      <text:p text:style-name="P19"><text:soft-page-break/></text:p>
      <text:p text:style-name="P19"/>
      <text:p text:style-name="P19"/>
      <text:p text:style-name="P19"/>
      <text:h text:style-name="P15"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Z003" svg:font-family="Z003"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06T16:14:13.871611786</meta:creation-date>
    <dc:date>2026-01-18T18:19:17.369664502</dc:date>
    <dc:creator>corrado tafaro</dc:creator>
    <meta:editing-duration>PT1H38M14S</meta:editing-duration>
    <meta:editing-cycles>7</meta:editing-cycles>
    <meta:generator>LibreOffice/24.2.7.2$Linux_X86_64 LibreOffice_project/420$Build-2</meta:generator>
    <meta:document-statistic meta:table-count="0" meta:image-count="0" meta:object-count="0" meta:page-count="12" meta:paragraph-count="63" meta:word-count="2206" meta:character-count="14152" meta:non-whitespace-character-count="12013"/>
  </office:meta>
</office:document-meta>
</file>