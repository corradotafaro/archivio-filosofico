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olferinoDisplay-Regular" svg:font-family="SolferinoDisplay-Regular"/>
  </office:font-face-decls>
  <office:automatic-styles>
    <style:style style:name="P1" style:family="paragraph" style:parent-style-name="Footnote">
      <style:paragraph-properties fo:text-align="justify" style:justify-single-word="false"/>
    </style:style>
    <style:style style:name="P2" style:family="paragraph" style:parent-style-name="Heading_20_2">
      <style:paragraph-properties fo:line-height="115%" fo:text-align="justify" style:justify-single-word="false"/>
      <style:text-properties style:text-line-through-style="none" style:text-line-through-type="none" style:font-name="Liberation Serif" fo:font-size="14pt" style:text-underline-style="none" fo:font-weight="normal" style:font-size-asian="14pt" style:font-weight-asian="normal" style:font-size-complex="14pt" style:font-weight-complex="normal"/>
    </style:style>
    <style:style style:name="P3" style:family="paragraph" style:parent-style-name="Heading_20_3">
      <style:text-properties fo:font-weight="normal" style:font-weight-asian="normal" style:font-weight-complex="normal"/>
    </style:style>
    <style:style style:name="P4" style:family="paragraph" style:parent-style-name="Heading_20_3">
      <style:paragraph-properties fo:text-align="justify" style:justify-single-word="false"/>
      <style:text-properties fo:font-weight="normal" style:font-weight-asian="normal" style:font-weight-complex="normal"/>
    </style:style>
    <style:style style:name="P5" style:family="paragraph" style:parent-style-name="Standard">
      <style:paragraph-properties fo:line-height="115%" fo:text-align="justify" style:justify-single-word="false"/>
      <style:text-properties style:font-name="Liberation Serif" fo:font-size="14pt" fo:font-weight="bold" officeooo:paragraph-rsid="000e3167" style:font-size-asian="14pt" style:font-weight-asian="bold" style:font-size-complex="14pt" style:font-weight-complex="bold"/>
    </style:style>
    <style:style style:name="P6"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06832f" style:font-size-asian="14pt" style:font-size-complex="14pt"/>
    </style:style>
    <style:style style:name="P7" style:family="paragraph" style:parent-style-name="Standard">
      <style:paragraph-properties fo:margin-top="0.101cm" fo:margin-bottom="0cm" style:contextual-spacing="false" fo:line-height="115%" fo:text-align="justify" style:justify-single-word="false"/>
      <style:text-properties style:font-name="Liberation Serif" fo:font-size="14pt" style:font-size-asian="14pt" style:font-size-complex="14pt"/>
    </style:style>
    <style:style style:name="P8" style:family="paragraph" style:parent-style-name="Standard">
      <style:paragraph-properties fo:line-height="115%" fo:text-align="justify" style:justify-single-word="false"/>
      <style:text-properties style:font-name="Liberation Serif" fo:font-size="14pt" style:font-size-asian="14pt" style:font-size-complex="14pt"/>
    </style:style>
    <style:style style:name="P9" style:family="paragraph" style:parent-style-name="Standard">
      <style:paragraph-properties fo:line-height="115%" fo:text-align="justify" style:justify-single-word="false"/>
      <style:text-properties style:font-name="Liberation Serif" fo:font-size="14pt" officeooo:paragraph-rsid="000807cc" style:font-size-asian="14pt" style:font-size-complex="14pt"/>
    </style:style>
    <style:style style:name="P10"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807cc" style:font-size-asian="14pt" style:font-size-complex="14pt"/>
    </style:style>
    <style:style style:name="P11" style:family="paragraph" style:parent-style-name="Standard">
      <style:paragraph-properties fo:margin-top="0.199cm" fo:margin-bottom="0cm" style:contextual-spacing="false" fo:line-height="115%" fo:text-align="justify" style:justify-single-word="false"/>
      <style:text-properties style:font-name="Liberation Serif" fo:font-size="14pt" style:font-size-asian="14pt" style:font-size-complex="14pt"/>
    </style:style>
    <style:style style:name="P12"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9ceee" style:font-size-asian="14pt" style:font-size-complex="14pt"/>
    </style:style>
    <style:style style:name="P13"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0a5b8a" style:font-size-asian="14pt" style:font-size-complex="14pt"/>
    </style:style>
    <style:style style:name="P14"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a5b8a" style:font-size-asian="14pt" style:font-size-complex="14pt"/>
    </style:style>
    <style:style style:name="P15" style:family="paragraph" style:parent-style-name="Standard">
      <style:paragraph-properties fo:margin-top="0cm" fo:margin-bottom="0cm" style:contextual-spacing="false"/>
      <style:text-properties style:font-name="Liberation Serif" fo:font-size="14pt" officeooo:paragraph-rsid="000e3167" style:font-size-asian="14pt" style:font-size-complex="14pt"/>
    </style:style>
    <style:style style:name="P16" style:family="paragraph" style:parent-style-name="Standard">
      <style:paragraph-properties fo:margin-top="0.199cm" fo:margin-bottom="0cm" style:contextual-spacing="false"/>
      <style:text-properties style:font-name="Liberation Serif" fo:font-size="14pt" officeooo:paragraph-rsid="000e3167" style:font-size-asian="14pt" style:font-size-complex="14pt"/>
    </style:style>
    <style:style style:name="P17" style:family="paragraph" style:parent-style-name="Standard">
      <style:paragraph-properties fo:line-height="115%" fo:text-align="justify" style:justify-single-word="false"/>
      <style:text-properties style:font-name="Liberation Serif" fo:font-size="14pt" fo:font-style="normal" style:font-size-asian="14pt" style:font-style-asian="normal" style:font-size-complex="14pt" style:font-style-complex="normal"/>
    </style:style>
    <style:style style:name="P18" style:family="paragraph" style:parent-style-name="Standard">
      <style:paragraph-properties fo:margin-top="0.101cm" fo:margin-bottom="0cm" style:contextual-spacing="false" fo:line-height="115%" fo:text-align="justify" style:justify-single-word="false"/>
      <style:text-properties style:font-name="Liberation Serif" fo:font-size="14pt" fo:font-style="normal" style:font-size-asian="14pt" style:font-style-asian="normal" style:font-size-complex="14pt" style:font-style-complex="normal"/>
    </style:style>
    <style:style style:name="P19" style:family="paragraph" style:parent-style-name="Standard">
      <style:paragraph-properties fo:margin-top="0.199cm" fo:margin-bottom="0cm" style:contextual-spacing="false" fo:line-height="115%" fo:text-align="justify" style:justify-single-word="false"/>
      <style:text-properties style:font-name="Liberation Serif" fo:font-size="14pt" fo:font-style="normal" style:font-size-asian="14pt" style:font-style-asian="normal" style:font-size-complex="14pt" style:font-style-complex="normal"/>
    </style:style>
    <style:style style:name="P20" style:family="paragraph" style:parent-style-name="Standard">
      <style:paragraph-properties fo:margin-top="0.101cm" fo:margin-bottom="0cm" style:contextual-spacing="false" fo:line-height="115%" fo:text-align="justify" style:justify-single-word="false"/>
      <style:text-properties officeooo:paragraph-rsid="0009ceee"/>
    </style:style>
    <style:style style:name="P21" style:family="paragraph" style:parent-style-name="Standard" style:list-style-name="L1">
      <style:paragraph-properties fo:margin-top="0.199cm" fo:margin-bottom="0cm" style:contextual-spacing="false" fo:line-height="115%" fo:text-align="justify" style:justify-single-word="false"/>
      <style:text-properties officeooo:paragraph-rsid="000a5b8a"/>
    </style:style>
    <style:style style:name="P22" style:family="paragraph" style:parent-style-name="Standard">
      <style:paragraph-properties fo:margin-top="0.199cm" fo:margin-bottom="0cm" style:contextual-spacing="false" fo:line-height="115%" fo:text-align="justify" style:justify-single-word="false"/>
      <style:text-properties officeooo:paragraph-rsid="0006832f"/>
    </style:style>
    <style:style style:name="P23" style:family="paragraph" style:parent-style-name="Text_20_body">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4">
      <style:text-properties fo:font-weight="normal" style:font-weight-asian="normal" style:font-weight-complex="normal"/>
    </style:style>
    <style:style style:name="P27" style:family="paragraph" style:parent-style-name="Text_20_body" style:list-style-name="L3">
      <style:text-properties fo:font-weight="normal" style:font-weight-asian="normal" style:font-weight-complex="normal"/>
    </style:style>
    <style:style style:name="P28" style:family="paragraph" style:parent-style-name="Text_20_body" style:list-style-name="L4">
      <style:paragraph-properties fo:text-align="justify" style:justify-single-word="false"/>
      <style:text-properties fo:font-weight="normal" style:font-weight-asian="normal" style:font-weight-complex="normal"/>
    </style:style>
    <style:style style:name="P29" style:family="paragraph" style:parent-style-name="Text_20_body">
      <style:paragraph-properties fo:margin-top="0.101cm" fo:margin-bottom="0.25cm" style:contextual-spac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ccf3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Liberation Serif" fo:font-size="14pt" style:font-size-asian="14pt" style:font-size-complex="14pt"/>
    </style:style>
    <style:style style:name="T8" style:family="text">
      <style:text-properties style:font-name="Liberation Serif" fo:font-size="14pt" officeooo:rsid="0009ceee" style:font-size-asian="14pt" style:font-size-complex="14pt"/>
    </style:style>
    <style:style style:name="T9" style:family="text">
      <style:text-properties style:font-name="Liberation Serif" fo:font-size="14pt" officeooo:rsid="000ccf3c" style:font-size-asian="14pt" style:font-size-complex="14pt"/>
    </style:style>
    <style:style style:name="T10" style:family="text">
      <style:text-properties style:font-name="Liberation Serif" fo:font-size="14pt" officeooo:rsid="000e3167" style:font-size-asian="14pt" style:font-size-complex="14pt"/>
    </style:style>
    <style:style style:name="T11" style:family="text">
      <style:text-properties style:font-name="Liberation Serif" fo:font-size="14pt" fo:font-style="italic" style:font-size-asian="14pt" style:font-style-asian="italic" style:font-size-complex="14pt" style:font-style-complex="italic"/>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b3fbc" style:font-weight-asian="normal" style:font-weight-complex="normal"/>
    </style:style>
    <style:style style:name="T16" style:family="text">
      <style:text-properties fo:font-weight="normal" officeooo:rsid="000e3167" style:font-weight-asian="normal" style:font-weight-complex="normal"/>
    </style:style>
    <style:style style:name="T17" style:family="text">
      <style:text-properties officeooo:rsid="000ccf3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a5b8a"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0ccf3c" style:font-style-asian="normal" style:font-style-complex="normal"/>
    </style:style>
    <style:style style:name="T22" style:family="text">
      <style:text-properties officeooo:rsid="000e316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udwig Wittgenstein <text:s/><text:span text:style-name="T16">(approfondimento per saperne di più)</text:span></text:p>
      <text:p text:style-name="P5"><text:span text:style-name="T18">https://www.corriere.it/le-lezioni-del-corriere/filosofia/ludwig-wittgenstein.shtml</text:span></text:p>
      <text:p text:style-name="P22"><text:span text:style-name="T10">N</text:span><text:span text:style-name="T7">asce nel 1889 a Vienna e muore nel 1951 a Cambridge. Studia prima alla Realschule di Linz, una scuola a indirizzo tecnico-meccanico (la stessa scuola in cui studiò Hitler, suo coetaneo, ma due classi indietro), poi ingegneria a Berlino e aeronautica a Manchester (percorso naturale per il figlio di un industriale dell’acciaio). In gioventù legge </text:span><text:span text:style-name="T11">Il mondo come volontà e rappresentazione di Schopenhauer,</text:span><text:span text:style-name="T7"> ma sono la logica e la filosofia della matematica che a un certo punto lo affascinano al punto da indurlo prima ad andare in Germania a discutere con Frege</text:span><text:span text:style-name="T7"><text:note text:id="ftn0" text:note-class="footnote"><text:note-citation>1</text:note-citation><text:note-body><text:p text:style-name="P1">Frege fu colui che indirizzò il giovane Wittgenstein da Russell. Nonostante Wittgenstein lo considerasse un genio assoluto, le loro discussioni (e la successiva corrispondenza) si focalizzarono su divergenze radicali riguardo alla natura del pensiero e del senso. Il senso e il riferimento (Sinn und Bedeutung): Frege distingueva tra il "senso" di un'espressione (il modo in cui l'oggetto viene presentato) e il suo "riferimento" (l'oggetto reale). Wittgenstein, nel Tractatus, semplificò drasticamente: i nomi hanno un riferimento (l'oggetto), ma solo le proposizioni hanno un senso (la possibilità di un fatto).Il segno di giudizio: Frege usava un simbolo specifico, la "barra di giudizio" ($\vdash$), per indicare che una proposizione era affermata come vera. Wittgenstein lo detestava. Per lui, la logica deve essere "autosufficiente": se scrivo una proposizione, sto già rappresentando una possibilità. Aggiungere un segno per dire "questo è vero" è un'aggiunta psicologica che non appartiene alla logica.La natura delle proposizioni: Frege vedeva le proposizioni come nomi di oggetti astratti (il Vero o il Falso). Wittgenstein ribaltò tutto: una proposizione non è un nome, ma una immagine (Bild). Non "nomina" la verità, la "mostra".</text:p><text:p text:style-name="P1"/></text:note-body></text:note></text:span><text:span text:style-name="T7">, e poi (su consiglio dello stesso Frege), ad andare nel 1911 al Trinity College di Cambridge per studiare con Bertrand Russell</text:span><text:span text:style-name="T7"><text:note text:id="ftn1" text:note-class="footnote"><text:note-citation>2</text:note-citation><text:note-body><text:p text:style-name="P1">La filosofia della matematica di Russell è nota come Logicism (Logicismo). L'opera monumentale scritta con Whitehead, i Principia Mathematica, ne è il manifesto.In cosa consiste il Logicismo?L'idea cardine di Russell era che la matematica è riducibile alla logica. Secondo Russell:Tutti i concetti matematici (numeri, funzioni, ecc.) possono essere definiti in termini puramente logici.Tutti i teoremi della matematica possono essere dedotti dai principi della logica.Per Russell, il numero 2 non è un'entità misteriosa, ma la "classe di tutte le classi che hanno due membri". È una costruzione logica.Il conflitto con WittgensteinWittgenstein, pur essendo stato allievo di Russell, distrusse le fondamenta del logicismo nel Tractatus:Tautologie vs Verità: Per Wittgenstein, le proposizioni della logica e della matematica sono tautologie. Non dicono nulla sul mondo. Dire $2+2=4$ è come dire "A = A". È una regola di trasformazione del linguaggio, non una scoperta su degli oggetti chiamati "numeri".La critica agli Assiomi: Russell dovette introdurre assiomi "sporchi" (come l'Assioma dell'Infinito o l'Assioma di Riducibilità) per far funzionare il suo sistema. Wittgenstein lo accusò di barare: se la logica è pura, non dovrebbe aver bisogno di presupposti sul numero di oggetti esistenti nel mondo.</text:p></text:note-body></text:note></text:span><text:span text:style-name="T7">, </text:span><text:span text:style-name="T9">il quale </text:span>rimase profondamente ferito dalla critica di Wittgenstein, arrivando a dire che il lavoro del suo ex allievo aveva reso impossibile per lui continuare a occuparsi di logica pura.</text:p>
      <text:p text:style-name="P6">Questa è la "trinità" della filosofia analitica. Le interazioni tra questi tre giganti hanno letteralmente dato forma al modo in cui pensiamo oggi, ma il loro rapporto era fatto di ammirazione profonda e scontri intellettuali feroci.</text:p>
      <text:p text:style-name="P7">In vita pubblica solo tre lavori di filosofia: una recensione, La scienza della logica, del 1913; il Logisch-Philosophische Abhandlung nel 1921, poi uscito in inglese nel 1922 con testo a fronte e introduzione di Russell con il titolo – suggerito da Moore con l’intenzione di rievocare il Tractatus Theologico-Politicus di Spinoza – Tractatus Logico-Philosophicus; un articolo, «Alcune osservazioni sulla forma logica», del 1929. Il resto dei suoi scritti (Osservazioni filosofiche, le Ricerche filosofiche, il <text:soft-page-break/>Libro Blu e il Libro Marrone, Sulla certezza e diversi altri) sarà pubblicato dopo la sua morte.</text:p>
      <text:p text:style-name="P8">Affrontare Wittgenstein significa muoversi tra due mondi: l'architettura cristallina del Tractatus e il "terreno scabro" delle Ricerche.</text:p>
      <text:p text:style-name="P11">Filosofia della logica, del linguaggio e della mente</text:p>
      <text:p text:style-name="P10">Wittgenstein è un filosofo di enorme importanza, soprattutto per la filosofia della logica, del linguaggio, e della mente. Due sono i compiti che si è proposto come filosofo, che poi corrispondono alle due fasi del suo pensiero: </text:p>
      <text:p text:style-name="P9">1) esplicitare l’essenza dell’unico linguaggio possibile (nel Tractatus), </text:p>
      <text:p text:style-name="P8">2) difendere l’antiessenzialismo e mostrare la pluralità dei giochi linguistici e delle forme di vita (nelle Ricerche filosofiche, uscite postume nel 1953). Peraltro due sono anche le scuole che ha influenzato, pur avendo ripudiato entrambe: prima il neo-positivismo o empirismo logico del Circolo di Vienna, poi la cosiddetta filosofia del linguaggio ordinario.</text:p>
      <text:p text:style-name="P11">Il primo Wittgenstein – Il Tractatus</text:p>
      <text:p text:style-name="P14">Verso il 1913 Wittgenstein comincia a scrivere di filosofia della logica. Poi va in guerra come volontario (non per ragioni patriottiche, ma forte dell’idea che trovarsi «faccia a faccia con la morte» fosse il solo modo di diventare «una persona decente») e nel 1918 ha pronto il manoscritto di quello che poi diventerà il Tractatus logico-philosophicus. Il Tractatus è costruito su sette proposizioni fondamentali. La struttura è gerarchica: le proposizioni con un solo numero sono le tesi centrali, quelle con un decimale (es. 1.1) sono commenti alla tesi principale, quelle con due decimali (es. 1.11) commentano il commento, e così via.</text:p>
      <text:p text:style-name="P13">Le Sette Asserzioni Principali</text:p>
      <text:list text:style-name="L1">
        <text:list-item>
          <text:p text:style-name="P21"><text:span text:style-name="T7">Il mondo è tutto ciò che accade. (Il mondo non è un insieme di cose, ma di fatti).</text:span></text:p>
        </text:list-item>
        <text:list-item>
          <text:p text:style-name="P21"><text:span text:style-name="T7">Ciò che accade, il fatto, è l'esistenza di stati di cose.</text:span></text:p>
        </text:list-item>
        <text:list-item>
          <text:p text:style-name="P21"><text:span text:style-name="T7">L'immagine logica dei fatti è il pensiero. (Il pensiero è una "mappa" logica del mondo).</text:span></text:p>
        </text:list-item>
        <text:list-item>
          <text:p text:style-name="P21"><text:span text:style-name="T7">Il pensiero è la proposizione munita di senso.</text:span></text:p>
        </text:list-item>
        <text:list-item>
          <text:p text:style-name="P21"><text:span text:style-name="T7">La proposizione è una funzione di verità delle proposizioni elementari.</text:span></text:p>
        </text:list-item>
        <text:list-item>
          <text:p text:style-name="P21"><text:span text:style-name="T7">La forma generale della funzione di verità è: $[\bar{p}, \bar{\xi}, N(\bar{\xi})]$. (Questa è la parte più tecnica: indica come ogni proposizione complessa sia costruita partendo da quelle semplici).</text:span></text:p>
        </text:list-item>
        <text:list-item>
          <text:p text:style-name="P21"><text:span text:style-name="T7">Su ciò di cui non si può parlare, si deve tacere.</text:span></text:p>
        </text:list-item>
      </text:list>
      <text:p text:style-name="P13"><text:soft-page-break/>Come scrive Wittgenstein nella prefazione, il senso del suo libro si potrebbe riassumere così: «Tutto ciò che può essere detto, si può dire chiaramente; e su ciò, di cui non si può parlare, si deve tacere». In una lettera poi dice che il libro si compone di due parti: quella scritta e quella non scritta; e afferma che la parte più importante è la seconda, in cui risiede il suo «senso etico».</text:p>
      <text:p text:style-name="P15"><text:span text:style-name="T2">«Tutto ciò che può essere detto, si può dire chiaramente; e su ciò, di cui non si può parlare, si deve tacere»</text:span></text:p>
      <text:p text:style-name="P16"><text:span text:style-name="T19">I livelli di commento</text:span></text:p>
      <text:p text:style-name="P29">Il sistema decimale serve a mostrare la <text:span text:style-name="T14">dipendenza logica.</text:span></text:p>
      <text:list text:style-name="L3">
        <text:list-item>
          <text:p text:style-name="P27">Livello .1, .2, .3: Espandono il significato della tesi principale. Ad esempio, la 1.1 (<text:span text:style-name="T1">"Il mondo è la totalità dei fatti, non delle cose"</text:span>) specifica immediatamente che non dobbiamo guardare agli oggetti isolati, ma alle loro relazioni.</text:p>
        </text:list-item>
        <text:list-item>
          <text:p text:style-name="P27">Livello .01, .02: Spesso contengono osservazioni metodologiche o chiarimenti metafisici sottili.</text:p>
        </text:list-item>
        <text:list-item>
          <text:p text:style-name="P25"><text:span text:style-name="T14">La scala di Wittgenstein: Nel commento 6.54, l'a</text:span>utore lancia il suo avvertimento finale: le sue stesse proposizioni sono come una scala da gettare via dopo essere saliti. Una volta compresa la logica del mondo, si capisce che la filosofia stessa è "insensata" perché cerca di dire ciò che può essere solo mostrato.</text:p>
        </text:list-item>
      </text:list>
      <text:p text:style-name="P8">Nelle intenzioni di Wittgenstein il Tractatus è un libro di filosofia della logica (nonostante tratti anche di questioni classiche della filosofia quali L’Io, il problema del senso della vita) che ha il compito di determinare le condizioni di sensatezza del linguaggio in generale. Le proposizioni elementari sono dotate di senso nella misura in cui sono immagini di stati di cose e le proposizioni complesse sono funzioni di verità delle proposizioni elementari. Uno stato di cose è un complesso di oggetti tra i quali ci sono delle relazioni. Quando Wittgenstein parla di stati di cose intende stati di cose possibili, non per forza che siano parte della realtà. Poi gli stati di cose che sussistono, che si danno nella realtà, si chiamano fatti. Quando Wittgenstein dice che le proposizioni elementari sono immagini di stati di cose non vuole proporre una metafora, ma vuole fornire la chiave per capire come il linguaggio descriva il mondo: secondo lui gli enunciati e ciò di cui sono immagine condividono la medesima struttura, ossia la stessa forma. Allora dire che una proposizione elementare è immagine di uno stato di cose vuol dire che ad ogni nome corrisponde un oggetto e il modo in cui i nomi sono correlati nella proposizione rispecchia, per via di un’identità strutturale (nel senso che condividono la forma logica), il modo in cui sono correlati gli oggetti corrispondenti ai nomi. La proposizione, poi, sarà vera se lo stato di cose di cui è immagine sussiste (se è un fatto), falsa altrimenti. Comprendere una <text:soft-page-break/>proposizione equivale a conoscerne il senso, ossia a sapere come dev’essere fatto il mondo affinché la proposizione sia vera. Quindi comprendere un enunciato vuol dire conoscerne le condizioni di verità.</text:p>
      <text:p text:style-name="P11">Il Tractatus esplicita i limiti del linguaggio: «I limiti del mio linguaggio sono i limiti del mio mondo» (T 5.6). Ragionando sulle condizioni di sensatezza delle proposizioni, Wittgenstein affronta anche il tema della mancanza di senso che può darsi in due modi: </text:p>
      <text:p text:style-name="P7">1) come Sinnlösigkeit, mancanza di senso, tipica delle contraddizioni e tautologie che sono prive di senso perché sempre false o sempre vere indipendentemente da come stanno le cose nel mondo (non descrivono stati di cose possibili); </text:p>
      <text:p text:style-name="P8">2) come Unsinnigkeit, insensatezza, tipica delle proposizioni della metafisica/etica/estetica, che non sono immagini di stati di cose e dicono ciò che non può esser detto. Molti problemi filosofici si fondano sul fraintendimento della logica del nostro linguaggio (T 4.003 «Il più delle proposizioni e questioni che sono state scritte su cose filosofiche è non falso ma insensato […]. Il più delle proposizioni e questioni dei filosofi si fonda sul fatto che noi non comprendiamo la nostra logica del linguaggio»).</text:p>
      <text:p text:style-name="P20"><text:span text:style-name="T7">Compito della buona filosofia è quello di denunciare le insensatezze, ragion per cui la filosofia non è una dottrina ma una attività chiarificatrice </text:span><text:span text:style-name="T8">e come diceva lui:</text:span><text:span text:style-name="T1">"La filosofia non è una dottrina, ma un'attività"</text:span><text:span text:style-name="T7">. Peraltro anche come funzioni il linguaggio è una di quelle cose che non possiamo dire senza cadere nell’insensatezza, perché il linguaggio può soltanto descrivere ciò che accade nel mondo, non può descrivere se stesso e il suo rapporto con il mondo. Da qui la paradossalità che caratterizza tutto il Tractatus in cui sono formulate tesi sul linguaggio e tuttavia si dice che questo non è qualcosa che si possa fare sensatamente con il linguaggio: «Le mie proposizioni illustrano così: colui che mi comprende, infine le riconosce insensate, se è salito per esse – su esse – oltre esse (egli deve, per dir così, gettare via la scala dopo che vi è salito)» (T. 6.54)</text:span></text:p>
      <text:p text:style-name="P12"><text:span text:style-name="T20">Dopo la pubblicazione del Tractatus Wittgenstein sente di aver risolto i problemi filosofici che potevano essere risolti e così prende un diploma da maestro</text:span><text:span text:style-name="T20"><text:note text:id="ftn2" text:note-class="footnote"><text:note-citation>3</text:note-citation><text:note-body><text:p text:style-name="P1">Quella scelta, che per i suoi contemporanei (come Russell) sembrò un folle spreco di genio, fu per Wittgenstein una necessità etica e metodologica. Dopo aver "risolto" tutti i problemi della filosofia nel Tractatus, Wittgenstein non cercava il prestigio accademico a Cambridge, ma la verità del linguaggio nel suo stato nascente.</text:p></text:note-body></text:note></text:span><text:span text:style-name="T20"> e va ad insegnare per sei anni nelle scuole di montagna </text:span><text:span text:style-name="T21">in A</text:span><text:span text:style-name="T20">ustria dove scrive un Dizionario per le scuole elementari (unico altro libro pubblicato da Wittgenstein in vita).</text:span></text:p>
      <text:h text:style-name="P2" text:outline-level="2"><text:soft-page-break/>Il Secondo Wittgenstein: <text:span text:style-name="T1">Ricerche Filosofiche</text:span></text:h>
      <text:p text:style-name="P23">Qui Wittgenstein abbandona la struttura logica rigida a favore di un metodo descrittivo. Non cerca più la "forma logica", ma osserva come usiamo le parole nella vita quotidiana.</text:p>
      <text:h text:style-name="P3" text:outline-level="3">Esempi e Analogie Chiave</text:h>
      <text:list text:style-name="L4">
        <text:list-item>
          <text:p text:style-name="P26">I Giochi Linguistici (<text:span text:style-name="T1">Sprachspiele</text:span>): L'analogia fondamentale. Come nel gioco degli scacchi o nel calcio le regole definiscono le mosse, così nel linguaggio il significato non è un oggetto, ma l'uso che facciamo di una parola all'interno di un contesto regolato.</text:p>
        </text:list-item>
        <text:list-item>
          <text:p text:style-name="P28">L'analogia della Cassetta degli Attrezzi: Il linguaggio è come una scatola di attrezzi (martello, colla, chiodi). Ogni parola ha una funzione diversa: alcune servono a descrivere, altre a comandare, altre a pregare. L'errore della filosofia classica è pensare che tutte le parole servano a "nominare oggetti".</text:p>
        </text:list-item>
        <text:list-item>
          <text:p text:style-name="P28">L'esempio dei Muratori (<text:span text:style-name="T1">Bauleute</text:span>): Immagina due muratori, A e B. A grida "Lastra!". B gli porta la lastra. Qui la parola "Lastra" non è solo un nome, ma un comando. Il significato è interamente racchiuso nell'azione prodotta.</text:p>
        </text:list-item>
        <text:list-item>
          <text:p text:style-name="P28">Le Somiglianze di Famiglia (<text:span text:style-name="T1">Familienähnlichkeiten</text:span>): Perché chiamiamo "giochi" attività diverse come il solitario, il girotondo o il calcio? Non c'è un'unica essenza comune, ma una rete di somiglianze sovrapposte, come i tratti del viso tra i membri di una famiglia (occhi, statura, colore dei capelli).</text:p>
        </text:list-item>
        <text:list-item>
          <text:p text:style-name="P24"><text:span text:style-name="T14">Il Coleottero nella Scatola (</text:span><text:span text:style-name="T6">The Beetle in the Box</text:span><text:span text:style-name="T14">): </text:span>Un'analogia contro il linguaggio privato. Se ognuno avesse una scatola con dentro qualcosa chiamato "coleottero" che solo lui può vedere, la parola "coleottero" non servirebbe a nulla nella comunicazione, perché il contenuto della scatola potrebbe essere diverso per chiunque o persino vuoto. Conclusione: le sensazioni private (come il dolore) acquistano significato solo attraverso criteri pubblici e linguistici.</text:p>
        </text:list-item>
        <text:list-item>
          <text:p text:style-name="P24"><text:span text:style-name="T14">L'Anatra-Lepre (</text:span><text:span text:style-name="T6">Duck-Rabbit</text:span><text:span text:style-name="T14">): </text:span>Un'immagine ambigua che può essere vista come un'anatra o come una lepre. Wittgenstein la usa per spiegare il "vedere come": non cambia l'oggetto visivo, cambia l'organizzazione concettuale che gli diamo.</text:p>
        </text:list-item>
      </text:list>
      <text:h text:style-name="P4" text:outline-level="3">Sintesi del passaggio</text:h>
      <text:p text:style-name="P23"><text:span text:style-name="T14">Se nel primo Wittgenstein il linguaggio è uno specchio (o un'immagine) della realtà, nel secondo il linguaggio è un labirinto di strade o un insieme di strumenti. </text:span><text:span text:style-name="T15">Inoltre, </text:span><text:span text:style-name="T7">la differenza tra il primo e il secondo Wittgenstein è anche una differenza di stile: se il Tractatus è una sequenza ordinata di asserzioni, i testi successivi sono pieni di </text:span><text:soft-page-break/><text:span text:style-name="T7">domande, esempi, analogie e molto di rado si arriva a una conclusione di carattere generale.</text:span></text:p>
      <text:p text:style-name="P8">Wittgenstein vuole mostrare che non è possibile formulare una teoria del linguaggio come un tutto perché il linguaggio si caratterizza per una irriducibile varietà nei suoi usi. Non ci sono solo gli usi descrittivi, bensì una molteplicità di usi che poi ritroviamo nella molteplicità di giochi linguistici. Una certa regolarità delle strutture grammaticali può indurre a credere che tutte le proposizioni funzionino allo stesso modo, ma non è così. Anche le parole, a dispetto della loro apparente uniformità, sono di tipi differenti e svolgono funzioni differenti. Wittgenstein le paragona agli strumenti che si trovano in una cassetta degli attrezzi (un martello, una tenaglia, una sega, ecc.), tutti per certi versi simili e che tuttavia servono per fare cose molto diverse.</text:p>
      <text:p text:style-name="P7">Se si vuole capire come funziona il linguaggio, bisogna vedere come lo si usa nella pratica: «Il significato di una parola è il suo uso nel linguaggio». Parlare un linguaggio fa parte di una forma di vita. E così come non si può definire una volta per tutte che cosa sia un gioco (ce ne sono tanti, tutti diversi), così non si può definire una volta per tutte che cosa sia il linguaggio. Si possono rilevare delle somiglianze di famiglia, ma nulla più. Anche per il secondo Wittgenstein la filosofia è una attività e non una dottrina, però, mentre nel Tractatus crede che si debba andare oltre l’apparenza grammaticale per cogliere l’essenza del linguaggio, nelle Ricerche viene fuori che non c’è un’essenza del linguaggio e che non bisogna andare a cercare in profondità: «Ciò che è nascosto non ci interessa». Tutto quello che ci serve per comprendere il linguaggio non è nascosto, ma è perfettamente accessibile, sotto gli occhi di tutti (a volte talmente evidente e in bella vista che non lo notiamo).</text:p>
      <text:p text:style-name="P7"><text:span text:style-name="T2">Tutto quello che ci serve per comprendere il linguaggio non è nascosto, ma è perfettamente accessibile, sotto gli occhi di tutti</text:span></text:p>
      <text:p text:style-name="P19">Nelle Ricerche Filosofiche, Wittgenstein usa spesso esempi che sembrano tratti direttamente da una lezione elementare. Quando parla del "gioco linguistico" dei muratori o di come insegniamo a qualcuno a continuare una serie numerica (2, 4, 6, 8...), sta riportando la filosofia al livello del bambino che impara le regole del mondo.</text:p>
      <text:p text:style-name="P19">Un uomo "troppo" semplice per l'accademia</text:p>
      <text:p text:style-name="P18">C'è un aneddoto rivelatore: Wittgenstein era così rigoroso nella sua ricerca della semplicità che spesso entrava in conflitto con i genitori dei suoi alunni e con le autorità scolastiche. Non voleva che i bambini imparassero "nozioni", voleva che imparassero a pensare con chiarezza. La sua "fuga" dalla filosofia accademica fu un atto di umiltà radicale. Distribuì la sua enorme eredità ai fratelli (e ad artisti poveri come Rilke) e scelse di vivere in povertà, convinto che la filosofia non dovesse essere una professione, ma una forma di vita.</text:p>
      <text:p text:style-name="P1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olferinoDisplay-Regular" svg:font-family="SolferinoDisplay-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5-09T18:07:44.813768221</meta:creation-date>
    <dc:date>2026-05-10T19:52:50.017368122</dc:date>
    <dc:creator>corrado tafaro</dc:creator>
    <meta:editing-duration>PT1H33M21S</meta:editing-duration>
    <meta:editing-cycles>4</meta:editing-cycles>
    <meta:generator>LibreOffice/24.2.7.2$Linux_X86_64 LibreOffice_project/420$Build-2</meta:generator>
    <meta:document-statistic meta:table-count="0" meta:image-count="0" meta:object-count="0" meta:page-count="7" meta:paragraph-count="53" meta:word-count="2726" meta:character-count="17424" meta:non-whitespace-character-count="14757"/>
  </office:meta>
</office:document-meta>
</file>