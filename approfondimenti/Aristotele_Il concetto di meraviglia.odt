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margin-top="0.199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222222" loext:opacity="100%" style:font-name="Noto Sans1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d5dbc" style:font-style-asian="normal" style:font-style-complex="normal"/>
    </style:style>
    <style:style style:name="T5" style:family="text">
      <style:text-properties fo:font-style="normal" officeooo:rsid="00fff530" style:font-style-asian="normal" style:font-style-complex="normal"/>
    </style:style>
    <style:style style:name="T6" style:family="text">
      <style:text-properties officeooo:rsid="008d5dbc"/>
    </style:style>
    <style:style style:name="T7" style:family="text">
      <style:text-properties officeooo:rsid="007095bb"/>
    </style:style>
    <style:style style:name="T8" style:family="text">
      <style:text-properties officeooo:rsid="00fff530"/>
    </style:style>
    <style:style style:name="T9" style:family="text">
      <style:text-properties officeooo:rsid="008f39d0"/>
    </style:style>
    <style:style style:name="T10" style:family="text">
      <style:text-properties officeooo:rsid="00112ad6"/>
    </style:style>
    <style:style style:name="T11" style:family="text">
      <style:text-properties officeooo:rsid="00169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l concetto di meraviglia </text:h>
      <text:p text:style-name="P2">La meraviglia è stata spesso considerata come il punto di partenza della filosofia, un sentimento di stupore e curiosità che spinge l'individuo a cercare risposte alle domande fondamentali dell'esistenza.</text:p>
      <text:p text:style-name="P2">Aristotele tratta il tema della meraviglia non come un impulso dell’anima, al contrario, le cose si manifestano e diventano problemi che spingono così l'uomo ad indagare. La pressione esercitata da questi problemi, Aristotele li chiama nei suoi Metafisica <text:span text:style-name="T11">l</text:span>a coercizione della verità. È questa coercizione che non permette allo stupore di rimanere in una risposta, ma è seguita da un altro stupore e da un altro ancora. Quindi, una volta avviato, non può essere fermato.</text:p>
      <text:p text:style-name="P2">La meraviglia è il senso di stupore e di inquietudine sperimentata dall'uomo quando, soddisfatte le immediate necessità materiali, comincia a interrogarsi sulla sua esistenza e sul suo rapporto con il mondo.</text:p>
      <text:p text:style-name="Standard">La meraviglia è consapevolezza della propria ignoranza e desiderio di <text:s/>apprendere, di conoscere, ovvero della ricerca disinteressata di sapere. </text:p>
      <text:p text:style-name="P2">Socrate, per esempio, riteneva che la meraviglia fosse l'inizio della saggezza. Questa idea è stata poi ripresa da Aristotele, che affermava: <text:span text:style-name="T11">p</text:span>erché gli uomini cominciarono a filosofare, ora come allora, è perché inizialmente si meravigliavano delle cose più a portata di mano.</text:p>
      <text:p text:style-name="Standard"><text:soft-page-break/>La meraviglia secondo Platone, è all'origine della sapienza e quindi della filosofia è proprio del filosofo questo che tu provi, di esser pieno di meraviglia; né altro cominciamento ha il filosofare che questo.</text:p>
      <text:p text:style-name="P2">Infatti gli uomini hanno cominciato a filosofare, ora come in origine, a causa della meraviglia: mentre da principio restavano meravigliati di fronte alle difficoltà più semplici, in seguito, progredendo poco alla volta, giunsero a porsi problemi sempre maggiori, come quelli riguardanti i fenomeni della Luna e quelli del Sole e degli Astri, o i problemi riguardanti la generazione dell’intero Universo.</text:p>
      <text:p text:style-name="P2">Nel corso dei secoli, la meraviglia è stata esplorata da numerosi pensatori e filosofi, tra cui Cartesio e Kant. Essa continua ad essere un tema centrale in molte discussioni filosofiche contemporanee, spesso legate alla scienza, all'etica e alla religione.</text:p>
      <text:p text:style-name="Standard">Il filosofo, matematico, scienziato e scrittore francese Cartesio (1596-1650) descrisse la meraviglia come una delle emozioni primarie perché sosteneva che le emozioni in generale siano reazioni a fenomeni inaspettati. Egli osservò che quando la gente incontrava per la prima volta un oggetto sorprendente o nuovo, questo <text:span text:style-name="T11">l</text:span>i rende<text:span text:style-name="T11">va</text:span> meravigliati e stupefatti <text:span text:style-name="T11">e </text:span>propose quindi che la meraviglia <text:span text:style-name="T11">fosse</text:span> la prima di tutte le passioni. Tuttavia Cartesio, a differenza dei filosofi greci prima di lui, aveva una visione fondamentalmente negativa della meraviglia: anche se è bene essere nati con qualche tipo di inclinazione a questa passione, la meraviglia ci dispone all'acquisizione delle scienze, <text:soft-page-break/>comunque dovremmo poi sforzarci, per quanto possibile, di liberarci di essa. </text:p>
      <text:p text:style-name="P2">Questo sentimento è riflesso in altri filosofi come Thomas Hobbes nella sua discussione su termini inglesi curiosità (curiosity), gioia (joy) e ammirazione (admiration). Hobbes sosteneva che, poiché tutto ciò che accade di nuovo a un uomo, dà lui la speranza e <text:span text:style-name="T11">il</text:span> motivo di sapere qualche cosa che non sapeva prima, che crea speranza e aspettativa di futura conoscenza da tutto ciò che avviene di nuovo e strano, una passione che noi comunemente chiamiamo ammirazione; e lo stesso considerato come appetito, è chiamato curiosità, che è l'appetito della conoscenza</text:p>
      <text:p text:style-name="P2">In De homine XII, Hobbes discute di gioia e di ammirazione, ancora mettendo in contrasto gli esseri umani con gli altri animali. Hobbes sostiene che questa passione è quasi peculiare degli uomini. Egli sottolinea che anche se gli altri animali, ogni volta che vedono qualcosa di nuovo o insolito, ammirano nella misura in cui vedono qualcosa di nuovo o di insolito, così che possano determinare se è pericoloso o innocuo, gli uomini, quando vedono qualcosa di nuovo, cercano di sapere da dove sia venuto e a quale uso lo si possa adibire.</text:p>
      <text:p text:style-name="P2">Nella storia dell'astronomia, Adam Smith si sofferma sulla meraviglia non solo per spiegare la differenza tra il pensiero umano e quello animale, ma piuttosto per spiegare perché studiamo le scienze naturali. Una persona non civilizzata o un bambino è ancora nettamente diverso dagli altri animali perché colpisce la <text:soft-page-break/>pietra che gli fa male. Il bambino è interessato a trovare un rapporto tra causa ed effetto, ma è limitato nella sua capacità di farlo.</text:p>
      <text:p text:style-name="P2">Per Schopenhauer la meraviglia è una caratteristica esclusiva dell'essere umano, in relazione alla consapevolezza della propria mortalità: ad eccezione dell'uomo, nessun essere si meraviglia della propria esistenza, la meraviglia filosofica è viceversa condizionata da un più elevato sviluppo dell'intelligenza individuale: tale condizione però non è certamente l'unica, ma è invece la cognizione della morte, insieme con la vista del dolore e della miseria della vita, che ha senza dubbio dato l'impulso più forte alla riflessione filosofica e alle spiegazioni metafisiche del mondo.</text:p>
      <text:p text:style-name="P2">In sintesi, la meraviglia è quel senso di stupore e curiosità che ci spinge a cercare risposte, a riflettere sul mondo che ci circonda e sul nostro posto in esso. È un motore potente per la scoperta e la comprensione, una forza che ci spinge a guardare oltre l'apparenza delle cose e a cercare il significato più profondo.</text:p>
      <text:p text:style-name="Standard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7-18T17:09:52.949828022</dc:date>
    <dc:creator>corrado tafaro</dc:creator>
    <meta:editing-duration>PT34M6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4" meta:paragraph-count="15" meta:word-count="839" meta:character-count="5430" meta:non-whitespace-character-count="4602"/>
  </office:meta>
</office:document-meta>
</file>