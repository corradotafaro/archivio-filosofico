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note">
      <style:text-properties officeooo:rsid="00fff530" officeooo:paragraph-rsid="00fff530"/>
    </style:style>
    <style:style style:name="P2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fcd2f9" officeooo:paragraph-rsid="001047bc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13f216" officeooo:paragraph-rsid="001047bc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13f216" officeooo:paragraph-rsid="001047bc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margin-top="0.499cm" fo:margin-bottom="0cm" style:contextual-spacing="false" fo:line-height="115%" fo:text-align="justify" style:justify-single-word="false" fo:text-indent="0cm" style:auto-text-indent="false" fo:break-before="page" fo:background-color="transparent"/>
      <style:text-properties style:font-name="Noto Sans1" fo:font-size="12pt" fo:font-style="normal" fo:font-weight="bold" officeooo:rsid="00fff530" officeooo:paragraph-rsid="001047bc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size="12pt" fo:font-weight="normal" officeooo:rsid="0013f216" officeooo:paragraph-rsid="001047b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style="normal" officeooo:paragraph-rsid="001047bc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8d5dbc" style:font-style-asian="italic" style:font-style-complex="italic"/>
    </style:style>
    <style:style style:name="T3" style:family="text">
      <style:text-properties fo:font-style="italic" officeooo:rsid="00fff530" style:font-style-asian="italic" style:font-style-complex="italic"/>
    </style:style>
    <style:style style:name="T4" style:family="text">
      <style:text-properties fo:font-variant="normal" fo:text-transform="none" fo:color="#222222" loext:opacity="100%" style:font-name="Noto Sans1" fo:font-size="12pt" fo:letter-spacing="normal" fo:font-weight="normal" officeooo:rsid="00fcd2f9" style:font-size-asian="12pt" style:font-weight-asian="normal" style:font-size-complex="12pt" style:font-weight-complex="normal" loext:padding="0cm" loext:border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8d5dbc" style:font-style-asian="normal" style:font-style-complex="normal"/>
    </style:style>
    <style:style style:name="T7" style:family="text">
      <style:text-properties fo:font-style="normal" officeooo:rsid="00fff530" style:font-style-asian="normal" style:font-style-complex="normal"/>
    </style:style>
    <style:style style:name="T8" style:family="text">
      <style:text-properties officeooo:rsid="008d5dbc"/>
    </style:style>
    <style:style style:name="T9" style:family="text">
      <style:text-properties officeooo:rsid="007095bb"/>
    </style:style>
    <style:style style:name="T10" style:family="text">
      <style:text-properties officeooo:rsid="00fff530"/>
    </style:style>
    <style:style style:name="T11" style:family="text">
      <style:text-properties officeooo:rsid="008f39d0"/>
    </style:style>
    <style:style style:name="T12" style:family="text">
      <style:text-properties officeooo:rsid="00112a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l concetto di meraviglia </text:p>
      <text:p text:style-name="P2">La meraviglia è stata spesso considerata come il punto di partenza della filosofia, un sentimento di stupore e curiosità che spinge l'individuo a cercare risposte alle domande fondamentali dell'esistenza.</text:p>
      <text:p text:style-name="P2">Aristotele tratta il tema della meraviglia <text:span text:style-name="T10">non come un impulso dell’anima, al contrario,</text:span> le cose si manifestano e diventano problemi che spingono così l'uomo a<text:span text:style-name="T9">d</text:span> indagare. La pressione esercitata da questi problemi, Aristotele li chiama nei suoi Metafisica La coercizione della verità. È questa coercizione che non permette allo stupore di rimanere in una risposta, ma è seguita da un altro stupore e da un altro ancora. Quindi, una volta avviato, non può essere fermato.</text:p>
      <text:p text:style-name="P2"><text:span text:style-name="T8">L</text:span>a meraviglia è il senso di stupore e di inquietudine sperimentata dall'uomo quando, soddisfatte le immediate necessità materiali, comincia a interrogarsi sulla sua esistenza e sul suo rapporto con il mondo.</text:p>
      <text:p text:style-name="P2">La meraviglia è consapevolezza della propria ignoranza e desiderio di <text:s/>apprendere, di conoscere, ovvero della ricerca disinteressata di sapere. </text:p>
      <text:p text:style-name="P2">Socrate, per esempio, riteneva che la meraviglia fosse l'inizio della saggezza. Questa idea è stata poi ripresa da Aristotele, che affermava: Perché gli uomini cominciarono a filosofare, ora come allora, è perché <text:soft-page-break/>inizialmente si meravigliavano delle cose più a portata di mano.</text:p>
      <text:p text:style-name="P2">La meraviglia secondo Platone, è all'origine della sapienza e quindi della filosofia <text:span text:style-name="T10">è</text:span> proprio del filosofo questo che tu provi, di esser pieno di meraviglia; né altro cominciamento ha il filosofare che questo<text:span text:style-name="T1">.</text:span><text:span text:style-name="T1"><text:note text:id="ftn1" text:note-class="footnote"><text:note-citation>1</text:note-citation><text:note-body><text:p text:style-name="P1">Platone (Teeteto 155 d)</text:p></text:note-body></text:note></text:span></text:p>
      <text:p text:style-name="P2">Infatti gli uomini hanno cominciato a filosofare, ora come in origine, a causa della meraviglia: mentre da principio restavano meravigliati di fronte alle difficoltà più semplici, in seguito, progredendo poco a<text:span text:style-name="T8">lla volta</text:span>, giunsero a porsi problemi sempre maggiori, <text:span text:style-name="T8">come quelli </text:span>riguardanti i fenomeni della <text:span text:style-name="T10">L</text:span>una e quelli del <text:span text:style-name="T10">S</text:span>ole e degli <text:span text:style-name="T10">A</text:span>stri, o i problemi riguardanti la generazione dell’intero <text:span text:style-name="T10">U</text:span>niverso.</text:p>
      <text:p text:style-name="P2">Nel corso dei secoli, la meraviglia è stata esplorata da numerosi pensatori e filosofi, tra cui Cartesio e Kant. Essa continua ad essere un tema centrale in molte discussioni filosofiche contemporanee, spesso legate alla scienza, all'etica e alla religione.</text:p>
      <text:p text:style-name="P6">Il filosofo, matematico, scienziato e scrittore francese Cartesio (1596-1650) descrisse la meraviglia come una delle emozioni primarie perché sosteneva che le emozioni in generale siano reazioni a fenomeni inaspettati. Egli osservò che quando la gente incontrava per la prima volta un oggetto sorprendente o nuovo, <text:soft-page-break/><text:span text:style-name="T5">questo ci rende meravigliati e stupefatti </text:span><text:span text:style-name="T6">p</text:span><text:span text:style-name="T5">ropose quindi che la meraviglia è la prima di tutte le passioni.</text:span> Tuttavia Cartesio, a differenza dei filosofi greci prima di lui, aveva una visione fondamentalmente negativa della meraviglia: <text:span text:style-name="T12">a</text:span><text:span text:style-name="T5">nche se è bene essere nati con qualche tipo di inclinazione a questa passione, </text:span><text:span text:style-name="T7">la meraviglia</text:span><text:span text:style-name="T5"> ci dispone all'acquisizione delle scienze, comunque dovremmo poi sforzarci, per quanto possibile, di liberarci di essa.</text:span> </text:p>
      <text:p text:style-name="P6">Questo sentimento è riflesso in altri <text:span text:style-name="T11">filosofi</text:span> come Thomas Hobbes nella sua discussione su termini inglesi "curiosità" (curiosity), "gioia" (joy) e "ammirazione" (admiration). Hobbes sosteneva che, poiché "<text:span text:style-name="T5">tutto ciò dunque che accade di nuovo a un uomo dà lui la speranza e motivo di sapere qualche cosa che non sapeva prima, che crea speranza e aspettativa di futura conoscenza da tutto ciò che avviene di nuovo e strano", una "passione che noi comunemente chiamiamo ammirazione; e lo stesso considerato come appetito, è chiamato curiosità, che è l'appetito della conoscenza"</text:span></text:p>
      <text:p text:style-name="P3">In De homine XII, Hobbes discute <text:span text:style-name="T9">di</text:span> "gioia" <text:span text:style-name="T9">e di </text:span>"ammirazione", ancora mettendo in contrasto gli esseri umani con gli altri animali. Hobbes sostiene che questa passione è quasi peculiare degli uomini. Egli sottolinea che anche se gli altri animali, ogni volta che vedono qualcosa di nuovo o insolito, ammirano nella<text:span text:style-name="T1"> </text:span>misura in <text:soft-page-break/>cui vedono qualcosa di nuovo o di insolito, così che possano determinare se è pericoloso o innocuo, gli uomini, "quando vedono qualcosa di nuovo, cercano di sapere da dove sia venuto e a quale uso lo si possa adibire.</text:p>
      <text:p text:style-name="P4">Nella <text:span text:style-name="T10">s</text:span>toria dell'astronomia, Adam Smith si sofferma sulla meraviglia non solo per spiegare la differenza tra il pensiero umano e quello animale, ma piuttosto per spiegare perché studiamo le scienze naturali. Una persona non civilizzata o un bambino è ancora nettamente diverso dagli altri animali perché colpisce la pietra che gli fa male. Il bambino è interessato a trovare un rapporto tra causa ed effetto, ma è limitato nella sua capacità di farlo.</text:p>
      <text:p text:style-name="P6">Per Schopenhauer la meraviglia è una caratteristica esclusiva dell'essere umano, in relazione alla consapevolezza della propria mortalità: <text:span text:style-name="T10">a</text:span>d eccezione dell'uomo, nessun essere si meraviglia della propria esistenza <text:span text:style-name="T10">l</text:span>a meraviglia filosofica è viceversa condizionata da un più elevato sviluppo dell'intelligenza individuale: tale condizione però non è certamente l'unica, ma è invece la cognizione della morte, insieme con la vista del dolore e della miseria della vita, che ha senza dubbio dato l'impulso più forte alla riflessione filosofica e alle spiegazioni metafisiche del mondo<text:note text:id="ftn2" text:note-class="footnote"><text:note-citation>2</text:note-citation><text:note-body><text:p text:style-name="Footnote">(Arthur Schopenhauer, Il mondo come volontà e rappresentazione<text:span text:style-name="T10">)</text:span></text:p></text:note-body></text:note>.”</text:p>
      <text:p text:style-name="P2"><text:soft-page-break/>In sintesi, la meraviglia è quel senso di stupore e curiosità che ci spinge a cercare risposte, a riflettere sul mondo che ci circonda e sul nostro posto in esso. È un motore potente per la scoperta e la comprensione, una forza che ci spinge a guardare oltre l'apparenza delle cose e a cercare il significato più profondo.</text:p>
      <text:p text:style-name="P7"><text:span text:style-name="Strong_20_Emphasis"><text:span text:style-name="T4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4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2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FreeSans" style:font-family-complex="FreeSans" style:font-family-generic-complex="swiss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.799cm" fo:margin-bottom="1.499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rrado tafaro</meta:initial-creator>
    <meta:creation-date>2026-01-25T17:42:15.158494688</meta:creation-date>
    <dc:date>2026-07-18T16:34:08.673670264</dc:date>
    <dc:creator>corrado tafaro</dc:creator>
    <meta:editing-duration>PT21M26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5" meta:paragraph-count="17" meta:word-count="850" meta:character-count="5528" meta:non-whitespace-character-count="4691"/>
  </office:meta>
</office:document-meta>
</file>