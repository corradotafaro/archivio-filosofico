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3e897d" officeooo:paragraph-rsid="000c04dc"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3e897d" officeooo:paragraph-rsid="000c04dc"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2b633f" officeooo:paragraph-rsid="000c04dc"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394a50" officeooo:paragraph-rsid="000c04dc" style:font-size-asian="12pt" style:font-style-asian="normal" style:font-weight-asian="normal" style:font-size-complex="12pt" style:font-style-complex="normal" style:font-weight-complex="normal"/>
    </style:style>
    <style:style style:name="P5" style:family="paragraph" style:parent-style-name="Footnote">
      <style:paragraph-properties fo:text-align="justify" style:justify-single-word="false"/>
    </style:style>
    <style:style style:name="P6" style:family="paragraph" style:parent-style-name="Quotations">
      <style:paragraph-properties fo:margin-top="0.3cm" fo:margin-bottom="0cm" style:contextual-spacing="false" fo:line-height="115%" fo:text-align="start" style:justify-single-word="false"/>
      <style:text-properties fo:font-style="italic" officeooo:paragraph-rsid="000cea6c" style:font-style-asian="italic" style:font-style-complex="italic"/>
    </style:style>
    <style:style style:name="P7" style:family="paragraph" style:parent-style-name="Quotations">
      <style:paragraph-properties fo:margin-top="0.199cm" fo:margin-bottom="0cm" style:contextual-spacing="false" fo:line-height="115%" fo:text-align="center" style:justify-single-word="false"/>
      <style:text-properties fo:font-style="italic" officeooo:paragraph-rsid="000cea6c" style:font-style-asian="italic" style:font-style-complex="italic"/>
    </style:style>
    <style:style style:name="P8" style:family="paragraph" style:parent-style-name="Quotations"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fo:font-size="12pt" officeooo:paragraph-rsid="000cea6c" style:font-size-asian="12pt" style:font-size-complex="12pt"/>
    </style:style>
    <style:style style:name="P9"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0adbd" officeooo:paragraph-rsid="000cea6c"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40adbd" officeooo:paragraph-rsid="000cea6c"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199cm" fo:margin-bottom="0cm" style:contextual-spacing="false" fo:line-height="115%" fo:text-align="justify" style:justify-single-word="false"/>
      <style:text-properties officeooo:rsid="0040adbd" officeooo:paragraph-rsid="000cea6c"/>
    </style:style>
    <style:style style:name="P12" style:family="paragraph" style:parent-style-name="Text_20_body">
      <loext:graphic-properties draw:fill="none"/>
      <style:paragraph-properties fo:margin-left="0cm" fo:margin-right="0cm" fo:margin-top="0cm" fo:margin-bottom="0.101cm" style:contextual-spacing="false" fo:line-height="115%" fo:text-align="center" style:justify-single-word="false" fo:text-indent="-0.101cm" style:auto-text-indent="false" fo:background-color="transparent"/>
      <style:text-properties style:font-name="Noto Sans1" fo:font-size="12pt" fo:font-weight="bold" officeooo:rsid="00462a1e" officeooo:paragraph-rsid="000d4302" style:font-size-asian="12pt" style:font-weight-asian="bold" style:font-size-complex="12pt" style:font-weight-complex="bold"/>
    </style:style>
    <style:style style:name="P13" style:family="paragraph" style:parent-style-name="Text_20_body" style:master-page-name="">
      <loext:graphic-properties draw:fill="none"/>
      <style:paragraph-properties fo:margin-left="0cm" fo:margin-right="0cm" fo:margin-top="0cm" fo:margin-bottom="0.101cm" style:contextual-spacing="false" fo:line-height="115%" fo:text-align="center" style:justify-single-word="false" fo:text-indent="-0.101cm" style:auto-text-indent="false" style:page-number="auto" fo:break-before="auto" fo:break-after="auto" fo:background-color="transparent"/>
      <style:text-properties style:font-name="Noto Sans1" fo:font-size="12pt" fo:font-weight="bold" officeooo:rsid="00462a1e" officeooo:paragraph-rsid="000d4302" style:font-size-asian="12pt" style:font-weight-asian="bold" style:font-size-complex="12pt" style:font-weight-complex="bold"/>
    </style:style>
    <style:style style:name="P14" style:family="paragraph" style:parent-style-name="Text_20_body">
      <style:paragraph-properties fo:margin-top="0.199cm" fo:margin-bottom="0cm" style:contextual-spacing="false" fo:line-height="115%" fo:text-align="justify" style:justify-single-word="false"/>
      <style:text-properties style:font-name="Noto Sans1" fo:font-size="12pt" fo:font-weight="normal" officeooo:rsid="00462a1e" officeooo:paragraph-rsid="000d4302" style:font-size-asian="12pt" style:font-weight-asian="normal" style:font-size-complex="12pt" style:font-weight-complex="normal"/>
    </style:style>
    <style:style style:name="P15" style:family="paragraph" style:parent-style-name="Text_20_body">
      <style:paragraph-properties fo:margin-top="0.101cm" fo:margin-bottom="0cm" style:contextual-spacing="false" fo:line-height="115%" fo:text-align="justify" style:justify-single-word="false"/>
      <style:text-properties style:font-name="Noto Sans1" fo:font-size="12pt" fo:font-weight="normal" officeooo:rsid="00462a1e" officeooo:paragraph-rsid="000d4302" style:font-size-asian="12pt" style:font-weight-asian="normal" style:font-size-complex="12pt" style:font-weight-complex="normal"/>
    </style:style>
    <style:style style:name="P16" style:family="paragraph" style:parent-style-name="Text_20_body">
      <style:paragraph-properties fo:margin-top="0.101cm" fo:margin-bottom="0cm" style:contextual-spacing="false" fo:line-height="115%" fo:text-align="justify" style:justify-single-word="false"/>
      <style:text-properties style:font-name="Noto Sans1" fo:font-size="12pt" officeooo:rsid="00462a1e" officeooo:paragraph-rsid="000d4302" style:font-size-asian="12pt" style:font-size-complex="12pt"/>
    </style:style>
    <style:style style:name="P17" style:family="paragraph" style:parent-style-name="Text_20_body">
      <style:paragraph-properties fo:break-before="page"/>
    </style:style>
    <style:style style:name="T1" style:family="text">
      <style:text-properties officeooo:rsid="004f4021"/>
    </style:style>
    <style:style style:name="T2" style:family="text">
      <style:text-properties officeooo:rsid="00446aa3"/>
    </style:style>
    <style:style style:name="T3" style:family="text">
      <style:text-properties fo:font-style="italic" style:font-style-asian="italic" style:font-style-complex="italic"/>
    </style:style>
    <style:style style:name="T4" style:family="text">
      <style:text-properties fo:font-style="italic" officeooo:rsid="004f4021" style:font-style-asian="italic" style:font-style-complex="italic"/>
    </style:style>
    <style:style style:name="T5" style:family="text">
      <style:text-properties officeooo:rsid="00538b7a"/>
    </style:style>
    <style:style style:name="T6" style:family="text">
      <style:text-properties officeooo:rsid="003f6927"/>
    </style:style>
    <style:style style:name="T7" style:family="text">
      <style:text-properties officeooo:rsid="00394a50"/>
    </style:style>
    <style:style style:name="T8" style:family="text">
      <style:text-properties style:font-name="Noto Sans1"/>
    </style:style>
    <style:style style:name="T9" style:family="text">
      <style:text-properties style:font-name="Noto Sans1" fo:font-style="normal" style:font-style-asian="normal" style:font-style-complex="normal"/>
    </style:style>
    <style:style style:name="T10" style:family="text">
      <style:text-properties style:font-name="Noto Sans1" fo:font-style="normal" officeooo:rsid="00394a50" style:font-style-asian="normal" style:font-style-complex="normal"/>
    </style:style>
    <style:style style:name="T11" style:family="text">
      <style:text-properties style:font-name="Noto Sans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Noto Sans1"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Noto Sans1" fo:font-size="12pt" fo:font-weight="bold" style:font-size-asian="12pt" style:font-weight-asian="bold" style:font-size-complex="12pt" style:font-weight-complex="bold"/>
    </style:style>
    <style:style style:name="T14" style:family="text">
      <style:text-properties style:font-name="Noto Sans1" officeooo:rsid="00418d38"/>
    </style:style>
    <style:style style:name="T15" style:family="text">
      <style:text-properties style:font-name="Noto Sans1" officeooo:rsid="00446aa3"/>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weight="bold" officeooo:rsid="00538d74" style:font-size-asian="11pt" style:font-weight-asian="bold" style:font-size-complex="11pt" style:font-weight-complex="bold"/>
    </style:style>
    <style:style style:name="T18" style:family="text">
      <style:text-properties fo:font-size="11pt" style:font-size-asian="11pt" style:font-size-complex="11pt"/>
    </style:style>
    <style:style style:name="T19" style:family="text">
      <style:text-properties officeooo:rsid="007e1126"/>
    </style:style>
    <style:style style:name="T20" style:family="text">
      <style:text-properties officeooo:rsid="00538d74"/>
    </style:style>
    <style:style style:name="T21" style:family="text">
      <style:text-properties officeooo:rsid="0047fb36"/>
    </style:style>
    <style:style style:name="T22" style:family="text">
      <style:text-properties officeooo:rsid="0049997d"/>
    </style:style>
    <style:style style:name="T23" style:family="text">
      <style:text-properties officeooo:rsid="00572710"/>
    </style:style>
    <style:style style:name="T24" style:family="text">
      <style:text-properties officeooo:rsid="007e5a98"/>
    </style:style>
    <style:style style:name="T25" style:family="text">
      <style:text-properties officeooo:rsid="004758d6"/>
    </style:style>
    <style:style style:name="T26" style:family="text">
      <style:text-properties officeooo:rsid="00737e21"/>
    </style:style>
    <style:style style:name="T27" style:family="text">
      <style:text-properties fo:font-weight="bold" style:font-weight-asian="bold" style:font-weight-complex="bold"/>
    </style:style>
    <style:style style:name="T28" style:family="text">
      <style:text-properties fo:font-weight="bold" officeooo:rsid="00538d7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3">La filosofia ad Atene</text:span></text:p>
      <text:p text:style-name="P14">Ci siamo lasciati alle spalle la prima parte della filosofia della natura, che rappresentò la rottura con una concezione mitologica del mondo. Adesso incontreremo i tre più grandi filosofi dell’antichità: Socrate, Platone e Aristotele, ognuno di essi influenzò in modo diverso la civiltà europea.</text:p>
      <text:p text:style-name="P16">Socrate fu il primo filosofo nato ad Atene, e sia lui sia i suoi successori vissero e operarono in Atene. Se ben ricordiamo, anche Anassagora rimase per un certo periodo di tempo in questa città, fino a quando ne fu scacciato per aver affermato che il sole non era una divinità, ma una palla di fuoco. </text:p>
      <text:p text:style-name="P16">Come vedremo in seguito non andò meglio a Socrate.</text:p>
      <text:p text:style-name="P12"/>
      <text:p text:style-name="P13">L’essere umano al centro </text:p>
      <text:p text:style-name="P14">A partire dal 450 a.C., Atene divenne il centro culturale del mondo greco e anche la filosofia prese una nuova direzione. L’attenzione si spostò sull’essere umano e sul <text:span text:style-name="T19">posto che occupa </text:span>nella società.</text:p>
      <text:p text:style-name="P15">Fu in questo periodo che il governo della città, <text:s/>assunse un chiaro indirizzo democratico con l’istituzione di assemble<text:span text:style-name="T20">e</text:span> pubbliche e tribunali. <text:span text:style-name="T19">I</text:span>l presupposto fu che il popolo dovesse ricevere l’istruzione necessaria per <text:soft-page-break/>poter partecipare alla vita politica. Per gli ateniesi, ciò significò parlare bene, imparare l’arte della eloquenza che volle dire padroneggiare con la retorica. </text:p>
      <text:p text:style-name="P15">Dalle colonie greche giunse ad Atene un gruppo di filosofi che amavano definirsi <text:span text:style-name="T27">sofisti</text:span>, una parola che significava “operare o parlare con abilità”. <text:span text:style-name="T21">S</text:span>ofisti <text:span text:style-name="T21">erano coloro </text:span>i quali facevano una professione del proprio sapere, <text:span text:style-name="T22">e</text:span>rano degli intellettuali che mettevano a disposizione degli altri le loro competenze culturali, esigendo in cambio il pagamento della prestazione. Il sapere di cui si dichiaravano competenti, non era però un sapere particolare, ma la forma di sapere più alta e più completa per la p<text:span text:style-name="T20">o</text:span>lis greca, cioè il possesso della virtù (aret<text:span text:style-name="T20">é</text:span>) nella vita politica, ossia la capacità di gestire nel modo più idoneo i propri interessi privati nella competizione politica. I sofisti si re<text:span text:style-name="T21">sero</text:span> conto della potenza della parola come strumento di dominio sulle masse <text:span text:style-name="T21">e molto</text:span> spesso l’uso delle nuove tecniche del discorso <text:span text:style-name="T21">portarono ad un uso spregiu</text:span><text:span text:style-name="T20">d</text:span><text:span text:style-name="T21">icato della parola per la conquista del potere. </text:span><text:span text:style-name="T23">L’</text:span><text:span text:style-name="T20">areté</text:span><text:span text:style-name="T21"> comprendeva una serie di qualità, tra cui la saggezza, la giustizia, il coraggio e la temperanza. I sofisti sostenevano che l'arete poteva essere insegnata e che, attraverso l'apprendimento, gli uomini potevano diventare buoni governanti.</text:span></text:p>
      <text:p text:style-name="P15"><text:soft-page-break/>A differenza dei filosofi <text:span text:style-name="T21">della natura</text:span>, i sofisti scelsero di occuparsi dell’uomo e del suo posto <text:span text:style-name="T19">nella s</text:span>ocietà, guidati dall’assunto che gli esseri umani devono imparare a vivere insieme. Non si interessarono alla cosmologia e alla ricerca dell'archè originario perché dicevano che sarebbe stato impossibile per l’uomo giungere ad una spiegazione s<text:span text:style-name="T20">o</text:span>ddisfacente. In filosofia, un punto di vista di questo genere fu chiamato <text:span text:style-name="T3">scetticismo</text:span>. </text:p>
      <text:p text:style-name="P15"><text:span text:style-name="T3">“L’uomo è misura di tutte le cose”</text:span> disse il sofista Protagora (487-420 a.C) nel senso che bisognava sempre valutare in rapporto alle esigenze dell’essere umano ciò che è giusto o sbagliato, ciò che è bene o male: essi, infatti, negavano che la distinzione tra vero e falso avesse valore assoluto.</text:p>
      <text:p text:style-name="P15">Alla dicotomia <text:span text:style-name="T20">delle parole “</text:span>vero/falso” (in campo logico), all<text:span text:style-name="T21">a</text:span> dicotomi<text:span text:style-name="T21">a</text:span> “bene/male” (in campo morale) e “giusto/ingiusto” (in campo politico), sostituivano quella più pragmatica di “utile/dannoso”. Essi cioè ritenevano che <text:span text:style-name="T24">le cose </text:span>in sé stesse, non sono vere o false, buone o malvagie, giuste o ingiuste, ma solo utili o dannose per <text:span text:style-name="T21">gli</text:span> uomini. Per i sofisti, quando era necessario prendere una decisione, il criterio <text:span text:style-name="T20">dell’</text:span><text:span text:style-name="T28">utile per noi</text:span> funzionava meglio dei presunti criteri del vero, del bene o del giusto. Un sofista, messo di fronte alla decisione <text:span text:style-name="T25">se </text:span>punire <text:span text:style-name="T25">o meno </text:span>una truffa con il carcere, <text:span text:style-name="T25">avrebbe detto </text:span><text:soft-page-break/><text:span text:style-name="T25">sicuramente </text:span>che non ha senso discutere in astratto del problema dal momento che siamo noi stessi a stabilire cosa sia giusto e cosa no, ma che ha senso, invece, discutere per capire se è più utile per la nostra comunità <text:span text:style-name="T25">e per l’interesse individuale, punire o non punire la truffa con il carcere. Con questo intend</text:span><text:span text:style-name="T22">evano</text:span><text:span text:style-name="T25"> dire che il mondo è come ognuno di noi lo pe</text:span><text:span text:style-name="T20">r</text:span><text:span text:style-name="T25">cepisce, che ognuno di noi ha la propria verità e tutte hanno lo stesso valore. </text:span></text:p>
      <text:p text:style-name="P14">Quantunque all’atto pratico cambi forse poco, c’è però nei due modi di impostare il problema una differenza filosoficamente ragguardevole, che ci restituisce il senso del <text:span text:style-name="T3">relativismo</text:span> tipico della sofistica.</text:p>
      <text:p text:style-name="P15">Il relativismo è una concezione filosofica che riconosce un valore solo parziale e relativo, e quindi non oggettivo e universale, sia alla conoscenza umana “<text:span text:style-name="T21">relativismo gnoseologico”</text:span> sia ai princ<text:span text:style-name="T20">i</text:span>pi e ai giudizi etici “relativismo morale”. Per i relativisti, i criteri e le norme di valutazione cambiano non solo da epoca a epoca, ma da cultura a cultura e persino da individuo ad individuo.</text:p>
      <text:p text:style-name="P14">Come si può ben capire, i sofisti riuscirono a dar vita ad accesi dibattiti nella società ateniese perché secondo loro non esistevano norme assolute che <text:span text:style-name="T25">stabilissero cosa </text:span><text:span text:style-name="T21">fosse</text:span><text:span text:style-name="T25"> giusto e cosa sbagl</text:span><text:span text:style-name="T26">ia</text:span><text:span text:style-name="T25">to, cosa è vero e cosa è falso.</text:span></text:p>
      <text:p text:style-name="P14"><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4T17:18:26.319381411</dc:date>
    <dc:creator>corrado tafaro</dc:creator>
    <meta:editing-duration>PT18M22S</meta:editing-duration>
    <meta:editing-cycles>3</meta:editing-cycles>
    <meta:generator>LibreOffice/24.2.7.2$Linux_X86_64 LibreOffice_project/420$Build-2</meta:generator>
    <meta:document-statistic meta:table-count="0" meta:image-count="0" meta:object-count="0" meta:page-count="4" meta:paragraph-count="14" meta:word-count="805" meta:character-count="5044" meta:non-whitespace-character-count="4247"/>
  </office:meta>
</office:document-meta>
</file>