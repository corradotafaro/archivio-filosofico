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paragraph-properties fo:line-height="90%" fo:text-align="justify" style:justify-single-word="false"/>
      <style:text-properties style:font-name="Liberation Serif"/>
    </style:style>
    <style:style style:name="P2" style:family="paragraph" style:parent-style-name="Standard">
      <loext:graphic-properties draw:fill="none"/>
      <style:paragraph-properties fo:margin-left="0cm" fo:margin-right="0cm" fo:margin-top="0.199cm" fo:margin-bottom="0cm" style:contextual-spacing="false" fo:text-align="center" style:justify-single-word="false" fo:text-indent="0.499cm" style:auto-text-indent="false" fo:background-color="transparent"/>
      <style:text-properties style:font-name="Liberation Serif" fo:font-size="14pt" officeooo:paragraph-rsid="001bbc66" style:font-size-asian="14pt" style:font-size-complex="14pt"/>
    </style:style>
    <style:style style:name="P3" style:family="paragraph" style:parent-style-name="Standard">
      <style:paragraph-properties fo:margin-top="0cm" fo:margin-bottom="0cm" style:contextual-spacing="false" fo:text-align="center" style:justify-single-word="false"/>
      <style:text-properties style:font-name="Liberation Serif" fo:font-size="14pt" officeooo:paragraph-rsid="001bbc66" style:font-size-asian="14pt" style:font-size-complex="14pt"/>
    </style:style>
    <style:style style:name="P4" style:family="paragraph" style:parent-style-name="Standard" style:master-page-name="">
      <loext:graphic-properties draw:fill="none"/>
      <style:paragraph-properties fo:margin-left="0cm" fo:margin-right="0cm" fo:margin-top="0cm" fo:margin-bottom="0cm" style:contextual-spacing="false" fo:text-align="center"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false" fo:text-align="center" style:justify-single-word="false" fo:text-indent="0cm" style:auto-text-indent="false" fo:background-color="transparent"/>
      <style:text-properties style:font-name="Liberation Serif" fo:font-size="14pt" officeooo:paragraph-rsid="001bbc66" style:font-size-asian="14pt" style:font-size-complex="14pt"/>
    </style:style>
    <style:style style:name="P6" style:family="paragraph" style:parent-style-name="Standard">
      <style:paragraph-properties fo:margin-top="0.101cm" fo:margin-bottom="0cm" style:contextual-spacing="false" fo:text-align="center" style:justify-single-word="false"/>
      <style:text-properties style:font-name="Liberation Serif" fo:font-size="14pt" officeooo:rsid="002abbcf" officeooo:paragraph-rsid="001bbc66" style:font-size-asian="14pt" style:font-size-complex="14pt"/>
    </style:style>
    <style:style style:name="P7" style:family="paragraph" style:parent-style-name="Standard">
      <style:paragraph-properties fo:margin-top="0cm" fo:margin-bottom="0cm" style:contextual-spacing="false" fo:text-align="center" style:justify-single-word="false"/>
      <style:text-properties style:font-name="Liberation Serif" fo:font-size="14pt" officeooo:rsid="002abbcf" officeooo:paragraph-rsid="001bbc66" style:font-size-asian="14pt" style:font-size-complex="14pt"/>
    </style:style>
    <style:style style:name="P8" style:family="paragraph" style:parent-style-name="Standard" style:master-page-name="">
      <loext:graphic-properties draw:fill="none"/>
      <style:paragraph-properties fo:margin-left="0cm" fo:margin-right="0cm" fo:margin-top="0cm" fo:margin-bottom="0cm" style:contextual-spacing="false" fo:text-align="center"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9" style:family="paragraph" style:parent-style-name="Standard">
      <style:paragraph-properties fo:margin-top="0.199cm" fo:margin-bottom="0cm" style:contextual-spacing="false" fo:text-align="justify" style:justify-single-word="false"/>
      <style:text-properties style:font-name="Liberation Serif" fo:font-size="14pt" officeooo:rsid="002abbcf" officeooo:paragraph-rsid="001bbc66" style:font-size-asian="14pt" style:font-size-complex="14pt"/>
    </style:style>
    <style:style style:name="P10"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1"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2"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3"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4"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5"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6"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rsid="002abbcf" officeooo:paragraph-rsid="001bbc66" style:font-size-asian="14pt" style:font-size-complex="14pt"/>
    </style:style>
    <style:style style:name="P17" style:family="paragraph" style:parent-style-name="Standard">
      <style:paragraph-properties fo:margin-top="0cm" fo:margin-bottom="0cm" style:contextual-spacing="false" fo:text-align="justify" style:justify-single-word="false"/>
      <style:text-properties style:font-name="Liberation Serif" fo:font-size="14pt" officeooo:rsid="002abbcf" officeooo:paragraph-rsid="001bbc66" style:font-size-asian="14pt" style:font-size-complex="14pt"/>
    </style:style>
    <style:style style:name="P18" style:family="paragraph" style:parent-style-name="Standard">
      <style:text-properties style:font-name="Liberation Serif" fo:font-size="14pt" officeooo:paragraph-rsid="001bbc66" style:font-size-asian="14pt" style:font-size-complex="14pt"/>
    </style:style>
    <style:style style:name="P19" style:family="paragraph" style:parent-style-name="Standard">
      <style:paragraph-properties fo:text-align="justify" style:justify-single-word="false"/>
      <style:text-properties style:font-name="Liberation Serif" fo:font-size="14pt" officeooo:paragraph-rsid="001bbc66" style:font-size-asian="14pt" style:font-size-complex="14pt"/>
    </style:style>
    <style:style style:name="P20"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1"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2"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3"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4"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5"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6"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7"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style:font-name="Liberation Serif" fo:font-size="14pt" officeooo:paragraph-rsid="001bbc66" style:font-size-asian="14pt" style:font-size-complex="14pt"/>
    </style:style>
    <style:style style:name="P28"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29"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0"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1"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2"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3"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erif" fo:font-size="14pt" officeooo:paragraph-rsid="001bbc66" style:font-size-asian="14pt" style:font-size-complex="14pt"/>
    </style:style>
    <style:style style:name="P34"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5"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6"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paragraph-rsid="001bbc66" style:font-size-asian="14pt" style:font-size-complex="14pt"/>
    </style:style>
    <style:style style:name="P37" style:family="paragraph" style:parent-style-name="Standard">
      <style:paragraph-properties fo:margin-top="0.101cm" fo:margin-bottom="0cm" style:contextual-spacing="false" fo:text-align="justify" style:justify-single-word="false"/>
      <style:text-properties style:font-name="Liberation Serif" fo:font-size="14pt" officeooo:paragraph-rsid="001bbc66" style:font-size-asian="14pt" style:font-size-complex="14pt"/>
    </style:style>
    <style:style style:name="P38" style:family="paragraph" style:parent-style-name="Standard">
      <style:paragraph-properties fo:margin-top="0cm" fo:margin-bottom="0cm" style:contextual-spacing="false" fo:text-align="justify" style:justify-single-word="false"/>
      <style:text-properties style:font-name="Liberation Serif" fo:font-size="14pt" officeooo:paragraph-rsid="001bbc66" style:font-size-asian="14pt" style:font-size-complex="14pt"/>
    </style:style>
    <style:style style:name="P39"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499cm" style:auto-text-indent="false" style:page-number="auto" fo:background-color="transparent"/>
      <style:text-properties style:font-name="Liberation Serif" fo:font-size="14pt" officeooo:paragraph-rsid="001bbc66" style:font-size-asian="14pt" style:font-size-complex="14pt"/>
    </style:style>
    <style:style style:name="P40" style:family="paragraph" style:parent-style-name="Standard" style:list-style-name="L1">
      <loext:graphic-properties draw:fill="none"/>
      <style:paragraph-properties fo:margin-left="0cm" fo:margin-right="0cm" fo:margin-top="0.101cm" fo:margin-bottom="0cm" style:contextual-spacing="false" fo:text-align="justify" style:justify-single-word="false" fo:text-indent="0.499cm" style:auto-text-indent="false" fo:background-color="transparent"/>
      <style:text-properties style:font-name="Liberation Serif" fo:font-size="14pt" officeooo:paragraph-rsid="001bbc66" style:font-size-asian="14pt" style:font-size-complex="14pt"/>
    </style:style>
    <style:style style:name="P41"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Liberation Serif" fo:font-size="14pt" officeooo:rsid="001f621d" officeooo:paragraph-rsid="001bbc66" style:font-size-asian="14pt" style:font-size-complex="14pt"/>
    </style:style>
    <style:style style:name="P42"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rsid="00255a22" officeooo:paragraph-rsid="001bbc66" style:font-size-asian="14pt" style:font-size-complex="14pt"/>
    </style:style>
    <style:style style:name="P43"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style:font-name="Liberation Serif" fo:font-size="14pt" officeooo:rsid="0025a2cb" officeooo:paragraph-rsid="001bbc66" style:font-size-asian="14pt" style:font-size-complex="14pt"/>
    </style:style>
    <style:style style:name="P44"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erif" fo:font-size="14pt" officeooo:rsid="003b95ab" officeooo:paragraph-rsid="001bbc66" style:font-size-asian="14pt" style:font-size-complex="14pt"/>
    </style:style>
    <style:style style:name="P45" style:family="paragraph" style:parent-style-name="Standard" style:list-style-name="L1" style:master-page-name="">
      <loext:graphic-properties draw:fill="none"/>
      <style:paragraph-properties fo:margin-left="0cm" fo:margin-right="0cm" fo:margin-top="0.101cm" fo:margin-bottom="0cm" style:contextual-spacing="false" fo:text-align="justify" style:justify-single-word="false" fo:text-indent="0.499cm" style:auto-text-indent="false" style:page-number="auto" fo:background-color="transparent"/>
      <style:text-properties style:font-name="Liberation Serif" fo:font-size="14pt" officeooo:rsid="003b95ab" officeooo:paragraph-rsid="001bbc66" style:font-size-asian="14pt" style:font-size-complex="14pt"/>
    </style:style>
    <style:style style:name="P46" style:family="paragraph" style:parent-style-name="Standard" style:list-style-name="L1">
      <loext:graphic-properties draw:fill="none"/>
      <style:paragraph-properties fo:margin-left="0cm" fo:margin-right="0cm" fo:margin-top="0.101cm" fo:margin-bottom="0cm" style:contextual-spacing="false" fo:text-align="justify" style:justify-single-word="false" fo:text-indent="0.499cm" style:auto-text-indent="false" fo:background-color="transparent"/>
      <style:text-properties style:font-name="Liberation Serif" fo:font-size="14pt" officeooo:rsid="003b95ab" officeooo:paragraph-rsid="001bbc66" style:font-size-asian="14pt" style:font-size-complex="14pt"/>
    </style:style>
    <style:style style:name="P47" style:family="paragraph" style:parent-style-name="Standard">
      <style:paragraph-properties fo:margin-top="0.101cm" fo:margin-bottom="0cm" style:contextual-spacing="false" fo:text-align="center" style:justify-single-word="false"/>
      <style:text-properties style:font-name="Liberation Serif" fo:font-size="14pt" fo:font-style="italic" officeooo:paragraph-rsid="001bbc66" style:font-size-asian="14pt" style:font-style-asian="italic" style:font-size-complex="14pt" style:font-style-complex="italic"/>
    </style:style>
    <style:style style:name="P48" style:family="paragraph" style:parent-style-name="Standard" style:master-page-name="Standard">
      <style:paragraph-properties fo:text-align="center" style:justify-single-word="false" style:page-number="135"/>
      <style:text-properties style:font-name="Liberation Serif" fo:font-size="16pt" officeooo:rsid="001e3a1d" officeooo:paragraph-rsid="001bbc66" style:font-size-asian="16pt" style:font-size-complex="16pt"/>
    </style:style>
    <style:style style:name="P49" style:family="paragraph" style:parent-style-name="Standard">
      <style:paragraph-properties fo:margin-top="0.199cm" fo:margin-bottom="0cm" style:contextual-spacing="false" fo:text-align="center" style:justify-single-word="false"/>
      <style:text-properties style:font-name="Liberation Serif" fo:font-size="16pt" officeooo:paragraph-rsid="001bbc66" style:font-size-asian="16pt" style:font-size-complex="16pt"/>
    </style:style>
    <style:style style:name="P50" style:family="paragraph" style:parent-style-name="Standard">
      <style:paragraph-properties fo:margin-top="0cm" fo:margin-bottom="0cm" style:contextual-spacing="false" fo:text-align="center" style:justify-single-word="false"/>
      <style:text-properties style:font-name="Liberation Serif" fo:font-size="16pt" officeooo:paragraph-rsid="001bbc66" style:font-size-asian="16pt" style:font-size-complex="16pt"/>
    </style:style>
    <style:style style:name="P51" style:family="paragraph" style:parent-style-name="Standard">
      <style:paragraph-properties fo:margin-top="0.101cm" fo:margin-bottom="0cm" style:contextual-spacing="false" fo:text-align="center" style:justify-single-word="false"/>
      <style:text-properties style:font-name="Liberation Serif" fo:font-size="16pt" officeooo:paragraph-rsid="001bbc66" style:font-size-asian="16pt" style:font-size-complex="16pt"/>
    </style:style>
    <style:style style:name="P52" style:family="paragraph" style:parent-style-name="Standard">
      <loext:graphic-properties draw:fill="none"/>
      <style:paragraph-properties fo:margin-left="0cm" fo:margin-right="0cm" fo:margin-top="0.199cm" fo:margin-bottom="0cm" style:contextual-spacing="false" fo:text-align="center" style:justify-single-word="false" fo:text-indent="0.499cm" style:auto-text-indent="false" fo:background-color="transparent"/>
      <style:text-properties style:font-name="Liberation Serif" fo:font-size="16pt" officeooo:paragraph-rsid="001bbc66" style:font-size-asian="16pt" style:font-size-complex="16pt"/>
    </style:style>
    <style:style style:name="P53" style:family="paragraph" style:parent-style-name="Standard">
      <style:paragraph-properties fo:margin-top="0.199cm" fo:margin-bottom="0cm" style:contextual-spacing="false" fo:text-align="center" style:justify-single-word="false"/>
      <style:text-properties style:font-name="Liberation Serif" fo:font-size="16pt" officeooo:rsid="002abbcf" officeooo:paragraph-rsid="001bbc66" style:font-size-asian="16pt" style:font-size-complex="16pt"/>
    </style:style>
    <style:style style:name="P54" style:family="paragraph" style:parent-style-name="Standard">
      <style:paragraph-properties fo:margin-top="0cm" fo:margin-bottom="0cm" style:contextual-spacing="false" fo:text-align="center" style:justify-single-word="false"/>
      <style:text-properties style:font-name="Liberation Serif" fo:font-size="16pt" officeooo:rsid="002abbcf" officeooo:paragraph-rsid="001bbc66" style:font-size-asian="16pt" style:font-size-complex="16pt"/>
    </style:style>
    <style:style style:name="P55" style:family="paragraph" style:parent-style-name="Standard">
      <loext:graphic-properties draw:fill="none"/>
      <style:paragraph-properties fo:margin-left="0cm" fo:margin-right="0cm" fo:margin-top="0cm" fo:margin-bottom="0cm" style:contextual-spacing="false" fo:text-align="center" style:justify-single-word="false" fo:text-indent="0cm" style:auto-text-indent="false" fo:background-color="transparent"/>
      <style:text-properties style:font-name="Liberation Serif" fo:font-size="16pt" officeooo:rsid="002abbcf" officeooo:paragraph-rsid="001bbc66" style:font-size-asian="16pt" style:font-size-complex="16pt"/>
    </style:style>
    <style:style style:name="T1" style:family="text">
      <style:text-properties officeooo:rsid="001f621d"/>
    </style:style>
    <style:style style:name="T2" style:family="text">
      <style:text-properties officeooo:rsid="001fedc6"/>
    </style:style>
    <style:style style:name="T3" style:family="text">
      <style:text-properties officeooo:rsid="00240fbe"/>
    </style:style>
    <style:style style:name="T4" style:family="text">
      <style:text-properties fo:font-style="italic" style:font-style-asian="italic" style:font-style-complex="italic"/>
    </style:style>
    <style:style style:name="T5" style:family="text">
      <style:text-properties fo:font-style="italic" officeooo:rsid="002abbcf" style:font-style-asian="italic" style:font-style-complex="italic"/>
    </style:style>
    <style:style style:name="T6" style:family="text">
      <style:text-properties officeooo:rsid="0025a2cb"/>
    </style:style>
    <style:style style:name="T7" style:family="text">
      <style:text-properties officeooo:rsid="0026cf38"/>
    </style:style>
    <style:style style:name="T8" style:family="text">
      <style:text-properties officeooo:rsid="0031a02b"/>
    </style:style>
    <style:style style:name="T9" style:family="text">
      <style:text-properties officeooo:rsid="00349e98"/>
    </style:style>
    <style:style style:name="T10" style:family="text">
      <style:text-properties officeooo:rsid="00271b33"/>
    </style:style>
    <style:style style:name="T11" style:family="text">
      <style:text-properties officeooo:rsid="0028f24b"/>
    </style:style>
    <style:style style:name="T12" style:family="text">
      <style:text-properties officeooo:rsid="0029f89c"/>
    </style:style>
    <style:style style:name="T13" style:family="text">
      <style:text-properties fo:font-size="12pt" style:font-size-asian="12pt" style:font-size-complex="12pt"/>
    </style:style>
    <style:style style:name="T14" style:family="text">
      <style:text-properties fo:font-size="12pt" officeooo:rsid="002a0ce6" style:font-size-asian="12pt" style:font-size-complex="12pt"/>
    </style:style>
    <style:style style:name="T15" style:family="text">
      <style:text-properties fo:font-size="12pt" officeooo:rsid="003b95ab" style:font-size-asian="12pt" style:font-size-complex="12pt"/>
    </style:style>
    <style:style style:name="T16" style:family="text">
      <style:text-properties fo:font-size="12pt" officeooo:rsid="003baf8f" style:font-size-asian="12pt" style:font-size-complex="12pt"/>
    </style:style>
    <style:style style:name="T17" style:family="text">
      <style:text-properties officeooo:rsid="002a0ce6"/>
    </style:style>
    <style:style style:name="T18" style:family="text">
      <style:text-properties officeooo:rsid="002abbcf"/>
    </style:style>
    <style:style style:name="T19" style:family="text">
      <style:text-properties officeooo:rsid="002b3f23"/>
    </style:style>
    <style:style style:name="T20" style:family="text">
      <style:text-properties officeooo:rsid="002eadd5"/>
    </style:style>
    <style:style style:name="T21" style:family="text">
      <style:text-properties officeooo:rsid="0037d0a0"/>
    </style:style>
    <style:style style:name="T22" style:family="text">
      <style:text-properties officeooo:rsid="0038f0dd"/>
    </style:style>
    <style:style style:name="T23" style:family="text">
      <style:text-properties officeooo:rsid="003baf8f"/>
    </style:style>
    <style:style style:name="T24" style:family="text">
      <style:text-properties officeooo:rsid="003d407e"/>
    </style:style>
    <style:style style:name="T25" style:family="text">
      <style:text-properties officeooo:rsid="003b95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Nietzsche, il filosofo che ha distrutto la morale tradizionale</text:p>
      <text:p text:style-name="P18"/>
      <text:p text:style-name="P19">Friedrich Nietzsche è una figura centrale nella filosofia moderna, spesso descritto come un "filosofo del mar­tello" per la sua radicale critica alla cultura occidenta­le, in particolare alla sua morale, religione e metafisi­ca. Il suo pensiero è caratterizzato da una profonda sfiducia nelle certezze tradizionali e da una volontà di "trasvalutare tutti i valori", <text:span text:style-name="T1">tradizionalmente accettati, capovolgendone il signi</text:span><text:span text:style-name="T2">ficato.</text:span></text:p>
      <text:p text:style-name="P19">Nietzsche ha questa straordinaria capacità di scuotere certezze che diamo per scontate: la morale, la verità, persino l’idea stessa di progresso, <text:span text:style-name="T3">n</text:span>on per distruggere tutto, ma per liberare l’individuo da valori che non gli appartengono, e incoraggiarlo a creare i propri.</text:p>
      <text:p text:style-name="P41">L'opera di Nietzsche, in particolare la Genealogia della Morale (1887), è un'indagine approfondita sull'origine e lo sviluppo dei concetti di "bene" e "male". Nietzsche non si limita a criticare i valori mora­li esistenti, ma ne smaschera le radici, sostenendo che essi non sono universali o divini, ma il prodotto di spe­cifiche condizioni storiche e psicologiche. Secondo lui, la morale non nasce da un senso oggettivo del bene, ma da dinamiche di potere e risentimento.</text:p>
      <text:p text:style-name="P20">Nietzsche distingue tra una morale “nobile”, propria degli individui forti, creativi e affermativi, e una morale “degli schiavi”, nata dal <text:span text:style-name="T4">risentimento</text:span> dei deboli verso i forti. Questa seconda morale, che coincide con quella cristiana, rovescia i valori vitali e glorifica la <text:soft-page-break/>sottomissione, l’umiltà e il sacrificio. I deboli interiorizzano la loro frustrazione e la trasformano in giudizio morale, condannando ciò che non possono essere.</text:p>
      <text:p text:style-name="P37">Nietzsche vede nel Cristianesimo la massima espressione della morale degli schiavi, un "nichilismo passivo" che svaluta la vita terrena in nome di un presunto mondo ultraterreno. Questa morale ha generato una "cattiva coscienza" e un senso di colpa nell'uomo, atrofizzando i suoi istinti più naturali e potenti.</text:p>
      <text:p text:style-name="P42">In questa fase di destrutturazione della morale, Nietzsche affronta il concetto di “volontà di potenza”, quale antidoto alla volontà di potenza debole, <text:span text:style-name="T6">che si manifesta in coloro che</text:span>, non potendo affermarsi direttamente, si vendicano della vita creando valori che condannano la forza e la vitalità. Questa volontà non deve essere fraintesa come volontà di dominare gli altri in senso fisico o politico (anche se può includerlo), ma piuttosto una forza interiore di auto-superamento, di crescita, di affermazione della vita. Non si tratta di un semplice l'istinto di autoconserva­zione (come in Schopenhauer), ma un impulso più profondo a eccellere, a superare i propri limiti, a creare nuovi valori e significati. È la spinta fondamen­tale che anima ogni forma di vita, dalla cellula all'indi­viduo più complesso.</text:p>
      <text:p text:style-name="P43">Parimenti, per Nietzsche non esiste una "verità" asso­luta, oggettiva e universale, valida per tutti in ogni tempo e luogo. La conoscenza, la morale e persino la percezione del mondo sono sempre interpretazioni in­<text:soft-page-break/>fluenzate da un punto di vista specifico, da una "pro­spettiva". </text:p>
      <text:p text:style-name="P38">Le "verità" che l'uomo ha accettato nel corso della sto­ria non sono tali per la loro intrinseca corrispondenza alla realtà, ma perché si sono dimostrate utili per la conservazione della vita o per l'affermazione di una specifica volontà di potenza. La morale tradizionale, con le sue "verità" assolute, è stata utile per mantene­re l'ordine sociale e per controllare le masse, ma è sta­ta dannosa per la vitalità umana. Nietzsche propone un radicale ribaltamento dei valori per risvegliare l'uomo dalla sua "malattia" e condurlo verso l'oltreuo­mo (Übermensch), colui che accetta la tragicità dell'esistenza, la non assolutezza della verità, e che, attraverso la sua volontà di potenza, crea i propri valo­ri, affermando pienamente la vita in ogni suo aspetto.</text:p>
      <text:p text:style-name="P49">Il Superuomo: L'Oltre-Uomo che Trascende la Vecchia Morale.</text:p>
      <text:p text:style-name="P20"><text:span text:style-name="T7">Q</text:span>ueste idee culminano <text:span text:style-name="T7">con il</text:span> concetto del Superuo­mo (Übermensch) e nella dottrina dell'Eterno Ritorno dell'Uguale. La distruzione della morale tradizionale e <text:span text:style-name="T8">il r</text:span>iconosc<text:span text:style-name="T8">imento</text:span> che la verità non è unica, aprono per Nietzsche uno spazio enorme, un vuoto che però non deve portare al nichilismo passivo e alla disperazione, bensì a una nuova creazione. Qui entra in gioco il Su­peruomo (o "Oltre-uomo").</text:p>
      <text:p text:style-name="P37">Il Superuomo non è un essere geneticamente supe­riore o un'evoluzione fisica dell'uomo, ma un ideale fi­losofico ed etico. È colui che ha compreso la "<text:span text:style-name="T4">morte di Dio</text:span>" e l'assenza di valori oggettivi, e che di fronte a questo <text:soft-page-break/>vuoto non si arrende, ma anzi, si fa creatore di nuovi valori.</text:p>
      <text:p text:style-name="P29">Questa figura incarna la volontà di potenza nel suo senso più puro: non più una mera volontà di sopravvi­venza o di dominio sugli altri, ma una volontà di auto-superamento, di crescita e di affermazione della vita in tutte le sue manifestazioni. Il Superuomo abbraccia la propria individualità, i propri istinti e le proprie pas­sioni, senza vergogna o senso di colpa, e vive una vita piena e autentica. È colui che dice un "grande sì" all'esistenza, con tutte le sue gioie e i suoi dolori, e che è capace di danzare anche sull'abisso<text:note text:id="ftn6" text:note-class="footnote"><text:note-citation>1</text:note-citation><text:note-body><text:p text:style-name="P1">L'abisso è una metafora ricorrente in Nietzsche, spesso associata alla vertigine del nulla, al caos, alla sofferenza, alla perdita delle vecchie certezze (come la "morte di Dio"). Nietzsche amava la danza e la usava come simbolo di leggerezza, gioia, libertà, creazione di nuovi valori, accettazione del divenire. Frasi come "Crederei solo a un Dio che sapesse danzare" (Così parlò Zarathustra) o "Bisogna avere ancora il caos in sé per partorire una stella danzante" (Così parlò Zarathustra) lo dimostrano. </text:p></text:note-body></text:note>.</text:p>
      <text:p text:style-name="P29">Intimamente legato al Superuomo è il concetto dell'Eterno Ritorno dell'Uguale, forse la dottrina più enigmatica e radicale di Nietzsche che si ritrova gene­ricamente nelle concezioni del tempo ciclico <text:span text:style-name="T9">(Presocratici e Stoici)</text:span>, per cui l'universo rinasce e rimuore in base a cicli temporali fissati e necessari, ripetendo eternamente un certo corso e rimanendo sempre se stesso. <text:span text:style-name="T10">Per Nietzsche invece l'Eterno Ritorno non è tanto una legge fisica, quanto un esperimento mentale, un "peso più gran­de" che Nietzsche lancia sull'uomo. Immagina se ogni istante della tua vita, ogni dolore, ogni gioia, ogni scelta, ogni errore, dovesse ripetersi esattamente uguale infinite volte. Come reagiresti?</text:span></text:p>
      <text:p text:style-name="P37"><text:soft-page-break/><text:span text:style-name="T10">L</text:span>a risposta a questa domanda è il criterio supremo per giudicare la forza della volontà di potenza e la ca­pacità di affermare la vita. L'uomo comune, schiaccia­to dalla morale del risentimento e dalla cattiva co­scienza, proverebbe orrore di fronte all'idea di rivivere la sua vita. Il Superuomo, invece, colui che ha accetta­to la vita in tutte le sue manifestazioni e che si è libe­rato dai fardelli della morale tradizionale, sarebbe ca­pace di accettare l'Eterno Ritorno con gioia e gratitudi­ne, dicendo "sì" a ogni istante, perché ogni istante è prezioso e irripetibile (anche se si ripete). È l'"<text:span text:style-name="T4">amor fati</text:span>" (amore del destino), l'accettazione incondizionata della propria sorte e della propria esistenza.</text:p>
      <text:p text:style-name="P38">Per capire il significato concreto dell'Eterno Ritorno, dobbiamo vederlo come un pensiero-prova, una sfida radicale che Nietzsche lancia all'individuo. Immagina che un demone ti si avvicini una notte e ti dica:</text:p>
      <text:p text:style-name="P47">"Questa vita, così come tu la vivi ora e l'hai vissuta, dovrai viverla ancora una volta e innumerevoli volte; e non ci sarà in essa mai niente di nuovo, ma ogni dolore e ogni piacere e ogni pensiero e sospiro, e ogni cosa indicibilmente piccola e grande della tua vita dovrà fare ritorno a te, il tutto nella stessa successione e sequenza – e così anche questo ragno e questo lume di luna tra gli alberi, e così anche questo attimo e io stesso. L'eterna clessidra dell'esistenza viene sempre di nuovo capovolta – e tu con essa, granello di polvere!" (da La Gaia Scienza, aforisma 341)</text:p>
      <text:p text:style-name="P20">Di fronte a questa rivelazione, <text:span text:style-name="T11">l</text:span>'uomo <text:span text:style-name="T11">comune</text:span> che vive secondo la morale tradizionale, schiacciato dal senso di <text:soft-page-break/>colpa, dal risentimento, dalla paura del dolo­re e dalla speranza in una ricompensa futura o in un aldilà, proverebbe un orrore paralizzante. L'idea di rivi­vere infinite volte la stessa vita, con tutte le sue soffe­renze, le sue mediocrità, le sue rinunce, sarebbe un fardello insopportabile, una condanna eterna. Questa reazione rivela una vita che non è stata veramente amata, una vita vissuta in attesa di qualcos'altro, una vita negata in parte.</text:p>
      <text:p text:style-name="P29">Il Superuomo, invece, colui che ha abbracciato la volontà di potenza e ha trasvalutato tutti i valori, rea­girebbe con gioia, entusiasmo e gratitudine. Per lui, l'idea dell'Eterno Ritorno non è una condanna, ma la massima affermazione della vita. Se ogni istante è così prezioso e bello da desiderare di riviverlo infinite volte, significa che la vita è stata vissuta pienamente, con un "sì" incondizionato. Questo "sì" è l'"amor fati" (amore del destino): la capacità di accettare e amare tutto ciò che è stato e che sarà, senza riserve, senza rimpianti, senza desiderio di cambiare nulla. L'Eterno Ritorno è un test cruciale <text:span text:style-name="T12">è un Imperativo Etico</text:span>. <text:span text:style-name="T12">C</text:span>i spinge a chieder<text:span text:style-name="T12">ci</text:span>: "S<text:span text:style-name="T12">iamo</text:span> dispost<text:span text:style-name="T12">i</text:span> a vivere questo preciso istante, con tutte le sue conseguenze, infinite volte? Se la risposta è no, allora devi cambiare qualco­sa nella tua vita." È un invito a vivere ogni istante con tale pienezza e consapevolezza da desiderare la sua eterna ripetizione.</text:p>
      <text:p text:style-name="P29">Se ogni cosa si ripete eternamente, allora ogni <text:span text:style-name="T12">nostra</text:span> scelta, ogni <text:span text:style-name="T12">nostra</text:span> azione, ogni <text:span text:style-name="T12">nostro </text:span>pensiero assu­me un peso e un'importanza infiniti. Non c'è scampo, non c'è possibilità di annullare o cancellare. Questo <text:soft-page-break/>conferisce all'esistenza una responsabilità enorme, che non si limita alla vita presente, ma si estende all'eternità.</text:p>
      <text:p text:style-name="P33">L'Eterno Ritorno si contrappone alla concezione li­neare e teleologica (orientata a un fine) del tempo ti­pica del cristianesimo, dove il tempo ha un inizio (creazione) e una fine (giudizio universale/apocalisse) e dove il senso della vita è proiettato verso un aldilà. Nietzsche propone un tempo circolare, che valorizza l'immanenza (il qui e ora), il divenire e l'eternità dell'attimo presente. Ogni istante non è solo un pas­saggio verso qualcos'altro, ma è in sé compiuto e de­gno di essere eternamente riaffermato.</text:p>
      <text:p text:style-name="P29">Di fronte alla "morte di Dio" e al nichilismo (la perdita di senso) <text:span text:style-name="T17">che non rappresenta un’affermazione di atei­smo banale, ma la constatazione che l'idea di un Dio trascendente, garante di un ordine morale universale, di un senso oggettivo dell'esistenza e di valori assoluti (il Bene, il Vero, il Bello come entità eterne e immuta­bili), ha perso la sua forza coercitiva e la sua credibili­tà. Le grandi narrazioni che davano un significato alla vita sono diventate vuote. L'Eterno Ritorno offre una via per un nichilismo attivo e non essendoci un senso imposto dall'esterno, l'individuo deve creare il proprio senso e i propri valori, accettando la vita come un gio­co che si ripete all'infinito, senza bisogno di scopi o fini ultimi trascendenti. Se si abbraccia l'Eterno Ritor­no con gioia, si è implicitamente superata la cattiva coscienza. Non ci si sente più in colpa per i propri istinti o per il proprio essere, perché si desidera che tutto ciò si ripeta.</text:span></text:p>
      <text:p text:style-name="P29"><text:span text:style-name="T17">L</text:span>'Eterno Ritorno è la prova del fuoco per il Superuo­mo, che, liberato dalle illusioni metafisiche e morali, è <text:soft-page-break/>capace di abbracciare la vita nella sua tragicità e nella sua grandezza, affermando ogni istante con un "sì" entusiasta e incondizionato. Non è solo un'idea da ca­pire intellettualmente, ma un pensiero che deve esse­re vissuto e incarnato per trasformare l'esistenza.</text:p>
      <text:p text:style-name="P29"><text:span text:style-name="T17">L</text:span>'Eterno Ritorno non è la possibilità di cambiare o mi­gliorare ciò che è stato. Anzi, è proprio il contrario: <text:span text:style-name="T17">o</text:span>gni singolo istante, ogni dettaglio, ogni gioia, ogni sofferenza, ogni scelta – persino il più piccolo granello di polvere – si ripeterà esattamente allo stesso modo, infinite volte. Non c'è margine per la correzione, per la ricalibrazione, per il "miglioramento". Il patto, se così vogliamo chiamarlo, non è per un'altra possibilità, ma per la stessa, identica possibilità riproposta all'infinito. <text:s/></text:p>
      <text:p text:style-name="P39">L'obiettivo non è modificare il passato o il futuro, ma testare la tua capacità di accettare pienamente il pre­sente (che include il passato). Se potessi migliorare le cose, l'Eterno Ritorno perderebbe il suo potere di "prova" radicale. La domanda che pone è: "Ami così tanto questa vita, con tutte le sue imperfezioni, da vo­lerla rivivere esattamente così come è, infinite volte?" La risposta auspicata da Nietzsche non è il rimpianto per ciò che non è stato perfetto, ma l'"<text:span text:style-name="T4">amor fati</text:span>" – l'amore incondizionato per il proprio destino. Significa abbracciare ogni aspetto della propria esistenza, an­che il dolore e le difficoltà, come parte essenziale e necessaria di ciò che si è. È un "sì" totale alla vita, con tutte le sue contraddizioni. <text:span text:style-name="T18">L’</text:span><text:span text:style-name="T5">amor fati</text:span><text:span text:style-name="T18">, n</text:span>on offre una seconda chance per correggere, ma una sfida per ac­cettare e amare la prima e unica chance (che si ripete all'infinito) esattamente così com'è. È un invito a smet­tere di <text:soft-page-break/>guardare al passato con rimpianto o al futuro con la speranza di redenzione, e a celebrare il presen­te nella sua totalità. Se l'uomo è in grado di desiderare l'eterno ritorno di ogni suo istante, significa che ha superato il senso di colpa e il risentimento che lo legavano alla morale tra­dizionale. Non c'è più bisogno di un aldilà o di un per­dono divino, perché la vita stessa è giustificata nel suo eterno ripetersi.</text:p>
      <text:p text:style-name="P53">L’origine della colpa: dal Debito al Peccato</text:p>
      <text:p text:style-name="P9">Nietzsche, nella sua Genealogia della Morale, non si li­mita a decostruire i valori morali, ma si spinge a inda­gare l'origine della colpa (Schuld in tedesco, significa anche "debito") e il ruolo cruciale che la religione, in particolare quella giudaico-cristiana, ha avuto nella sua formazione e diffusione. <text:span text:style-name="T19">I</text:span>l senso di colpa non è un dato innato o trascendente, ma una costruzione storica e psicologica <text:span text:style-name="T19">che parte da un’origine molto materiale e "terrena".</text:span></text:p>
      <text:p text:style-name="P10"><text:span text:style-name="T20">I</text:span>l concetto di <text:span text:style-name="T19">colpa/debito (</text:span>Schuld) era strettamen­te legato a un rapporto contrattuale tra creditore e debitore. Se il debitore non saldava il suo debito, il creditore aveva il diritto di infliggere una sofferenza (pena) equivalente al danno subito. La sofferenza era quindi una forma di compensazione, un "equivalente" al debito non onorato. Questa "giustizia" primitiva era brutale ma chiara: si trattava di un calcolo di equiva­lenti. Anche la comunità agiva come creditore nei con­fronti del membro che trasgrediva le sue regole, con­siderandolo un debitore verso il "corpo" sociale.</text:p>
      <text:p text:style-name="P10"><text:soft-page-break/>Con l'avvento della civiltà e l'organizzazione in so­cietà sempre più complesse, l'uomo è stato costretto a reprimere i suoi istinti più naturali e aggressivi. La for­za e l'energia, che prima erano dirette verso l'esterno (sull'ambiente o su altri individui), vengono ora reindi­rizzate verso l'interno. Questa interiorizzazione della crudeltà e degli istinti si trasforma in una forma di autotortura psicologica. L'uomo si sente colpevole per i suoi stessi desideri e impulsi "naturali", percepiti come "cattivi" o "peccaminosi". Questa è la nascita della "cattiva coscienza": l'uomo che, non potendo sfo­gare la sua aggressività all'esterno, la rivolge contro se stesso. Secondo Nietzsche, la religione, e in particolare il Cri­stianesimo, ha sfruttato e amplificato questo meccani­smo della cattiva coscienza, portandolo alle sue estre­me conseguenze.</text:p>
      <text:p text:style-name="P6"/>
      <text:p text:style-name="P54">Il Debito Inestinguibile verso Dio</text:p>
      <text:p text:style-name="P13">Il Cristianesimo, ha trasformato il concetto di debi­to/colpa in qualcosa di incommensurabile e inestin­guibile. L'uomo non è più solo debitore verso altri uo­mini o la comunità, ma verso un'entità suprema e on­nipotente: Dio. Questo debito non riguarda più solo azioni specifiche, ma l'intera esistenza umana, mac­chiata dal "<text:span text:style-name="T4">peccato originale</text:span>". Ogni uomo nasce già "colpevole" di fronte a un Dio infinitamente perfetto e santo.</text:p>
      <text:p text:style-name="P7"/>
      <text:p text:style-name="P7"/>
      <text:p text:style-name="P54"><text:soft-page-break/>La Morale del Risentimento e la Glorificazione della Sofferenza</text:p>
      <text:p text:style-name="P13">Come accennato, Nietzsche vede nella morale giu­daico-cristiana la morale degli schiavi, nata dal risenti­mento dei deboli verso i forti. Non potendo affermare la propria volontà di potenza direttamente, i deboli si vendicano capovolgendo i valori: ciò che era forza e vi­talità diventa peccato, e ciò che era debolezza e rasse­gnazione diventa virtù. La colpa diventa uno strumen­to fondamentale di questa morale. Attribuendo a sé stessi una colpa infinita, gli uomini accettano la soffe­renza e la rinuncia in questa vita, nella speranza di una ricompensa nell'aldilà. La sofferenza, il sacrificio e la privazione vengono santificati, trasformati in segni di virtù e devozione. Questo è l'ideale ascetico, che Nietzsche critica aspramente.</text:p>
      <text:p text:style-name="P8"/>
      <text:p text:style-name="P55">La Colpa come Strumento di Potere e Controllo</text:p>
      <text:p text:style-name="P13">Per Nietzsche, la diffusione del senso di colpa è sta­ta funzionale a mantenere il controllo sulle masse. Rendendo gli uomini costantemente colpevoli e inde­gni, la religione li ha resi docili, sottomessi e facili da manipolare. La promessa di perdono o salvezza diven­ta un potente strumento di coercizione, subordinando gli individui all'autorità religiosa e alle sue dottrine.</text:p>
      <text:p text:style-name="P7"/>
      <text:p text:style-name="P54">L'Uomo Malato e Negatore della Vita</text:p>
      <text:p text:style-name="P13">Il risultato di questa interiorizzazione della crudeltà e dell'amplificazione religiosa del senso di colpa è, per Nietzsche, l'uomo moderno: un essere "malato", che ha <text:soft-page-break/>imparato a negare i propri istinti vitali, a tormen­tarsi con il rimorso e a disprezzare la vita terrena in nome di un ideale trascendente. La "cattiva coscienza" ha atrofizzato la sua capacità di gioire e di affermarsi.</text:p>
      <text:p text:style-name="P10">L'analisi che Nietzsche fa della colpa/debito nella Ge­nealogia della Morale trova risonanza diretta e molto potente proprio nella formulazione della preghiera del <text:span text:style-name="T4">Padre Nostro</text:span>, in particolare nella frase: "<text:span text:style-name="T4">Rimetti a noi i nostri debiti, come noi li rimettiamo ai nostri debito­ri.</text:span>"</text:p>
      <text:p text:style-name="P17">Nietzsche avrebbe visto questa frase come una chiara conferma della sua tesi sull'origine "terrena" e con­trattuale del concetto di colpa, e come la religione (nel caso specifico il cristianesimo, che ha il Padre Nostro come preghiera centrale) abbia poi spiritualizzato e amplificato questa dinamica.</text:p>
      <text:p text:style-name="P3"/>
      <text:p text:style-name="P50">Vediamo come si collegano le intuizioni di Nietzsche con la preghiera</text:p>
      <text:p text:style-name="P20">"Debiti" (offese) come radice della "colpa".<text:line-break/>Nietzsche ipotizza che il senso di colpa (Schuld) abbia avuto origine dal concetto primitivo di debito (anch'esso Schuld in tedesco). Nelle società antiche, un debito non saldato generava un diritto del credito­re a infliggere una pena (sofferenza) al debitore. Era una questione di "compensazione", di "equivalente". La frase del Padre Nostro usa esplicitamente il termi­ne "debiti" per indicare le offese, le mancanze, i pecca­ti commessi. Questo avvalora l'idea di Nietzsche che la colpa spirituale affondi le sue radici in una logica di dare/avere, di onorare o meno un'obbligazione.</text:p>
      <text:p text:style-name="P51"><text:soft-page-break/>La Condizionalità del Perdono</text:p>
      <text:p text:style-name="P20">Un aspetto cruciale per Nietzsche sarebbe la condi­zionalità presente nella preghiera: "<text:span text:style-name="T4">come noi li rimet­tiamo ai nostri debitori</text:span>". Il perdono divino non è incon­dizionato, ma è legato alla nostra capacità (o presun­zione) di perdonare gli altri. Questo meccanismo di "occhio per occhio" (seppur trasfigurato in una logica di perdono) rimanda, secondo Nietzsche, a un residuo della logica contrattuale primitiva: io ti perdono (ti ri­metto il debito) se tu perdoni. Non è un atto pura­mente altruistico o disinteressato, ma un reciproco bi­lanciamento di crediti e debiti spirituali.</text:p>
      <text:p text:style-name="P3"/>
      <text:p text:style-name="P50">L'Estensione del Debito all'Infinito (verso Dio)</text:p>
      <text:p text:style-name="P20">Il passaggio dai "debiti" tra uomini ai "debiti" verso Dio è un altro punto chiave per Nietzsche. La religione ha preso questo modello contrattuale e l'ha proiettato su una scala infinita. L'uomo diventa un debitore pe­renne e insolvente nei confronti di un Dio onnipoten­te. Il peccato originale e la natura stessa dell'uomo, imperfetta di fronte alla perfezione divina, creano un debito che non potrà mai essere estinto da soli meriti umani. La richiesta di "<text:span text:style-name="T4">rimettere i nostri debiti</text:span>" nel Pa­dre Nostro, quindi, non è solo per le singole mancan­ze, ma per una condizione esistenziale di debito verso il divino. Nietzsche vede in questo processo una forma di violenza simbolica: la religione, invece di liberare, incatena l’individuo a un debito infinito, alimentando il senso di colpa per controllarne il comportamento. La <text:soft-page-break/>morale cristiana, in questo senso, è per lui una forma di dominio mascherata da compassione.</text:p>
      <text:p text:style-name="P4"/>
      <text:p text:style-name="P5">La "Cattiva Coscienza" e la Repressione degli Istinti</text:p>
      <text:p text:style-name="P20">La preghiera, nella visione di Nietzsche, rafforza la cattiva coscienza. Se l'uomo è costantemente in de­bito con Dio, o se la sua salvezza dipende dalla sua ca­pacità di perdonare (e quindi di controllare i suoi im­pulsi di risentimento o vendetta), questo lo spinge a un'auto-repressione. L'interiorizzazione di queste re­gole e la costante consapevolezza di un "debito" non saldato creano quel tormento interiore che Nietzsche chiama "cattiva coscienza", dove l'uomo rivolge la sua aggressività contro se stesso, sentendosi perenne­mente imperfetto e peccatore.</text:p>
      <text:p text:style-name="P27"><text:span text:style-name="T21">L</text:span>a frase del Padre Nostro è un esempio lampante di come, per Nietzsche, <text:span text:style-name="T4">la lingua stessa della religione sia intrisa di concetti economici e giuridici primitivi</text:span> (debito, remissione, compensazione) che sono stati poi spi­ritualizzati per creare e mantenere il senso di colpa universale. Non si tratta di una critica alla spiritualità in sé, ma al modo in cui certi meccanismi psicologici e sociali hanno plasmato il nostro senso morale, spesso a discapito della pienezza e dell'affermazione della vita che Nietzsche tanto desiderava.</text:p>
      <text:p text:style-name="P2"/>
      <text:p text:style-name="P2"/>
      <text:p text:style-name="P2"/>
      <text:p text:style-name="P52"><text:soft-page-break/><text:span text:style-name="T22">I</text:span>l cammino interiore che l’individuo deve compiere per diventare superuomo.</text:p>
      <text:p text:style-name="P20">Nietzsche parla di un cammino interiore che l'uomo deve compiere per trasformarsi in Superuomo (o Ol­treuomo, dall'originale tedesco Übermensch). Questo percorso non è un'evoluzione biologica o un mero raggiungimento di una superiorità fisica, bensì una profonda trasformazione spirituale e psicologica. Il Superuomo non è un uomo "potenziato" o un esteta, né tantomeno un ideale di superiorità razziale (come fu mal interpretato dal nazismo). È piuttosto un nuovo tipo di uomo, capace di andare "oltre" l'uomo tradizio­nale, di trascendere i limiti imposti dalla morale comu­ne, dalla tradizione e dai valori trascendenti (come quelli cristiani). È colui che dice "sì" alla vita in tutte le sue manifestazioni, accettando sia la gioia che il dolo­re, il caos e l'insensatezza del mondo, senza rifugiarsi in illusioni o certezze esterne.</text:p>
      <text:p text:style-name="P44">Nietzsche descrive questo cammino in “Così parlò Zarathustra” attraverso tre allegoriche metamorfosi dello spirito:</text:p>
      <text:list text:style-name="L1">
        <text:list-item>
          <text:p text:style-name="P45">Il <text:span text:style-name="T23">C</text:span>ammello - <text:span text:style-name="T23">Portare il peso.</text:span></text:p>
          <text:p text:style-name="P46">Il cammello simboleggia lo spirito che si carica dei va­lori tradizionali; la morale, la religione, il dovere, il sa­crificio. È l’uomo che dice “sì” al peso della cultura, che si inginocchia davanti al “Tu devi” e accetta il fardello della storia. Ma questo è solo l’inizio, il cammello en­tra nel deserto, metafora della solitudine e della crisi, dove avverrà la trasformazione.</text:p>
        </text:list-item>
        <text:list-item>
          <text:p text:style-name="P40"><text:span text:style-name="T25">Il Leone – </text:span><text:span text:style-name="T23">Dire no.</text:span></text:p>
          <text:p text:style-name="P46"><text:soft-page-break/><text:s/>Nel deserto, il cammello si trasforma in leone. Il leone è lo spirito che si ribella, che dice “Io voglio” contro il “Tu devi” del drago della morale. È il momento della distruzione dei valori imposti, della conquista della li­bertà. Ma il leone, pur essendo forte, non sa ancora creare: può solo negare, non ancora affermare.</text:p>
        </text:list-item>
        <text:list-item>
          <text:p text:style-name="P46">Il <text:span text:style-name="T23">F</text:span>anciullo – Creare nuovi valori.</text:p>
          <text:p text:style-name="P46">Infine, il leone si trasforma in fanciullo. Il fanciullo <text:span text:style-name="T24">r</text:span>ap­presenta l'innocenza, l'oblio, un nuovo inizio, il gioco e il sacro "dire di sì" alla vita. Il fanciullo è libero da pre­concetti, non più schiavo del passato o delle imposi­zioni esterne. Solo chi è diventato fanciullo può inven­tare nuovi valori, liberi da ogni dogma. È il simbolo della leggerezza e della potenza creativa, che Nie­tzsche considera essenziale per il superuomo. <text:s/>È colui che vive autenticamente, trasformando la propria esi­stenza in un'opera d'arte.</text:p>
          <text:p text:style-name="P46">Queste metamorfosi non sono tappe lineari, ma movi­menti interiori che si intrecciano e si ripetono. Il Supe­ruomo è profondamente radicato nella dimensione terrena, corporea e vitale, rifiutando ogni fuga in mondi ultraterreni o ideali astratti. Il corpo e gli istinti non sono disprezzati, ma riconosciuti come espressio­ne della "grande ragione" dell'uomo.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4-04T15:58:39.594260103</meta:creation-date>
    <dc:date>2026-04-04T16:03:34.810682873</dc:date>
    <dc:creator>corrado tafaro</dc:creator>
    <meta:editing-duration>PT4M56S</meta:editing-duration>
    <meta:editing-cycles>1</meta:editing-cycles>
    <meta:document-statistic meta:table-count="0" meta:image-count="0" meta:object-count="0" meta:page-count="16" meta:paragraph-count="59" meta:word-count="3726" meta:character-count="24182" meta:non-whitespace-character-count="20509"/>
    <meta:generator>LibreOffice/24.2.7.2$Linux_X86_64 LibreOffice_project/420$Build-2</meta:generator>
  </office:meta>
</office:document-meta>
</file>