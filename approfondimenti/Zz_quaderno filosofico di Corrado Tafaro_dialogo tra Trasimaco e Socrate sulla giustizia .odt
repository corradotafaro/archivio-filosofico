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style:font-name="Liberation Serif" fo:font-size="10pt" officeooo:paragraph-rsid="0023db10" style:font-size-asian="10pt" style:font-size-complex="10pt"/>
    </style:style>
    <style:style style:name="P2" style:family="paragraph" style:parent-style-name="Footnote">
      <style:paragraph-properties fo:text-align="justify" style:justify-single-word="false"/>
      <style:text-properties style:font-name="Liberation Serif" fo:font-size="10pt" style:font-size-asian="10pt" style:font-size-complex="10pt"/>
    </style:style>
    <style:style style:name="P3" style:family="paragraph" style:parent-style-name="Heading_20_4" style:master-page-name="Standard">
      <style:paragraph-properties fo:text-align="justify" style:justify-single-word="false" style:page-number="123" fo:break-before="page"/>
      <style:text-properties style:font-name="Liberation Serif" fo:font-size="16pt" fo:font-style="normal" fo:font-weight="normal" officeooo:paragraph-rsid="000f6097" style:font-size-asian="16pt" style:font-style-asian="normal" style:font-weight-asian="normal" style:font-size-complex="16pt" style:font-style-complex="normal" style:font-weight-complex="normal"/>
    </style:style>
    <style:style style:name="P4"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cdfc6b" officeooo:paragraph-rsid="000f6097" style:font-size-asian="14pt" style:font-style-asian="normal" style:font-weight-asian="normal" style:font-size-complex="14pt" style:font-style-complex="normal" style:font-weight-complex="normal"/>
    </style:style>
    <style:style style:name="P5"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cdfc6b" officeooo:paragraph-rsid="000f6097" style:font-size-asian="14pt" style:font-style-asian="normal" style:font-weight-asian="normal" style:font-size-complex="14pt" style:font-style-complex="normal" style:font-weight-complex="normal"/>
    </style:style>
    <style:style style:name="P6"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cdfc6b" officeooo:paragraph-rsid="000f6097"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1f74b7" officeooo:paragraph-rsid="000f6097"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15%" fo:text-align="justify" style:justify-single-word="false"/>
      <style:text-properties style:font-name="Liberation Serif" fo:font-size="14pt" officeooo:paragraph-rsid="000f6097" style:font-size-asian="14pt" style:font-size-complex="14pt"/>
    </style:style>
    <style:style style:name="P9" style:family="paragraph" style:parent-style-name="Standard">
      <style:paragraph-properties fo:margin-top="0cm" fo:margin-bottom="0cm" style:contextual-spacing="false" fo:line-height="115%" fo:text-align="justify" style:justify-single-word="false"/>
      <style:text-properties style:font-name="Liberation Serif" fo:font-size="14pt" officeooo:paragraph-rsid="000f6097" style:font-size-asian="14pt" style:font-size-complex="14pt"/>
    </style:style>
    <style:style style:name="P10"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1cfe11" officeooo:paragraph-rsid="000f6097" style:font-size-asian="14pt" style:font-size-complex="14pt"/>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cfe11" officeooo:paragraph-rsid="000f6097" style:font-size-asian="14pt" style:font-size-complex="14pt"/>
    </style:style>
    <style:style style:name="T1" style:family="text">
      <style:text-properties style:font-name="Noto Sans1" officeooo:rsid="001415c0"/>
    </style:style>
    <style:style style:name="T2" style:family="text">
      <style:text-properties style:font-name="Noto Sans1" officeooo:rsid="0023db10"/>
    </style:style>
    <style:style style:name="T3" style:family="text">
      <style:text-properties officeooo:rsid="001decd9"/>
    </style:style>
    <style:style style:name="T4" style:family="text">
      <style:text-properties officeooo:rsid="001f74b7"/>
    </style:style>
    <style:style style:name="T5" style:family="text">
      <style:text-properties officeooo:rsid="00226688"/>
    </style:style>
    <style:style style:name="T6" style:family="text">
      <style:text-properties officeooo:rsid="00986391"/>
    </style:style>
    <style:style style:name="T7" style:family="text">
      <style:text-properties officeooo:rsid="00999ed5"/>
    </style:style>
    <style:style style:name="T8" style:family="text">
      <style:text-properties officeooo:rsid="0024e2d0"/>
    </style:style>
    <style:style style:name="T9" style:family="text">
      <style:text-properties officeooo:rsid="00206d2c"/>
    </style:style>
    <style:style style:name="T10" style:family="text">
      <style:text-properties style:font-name="Noto Sans" officeooo:rsid="00206d2c"/>
    </style:style>
    <style:style style:name="T11" style:family="text">
      <style:text-properties officeooo:rsid="00d069af"/>
    </style:style>
    <style:style style:name="T12" style:family="text">
      <style:text-properties officeooo:rsid="0023db10"/>
    </style:style>
    <style:style style:name="T13" style:family="text">
      <style:text-properties fo:font-style="italic" style:font-style-asian="italic" style:font-style-complex="italic"/>
    </style:style>
    <style:style style:name="T14" style:family="text">
      <style:text-properties fo:font-style="italic" officeooo:rsid="00cf0515" style:font-style-asian="italic" style:font-style-complex="italic"/>
    </style:style>
    <style:style style:name="T15" style:family="text">
      <style:text-properties fo:font-style="italic" officeooo:rsid="005dbf9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744f5" style:font-style-asian="italic" style:font-weight-asian="bold" style:font-style-complex="italic" style:font-weight-complex="bold"/>
    </style:style>
    <style:style style:name="T18" style:family="text">
      <style:text-properties fo:font-style="italic" fo:font-weight="bold" officeooo:rsid="005dbf98" style:font-style-asian="italic" style:font-weight-asian="bold" style:font-style-complex="italic" style:font-weight-complex="bold"/>
    </style:style>
    <style:style style:name="T19" style:family="text">
      <style:text-properties style:font-name="Bahnschrift SemiBold" fo:font-style="italic" fo:font-weight="bold" officeooo:rsid="003744f5" style:font-style-asian="italic" style:font-weight-asian="bold" style:font-style-complex="italic" style:font-weight-complex="bold"/>
    </style:style>
    <style:style style:name="T20" style:family="text">
      <style:text-properties fo:font-size="11pt" fo:font-style="italic" fo:font-weight="bold" style:font-size-asian="11pt" style:font-style-asian="italic" style:font-weight-asian="bold" style:font-size-complex="11pt" style:font-style-complex="italic" style:font-weight-complex="bold"/>
    </style:style>
    <style:style style:name="T21" style:family="text">
      <style:text-properties fo:font-size="11pt" fo:font-style="italic" fo:font-weight="bold" officeooo:rsid="005dbf98" style:font-size-asian="11pt" style:font-style-asian="italic" style:font-weight-asian="bold" style:font-size-complex="11pt" style:font-style-complex="italic" style:font-weight-complex="bold"/>
    </style:style>
    <style:style style:name="T22" style:family="text">
      <style:text-properties officeooo:rsid="005dbf98"/>
    </style:style>
    <style:style style:name="T23" style:family="text">
      <style:text-properties officeooo:rsid="001717bc"/>
    </style:style>
    <style:style style:name="T24" style:family="text">
      <style:text-properties officeooo:rsid="001bb69e"/>
    </style:style>
    <style:style style:name="T25" style:family="text">
      <style:text-properties officeooo:rsid="0025d7ed"/>
    </style:style>
    <style:style style:name="T26" style:family="text">
      <style:text-properties officeooo:rsid="00153c74"/>
    </style:style>
    <style:style style:name="T27" style:family="text">
      <style:text-properties officeooo:rsid="009b8709"/>
    </style:style>
    <style:style style:name="T28" style:family="text">
      <style:text-properties officeooo:rsid="0015ab6f"/>
    </style:style>
    <style:style style:name="T29" style:family="text">
      <style:text-properties officeooo:rsid="0015ddcc"/>
    </style:style>
    <style:style style:name="T30" style:family="text">
      <style:text-properties officeooo:rsid="00269bd8"/>
    </style:style>
    <style:style style:name="T31" style:family="text">
      <style:text-properties officeooo:rsid="001415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bookmark-start text:name="__RefHeading___Toc4105_3560524389"/><text:span text:style-name="T31">Dibattito sulla </text:span><text:span text:style-name="T12">Democrazia e G</text:span><text:span text:style-name="T31">iustizia. Dialogo tra Trasimaco e Socrate – Dal I Libro “Repubblica” di Platone – </text:span><text:bookmark-end text:name="__RefHeading___Toc4105_3560524389"/></text:h>
      <text:p text:style-name="P4">Platone scrive “Repubblica” intorno al IV secolo a.C., in un periodo di grande turbolenza per la città di Atene. Dopo la fine della guerra del Peloponneso (431-404 a.C.), Atene subisce la sconfitta contro Sparta e attra­versa un periodo di instabilità politica, con il breve e repressivo governo dei Trenta Tiranni nel 404 a.C. </text:p>
      <text:p text:style-name="P5">Questo clima di incertezza e crisi istituzionale influen­za profondamente Platone, che vede i limiti della de­mocrazia ateniese e le sue fragilità nel garantire una politica giusta e razionale. <text:span text:style-name="T3">Dopo la morte di Socrate, condannato e giustiziato ingiustamente, </text:span><text:span text:style-name="T4">Platone pro­pone un modello di governo basato sulla "filosofia del re", cioè l'idea che i filosofi debbano governare perché possiedono la conoscenza e la saggezza necessarie per prendere decisioni giuste. Secondo Platone, la de­mocrazia può portare al caos e alla corruzione perché dà potere a chiunque, indipendentemente dalla sua competenza o moralità. Egli temeva che, in un sistema democratico, le masse fossero facilmente manipolabili dai demagoghi e che si prendessero decisioni basate più sulle emozioni e sull'interesse personale che sul bene comune. Per lui, la democrazia era solo un passo prima della tirannia, dove un leader carismatico pote­va </text:span><text:soft-page-break/><text:span text:style-name="T4">sfruttare il malcontento popolare per imporre un potere assoluto.</text:span></text:p>
      <text:p text:style-name="P7">La sua visione era aristocratica nel senso originale del termine: il governo dei migliori, non dei ricchi o dei nobili, ma di chi ha conoscenza e saggezza. </text:p>
      <text:p text:style-name="P5"><text:span text:style-name="T5">P</text:span><text:span text:style-name="T4">er </text:span><text:span text:style-name="T5">Platone, </text:span><text:span text:style-name="T4">il governo di una nazione dovrebbe esse­re tenuto dai </text:span><text:span text:style-name="T6">saggi</text:span><text:span text:style-name="T4">, in una sorta di tecnocrazia;</text:span><text:span text:style-name="T5"> </text:span><text:span text:style-name="T6">q</text:span><text:span text:style-name="T4">uesto non significa che fosse contro ogni forma di governo partecipativo, ma che cercava un modello più stabile e basato sulla giustizia. </text:span><text:span text:style-name="T7">M</text:span><text:span text:style-name="T4">olte delle sue preoccupazioni sulla manipolazione delle masse e sull'instabilità democratica sono ancora oggi al centro dei dibattiti politici. Platone era un pensatore radicale per il suo tempo, ma non per questo "nemico" della democrazia. </text:span><text:span text:style-name="T8">Era </text:span><text:span text:style-name="T4">più un critico costruttivo che un oppositore assoluto. An­che Aristotele esplora </text:span><text:span text:style-name="T7">questo</text:span><text:span text:style-name="T4"> concetto nel suo trattato “Politica” e anche lui la giudica una forma di stato non opportuna, che facilmente si tra­sforma in tirannide.</text:span></text:p>
      <text:p text:style-name="P5">Il termine “<text:span text:style-name="T9">democrazia” </text:span><text:span text:style-name="T8">quindi </text:span>nasce nell'antica Grecia, <text:span text:style-name="T9">ed è un composto di due parole “dêmos” che significa popolo e “kratos” che significa "potere" o "governo". E’ interessante notare che, per i Greci, il concetto di "kratos" indicava un potere forte, quasi autoritario </text:span>dove la democrazia ateniese rappre­sentava una forma di governo in cui i cittadini parteci­pavano direttamente alle decisioni politiche.</text:p>
      <text:p text:style-name="P6"><text:soft-page-break/>All'inizio del primo libro della <text:span text:style-name="T11">R</text:span>epubblica c'è un dibat­tito di importanza straordinaria, <text:span text:style-name="T5">in cui Platone mette in scena un dialogo tra Socrate e Trasimaco, dove </text:span>esplora il concetto di giustizia, mettendo in discussio­ne la visione realistica e cinica di Trasimaco secondo cui, la giustizia è semplicemente il vantaggio del più forte per proporre una concezione filosofica del bene comune. </text:p>
      <text:p text:style-name="P5"><text:span text:style-name="T12">Il protagonista è Trasimaco</text:span><text:span text:style-name="T12"><text:note text:id="ftn4" text:note-class="footnote"><text:note-citation>1</text:note-citation><text:note-body><text:p text:style-name="P1">Trasimaco, sofista minore del V secolo a.C., si occupò principalmente di retorica e politica. Oratore raffinato, pare fosse abilissimo nell'incitare il pubblico all'ira come al pianto, e per questo lodato e gettonato come insegnante.</text:p></text:note-body></text:note></text:span><text:span text:style-name="T12"> </text:span>un sofista il quale soste­neva una tesi molto forte: <text:span text:style-name="T13">“</text:span><text:span text:style-name="T17">l</text:span><text:span text:style-name="T16">a giustizia non è altro se non l'utile di chi deti</text:span><text:span text:style-name="T18">e</text:span><text:span text:style-name="T16">ne il potere"</text:span> e Trasimaco commen­ta questa tesi in modo molto line<text:span text:style-name="T22">a</text:span>re: <text:s/>“<text:span text:style-name="T13">chi detiene il po­tere ha la forza per imporre le leggi e sono le leggi a san­cire ci</text:span><text:span text:style-name="T14">ò</text:span><text:span text:style-name="T13"> che </text:span><text:span text:style-name="T15">è</text:span><text:span text:style-name="T13"> giusto e ciò che non </text:span><text:span text:style-name="T15">è</text:span><text:span text:style-name="T13"> giusto e di conse­guenza, siccome chi detiene il potere promana le leggi nell'interesse proprio e nella co</text:span><text:span text:style-name="T15">n</text:span><text:span text:style-name="T13">se</text:span><text:span text:style-name="T15">r</text:span><text:span text:style-name="T13">vazione del proprio potere, è evidente che la giustizia è una funzione del po­tere e non viceversa.”</text:span> </text:p>
      <text:p text:style-name="P8">Questa tesi rappresenta una provocazione nei con­fronti della tradizione filosofica greca, che aveva sem­pre considerato la giustizia come un valore morale in­trinseco, indipendente dal potere.</text:p>
      <text:p text:style-name="P9">Trasimaco sostiene che la giustizia è semplicemente il modo in cui i più forti impongono la propria volontà sui più deboli. <text:span text:style-name="T8">S</text:span>ono i più forti quelli che detengono il <text:soft-page-break/>potere, che può essere politico, economico o militare. Questi individui, secondo Trasimaco, hanno il diritto di fare ciò che vogliono, anche a scapito dei più deboli.</text:p>
      <text:p text:style-name="P9">Trasimaco sostiene la sua tesi facendo riferimento alla natura umana, che è caratterizzata da una costante lotta per il potere. In questa lotta, i più forti sono quel­li che vincono e che quindi hanno il diritto di imporre la propria volontà.</text:p>
      <text:p text:style-name="P9">La tesi di Trasimaco ruota attorno ad una visione utili­taristica della giustizia, articolata in due tesi: dappri­ma egli sostiene che «il giusto è l'utile del più forte», mentre in seguito, nello sviluppo del discorso, aggiun­ge che «la giustizia è un bene altrui». Ogni governo, infatti, promulga le leggi in base al proprio utile, e in base al proprio utile stabilisce quindi cosa sia giusto per i sudditi, punendo i trasgressori di conseguenza. È così che i regimi tirannici promulgano leggi tiranni­che, le democrazie leggi democratiche, e via dicendo, secondo il proprio bene. D'altra parte, però, ne risulta che la legge reca danno a chi obbedisce, poiché osser­vandole, e quindi perpetrando l'utile di chi comanda, i sudditi faranno del bene ai potenti, rendendo felici loro e non certo se stessi.</text:p>
      <text:p text:style-name="P9">Come fa notare Vegetti<text:note text:id="ftn5" text:note-class="footnote"><text:note-citation>2</text:note-citation><text:note-body><text:p text:style-name="P2">Mario Vegetti (Milano, 4 gennaio 1937 – Milano, 11 marzo 2018) è stato uno storico della filosofia <text:span text:style-name="T23">e</text:span> <text:span text:style-name="T23">a</text:span>pprezzato in ambito internazionale per le sue traduzioni di Platone, Aristotele, Ippocrate, Galeno.</text:p></text:note-body></text:note>, l'identificazione di potere e ingiustizia permette a Trasimaco di sostenere che <text:soft-page-break/>l'ingiusto, essendo forte, è in grado di sopraffare i giusti (più deboli), e quindi di trarne felicità. Tale identificazione, tuttavia, non è basata su un assunto logico, ma su una fallacia retorica, poiché dalla prima tesi risulta che il potere, all'atto della promulgazione della legge, è eticamente neutro. È dunque possibile ipotizzare, seguendo Vegetti, che Platone attribuisca a Trasimaco la seconda tesi come conseguenza della prima con lo scopo di dimostrare come il rigorismo del sofista e le sue tesi sulla neutralità etica del potere portino in realtà all'affermazione del potere autarchico del tiranno.</text:p>
      <text:p text:style-name="P9"><text:span text:style-name="T24">Questa </text:span>interpretazione di Vegetti su Trasimaco è dav­vero <text:span text:style-name="T24">interessante</text:span>, perché mette in luce la tensione tra potere e giustizia in un modo che risuona ancora oggi. Secondo Vegetti, Trasimaco non si limita a soste­nere che la giustizia sia il vantaggio del più forte, ma rivela una dinamica più profonda: il potere, nel mo­mento in cui promulga leggi, si presenta come etica­mente neutro, ma questa neutralità è solo apparente. In realtà, il potere tende a consolidarsi e a giustificare sé stesso, portando inevitabilmente alla figura del ti­rann<text:span text:style-name="T24">o.</text:span></text:p>
      <text:p text:style-name="P9">Socrate, che conduce il dialogo, oppone a Trasimaco una serie di argomentazioni. Innanzitutto, Socrate so­stiene che la giustizia non può essere semplicemente il modo in cui i più forti impongono la propria volontà. Se <text:soft-page-break/>così fosse, la giustizia sarebbe un valore arbitrario, che varia a seconda di chi ha il potere.</text:p>
      <text:p text:style-name="P9">In secondo luogo, Socrate sostiene che la giustizia è un valore che è vantaggioso per tutti, anche per i più forti. Una società giusta è una società in cui tutti i cit­tadini vivono in pace e prosperità, e questo è vantag­gioso anche per i più potenti.</text:p>
      <text:p text:style-name="P9">Infine, Socrate sostiene che la giustizia è un valore che è conforme alla natura umana. Una persona che agi­sce secondo giustizia agisce secondo la sua natura ra­zionale.</text:p>
      <text:p text:style-name="P9">Il dibattito tra Trasimaco e Socrate è uno dei momenti più importanti della "Repubblica". <text:span text:style-name="T25">R</text:span>appresenta una ri­flessione fondamentale sulla natura della giustizia, che ha avuto un'influenza profonda sul pensiero filo­sofico occidentale <text:span text:style-name="T25">e sono v</text:span><text:span text:style-name="T26">alide anche oggi.</text:span> <text:span text:style-name="T26">Tuttavia, anche le</text:span> tesi di Trasimaco sono attuali, <text:span text:style-name="T25">queste</text:span> posso­no essere interpretate come una critica al potere e alla sua tendenza a corrompere i valori morali. Trasi­maco ci invita a riflettere sulla possibilità che la giusti­zia sia semplicemente un'illusione, un modo per i po­tenti di giustificare la propria oppressione. La tesi di Trasimaco è stata ripresa da autori come Niccolò Ma­chiavelli e Thomas Hobbes, che hanno sostenuto che la giustizia è un prodotto del potere e che non ha al­cun valore intrinseco.</text:p>
      <text:p text:style-name="P9">Niccolò Machiavelli <text:span text:style-name="T26">(Firenze 1469-1527) </text:span>e Thomas Hobbes <text:span text:style-name="T26">(Westport 1588-Hardwick Hall 1679) </text:span><text:s/>sono due <text:soft-page-break/>dei più importanti pensatori politici del Rinasci­mento e dell'età moderna. Entrambi sono noti per il loro realismo politico, che si basa sull'osservazione della natura umana e della realtà politica.</text:p>
      <text:p text:style-name="P9">Machiavelli, nel suo Principe, sostiene che il <text:span text:style-name="T27">P</text:span>rincipe deve essere pronto a fare qualsiasi cosa, anche se in­giusta, pur di mantenere il suo potere. Egli afferma che "il fine giustifica i mezzi" e che il <text:span text:style-name="T25">P</text:span>rincipe deve es­sere "un lupo tra i lupi". Machiavelli, si esprime in ma­niera positiva nei confronti di Trasimaco, sost<text:span text:style-name="T26">enendo</text:span> che il principe deve essere disposto a usare qualsiasi mezzo, anche immoral<text:span text:style-name="T25">e</text:span>, per mantenere il potere. In questo senso, Machiavelli considera Trasimaco un maestro del realismo politico.</text:p>
      <text:p text:style-name="P9"><text:span text:style-name="T26">M</text:span>achiavelli apprezza l'onestà di Trasimaco <text:span text:style-name="T26">in quanto</text:span> è uno dei pochi filosofi che ha il coraggio di dire la ve­rità sulla natura della politica. Machiavelli scrive: "<text:span text:style-name="T13">Tra­simaco è uno dei pochi filosofi che ha capito che la giu­stizia non è altro che una convenzione sociale che serve a garantire il potere del più forte</text:span>." <text:span text:style-name="T26">Inoltre aggiunge</text:span> che "<text:span text:style-name="T13">la giustizia è un'invenzione dei deboli per limitare i for­ti</text:span>".</text:p>
      <text:p text:style-name="P9">Hobbes, nel Leviatano, sostiene che gli esseri umani sono per natura egoisti e competitivi <text:span text:style-name="T25">e in</text:span> un contesto di conflitto, è inevitabile che il più forte prevalga sul più debole <text:span text:style-name="T28">e questo vale anche </text:span><text:span text:style-name="T29">per </text:span><text:span text:style-name="T28">garantire pace e ordine</text:span>.</text:p>
      <text:p text:style-name="P9"><text:soft-page-break/>Hobbes scrive: "<text:span text:style-name="T13">Trasimaco ha capito che la giustizia è una questione di potere e che non ha alcun valore intrin­seco</text:span>."</text:p>
      <text:p text:style-name="P9"><text:span text:style-name="T26">L</text:span>a natura umana è egoista e competitiva <text:span text:style-name="T26">e gli</text:span> esseri umani, in assenza di un potere sovrano, vivono in uno stato di guerra di tutti contro tutti. Per evitare questa guerra, gli esseri umani hanno bisogno di un potere sovrano che li protegga e che garantisca la pace e l'ordine. </text:p>
      <text:p text:style-name="P9"><text:span text:style-name="T26">Tuttavia </text:span>Hobbes, si esprime in maniera più critica nei confronti di Trasimaco, <text:span text:style-name="T29">sostenendo che</text:span> la tesi di Trasi­maco è troppo radicale e che non tiene conto della possibilità di un accordo tra i potenti. <text:span text:style-name="T26">In altre parole, </text:span>la giustizia è una convenzione sociale che serve a garantire la pace e la sicurezza, <text:span text:style-name="T29">ed è </text:span>necessaria per li­mitare il conflitto e per garantire la convivenza pacifica.</text:p>
      <text:p text:style-name="P10">L’argomento giustizia/potere è di una attualità sor­prendente perché ci permette di fare dei collegamenti con le attuali dinamiche politiche e giuridiche. </text:p>
      <text:p text:style-name="P10">Se vogliamo portare il discorso sul presente, possia­mo notare come questa tensione emerga in diverse democrazie, specialmente quando i governi cercano di influenzare o riformare la magistratura per raffor­zare il controllo sulle istituzioni. Se guardiamo alla sto­ria, vediamo che il controllo del sistema giudiziario è spesso stato un punto nevralgico nei regimi autoritari, come <text:soft-page-break/>dimostrano le epurazioni giudiziarie di Luigi Na­poleone nel 1852. </text:p>
      <text:p text:style-name="P10">La riforma della magistratura ungherese del 2012 ha sollevato molte critiche, soprattutto per la concentra­zione di poteri nelle mani del Presidente dell'Ufficio Giudiziario Nazionale, una figura con attribuzioni va­stissime, tra cui la nomina e la revoca dei magistrati, il trasferimento dei casi e l'iniziativa legislativa nel cam­po giudiziario. <text:span text:style-name="T30">Essendo l’Ungheria stato membro dell’Unione Europea, </text:span>la Commissione di Venezia del Consiglio d’Europa <text:span text:style-name="T30">h</text:span>a espr<text:span text:style-name="T30">esso </text:span>preoccupazioni per il rischio di derive antidemocratiche.</text:p>
      <text:p text:style-name="P10">Il parallelismo con le riforme contemporanee, sia in Ungheria che in altre nazioni, solleva interrogativi profondi sulla separazio­ne dei poteri e sulla tutela dello stato di diritto.</text:p>
      <text:p text:style-name="P10">La separazione dei poteri è uno dei pilastri dello stato di diritto, e il ruolo della magistratura è proprio quello di garantire che le leggi siano applicate nel rispetto della Costituzione e dei diritti fondamentali. Tuttavia, quando il potere politico percepisce le decisioni dei giudici come un ostacolo alle proprie iniziative, il ri­schio è quello di una delegittimazione dell'organo giu­diziario, spesso etichettato come “controparte” invece che come garante dell'ordine democratico.</text:p>
      <text:p text:style-name="P11">Questo dibattito si è acceso più volte nella storia, e continua ad essere attuale. In alcuni contesti politici, il <text:soft-page-break/>tentativo di ridimensionare l'indipendenza della magi­stratura può trasformarsi in una concentrazione di po­tere che mina l'equilibrio istituzionale. Platone, nel Li­bro I della Repubblica, con il dialogo tra Socrate e Tra­simaco, ci offre un punto di riflessione proprio su que­sto: quando la giustizia viene ridotta a un mero stru­mento del più forte, il rischio è che diventi un mezzo per consolidare il potere piuttosto che un criterio per regolare la convivenza civ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4T15:49:24.231467073</meta:creation-date>
    <dc:date>2026-04-04T15:53:29.714783847</dc:date>
    <dc:creator>corrado tafaro</dc:creator>
    <meta:editing-duration>PT4M6S</meta:editing-duration>
    <meta:editing-cycles>1</meta:editing-cycles>
    <meta:document-statistic meta:table-count="0" meta:image-count="0" meta:object-count="0" meta:page-count="10" meta:paragraph-count="33" meta:word-count="2018" meta:character-count="13028" meta:non-whitespace-character-count="11030"/>
    <meta:generator>LibreOffice/24.2.7.2$Linux_X86_64 LibreOffice_project/420$Build-2</meta:generator>
  </office:meta>
</office:document-meta>
</file>