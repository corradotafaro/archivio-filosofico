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01cm" fo:margin-bottom="0cm" style:contextual-spacing="false" fo:line-height="115%" fo:text-align="justify" style:justify-single-word="false"/>
      <style:text-properties fo:font-size="14pt" officeooo:rsid="000dfe34" officeooo:paragraph-rsid="001921e9" style:font-size-asian="10.5pt" style:font-size-complex="12pt"/>
    </style:style>
    <style:style style:name="P2" style:family="paragraph" style:parent-style-name="Standard">
      <style:paragraph-properties fo:margin-top="0.199cm" fo:margin-bottom="0cm" style:contextual-spacing="false" fo:line-height="115%" fo:text-align="justify" style:justify-single-word="false"/>
      <style:text-properties fo:font-size="14pt" officeooo:rsid="000dfe34" officeooo:paragraph-rsid="001921e9" style:font-size-asian="10.5pt" style:font-size-complex="12pt"/>
    </style:style>
    <style:style style:name="P3" style:family="paragraph" style:parent-style-name="Text_20_body">
      <style:paragraph-properties fo:margin-top="0cm" fo:margin-bottom="0cm" style:contextual-spacing="false" fo:line-height="115%" fo:text-align="justify" style:justify-single-word="false"/>
      <style:text-properties fo:font-size="14pt" officeooo:rsid="000dfe34" officeooo:paragraph-rsid="001921e9" style:font-size-asian="10.5pt" style:font-size-complex="12pt"/>
    </style:style>
    <style:style style:name="P4" style:family="paragraph" style:parent-style-name="Standard">
      <style:paragraph-properties fo:margin-top="0.101cm" fo:margin-bottom="0cm" style:contextual-spacing="false" fo:line-height="115%" fo:text-align="justify" style:justify-single-word="false"/>
      <style:text-properties fo:font-size="14pt" officeooo:rsid="000dfe34" officeooo:paragraph-rsid="0011d6da" style:font-size-asian="10.5pt" style:font-size-complex="12pt"/>
    </style:style>
    <style:style style:name="P5" style:family="paragraph" style:parent-style-name="Text_20_body">
      <style:paragraph-properties fo:margin-top="0.199cm" fo:margin-bottom="0cm" style:contextual-spacing="false" fo:line-height="115%" fo:text-align="justify" style:justify-single-word="false"/>
      <style:text-properties fo:font-size="14pt" style:font-size-asian="14pt" style:font-size-complex="14pt"/>
    </style:style>
    <style:style style:name="P6" style:family="paragraph" style:parent-style-name="Standard">
      <style:paragraph-properties fo:margin-top="0.101cm" fo:margin-bottom="0cm" style:contextual-spacing="false" fo:line-height="115%" fo:text-align="justify" style:justify-single-word="false"/>
      <style:text-properties officeooo:paragraph-rsid="00101a18"/>
    </style:style>
    <style:style style:name="P7" style:family="paragraph" style:parent-style-name="Text_20_body">
      <style:paragraph-properties fo:margin-top="0cm" fo:margin-bottom="0cm" style:contextual-spacing="false" fo:line-height="115%" fo:text-align="justify" style:justify-single-word="false"/>
      <style:text-properties officeooo:paragraph-rsid="00155513"/>
    </style:style>
    <style:style style:name="P8" style:family="paragraph" style:parent-style-name="Text_20_body">
      <style:paragraph-properties fo:margin-top="0.101cm" fo:margin-bottom="0cm" style:contextual-spacing="false" fo:line-height="115%" fo:text-align="justify" style:justify-single-word="false"/>
      <style:text-properties officeooo:paragraph-rsid="00155513"/>
    </style:style>
    <style:style style:name="P9" style:family="paragraph" style:parent-style-name="Text_20_body">
      <style:paragraph-properties fo:margin-top="0.199cm" fo:margin-bottom="0cm" style:contextual-spacing="false" fo:line-height="115%" fo:text-align="justify" style:justify-single-word="false"/>
      <style:text-properties officeooo:paragraph-rsid="00170090"/>
    </style:style>
    <style:style style:name="P10" style:family="paragraph" style:parent-style-name="Text_20_body">
      <style:paragraph-properties fo:margin-top="0.101cm" fo:margin-bottom="0cm" style:contextual-spacing="false" fo:line-height="115%" fo:text-align="justify" style:justify-single-word="false"/>
      <style:text-properties officeooo:paragraph-rsid="00170090"/>
    </style:style>
    <style:style style:name="P11" style:family="paragraph" style:parent-style-name="Text_20_body">
      <style:paragraph-properties fo:margin-top="0.101cm" fo:margin-bottom="0cm" style:contextual-spacing="false" fo:line-height="115%" fo:text-align="justify" style:justify-single-word="false"/>
    </style:style>
    <style:style style:name="P12" style:family="paragraph" style:parent-style-name="Text_20_body">
      <style:paragraph-properties fo:margin-top="0.101cm" fo:margin-bottom="0cm" style:contextual-spacing="false" fo:line-height="115%" fo:text-align="justify" style:justify-single-word="false"/>
      <style:text-properties officeooo:paragraph-rsid="0019c6d3"/>
    </style:style>
    <style:style style:name="P13"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officeooo:paragraph-rsid="0019c6d3"/>
    </style:style>
    <style:style style:name="P14" style:family="paragraph" style:parent-style-name="Text_20_body">
      <style:paragraph-properties fo:margin-left="0cm" fo:margin-right="0cm" fo:margin-top="0.101cm" fo:margin-bottom="0cm" style:contextual-spacing="false" fo:line-height="115%" fo:text-align="justify" style:justify-single-word="false" fo:text-indent="0cm" style:auto-text-indent="false"/>
      <style:text-properties officeooo:paragraph-rsid="0019c6d3"/>
    </style:style>
    <style:style style:name="P15" style:family="paragraph" style:parent-style-name="Text_20_body">
      <style:paragraph-properties fo:margin-top="0cm" fo:margin-bottom="0cm" style:contextual-spacing="false" fo:line-height="115%" fo:text-align="justify" style:justify-single-word="false"/>
    </style:style>
    <style:style style:name="P16" style:family="paragraph" style:parent-style-name="Text_20_body">
      <style:paragraph-properties fo:margin-top="0.101cm" fo:margin-bottom="0cm" style:contextual-spacing="false" fo:line-height="115%" fo:text-align="justify" style:justify-single-word="false"/>
      <style:text-properties officeooo:paragraph-rsid="001effd9"/>
    </style:style>
    <style:style style:name="P17" style:family="paragraph" style:parent-style-name="Standard">
      <style:paragraph-properties fo:margin-top="0.101cm" fo:margin-bottom="0cm" style:contextual-spacing="false" fo:line-height="115%" fo:text-align="justify" style:justify-single-word="false"/>
      <style:text-properties officeooo:paragraph-rsid="0011d6da"/>
    </style:style>
    <style:style style:name="P18" style:family="paragraph" style:parent-style-name="Text_20_body">
      <style:paragraph-properties fo:margin-top="0.101cm" fo:margin-bottom="0cm" style:contextual-spacing="false" fo:line-height="115%" fo:text-align="justify" style:justify-single-word="false"/>
      <style:text-properties officeooo:paragraph-rsid="00205f47"/>
    </style:style>
    <style:style style:name="P19" style:family="paragraph" style:parent-style-name="Text_20_body">
      <style:paragraph-properties fo:margin-top="0cm" fo:margin-bottom="0cm" style:contextual-spacing="false" fo:line-height="115%" fo:text-align="justify" style:justify-single-word="false"/>
      <style:text-properties officeooo:paragraph-rsid="00205f47"/>
    </style:style>
    <style:style style:name="P20" style:family="paragraph" style:parent-style-name="Text_20_body">
      <style:paragraph-properties fo:margin-top="0.101cm" fo:margin-bottom="0cm" style:contextual-spacing="false" fo:line-height="115%" fo:text-align="justify" style:justify-single-word="false"/>
      <style:text-properties officeooo:paragraph-rsid="00233149"/>
    </style:style>
    <style:style style:name="P21" style:family="paragraph" style:parent-style-name="Text_20_body">
      <style:paragraph-properties fo:margin-top="0.101cm" fo:margin-bottom="0cm" style:contextual-spacing="false" fo:line-height="115%" fo:text-align="center" style:justify-single-word="false"/>
      <style:text-properties officeooo:paragraph-rsid="00233149"/>
    </style:style>
    <style:style style:name="P22" style:family="paragraph" style:parent-style-name="Standard">
      <style:paragraph-properties fo:margin-top="0.199cm" fo:margin-bottom="0cm" style:contextual-spacing="false" fo:line-height="115%" fo:text-align="justify" style:justify-single-word="false"/>
      <style:text-properties officeooo:rsid="0013c064" officeooo:paragraph-rsid="0013c064"/>
    </style:style>
    <style:style style:name="P23" style:family="paragraph" style:parent-style-name="Standard">
      <style:paragraph-properties fo:margin-top="0.101cm" fo:margin-bottom="0cm" style:contextual-spacing="false" fo:line-height="115%" fo:text-align="justify" style:justify-single-word="false"/>
      <style:text-properties officeooo:rsid="0013c064" officeooo:paragraph-rsid="0013c064"/>
    </style:style>
    <style:style style:name="P24" style:family="paragraph" style:parent-style-name="Text_20_body">
      <style:paragraph-properties fo:margin-top="0.101cm" fo:margin-bottom="0cm" style:contextual-spacing="false" fo:line-height="115%" fo:text-align="justify" style:justify-single-word="false"/>
      <style:text-properties officeooo:rsid="0013c064" officeooo:paragraph-rsid="0013c064"/>
    </style:style>
    <style:style style:name="P25" style:family="paragraph" style:parent-style-name="Heading_20_5">
      <style:paragraph-properties fo:margin-top="0.199cm" fo:margin-bottom="0cm" style:contextual-spacing="false" fo:line-height="115%" fo:text-align="justify" style:justify-single-word="false"/>
      <style:text-properties fo:font-size="15pt" fo:font-style="italic" fo:font-weight="normal" officeooo:rsid="000dfe34" officeooo:paragraph-rsid="000dfe34" style:font-size-asian="15pt" style:font-style-asian="italic" style:font-weight-asian="normal" style:font-size-complex="15pt" style:font-style-complex="italic" style:font-weight-complex="normal"/>
    </style:style>
    <style:style style:name="P26" style:family="paragraph" style:parent-style-name="Heading_20_3">
      <style:paragraph-properties fo:margin-top="0cm" fo:margin-bottom="0cm" style:contextual-spacing="false" fo:line-height="115%" fo:text-align="justify" style:justify-single-word="false"/>
      <style:text-properties fo:font-weight="normal" style:font-weight-asian="normal" style:font-weight-complex="normal"/>
    </style:style>
    <style:style style:name="P27" style:family="paragraph" style:parent-style-name="Text_20_body">
      <style:paragraph-properties fo:margin-top="0cm" fo:margin-bottom="0cm" style:contextual-spacing="false" fo:line-height="115%" fo:text-align="justify" style:justify-single-word="false"/>
      <style:text-properties officeooo:rsid="00155513" officeooo:paragraph-rsid="00155513"/>
    </style:style>
    <style:style style:name="P28" style:family="paragraph" style:parent-style-name="Text_20_body">
      <style:paragraph-properties fo:margin-top="0.101cm" fo:margin-bottom="0cm" style:contextual-spacing="false" fo:line-height="115%" fo:text-align="justify" style:justify-single-word="false"/>
      <style:text-properties officeooo:rsid="00155513" officeooo:paragraph-rsid="00155513"/>
    </style:style>
    <style:style style:name="P29" style:family="paragraph" style:parent-style-name="Standard">
      <style:paragraph-properties fo:line-height="115%" fo:text-align="center" style:justify-single-word="false"/>
      <style:text-properties fo:font-size="18pt" fo:font-weight="normal" officeooo:rsid="000dfe34" officeooo:paragraph-rsid="00228f8c" style:font-size-asian="18pt" style:font-weight-asian="normal" style:font-size-complex="18pt" style:font-weight-complex="normal"/>
    </style:style>
    <style:style style:name="P30" style:family="paragraph" style:parent-style-name="Text_20_body">
      <style:paragraph-properties fo:margin-top="0.101cm" fo:margin-bottom="0cm" style:contextual-spacing="false" fo:line-height="115%" fo:text-align="justify" style:justify-single-word="false"/>
      <style:text-properties fo:font-style="italic" officeooo:paragraph-rsid="00233149" style:font-style-asian="italic" style:font-style-complex="italic"/>
    </style:style>
    <style:style style:name="P31" style:family="paragraph" style:parent-style-name="Standard">
      <style:paragraph-properties fo:line-height="115%" fo:text-align="center" style:justify-single-word="false"/>
      <style:text-properties fo:font-size="18pt" fo:font-weight="normal" officeooo:rsid="000dfe34" officeooo:paragraph-rsid="00228f8c" style:font-size-asian="18pt" style:font-weight-asian="normal" style:font-size-complex="18pt" style:font-weight-complex="normal"/>
    </style:style>
    <style:style style:name="P32" style:family="paragraph" style:parent-style-name="Text_20_body" style:list-style-name="L1">
      <style:paragraph-properties fo:margin-top="0.101cm" fo:margin-bottom="0.25cm" style:contextual-spacing="false" fo:line-height="100%" fo:text-align="justify" style:justify-single-word="false"/>
    </style:style>
    <style:style style:name="P33" style:family="paragraph" style:parent-style-name="Text_20_body" style:list-style-name="L2">
      <style:paragraph-properties fo:margin-top="0cm" fo:margin-bottom="0.15cm" style:contextual-spacing="false" fo:line-height="100%" fo:text-align="justify" style:justify-single-word="false"/>
    </style:style>
    <style:style style:name="P34" style:family="paragraph" style:parent-style-name="Text_20_body" style:list-style-name="L3">
      <style:paragraph-properties fo:margin-top="0.101cm" fo:margin-bottom="0cm" style:contextual-spacing="false" fo:line-height="100%" fo:text-align="justify" style:justify-single-word="false"/>
    </style:style>
    <style:style style:name="P35" style:family="paragraph" style:parent-style-name="Text_20_body" style:list-style-name="L4">
      <style:paragraph-properties fo:margin-top="0cm" fo:margin-bottom="0cm" style:contextual-spacing="false" fo:line-height="100%" fo:text-align="justify" style:justify-single-word="false"/>
      <style:text-properties fo:font-size="14pt" style:font-size-asian="14pt" style:font-size-complex="14pt"/>
    </style:style>
    <style:style style:name="P36" style:family="paragraph" style:parent-style-name="Text_20_body" style:list-style-name="L4">
      <style:paragraph-properties fo:margin-top="0.101cm" fo:margin-bottom="0cm" style:contextual-spacing="false" fo:line-height="100%" fo:text-align="justify" style:justify-single-word="false"/>
      <style:text-properties fo:font-size="14pt" style:font-size-asian="14pt" style:font-size-complex="14pt"/>
    </style:style>
    <style:style style:name="T1" style:family="text">
      <style:text-properties fo:font-weight="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9c6d3" style:font-style-asian="italic" style:font-weight-asian="normal" style:font-style-complex="italic" style:font-weight-complex="normal"/>
    </style:style>
    <style:style style:name="T6" style:family="text">
      <style:text-properties fo:font-style="italic" fo:font-weight="normal" officeooo:rsid="00155513" style:font-style-asian="italic" style:font-weight-asian="normal" style:font-style-complex="italic" style:font-weight-complex="normal"/>
    </style:style>
    <style:style style:name="T7" style:family="text">
      <style:text-properties fo:font-style="italic" fo:font-weight="bold" style:font-style-asian="italic" style:font-style-complex="italic"/>
    </style:style>
    <style:style style:name="T8" style:family="text">
      <style:text-properties fo:font-size="14pt" style:font-size-asian="10.5pt" style:font-size-complex="12pt"/>
    </style:style>
    <style:style style:name="T9" style:family="text">
      <style:text-properties fo:font-size="14pt" officeooo:rsid="000dfe34" style:font-size-asian="10.5pt" style:font-size-complex="12pt"/>
    </style:style>
    <style:style style:name="T10" style:family="text">
      <style:text-properties fo:font-size="14pt" officeooo:rsid="00101a18" style:font-size-asian="10.5pt" style:font-size-complex="12pt"/>
    </style:style>
    <style:style style:name="T11" style:family="text">
      <style:text-properties fo:font-size="14pt" officeooo:rsid="0014cb19" style:font-size-asian="10.5pt" style:font-size-complex="12pt"/>
    </style:style>
    <style:style style:name="T12" style:family="text">
      <style:text-properties fo:font-size="14pt" officeooo:rsid="001b742f" style:font-size-asian="10.5pt" style:font-size-complex="12pt"/>
    </style:style>
    <style:style style:name="T13" style:family="text">
      <style:text-properties fo:font-size="14pt" fo:font-weight="normal" style:font-size-asian="10.5pt" style:font-weight-asian="normal" style:font-size-complex="12pt" style:font-weight-complex="normal"/>
    </style:style>
    <style:style style:name="T14" style:family="text">
      <style:text-properties fo:font-size="14pt" fo:font-weight="normal" officeooo:rsid="000dfe34" style:font-size-asian="10.5pt" style:font-weight-asian="normal" style:font-size-complex="12pt" style:font-weight-complex="normal"/>
    </style:style>
    <style:style style:name="T15" style:family="text">
      <style:text-properties fo:font-size="14pt" fo:font-weight="normal" officeooo:rsid="001b742f" style:font-size-asian="10.5pt" style:font-weight-asian="normal" style:font-size-complex="12pt" style:font-weight-complex="normal"/>
    </style:style>
    <style:style style:name="T16" style:family="text">
      <style:text-properties fo:font-size="14pt" style:font-size-asian="14pt" style:font-size-complex="14pt"/>
    </style:style>
    <style:style style:name="T17" style:family="text">
      <style:text-properties fo:font-weight="normal" style:font-weight-asian="normal" style:font-weight-complex="normal"/>
    </style:style>
    <style:style style:name="T18" style:family="text">
      <style:text-properties fo:font-weight="normal" officeooo:rsid="0020d3cd" style:font-weight-asian="normal" style:font-weight-complex="normal"/>
    </style:style>
    <style:style style:name="T19" style:family="text">
      <style:text-properties officeooo:rsid="00155513"/>
    </style:style>
    <style:style style:name="T20" style:family="text">
      <style:text-properties officeooo:rsid="00174041"/>
    </style:style>
    <style:style style:name="T21" style:family="text">
      <style:text-properties officeooo:rsid="001921e9"/>
    </style:style>
    <style:style style:name="T22" style:family="text">
      <style:text-properties officeooo:rsid="0019c6d3"/>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officeooo:rsid="001effd9"/>
    </style:style>
    <style:style style:name="T27" style:family="text">
      <style:text-properties officeooo:rsid="00205f47"/>
    </style:style>
    <style:style style:name="T28" style:family="text">
      <style:text-properties officeooo:rsid="0020d3cd"/>
    </style:style>
    <style:style style:name="T29" style:family="text">
      <style:text-properties officeooo:rsid="00228f8c"/>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Spinoza - <text:span text:style-name="T29">Il </text:span><text:span text:style-name="T21">filosofo della libertà</text:span></text:p>
      <text:p text:style-name="P2">Spinoza nasce ad Amsterdam nel 1632, lo stesso anno di Vermeer. Baruch ha 14 anni quando nasce Leibniz, dieci quando muore Galileo, diciotto quando muore Cartesio. </text:p>
      <text:p text:style-name="P3">Spinoza vive negli anni della <text:span text:style-name="Strong_20_Emphasis">rivoluzione scientifica</text:span>, quando si abbandona la visione aristotelica del cosmo. Secondo Aristotele e la tradizione medievale, il mondo era finito e ordinato: bastava alzare lo sguardo al cielo per immaginare una sorta di “confine”, la sfera delle stelle fisse che racchiudeva tutto.</text:p>
      <text:p text:style-name="P11">Con Cartesio, invece, questa immagine crolla. Il mondo non ha più confini: lo spazio si estende indefinitamente. Cartesio non usa mai apertamente la parola “infinito” per prudenza, ma tutti i suoi contemporanei capiscono che la nuova concezione implica proprio questo.</text:p>
      <text:p text:style-name="P1">In questo scenario, Spinoza si colloca pienamente: la sua filosofia si sviluppa dentro un universo che non è più chiuso e finito, ma aperto e senza limiti, regolato da leggi universali.</text:p>
      <text:h text:style-name="P25" text:outline-level="5"><text:bookmark text:name="m8478-8477-8479"/>Dio, ovvero la natura</text:h>
      <text:p text:style-name="P12">Il mondo è governato da leggi che valgono sempre e ovunque. <text:span text:style-name="T17">Questo mondo nuovo è dunque un mondo </text:span><text:soft-page-break/><text:span text:style-name="T17">che ha le caratteristiche tradizionalmente attribuite a Dio,</text:span> <text:span text:style-name="T22">è</text:span> infinito ed è regolato da leggi che possiamo chiamare eterne, poiché sono valide sempre e ovunque.</text:p>
      <text:p text:style-name="P20">"Nonostante fosse un concetto spaventoso per l'epoca, l'idea che il mondo coincidesse con il divino era a un passo, e Spinoza decise di compierlo con decisione."</text:p>
      <text:p text:style-name="P21">“<text:span text:style-name="T7">Dio, ovvero la natura”, </text:span></text:p>
      <text:p text:style-name="P20"><text:span text:style-name="T23">è una delle</text:span><text:span text:style-name="T4"> </text:span><text:span text:style-name="T23">sue frasi più celebri.</text:span><text:span text:style-name="T1"> </text:span>La natura non è altro che una conseguenza necessaria della natura stessa di Dio, la sua estensione è infinita e non potrebbe essere diversa da quello che è.</text:p>
      <text:p text:style-name="P30">Il rifiuto del Dio trascendente, libero, dotato di attributi morali della tradizione giudaico cristiana non poteva essere più radicale.</text:p>
      <text:p text:style-name="P14">Tuttavia, la natura in quanto tale, la natura nella quale viviamo, non porta in modo evidente le tracce del divino.</text:p>
      <text:p text:style-name="P13"><text:span text:style-name="T4">L’uomo, come tutte le cose che lo circondano, è un ente finito, </text:span><text:span text:style-name="T5">l</text:span><text:span text:style-name="T3">a natura divina, attraverso le leggi eterne che regolano il movimento, ha sbriciolato la materia in tante piccole parti finite all'interno delle quali l’uomo si muove</text:span>. </text:p>
      <text:p text:style-name="P6"><text:span text:style-name="T9">Dal punto di vista di Dio, gli eventi possono essere descritti in modo scientifico: se c’è una certa situazio­</text:span><text:soft-page-break/><text:span text:style-name="T9">ne x </text:span><text:span text:style-name="T10">(</text:span>un seme di girasole è piantato nel terreno, <text:span text:style-name="T9"><text:s/></text:span><text:span text:style-name="T10">s</text:span><text:span text:style-name="T9">e ri­ceve acqua, luce e nutrienti, il seme germoglia; ne se­gue necessariamente un’altra y </text:span><text:span text:style-name="T10">(nasce una piantina, che cresce e sviluppa foglie e fiori) dal punto di vista della scienza (o dello “sguardo di Dio”), questo pro­cesso è necessario: date certe condizioni, il risultato segue inevitabilmente, è una catena di cause ed effetti regolata da leggi naturali.</text:span></text:p>
      <text:p text:style-name="P6"><text:span text:style-name="T9">L’uomo invece, vivendo dentro le cose finite, percepisce ciò che nasce, cresce e muore. Conosce quindi la realtà nella dimensione del tempo e della durata, non in quella dell’eternità. </text:span><text:span text:style-name="T10">P</text:span><text:span text:style-name="T9">rima il seme, poi la pianta che cresce, poi il fiore che appassisce e muore. Noi lo percepiamo come una storia che si svolge, non come una verità eterna. Questa prospettiva delinea una struttura dualistica di matrice platonica, dove la scienza autentica appartiene al regno divino dell'eterno, contrapponendosi all'esperienza quotidiana dell'uomo immerso nel mondo temporale. Attraverso questa analisi, la filosofia spinoziana eleva la comprensione umana oltre i confini della durata passeggera. Da un lato quella eterna e divina, che appartiene alla scienza; dall’altro quella temporale, dove si muove tutto ciò che è finito.</text:span></text:p>
      <text:p text:style-name="P4"><text:soft-page-break/>L’uomo è un essere finito, ma non semplice: è fatto di corpo e di pensiero, cioè di mente. Spinoza, come Cartesio, riconosce questa doppia natura. La domanda è: come comunicano tra loro corpo e mente? Cartesio aveva risposto che corpo e mente agiscono l’uno sull’altra, anche se non sapeva spiegare in che modo. Spinoza invece rifiuta questa idea: proprio perché sono diversi, non possono influenzarsi direttamente. Secondo lui, corpo e mente derivano entrambi da un unico principio, la natura di Dio, e per questo si corrispondono perfettamente. Ogni evento materiale nel corpo ha un risvolto mentale: ciò che accade nel corpo diventa percezione nella mente. Così, se i miei occhi vengono colpiti dalla luce, la mia mente vede le cose; se il mio corpo subisce un urto o un contatto, la mia mente prova dolore o piacere, quando ti scotti con il fuoco, il corpo reagisce e la mente sente dolore.</text:p>
      <text:p text:style-name="P4">La mente non è altro che il lato psichico degli eventi materiali, e ne riproduce fedelmente l’ordine.</text:p>
      <text:p text:style-name="P17"><text:span text:style-name="T9">Pensiamo a uno spartito musicale e a un cantante che esegue quella musica stampata sullo spartito. </text:span><text:span text:style-name="T14">Quello che è scritto sulla carta è completamente diverso dal canto che io sento, e non è la musica scritta a produrre il canto.</text:span><text:span text:style-name="T9"> Tuttavia, ogni nota cantata corrisponde a una nota scritta: spartito e canto si corrispondono </text:span><text:soft-page-break/><text:span text:style-name="T9">perfettamente, seguono la stessa logica. Così è la mente rispetto al corpo.</text:span></text:p>
      <text:p text:style-name="P17"><text:span text:style-name="T9">Se consideriamo l’uomo come un essere finito, immerso tra altri esseri finiti e nel tempo, vediamo che la sua mente registra, come eventi mentali, le modificazioni del corpo. Queste modificazioni però, sono sempre causate da altri corpi esterni, </text:span><text:span text:style-name="T12">p</text:span><text:span text:style-name="T9">er questo secondo Spinoza, nell’esperienza sensibile la mente non è libera: è sempre determinata da ciò che accade fuori di lei. Di conseguenza, la visione del mondo che ne deriva è inevitabilmente soggettiva. La mente non arriva mai a conoscere la vera natura delle cose. Ad esempio: l’occhio viene colpito dalla luce e la mente percepisce i colori. Ma i colori, in realtà, non esistono nelle cose stesse: sono solo il modo in cui la mente traduce le modificazioni del corpo.</text:span></text:p>
      <text:p text:style-name="P23"><text:span text:style-name="T9">E</text:span><text:span text:style-name="T8">cco un esempio, </text:span><text:span text:style-name="T11">bere un caffè.</text:span></text:p>
      <text:p text:style-name="P24"><text:span text:style-name="Strong_20_Emphasis"><text:span text:style-name="T15">E</text:span></text:span><text:span text:style-name="Strong_20_Emphasis"><text:span text:style-name="T13">vento nel corpo:</text:span></text:span><text:span text:style-name="T8"> bevi un caffè caldo, </text:span><text:span text:style-name="T12">l</text:span><text:span text:style-name="T8">a temperatura e le sostanze chimiche modificano il tuo corpo, la lingua percepisce il calore, lo stomaco riceve la caffeina, il sistema nervoso viene stimolato.</text:span></text:p>
      <text:list text:style-name="L1">
        <text:list-item>
          <text:p text:style-name="P32"><text:span text:style-name="Strong_20_Emphasis"><text:span text:style-name="T25">Risvolto nella mente:</text:span></text:span> <text:span text:style-name="T16">queste modificazioni corporee diventano percezioni coscienti. La mente sente il gusto amaro, la sensazione di calore, e dopo qualche minuto percepisce energia o agitazione.</text:span></text:p>
        </text:list-item>
      </text:list>
      <text:list text:style-name="L2">
        <text:list-item>
          <text:p text:style-name="P33"><text:soft-page-break/><text:span text:style-name="Strong_20_Emphasis"><text:span text:style-name="T25">Visione soggettiva</text:span></text:span><text:span text:style-name="Strong_20_Emphasis"><text:span text:style-name="T24">:</text:span></text:span> <text:span text:style-name="T16">tu “senti” il sapore e l’effetto del caffè, ma in realtà il gusto non esiste come proprietà assoluta del chicco. È solo il modo in cui la tua mente traduce le modificazioni del corpo.</text:span></text:p>
        </text:list-item>
      </text:list>
      <text:p text:style-name="P15">Questa conoscenza limitata e soggettiva, che appartiene all’uomo immerso nel tempo, non è però l’unica a cui egli può accedere.</text:p>
      <text:p text:style-name="P11">Se l’uomo sceglie di usare la ragione, invece di lasciarsi trascinare dagli eventi esterni, può arrivare a comprendere le leggi eterne che regolano i movimenti del corpo e della natura. Può cioè conoscere verità che non appartengono al tempo, ma all’eternità. In questo modo, l’uomo che usa la ragione raggiunge una forma di conoscenza simile a quella di Dio: una conoscenza che Spinoza chiama “adeguata”.</text:p>
      <text:h text:style-name="P26" text:outline-level="3">Esempio: la caduta di un oggetto</text:h>
      <text:list text:style-name="L3">
        <text:list-item>
          <text:p text:style-name="P34"><text:span text:style-name="Strong_20_Emphasis"><text:span text:style-name="T25">Conoscenza soggettiva:</text:span></text:span> <text:span text:style-name="T16">se ti cade una mela dalle mani, tu percepisci solo l’evento: la mela scivola, cade a terra, magari si ammacca. È un fatto che vivi nel tempo, come semplice esperienza.</text:span></text:p>
        </text:list-item>
        <text:list-item>
          <text:p text:style-name="P34"><text:span text:style-name="Strong_20_Emphasis"><text:span text:style-name="T25">Conoscenza adeguata</text:span></text:span><text:span text:style-name="Strong_20_Emphasis"><text:span text:style-name="T24">:</text:span></text:span> <text:span text:style-name="T16">se invece usi la ragione, puoi capire che la mela cade perché esiste una legge universale, la gravità, che agisce sempre e ovunque. Questa legge non appartiene al tempo, </text:span><text:soft-page-break/><text:span text:style-name="T16">ma all’eternità: vale per ogni corpo, in ogni momento.</text:span></text:p>
        </text:list-item>
      </text:list>
      <text:p text:style-name="P11">In questo modo, Spinoza dice che l’uomo può andare oltre la percezione soggettiva e cogliere le leggi eterne che regolano la realtà. Non si limita a “vedere” ciò che accade, ma comprende il perché, e questa comprensione è ciò che chiama <text:span text:style-name="Strong_20_Emphasis"><text:span text:style-name="T4">conoscenza adeguata</text:span></text:span><text:span text:style-name="T4">.</text:span></text:p>
      <text:p text:style-name="P16">Quando raggiungo la conoscenza adeguata, anche se rimane limitata, possiedo la stessa forma di conoscenza che ha Dio: una conoscenza stabile, che non cambia al mutare degli eventi. In questo senso sono libero, come dice Spinoza, perché non dipendo da ciò che accade fuori di me; la mia mente governa pienamente la propria conoscenza. Elevandosi al di sopra della mutevolezza degli eventi esterni, l’individuo conquista una libertà interiore che gli permette di governare pienamente la propria mente. Questa partecipazione all'eternità non va intesa come una promessa ultraterrena, bensì come un’esperienza intellettuale che si realizza nel presente, riscattando l'esistenza dalla caducità dei sensi. <text:span text:style-name="T27">Nel pensiero di </text:span><text:span text:style-name="T26">Spinoza,</text:span> la parte immortale di noi coincide con l’esercizio della ragione, capace di farci vivere "<text:span text:style-name="T3">sotto l'aspetto dell'eternità</text:span>" già nel corso della vita terrena.</text:p>
      <text:p text:style-name="P16"><text:soft-page-break/>Ma quando avviene questo accesso all’eternità? Non dopo la morte, bensì ora, in questa vita. Dopo la morte, chi avrà vissuto solo di percezioni sensibili non lascerà nulla di sé. Chi invece avrà esercitato la ragione, già durante la vita partecipa all’eternità, vive nell’eternità ora e per sempre.</text:p>
      <text:p text:style-name="P28">Cosa vuol dire questo?</text:p>
      <text:p text:style-name="P8"><text:span text:style-name="Strong_20_Emphasis"><text:span text:style-name="T6">Chi vive solo di percezioni sensibili</text:span></text:span><text:span text:style-name="T19"> si limita a registrare ciò che accade al corpo (piacere, dolore, colori, suoni). Questa conoscenza è soggettiva e temporale, legata agli eventi esterni. Quando il corpo muore, anche questa forma di conoscenza svanisce, non resta nulla, perché era tutta dipendente dal tempo e dalle impressioni.</text:span></text:p>
      <text:p text:style-name="P8"><text:span text:style-name="Strong_20_Emphasis"><text:span text:style-name="T4">Chi esercita la ragione </text:span></text:span>cerca di comprendere le leggi universali che regolano la realtà. Questa conoscenza è “<text:span text:style-name="T3">adeguata</text:span>” e appartiene all’eternità. Non dipende dagli eventi contingenti, ma coglie verità che non cambiano. Per questo, già durante la vita, la mente partecipa all’eternità, vive in una dimensione che non muore con il cor<text:span text:style-name="T19">po.</text:span></text:p>
      <text:p text:style-name="P8">Immagin<text:span text:style-name="T27">iamo</text:span> due persone che guardano un tramonto, <text:span text:style-name="T27">l</text:span>a prima si limita a percepire i colori e la bellezza del momento. È un’esperienza sensibile, che finisce quando il sole scompare.</text:p>
      <text:p text:style-name="P7"><text:soft-page-break/>La seconda, oltre a godere dello spettacolo, comprende che il tramonto è il risultato del moto della Terra intorno al Sole e della diffusione della luce nell’atmosfera. Questa conoscenza non svanisce con il tramonto: è una verità universale, valida sempre.</text:p>
      <text:p text:style-name="P7">La prima persona vive solo nel tempo, la seconda, usando la ragione, accede a una dimensione eterna.</text:p>
      <text:p text:style-name="P18">Come può l’uomo assicurarsi quella conoscenza che lo rende libero e, in un certo senso, eterno?</text:p>
      <text:p text:style-name="P19">Spinoza risponde con decisione, ampliando continua­mente le proprie conoscenze. È come costruire un mo­saico: solo aggiungendo tessera dopo tessera si arriva a un disegno completo. Le credenze che abbiamo non sono altro che il risultato delle nostre conoscenze. Se conosco poco, il mio giudizio sarà inevitabilmente parziale, inadeguato o persino errato, e non basterà rifletterci sopra per renderlo vero. Se invece le mie conoscenze sono ampie e ordinate, la mente avrà necessariamente idee adeguate e quindi credenze vere. La liberazione dell’uomo, secondo Spinoza, avviene solo attraverso l’accrescimento della conoscenza.</text:p>
      <text:p text:style-name="P10">Sotto questo aspetto, Spinoza è un filosofo molto diverso da Cartesio. Cartesio aveva detto, vuoi liberarti dai pregiudizi, vuoi raggiungere la verità? Chiuditi in una stanza, taglia i contatti col mondo, <text:soft-page-break/>pensa, rifletti, analizza le tue idee e vedrai che ti libererai dai tuoi pregiudizi e arriverai alle idee chiare e distinte, quelle vere. </text:p>
      <text:p text:style-name="P10"><text:span text:style-name="T17">Spinoza, al contrario, spinge a uscire da quella stanza, a leggere, a informarsi, a conoscere più cose possibil</text:span><text:span text:style-name="T18">i</text:span><text:span text:style-name="T17">. </text:span>Se non si aggiungono conoscenze, i pregiudizi non si modificheranno mai. Per questo Spinoza è stato un filosofo della politica, che invece Cartesio non è mai stato. Per questo Spinoza ha scritto un <text:span text:style-name="T2">Trattato teologico politico</text:span> pubblicato in vita senza il suo nome per motivi di prudenza. In questo scritto, Spinoza promuove un’audace difesa della libertà intellettuale, sostenendo che il progresso scientifico sia stato storicamente ostacolato da dogmi religiosi privi di fondamento veritiero. L'autore critica il modo in cui il potere politico ha utilizzato l'autorità delle Scritture per limitare il pensiero, suggerendo invece che lo Stato debba garantire l'autonomia della ricerca filosofica. Secondo questa visione, la verità scientifica e l'indipendenza della ragione sono i presupposti fondamentali per formare cittadini migliori e garantire una società realmente libera. L'opera si configura quindi come un appello cruciale per la separazione tra fede e scienza, finalizzato al benessere collettivo, <text:span text:style-name="T28">s</text:span>olo così gli uomini potranno essere liberi e anche cittadini migliori.</text:p>
      <text:p text:style-name="P9"><text:soft-page-break/><text:span text:style-name="T20">Q</text:span>uando Spinoza parla di <text:span text:style-name="Strong_20_Emphasis">Scrittura</text:span> nel <text:span text:style-name="Emphasis">Trattato teologico-politico</text:span> si riferisce ai <text:span text:style-name="Strong_20_Emphasis">testi sacri della tradizione ebraico-cristiana</text:span>, cioè alla Bibbia.</text:p>
      <text:p text:style-name="P9"><text:span text:style-name="T20">I</text:span>l punto centrale della sua critica è questo:</text:p>
      <text:list text:style-name="L4">
        <text:list-item>
          <text:p text:style-name="P35">La Scrittura contiene molte affermazioni che, prese alla lettera, risultano false o <text:span text:style-name="T29">incoerenti</text:span>.</text:p>
        </text:list-item>
        <text:list-item>
          <text:p text:style-name="P36">Queste affermazioni, se considerate come verità assolute, hanno ostacolato il progresso della scienza, perché hanno imposto limiti alla ricerca razionale.</text:p>
        </text:list-item>
        <text:list-item>
          <text:p text:style-name="P36">L’autorità della Scrittura è stata rafforzata dal potere politico, che l’ha usata come strumento di controllo.</text:p>
        </text:list-item>
      </text:list>
      <text:p text:style-name="P5">Per Spinoza, il potere politico deve garantire la libertà di pensiero e lasciare che gli uomini cerchino la verità attraverso la scienza e la filosofia. Solo così gli individui possono diventare davvero liberi e, di conseguenza, cittadini migliori.</text:p>
      <text:p text:style-name="P9"/>
      <text:p text:style-name="P7"/>
      <text:p text:style-name="P27"/>
      <text:p text:style-name="P22"><text:span text:style-name="T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style:font-size-asian="12pt" style:font-name-complex="FreeSans" style:font-family-complex="Free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1"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5-11-29T15:07:46.898655230</meta:creation-date>
    <dc:date>2026-04-04T17:31:08.021505051</dc:date>
    <dc:creator>corrado tafaro</dc:creator>
    <meta:editing-duration>PT1H30M28S</meta:editing-duration>
    <meta:editing-cycles>7</meta:editing-cycles>
    <meta:generator>LibreOffice/24.2.7.2$Linux_X86_64 LibreOffice_project/420$Build-2</meta:generator>
    <meta:document-statistic meta:table-count="0" meta:image-count="0" meta:object-count="0" meta:page-count="11" meta:paragraph-count="47" meta:word-count="2030" meta:character-count="12900" meta:non-whitespace-character-count="10919"/>
  </office:meta>
</office:document-meta>
</file>