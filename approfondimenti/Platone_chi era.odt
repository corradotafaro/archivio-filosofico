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paragraph-properties fo:text-align="justify" style:justify-single-word="false"/>
      <style:text-properties style:font-name="Liberation Serif"/>
    </style:style>
    <style:style style:name="P2" style:family="paragraph" style:parent-style-name="Preformatted_20_Text">
      <style:paragraph-properties fo:margin-top="0.199cm" fo:margin-bottom="0cm" style:contextual-spacing="false" fo:line-height="115%" fo:text-align="justify" style:justify-single-word="false"/>
      <style:text-properties style:font-name="Liberation Serif" fo:font-size="14pt" officeooo:paragraph-rsid="000e2209" style:font-size-asian="14pt" style:font-size-complex="14pt"/>
    </style:style>
    <style:style style:name="P3" style:family="paragraph" style:parent-style-name="Standard">
      <style:paragraph-properties fo:margin-top="0.199cm" fo:margin-bottom="0cm" style:contextual-spacing="false" fo:line-height="115%" fo:text-align="justify" style:justify-single-word="false"/>
      <style:text-properties style:font-name="Liberation Serif" fo:font-size="14pt" officeooo:paragraph-rsid="000e2209" style:font-size-asian="14pt" style:font-size-complex="14pt"/>
    </style:style>
    <style:style style:name="P4" style:family="paragraph" style:parent-style-name="Preformatted_20_Text">
      <style:paragraph-properties fo:margin-top="0.101cm" fo:margin-bottom="0cm" style:contextual-spacing="false" fo:line-height="115%" fo:text-align="justify" style:justify-single-word="false"/>
      <style:text-properties style:font-name="Liberation Serif" fo:font-size="14pt" officeooo:paragraph-rsid="000e2209" style:font-size-asian="14pt" style:font-size-complex="14pt"/>
    </style:style>
    <style:style style:name="P5"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0e2209" style:font-size-asian="14pt" style:font-size-complex="14pt"/>
    </style:style>
    <style:style style:name="P6"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Liberation Serif" fo:font-size="14pt" officeooo:paragraph-rsid="000e2209" style:font-size-asian="14pt" style:font-size-complex="14pt"/>
    </style:style>
    <style:style style:name="P7"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101c74" style:font-size-asian="14pt" style:font-size-complex="14pt"/>
    </style:style>
    <style:style style:name="P8"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10e86b" style:font-size-asian="14pt" style:font-size-complex="14pt"/>
    </style:style>
    <style:style style:name="P9"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12e50b" style:font-size-asian="14pt" style:font-size-complex="14pt"/>
    </style:style>
    <style:style style:name="P10"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135e95" style:font-size-asian="14pt" style:font-size-complex="14pt"/>
    </style:style>
    <style:style style:name="P11" style:family="paragraph" style:parent-style-name="Quotations">
      <style:paragraph-properties fo:margin-top="0.199cm" fo:margin-bottom="0.199cm" style:contextual-spacing="false" fo:line-height="115%"/>
      <style:text-properties style:font-name="Liberation Serif" fo:font-size="14pt" officeooo:paragraph-rsid="000e2209" style:font-size-asian="14pt" style:font-size-complex="14pt"/>
    </style:style>
    <style:style style:name="P12" style:family="paragraph" style:parent-style-name="Standard">
      <style:paragraph-properties fo:margin-top="0cm" fo:margin-bottom="0cm" style:contextual-spacing="false" fo:line-height="115%" fo:text-align="justify" style:justify-single-word="false"/>
      <style:text-properties style:font-name="Liberation Serif" fo:font-size="14pt" officeooo:rsid="00cdfc6b" officeooo:paragraph-rsid="000e2209" style:font-size-asian="14pt" style:font-size-complex="14pt"/>
    </style:style>
    <style:style style:name="P13"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cdfc6b" officeooo:paragraph-rsid="000e2209" style:font-size-asian="14pt" style:font-size-complex="14pt"/>
    </style:style>
    <style:style style:name="P14" style:family="paragraph" style:parent-style-name="Standard">
      <style:paragraph-properties fo:margin-top="0cm" fo:margin-bottom="0cm" style:contextual-spacing="false" fo:line-height="115%" fo:text-align="justify" style:justify-single-word="false"/>
      <style:text-properties style:font-name="Liberation Serif" fo:font-size="14pt" officeooo:rsid="00cf0515" officeooo:paragraph-rsid="00152947" style:font-size-asian="14pt" style:font-size-complex="14pt"/>
    </style:style>
    <style:style style:name="P15"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c36a79" officeooo:paragraph-rsid="000e2209" style:font-size-asian="14pt" style:font-size-complex="14pt"/>
    </style:style>
    <style:style style:name="P16" style:family="paragraph" style:parent-style-name="Standard">
      <style:paragraph-properties fo:margin-top="0cm" fo:margin-bottom="0cm" style:contextual-spacing="false" fo:line-height="115%" fo:text-align="justify" style:justify-single-word="false"/>
      <style:text-properties style:font-name="Liberation Serif" fo:font-size="14pt" officeooo:rsid="00c36a79" officeooo:paragraph-rsid="000e2209" style:font-size-asian="14pt" style:font-size-complex="14pt"/>
    </style:style>
    <style:style style:name="P17" style:family="paragraph" style:parent-style-name="Standard">
      <style:paragraph-properties fo:margin-top="0.101cm" fo:margin-bottom="0cm" style:contextual-spacing="false" fo:line-height="115%" fo:text-align="justify" style:justify-single-word="false"/>
      <style:text-properties style:font-name="Liberation Serif" fo:font-size="14pt" fo:font-style="normal" fo:font-weight="normal" officeooo:rsid="00c07241" officeooo:paragraph-rsid="000e2209" style:font-size-asian="14pt" style:font-style-asian="normal" style:font-weight-asian="normal" style:font-size-complex="14pt" style:font-style-complex="normal" style:font-weight-complex="normal"/>
    </style:style>
    <style:style style:name="P18" style:family="paragraph" style:parent-style-name="Standard">
      <style:paragraph-properties fo:margin-top="0.101cm" fo:margin-bottom="0cm" style:contextual-spacing="false" fo:line-height="115%" fo:text-align="center" style:justify-single-word="false"/>
      <style:text-properties style:font-name="Liberation Serif" fo:font-size="14pt" fo:font-style="normal" fo:font-weight="normal" officeooo:rsid="00c07241" officeooo:paragraph-rsid="0010e86b" style:font-size-asian="14pt" style:font-style-asian="normal" style:font-weight-asian="normal" style:font-size-complex="14pt" style:font-style-complex="normal" style:font-weight-complex="normal"/>
    </style:style>
    <style:style style:name="P19" style:family="paragraph" style:parent-style-name="Standard">
      <style:paragraph-properties fo:margin-top="0.101cm" fo:margin-bottom="0cm" style:contextual-spacing="false" fo:line-height="115%" fo:text-align="justify" style:justify-single-word="false"/>
      <style:text-properties style:font-name="Liberation Serif" fo:font-size="14pt" fo:font-style="normal" fo:font-weight="normal" officeooo:rsid="00cdfc6b" officeooo:paragraph-rsid="000e2209" style:font-size-asian="14pt" style:font-style-asian="normal" style:font-weight-asian="normal" style:font-size-complex="14pt" style:font-style-complex="normal" style:font-weight-complex="normal"/>
    </style:style>
    <style:style style:name="P20" style:family="paragraph" style:parent-style-name="Standard">
      <style:paragraph-properties fo:margin-top="0.101cm" fo:margin-bottom="0cm" style:contextual-spacing="false" fo:line-height="115%" fo:text-align="center" style:justify-single-word="false"/>
      <style:text-properties style:font-name="Liberation Serif" fo:font-size="14pt" fo:font-style="italic" fo:font-weight="normal" officeooo:rsid="00c07241" officeooo:paragraph-rsid="000e2209" style:font-size-asian="14pt" style:font-style-asian="italic" style:font-weight-asian="normal" style:font-size-complex="14pt" style:font-style-complex="italic" style:font-weight-complex="normal"/>
    </style:style>
    <style:style style:name="P21" style:family="paragraph" style:parent-style-name="Standard">
      <style:paragraph-properties fo:margin-top="0cm" fo:margin-bottom="0cm" style:contextual-spacing="false" fo:line-height="115%" fo:text-align="center" style:justify-single-word="false"/>
      <style:text-properties style:font-name="Liberation Serif" fo:font-size="14pt" fo:font-style="italic" fo:font-weight="normal" officeooo:rsid="00c07241" officeooo:paragraph-rsid="000e2209" style:font-size-asian="14pt" style:font-style-asian="italic" style:font-weight-asian="normal" style:font-size-complex="14pt" style:font-style-complex="italic" style:font-weight-complex="normal"/>
    </style:style>
    <style:style style:name="P22" style:family="paragraph" style:parent-style-name="Footnote">
      <style:paragraph-properties fo:text-align="justify" style:justify-single-word="false"/>
    </style:style>
    <style:style style:name="P23"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cdfc6b" officeooo:paragraph-rsid="000e2209" style:font-size-asian="14pt" style:font-size-complex="14pt"/>
    </style:style>
    <style:style style:name="P24" style:family="paragraph" style:parent-style-name="Heading_20_1">
      <style:paragraph-properties fo:margin-top="0cm" fo:margin-bottom="0cm" style:contextual-spacing="false" fo:break-before="page"/>
      <style:text-properties fo:font-size="14pt" style:font-size-asian="14pt" style:font-size-complex="14pt"/>
    </style:style>
    <style:style style:name="T1" style:family="text">
      <style:text-properties fo:font-variant="normal" fo:text-transform="none" fo:color="#111111" loext:opacity="100%" fo:letter-spacing="normal" fo:font-style="normal" fo:font-weight="normal"/>
    </style:style>
    <style:style style:name="T2" style:family="text">
      <style:text-properties fo:font-variant="normal" fo:text-transform="none" fo:color="#111111" loext:opacity="100%" fo:letter-spacing="normal" fo:font-style="normal" fo:font-weight="normal" officeooo:rsid="00c839be"/>
    </style:style>
    <style:style style:name="T3" style:family="text">
      <style:text-properties fo:font-variant="normal" fo:text-transform="none" fo:color="#111111" loext:opacity="100%" fo:letter-spacing="normal" fo:font-style="normal" fo:font-weight="normal" officeooo:rsid="00c9bec0"/>
    </style:style>
    <style:style style:name="T4" style:family="text">
      <style:text-properties fo:font-variant="normal" fo:text-transform="none" fo:color="#111111" loext:opacity="100%" fo:letter-spacing="normal" fo:font-style="normal" fo:font-weight="normal" officeooo:rsid="001739a0"/>
    </style:style>
    <style:style style:name="T5" style:family="text">
      <style:text-properties fo:font-variant="normal" fo:text-transform="none" fo:color="#111111" loext:opacity="100%" style:text-position="super 58%" fo:letter-spacing="normal" fo:font-style="normal" fo:font-weight="normal" officeooo:rsid="001739a0"/>
    </style:style>
    <style:style style:name="T6" style:family="text">
      <style:text-properties officeooo:rsid="00c22876"/>
    </style:style>
    <style:style style:name="T7" style:family="text">
      <style:text-properties fo:font-style="italic" style:font-style-asian="italic" style:font-style-complex="italic"/>
    </style:style>
    <style:style style:name="T8" style:family="text">
      <style:text-properties fo:font-style="italic" officeooo:rsid="00cf0515" style:font-style-asian="italic" style:font-style-complex="italic"/>
    </style:style>
    <style:style style:name="T9" style:family="text">
      <style:text-properties fo:font-style="italic" officeooo:rsid="005dbf98" style:font-style-asian="italic" style:font-style-complex="italic"/>
    </style:style>
    <style:style style:name="T10" style:family="text">
      <style:text-properties fo:font-style="italic" officeooo:rsid="00c48ddb"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3744f5" style:font-style-asian="italic" style:font-weight-asian="bold" style:font-style-complex="italic" style:font-weight-complex="bold"/>
    </style:style>
    <style:style style:name="T13" style:family="text">
      <style:text-properties fo:font-style="italic" fo:font-weight="bold" officeooo:rsid="005dbf98" style:font-style-asian="italic" style:font-weight-asian="bold" style:font-style-complex="italic" style:font-weight-complex="bold"/>
    </style:style>
    <style:style style:name="T14" style:family="text">
      <style:text-properties fo:font-style="italic" fo:font-weight="normal" officeooo:rsid="00c07241" style:font-style-asian="italic" style:font-weight-asian="normal" style:font-style-complex="italic" style:font-weight-complex="normal"/>
    </style:style>
    <style:style style:name="T15" style:family="text">
      <style:text-properties officeooo:rsid="00c9bec0"/>
    </style:style>
    <style:style style:name="T16" style:family="text">
      <style:text-properties officeooo:rsid="005dbf98"/>
    </style:style>
    <style:style style:name="T17" style:family="text">
      <style:text-properties officeooo:rsid="00d069af"/>
    </style:style>
    <style:style style:name="T18" style:family="text">
      <style:text-properties officeooo:rsid="00cf0515"/>
    </style:style>
    <style:style style:name="T19" style:family="text">
      <style:text-properties officeooo:rsid="00cdfc6b"/>
    </style:style>
    <style:style style:name="T20" style:family="text">
      <style:text-properties officeooo:rsid="00c36a79"/>
    </style:style>
    <style:style style:name="T21" style:family="text">
      <style:text-properties officeooo:rsid="005f6f41"/>
    </style:style>
    <style:style style:name="T22" style:family="text">
      <style:text-properties officeooo:rsid="00c48ddb"/>
    </style:style>
    <style:style style:name="T23" style:family="text">
      <style:text-properties officeooo:rsid="00c839be"/>
    </style:style>
    <style:style style:name="T24" style:family="text">
      <style:text-properties officeooo:rsid="00611516"/>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d8390b" style:font-style-asian="normal" style:font-weight-asian="normal" style:font-style-complex="normal" style:font-weight-complex="normal"/>
    </style:style>
    <style:style style:name="T28" style:family="text">
      <style:text-properties fo:font-style="normal" fo:font-weight="normal" officeooo:rsid="00c839be" style:font-style-asian="normal" style:font-weight-asian="normal" style:font-style-complex="normal" style:font-weight-complex="normal"/>
    </style:style>
    <style:style style:name="T29" style:family="text">
      <style:text-properties fo:font-style="normal" fo:font-weight="normal" officeooo:rsid="00c9bec0" style:font-style-asian="normal" style:font-weight-asian="normal" style:font-style-complex="normal" style:font-weight-complex="normal"/>
    </style:style>
    <style:style style:name="T30" style:family="text">
      <style:text-properties fo:font-style="normal" fo:font-weight="normal" officeooo:rsid="00c07241" style:font-style-asian="normal" style:font-weight-asian="normal" style:font-style-complex="normal" style:font-weight-complex="normal"/>
    </style:style>
    <style:style style:name="T31" style:family="text">
      <style:text-properties fo:font-style="normal" fo:font-weight="normal" officeooo:rsid="005dbf98" style:font-style-asian="normal" style:font-weight-asian="normal" style:font-style-complex="normal" style:font-weight-complex="normal"/>
    </style:style>
    <style:style style:name="T32" style:family="text">
      <style:text-properties fo:font-style="normal" fo:font-weight="normal" officeooo:rsid="00c36a79" style:font-style-asian="normal" style:font-weight-asian="normal" style:font-style-complex="normal" style:font-weight-complex="normal"/>
    </style:style>
    <style:style style:name="T33" style:family="text">
      <style:text-properties fo:font-style="normal" fo:font-weight="normal" officeooo:rsid="00cccd85" style:font-style-asian="normal" style:font-weight-asian="normal" style:font-style-complex="normal" style:font-weight-complex="normal"/>
    </style:style>
    <style:style style:name="T34" style:family="text">
      <style:text-properties fo:font-style="normal" fo:font-weight="normal" officeooo:rsid="00cf0515" style:font-style-asian="normal" style:font-weight-asian="normal" style:font-style-complex="normal" style:font-weight-complex="normal"/>
    </style:style>
    <style:style style:name="T35" style:family="text">
      <style:text-properties fo:font-style="normal" fo:font-weight="normal" officeooo:rsid="00370240" style:font-style-asian="normal" style:font-weight-asian="normal" style:font-style-complex="normal" style:font-weight-complex="normal"/>
    </style:style>
    <style:style style:name="T36" style:family="text">
      <style:text-properties fo:font-style="normal" fo:font-weight="normal" officeooo:rsid="00101c74" style:font-style-asian="normal" style:font-weight-asian="normal" style:font-style-complex="normal" style:font-weight-complex="normal"/>
    </style:style>
    <style:style style:name="T37" style:family="text">
      <style:text-properties fo:font-style="normal" fo:font-weight="normal" officeooo:rsid="0010e86b" style:font-style-asian="normal" style:font-weight-asian="normal" style:font-style-complex="normal" style:font-weight-complex="normal"/>
    </style:style>
    <style:style style:name="T38" style:family="text">
      <style:text-properties fo:font-style="normal" fo:font-weight="normal" officeooo:rsid="0012e50b" style:font-style-asian="normal" style:font-weight-asian="normal" style:font-style-complex="normal" style:font-weight-complex="normal"/>
    </style:style>
    <style:style style:name="T39" style:family="text">
      <style:text-properties fo:font-style="normal" fo:font-weight="normal" officeooo:rsid="00135e95" style:font-style-asian="normal" style:font-weight-asian="normal" style:font-style-complex="normal" style:font-weight-complex="normal"/>
    </style:style>
    <style:style style:name="T40" style:family="text">
      <style:text-properties fo:font-style="normal" fo:font-weight="normal" officeooo:rsid="001739a0" style:font-style-asian="normal" style:font-weight-asian="normal" style:font-style-complex="normal" style:font-weight-complex="normal"/>
    </style:style>
    <style:style style:name="T41" style:family="text">
      <style:text-properties officeooo:rsid="00d3cdeb"/>
    </style:style>
    <style:style style:name="T42" style:family="text">
      <style:text-properties officeooo:rsid="0010e86b"/>
    </style:style>
    <style:style style:name="T43" style:family="text">
      <style:text-properties officeooo:rsid="0013a0f3"/>
    </style:style>
    <style:style style:name="T44" style:family="text">
      <style:text-properties officeooo:rsid="00152947"/>
    </style:style>
    <style:style style:name="T45" style:family="text">
      <style:text-properties officeooo:rsid="001739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Platone</text:h>
      <text:p text:style-name="P3"><text:span text:style-name="T27">N</text:span><text:span text:style-name="T28">acque ad Atene nel 428 a.C, in una delle famiglie più facoltose e conosciute della città </text:span><text:span text:style-name="T29">di Atene.</text:span><text:span text:style-name="T30"> </text:span><text:span text:style-name="T36">V</text:span><text:span text:style-name="T28">isse</text:span><text:span text:style-name="T30"> </text:span><text:span text:style-name="T28">durante il secolo IV </text:span><text:span text:style-name="T30">in un periodo di grandi cambiamenti per la </text:span><text:span text:style-name="T29">sua </text:span><text:span text:style-name="T30">città, </text:span><text:span text:style-name="T36">c</text:span><text:span text:style-name="T2">onobbe </text:span><text:span text:style-name="T1">l’età d’oro della democrazia e del potere ateniese sotto il regno di Pericle negli anni '440 e '430 </text:span><text:span text:style-name="T4">a.C</text:span><text:span text:style-name="T1">, </text:span><text:span text:style-name="T2">ma </text:span><text:span text:style-name="T1">anche un periodo in cui la polis ateniese subì un rapido declino. La guerra del Peloponneso (431-404</text:span><text:span text:style-name="T5">a</text:span><text:span text:style-name="T4">.C.</text:span><text:span text:style-name="T1">) combattuta tra Atene e</text:span><text:span text:style-name="T3">d</text:span><text:span text:style-name="T1"> una coalizione di stati guidata dal suo acerrimo nemico Sparta, si concluse con la sconfitta di Atene e il temporaneo rovesciamento della democrazia ateniese </text:span><text:span text:style-name="T2">a cui fece seguito il governo oligarchico dei trenta tiranni. </text:span><text:span text:style-name="T1"><text:s/></text:span><text:span text:style-name="T32"><text:s/></text:span><text:span text:style-name="T28">D</text:span><text:span text:style-name="T32">eluso dal sistema di violenza e paura che ne deriv</text:span><text:span text:style-name="T28">ò</text:span><text:span text:style-name="T32">, deci</text:span><text:span text:style-name="T28">se</text:span><text:span text:style-name="T32"> di abbandonare la politica </text:span><text:span text:style-name="T28">attiva, </text:span><text:span text:style-name="T32">dedica</text:span><text:span text:style-name="T29">ndosi</text:span><text:span text:style-name="T32"> solo alla filosofia. </text:span><text:span text:style-name="T29">Tale d</text:span><text:span text:style-name="T32">eci­sione, </text:span><text:span text:style-name="T29">fu avvalorata </text:span><text:span text:style-name="T32">ulteriormente dalla </text:span><text:span text:style-name="T33">disillusione e sconforto </text:span><text:span text:style-name="T29">che egli provò </text:span><text:span text:style-name="T32">per la condanna a morte del suo maestro </text:span><text:span text:style-name="T28">Socrate, </text:span><text:span text:style-name="T29">reo di divulgare conoscenza e vir­tù.</text:span><text:span text:style-name="T29"><text:note text:id="ftn1" text:note-class="footnote"><text:note-citation>1</text:note-citation><text:note-body><text:p text:style-name="Footnote">Alexandre Koyré: «tutta la vita filosofica di Platone è stata determinata da un avvenimento eminentemente politico, la condanna a morte di Socrate».</text:p></text:note-body></text:note></text:span></text:p>
      <text:p text:style-name="P7"><text:span text:style-name="T30">Dopo la morte di Socrate, insieme ad altri discepoli, nel timore di subire persecuzioni, si rifugiò a Megara presso Euclide, poi fece visita ai matematici di Cirene, ai profeti in Egitto e ai pitagorici in Italia. In Sicilia fece tre viaggi e nel primo di questi, </text:span><text:span text:style-name="T34">avvenuto </text:span><text:span text:style-name="T30">nel 388 a.C. diede inizio ai suoi rapporti con il tiranno Dioniso I e </text:span><text:soft-page-break/><text:span text:style-name="T30">strinse amicizia con Dione, </text:span><text:span text:style-name="T31">cognato del signore di Siracusa.</text:span><text:span text:style-name="T30"> </text:span><text:span text:style-name="T31">Dione era un </text:span><text:span text:style-name="T30">giovane nobile siracusano, e Platone fu </text:span><text:span text:style-name="T31">subito </text:span><text:span text:style-name="T30">colpito dalla sua intelligenza e dalla sua passione per la filosofia. I due iniziarono a conversare e a discutere di filosofia, e ben presto nacque tra loro un'amicizia profonda. Il progetto di Platone </text:span><text:span text:style-name="T31">era</text:span><text:span text:style-name="T30"> evidentemente quello di convertire la corte siracusana alla propria causa politico-filosofica, secondo il progetto poi codificato </text:span><text:span text:style-name="T36">nella sua opera</text:span><text:span text:style-name="T30"> Repubblica. <text:s/></text:span><text:span text:style-name="T31">I</text:span><text:span text:style-name="T30">l tentativo di Platone fallì, e Dionisio lo espulse dalla Sicilia. </text:span></text:p>
      <text:p text:style-name="P7"><text:span text:style-name="T30">Dopo questo fallimento, Platone tornò ad Atene, profondamente deluso </text:span><text:span text:style-name="T31">e t</text:span><text:span text:style-name="T30">uttavia, non si arrese alla sua visione di una società governata dalla filosofia. Decise quindi di fondare un'accademia, un luogo dove poter insegnare la filosofia e formare i futuri governanti. <text:s/>L'Accademia </text:span><text:span text:style-name="T31">sorse nel giardino di Akademos, un luogo sacro per gli Ateniesi, era aperta a tutti, indipendentemente dalla loro origine sociale o dalla loro ricchezza. F</text:span><text:span text:style-name="T30">u un grande successo, e divenne uno dei centri più importanti della cultura e della filosofia greca. Platone vi insegnò per oltre 40 anni, e vi ebbe come discepoli alcuni dei più grandi filosofi dell'antichità, come Senocrate, Speusippo, Aristotele, Eraclide Pontico, Callippo, Erasto, Timolao, ed altri. </text:span><text:span text:style-name="T31">Tra loro c’erano anche figure femminili </text:span><text:span text:style-name="T30"><text:s/></text:span><text:span text:style-name="T31">come </text:span><text:span text:style-name="T30">Lastenia e Assiotea </text:span><text:span text:style-name="T31">che vengono citate da Platone nelle sue opere “Il Simposio” e “Fedro”. In accademia si discuteva di </text:span><text:soft-page-break/><text:span text:style-name="T31">filosofia, musica, astronomia e matematica. </text:span><text:span text:style-name="T30">Quest’ultima era considerata propedeutica alla filosofia perché, avvalendosi del ragionamento, preparava il terreno per lo studio della pura filosofia. Non è quindi casuale che proprio il dialogo sia stata la scelta stili</text:span><text:span text:style-name="T31">s</text:span><text:span text:style-name="T30">tica come forma espositiva.</text:span></text:p>
      <text:p text:style-name="P6"><text:span text:style-name="T30">Anni dopo, nel raccontare la sua permanenza presso la corte del tiranno </text:span><text:span text:style-name="T37">Dionisio</text:span><text:span text:style-name="T30">, Platone confesserà che non gli piacque nulla di quella vita “</text:span><text:span text:style-name="T14">beata, piena di banchetti, né quel riempirsi lo stomaco due volte al giorno e quel dormire ogni notte in compagnia</text:span><text:span text:style-name="T30">”</text:span></text:p>
      <text:p text:style-name="P17">Il peggio accadde quando Platone e Dionisio si misero a parlare di filosofia e specificatamente della <text:span text:style-name="T42">v</text:span>irtù. Platone in<text:span text:style-name="T6">i</text:span>ziò la discussione dicendo che un uomo virtuos<text:span text:style-name="T6">o</text:span> è più felice di un tiranno, e Dionisio, che già sospettava di non essere abbastanza riverito, gli chies<text:span text:style-name="T42">e</text:span> <text:span text:style-name="T42">con </text:span><text:span text:style-name="T45">un </text:span><text:span text:style-name="T42">botta e risposta</text:span>:</text:p>
      <text:p text:style-name="P20">“ ma che sei venuto a fare in Sicilia?”</text:p>
      <text:p text:style-name="P21">“ a cercare un uomo virtuoso.”</text:p>
      <text:p text:style-name="P21">“ e non pensi di averlo trovato?”</text:p>
      <text:p text:style-name="P21">“ no di certo”</text:p>
      <text:p text:style-name="P21">“ le tue parole sanno di rimbambimento senile!”<text:span text:style-name="T25"> </text:span></text:p>
      <text:p text:style-name="P18">“ <text:span text:style-name="T7">e le tue di tirannide</text:span>” <text:s/></text:p>
      <text:p text:style-name="P8"><text:span text:style-name="T30">Un istante dopo, Platone veniva legato e imbarcato sulla nave dello spartano Pollide, con l’ordine di portarlo a Egina e d</text:span><text:span text:style-name="T29">i </text:span><text:span text:style-name="T30">venderlo al mercato degli schiavi, </text:span><text:soft-page-break/><text:span text:style-name="T40">assicurandolo</text:span><text:span text:style-name="T37">: </text:span>“ <text:span text:style-name="T7">Tanto è un filosofo</text:span> <text:span text:style-name="T7">e non se ne accorgerà nemmeno</text:span>”<text:note text:id="ftn2" text:note-class="footnote"><text:note-citation>2</text:note-citation><text:note-body><text:p text:style-name="P22">Diogene Laerzio, Vite dei filosofi, III, 19-20, dove si riporta la celebre battuta del tiranno secondo cui il filosofo, in quanto tale, non avrebbe risentito della schiavitù. L'episodio della vendita a Egina per intercessione di Pollide e il successivo riscatto da parte di Anniceride di Cirene è ampiamente testimoniato anche da Plutarco, Vita di Dione, 5, 3-7, e da Diodoro Siculo. Bibliotheca historica, XV, 7, 1. </text:p></text:note-body></text:note></text:p>
      <text:p text:style-name="P9"><text:span text:style-name="T34">Il ventennio successivo fu il più fertile per la produzione di Platone, che nel frattempo raccoglieva intorno a sé allievi provenienti da ogni parte della Magna Grecia; nel 367 a.C. il successore di Dionisio I, Dionisio II, su consiglio di Dione convocò </text:span><text:span text:style-name="T31">nuovamente </text:span><text:span text:style-name="T34">a Siracusa Platone </text:span><text:span text:style-name="T38">e </text:span><text:span text:style-name="T34">anche in questo caso la spedizione animata da ancor più chiari intenti politici, ebbe cattivo esito.</text:span></text:p>
      <text:p text:style-name="P10"><text:span text:style-name="T38">Nel</text:span><text:span text:style-name="T31"> 366 a.C., </text:span><text:span text:style-name="T38">con un vero </text:span><text:span text:style-name="T31">atto di forza, Dionisio II spinto dai sospetti politici e dai consigli del filosofo di corte Filisto, </text:span><text:span text:style-name="T39">cacciò bruscamente Dione <text:s/>da Siracusa</text:span><text:span text:style-name="T31">, </text:span><text:span text:style-name="T39">con l’accusa di</text:span><text:span text:style-name="T31"> complottare segretamente con i nemici cartaginesi. </text:span><text:span text:style-name="T38">L</text:span><text:span text:style-name="T34">o stesso Platone, rimasto a Siracusa quale ospite (ma probabilmente ‘trattenuto’ dalla stessa corte), ripartì nel 365 a.C. </text:span></text:p>
      <text:p text:style-name="P19">Il presupposto storico e dottrinale che orientò la decisione di Platone di fare ritorno in Sicilia risiede nella profonda crisi delle poleis democratiche ateniesi, da lui percepite come compagini comunitarie strutturalmente ingiuste, corrotte e asservite alle logiche dell'ambizione personale e d<text:span text:style-name="T43">al desiderio insaziabile di </text:span><text:soft-page-break/><text:span text:style-name="T43">possedere beni e ricchezza, spesso a discapito di altri. </text:span>Confidando nella duttilità intellettuale del giovane Dionisio II, che riteneva ricettivo a un percorso di formazione etico-religiosa e filosofica, Platone intravide la concreta possibilità di indurre il sovrano all'adozione di un nuovo assetto ordinamentale, finalizzato al perseguimento della giustizia e del vivere retto. Il contesto siracusano si configurò pertanto come l'orizzonte storico ideale per tentare la traduzione pragmatica del modello di Stato teorizzato nella Repubblica, dando a Platone l'occasione di testare sul campo il suo modello teorico, trasformando l'utopia filosofica in una reale riforma istituzionale.</text:p>
      <text:p text:style-name="P19">All'inizio del primo libro della <text:span text:style-name="T17">R</text:span>epubblica c'è un dibattito di importanza straordinaria il cui protagonista è Trasimaco, un sofista, il quale sosteneva una tesi molto forte <text:span text:style-name="T7">“</text:span><text:span text:style-name="T12">l</text:span><text:span text:style-name="T11">a giustizia non è altro se non l'utile di chi deti</text:span><text:span text:style-name="T13">e</text:span><text:span text:style-name="T11">ne il potere"</text:span> e Trasimaco commenta questa tesi in modo molto line<text:span text:style-name="T16">a</text:span>re: <text:s/>“<text:span text:style-name="T7">chi detiene il potere ha la forza per imporre le leggi e sono le leggi a sancire ci</text:span><text:span text:style-name="T8">ò</text:span><text:span text:style-name="T7"> che </text:span><text:span text:style-name="T9">è</text:span><text:span text:style-name="T7"> giusto e ciò che non </text:span><text:span text:style-name="T9">è</text:span><text:span text:style-name="T7"> giusto e di conseguenza, siccome chi detiene il potere promana le leggi nell'interesse proprio e nella co</text:span><text:span text:style-name="T9">n</text:span><text:span text:style-name="T7">se</text:span><text:span text:style-name="T9">r</text:span><text:span text:style-name="T7">vazione del proprio potere, è evidente che la giustizia è una funzione del potere e non viceversa.”</text:span> </text:p>
      <text:p text:style-name="P12"><text:span text:style-name="T31">P</text:span><text:span text:style-name="T26">er rispondere a questa tesi, </text:span><text:span text:style-name="T31">Platone, nella sua “Repubblica”</text:span><text:span text:style-name="T34"> </text:span><text:span text:style-name="T26">tenta di sosti</text:span><text:span text:style-name="T31">t</text:span><text:span text:style-name="T26">uire, all'idea di un potere di </text:span><text:soft-page-break/><text:span text:style-name="T26">oppressione e di sfruttamento come è quella di Trasimaco, l'idea di un potere di servizio che si esercita nell'interesse dei sudditi. </text:span><text:span text:style-name="T34">S</text:span><text:span text:style-name="T26">econdo </text:span><text:span text:style-name="T34">P</text:span><text:span text:style-name="T26">latone questo nuovo potere non può essere derivato n</text:span><text:span text:style-name="T34">é</text:span><text:span text:style-name="T26"> dalla ricchezza <text:s/>perch</text:span><text:span text:style-name="T31">é</text:span><text:span text:style-name="T26"> è chiaro che se il potere si congiunge alla ricchezza, il potere sar</text:span><text:span text:style-name="T31">à</text:span><text:span text:style-name="T26"> al servizio della ricchezza e quindi sar</text:span><text:span text:style-name="T31">à</text:span><text:span text:style-name="T26"> di nuovo un potere di sfruttamento. </text:span><text:span text:style-name="T31">Il potere non può derivare </text:span><text:span text:style-name="T26">neppure dalla volontà della maggioranza, in quanto tale, </text:span><text:span text:style-name="T31">perché è</text:span><text:span text:style-name="T26"> la volontà che non ha gli strumenti per comprendere ciò che è il vero interesse della maggioranza. </text:span><text:span text:style-name="T34">L</text:span><text:span text:style-name="T26">a maggioranza esprime desideri, progetti vaghi suggestionabili, spesso soltanto in funzione di richieste immediate senza avere una chiara consapevolezza di ciò che è veramente utile alla città. Quindi il potere non va abbandonato n</text:span><text:span text:style-name="T34">é</text:span><text:span text:style-name="T26"> ai ricchi n</text:span><text:span text:style-name="T34">é</text:span><text:span text:style-name="T26"> ai molti. </text:span><text:span text:style-name="T34">P</text:span><text:span text:style-name="T26">uò esercitare il potere soltanto chi possiede il sapere necessario per comprendere gli interessi general</text:span><text:span text:style-name="T34">i</text:span><text:span text:style-name="T26"> e quindi offrire un servizio alla comunità nel suo insieme non a una parte della comunità se questa parte è la parte maggioritaria. </text:span><text:span text:style-name="T34">Qui</text:span><text:span text:style-name="T26"> c'è in fondo un'idea centrale nella storia del pensiero polit</text:span><text:span text:style-name="T31">i</text:span><text:span text:style-name="T26">co che </text:span><text:span text:style-name="T34">P</text:span><text:span text:style-name="T26">latone propone, l'interesse universale non è necessariamente <text:s/>la rappresent</text:span><text:span text:style-name="T34">azione</text:span><text:span text:style-name="T26"> d</text:span><text:span text:style-name="T35">e</text:span><text:span text:style-name="T26">lla maggioranza, di solito non lo è affa</text:span><text:span text:style-name="T31">t</text:span><text:span text:style-name="T26">to rappresentato. L'interesse universale può essere capito ed ammin</text:span><text:span text:style-name="T31">i</text:span><text:span text:style-name="T26">strato soltanto quando pervenga al potere una piccola parte che tuttavia possiede quegli strumenti intellettuali di conoscenza che la mettono in </text:span><text:soft-page-break/><text:span text:style-name="T26">grado di comprendere quali sono i veri interessi generali. Questa dialettica, fra la parte ed il tutto, è in fondo l'anima del progetto di </text:span><text:span text:style-name="T31">P</text:span><text:span text:style-name="T26">latone che lo mette sia contro le tendenza di parte oligarchica, il potere dei ricchi, che per certi aspetti lui stesso appartiene, sia contro le tendenze di parte democratica, cioè la pura registrazione dei desideri della maggioranza che non sono necessariamente i veri interessi della comunità.</text:span></text:p>
      <text:p text:style-name="P13"><text:span text:style-name="T18">La storia dei viaggi in Sicilia non finisce qui: s</text:span>eguì un terzo viaggio, nel 361 a.C., <text:span text:style-name="T18">(aveva già compiuto 67 anni) </text:span><text:span text:style-name="T16">che Platone intraprese a causa delle</text:span> sollecitazioni <text:span text:style-name="T16">ricevute dallo</text:span> stesso Dione <text:span text:style-name="T16">(ancora esule)</text:span> e dei suoi accoliti, che speravano nel filosofo <text:span text:style-name="T16">che potesse intercedere presso Dionisio II </text:span>per ottenere <text:span text:style-name="T16">il</text:span> ritiro del bando <text:span text:style-name="T16">di espulsione. Il terzo viaggio in Sicilia di Platone fu un fallimento, ma fu comunque importante per la sua vita e la sua filosofia.</text:span></text:p>
      <text:p text:style-name="P13"><text:span text:style-name="T16">Nel</text:span> 357 a.C. Dione, abbandonate le vie diplomatiche, ribaltò il governo di Dionisio II con un colpo di Stato, ma soltanto per essere a sua volta rovesciato da una congiura di palazzo e ucciso <text:span text:style-name="T16">nel </text:span>354 a.C. <text:span text:style-name="T18">a tradimento, <text:s/></text:span>per mano di Callippo, <text:span text:style-name="T18">discepol</text:span><text:span text:style-name="T16">o</text:span><text:span text:style-name="T18"> di Platone che lo aveva affiancato sin dall’inizio.</text:span></text:p>
      <text:p text:style-name="P14">La morte di Dione fu <text:s/>per Platone un duro colpo, <text:span text:style-name="T44">che</text:span> lo spinse a riflettere sulla natura della politica e della giustizia. Platone era convinto che la filosofia potesse <text:soft-page-break/>essere uno strumento importante per migliorare la società, ma la morte di Dione lo fece dubitare della possibilità di realizzare una società ideale. Platone espresse il suo dolore e il suo sgomento per la morte di Dione in diversi dialoghi, <text:span text:style-name="T16">ma principalmente nella </text:span><text:span text:style-name="T32">sua </text:span><text:span text:style-name="T28">VII</text:span><text:span text:style-name="T32"> lettera autobiografica:</text:span></text:p>
      <text:p text:style-name="P11">"<text:span text:style-name="T7">La razza umana non avrà tregua dai mali fino a quando coloro che sono veramente filosofi non acquisiranno potere politico o fino a quando, per qualche dispensa divina, coloro che governano e hanno autorità politica nelle città diventeranno veri filosofi"</text:span>.<text:note text:id="ftn3" text:note-class="footnote"><text:note-citation>3</text:note-citation><text:note-body><text:p text:style-name="Footnote">Platone, VII Epistola, 326 a 326 b.</text:p></text:note-body></text:note></text:p>
      <text:p text:style-name="P5"><text:span text:style-name="T19">La Lettera VII era indirizzata "ai parenti e agli amici di Dione" </text:span><text:span text:style-name="T18">e insieme a</text:span><text:span text:style-name="T19">lla Lettera VIII, </text:span><text:span text:style-name="T16">indirizzata a Dionisio il giovane, </text:span><text:span text:style-name="T19"><text:s/>è considerata dalla maggioranza degli studiosi l'unica ragionevolmente attribuibile al filosofo ateniese. La lettera racconta la storia della relazione tra Platone e Dione </text:span><text:span text:style-name="T16">che non fu soltanto intellettuale</text:span><text:span text:style-name="T19">, e descrive i </text:span><text:span text:style-name="T16">viaggi</text:span><text:span text:style-name="T19"> che Platone fece a Siracusa per tentare di aiutare Dione a realizzare il suo progetto di instaurare una forma di governo più giusta e virtuosa. La lettera è infatti la più importante fonte sui viaggi di Platone in Sicilia, poiché essa ha un impianto sostanzialmente autobiografico e il suo nucleo narrativo è rappresentato proprio dai tre viaggi.</text:span></text:p>
      <text:p text:style-name="P5"><text:soft-page-break/><text:span text:style-name="T20">Abbiamo detto dello sdegno che provò Platone nei confronti della politica attiva, <text:s/>ma questo non lo dissuase a fare ulterior</text:span><text:span text:style-name="T15">i</text:span><text:span text:style-name="T20"> indagin</text:span><text:span text:style-name="T15">i</text:span><text:span text:style-name="T20"> e riflession</text:span><text:span text:style-name="T15">i</text:span><text:span text:style-name="T20"> sulla politica, da dove nacque un’idea di filosofia intesa come processo di crescita dell’uomo <text:s/>come membro organicamente appartenente alla polis.</text:span></text:p>
      <text:p text:style-name="P15"><text:span text:style-name="T15">Da queste </text:span>riflession<text:span text:style-name="T15">i</text:span>, <text:span text:style-name="T15">ci sembra di dover dedurre</text:span> che per il filosofo ateniese, risolvere il problema della giustizia significa<text:span text:style-name="T15">va</text:span> affrontare il problema della conoscenza. </text:p>
      <text:p text:style-name="P16">Platone conservò dal suo maestro, lo spirito di ricerca, la forma del dialogo e la centralità della riflessione etica, <text:span text:style-name="T15">q</text:span>uella che in termini storici possiamo chiamare "filosofia platonica" ovvero il corpus di idee e di testi che definiscono la tradizione storica del pensiero platonico. </text:p>
      <text:p text:style-name="P16">La capacità di agire secondo giustizia presuppone, socraticamente, la conoscenza di che cosa è il bene. Solo questo sapere contraddistingue il filosofo come tale, poiché chi compie il male lo fa per ignoranza. Ad Atene c'era molta confusione sulla figura del filosofo, e in un certo senso lo stesso Socrate aveva alimentato questa confusione, presentandosi infatti come colui che sapeva di non sapere, professava una falsa ignoranza che nascondeva una vera sapienza. Egli si confondeva così con i sofisti, i quali dicevano di sapere ma in effetti non sapevano, perché non credevano nella verità. </text:p>
      <text:p text:style-name="P4"><text:soft-page-break/>Per dirimere questa confusione, per Platone era necessario andare oltre Socrate, delineando con chiarezza i criteri che distingu<text:span text:style-name="T21">evano</text:span> il filosofo dal sofista: mentre il primo ricerca<text:span text:style-name="T21">va</text:span> i principi della verità, senza la presunzione di possederla, il secondo si lascia<text:span text:style-name="T21">va</text:span> guidare dall'opinione, facendone l'unico parametro valido della conoscenza.</text:p>
      <text:p text:style-name="P4"><text:span text:style-name="T22">Altro problema per Platone fu il dover constatare che tra la filosofia e la vita politica, esisteva contrapposizione e rivalità basata su questioni che non avevano alcun fondamento di esistere. </text:span><text:span text:style-name="T15">Ci si domanda</text:span><text:span text:style-name="T21">va</text:span><text:span text:style-name="T15"> come </text:span><text:span text:style-name="T21">fosse</text:span><text:span text:style-name="T15"> </text:span><text:span text:style-name="T22"><text:s/>stato possibile trattare Socrate come un criminale comune, pur essendo stato “</text:span><text:span text:style-name="T10">il più giusto</text:span><text:span text:style-name="T22">” tra gli uomini? Per Platone </text:span><text:span text:style-name="T23">era </text:span><text:span text:style-name="T22">necessario che la filosofia non </text:span><text:span text:style-name="T23">entrasse </text:span><text:span text:style-name="T22">in contrasto con lo </text:span><text:span text:style-name="T18">St</text:span><text:span text:style-name="T22">ato, ma che </text:span><text:span text:style-name="T23">fosse</text:span><text:span text:style-name="T22"> fonte di luce per illuminare il pensiero dei politici.</text:span></text:p>
      <text:p text:style-name="P4">Il tema era connesso alla convinzione <text:span text:style-name="T15">per molti ateniesi, </text:span>che la filosofia fosse inutile: Socrate <text:span text:style-name="T15">era </text:span>quello rappresentato <text:span text:style-name="T22">nella commedia di Aristofane “Le nuvole”</text:span><text:span text:style-name="T22"><text:note text:id="ftn4" text:note-class="footnote"><text:note-citation>4</text:note-citation><text:note-body><text:p text:style-name="P1">La trama della commedia ruota attorno al contadino Strepsiade, che è perseguitato dai creditori a causa dei soldi che suo figlio Fidippide ha dilapidato alle corse dei cavalli. Strepsiade pensa allora di mandare il figlio alla scuola di Socrate, <text:span text:style-name="T24">affinché</text:span> <text:span text:style-name="T24">insegni al figlio l’arte di </text:span><text:s/>prevalere negli scontri dialettici, anche in posizione di evidente torto. </text:p></text:note-body></text:note></text:span> in cui il filosofo è ritratto come un pedante seccatore perso nelle sue discussioni astratte e campate in aria. In un brano del Gorgia il sofista Callicle, dice che la filosofia tutt'al più può essere praticata dai <text:soft-page-break/>giovani che, inesperti della vita, si possono abbandonare ai discorsi campati in aria; quando però un uomo anziano, come Socrate, perde il suo tempo a discutere di problemi astratti, questo è degno di essere preso a bastonate.</text:p>
      <text:p text:style-name="P4">Platone invece dimostra che la filosofia ha un radicamento storico, essa cioè affonda le sue radici nella storia, nella realtà quotidiana come appare dagli interlocutori di Socrate che sono cioè politici come Alcibiade, filosofi come Parmenide, artisti come Aristofane. Socrate quindi è perfettamente inserito nel dibattito culturale del suo tempo e i suoi dialoghi riguardano problemi reali e universali. Così Socrate, pur non sembrando, fa politica tanto da venire condannato e morire per accuse politiche.</text:p>
      <text:p text:style-name="P4">C'è quindi uno stretto legame tra il filosofo e la politica, <text:span text:style-name="T15">e per uscire dall’equivoco, </text:span>occorre indicare esplicitamente quali s<text:span text:style-name="T24">ono</text:span> le radici di questo legame, che ancora una volta <text:span text:style-name="T15">hanno riscontro</text:span> nella conoscenza della virtù e nei criteri per distinguerla dalle opinioni e dalle strumentalizzazioni personali. Secondo alcune interpretazioni, per Platone la conoscenza del bene non <text:span text:style-name="T15">si basa nella </text:span>enumerazione di singoli esempi di virtù, bensì la definizione di cosa sia la virtù in se stessa. L'unicità della virtù è una delle principali tesi socratiche, <text:span text:style-name="T24">e Platone </text:span>nei dialoghi giovanili, difende e <text:soft-page-break/>corrobora questa tesi, analizzando il contenuto di alcune delle virtù tenute in più alta considerazione nel mondo greco.</text:p>
      <text:p text:style-name="P2">Platone, è il primo filosofo <text:span text:style-name="T24">che vanta</text:span> una quantità notevole di scritti; contrariamente a Socrate, che non scrisse nulla, ci ha lasciato ben 34 dialoghi dal contenuto filosofico e 13 lettere utili a ricostruire il suo pensiero. Tutto questo materiale ha evidentemente compiuto la missione filosofica di Platone, perché è stato studiato e tramandato nei secoli, ha influenzato enormemente la cultura occidentale ed è stato ripreso, smentito, ampliato, da numerosi filosofi. Tutto questo materiale riflette il percorso del pensiero platonico e viene generalmente diviso in tre parti, corrispondenti a 3 periodi del suo insegnamento e della sua vita, nell<text:span text:style-name="T41">a</text:span> fas<text:span text:style-name="T41">e</text:span> della giovinezza, della maturità e della vecchiaia, corrispondenti grosso modo ai periodi 397-387 a.C., 387-367 a.C., 367-347 a.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5T16:20:44.310499176</meta:creation-date>
    <dc:date>2026-07-23T12:35:51.455945990</dc:date>
    <dc:creator>corrado tafaro</dc:creator>
    <meta:editing-duration>PT46M27S</meta:editing-duration>
    <meta:editing-cycles>5</meta:editing-cycles>
    <meta:generator>LibreOffice/24.2.7.2$Linux_X86_64 LibreOffice_project/420$Build-2</meta:generator>
    <meta:document-statistic meta:table-count="0" meta:image-count="0" meta:object-count="0" meta:page-count="12" meta:paragraph-count="37" meta:word-count="2564" meta:character-count="16372" meta:non-whitespace-character-count="13818"/>
  </office:meta>
</office:document-meta>
</file>