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size="12pt" fo:font-weight="normal" officeooo:paragraph-rsid="000d120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15%"/>
      <style:text-properties style:font-name="Liberation Serif" fo:font-size="14pt" fo:font-weight="bold" officeooo:paragraph-rsid="000d120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/>
      <style:text-properties style:font-name="Liberation Serif" fo:font-size="14pt" fo:font-weight="normal" officeooo:paragraph-rsid="000d1200" style:font-size-asian="14pt" style:font-weight-asian="normal" style:font-size-complex="14pt" style:font-weight-complex="normal"/>
    </style:style>
    <style:style style:name="P4" style:family="paragraph" style:parent-style-name="Standard" style:list-style-name="L2">
      <loext:graphic-properties draw:fill="none"/>
      <style:paragraph-properties fo:margin-top="0.199cm" fo:margin-bottom="0cm" style:contextual-spacing="false" fo:line-height="115%" fo:text-align="justify" style:justify-single-word="false" fo:background-color="transparent"/>
      <style:text-properties style:font-name="Liberation Serif" fo:font-size="14pt" fo:font-weight="normal" officeooo:paragraph-rsid="000d1200" style:font-size-asian="14pt" style:font-weight-asian="normal" style:font-size-complex="14pt" style:font-weight-complex="normal"/>
    </style:style>
    <style:style style:name="P5" style:family="paragraph" style:parent-style-name="Standard" style:list-style-name="L2" style:master-page-name="">
      <loext:graphic-properties draw:fill="none"/>
      <style:paragraph-properties fo:margin-top="0.199cm" fo:margin-bottom="0cm" style:contextual-spacing="false" fo:line-height="115%" fo:text-align="justify" style:justify-single-word="false" style:page-number="auto" fo:background-color="transparent"/>
      <style:text-properties style:font-name="Liberation Serif" fo:font-size="14pt" fo:font-weight="normal" officeooo:paragraph-rsid="000d1200" style:font-size-asian="14pt" style:font-weight-asian="normal" style:font-size-complex="14pt" style:font-weight-complex="normal"/>
    </style:style>
    <style:style style:name="P6" style:family="paragraph" style:parent-style-name="Standard" style:list-style-name="L2" style:master-page-name="">
      <loext:graphic-properties draw:fill="none"/>
      <style:paragraph-properties fo:margin-top="0.199cm" fo:margin-bottom="0cm" style:contextual-spacing="false" fo:line-height="115%" fo:text-align="justify" style:justify-single-word="false" style:page-number="auto" fo:background-color="transparent"/>
      <style:text-properties style:font-name="Liberation Serif" fo:font-size="14pt" fo:font-weight="normal" officeooo:paragraph-rsid="000d120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Liberation Serif" fo:font-size="14pt" fo:font-weight="normal" officeooo:paragraph-rsid="000d12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Liberation Serif" fo:font-size="14pt" fo:font-weight="normal" officeooo:paragraph-rsid="000fa46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fo:font-weight="normal" officeooo:paragraph-rsid="000fa46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Liberation Serif" fo:font-size="14pt" officeooo:paragraph-rsid="000fa462" style:font-size-asian="14pt" style:font-size-complex="14pt"/>
    </style:style>
    <style:style style:name="P1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Serif" fo:font-size="14pt" officeooo:paragraph-rsid="000fa462" style:font-size-asian="14pt" style:font-size-complex="14pt"/>
    </style:style>
    <style:style style:name="P12" style:family="paragraph" style:parent-style-name="Standard" style:list-style-name="L3">
      <loext:graphic-properties draw:fill="none"/>
      <style:paragraph-properties fo:margin-left="0.06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Liberation Serif" fo:font-size="14pt" officeooo:paragraph-rsid="000fa462" style:font-size-asian="14pt" style:font-size-complex="14pt"/>
    </style:style>
    <style:style style:name="P13" style:family="paragraph" style:parent-style-name="Standard" style:list-style-name="L3">
      <loext:graphic-properties draw:fill="none"/>
      <style:paragraph-properties fo:margin-left="0.06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Liberation Serif" fo:font-size="14pt" officeooo:paragraph-rsid="000fa462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.06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Liberation Serif" fo:font-size="14pt" style:font-size-asian="14pt" style:font-size-complex="14pt"/>
    </style:style>
    <style:style style:name="T1" style:family="text">
      <style:text-properties officeooo:rsid="000d1200"/>
    </style:style>
    <style:style style:name="T2" style:family="text">
      <style:text-properties style:font-name="Noto Sans"/>
    </style:style>
    <style:style style:name="T3" style:family="text">
      <style:text-properties style:font-name="Noto Sans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Noto Sans" fo:font-size="12pt" fo:font-weight="normal" officeooo:rsid="000d1200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d1200" style:font-size-asian="10.5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1200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</text:span>aptatio benevolentiae </text:p>
      <text:p text:style-name="P1">come stratagemma nella dialettica eristica di Schopenhauer.</text:p>
      <text:p text:style-name="P3"/>
      <text:p text:style-name="P11"><text:span text:style-name="T7">In "L'arte di persuadere" (1832), Schopenhauer dedica un intero capitolo alla captatio benevolentiae. Egli afferma che questa tecnica è essenziale per chiunque voglia avere successo in una discussione, anche a costo di ricorrere a argomentazioni fallaci o scorrette.</text:span></text:p>
      <text:p text:style-name="P10"><text:span text:style-name="T7">Secondo Schopenhauer, la captatio benevolentiae può essere utilizzata in due modi:</text:span></text:p>
      <text:p text:style-name="P10"><text:span text:style-name="T7">In modo diretto: in questo caso, si cerca di impressionare l'interlocutore con la propria erudizione, con la propria abilità oratoria o con la propria personalità.</text:span></text:p>
      <text:p text:style-name="P10"><text:span text:style-name="T7">In modo indiretto: in questo caso, si cerca di creare un clima di empatia e di comprensione, mostrandosi interessati alle opinioni e ai problemi dell'interlocutore, </text:span><text:span text:style-name="T8">utilizzando modi diversi, tra cui:</text:span></text:p>
      <text:list text:style-name="L2">
        <text:list-item>
          <text:p text:style-name="P4">L'adulatione: consiste nel cercare di adulare l'interlocutore, elogiandolo o facendogli dei complimenti.</text:p>
        </text:list-item>
        <text:list-item>
          <text:p text:style-name="P5">La compassione: consiste nel cercare di suscitare compassione nell'interlocutore, mettendo in evidenza le sue difficoltà o i suoi problemi.</text:p>
        </text:list-item>
        <text:list-item>
          <text:p text:style-name="P5">La paura: consiste nel cercare di incutere paura nell'interlocutore, mettendo in evidenza le possibili <text:soft-page-break/>conseguenze negative di una sua decisione o di un suo atteggiamento.</text:p>
        </text:list-item>
      </text:list>
      <text:p text:style-name="P7">Schopenhauer ritiene che la captatio benevolentiae sia un stratagemma efficace, in quanto può predisporre l'interlocutore a essere più ricettivo agli argomenti dell'erista. Tuttavia, sottolinea anche che si tratta di un metodo scorretto, in quanto non si basa su argomentazioni valide, ma sulla manipolazione delle emozioni dell'interlocutore.</text:p>
      <text:p text:style-name="P8">Ecco come Schopenhauer illustra l'uso della captatio benevolentiae nella dialettica eristica:</text:p>
      <text:p text:style-name="P9">Un erista potrebbe iniziare il suo discorso elogiando l'interlocutore per la sua intelligenza o la sua cultura. In questo modo, l'interlocutore si sentirà lusingato e sarà più propenso a prestare attenzione a ciò che l'erista ha da dire.</text:p>
      <text:p text:style-name="P9">Un erista potrebbe raccontare una storia triste o commovente, al fine di suscitare compassione nell'interlocutore. In questo modo, l'interlocutore sarà più propenso a essere d'accordo con l'erista, anche se le sue argomentazioni non sono valide.</text:p>
      <text:p text:style-name="P9">Un erista potrebbe minacciare l'interlocutore con le possibili conseguenze negative di una sua decisione. In questo modo, l'interlocutore sarà più propenso a cedere alle richieste dell'erista.</text:p>
      <text:list text:style-name="L3">
        <text:list-header>
          <text:p text:style-name="P12"><text:soft-page-break/><text:span text:style-name="T8">Oppure:</text:span></text:p>
          <text:p text:style-name="P12">Un politico che sta cercando di convincere gli elettori a votarlo potrebbe iniziare il suo discorso elogiando la loro intelligenza e la loro sensibilità.</text:p>
          <text:p text:style-name="P13">Un avvocato che sta cercando di vincere una causa potrebbe cercare di creare un clima di empatia con il giudice, raccontandogli la storia del suo cliente.</text:p>
          <text:p text:style-name="P13">Un venditore che sta cercando di vendere un prodotto potrebbe iniziare la sua presentazione parlando della soddisfazione dei clienti che hanno già acquistato il prodotto.</text:p>
        </text:list-header>
      </text:list>
      <text:p text:style-name="P14">Schopenhauer utilizza la captatio benevolentiae anche in altri contesti, come nelle sue opere filosofiche e nelle sue opere letterarie. Ad esempio, nel suo romanzo Il mondo come volontà e rappresentazione, Schopenhauer inizia il suo discorso con una serie di riflessioni sulla natura della sofferenza e della felicità. Queste riflessioni sono intese a creare un'atmosfera di empatia e comprensione, che favorisca la comprensione della sua filosofi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5:31:34.975000000</meta:creation-date>
    <dc:date>2026-04-05T17:33:32.008656084</dc:date>
    <meta:editing-duration>PT44M16S</meta:editing-duration>
    <meta:editing-cycles>2</meta:editing-cycles>
    <meta:generator>LibreOffice/24.2.7.2$Linux_X86_64 LibreOffice_project/420$Build-2</meta:generator>
    <dc:creator>corrado tafaro</dc:creator>
    <meta:document-statistic meta:table-count="0" meta:image-count="0" meta:object-count="0" meta:page-count="3" meta:paragraph-count="19" meta:word-count="473" meta:character-count="3259" meta:non-whitespace-character-count="2811"/>
  </office:meta>
</office:document-meta>
</file>