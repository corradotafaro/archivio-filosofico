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572710" officeooo:paragraph-rsid="0000975a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28adfc" officeooo:paragraph-rsid="0000f2d3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margin-top="0.101cm" fo:margin-bottom="0cm" style:contextual-spacing="false" fo:line-height="115%" fo:text-align="center" style:justify-single-word="false"/>
      <style:text-properties style:font-name="Noto Sans1" fo:font-size="13pt" fo:font-style="normal" fo:font-weight="bold" officeooo:rsid="001be356" officeooo:paragraph-rsid="0000f2d3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7e024" officeooo:paragraph-rsid="0000975a" style:font-size-asian="13pt" style:font-size-complex="13pt"/>
    </style:style>
    <style:style style:name="P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8adfc" officeooo:paragraph-rsid="0000f2d3" style:font-size-asian="13pt" style:font-size-complex="13pt"/>
    </style:style>
    <style:style style:name="P6" style:family="paragraph" style:parent-style-name="Standard">
      <style:paragraph-properties fo:margin-top="0.3cm" fo:margin-bottom="0cm" style:contextual-spacing="false" fo:line-height="115%" fo:text-align="center" style:justify-single-word="false"/>
      <style:text-properties style:font-name="Noto Sans1" fo:font-size="13pt" fo:font-style="italic" fo:font-weight="normal" officeooo:rsid="0028adfc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Noto Sans1" fo:font-size="14pt" fo:font-weight="normal" officeooo:rsid="0000f2d3" officeooo:paragraph-rsid="0000f2d3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normal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Text_20_body">
      <style:paragraph-properties fo:margin-top="0.199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bold" officeooo:paragraph-rsid="0000f2d3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1pt" fo:font-style="normal" style:font-size-asian="11pt" style:font-style-asian="normal" style:font-size-complex="11pt" style:font-style-complex="normal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28adfc"/>
    </style:style>
    <style:style style:name="T5" style:family="text">
      <style:text-properties officeooo:rsid="004c2768"/>
    </style:style>
    <style:style style:name="T6" style:family="text">
      <style:text-properties style:font-name="Noto Sans" fo:font-style="italic" officeooo:rsid="0028adfc" style:font-style-asian="italic" style:font-style-complex="italic"/>
    </style:style>
    <style:style style:name="T7" style:family="text">
      <style:text-properties style:font-name="Noto Sans" fo:font-style="italic" officeooo:rsid="00850878" style:font-style-asian="italic" style:font-style-complex="italic"/>
    </style:style>
    <style:style style:name="T8" style:family="text">
      <style:text-properties fo:font-style="italic" officeooo:rsid="0028adfc" style:font-style-asian="italic" style:font-style-complex="italic"/>
    </style:style>
    <style:style style:name="T9" style:family="text">
      <style:text-properties fo:font-style="italic" officeooo:rsid="0083b457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8adfc" style:font-style-asian="normal" style:font-style-complex="normal"/>
    </style:style>
    <style:style style:name="T12" style:family="text">
      <style:text-properties fo:font-style="normal" officeooo:rsid="0083b457" style:font-style-asian="normal" style:font-style-complex="normal"/>
    </style:style>
    <style:style style:name="T13" style:family="text">
      <style:text-properties fo:font-style="normal" officeooo:rsid="00572710" style:font-style-asian="normal" style:font-style-complex="normal"/>
    </style:style>
    <style:style style:name="T14" style:family="text">
      <style:text-properties fo:font-style="normal" officeooo:rsid="004c2768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83b457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Anassimene</text:span></text:p>
      <text:p text:style-name="P5"><text:span text:style-name="T15">Il terzo filosofo</text:span><text:span text:style-name="T10"> è Anassimene, il quale conosceva la teoria di Talete sull’acqua e pur condividendone il pensiero, riteneva che la materia di cui sono formate tutte le cose doveva essere l’aria. L’acqua, ipo</text:span><text:span text:style-name="T14">t</text:span><text:span text:style-name="T10">izzata da Talete, non doveva essere altro che aria. <text:s/>Infatti l’aria differisce nelle sostanze per rarefazione e condensazione, attenuandosi diventa fuoco, condensandosi diventa vento e poi nuvola e, crescendo la condensazione acqua e poi terra e poi pietre e poi tutto il resto, soggetto ad una continua trasformazione. </text:span><text:span text:style-name="T13">L</text:span><text:span text:style-name="T10">a terra, </text:span><text:span text:style-name="T13">secondo il suo pensiero era un disco piatto,</text:span><text:span text:style-name="T10"> sospesa nello spazio</text:span><text:span text:style-name="T13"> su</text:span><text:span text:style-name="T10"> un'immensa colonna d'aria.</text:span></text:p>
      <text:p text:style-name="P2">Ma come faceva un principio a trasformarsi in qualcosa di completamente diverso?</text:p>
      <text:p text:style-name="P6">Nasce così il dilemma del divenire.</text:p>
      <text:p text:style-name="P8">Non costringerai a esistere ciò che non esiste</text:p>
      <text:p text:style-name="P9"/>
      <text:p text:style-name="P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1T16:48:54.959560843</meta:creation-date>
    <dc:date>2026-01-21T17:01:36.813083851</dc:date>
    <dc:creator>corrado tafaro</dc:creator>
    <meta:editing-duration>PT12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25" meta:character-count="805" meta:non-whitespace-character-count="684"/>
  </office:meta>
</office:document-meta>
</file>