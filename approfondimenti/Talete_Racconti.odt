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fo:text-align="justify" style:justify-single-word="false"/>
      <style:text-properties style:font-name="Noto Sans1" fo:font-size="12pt" style:font-size-asian="12pt" style:font-size-complex="12pt"/>
    </style:style>
    <style:style style:name="P2" style:family="paragraph" style:parent-style-name="Standard">
      <style:paragraph-properties fo:margin-top="0.199cm" fo:margin-bottom="0cm" style:contextual-spacing="false" fo:line-height="115%" fo:text-align="justify" style:justify-single-word="false"/>
      <style:text-properties style:font-name="Noto Sans1" fo:font-size="12pt" style:font-size-asian="12pt" style:font-size-complex="12pt"/>
    </style:style>
    <style:style style:name="P3" style:family="paragraph" style:parent-style-name="Standard">
      <style:paragraph-properties fo:margin-top="0.101cm" fo:margin-bottom="0cm" style:contextual-spacing="false" fo:line-height="115%" fo:text-align="justify" style:justify-single-word="false"/>
      <style:text-properties style:font-name="Noto Sans1" fo:font-size="12pt" style:font-size-asian="12pt" style:font-size-complex="12pt"/>
    </style:style>
    <style:style style:name="P4" style:family="paragraph" style:parent-style-name="Standard">
      <style:paragraph-properties fo:margin-top="0.199cm" fo:margin-bottom="0cm" style:contextual-spacing="false" fo:line-height="115%" fo:text-align="justify" style:justify-single-word="false"/>
      <style:text-properties style:font-name="Noto Sans1" fo:font-size="12pt" officeooo:paragraph-rsid="00118ad1" style:font-size-asian="12pt" style:font-size-complex="12pt"/>
    </style:style>
    <style:style style:name="P5"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18ad1" style:font-size-asian="12pt" style:font-size-complex="12pt"/>
    </style:style>
    <style:style style:name="P6" style:family="paragraph" style:parent-style-name="Standard">
      <style:paragraph-properties fo:margin-top="0cm" fo:margin-bottom="0cm" style:contextual-spacing="false" fo:line-height="115%" fo:text-align="justify" style:justify-single-word="false"/>
      <style:text-properties style:font-name="Noto Sans1" fo:font-size="12pt" style:font-size-asian="12pt" style:font-size-complex="12pt"/>
    </style:style>
    <style:style style:name="P7" style:family="paragraph" style:parent-style-name="Standard">
      <style:paragraph-properties fo:margin-top="0.199cm" fo:margin-bottom="0cm" style:contextual-spacing="false" fo:line-height="115%" fo:text-align="justify" style:justify-single-word="false"/>
      <style:text-properties style:font-name="Noto Sans1" fo:font-size="12pt" officeooo:paragraph-rsid="00137ebd" style:font-size-asian="12pt" style:font-size-complex="12pt"/>
    </style:style>
    <style:style style:name="P8"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137ebd" style:font-size-asian="12pt" style:font-size-complex="12pt"/>
    </style:style>
    <style:style style:name="P9" style:family="paragraph" style:parent-style-name="Standard">
      <style:paragraph-properties fo:margin-top="0.199cm" fo:margin-bottom="0cm" style:contextual-spacing="false" fo:line-height="115%"/>
      <style:text-properties style:font-name="Noto Sans1" fo:font-size="12pt" style:font-size-asian="12pt" style:font-size-complex="12pt"/>
    </style:style>
    <style:style style:name="P10" style:family="paragraph" style:parent-style-name="Standard">
      <style:paragraph-properties fo:line-height="115%" fo:text-align="justify" style:justify-single-word="false"/>
      <style:text-properties style:font-name="Noto Sans1" fo:font-size="14pt" officeooo:rsid="00118ad1" officeooo:paragraph-rsid="00118ad1" style:font-size-asian="14pt" style:font-size-complex="14pt"/>
    </style:style>
    <style:style style:name="P11" style:family="paragraph" style:parent-style-name="Standard" style:list-style-name="L1">
      <style:paragraph-properties fo:margin-top="0.199cm" fo:margin-bottom="0cm" style:contextual-spacing="false" fo:line-height="115%" fo:text-align="justify" style:justify-single-word="false"/>
      <style:text-properties style:font-name="Noto Sans1" fo:font-size="12pt" style:font-size-asian="12pt" style:font-size-complex="12pt"/>
    </style:style>
    <style:style style:name="P12" style:family="paragraph" style:parent-style-name="Standard" style:list-style-name="L1">
      <style:paragraph-properties fo:line-height="115%"/>
      <style:text-properties style:font-name="Noto Sans1" fo:font-size="12pt" style:font-size-asian="12pt" style:font-size-complex="12pt"/>
    </style:style>
    <style:style style:name="T1" style:family="text">
      <style:text-properties officeooo:rsid="000f986e"/>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officeooo:rsid="00137eb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Racconti su Talete</text:p>
      <text:p text:style-name="P2">Talete, matematico, filosofo, fisico, astronomo, fu un uomo di intelligenza superiore alla media vissuto sulle coste dell’Asia minore nella città di Mileto tra il VII e il VI sec. a.c. Non si hanno date certe né della sua nascita (tra il 625 eil 623 a.C.) né della sua morte (tra il 548 e il 545 a.C.), ma incompenso sulla sua vita si hanno molte notizie (e leggende) trascritte da storici e filosofi vissutiin epoche posteriori. Il collage di questi commenti e di queste fonti indirette ha costituito il corpo di una biografia incerta, ma affascinante nella sua eterogeneità di contenuti.</text:p>
      <text:p text:style-name="P1">Quello che è certo è che Mileto, al tempo di Talete, era una città fiorente dove gli scambi commerciali andavano di pari passo alla libera circolazione di idee e <text:s/>influenze provenienti da altri popoli e culture. La vivacità intellettuale dell’ambiente in cui crebbe, insieme al suo talento naturale di acuto osservatore della realtà, fecero di Talete un assiduo viaggiatore. In Egitto e in Mesopotamia venne a contatto con uomini di scienza che, come era nella loro tradizione, individuavano la soluzione dei problemi geometrici con metodi sperimentali e pratici. Talete, invece, cercò di <text:s/>studiare e individuare quelle regole generali che, strutturate su sequenze logiche, potevano fornire la soluzione. Essenzialmente per questo diverso approccio, rispetto <text:soft-page-break/>ai suoi contemporanei, gli è stato conferito il riconoscimento di primo matematico della storia. Delle opere che gli vengono attribuite non ci è pervenuto nemmeno un frammento: quelle citate dagli autori che, nei secoli seguenti scrivono di lui, sono:</text:p>
      <text:list text:style-name="L1">
        <text:list-item>
          <text:p text:style-name="P11">manuale di conoscenze astronomiche a uso dei navigatori, attribuito peraltro anche a <text:s text:c="2"/><text:span text:style-name="T1">F</text:span>oco di Samo;</text:p>
        </text:list-item>
        <text:list-item>
          <text:p text:style-name="P12">«Sui principi»;</text:p>
        </text:list-item>
        <text:list-item>
          <text:p text:style-name="P12">«Sul solstizio»;</text:p>
        </text:list-item>
        <text:list-item>
          <text:p text:style-name="P12">«Sull’equinozio»).</text:p>
        </text:list-item>
      </text:list>
      <text:p text:style-name="P9">Segue ora una raccolta basata sulla formula del “dicono di lui” (= fonti indirette) in ordine cronologico per circa un millennio dopo la sua esistenza.</text:p>
      <text:p text:style-name="P2"><text:span text:style-name="T2">Erodoto</text:span> (storico 484-425 a.C.) nelle sue Storie scrive che Talete aveva previsto l’eclisse solare del 28 maggio 585; ci racconta anche che progettò e realizzò un canale per deviare un fiume dal suo corso e farlo rientrare più avanti nel suo alveo. Sempre Erodoto gli attribuisce una grande abilità come consigliere politico. Ecco i brani:</text:p>
      <text:p text:style-name="P2">«Nel sesto anno ebbe luogo una battaglia in cui accadde l’eclissi; quando il combattimento era ormai iniziato, improvvisamente il giorno divenne notte. E questo mutamento del giorno, Talete di Mileto lo aveva predetto agli Ioni fornendo anche l’anno dell’evento. I <text:soft-page-break/>Lidi e i Medi, tuttavia, quando in pieno giorno si videro sovrastati dalla notte, cessarono il combattimento e furono entrambi molto interessati a fare la pace fra loro.» (Storie 1.74)</text:p>
      <text:p text:style-name="P2">«...giunto sul fiume Halys, io credo che Creso proseguì facendo passare le truppe sui ponti allora esistenti; mentre secondo una versione dei fatti diffusa tra gli Elleni sarebbe stato Talete di Mileto a farle passare. Si dice infatti che Creso fosse in grande difficoltà per il passaggio dell’esercito oltre il fiume (perché al tempo non sarebbero esistiti ponti). Talete, che si trovava nell’accampamento, avrebbe fatto in modo che il fiume, che scorreva alla sinistra dell’esercito, scorresse anche alla sua destra, ricorrendo a un espediente. Da un punto a nord del campo avrebbe fatto scavare un profondo canale a semicerchio, in modo che il fiume, deviato in parte dal vecchio letto, raggiungesse alle spalle le <text:s/>truppe accampate e poi, oltrepassato il campo, sfociasse nel corso antico; cosi il fiume, fu diviso in due rami entrambi guadabili.» (Storie, I.75)</text:p>
      <text:p text:style-name="P2"><text:span text:style-name="T2">Platone</text:span> (filosofo 428/7-348/7 a.C.) lo nomina tra i famosi “sette sapienti” della Grecia, (uomini eccezionali di cui si tramandano per le generazioni future parole e opere memorabili), lo definisce infatti come un «[...] ingegnoso inventore di tecniche». (Repubblica 600 a DK 11 A3) Nel Teeteto, (dialogo tra Teodoro e Socrate) <text:soft-page-break/>Talete viene invece citato per un episodio che si presta bene a descrivere la mancanza di concretezza attribuita ai filosofi:</text:p>
      <text:p text:style-name="P3">«Teodoro: - Che cosa intendi dire, Socrate, con questo? Socrate: - Ciò che si dice di Talete, Teodoro, che, mentre interpretava i moti regolari delle stelle e guardava al cielo, cadde in un pozzo; e una servetta tracia, intelligente e graziosa, lo prese in giro dicendogli che, mentre si sforzava di conoscere le cose del cielo, gli <text:s/>sfuggivano quelle che aveva davanti a sé, sulla terra ai propri piedi. La stessa ironia è riservata a chi passa il <text:s/>tempo a filosofare [...] provoca il riso non solo delleschiave di Tracia, ma anche del resto della gente, cadendo, per inesperienza, nei pozzi e in ogni <text:s/>difficoltà». (Teeteto, 174 a-174 c DK 11 A9)</text:p>
      <text:p text:style-name="P4"><text:span text:style-name="T2">Aristotele</text:span> (filosofo 384-83-322 a.C.) nella Politica narra uno degli aneddoti più curiosi, che conferma il profilo di astronomo e meteorologo di Talete ma anche l’utilità della sapienza a fini materiali e commerciali: </text:p>
      <text:p text:style-name="P5">«Dal momento che gli si rinfacciava la povertà, quasi la filosofia fosse inutile, dicono che, consapevole, sulla base degli studi astronomici, che ci sarebbe stato un abbondante raccolto di olive, d’inverno raccolse una piccola somma e versò anticipi per tutti i frantoi di Mileto e Chio, che affittò a buon mercato poiché nessuno offriva di più. Quando giunse la stagione, <text:soft-page-break/>poiché i frantoi erano ricercati da tutti contemporaneamente e subito, li affittò a sua volta in un regime di monopolio: avendo realizzato enormi guadagni, dimostrò che è facile far denaro per i filosofi, se lo desiderano, ma non è questo ciò per cui si impegnano.» <text:s/><text:span text:style-name="T3">(Aristotele, Politica I, 11 1259 a5-18; DK 11 A10).</text:span></text:p>
      <text:p text:style-name="P3">Aristotele è anche la fonte di informazioni sul pensiero filosofico di Talete: nel primo libro della Metafisica e scrive Talete come il fondatore di quella scuola di pensiero che ricerca le cause il principio da cui provengono tutte le cose, cioè tutte le manifestazioni della realtà. Nei riassunti sbrigativi Talete è chiamato il filosofo dell’acqua, ma leggiamo come l’argomento viene sviluppato nella sua versione originale:</text:p>
      <text:p text:style-name="P3">«[...] infatti deve esserci qualche realtà naturale (o una sola o più di una) dalla quale derivano tutte le altre cose, mentre essa continua ad esistere immutata. Tuttavia, questi filosofi non sono tutti d’accordo circa il numero e la specie di un tale principio. Talete, iniziatore di questo <text:s/>tipo di filosofia, dice che quel principio è l’acqua (per questo afferma anche che la terra galleggia sull’acqua), <text:s/>desumendo indubbiamente questa sua convinzione dalla constatazione che il nutrimento di tutte le cose è <text:s/>umido, e che perfino il caldo si genera dall’umido e vive nell’umido. Ora, ciò da cui tutte le cose si generano è, appunto, il principio di tutto. Egli desunse dunque <text:soft-page-break/>questa convinzione da questo fatto e dal fatto che i semi ditutte le cose hanno una natura umida e l’acqua è il principio della natura delle cose umide.» (Metafisica, Libro I, 983 b)</text:p>
      <text:p text:style-name="P3"><text:span text:style-name="T2">Callimaco</text:span>, (poeta ellenistico 310-240 a.C.) nei suoi Giambi lo ritiene scopritore dell’Orsa Minore:</text:p>
      <text:p text:style-name="P3">«E si diceva che avesse stabilito La distanza delle piccole stelle “del carro”, grazie a cui fanno rotta i Fenici».</text:p>
      <text:p text:style-name="P3"><text:span text:style-name="T2">Plutarco</text:span> (storico e biografo greco 46/48 d.C.-125/127 d.C) racconta nel Simposio dei Sette Sapienti che Talete lasciò senza parole un <text:s/>Faraone della XXVI dinastia:</text:p>
      <text:p text:style-name="P3">«[...]Quantunque egli (il re Amasi) ti ammiri per altre cose, in particolare si compiace immensamente per la misura delle piramidi; perché tu (Talete), senza alcuna fatica o istrumento ma piantando soltanto un bastone all’estremo dell’ombra proiettata dalla piramide, hai dimostrato, per mezzo di due triangoli formati con l’intercettazione dei raggi luminosi, che l’altezza della piramide sta all'altezza del bastone come la lunghezza dell’ombra della piramide sta alla dimensione dell’ombra del bastone».</text:p>
      <text:p text:style-name="P3">Sul metodo che Talete ha seguito sono stati scritti studi di decine e decine di pagine con ipotesi illustrate e tesi <text:s/>di laurea. È <text:s/>tuttavia consolidata l’ipotesi che Talete abbia usato la <text:s/>teoria delle ombre per misurare l’altezza della piramide <text:s/>di Cheope e che per farlo si sia servito di <text:soft-page-break/>un’asta rigida di modesta altezza, mentre è ancora oggetto di discussione se si sia basato semplicemente sull’inclinazione dei raggi solari a 45° (diagonale di un quadrato i cui lati siano l’altezza incognita = la lunghezza</text:p>
      <text:p text:style-name="P6">dell’ombra) oppure il teorema dei triangoli simili e quindi il rapporto omologo tra due triangoli rettangoli <text:s/>isosceli costituiti dai vertici dei due oggetti, i vertici delle <text:s/>loro ombre e le loro proiezioni a terra.</text:p>
      <text:p text:style-name="P7"><text:span text:style-name="T2">Diogene Laerzio</text:span> (storico 180-240 d.C.) colloca Talete al primo posto nella sua opera dedicata alle Vite dei filosofi:</text:p>
      <text:p text:style-name="P8">«Bisogna ora trattare di questi uomini [i filosofi, rappresentanti delle varie scuole filosofiche] e in primo luogo di Talete» (Libro I, 21).</text:p>
      <text:p text:style-name="P2">Descrive le sue origini fenicie:</text:p>
      <text:p text:style-name="P3">«Il padre di Talete, dunque, come vogliono Erodoto, Duride e Democrito si chiamava Examio, la madre Cleobulina, della stirpe dei Telidi che sono fenici, i piú nobili tra i discendenti di Cadmo e di Agenore. [...] A Talete fu data la cittadinanza di Mileto quando vi giunse insieme a Nileo esiliato dalla Fenicia, ma, come i piú sostengono, era cittadino originario di Mileto e di nobile famiglia.</text:p>
      <text:p text:style-name="P3">Dopo la politica si dette agli studi naturali. Secondo alcuni non lasciò nessun<text:span text:style-name="T4">a </text:span>opera perché “l’Astrologia <text:soft-page-break/>nautica” che gli viene attribuita si dice appartenga a Foco di Samo.» (Vite dei filosofi, Libro I, 22-23)</text:p>
      <text:p text:style-name="P3">«Panfila dice che, appreso dagli Egizi lo studio della geometria, egli (Talete) inscrisse per la prima volta il triangolo rettangolo in un cerchio e che sacrificò un bue in onore di ciò, altri, fra cui il matematico Apollodoro, dicono che la scoperta è di Pitagora» (Vite dei filosofi, Libro I, 24)</text:p>
      <text:p text:style-name="P3">E infine raccoglie la più ricca e famosa serie di citazioni e aforismi:</text:p>
      <text:p text:style-name="P3">«Di lui [Talete] si tramandano anche queste sentenze:</text:p>
      <text:p text:style-name="P3">Il più antico degli esseri è il dio: è infatti ingenerato.</text:p>
      <text:p text:style-name="P3">Il più bello [degli esseri] è il cosmo: è infatti prodotto del dio.</text:p>
      <text:p text:style-name="P3">Il più grande [degli esseri] è lo spazio: abbraccia infatti tutto quanto.</text:p>
      <text:p text:style-name="P3">Il più veloce [degli esseri] è l’intelligenza: trascorre infatti per ogni cosa.</text:p>
      <text:p text:style-name="P3">Il più forte [degli esseri] è la necessità: domina infatti tutte le cose.</text:p>
      <text:p text:style-name="P3">Il più sapiente [degli esseri] è il tempo: scopre infatti tutte le cose.»</text:p>
      <text:p text:style-name="P3">Nulla, sosteneva, distingue la morte dalla vita. «Tu allora – qualcuno gli chiese – per quale ragione non muori?» «Perché non vi è alcuna differenza» rispose.</text:p>
      <text:p text:style-name="P3"><text:soft-page-break/>A uno che domandava se fosse nata prima la notte o il giorno, egli disse: «La notte, un giorno prima» [...]</text:p>
      <text:p text:style-name="P3">Interrogato su che cosa sia difficile, rispose: «Conoscere se stesso»; su che cosa sia facile: «Consigliare un altro; su che cosa sia più piacevole: «Riuscire»; su che cosa sia <text:s/>il divino: «Ciò che non ha inizio né fine»; [...] su chi sia felice: «Chi è sano nel corpo, ricco nell’anima e nell’indole ben educato».</text:p>
      <text:p text:style-name="P3">Raccomandava di ricordarsi degli amici presenti e assenti e di non abbellirsi nell’aspetto, ma di essere belli nei comportamenti. «Non arricchirti in modo disonesto <text:s/>– sosteneva – e non mancare di parola nei confronti di coloro che hanno riposto fiducia in te».</text:p>
      <text:p text:style-name="P3">Diceva: «Gli stessi servizi che presti ai genitori, aspettali dai figli».</text:p>
      <text:p text:style-name="P3">(Diogene Laerzio I, 35-3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3T16:42:46.546075115</meta:creation-date>
    <dc:date>2026-01-24T17:54:04.944613978</dc:date>
    <dc:creator>corrado tafaro</dc:creator>
    <meta:editing-duration>PT11M24S</meta:editing-duration>
    <meta:editing-cycles>2</meta:editing-cycles>
    <meta:generator>LibreOffice/24.2.7.2$Linux_X86_64 LibreOffice_project/420$Build-2</meta:generator>
    <meta:document-statistic meta:table-count="0" meta:image-count="0" meta:object-count="0" meta:page-count="9" meta:paragraph-count="43" meta:word-count="1796" meta:character-count="11174" meta:non-whitespace-character-count="9399"/>
  </office:meta>
</office:document-meta>
</file>