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note">
      <style:text-properties officeooo:rsid="00ec2b1a" officeooo:paragraph-rsid="00ec2b1a"/>
    </style:style>
    <style:style style:name="P2" style:family="paragraph" style:parent-style-name="Footnote">
      <style:paragraph-properties fo:text-align="justify" style:justify-single-word="false"/>
    </style:style>
    <style:style style:name="P3" style:family="paragraph" style:parent-style-name="Footnote">
      <style:paragraph-properties fo:text-align="justify" style:justify-single-word="false"/>
      <style:text-properties officeooo:rsid="00f42b02" officeooo:paragraph-rsid="006db221"/>
    </style:style>
    <style:style style:name="P4" style:family="paragraph" style:parent-style-name="Footnote">
      <style:paragraph-properties fo:text-align="justify" style:justify-single-word="false"/>
      <style:text-properties officeooo:rsid="00f787da" officeooo:paragraph-rsid="00f787da"/>
    </style:style>
    <style:style style:name="P5" style:family="paragraph" style:parent-style-name="Quotations" style:list-style-name="L2">
      <style:paragraph-properties fo:margin-top="0.3cm" fo:margin-bottom="0cm" style:contextual-spacing="false" fo:line-height="115%"/>
      <style:text-properties officeooo:paragraph-rsid="000a3a11"/>
    </style:style>
    <style:style style:name="P6" style:family="paragraph" style:parent-style-name="Quotations">
      <style:paragraph-properties fo:margin-top="0.199cm" fo:margin-bottom="0cm" style:contextual-spacing="false" fo:line-height="115%" fo:text-align="center" style:justify-single-word="false"/>
      <style:text-properties style:font-name="Noto Sans1" fo:font-size="12pt" officeooo:paragraph-rsid="000a3a11" style:font-size-asian="12pt" style:font-size-complex="12pt"/>
    </style:style>
    <style:style style:name="P7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ize="12pt" officeooo:paragraph-rsid="000a3a11" style:font-size-asian="12pt" style:font-size-complex="12pt"/>
    </style:style>
    <style:style style:name="P8" style:family="paragraph" style:parent-style-name="Standard">
      <style:paragraph-properties fo:line-height="115%" fo:text-align="justify" style:justify-single-word="false"/>
      <style:text-properties style:font-name="Noto Sans1" fo:font-size="12pt" officeooo:paragraph-rsid="000a3a11" style:font-size-asian="12pt" style:font-size-complex="12pt"/>
    </style:style>
    <style:style style:name="P9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officeooo:paragraph-rsid="000a3a11"/>
    </style:style>
    <style:style style:name="P10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ize="12pt" officeooo:paragraph-rsid="000a3a11" style:font-size-asian="12pt" style:font-size-complex="12pt"/>
    </style:style>
    <style:style style:name="P11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Noto Sans1" fo:font-size="12pt" officeooo:paragraph-rsid="000a3a11" style:font-size-asian="12pt" style:font-size-complex="12pt"/>
    </style:style>
    <style:style style:name="P12" style:family="paragraph" style:parent-style-name="Standard">
      <style:paragraph-properties fo:line-height="115%" fo:text-align="justify" style:justify-single-word="false"/>
      <style:text-properties style:font-name="Noto Sans1" fo:font-size="12pt" officeooo:paragraph-rsid="000a3a11" style:font-size-asian="12pt" style:font-size-complex="12pt"/>
    </style:style>
    <style:style style:name="P13" style:family="paragraph" style:parent-style-name="Standard">
      <style:paragraph-properties fo:margin-top="0.199cm" fo:margin-bottom="0cm" style:contextual-spacing="false" fo:line-height="115%" fo:text-align="justify" style:justify-single-word="false"/>
      <style:text-properties style:font-name="Noto Sans1" fo:font-size="12pt" officeooo:rsid="00f421b7" officeooo:paragraph-rsid="000a3a11" style:font-size-asian="12pt" style:font-size-complex="12pt"/>
    </style:style>
    <style:style style:name="P14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ize="12pt" officeooo:rsid="00f421b7" officeooo:paragraph-rsid="000a3a11" style:font-size-asian="12pt" style:font-size-complex="12pt"/>
    </style:style>
    <style:style style:name="P15" style:family="paragraph" style:parent-style-name="Standard">
      <style:paragraph-properties fo:margin-top="0.199cm" fo:margin-bottom="0cm" style:contextual-spacing="false" fo:line-height="115%" fo:text-align="center" style:justify-single-word="false" fo:break-before="page"/>
      <style:text-properties style:font-name="Noto Sans1" fo:font-size="12pt" fo:font-style="normal" fo:font-weight="bold" officeooo:rsid="00eb992e" officeooo:paragraph-rsid="000a3a11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margin-top="0.199cm" fo:margin-bottom="0cm" style:contextual-spacing="false" fo:line-height="115%" fo:text-align="justify" style:justify-single-word="false"/>
      <style:text-properties style:font-name="Noto Sans1" fo:font-size="12pt" fo:font-style="normal" fo:font-weight="normal" officeooo:rsid="00ec2b1a" officeooo:paragraph-rsid="000a3a11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ize="12pt" fo:font-style="normal" fo:font-weight="normal" officeooo:rsid="00ec2b1a" officeooo:paragraph-rsid="000a3a11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margin-top="0.199cm" fo:margin-bottom="0cm" style:contextual-spacing="false" fo:line-height="115%" fo:text-align="justify" style:justify-single-word="false"/>
      <style:text-properties style:font-name="Noto Sans1" fo:font-size="12pt" fo:font-style="normal" fo:font-weight="normal" officeooo:rsid="00ed1bff" officeooo:paragraph-rsid="000a3a11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ize="12pt" fo:font-style="normal" fo:font-weight="normal" officeooo:rsid="00ed1bff" officeooo:paragraph-rsid="000a3a11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ize="12pt" fo:font-style="normal" fo:font-weight="normal" officeooo:rsid="00eeb86b" officeooo:paragraph-rsid="000a3a11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margin-top="0.199cm" fo:margin-bottom="0cm" style:contextual-spacing="false" fo:line-height="115%" fo:text-align="justify" style:justify-single-word="false"/>
      <style:text-properties style:font-name="Noto Sans1" fo:font-size="12pt" fo:font-style="normal" fo:font-weight="normal" officeooo:rsid="00f8b1b4" officeooo:paragraph-rsid="000a3a11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1">
      <style:paragraph-properties fo:margin-top="0.101cm" fo:margin-bottom="0cm" style:contextual-spacing="false" fo:line-height="115%" fo:text-align="justify" style:justify-single-word="false"/>
      <style:text-properties style:font-name="Noto Sans1" fo:font-size="12pt" fo:font-style="italic" fo:font-weight="normal" officeooo:rsid="00ec2b1a" officeooo:paragraph-rsid="000a3a11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paragraph-properties fo:margin-top="0.199cm" fo:margin-bottom="0cm" style:contextual-spacing="false" fo:text-align="justify" style:justify-single-word="false"/>
    </style:style>
    <style:style style:name="T1" style:family="text">
      <style:text-properties officeooo:rsid="00f787d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f787da" style:font-style-asian="italic" style:font-style-complex="italic"/>
    </style:style>
    <style:style style:name="T4" style:family="text">
      <style:text-properties fo:font-style="italic" officeooo:rsid="00f8b1b4" style:font-style-asian="italic" style:font-style-complex="italic"/>
    </style:style>
    <style:style style:name="T5" style:family="text">
      <style:text-properties fo:font-style="italic" officeooo:rsid="00f421b7" style:font-style-asian="italic" style:font-style-complex="italic"/>
    </style:style>
    <style:style style:name="T6" style:family="text">
      <style:text-properties fo:font-style="italic" officeooo:rsid="00f8b1b4" fo:background-color="transparent" loext:char-shading-value="0" style:font-style-asian="italic" style:font-style-complex="italic"/>
    </style:style>
    <style:style style:name="T7" style:family="text">
      <style:text-properties fo:font-style="italic" officeooo:rsid="006c608b" fo:background-color="transparent" loext:char-shading-value="0" style:font-style-asian="italic" style:font-style-complex="italic"/>
    </style:style>
    <style:style style:name="T8" style:family="text">
      <style:text-properties fo:font-style="italic" fo:font-weight="normal" officeooo:rsid="001620b0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6c608b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ec2b1a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font-style="italic" style:text-underline-style="solid" style:text-underline-width="auto" style:text-underline-color="font-color" officeooo:rsid="00f421b7" style:font-style-asian="italic" style:font-style-complex="italic"/>
    </style:style>
    <style:style style:name="T13" style:family="text">
      <style:text-properties fo:font-style="italic" officeooo:rsid="00f22abc" style:font-name-asian="Liberation Serif" style:font-style-asian="italic" style:font-name-complex="Liberation Serif" style:font-style-complex="italic"/>
    </style:style>
    <style:style style:name="T14" style:family="text">
      <style:text-properties fo:font-style="italic" fo:font-weight="bold" officeooo:rsid="00f8b1b4" fo:background-color="transparent" loext:char-shading-value="0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6c608b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f42b02" style:font-style-asian="italic" style:font-weight-asian="bold" style:font-style-complex="italic" style:font-weight-complex="bold"/>
    </style:style>
    <style:style style:name="T18" style:family="text">
      <style:text-properties officeooo:rsid="00f0d237"/>
    </style:style>
    <style:style style:name="T19" style:family="text">
      <style:text-properties officeooo:rsid="00f2b8b4"/>
    </style:style>
    <style:style style:name="T20" style:family="text">
      <style:text-properties style:font-name="Liberation Serif" fo:font-style="italic" officeooo:rsid="00f22abc" style:font-name-asian="Liberation Serif" style:font-style-asian="italic" style:font-name-complex="Liberation Serif" style:font-style-complex="italic"/>
    </style:style>
    <style:style style:name="T21" style:family="text">
      <style:text-properties style:font-name="Liberation Serif" officeooo:rsid="001a3725" style:font-name-asian="Liberation Serif" style:font-name-complex="Liberation Serif"/>
    </style:style>
    <style:style style:name="T22" style:family="text">
      <style:text-properties style:font-name="Liberation Serif" officeooo:rsid="00f22abc" style:font-name-asian="Liberation Serif" style:font-name-complex="Liberation Serif"/>
    </style:style>
    <style:style style:name="T23" style:family="text">
      <style:text-properties officeooo:rsid="00f22abc"/>
    </style:style>
    <style:style style:name="T24" style:family="text">
      <style:text-properties style:font-name="Noto Sans1" fo:font-style="normal" fo:font-weight="normal" officeooo:rsid="00f0d237" style:font-style-asian="normal" style:font-weight-asian="normal" style:font-style-complex="normal" style:font-weight-complex="normal"/>
    </style:style>
    <style:style style:name="T25" style:family="text">
      <style:text-properties style:font-name="Noto Sans1" fo:font-style="normal" fo:font-weight="normal" officeooo:rsid="00ec2b1a" style:font-style-asian="normal" style:font-weight-asian="normal" style:font-style-complex="normal" style:font-weight-complex="normal"/>
    </style:style>
    <style:style style:name="T26" style:family="text">
      <style:text-properties style:font-name="Noto Sans1" fo:font-size="12pt" officeooo:rsid="00f2b8b4" style:font-size-asian="12pt" style:font-size-complex="12pt"/>
    </style:style>
    <style:style style:name="T27" style:family="text">
      <style:text-properties style:font-name="Noto Sans1" fo:font-size="12pt" officeooo:rsid="0013f216" style:font-size-asian="12pt" style:font-size-complex="12pt"/>
    </style:style>
    <style:style style:name="T28" style:family="text">
      <style:text-properties style:font-name="Noto Sans1" fo:font-size="12pt" fo:font-style="normal" fo:font-weight="normal" officeooo:rsid="00ec2b1a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Noto Sans1" fo:font-size="12pt" fo:font-style="normal" fo:font-weight="normal" officeooo:rsid="00f0d237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officeooo:rsid="00eeb86b"/>
    </style:style>
    <style:style style:name="T31" style:family="text">
      <style:text-properties officeooo:rsid="00f42b02"/>
    </style:style>
    <style:style style:name="T32" style:family="text">
      <style:text-properties officeooo:rsid="00f8b1b4"/>
    </style:style>
    <style:style style:name="T33" style:family="text">
      <style:text-properties officeooo:rsid="006c608b"/>
    </style:style>
    <style:style style:name="T34" style:family="text">
      <style:text-properties fo:background-color="transparent" loext:char-shading-value="0"/>
    </style:style>
    <style:style style:name="T35" style:family="text">
      <style:text-properties officeooo:rsid="00f8b1b4" fo:background-color="transparent" loext:char-shading-value="0"/>
    </style:style>
    <style:style style:name="T36" style:family="text">
      <style:text-properties officeooo:rsid="006c608b" fo:background-color="transparent" loext:char-shading-value="0"/>
    </style:style>
    <style:style style:name="T37" style:family="text">
      <style:text-properties officeooo:rsid="00f8edcd" fo:background-color="transparent" loext:char-shading-value="0"/>
    </style:style>
    <style:style style:name="T38" style:family="text">
      <style:text-properties officeooo:rsid="00f42b02" fo:background-color="transparent" loext:char-shading-value="0"/>
    </style:style>
    <style:style style:name="T39" style:family="text">
      <style:text-properties fo:font-size="11pt" fo:font-style="italic" fo:font-weight="bold" officeooo:rsid="00f8b1b4" fo:background-color="transparent" loext:char-shading-value="0" style:font-size-asian="11pt" style:font-style-asian="italic" style:font-weight-asian="bold" style:font-size-complex="11pt" style:font-style-complex="italic" style:font-weight-complex="bold"/>
    </style:style>
    <style:style style:name="T40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1" style:family="text">
      <style:text-properties fo:font-size="11pt" fo:font-style="italic" fo:font-weight="bold" officeooo:rsid="006c608b" style:font-size-asian="11pt" style:font-style-asian="italic" style:font-weight-asian="bold" style:font-size-complex="11pt" style:font-style-complex="italic" style:font-weight-complex="bold"/>
    </style:style>
    <style:style style:name="T42" style:family="text">
      <style:text-properties fo:font-size="11pt" fo:font-style="italic" fo:font-weight="bold" officeooo:rsid="00f42b02" style:font-size-asian="11pt" style:font-style-asian="italic" style:font-weight-asian="bold" style:font-size-complex="11pt" style:font-style-complex="italic" style:font-weight-complex="bold"/>
    </style:style>
    <style:style style:name="T43" style:family="text">
      <style:text-properties fo:font-size="11pt" fo:font-weight="bold" style:font-size-asian="11pt" style:font-weight-asian="bold" style:font-size-complex="11pt" style:font-weight-complex="bold"/>
    </style:style>
    <style:style style:name="T44" style:family="text">
      <style:text-properties fo:font-size="11pt" fo:font-weight="bold" officeooo:rsid="006c608b" style:font-size-asian="11pt" style:font-weight-asian="bold" style:font-size-complex="11pt" style:font-weight-complex="bold"/>
    </style:style>
    <style:style style:name="T45" style:family="text">
      <style:text-properties fo:font-size="11pt" fo:font-weight="bold" officeooo:rsid="00f421b7" style:font-size-asian="11pt" style:font-weight-asian="bold" style:font-size-complex="11pt" style:font-weight-complex="bold"/>
    </style:style>
    <style:style style:name="T46" style:family="text">
      <style:text-properties fo:font-size="11pt" fo:font-weight="bold" officeooo:rsid="00f42b02" style:font-size-asian="11pt" style:font-weight-asian="bold" style:font-size-complex="11pt" style:font-weight-complex="bold"/>
    </style:style>
    <style:style style:name="T47" style:family="text">
      <style:text-properties fo:font-size="11pt" style:font-size-asian="11pt" style:font-size-complex="11pt"/>
    </style:style>
    <style:style style:name="T48" style:family="text">
      <style:text-properties fo:font-size="11pt" fo:font-weight="normal" officeooo:rsid="006c608b" style:font-size-asian="11pt" style:font-weight-asian="normal" style:font-size-complex="11pt" style:font-weight-complex="normal"/>
    </style:style>
    <style:style style:name="T49" style:family="text">
      <style:text-properties fo:font-variant="normal" fo:text-transform="none" fo:color="#000000" loext:opacity="100%" style:font-name="Noto Sans1" fo:font-size="12pt" fo:letter-spacing="normal" fo:font-style="normal" fo:font-weight="normal" style:font-size-asian="12pt" style:font-size-complex="12pt"/>
    </style:style>
    <style:style style:name="T50" style:family="text">
      <style:text-properties fo:font-variant="normal" fo:text-transform="none" fo:color="#000000" loext:opacity="100%" style:font-name="Noto Sans1" fo:font-size="12pt" fo:letter-spacing="normal" fo:font-style="normal" fo:font-weight="normal" officeooo:rsid="00f2b8b4" style:font-size-asian="12pt" style:font-size-complex="12pt"/>
    </style:style>
    <style:style style:name="T51" style:family="text">
      <style:text-properties fo:font-variant="normal" fo:text-transform="none" fo:color="#000000" loext:opacity="100%" style:font-name="Noto Sans1" fo:font-size="12pt" fo:letter-spacing="normal" fo:font-style="normal" fo:font-weight="normal" officeooo:rsid="00f0d237" style:font-size-asian="12pt" style:font-size-complex="12pt"/>
    </style:style>
    <style:style style:name="T52" style:family="text">
      <style:text-properties fo:font-variant="normal" fo:text-transform="none" fo:color="#000000" loext:opacity="100%" style:font-name="Noto Sans1" fo:font-size="11pt" fo:letter-spacing="normal" fo:font-style="normal" fo:font-weight="bold" style:font-size-asian="11pt" style:font-size-complex="11pt" loext:padding="0cm" loext:border="none"/>
    </style:style>
    <style:style style:name="T53" style:family="text">
      <style:text-properties fo:font-variant="normal" fo:text-transform="none" fo:color="#000000" loext:opacity="100%" fo:font-size="12pt" fo:letter-spacing="normal" fo:font-style="normal" fo:font-weight="normal" style:font-size-asian="12pt" style:font-size-complex="12pt"/>
    </style:style>
    <style:style style:name="T54" style:family="text">
      <style:text-properties fo:font-variant="normal" fo:text-transform="none" fo:color="#000000" loext:opacity="100%" fo:font-size="12pt" fo:letter-spacing="normal" fo:font-style="normal" fo:font-weight="normal" officeooo:rsid="00f2b8b4" style:font-size-asian="12pt" style:font-size-complex="12pt"/>
    </style:style>
    <style:style style:name="T55" style:family="text">
      <style:text-properties fo:font-variant="normal" fo:text-transform="none" fo:color="#000000" loext:opacity="100%" fo:font-size="12pt" fo:letter-spacing="normal" fo:font-style="normal" fo:font-weight="normal" officeooo:rsid="00f0d237" style:font-size-asian="12pt" style:font-size-complex="12pt"/>
    </style:style>
    <style:style style:name="T56" style:family="text">
      <style:text-properties fo:font-variant="normal" fo:text-transform="none" fo:color="#000000" loext:opacity="100%" fo:font-size="11pt" fo:letter-spacing="normal" fo:font-style="normal" fo:font-weight="bold" style:font-size-asian="11pt" style:font-size-complex="11pt" loext:padding="0cm" loext:border="none"/>
    </style:style>
    <style:style style:name="T57" style:family="text">
      <style:text-properties fo:font-variant="normal" fo:text-transform="none" fo:color="#000000" loext:opacity="100%" style:font-name="Noto Sans1" fo:font-size="12pt" fo:letter-spacing="normal" fo:font-style="normal" fo:font-weight="normal" style:font-size-asian="12pt" style:font-size-complex="12pt"/>
    </style:style>
    <style:style style:name="T58" style:family="text">
      <style:text-properties fo:font-variant="normal" fo:text-transform="none" fo:color="#000000" loext:opacity="100%" style:font-name="Noto Sans1" fo:font-size="12pt" fo:letter-spacing="normal" fo:font-style="normal" fo:font-weight="normal" officeooo:rsid="00f2b8b4" style:font-size-asian="12pt" style:font-size-complex="12pt"/>
    </style:style>
    <style:style style:name="T59" style:family="text">
      <style:text-properties fo:font-variant="normal" fo:text-transform="none" fo:color="#000000" loext:opacity="100%" style:font-name="Noto Sans1" fo:font-size="12pt" fo:letter-spacing="normal" fo:font-style="normal" fo:font-weight="normal" officeooo:rsid="00f0d237" style:font-size-asian="12pt" style:font-size-complex="12pt"/>
    </style:style>
    <style:style style:name="T60" style:family="text">
      <style:text-properties fo:font-variant="normal" fo:text-transform="none" fo:color="#000000" loext:opacity="100%" style:font-name="Noto Sans1" fo:font-size="12pt" fo:letter-spacing="normal" fo:font-style="normal" fo:font-weight="bold" style:font-size-asian="12pt" style:font-size-complex="12pt" loext:padding="0cm" loext:border="none"/>
    </style:style>
    <style:style style:name="T61" style:family="text">
      <style:text-properties fo:font-variant="normal" fo:text-transform="none" fo:color="#000000" loext:opacity="100%" style:font-name="Noto Sans1" fo:font-size="11pt" fo:letter-spacing="normal" fo:font-style="normal" fo:font-weight="bold" style:font-size-asian="11pt" style:font-size-complex="11pt" loext:padding="0cm" loext:border="none"/>
    </style:style>
    <style:style style:name="T62" style:family="text">
      <style:text-properties fo:font-variant="normal" fo:text-transform="none" fo:color="#000000" loext:opacity="100%" style:font-name="Noto Sans1" fo:letter-spacing="normal" fo:font-style="normal" fo:font-weight="normal"/>
    </style:style>
    <style:style style:name="T63" style:family="text">
      <style:text-properties fo:font-variant="normal" fo:text-transform="none" fo:color="#000000" loext:opacity="100%" style:font-name="Noto Sans1" fo:letter-spacing="normal" fo:font-style="normal" fo:font-weight="normal" officeooo:rsid="00f2b8b4"/>
    </style:style>
    <style:style style:name="T64" style:family="text">
      <style:text-properties fo:font-variant="normal" fo:text-transform="none" fo:color="#000000" loext:opacity="100%" style:font-name="Noto Sans1" fo:letter-spacing="normal" fo:font-style="normal" fo:font-weight="normal" officeooo:rsid="00f0d237"/>
    </style:style>
    <style:style style:name="T65" style:family="text">
      <style:text-properties fo:font-variant="normal" fo:text-transform="none" fo:color="#000000" loext:opacity="100%" style:font-name="Noto Sans1" fo:letter-spacing="normal" fo:font-style="normal" fo:font-weight="bold" loext:padding="0cm" loext:border="none"/>
    </style:style>
    <style:style style:name="T66" style:family="text">
      <style:text-properties fo:font-variant="normal" fo:text-transform="none" style:use-window-font-color="true" loext:opacity="0%" style:font-name="Noto Sans1" fo:font-size="12pt" fo:letter-spacing="normal" fo:font-style="normal" style:text-underline-style="none" fo:font-weight="normal" officeooo:rsid="00ef1271" style:font-size-asian="12pt" style:font-size-complex="12pt" loext:padding="0cm" loext:border="none"/>
    </style:style>
    <style:style style:name="T67" style:family="text">
      <style:text-properties fo:font-variant="normal" fo:text-transform="none" style:use-window-font-color="true" loext:opacity="0%" fo:font-size="12pt" fo:letter-spacing="normal" fo:font-style="normal" style:text-underline-style="none" fo:font-weight="normal" officeooo:rsid="00ef1271" style:font-size-asian="12pt" style:font-size-complex="12pt" loext:padding="0cm" loext:border="none"/>
    </style:style>
    <style:style style:name="T68" style:family="text">
      <style:text-properties fo:font-variant="normal" fo:text-transform="none" style:use-window-font-color="true" loext:opacity="0%" style:font-name="Noto Sans1" fo:font-size="12pt" fo:letter-spacing="normal" fo:font-style="normal" style:text-underline-style="none" fo:font-weight="normal" officeooo:rsid="00ef1271" style:font-size-asian="12pt" style:font-size-complex="12pt" loext:padding="0cm" loext:border="none"/>
    </style:style>
    <style:style style:name="T69" style:family="text">
      <style:text-properties fo:font-variant="normal" fo:text-transform="none" style:use-window-font-color="true" loext:opacity="0%" style:font-name="Noto Sans1" fo:letter-spacing="normal" fo:font-style="normal" style:text-underline-style="none" fo:font-weight="normal" officeooo:rsid="00ef1271" loext:padding="0cm" loext:border="none"/>
    </style:style>
    <style:style style:name="T70" style:family="text">
      <style:text-properties fo:font-style="normal" fo:font-weight="normal" officeooo:rsid="001620b0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1946ac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f0d237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ec2b1a" style:font-style-asian="normal" style:font-weight-asian="normal" style:font-style-complex="normal" style:font-weight-complex="normal"/>
    </style:style>
    <style:style style:name="T74" style:family="text">
      <style:text-properties fo:font-style="normal" style:font-style-asian="normal" style:font-style-complex="normal"/>
    </style:style>
    <style:style style:name="T75" style:family="text">
      <style:text-properties fo:font-style="normal" officeooo:rsid="006dc650" style:font-style-asian="normal" style:font-style-complex="normal"/>
    </style:style>
    <style:style style:name="T76" style:family="text">
      <style:text-properties fo:font-weight="normal" officeooo:rsid="001620b0" style:font-weight-asian="normal" style:font-weight-complex="normal"/>
    </style:style>
    <style:style style:name="T77" style:family="text">
      <style:text-properties fo:font-weight="normal" officeooo:rsid="006c608b" style:font-weight-asian="normal" style:font-weight-complex="normal"/>
    </style:style>
    <style:style style:name="T78" style:family="text">
      <style:text-properties officeooo:rsid="00f421b7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officeooo:rsid="00f421b7" style:font-weight-asian="bold" style:font-weight-complex="bold"/>
    </style:style>
    <style:style style:name="T81" style:family="text">
      <style:text-properties fo:font-weight="bold" officeooo:rsid="006c608b" style:font-weight-asian="bold" style:font-weight-complex="bold"/>
    </style:style>
    <style:style style:name="T82" style:family="text">
      <style:text-properties fo:font-weight="bold" officeooo:rsid="00f42b02" style:font-weight-asian="bold" style:font-weight-complex="bold"/>
    </style:style>
    <style:style style:name="T83" style:family="text">
      <style:text-properties officeooo:rsid="01021742"/>
    </style:style>
    <style:style style:name="T84" style:family="text">
      <style:text-properties officeooo:rsid="00f8edcd"/>
    </style:style>
    <style:style style:name="T85" style:family="text">
      <style:text-properties officeooo:rsid="006db221"/>
    </style:style>
    <style:style style:name="T86" style:family="text">
      <style:text-properties officeooo:rsid="00f5c947"/>
    </style:style>
    <style:style style:name="T87" style:family="text">
      <style:text-properties officeooo:rsid="006dc650"/>
    </style:style>
    <style:style style:name="T88" style:family="text">
      <style:text-properties officeooo:rsid="008d5dbc"/>
    </style:style>
    <style:style style:name="T89" style:family="text">
      <style:text-properties officeooo:rsid="001a3725" style:font-name-asian="Liberation Serif" style:font-name-complex="Liberation Serif"/>
    </style:style>
    <style:style style:name="T90" style:family="text">
      <style:text-properties officeooo:rsid="00f22abc" style:font-name-asian="Liberation Serif" style:font-name-complex="Liberation Serif"/>
    </style:style>
    <style:style style:name="T91" style:family="text">
      <style:text-properties fo:font-size="12pt" officeooo:rsid="00f2b8b4" style:font-size-asian="12pt" style:font-size-complex="12pt"/>
    </style:style>
    <style:style style:name="T92" style:family="text">
      <style:text-properties fo:font-size="12pt" officeooo:rsid="0013f216" style:font-size-asian="12pt" style:font-size-complex="12pt"/>
    </style:style>
    <style:style style:name="T93" style:family="text">
      <style:text-properties fo:font-size="12pt" fo:font-style="normal" fo:font-weight="normal" officeooo:rsid="00ec2b1a" style:font-size-asian="12pt" style:font-style-asian="normal" style:font-weight-asian="normal" style:font-size-complex="12pt" style:font-style-complex="normal" style:font-weight-complex="normal"/>
    </style:style>
    <style:style style:name="T94" style:family="text">
      <style:text-properties fo:font-size="12pt" fo:font-style="normal" fo:font-weight="normal" officeooo:rsid="00f0d237" style:font-size-asian="12pt" style:font-style-asian="normal" style:font-weight-asian="normal" style:font-size-complex="12pt" style:font-style-complex="normal" style:font-weight-complex="normal"/>
    </style:style>
    <style:style style:name="T95" style:family="text">
      <style:text-properties style:font-name="Noto Sans1" fo:font-size="12pt" officeooo:rsid="00f2b8b4" style:font-size-asian="12pt" style:font-size-complex="12pt"/>
    </style:style>
    <style:style style:name="T96" style:family="text">
      <style:text-properties style:font-name="Noto Sans1" fo:font-size="12pt" officeooo:rsid="0013f216" style:font-size-asian="12pt" style:font-size-complex="12pt"/>
    </style:style>
    <style:style style:name="T97" style:family="text">
      <style:text-properties style:font-name="Noto Sans1" fo:font-size="12pt" fo:font-style="normal" fo:font-weight="normal" officeooo:rsid="00ec2b1a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style:font-name="Noto Sans1" fo:font-size="12pt" fo:font-style="normal" fo:font-weight="normal" officeooo:rsid="00f0d237" style:font-size-asian="12pt" style:font-style-asian="normal" style:font-weight-asian="normal" style:font-size-complex="12pt" style:font-style-complex="normal" style:font-weight-complex="normal"/>
    </style:style>
    <style:style style:name="T99" style:family="text">
      <style:text-properties style:font-name="Noto Sans1" fo:font-size="12pt" fo:font-style="italic" fo:font-weight="normal" officeooo:rsid="00ec2b1a" style:font-size-asian="12pt" style:font-style-asian="italic" style:font-weight-asian="normal" style:font-size-complex="12pt" style:font-style-complex="italic" style:font-weight-complex="normal"/>
    </style:style>
    <style:style style:name="T100" style:family="text">
      <style:text-properties style:font-name="Noto Sans1" fo:font-style="normal" fo:font-weight="normal" officeooo:rsid="001620b0" style:font-style-asian="normal" style:font-weight-asian="normal" style:font-style-complex="normal" style:font-weight-complex="normal"/>
    </style:style>
    <style:style style:name="T101" style:family="text">
      <style:text-properties style:font-name="Noto Sans1" fo:font-style="normal" fo:font-weight="normal" officeooo:rsid="001946ac" style:font-style-asian="normal" style:font-weight-asian="normal" style:font-style-complex="normal" style:font-weight-complex="normal"/>
    </style:style>
    <style:style style:name="T102" style:family="text">
      <style:text-properties style:font-name="Noto Sans1" fo:font-style="normal" fo:font-weight="normal" officeooo:rsid="00ec2b1a" style:font-style-asian="normal" style:font-weight-asian="normal" style:font-style-complex="normal" style:font-weight-complex="normal"/>
    </style:style>
    <style:style style:name="T103" style:family="text">
      <style:text-properties style:font-name="Noto Sans1" fo:font-style="normal" fo:font-weight="normal" officeooo:rsid="00f0d237" style:font-style-asian="normal" style:font-weight-asian="normal" style:font-style-complex="normal" style:font-weight-complex="normal"/>
    </style:style>
    <style:style style:name="T104" style:family="text">
      <style:text-properties style:font-name="Noto Sans1" fo:font-weight="normal" officeooo:rsid="001620b0" style:font-weight-asian="normal" style:font-weight-complex="normal"/>
    </style:style>
    <style:style style:name="T105" style:family="text">
      <style:text-properties style:font-name="Noto Sans1" fo:font-style="italic" fo:font-weight="normal" officeooo:rsid="001620b0" style:font-style-asian="italic" style:font-weight-asian="normal" style:font-style-complex="italic" style:font-weight-complex="normal"/>
    </style:style>
    <style:style style:name="T106" style:family="text">
      <style:text-properties style:font-name="Noto Sans1" fo:font-style="italic" fo:font-weight="normal" officeooo:rsid="006c608b" style:font-style-asian="italic" style:font-weight-asian="normal" style:font-style-complex="italic" style:font-weight-complex="normal"/>
    </style:style>
    <style:style style:name="T107" style:family="text">
      <style:text-properties style:font-name="Noto Sans1" officeooo:rsid="00f2b8b4"/>
    </style:style>
    <style:style style:name="T108" style:family="text">
      <style:text-properties style:font-name="Noto Sans1" officeooo:rsid="0013f21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Aristotele</text:p>
      <text:p text:style-name="P16">Nacque nel 384 a.C. a Stagira, un piccolo paese della Macedonia. Suo padre, il dotto Nicomaco era il medico personale di Aminta II re della Macedonia, per cui Aristotele ebbe modo di frequentare la capitale Pella e stringere amicizia con Filippo, futuro re e padre di Alessandro Magno.</text:p>
      <text:p text:style-name="P17">Divenuto orfano quando ancora era un ragazzo, <text:span text:style-name="T18">venne affidato ad un cugino, un certo Prosseno che lo portò in Asia ad Atarneo, un villaggio sulle coste della Lidia nel Mar Egeo. </text:span></text:p>
      <text:p text:style-name="P17"><text:span text:style-name="T18">A soli diciassette anni lo </text:span>ritroviamo ad Atene, studente dell’ Accademia, la più prestigiosa di tutte <text:s/>le scuole greche. <text:span text:style-name="T18">Era il </text:span>367 a.C., Platone era ancora in Sicilia, e al suo posto era diventato scolarca<text:note text:id="ftn68" text:note-class="footnote"><text:note-citation>1</text:note-citation><text:note-body><text:p text:style-name="P1">Capo di una scuola filosofica nell’antica Grecia.</text:p></text:note-body></text:note> Eudosso<text:note text:id="ftn69" text:note-class="footnote"><text:note-citation>2</text:note-citation><text:note-body><text:p text:style-name="P2">Eudosso di Cnido (408-355 a.C.) fu il primo a elaborare matematicamente un sistema di sfere celesti. </text:p><text:p text:style-name="Footnote"/><text:p text:style-name="Footnote"/></text:note-body></text:note> di Cnido, grande matematico e astronomo, più esperto di fisica che non di filosofia. <text:span text:style-name="T18">Aristotele restò in Accademia per venti anni, prima come allievo, poi come insegnante, dove ebbe modo di diventare il più devoto e il più critico dei discepoli di Platone.</text:span> </text:p>
      <text:p text:style-name="P17">Aristotele inizi<text:span text:style-name="T18">ò</text:span> a criticare il mondo delle idee di Platone <text:span text:style-name="T19">nel </text:span>367 a.C., e continu<text:span text:style-name="T18">ò</text:span> a farlo per tutta la sua vita. Le <text:soft-page-break/>sue critiche si basa<text:span text:style-name="T19">va</text:span>no su argomenti logici, epistemologici e ontologici, e sono esposte in diverse opere, tra cui la Metafisica, i Topici, la Fisica e la Politica.</text:p>
      <text:p text:style-name="P6"><text:span text:style-name="T13">“</text:span><text:span text:style-name="T2">C'è un perché nelle cose che avvengono e sono per natura e inoltre dove è un fine per esso si compie e quanto precede e quanto segue. Anche nelle piante appare prodursi ciò che giova al fine, come le foglie per la protezione del frutto. Sicché se per natura o per un fine la rondine fa il nido e il ragno la tela e le piante producono le foglie per i frutti e le radici non all'in su ma in giù per la nutrizione, è evidente che siffatta causa è presente in tutte le cose che si producono o sono per natura</text:span>. <text:span text:style-name="T89">” </text:span><text:span text:style-name="T90">(</text:span>Aristotele, Fisica, II,8<text:span text:style-name="T23">)</text:span></text:p>
      <text:p text:style-name="P23">Queste le principali obiezioni di Aristotele al mondo delle idee di Platone:</text:p>
      <text:list text:style-name="L2">
        <text:list-item>
          <text:p text:style-name="P5"><text:span text:style-name="T99">La teoria delle idee è un “duplicato” inutile della realtà, che non spiega né la natura né il divenire delle cose sensibili.</text:span></text:p>
        </text:list-item>
      </text:list>
      <text:list text:style-name="L1">
        <text:list-item>
          <text:p text:style-name="P22">La teoria delle idee è contraddittoria, perché implica l’esistenza di idee di negazione (come il non-uomo) e di relazione (come il doppio), che non hanno senso se separate dalle cose.</text:p>
        </text:list-item>
        <text:list-item>
          <text:p text:style-name="P22"><text:soft-page-break/>La teoria delle idee è oscura, perché non chiarisce come le idee siano collegate tra loro e come le cose sensibili partecipino o imitino le idee.</text:p>
        </text:list-item>
        <text:list-item>
          <text:p text:style-name="P22">La teoria delle idee è incompatibile con la scienza, perché rende impossibile una conoscenza certa e dimostrativa della realtà naturale, basata sui principi e le cause immanenti alle cose.</text:p>
        </text:list-item>
      </text:list>
      <text:p text:style-name="P18">Secondo Aristotele, Platone aveva travisato tutto, concordava con il maestro sul fatto che il singolo cavallo scorre e che nessun cavallo vive per sempre. L’idea o la forma cavallo in sé non esiste perché la forma cavallo è data dalle caratteristiche del cavallo o come diciamo oggi dalla specie cavallo, la cui forma è comune a tutti i cavalli. L’idea della gallina non viene prima della gallina, è la forma della gallina che dà specificità alla gallina come può essere quella di fare le uova e le due cose sono inseparabili come l’anima dal corpo. </text:p>
      <text:p text:style-name="P19">Per Platone, le idee erano più reali di tutti i fenomeni naturali, prima c’era l’idea del <text:span text:style-name="T2">cavallo, </text:span>poi c’erano tutti i cavalli del mondo sensibile che galoppavano come ombre sulla par<text:span text:style-name="T30">e</text:span>te della caverna. Analogamente l’idea <text:span text:style-name="T2">gallina </text:span>era arrivata prima della gallina e dell’uovo. </text:p>
      <text:p text:style-name="P20">Un <text:span text:style-name="T31">aneddoto</text:span> rende meglio il pensiero di Aristotele: “C’era una volta uno scultore che stava lavorando a un enorme blocco di granito. Un giorno mentre stava scolpendo quella pietra informe, un bambino, passando <text:soft-page-break/>di lì, <text:s/>si fermò <text:s/>e <text:s/>chiese allo scultore: “Che stai cercando?” “Aspetta e vedrai” fu la risposta. Alcuni giorni dopo il bambino ritornò e vide che lo scultore aveva finito di scolpire nel granito un magnifico cavallo. Il bambino rimase a bocca aperta a fissare il cavallo, poi si girò verso lo scultore e gli chiese: ”Come facevi a sapere che era lì dentro?” </text:p>
      <text:p text:style-name="P21">Già come faceva a saperlo? In qualche modo, lo scultore aveva visto la forma del cavallo nel blocco di granito, quella pietra aveva in sé la possibilità di realizzare o portare a termine una forma precisa. </text:p>
      <text:p text:style-name="P20"><text:span text:style-name="T32">A</text:span>ristotele, <text:span text:style-name="T32">aveva un punto di vista particolare per quanto riguarda i rapporti causali in natura, </text:span>ogni mutamento in natura è una trasformazione della materia, dalla “<text:span text:style-name="T2">possibilità</text:span>” alla “<text:span text:style-name="T2">realtà</text:span>” che in altre parole equivale a dire che la materia è tesa a mettere in atto una possibilità di mutamento che in essa è presente. <text:s/><text:span text:style-name="T32">Q</text:span><text:span text:style-name="T33">u</text:span><text:span text:style-name="T32">ando si parla di cause che provocano questo o quello, </text:span><text:span text:style-name="T35">Aristotele ne individua quattro: la causa </text:span><text:span text:style-name="T14">materiale</text:span><text:span text:style-name="T6"> </text:span><text:span text:style-name="T7">(</text:span><text:span text:style-name="T36">è la materia da cui qualcosa è fatto</text:span><text:span text:style-name="T7">)</text:span><text:span text:style-name="T35">, la causa </text:span><text:span text:style-name="T14">formale</text:span><text:span text:style-name="T6"> </text:span><text:span text:style-name="T7">(</text:span><text:span text:style-name="T36">è la forma che qualcosa ha</text:span><text:span text:style-name="T7">)</text:span><text:span text:style-name="T6"> </text:span><text:span text:style-name="T35"><text:s/>la causa </text:span><text:span text:style-name="T14">efficiente</text:span><text:span text:style-name="T6"> </text:span><text:span text:style-name="T7">(</text:span><text:span text:style-name="T36">è ciò che produce qualcosa</text:span><text:span text:style-name="T7">)</text:span><text:span text:style-name="T35">, e la causa </text:span><text:span text:style-name="T14">finale</text:span><text:span text:style-name="T6"> </text:span><text:span text:style-name="T7">(</text:span><text:span text:style-name="T36">è il fine per cui qualcosa è prodotto</text:span><text:span text:style-name="T7">)</text:span><text:span text:style-name="T6">. </text:span><text:span text:style-name="T34">Un</text:span>a statua di bronzo ha il bronzo come sua materia, la forma della statua come mutamento della materia, <text:span text:style-name="T32">il lavoro del fabbro come causa efficiente</text:span> <text:span text:style-name="T32">e la causa finale quale scopo del fabbro</text:span>. <text:soft-page-break/>Questa capacità di trasformazione per Aristotele è definita “<text:span text:style-name="T16">atto e</text:span><text:span text:style-name="T81"> </text:span><text:span text:style-name="T15">potenza</text:span>” <text:span text:style-name="T32">oggi diremmo che una determinata cosa ha un certo </text:span><text:span text:style-name="T4">potenziale. </text:span><text:span text:style-name="T32">Atto e potenza sono due modi in cui l'essere si manifesta. L'atto è la presenza piena e completa di un'essenza, mentre la potenza è la possibilità di un'essenza di diventare atto. </text:span></text:p>
      <text:p text:style-name="P9"><text:span text:style-name="T26">Il motivo per cui </text:span><text:span text:style-name="T27">Aristotele </text:span><text:span text:style-name="T49">è </text:span><text:span text:style-name="T50">considerato</text:span><text:span text:style-name="T49"> uno dei più grandi filosofi occidentali, </text:span><text:span text:style-name="T50">sta nel fatto di </text:span><text:span text:style-name="T49">aver considerato la </text:span><text:span text:style-name="Strong_20_Emphasis"><text:span text:style-name="T60">filosofia come un'attività scientifica articolata in discipline distinte</text:span></text:span><text:span text:style-name="T49">, con l'obiettivo di interpretare tutta la realtà. </text:span><text:span text:style-name="T66">P</text:span><text:span text:style-name="T49">er arrivare a questo obiettivo era necessario avere un metodo in cui i pensieri e i ragionamenti dovevano necessariamente rispettare delle determinate condizioni per giungere a conclusioni certe. </text:span><text:span text:style-name="T51">P</text:span><text:span text:style-name="T28">er la cultura europea, </text:span><text:span text:style-name="T29">è </text:span><text:span text:style-name="T28">l’inventore e l’ordinatore delle diverse scienze, </text:span><text:span text:style-name="T29">avendo </text:span><text:span text:style-name="T28">crea</text:span><text:span text:style-name="T29">to</text:span><text:span text:style-name="T28"> i linguaggi specialistici che vengono usati oggi in campo scientifico. </text:span></text:p>
      <text:p text:style-name="P7"><text:span text:style-name="T100">Aristotele suddivise le cose del mondo in oggetti </text:span><text:span text:style-name="Emphasis"><text:span text:style-name="T104">non-viventi, vegetali, e animali. </text:span></text:span><text:span text:style-name="Emphasis"><text:span text:style-name="T100">Successivamente, prese in esame anche l’uomo e si accorse che tutto ciò che questo singolare animale produceva poteva essere catalogato come </text:span></text:span><text:span text:style-name="Emphasis"><text:span text:style-name="T105">materiale</text:span></text:span><text:span text:style-name="Emphasis"><text:span text:style-name="T100">, </text:span></text:span><text:span text:style-name="Emphasis"><text:span text:style-name="T105">morale</text:span></text:span><text:span text:style-name="Emphasis"><text:span text:style-name="T100"> e </text:span></text:span><text:span text:style-name="Emphasis"><text:span text:style-name="T105">teoretic</text:span></text:span><text:span text:style-name="Emphasis"><text:span text:style-name="T106">o</text:span></text:span><text:span text:style-name="Emphasis"><text:span text:style-name="T106"><text:note text:id="ftn70" text:note-class="footnote"><text:note-citation>3</text:note-citation><text:note-body><text:p text:style-name="P2"><text:span text:style-name="T33">T</text:span>eoretico è uno dei tre tipi di conoscenza, insieme al "pratico" e al "produttivo". Il sapere teoretico è quello che si occupa dell'indagine della realtà per se stessa, senza alcun fine pratico o produttivo. </text:p></text:note-body></text:note></text:span></text:span><text:span text:style-name="Emphasis"><text:span text:style-name="T105"> </text:span></text:span><text:span text:style-name="Emphasis"><text:span text:style-name="T100">a seconda </text:span></text:span><text:soft-page-break/><text:span text:style-name="Emphasis"><text:span text:style-name="T100">che l’oggetto del suo pensiero appartenesse al mondo della </text:span></text:span><text:span text:style-name="Emphasis"><text:span text:style-name="T104">fisica,</text:span></text:span><text:span text:style-name="Emphasis"><text:span text:style-name="T100"> dell’</text:span></text:span><text:span text:style-name="Emphasis"><text:span text:style-name="T104">etica</text:span></text:span><text:span text:style-name="Emphasis"><text:span text:style-name="T100"> o della </text:span></text:span><text:span text:style-name="Emphasis"><text:span text:style-name="T104">metafisica</text:span></text:span><text:span text:style-name="Emphasis"><text:span text:style-name="T100">. </text:span></text:span></text:p>
      <text:p text:style-name="P8"><text:span text:style-name="Emphasis"><text:span text:style-name="T100">Strumento principale del suo metodo di </text:span></text:span><text:span text:style-name="Emphasis"><text:span text:style-name="T101">c</text:span></text:span><text:span text:style-name="Emphasis"><text:span text:style-name="T100">atalogazione fu la </text:span></text:span><text:span text:style-name="Emphasis"><text:span text:style-name="T105">logica</text:span></text:span><text:span text:style-name="Emphasis"><text:span text:style-name="T100">, basata sul </text:span></text:span><text:span text:style-name="Emphasis"><text:span text:style-name="T105">sillogismo</text:span></text:span><text:span text:style-name="Emphasis"><text:span text:style-name="T100">.</text:span></text:span></text:p>
      <text:p text:style-name="P7"><text:span text:style-name="T31">Per Aristotele era quindi necessario dare un ordine al mondo delle cose e per fare questo ideò un </text:span><text:span text:style-name="T78">sistema di </text:span><text:span text:style-name="T5">classificazione del sapere</text:span><text:span text:style-name="T78">, </text:span><text:span text:style-name="T31">dividendo </text:span><text:span text:style-name="T78">le scienze in tre </text:span><text:span text:style-name="T31">branche</text:span><text:span text:style-name="T78"> principali:</text:span></text:p>
      <text:p text:style-name="P13">1. <text:span text:style-name="T11">Scienze Teoretiche</text:span>: <text:s/>ha come oggetto le cause prime e ultime delle cose, e si basa sulla ragione e sull'intelletto. Gli ambiti disciplinari comprendono la <text:span text:style-name="T79">filosofia prima o metafisica</text:span> (<text:span text:style-name="T33">l</text:span>a ricerca della sostanza ultima delle cose, come l'anima o Dio.), <text:span text:style-name="T79">la matematica</text:span> (che studia le forme e le relazioni matematiche <text:span text:style-name="T33">come l</text:span>a dimostrazione dei teoremi, come il teorema di Pitagora) e la <text:span text:style-name="T79">fisica o filosofia della natura</text:span> (che studia la natura e le sue leggi, come la legge di gravità.<text:span text:style-name="T33">)</text:span></text:p>
      <text:p text:style-name="P14">2.<text:span text:style-name="T2"> </text:span><text:span text:style-name="T11">Scienze Pratiche</text:span>: le scienze pratiche sono quelle che si occupano dell'agire umano, e hanno come fine il bene <text:span text:style-name="T33">ed </text:span>il comportamento umano sotto due prospettive diverse. <text:span text:style-name="T79">L'etica</text:span>, che studia il comportamento del singolo e fornisce indicazioni per un corretto agire, e la <text:span text:style-name="T79">politica</text:span>, che indaga i comportamenti collettivi <text:span text:style-name="T33">e la costituzione dello Stato.</text:span></text:p>
      <text:p text:style-name="P7"><text:span text:style-name="T78">3. </text:span><text:span text:style-name="T12">Scienze Poietiche</text:span><text:span text:style-name="T78">: le scienze poietiche sono quelle che si occupano della produzione di opere, e hanno come </text:span><text:soft-page-break/><text:span text:style-name="T78">fine la bellezza. </text:span><text:span text:style-name="T33">Q</text:span><text:span text:style-name="T78">ueste scienze </text:span><text:span text:style-name="T33">includono tutte le </text:span><text:span text:style-name="T80">arti</text:span><text:span text:style-name="T78"> e </text:span><text:span text:style-name="T80">tecniche, </text:span><text:span text:style-name="T78"><text:s/></text:span><text:span text:style-name="T33">come l’Architettura </text:span><text:span text:style-name="T78">necessari</text:span><text:span text:style-name="T33">a</text:span><text:span text:style-name="T78"> per </text:span><text:span text:style-name="T33">costruire edifici belli e armoniosi</text:span><text:span text:style-name="T78">. </text:span><text:span text:style-name="T33">La musica che si occupa della composizione di musica commuovente e ispiratrice. La poesia che sia bella e significativa. La danza che sia elegante ed affascinante. La retorica capace di creare discorsi convincenti e persuasivi.</text:span></text:p>
      <text:p text:style-name="P11">Questa divisione del sapere <text:span text:style-name="T31">evidenzia, in modo incontrovertibile, il differente <text:s/>modo di intendere le cose tra Aristotele e Platone e quanto sia distante il loro modo di concepire la realtà.</text:span> <text:span text:style-name="T31">P</text:span>er Platone la conoscenza è un cammino che procede da gradi inferiori a gradi superiori fino a raggiungere il grado delle idee valori. <text:span text:style-name="T32">P</text:span>er Aristotele il sapere segue una struttura orizzontale, in cui la filosofia occupa una posizione centrale, <text:span text:style-name="T83">e non vede nessuna conoscenza superiore alle altre. </text:span><text:span text:style-name="T33">L</text:span><text:span text:style-name="T78">e uniche fonti di conoscenza sono le sensazioni e l'esperienza perché ci mettono in contatto con la realtà delle sostanze concrete. Tuttavia, la vera conoscenza riguardo le cause e i principi delle cose in sé si ottiene quando l'intelletto agisce sulle nostre sensazioni e sulla nostra esperienza.</text:span></text:p>
      <text:p text:style-name="P11"><text:span text:style-name="T34">Aristotele, </text:span><text:span text:style-name="T36">nella sua catalogazione delle cose,</text:span><text:span text:style-name="T34"> not</text:span><text:span text:style-name="T37">ò</text:span><text:span text:style-name="T34"> che le espressioni linguistiche </text:span><text:span text:style-name="T36">in uso,</text:span><text:span text:style-name="T34"> </text:span><text:span text:style-name="T37">erano </text:span><text:span text:style-name="T34">semplici e senza connessione, come “uomo” o “corre”, oppure complesse, composte e strutturate, come “un uomo corre”. </text:span><text:span text:style-name="T38">Per dare </text:span><text:soft-page-break/><text:span text:style-name="T38">rappresentazione delle diverse modalità in cui l’essere si manifesta, individua 10 categorie</text:span><text:span text:style-name="T38"><text:note text:id="ftn71" text:note-class="footnote"><text:note-citation>4</text:note-citation><text:note-body><text:p text:style-name="Footnote">Le categorie sono l'attribuzione di un predicato ad un soggetto. Sono <text:s/>le classi di ogni predicato con cui poter ordinare tutta la realtà.</text:p></text:note-body></text:note></text:span><text:span text:style-name="T38"> o generi sommi che</text:span><text:span text:style-name="T31"> raccolgono tutte le proprietà che si possono predicare dell’essere, che si riferiscono a qualità primarie </text:span><text:span text:style-name="T33">o predicamenti</text:span><text:span text:style-name="T31"> (l'essenza immutabile degli oggetti), o secondarie (gli accidenti che possono cambiare). <text:s/>Queste categorie </text:span><text:span text:style-name="T1">o predicamenti</text:span><text:span text:style-name="T31"> </text:span><text:span text:style-name="T84">furono identificate con il termine</text:span><text:span text:style-name="T31">: <text:s/></text:span><text:span text:style-name="T15">sostanza,</text:span> <text:span text:style-name="T15">qualità,</text:span> <text:span text:style-name="T15">quantità</text:span>, <text:span text:style-name="T15">relazione</text:span>, <text:span text:style-name="T17">dove</text:span>, <text:span text:style-name="T17">quando</text:span>, <text:span text:style-name="T17">stare</text:span>, <text:span text:style-name="T17">avere</text:span>, <text:span text:style-name="T17">agire</text:span>, <text:span text:style-name="T17">subire</text:span>. Per esemplificare le categorie <text:span text:style-name="T31">o predicamenti </text:span><text:span text:style-name="T84">si può</text:span> dire: <text:span text:style-name="T79">sostanza</text:span> <text:span text:style-name="T33">(è ciò che esiste in sé e per sé: è uomo)</text:span>, <text:span text:style-name="T79">qualità</text:span> <text:span text:style-name="T33">(è ciò che appartiene a una sostanza e la caratterizza:</text:span> è <text:span text:style-name="T33">un uomo biondo)</text:span> <text:span text:style-name="T81">q</text:span><text:span text:style-name="T79">uantità</text:span> <text:span text:style-name="T33">(</text:span>è ciò che misura la grandezza di una sostanza: <text:span text:style-name="T33">è un uomo biondo molto alto) </text:span><text:span text:style-name="T79">relazione</text:span> <text:span text:style-name="T33">(è ciò che collega due o più sostanze: due uomini biondi molto alti) </text:span><text:span text:style-name="T82">dove</text:span> <text:span text:style-name="T33">(è la posizione di una sostanza nello spazio)</text:span> <text:span text:style-name="T31">il </text:span><text:span text:style-name="T82">quando</text:span><text:span text:style-name="T31"> </text:span><text:span text:style-name="T33">(è il tempo in cui la sostanza </text:span><text:s/>è <text:span text:style-name="T33">localizzata)</text:span> <text:span text:style-name="T31">lo </text:span><text:span text:style-name="T82">stare,</text:span> <text:span text:style-name="T31">l’</text:span><text:span text:style-name="T82">avere,</text:span><text:span text:style-name="T77"> </text:span><text:span text:style-name="T31">l’</text:span><text:span text:style-name="T79">azione,</text:span> <text:span text:style-name="T31">il </text:span><text:span text:style-name="T82">subire. </text:span>Le categorie di Aristotele, sono così logicamente modalità di pensiero e discorso, classi concettuali e tipi di predicati ed al contempo sono ontologicamente caratteri strutturali dell’essere e della realtà. <text:span text:style-name="T85">Thomas Reid</text:span><text:span text:style-name="T85"><text:note text:id="ftn72" text:note-class="footnote"><text:note-citation>5</text:note-citation><text:note-body><text:p text:style-name="P3">Filosofo scozzese (1710-1796) è considerato il fondatore della cosiddetta “scuola scozzese del senso comune”. Critico nei confronti dello scetticismo di David Hume e più in generale della teoria delle idee come intermediarie del processo conoscitivo.</text:p></text:note-body></text:note></text:span><text:span text:style-name="T85">, n</text:span>ella sua <text:span text:style-name="T86">opera </text:span>“Sintesi <text:span text:style-name="T31">C</text:span>ritica della <text:span text:style-name="T31">L</text:span>ogica di <text:soft-page-break/>Aristotele” del 1774, rilevava come Aristotele tratti largamente le prime quattro categorie e trascuri le altre come evidenti: in particolare, le sostanze sono prime e seconde; le sostanze prime sono individui <text:span text:style-name="T32">che sussistono autonomamente </text:span>, le sostanze seconde sono generi e specie di sostanze.</text:p>
      <text:p text:style-name="P8">La nozione di sostanza è il fulcro della filosofia di Aristotele: il sapere aristotelico è un sapere di sostanze, poiché la realtà aristotelica è ben sostanziale e l’essere è sostanza ed essenza; quale strumento del sapere, la stessa logica aristotelica è imperniata sulla metafisica della sostanza. La sostanza di una cosa è l’essenza stabile che permane <text:span text:style-name="T85">al</text:span> mutare degli aspetti accessori, secondari, accidentali della cosa: bianco o nero, giovane o vecchio un uomo è e resta uomo, perché possiede e conserva la propria umanità; è l’umanità il tratto essenziale che fa di un uomo, un uomo, e che tra le altre determinazioni lo accomuna ai propri simili. Aristotele ricondu<text:span text:style-name="T87">ce</text:span> la conoscenza delle cose all’individuazione delle essenze che caratterizzano le diverse sostanze del mondo. </text:p>
      <text:p text:style-name="P8"><text:span text:style-name="T86">L</text:span>a sostanza è formata da una materia e da una forma che operando insieme costituiscono il sinolo<text:note text:id="ftn73" text:note-class="footnote"><text:note-citation>6</text:note-citation><text:note-body><text:p text:style-name="Footnote"><text:span text:style-name="T1">L</text:span>etteralmente “tutt’uno”.<text:span text:style-name="T1">L</text:span>’esistenza si determina nelle cose, e le cose sono appunto unione, insieme, sinolo di materia e forma.</text:p></text:note-body></text:note>, <text:span text:style-name="T86">l’unione </text:span>tra materi<text:span text:style-name="T87">a</text:span> e forma. La materia è la componente <text:soft-page-break/>materiale di un essere, <text:span text:style-name="T85">mentre</text:span> la forma è la <text:span text:style-name="T85">sua </text:span>componente immateriale. La materia è il sostrato, il supporto su cui si applica la forma, <text:span text:style-name="T85">la</text:span> forma è ciò che dà all'essere la sua identità, la sua essenza. Un animale è fatto di carne, ossa e sangue, ma è la sua forma, ovvero la sua struttura e il suo comportamento, che gli conferiscono la sua identità biologica.</text:p>
      <text:p text:style-name="P8">Aristotele sostiene che le sostanze sono gli oggetti più adatti alla conoscenza scientifica, perché sono gli oggetti che hanno una causa formale. La causa formale è ciò che può essere oggetto di conoscenza scientifica. <text:span text:style-name="T87">L’</text:span><text:span text:style-name="T2">idea teoretica classificatoria tassonomica </text:span><text:span text:style-name="T75">di A</text:span><text:span text:style-name="T74">ristote</text:span><text:span text:style-name="T75">le</text:span>, <text:span text:style-name="T87">è un sistema di classificazione che organizza le informazioni, in base a un insieme di criteri comuni. Questi criteri possono essere basati su qualsiasi caratteristica, come ad esempio la forma, la funzione, la causa, l'effetto, e</text:span><text:span text:style-name="T88">t</text:span><text:span text:style-name="T87">c. Alla base di una tassonomia vi è la necessità di creare un sistema ordinato e coerente che permetta di comprendere meglio le informazioni e di facilitarne la ricerca.</text:span> “<text:span text:style-name="T87">U</text:span>omo” è in questa maniera “animale razionale”, giacché gli animali sono il genere di esseri viventi più vicino all’uomo e la specie dell’uomo si distingue dalle altre specie animali per la ragione. Nella definizione sostanziale di Aristotele la dimensione logico-linguistica dei concetti e dei termini, si salda <text:soft-page-break/>pertanto con il livello ontologico-metafisico<text:note text:id="ftn74" text:note-class="footnote"><text:note-citation>7</text:note-citation><text:note-body><text:p text:style-name="P4">Si riferisce alla esplorazione filosofica dell’essere in sé, delle sue proprietà fondamentali e delle cause prime dell’essere. Ontologia è “discorso sull’essere”; Metafisica è ricerca delle cause prime dell’essere in quanto essere.</text:p></text:note-body></text:note> dell’essere e della realtà, col momento gnoseologico- epistemologico<text:note text:id="ftn75" text:note-class="footnote"><text:note-citation>8</text:note-citation><text:note-body><text:p text:style-name="P4">Si riferisce allo studio della conoscenza (gnoseologia) e alla teoria della conoscenza scientifica (epistemologia). L’affermazione sottolinea l’interconnessione tra la nostra comprensione dell’essere (ontologia/metafisica) e la nostra comprensione della conoscenza e della scienza (gnoseologia/epistemologia.)</text:p></text:note-body></text:note> della scienza. La dimensione logico-linguistica della definizione sostanziale si manifesta nel fatto che la sostanza è il soggetto di ogni predicato. Ad esempio, il predicato "è rosso" può essere applicato a un tavolo, ma non al legno di cui il tavolo è fatto. Il legno è la materia del tavolo, ma non è la sostanza del tavolo. La sostanza è ciò che rende possibile il pensiero e il discorso, perché è ciò che rende possibile identificare e distinguere gli oggetti. La dimensione gnoseologico-epistemologica, riguarda la conoscenza, ovvero il modo in cui conosciamo ciò che esiste. Ad esempio, la scienza fisica si basa sulla comprensione della natura della materia e dell'energia. La scienza biologica si basa sulla comprensione della natura della vita. La scienza sociale si basa sulla comprensione della natura della società, <text:span text:style-name="T88">metaforicamente si potrebbe dire che è come un puzzle che dobbiamo risolvere. Ogni pezzo del puzzle ci dà una visione più completa della società</text:span>. </text:p>
      <text:p text:style-name="P8"><text:soft-page-break/>La scienza è propriamente spiegazione del perché delle cose: per Aristotele il vero sapere non solo descrive ma è conoscenza delle cause, <text:span text:style-name="T1">e su questo argomento aveva un punto di vista particolare sui rapporti causali in natura. Quando si parla di cause che provocano questo o quello, ci riferiamo al </text:span><text:span text:style-name="T3">come</text:span><text:span text:style-name="T1"> avviene qualcosa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4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4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2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FreeSans" style:font-family-complex="FreeSans" style:font-family-generic-complex="swiss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21.001cm" style:num-format="1" style:print-orientation="portrait" fo:margin-top="1.799cm" fo:margin-bottom="1.499cm" fo:margin-left="1.799cm" fo:margin-right="1.79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orrado tafaro</meta:initial-creator>
    <meta:creation-date>2026-01-25T17:42:15.158494688</meta:creation-date>
    <dc:date>2026-01-25T17:56:41.726693454</dc:date>
    <dc:creator>corrado tafaro</dc:creator>
    <meta:editing-duration>PT2M25S</meta:editing-duration>
    <meta:editing-cycles>1</meta:editing-cycles>
    <meta:document-statistic meta:table-count="0" meta:image-count="0" meta:object-count="0" meta:page-count="12" meta:paragraph-count="37" meta:word-count="2472" meta:character-count="15454" meta:non-whitespace-character-count="12997"/>
    <meta:generator>LibreOffice/24.2.7.2$Linux_X86_64 LibreOffice_project/420$Build-2</meta:generator>
  </office:meta>
</office:document-meta>
</file>