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normal" officeooo:paragraph-rsid="0010106c" style:font-weight-asian="normal" style:font-weight-complex="normal"/>
    </style:style>
    <style:style style:name="P2" style:family="paragraph" style:parent-style-name="Standard">
      <style:paragraph-properties fo:margin-top="0.101cm" fo:margin-bottom="0cm" style:contextual-spacing="false"/>
      <style:text-properties fo:font-weight="normal" officeooo:paragraph-rsid="0014c661" style:font-weight-asian="normal" style:font-weight-complex="normal"/>
    </style:style>
    <style:style style:name="P3" style:family="paragraph" style:parent-style-name="Heading_20_1">
      <style:paragraph-properties fo:break-before="page"/>
    </style:style>
    <style:style style:name="P4" style:family="paragraph" style:parent-style-name="Standard">
      <style:paragraph-properties fo:margin-top="0.101cm" fo:margin-bottom="0cm" style:contextual-spacing="false"/>
      <style:text-properties officeooo:paragraph-rsid="0014c661"/>
    </style:style>
    <style:style style:name="P5" style:family="paragraph" style:parent-style-name="Standard">
      <style:paragraph-properties fo:margin-top="0.101cm" fo:margin-bottom="0cm" style:contextual-spacing="false"/>
      <style:text-properties officeooo:paragraph-rsid="0016deed"/>
    </style:style>
    <style:style style:name="T1" style:family="text">
      <style:text-properties fo:font-weight="normal" style:font-weight-asian="normal" style:font-weight-complex="normal"/>
    </style:style>
    <style:style style:name="T2" style:family="text">
      <style:text-properties fo:font-weight="normal" officeooo:rsid="0017d197" style:font-weight-asian="normal" style:font-weight-complex="normal"/>
    </style:style>
    <style:style style:name="T3" style:family="text">
      <style:text-properties officeooo:rsid="00107345"/>
    </style:style>
    <style:style style:name="T4" style:family="text">
      <style:text-properties officeooo:rsid="0017d1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La logica di Aristotele</text:h>
      <text:p text:style-name="P1">Aristotele è considerato l'inventore della logica.</text:p>
      <text:p text:style-name="Standard">Bertrand Russell, rilevava che la parola “logica” non è da attribuire ad Aristotele perché fu coniata più tardi dagli stoici, concepita come studio scientifico del pensiero che si manifesta nel linguaggio “lógos”, inteso nei suoi elementi, “termini”, “proposizioni” e “argomentazioni”, che ne regolano l'uso.</text:p>
      <text:p text:style-name="Standard">In continuità con Parmenide e Platone, Aristotele presuppone una piena corrispondenza fra pensiero e realtà, per cui la sua riflessione sul linguaggio, naturalmente in contatto con le cose, è anche una riflessione sulle diverse forme dell'esperienza.</text:p>
      <text:p text:style-name="Standard">La logica era la madre di tutte le scienze ed era essenziale per tutte le altre discipline, poiché forniva i principi fondamentali per il corretto ragionamento. La logica includeva sia l’analitica che studiava le forme del ragionamento (analitica, perché si concentra sull'analisi degli elementi costitutivi del ragionamento, per poi arrivare alla risoluzione del problema) sia la dialettica che studiava l’arte del ragionamento.</text:p>
      <text:p text:style-name="Standard">L'analitica aristotelica si concentrava sui sillogismi, un tipo di ragionamento deduttivo in cui una conclusione era derivata da due premesse. Aristotele identificò tre tipi di sillogismi validi: “il sillogismo categorico”, “il sillogismo modale” e “il sillogismo ipotetico-deduttivo”.</text:p>
      <text:p text:style-name="P4">Il sillogismo categorico è valido se, e solo se, le premesse sono vere, e se la conclusione segue<text:span text:style-name="T1"> </text:span><text:soft-page-break/>necessariamente dalle premesse. Esempio della prima premessa - tutti gli uomini sono mortali (universale affermativa). Esempio seconda premessa - Socrate è un uomo (universale particolare). Conclusione: Socrate è mortale. (universale particolare).</text:p>
      <text:p text:style-name="Standard">Il sillogismo modale è un sillogismo in cui una o entrambe le premesse contengono un termine modale. Un termine modale è un termine che esprime una modalità, come la necessità, la possibilità o l'impossibilità. Esempio prima premessa - È necessario che tutti gli uomini siano mortali (necessario universale). Seconda premessa - Socrate è un uomo (universale particolare).</text:p>
      <text:p text:style-name="Standard">Conclusione: È necessario che Socrate sia mortale (necessario particolare).</text:p>
      <text:p text:style-name="P2">Sillogismo ipotetico deduttivo è un sillogismo in cui una o entrambe le premesse sono ipotetic<text:span text:style-name="T3">he</text:span>. Un'ipotesi è una proposizione che afferma che qualcosa è vero o falso, a seconda del fatto che qualcosa di diverso sia vero o falso. Un esempio: <text:span text:style-name="T3">Prima p</text:span>remessa - Se piove, le strade saranno bagnate (ipotetica affermativa). <text:span text:style-name="T3">Seconda p</text:span>remessa - Sta piovendo (universale particolare).</text:p>
      <text:p text:style-name="P5"><text:span text:style-name="T1">Conclusione: Le strade sono bagnate (universale particolare).</text:span></text:p>
      <text:p text:style-name="P5"><text:span text:style-name="Strong_20_Emphasis"><text:span text:style-name="T1">I ragionamenti consistono di premesse e conclusioni; ma premesse e conclusioni sono giudizi e proposizioni, e le proposizioni rimandano a termini che stanno per concetti. I concetti sono però riferibili al mondo, e quindi i termini del discorso sono riconducibili alle </text:span></text:span><text:soft-page-break/><text:span text:style-name="Strong_20_Emphasis"><text:span text:style-name="T1">cose; i termini sono perciò i costituenti e del pensiero e della realtà.</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5T17:42:15.158494688</meta:creation-date>
    <dc:date>2026-07-19T11:49:33.006286139</dc:date>
    <dc:creator>corrado tafaro</dc:creator>
    <meta:editing-duration>PT43M32S</meta:editing-duration>
    <meta:editing-cycles>11</meta:editing-cycles>
    <meta:generator>LibreOffice/24.2.7.2$Linux_X86_64 LibreOffice_project/420$Build-2</meta:generator>
    <meta:document-statistic meta:table-count="0" meta:image-count="0" meta:object-count="0" meta:page-count="3" meta:paragraph-count="12" meta:word-count="424" meta:character-count="2916" meta:non-whitespace-character-count="2504"/>
  </office:meta>
</office:document-meta>
</file>