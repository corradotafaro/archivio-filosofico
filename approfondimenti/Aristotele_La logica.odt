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normal" officeooo:paragraph-rsid="0010106c" style:font-weight-asian="normal" style:font-weight-complex="normal"/>
    </style:style>
    <style:style style:name="P2" style:family="paragraph" style:parent-style-name="Standard">
      <style:paragraph-properties fo:margin-top="0.101cm" fo:margin-bottom="0cm" style:contextual-spacing="false"/>
      <style:text-properties fo:font-weight="normal" officeooo:paragraph-rsid="0014c661" style:font-weight-asian="normal" style:font-weight-complex="normal"/>
    </style:style>
    <style:style style:name="P3" style:family="paragraph" style:parent-style-name="Standard">
      <style:text-properties fo:font-weight="normal" officeooo:paragraph-rsid="0014c661" style:font-weight-asian="normal" style:font-weight-complex="normal"/>
    </style:style>
    <style:style style:name="P4" style:family="paragraph" style:parent-style-name="Standard">
      <style:paragraph-properties fo:margin-top="0.101cm" fo:margin-bottom="0cm" style:contextual-spacing="false"/>
    </style:style>
    <style:style style:name="P5" style:family="paragraph" style:parent-style-name="Standard">
      <style:text-properties officeooo:paragraph-rsid="0014c661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paragraph-properties fo:margin-top="0.101cm" fo:margin-bottom="0cm" style:contextual-spacing="false"/>
      <style:text-properties officeooo:paragraph-rsid="0016dee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07345"/>
    </style:style>
    <style:style style:name="T3" style:family="text">
      <style:text-properties officeooo:rsid="00150657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La logica di Aristotele</text:h>
      <text:p text:style-name="P1">Aristotele è considerato l'inventore della logica.</text:p>
      <text:p text:style-name="P5">Bertrand Russell, rilevava che la parola “logica” non è da attribuire ad Aristotele perché fu coniata più tardi dagli stoici, concepita come studio scientifico del pensiero che si manifesta nel linguaggio “lógos”, inteso nei suoi elementi, “termini”, “proposizioni” e “argomentazioni”, che ne regolano l'uso.</text:p>
      <text:p text:style-name="Standard">In continuità con Parmenide e Platone, Aristotele presuppone una piena corrispondenza fra pensiero e realtà, per cui la sua riflessione sul linguaggio, naturalmente in contatto con le cose, è anche una riflessione sulle diverse forme dell'esperienza.</text:p>
      <text:p text:style-name="P4">La logica era la madre di tutte le scienze ed era essenziale per tutte le altre discipline, poiché forniva i principi fondamentali per il corretto ragionamento. La logica includeva sia l’analitica che studiava le forme del ragionamento <text:span text:style-name="T3">(</text:span>analitica, perché si concentra sull'analisi degli elementi costitutivi del ragionamento, per poi arrivare alla risoluzione del problema<text:span text:style-name="T3">)</text:span> sia la dialettica che studiava l’arte del ragionamento.</text:p>
      <text:p text:style-name="P4">L'analitica aristotelica si concentrava sui sillogismi, un tipo di ragionamento deduttivo in cui una conclusione era derivata da due premesse. Aristotele identificò tre tipi di sillogismi validi: “il sillogismo categorico”, “il sillogismo modale” e “il sillogismo ipotetico-deduttivo”.</text:p>
      <text:p text:style-name="P2"><text:soft-page-break/>Il sillogismo categorico è valido se, e solo se, le premesse sono vere, e se la conclusione segue necessariamente dalle premesse. Un esempio: <text:span text:style-name="T2">Prima p</text:span>remessa - <text:span text:style-name="T2">t</text:span>utti gli uomini sono mortali <text:span text:style-name="T2">(</text:span>universale affermativa<text:span text:style-name="T2">). Seconda p</text:span>remessa - Socrate è un uomo <text:span text:style-name="T2">(</text:span>universale particolare<text:span text:style-name="T2">)</text:span>. Conclusione: Socrate è mortale. (universale particolare<text:span text:style-name="T2">)</text:span>.</text:p>
      <text:p text:style-name="P2">Il sillogismo modale è un sillogismo in cui una o entrambe le premesse contengono un termine modale. Un termine modale è un termine che esprime una modalità, come la necessità, la possibilità o l'impossibilità. Un esempio: <text:span text:style-name="T2">Prima p</text:span>remessa - È necessario che tutti gli uomini siano mortali <text:span text:style-name="T2">(</text:span>necessario universale). <text:span text:style-name="T2">Seconda p</text:span>remessa - Socrate è un uomo (universale particolare).</text:p>
      <text:p text:style-name="P3">Conclusione: È necessario che Socrate sia mortale (necessario particolare).</text:p>
      <text:p text:style-name="P2">Sillogismo ipotetico-deduttivo è un sillogismo in cui una o entrambe le premesse sono ipotetic<text:span text:style-name="T2">he</text:span>. Un'ipotesi è una proposizione che afferma che qualcosa è vero o falso, a seconda del fatto che qualcosa di diverso sia vero o falso. Un esempio: <text:span text:style-name="T2">Prima p</text:span>remessa - Se piove, le strade saranno bagnate (ipotetica affermativa). <text:span text:style-name="T2">Seconda p</text:span>remessa - Sta piovendo (universale particolare).</text:p>
      <text:p text:style-name="P7"><text:span text:style-name="T1">Conclusione: Le strade sono bagnate (universale particolare).</text:span></text:p>
      <text:p text:style-name="P7"><text:span text:style-name="Strong_20_Emphasis"><text:span text:style-name="T1">I ragionamenti consistono di premesse e conclusioni; ma premesse e conclusioni sono giudizi e proposizioni, e le proposizioni rimandano a termini che stanno per concetti. I concetti sono però riferibili al mondo, e </text:span></text:span><text:soft-page-break/><text:span text:style-name="Strong_20_Emphasis"><text:span text:style-name="T1">quindi i termini del discorso sono riconducibili alle cose; i termini sono perciò i costituenti e del pensiero e della realtà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5T17:42:15.158494688</meta:creation-date>
    <dc:date>2026-07-19T11:31:51.614080215</dc:date>
    <dc:creator>corrado tafaro</dc:creator>
    <meta:editing-duration>PT25M51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3" meta:paragraph-count="12" meta:word-count="423" meta:character-count="2910" meta:non-whitespace-character-count="2499"/>
  </office:meta>
</office:document-meta>
</file>