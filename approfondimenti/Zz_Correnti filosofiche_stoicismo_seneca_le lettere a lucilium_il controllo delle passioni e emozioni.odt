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a709"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0ea709" style:font-size-asian="12pt" style:font-style-asian="normal" style:font-weight-asian="normal" style:font-size-complex="12pt" style:font-style-complex="normal" style:font-weight-complex="normal"/>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1c02ae" officeooo:paragraph-rsid="000ea709" style:font-size-asian="12pt" style:font-style-asian="normal" style:font-size-complex="12pt" style:font-style-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paragraph-rsid="000ea709"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00%" fo:text-align="center" style:justify-single-word="false"/>
      <style:text-properties fo:font-size="9pt" officeooo:paragraph-rsid="0011d62e" style:font-size-asian="9pt" style:font-size-complex="9pt"/>
    </style:style>
    <style:style style:name="P7" style:family="paragraph" style:parent-style-name="Text_20_body">
      <style:paragraph-properties fo:line-height="100%" fo:text-align="justify" style:justify-single-word="false"/>
      <style:text-properties fo:font-size="9pt" style:font-size-asian="9pt" style:font-size-complex="9pt"/>
    </style:style>
    <style:style style:name="P8" style:family="paragraph" style:parent-style-name="Text_20_body">
      <style:paragraph-properties fo:margin-top="0cm" fo:margin-bottom="0cm" style:contextual-spacing="false" fo:line-height="100%" fo:text-align="justify" style:justify-single-word="false"/>
      <style:text-properties fo:font-size="9pt" style:font-size-asian="9pt" style:font-size-complex="9pt"/>
    </style:style>
    <style:style style:name="P9" style:family="paragraph" style:parent-style-name="Text_20_body">
      <style:paragraph-properties fo:margin-top="0.101cm" fo:margin-bottom="0cm" style:contextual-spacing="false" fo:line-height="100%" fo:text-align="justify" style:justify-single-word="false"/>
    </style:style>
    <style:style style:name="P10" style:family="paragraph" style:parent-style-name="Heading_20_2">
      <style:text-properties style:font-name="Noto Sans1" fo:font-size="12pt" officeooo:paragraph-rsid="0013d0ee" style:font-size-asian="12pt" style:font-size-complex="12pt"/>
    </style:style>
    <style:style style:name="P11" style:family="paragraph" style:parent-style-name="Heading_20_3">
      <style:paragraph-properties fo:line-height="115%" fo:text-align="justify" style:justify-single-word="false"/>
      <style:text-properties style:font-name="Noto Sans1" fo:font-size="12pt" officeooo:paragraph-rsid="000ea709" style:font-size-asian="12pt" style:font-size-complex="12pt"/>
    </style:style>
    <style:style style:name="P12" style:family="paragraph" style:parent-style-name="Heading_20_3">
      <style:text-properties style:font-name="Noto Sans1" fo:font-size="12pt" officeooo:paragraph-rsid="0013d0ee" style:font-size-asian="12pt" style:font-size-complex="12pt"/>
    </style:style>
    <style:style style:name="P13" style:family="paragraph" style:parent-style-name="Heading_20_3">
      <style:paragraph-properties fo:margin-top="0.199cm" fo:margin-bottom="0cm" style:contextual-spacing="false"/>
      <style:text-properties style:font-name="Noto Sans1" fo:font-size="12pt" officeooo:paragraph-rsid="0013d0ee" style:font-size-asian="12pt" style:font-size-complex="12pt"/>
    </style:style>
    <style:style style:name="P14"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3d0ee" style:font-size-asian="12pt" style:font-size-complex="12pt"/>
    </style:style>
    <style:style style:name="P15"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d0ee" style:font-size-asian="12pt" style:font-size-complex="12pt"/>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d0ee" style:font-size-asian="12pt" style:font-size-complex="12pt"/>
    </style:style>
    <style:style style:name="P1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d0ee" style:font-size-asian="12pt" style:font-size-complex="12pt"/>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rsid="001c02ae" officeooo:paragraph-rsid="0013d0ee" style:font-size-asian="12pt" style:font-style-asian="normal" style:font-size-complex="12pt" style:font-style-complex="normal"/>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20"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4370ad" officeooo:paragraph-rsid="0013d0ee"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370ad" officeooo:paragraph-rsid="0013d0ee" style:font-size-asian="12pt" style:font-weight-asian="normal" style:font-size-complex="12pt" style:font-weight-complex="normal"/>
    </style:style>
    <style:style style:name="P26" style:family="paragraph" style:parent-style-name="Standard">
      <style:paragraph-properties fo:margin-top="0.101cm" fo:margin-bottom="0cm" style:contextual-spacing="false" fo:line-height="115%" fo:text-align="center" style:justify-single-word="false"/>
      <style:text-properties style:font-name="Noto Sans1" fo:font-size="12pt" fo:font-weight="normal" officeooo:rsid="004370ad" officeooo:paragraph-rsid="0013d0ee" style:font-size-asian="12pt" style:font-weight-asian="normal" style:font-size-complex="12pt" style:font-weight-complex="normal"/>
    </style:style>
    <style:style style:name="T1" style:family="text">
      <style:text-properties style:font-name="Noto Sans1" fo:font-size="12pt" fo:font-style="normal" fo:font-weight="normal" officeooo:rsid="001c02ae" style:font-size-asian="12pt" style:font-style-asian="normal" style:font-weight-asian="normal" style:font-size-complex="12pt" style:font-style-complex="normal" style:font-weight-complex="normal"/>
    </style:style>
    <style:style style:name="T2" style:family="text">
      <style:text-properties style:font-name="Noto Sans1" fo:font-size="12pt" fo:font-style="italic" fo:font-weight="normal" officeooo:rsid="001c02ae" style:font-size-asian="12pt" style:font-style-asian="italic" style:font-weight-asian="normal" style:font-size-complex="12pt"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28aa31" style:font-style-asian="normal" style:font-style-complex="normal"/>
    </style:style>
    <style:style style:name="T5" style:family="text">
      <style:text-properties fo:font-style="normal" officeooo:rsid="001c02ae" style:font-style-asian="normal" style:font-style-complex="normal"/>
    </style:style>
    <style:style style:name="T6" style:family="text">
      <style:text-properties fo:font-style="normal" officeooo:rsid="00336864" style:font-style-asian="normal" style:font-style-complex="normal"/>
    </style:style>
    <style:style style:name="T7" style:family="text">
      <style:text-properties fo:font-style="normal" fo:font-weight="normal" officeooo:rsid="001c02ae" style:font-style-asian="normal" style:font-weight-asian="normal" style:font-style-complex="normal" style:font-weight-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normal" officeooo:rsid="001c02ae" style:font-style-asian="italic" style:font-weight-asian="normal" style:font-style-complex="italic" style:font-weight-complex="normal"/>
    </style:style>
    <style:style style:name="T11" style:family="text">
      <style:text-properties officeooo:rsid="0029c3ce"/>
    </style:style>
    <style:style style:name="T12" style:family="text">
      <style:text-properties officeooo:rsid="01d5c377"/>
    </style:style>
    <style:style style:name="T13" style:family="text">
      <style:text-properties officeooo:rsid="01d9d0ee"/>
    </style:style>
    <style:style style:name="T14" style:family="text">
      <style:text-properties style:use-window-font-color="true" loext:opacity="0%" fo:background-color="transparent" loext:char-shading-value="0"/>
    </style:style>
    <style:style style:name="T15" style:family="text">
      <style:text-properties fo:font-weight="bold"/>
    </style:style>
    <style:style style:name="T16" style:family="text">
      <style:text-properties fo:font-size="9pt" style:font-size-asian="9pt" style:font-size-complex="9pt"/>
    </style:style>
    <style:style style:name="T17" style:family="text">
      <style:text-properties fo:font-size="9pt" officeooo:rsid="0011d62e" style:font-size-asian="9pt" style:font-size-complex="9pt"/>
    </style:style>
    <style:style style:name="T18" style:family="text">
      <style:text-properties fo:language="it" fo:country="IT" fo:font-style="normal" officeooo:rsid="001c02ae" style:font-style-asian="normal" style:font-style-complex="normal"/>
    </style:style>
    <style:style style:name="T19" style:family="text">
      <style:text-properties officeooo:rsid="00876cd0"/>
    </style:style>
    <style:style style:name="T20" style:family="text">
      <style:text-properties officeooo:rsid="0045001f"/>
    </style:style>
    <style:style style:name="T21" style:family="text">
      <style:text-properties officeooo:rsid="00474f5e"/>
    </style:style>
    <style:style style:name="T22"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23" style:family="text">
      <style:text-properties fo:font-size="12pt" fo:font-style="italic" fo:font-weight="normal" officeooo:rsid="001c02ae"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text:bookmark-start text:name="__RefHeading___Toc18174_3602757520"/>Il controllo delle passioni e delle emozioni<text:bookmark-end text:name="__RefHeading___Toc18174_3602757520"/></text:h>
      <text:p text:style-name="P14"><text:span text:style-name="T18">Seneca ci invita a controllare le nostre emozioni e passioni, poiché solo attraverso il dominio di noi stessi possiamo raggiungere la serenità e la pace interiore.</text:span></text:p>
      <text:h text:style-name="P12" text:outline-level="3"><text:bookmark-start text:name="__RefHeading___Toc18176_3602757520"/><text:span text:style-name="T19">L</text:span>ettera 10<text:bookmark-end text:name="__RefHeading___Toc18176_3602757520"/></text:h>
      <text:p text:style-name="P16">È così , non cambio parere: evita la massa, evita i pochi, evita anche il singolo. Non conosco nessuno con cui vorrei che tu avessi rapporti. Vedi come ti stimo: oso affidarti a te stesso. Cratete, raccontano, discepolo proprio di quello Stilbone che ho nominato nella lettera precedente, vedendo un ragazzo che passeggiava in disparte, gli chiese che cosa facesse lì da solo. "Parlo con me stesso," fu la risposta. E Cratete replicò: "<text:span text:style-name="T9">Mi raccomando, fa' molta attenzione, stai parlando con un cattivo individuo.</text:span>" Solitamente teniamo d'occhio chi è in preda al dolore e alla paura perché non faccia cattivo uso della solitudine. Se uno è dissennato non deve essere lasciato a se stesso; ora rimugina cattivi propositi, prepara pericoli a sé o agli altri, seconda turpi passioni; ora manifesta tutti quei sentimenti che nascondeva per timore o per vergogna, acuisce la sua audacia, eccita la libidine, fomenta l'ira. Infine, l'unico vantaggio della solitudine, cioè non confidare niente a nessuno, non temere spie, manca agli sciocchi: si tradiscono da soli.</text:p>
      <text:p text:style-name="P17"><text:soft-page-break/>Vedi, dunque, quali speranze nutro su di te; anzi, poiché la speranza indica un bene incerto, vedi che cosa mi riprometto: non c'è nessuno con cui vorrei che tu avessi rapporti piuttosto che con te stesso. Ripenso alle parole magnanime e vigorose da te pronunciate: mi sono subito rallegrato con me stesso e ho detto: "<text:span text:style-name="T9">Queste frasi nascono dal cuore, non dalle labbra; costui non è uno dei tanti, mira al bene.</text:span>" Parla così , vivi così : bada che niente possa abbatterti. Sii pure grato agli dèi per avere esaudito i tuoi voti di un tempo, formulane altri nuovi: chiedi l'integrità della mente, la salute dell'anima e poi del corpo. Perché non dovresti formulare spesso questi voti? Prega dio con coraggio: non è tua intenzione chiedergli nulla che appartenga ad altri.</text:p>
      <text:p text:style-name="P17">Ma per mandarti come al solito la lettera con un piccolo dono, ecco quello che ho trovato in Atenodoro e che secondo me corrisponde a verità: </text:p>
      <text:p text:style-name="P15">"<text:span text:style-name="T9">Sappi che sarai libero da ogni passione, quando arriverai al punto di chiedere a dio solo ciò che puoi chiedere davanti a tutti.</text:span>"</text:p>
      <text:p text:style-name="P18">E invece come sono privi di senno gli uomini! Rivolgono sottovoce a dio le preghiere più turpi; se qualcuno li ascolta, tacciono, e quello che non vogliono che gli uomini sappiano lo raccontano a dio. Vedi, dunque, se non è utile questo insegnamento: vivi in mezzo agli <text:soft-page-break/>uomini come se dio ti vedesse e parla con lui come se gli uomini ti udissero. Stammi bene.</text:p>
      <text:h text:style-name="P13" text:outline-level="3"><text:bookmark-start text:name="__RefHeading___Toc18178_3602757520"/>Lettera 59<text:bookmark-end text:name="__RefHeading___Toc18178_3602757520"/></text:h>
      <text:p text:style-name="P21">La tua lettera mi ha fatto molto piacere; permettimi di usare le parole nel significato comune e non rifarti a quello degli Stoici. Per noi il piacere è un vizio. Sia pure; tuttavia di solito usiamo questo termine per indicare uno stato d'animo gioioso. Sì , lo so che il piacere, se ci rifacciamo al vocabolario stoico, è una cosa infame e che la gioia può toccare solo al saggio; infatti è l'elevazione dell'anima fiduciosa in quello che ha in sé di buono e di vero. Abitualmente, tuttavia, diciamo di aver provato una grande gioia per l'elezione a console di un amico, o per le sue nozze, o perché la moglie ha partorito, tutti avvenimenti che non sono gioia, ma spesso inizio di sofferenze future; e, invece, è una caratteristica della gioia non finire e non mutarsi in dolore. Perciò quando il nostro Virgilio scrive:</text:p>
      <text:p text:style-name="P26"><text:span text:style-name="T9">le malvagie gioie dello spirito</text:span>,</text:p>
      <text:p text:style-name="P20">si esprime con eleganza, ma con poca proprietà: non esiste gioia malvagia. Egli ha dato questo nome ai piaceri e ha espresso con chiarezza il suo pensiero; indica gli uomini contenti del proprio male. Tuttavia non ho sbagliato a dire che la tua lettera mi ha fatto molto piacere; infatti, anche se è onesto il motivo per cui un uomo ignorante gioisce, quel sentimento che egli non sa <text:soft-page-break/>dominare e che inclina subito al suo opposto, lo chiamo piacere: nasce dall'opinione di un falso bene e non ha moderazione, né misura. Ma per tornare al tema del discorso, senti che cosa mi ha fatto piacere nella tua lettera: domini le parole, e non ti lasci trasportare dalla foga del discorso oltre i termini stabiliti. Il fascino di qualche bel vocabolo induce molti autori a scrivere anche cose che non si erano proposti; questo a te non succede: tutto è stringato e attinente all'argomento; esponi le tue idee e lasci intendere più di quanto dici. Questo è indice di un fatto più importante: è chiaro che anche nel tuo animo non c'è niente di superfluo, di eccessivo.</text:p>
      <text:p text:style-name="P23">Trovo, però metafore ardite, anche se non al punto di essere pericolose; trovo immagini che, secondo alcuni, non dovremmo usare perché lecite solo ai poeti. Costoro, credo, non hanno letto nessuno degli antichi scrittori, che non ricercavano ancora gli applausi coi loro discorsi; essi parlavano con semplicità per dimostrare un concetto e facevano largo uso di similitudini; io le ritengo necessarie non per lo stesso motivo per cui sono necessarie ai poeti, ma come sostegno alla nostra debolezza per favorire la concentrazione di chi parla e di chi ascolta sull'argomento trattato.</text:p>
      <text:p text:style-name="P23">Ecco, ora sto leggendo Sestio, uomo acuto che scrive di filosofia in greco, basandosi sulla morale romana. Mi ha colpito questa sua immagine: un esercito avanza a <text:soft-page-break/>colonne affiancate, pronto al combattimento, quando si teme da ogni parte un attacco nemico. "<text:span text:style-name="T9">Lo stesso</text:span>," dice, "<text:span text:style-name="T9">deve fare il saggio: spieghi in ogni direzione tutte le sue virtù e dovunque si manifesti un pericolo, là siano pronte le difese e rispondano al cenno del comandante senza creare scompiglio.</text:span>"</text:p>
      <text:p text:style-name="P23">Negli eserciti guidati da grandi condottieri, noi vediamo che tutte le truppe sentono nello stesso momento l'ordine del comandante e sono disposte in modo che il segnale dato da un solo uomo arrivi simultaneamente alla fanteria e alla cavalleria; Sestio afferma che questa tattica è ancora più necessaria per noi.</text:p>
      <text:p text:style-name="P23">I soldati spesso temono il nemico senza motivo, ma poi la marcia che li spaventava tanto non presenta nessun pericolo: l'uomo insensato non è mai tranquillo; i motivi di paura gli vengono dall'alto e dal basso, da destra e da sinistra; i pericoli gli si parano davanti e lo seguono. Trepida di fronte a tutto, è colto sempre di sorpresa e l'atterriscono i suoi stessi soccorritori. Il saggio, invece, è premunito e pronto a ogni attacco; non indietreggerà se la povertà, i lutti, il disonore, il dolore lo assalgono: avanzerà imperterrito contro di essi e in mezzo ad essi. </text:p>
      <text:p text:style-name="P20">Sono molte le cose che ci vincolano e ci indeboliscono. A lungo ci siamo crogiolati nei vizi ed è difficile far piazza pulita: non ci siamo solo insozzati, ma addirittura infettati. Per non passare da una similitudine all'altra, ti <text:soft-page-break/>chiederò una cosa su cui spesso rifletto: perché la stupidità ci domina con tanta ostinazione?</text:p>
      <text:p text:style-name="P24">Punto primo: non la respingiamo con forza e non tendiamo con slancio alla salvezza; punto secondo: non abbiamo sufficiente fiducia nelle verità scoperte dai saggi, non le accogliamo nel profondo del cuore e ci dedichiamo con scarso impegno a una questione tanto importante. Come può imparare quanto serve per combattere i vizi chi si applica nei ritagli di tempo che i vizi gli lasciano?</text:p>
      <text:p text:style-name="P23">Nessuno di noi va a fondo; cogliamo solo quanto è in superficie e i pochi minuti spesi per la filosofia bastano e avanzano per gente tanto affaccendata. L'ostacolo maggiore è che siamo subito soddisfatti di noi stessi; se c'è qualcuno che ci definisce valenti, saggi, virtuosi, gli <text:span text:style-name="T20">d</text:span>iamo immediatamente credito. Non ci accontentiamo di lodi misurate: accogliamo come dovuto il cumulo di spudorate adulazioni che ci vengono rivolte. Concordiamo con chi afferma che siamo gli uomini più virtuosi e saggi, pur sapendo che quelle persone mentono spesso e volentieri; siamo così indulgenti con noi stessi perché vogliamo essere lodati per virtù esattamente opposte al nostro modo di agire. </text:p>
      <text:p text:style-name="P23">Il carnefice - proprio mentre tortura - si sente definire l'uomo più mite, chi vive di ruberie l'uomo più generoso, il libertino ubriacone l'uomo più temperante; di <text:soft-page-break/>conseguenza non vogliamo correggerci perché ci crediamo perfetti.</text:p>
      <text:p text:style-name="P24">Alessandro attraversava ormai l'India e combatteva devastando i territori di genti poco note anche agli stessi popoli confinanti. Durante l'assedio di una città, mentre faceva il giro delle mura per individuarne i punti più deboli, fu colpito da una freccia; tuttavia rimase a lungo a cavallo e continuò la sua ricognizione. Ma poi il sangue, coagulatosi nella ferita, rese più acuto il dolore, e la gamba, che penzolava dal cavallo, si era a poco a poco intorpidita. Costretto a desistere, disse: "<text:span text:style-name="T9">Tutti giurano che sono figlio di Giove, ma questa ferita grida che sono un uomo.</text:span>" Seguiamo anche noi il suo esempio. Ciascuno, in misura diversa, si lascia infatuare dall'adulazione; diciamo: "<text:span text:style-name="T9">Voi sostenete che sono saggio, ma io mi rendo conto di avere molti desideri inutili e dannosi. Non capisco nemmeno quello che la sazietà mostra agli animali: quale misura ci debba essere nel mangiare e nel bere; non conosco ancora la capacità del mio stomaco.</text:span>"</text:p>
      <text:p text:style-name="P23">Ti insegnerò come tu possa renderti conto di non essere saggio. Il saggio è pieno di gioia, allegro e sereno, imperturbabile; la sua vita è pari a quella degli dèi. E ora esamina te stesso: se non sei mai triste, se nessuna speranza ti fa trepidare in attesa del futuro, se notte e giorno il tuo spirito fiero e soddisfatto di sé mantiene un atteggiamento stabile e sempre uguale, hai toccato il <text:soft-page-break/>culmine dell'umano bene; ma se cerchi dovunque ogni genere di piaceri, sappi che ti mancano ugualmente saggezza e gioia. Vuoi raggiungerla, ma sbagli se speri di arrivarci tra le ricchezze e gli onori: cerchi cioè la gioia tra gli affanni: i falsi beni, cui aspiri convinto che ti daranno contentezza e piacere, sono causa di dolori. Tutti, lo ribadisco, tendono alla gioia, ma ignorano dove sia possibile trovarne una duratura e intensa: c'è chi la cerca nei banchetti e nell'intemperanza, chi nell'ambizione e nella folla dei clienti che gli si accalcano intorno, chi nell'amante, chi poi nella vana ostentazione delle scienze liberali e negli studi letterari che non giovano a niente; tutti costoro si lasciano ingannare da piaceri fallaci e di breve durata, come l'ubriachezza che fa scontare l'allegra pazzia di un'ora con un lungo malessere, come gli applausi e il favore della folla acclamante che si ottiene e si paga a prezzo di gravi preoccupazioni.</text:p>
      <text:p text:style-name="P23">Riflettici; questo è il risultato della saggezza: una gioia stabile. L'animo del saggio è come il mondo sulla luna: là c'è sempre il sereno. Hai, dunque, un valido motivo per desiderare la saggezza: una gioia perpetua. Questa gioia nasce unicamente dalla coscienza delle proprie virtù: può gioire solo l'uomo forte, giusto, temperante. "<text:span text:style-name="T9">E allora?</text:span>" chiedi. "<text:span text:style-name="T9">Gli stolti e i malvagi non provano gioia?</text:span>" Non più dei leoni che conquistano la preda. Quando sono stanchi di vino e di orge, quando hanno passato la notte negli stravizi, quando i piaceri accumulati smisuratamente nel <text:soft-page-break/>corpo cominciano a farlo marcire, allora, infelici, gridano quel famoso verso virgiliano: <text:span text:style-name="T9">Tu sai come abbiamo trascorso l'ultima notte tra false gioie. </text:span><text:span text:style-name="T5">I lussuriosi passano ogni notte tra false gioie e come se fosse l'ultima: ma quella gioia che tocca agli dèi e a chi li emula è continua, senza fine; finirebbe, se derivasse da altri. Ma poiché non è un dono di altri, non è soggetta all'arbitrio altrui: la sorte non può strappare ciò che non ci ha dato. Stammi bene.</text:span></text:p>
      <text:h text:style-name="P13" text:outline-level="3"><text:bookmark-start text:name="__RefHeading___Toc18180_3602757520"/>Lettera 75<text:bookmark-end text:name="__RefHeading___Toc18180_3602757520"/></text:h>
      <text:p text:style-name="P21">Ti lamenti perché ti invio lettere scritte con minore ricercatezza. Ma con ricercatezza si esprime solo chi vuole essere manierato. Io voglio, invece, che le mie lettere siano quali sarebbero le mie parole se sedessimo o passeggiassimo insieme: semplici e chiare; non voglio che abbiano niente di artificioso o di falso. <text:span text:style-name="T21">S</text:span>e fosse possibile, preferirei mostrarti più che esprimerti i miei sentimenti. Anche se discutessi, non batterei i piedi e nemmeno agiterei le mani o alzerei la voce, ma lascerei tutti questi artifici agli oratori, accontentandomi di esternarti i miei sentimenti senza fronzoli o sciatterie. Un'unica cosa vorrei mostrarti chiaramente: che sento in me tutto quello che dico e non solo lo sento, ma lo amo. </text:p>
      <text:p text:style-name="P23">Gli uomini baciano l'amante in modo diverso che i figli, ma anche in questo abbraccio così puro e misurato l'affetto è abbastanza evidente. Non voglio, perbacco, <text:soft-page-break/>che si usi un linguaggio arido e scarno per argomenti tanto importanti: la filosofia non rinunzia all'elaborazione formale; non conviene, però sprecare fatica per le parole.</text:p>
      <text:p text:style-name="P23">Il nostro principale proposito deve essere di dire quello che sentiamo e di sentire quello che diciamo; vita e parole devono essere coerenti. Mantiene il suo impegno chi è sempre lo stesso a parole e a fatti. Vedremo le sue qualità e la sua grandezza: è il medesimo. Le nostre parole non devono essere piacevoli, ma utili. E tuttavia, se l'eloquenza scaturisce senza sforzo, facile o spontanea, ben venga e tratti argomenti di grande rilievo: ma evidenzi la sostanza, non se stessa.</text:p>
      <text:p text:style-name="P23">Le altre arti riguardano interamente la mente, qui è in gioco la salvezza dell'anima. L'ammalato non cerca un medico eloquente, ma se gli capita un uomo che possa guarirlo e che nello stesso tempo parli forbitamente delle cure necessarie, ne sarà contento. Non c'è, tuttavia, motivo di rallegrarsi per aver incontrato un medico tanto eloquente; è come se un esperto pilota fosse anche bello. Perché solletichi le mie orecchie? Perché le blandisci? Ben altro è in gioco: devo essere cauterizzato, operato, messo a dieta. Questo è il tuo compito: devi curare una malattia di vecchia data, grave, diffusa; hai da fare quanto un medico in una epidemia. </text:p>
      <text:p text:style-name="P19">Ti preoccupi delle parole? Rallegrati se riesci a fare quello che devi. Quando imparerai tante cose? Quando <text:soft-page-break/>fisserai le nozioni che hai appreso in modo da non dimenticarle più? Quando le metterai in pratica? Non basta, come le altre, ricordarle a memoria: bisogna sperimentarle in concreto; non è felice chi le conosce, ma chi le applica.</text:p>
      <text:p text:style-name="P23">"<text:span text:style-name="T9">Ma come? Al di sotto del saggio non ci sono altri stadi? Subito dopo la saggezza c'è l'abisso?</text:span>" Credo di no; chi sta progredendo è ancora nel numero degli stolti, ma c'è già un notevole distacco. E anche tra quegli stessi che stanno progredendo ci sono grandi differenze: certi li dividono in tre gruppi.</text:p>
      <text:p text:style-name="P23">Primo: quelli che non possiedono ancora la saggezza, ma le sono ormai arrivati vicino; nondimeno anche ciò che è vicino è fuori. Chi sono? Quegli uomini che si sono liberati da tutte le passioni e i vizi e hanno imparato i concetti necessari, ma non hanno messo alla prova il loro impegno. Non hanno ancora dimestichezza col bene che hanno raggiunto e tuttavia non possono più cadere negli errori da cui sono fuggiti; sono ormai arrivati a un punto da dove non possono cadere all'indietro, ma questo non lo hanno ancora chiaro: ricordo di averlo scritto in una lettera: "Non sanno di sapere." Usufruiscono del loro bene, ma non ne sono ancora sicuri. Alcuni comprendono in questa classe di neofiti, di cui si è detto, quegli uomini che sono ormai sfuggiti alle malattie dell'anima, ma non alle passioni, e stanno ancora su un <text:soft-page-break/>terreno malcerto, perché solo chi si è scrollato di dosso la malvagità non corre più nessun pericolo; ma se l'è scrollata di dosso solo chi in cambio ha conquistato la saggezza.</text:p>
      <text:p text:style-name="P23">Ho già parlato spesso della differenza tra passioni e malattie dello spirito. Ma voglio ricordartela anche adesso: malattie sono i vizi radicati e tenaci come l'avarizia o l'ambizione; hanno avviluppato strettamente l'anima e sono diventati mali permanenti. Per farla breve: malattia è il pervicace proposito al male, come ricercare con accanimento beni trascurabili; o, se preferisci, concludiamo così : aspirare troppo a beni che vanno ricercati con moderazione o tralasciati del tutto, oppure apprezzare molto beni di scarso o di nessun valore.</text:p>
      <text:p text:style-name="P23">Le passioni, invece, sono i moti dell'anima riprovevoli, improvvisi e violenti, che, ripetuti e trascurati, provocano la malattia; facciamo un esempio: il catarro, quando è un'affezione momentanea ed episodica, porta la tosse, ma se è cronico e di vecchia data fa venire la tisi. Perciò chi ha fatto molti progressi è ormai fuori dal pericolo di malattie, ma nonostante sia vicino alla perfezione avverte ancora le passioni.</text:p>
      <text:p text:style-name="P23">Al secondo gruppo appartengono quegli uomini che si sono liberati dai mali peggiori dell'anima e dalle passioni, ma non al punto da essere sicuri della conquistata serenità: possono, difatti, ripiombare nei medesimi vizi.</text:p>
      <text:p text:style-name="P23"><text:soft-page-break/>Il terzo gruppo si è liberato di molti gravi vizi, ma non di tutti. È sfuggito all'avarizia, ma è ancora soggetto all'ira; non è più preda della lussuria, ma lo è ancora dell'ambizione; non ha desideri sfrenati, ma ha ancora molte paure, e nella paura di fronte a certe evenienze è abbastanza fermo, di fronte ad altre cede: disprezza la morte, teme il dolore.</text:p>
      <text:p text:style-name="P23"><text:span text:style-name="T7">Facciamo qualche riflessione su questo punto: ci va già bene se apparteniamo all'ultimo gruppo. Il secondo possiamo raggiungerlo, se abbiamo una buona predisposizione naturale e attraverso un'assidua e grande applicazione allo studio; ma non dobbiamo disprezzare nemmeno il terzo gruppo. Pensa a quanti mali vedi intorno a te; guarda quanti esempi di ogni delitto, quanto si diffonda giorno dopo giorno la malvagità, quali colpe si commettano nella sfera pubblica e privata: capirai che è già un buon risultato se non siamo tra i peggiori. "</text:span><text:span text:style-name="T10">Ma io spero</text:span><text:span text:style-name="T7">," mi dici, "</text:span><text:span text:style-name="T10">di poter far parte anche del gruppo superiore</text:span><text:span text:style-name="T7">." Più che prometterlo, io lo desidererei: siamo assaliti da ogni parte, aspiriamo alla virtù assediati dai vizi. Mi vergogno a dirlo: curiamo la virtù nei ritagli di tempo. Ma che grande premio ci aspetta se riusciamo a farla finita con le nostre occupazioni e con i mali più incalliti. Non ci colpiranno cupidigia e terrore; senza i turbamenti della paura e la corruzione dei piaceri non avremo più timore della morte e neppure degli dèi; ci renderemo conto che la morte </text:span><text:soft-page-break/><text:span text:style-name="T7">non è un male e che gli dèi non ci fanno del male. Quello che nuoce è debole quanto colui a cui nuoce: gli esseri migliori non hanno forza nociva. Se un giorno riusciremo ad arrivare da questa feccia in quel mondo sublime ed eccelso, ci aspettano la serenità e, dissipati tutti gli inganni, una libertà incondizionata. Cos'è questa libertà? Non temere gli uomini e nemmeno gli dèi: non concepire desideri turpi o sfrenati, avere un grandissimo dominio di se stessi; appartenersi è un bene inestimabile.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6:32:47.068677105</dc:date>
    <dc:creator>corrado tafaro</dc:creator>
    <meta:editing-duration>PT33M32S</meta:editing-duration>
    <meta:editing-cycles>3</meta:editing-cycles>
    <meta:generator>LibreOffice/24.2.7.2$Linux_X86_64 LibreOffice_project/420$Build-2</meta:generator>
    <meta:document-statistic meta:table-count="0" meta:image-count="0" meta:object-count="0" meta:page-count="14" meta:paragraph-count="36" meta:word-count="3079" meta:character-count="18511" meta:non-whitespace-character-count="15463"/>
  </office:meta>
</office:document-meta>
</file>