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pitch="variable"/>
  </office:font-face-decls>
  <office:automatic-styles>
    <style:style style:name="P1" style:family="paragraph" style:parent-style-name="Preformatted_20_Text">
      <style:paragraph-properties fo:margin-top="0.101cm" fo:margin-bottom="0cm" style:contextual-spacing="false" fo:line-height="115%" fo:text-align="justify" style:justify-single-word="false"/>
      <style:text-properties style:font-name="Liberation Serif" fo:font-size="14pt" officeooo:rsid="0021c758" officeooo:paragraph-rsid="00160e78" style:font-size-asian="14pt" style:font-size-complex="14pt"/>
    </style:style>
    <style:style style:name="P2" style:family="paragraph" style:parent-style-name="Preformatted_20_Text">
      <style:paragraph-properties fo:margin-top="0cm" fo:margin-bottom="0cm" style:contextual-spacing="false" fo:line-height="115%" fo:text-align="justify" style:justify-single-word="false"/>
      <style:text-properties style:font-name="Liberation Serif" fo:font-size="14pt" officeooo:rsid="0021c758" officeooo:paragraph-rsid="00160e78" style:font-size-asian="14pt" style:font-size-complex="14pt"/>
    </style:style>
    <style:style style:name="P3" style:family="paragraph" style:parent-style-name="Preformatted_20_Text">
      <style:paragraph-properties fo:line-height="115%" fo:text-align="justify" style:justify-single-word="false"/>
      <style:text-properties style:font-name="Liberation Serif" fo:font-size="14pt" officeooo:paragraph-rsid="000d9c25" style:font-size-asian="14pt" style:font-size-complex="14pt"/>
    </style:style>
    <style:style style:name="P4" style:family="paragraph" style:parent-style-name="Standard">
      <style:paragraph-properties fo:line-height="115%" fo:text-align="justify" style:justify-single-word="false"/>
      <style:text-properties style:font-name="Liberation Serif" fo:font-size="14pt" officeooo:paragraph-rsid="000d9c25" style:font-size-asian="14pt" style:font-size-complex="14pt"/>
    </style:style>
    <style:style style:name="P5"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d9c25" style:font-size-asian="14pt" style:font-size-complex="14pt"/>
    </style:style>
    <style:style style:name="P6" style:family="paragraph" style:parent-style-name="Preformatted_20_Text">
      <style:paragraph-properties fo:line-height="115%" fo:text-align="justify" style:justify-single-word="false"/>
      <style:text-properties style:font-name="Liberation Serif" fo:font-size="14pt" officeooo:paragraph-rsid="00158503" style:font-size-asian="14pt" style:font-size-complex="14pt"/>
    </style:style>
    <style:style style:name="P7" style:family="paragraph" style:parent-style-name="Preformatted_20_Text">
      <style:paragraph-properties fo:margin-top="0cm" fo:margin-bottom="0cm" style:contextual-spacing="false" fo:line-height="115%" fo:text-align="justify" style:justify-single-word="false"/>
      <style:text-properties style:font-name="Liberation Serif" fo:font-size="14pt" officeooo:paragraph-rsid="00158503" style:font-size-asian="14pt" style:font-size-complex="14pt"/>
    </style:style>
    <style:style style:name="P8" style:family="paragraph" style:parent-style-name="Preformatted_20_Text">
      <style:paragraph-properties fo:margin-top="0.101cm" fo:margin-bottom="0cm" style:contextual-spacing="false" fo:line-height="115%" fo:text-align="justify" style:justify-single-word="false"/>
      <style:text-properties style:font-name="Liberation Serif" fo:font-size="14pt" officeooo:paragraph-rsid="00160e78" style:font-size-asian="14pt" style:font-size-complex="14pt"/>
    </style:style>
    <style:style style:name="P9" style:family="paragraph" style:parent-style-name="Standard">
      <style:paragraph-properties fo:line-height="115%" fo:text-align="justify" style:justify-single-word="false"/>
      <style:text-properties style:font-name="Liberation Serif" fo:font-size="14pt" officeooo:paragraph-rsid="000dfdcc" style:font-size-asian="14pt" style:font-size-complex="14pt"/>
    </style:style>
    <style:style style:name="P10"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0dfdcc" style:font-size-asian="14pt" style:font-size-complex="14pt"/>
    </style:style>
    <style:style style:name="P11"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dfdcc" style:font-size-asian="14pt" style:font-size-complex="14pt"/>
    </style:style>
    <style:style style:name="P12" style:family="paragraph" style:parent-style-name="Standard">
      <style:paragraph-properties fo:line-height="115%" fo:text-align="justify" style:justify-single-word="false"/>
      <style:text-properties style:font-name="Liberation Serif" fo:font-size="14pt" officeooo:paragraph-rsid="000e5c28" style:font-size-asian="14pt" style:font-size-complex="14pt"/>
    </style:style>
    <style:style style:name="P13"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e5c28" style:font-size-asian="14pt" style:font-size-complex="14pt"/>
    </style:style>
    <style:style style:name="P14"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f789c" style:font-size-asian="14pt" style:font-size-complex="14pt"/>
    </style:style>
    <style:style style:name="P15" style:family="paragraph" style:parent-style-name="Preformatted_20_Text">
      <style:paragraph-properties fo:margin-top="0.101cm" fo:margin-bottom="0cm" style:contextual-spacing="false" fo:line-height="115%" fo:text-align="justify" style:justify-single-word="false"/>
      <style:text-properties style:font-name="Liberation Serif" fo:font-size="14pt" officeooo:rsid="001e2809" officeooo:paragraph-rsid="000d9c25" style:font-size-asian="14pt" style:font-size-complex="14pt"/>
    </style:style>
    <style:style style:name="P16" style:family="paragraph" style:parent-style-name="Standard">
      <style:paragraph-properties fo:line-height="115%" fo:text-align="justify" style:justify-single-word="false"/>
      <style:text-properties style:font-name="Liberation Serif" fo:font-size="14pt" officeooo:rsid="000c96a4" officeooo:paragraph-rsid="000d9c25" style:font-size-asian="14pt" style:font-size-complex="14pt"/>
    </style:style>
    <style:style style:name="P17"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c96a4" officeooo:paragraph-rsid="000d9c25" style:font-size-asian="14pt" style:font-size-complex="14pt"/>
    </style:style>
    <style:style style:name="P18"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0c96a4" officeooo:paragraph-rsid="000dfdcc" style:font-size-asian="14pt" style:font-size-complex="14pt"/>
    </style:style>
    <style:style style:name="P19"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2cb095" officeooo:paragraph-rsid="000dfdcc" style:font-size-asian="14pt" style:font-size-complex="14pt"/>
    </style:style>
    <style:style style:name="P20"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5f489" officeooo:paragraph-rsid="000dfdcc" style:font-size-asian="14pt" style:font-size-complex="14pt"/>
    </style:style>
    <style:style style:name="P21" style:family="paragraph" style:parent-style-name="Standard">
      <style:paragraph-properties fo:line-height="115%" fo:text-align="justify" style:justify-single-word="false"/>
      <style:text-properties style:font-name="Liberation Serif" fo:font-size="14pt" officeooo:rsid="001909a4" officeooo:paragraph-rsid="000dfdcc" style:font-size-asian="14pt" style:font-size-complex="14pt"/>
    </style:style>
    <style:style style:name="P22" style:family="paragraph" style:parent-style-name="Standard">
      <style:paragraph-properties fo:line-height="115%" fo:text-align="justify" style:justify-single-word="false"/>
      <style:text-properties style:font-name="Liberation Serif" fo:font-size="14pt" officeooo:rsid="001909a4" officeooo:paragraph-rsid="000d9c25" style:font-size-asian="14pt" style:font-size-complex="14pt"/>
    </style:style>
    <style:style style:name="P23"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9c0c1" officeooo:paragraph-rsid="000d9c25" style:font-size-asian="14pt" style:font-size-complex="14pt"/>
    </style:style>
    <style:style style:name="P24" style:family="paragraph" style:parent-style-name="Standard">
      <style:paragraph-properties fo:line-height="115%" fo:text-align="justify" style:justify-single-word="false"/>
      <style:text-properties style:font-name="Liberation Serif" fo:font-size="14pt" officeooo:rsid="0019c0c1" officeooo:paragraph-rsid="000d9c25" style:font-size-asian="14pt" style:font-size-complex="14pt"/>
    </style:style>
    <style:style style:name="P25"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19c0c1" officeooo:paragraph-rsid="00110364" style:font-size-asian="14pt" style:font-size-complex="14pt"/>
    </style:style>
    <style:style style:name="P26" style:family="paragraph" style:parent-style-name="Standard">
      <style:paragraph-properties fo:line-height="115%" fo:text-align="justify" style:justify-single-word="false"/>
      <style:text-properties style:font-name="Liberation Serif" fo:font-size="14pt" officeooo:rsid="0019c0c1" officeooo:paragraph-rsid="00110364" style:font-size-asian="14pt" style:font-size-complex="14pt"/>
    </style:style>
    <style:style style:name="P27"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9c0c1" officeooo:paragraph-rsid="00110364" style:font-size-asian="14pt" style:font-size-complex="14pt"/>
    </style:style>
    <style:style style:name="P28"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9c0c1" officeooo:paragraph-rsid="0011bc9c" style:font-size-asian="14pt" style:font-size-complex="14pt"/>
    </style:style>
    <style:style style:name="P29" style:family="paragraph" style:parent-style-name="Standard">
      <style:paragraph-properties fo:line-height="115%" fo:text-align="justify" style:justify-single-word="false"/>
      <style:text-properties style:font-name="Liberation Serif" fo:font-size="14pt" officeooo:rsid="001b8e61" officeooo:paragraph-rsid="000d9c25" style:font-size-asian="14pt" style:font-size-complex="14pt"/>
    </style:style>
    <style:style style:name="P30" style:family="paragraph" style:parent-style-name="Standard">
      <style:paragraph-properties fo:line-height="115%" fo:text-align="justify" style:justify-single-word="false"/>
      <style:text-properties style:font-name="Liberation Serif" fo:font-size="14pt" officeooo:rsid="001169b7" officeooo:paragraph-rsid="000d9c25" style:font-size-asian="14pt" style:font-size-complex="14pt"/>
    </style:style>
    <style:style style:name="P31" style:family="paragraph" style:parent-style-name="Standard">
      <style:paragraph-properties fo:line-height="100%" fo:text-align="justify" style:justify-single-word="false"/>
      <style:text-properties style:font-name="Liberation Serif" fo:font-size="14pt" officeooo:paragraph-rsid="000dfdcc" style:font-size-asian="14pt" style:font-size-complex="14pt"/>
    </style:style>
    <style:style style:name="P32"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28971" officeooo:paragraph-rsid="000d9c25" style:font-size-asian="14pt" style:font-size-complex="14pt"/>
    </style:style>
    <style:style style:name="P33" style:family="paragraph" style:parent-style-name="Standard">
      <style:paragraph-properties fo:line-height="115%" fo:text-align="justify" style:justify-single-word="false"/>
      <style:text-properties officeooo:paragraph-rsid="000d9c25"/>
    </style:style>
    <style:style style:name="P34" style:family="paragraph" style:parent-style-name="Standard">
      <style:paragraph-properties fo:line-height="115%" fo:text-align="justify" style:justify-single-word="false"/>
      <style:text-properties style:font-name="Noto Sans" officeooo:paragraph-rsid="000d9c25"/>
    </style:style>
    <style:style style:name="P35" style:family="paragraph" style:parent-style-name="Preformatted_20_Text">
      <style:paragraph-properties fo:margin-top="0cm" fo:margin-bottom="0cm" style:contextual-spacing="false" fo:line-height="115%" fo:text-align="justify" style:justify-single-word="false"/>
      <style:text-properties style:font-name="Liberation Serif" fo:font-size="14pt" officeooo:rsid="0021c758" officeooo:paragraph-rsid="00160e78" style:font-size-asian="14pt" style:font-size-complex="14pt"/>
    </style:style>
    <style:style style:name="P36" style:family="paragraph" style:parent-style-name="Standard">
      <style:paragraph-properties fo:line-height="115%" fo:text-align="justify" style:justify-single-word="false"/>
      <style:text-properties style:font-name="Liberation Serif" fo:font-size="14pt" fo:font-weight="bold" officeooo:rsid="00150dfa" officeooo:paragraph-rsid="000d9c25" style:font-size-asian="14pt" style:font-weight-asian="bold" style:font-size-complex="14pt" style:font-weight-complex="bold"/>
    </style:style>
    <style:style style:name="P37" style:family="paragraph" style:parent-style-name="Standard">
      <style:paragraph-properties fo:margin-top="0cm" fo:margin-bottom="0cm" style:contextual-spacing="false" fo:line-height="115%" fo:text-align="justify" style:justify-single-word="false"/>
      <style:text-properties style:font-name="Liberation Serif" fo:font-size="14pt" officeooo:paragraph-rsid="000d9c25" style:font-size-asian="14pt" style:font-size-complex="14pt"/>
    </style:style>
    <style:style style:name="P38" style:family="paragraph" style:parent-style-name="Heading_20_4">
      <style:paragraph-properties fo:line-height="115%"/>
      <style:text-properties style:font-name="Liberation Serif" fo:font-size="14pt" style:font-size-asian="14pt" style:font-size-complex="14pt"/>
    </style:style>
    <style:style style:name="P39" style:family="paragraph" style:parent-style-name="Heading_20_4">
      <style:paragraph-properties fo:margin-top="0cm" fo:margin-bottom="0cm" style:contextual-spacing="false" fo:line-height="115%"/>
      <style:text-properties style:font-name="Liberation Serif" fo:font-size="14pt" officeooo:rsid="000dfdcc" style:font-size-asian="14pt" style:font-size-complex="14pt"/>
    </style:style>
    <style:style style:name="P40" style:family="paragraph" style:parent-style-name="Heading_20_4">
      <style:paragraph-properties fo:margin-top="0cm" fo:margin-bottom="0cm" style:contextual-spacing="false" fo:line-height="115%" fo:text-align="justify" style:justify-single-word="false"/>
      <style:text-properties officeooo:paragraph-rsid="001a7b15"/>
    </style:style>
    <style:style style:name="P41" style:family="paragraph" style:parent-style-name="Heading_20_4">
      <style:paragraph-properties fo:margin-top="0.101cm" fo:margin-bottom="0cm" style:contextual-spacing="false" fo:line-height="115%" fo:text-align="justify" style:justify-single-word="false"/>
      <style:text-properties officeooo:paragraph-rsid="001a7b15"/>
    </style:style>
    <style:style style:name="T1" style:family="text">
      <style:text-properties officeooo:rsid="0023b686"/>
    </style:style>
    <style:style style:name="T2" style:family="text">
      <style:text-properties officeooo:rsid="002b378e"/>
    </style:style>
    <style:style style:name="T3" style:family="text">
      <style:text-properties officeooo:rsid="000ba69a"/>
    </style:style>
    <style:style style:name="T4" style:family="text">
      <style:text-properties fo:font-style="italic" style:font-style-asian="italic" style:font-style-complex="italic"/>
    </style:style>
    <style:style style:name="T5" style:family="text">
      <style:text-properties fo:font-style="italic" officeooo:rsid="001169b7" style:font-style-asian="italic" style:font-style-complex="italic"/>
    </style:style>
    <style:style style:name="T6" style:family="text">
      <style:text-properties fo:font-style="italic" officeooo:rsid="00128971" style:font-style-asian="italic" style:font-style-complex="italic"/>
    </style:style>
    <style:style style:name="T7" style:family="text">
      <style:text-properties fo:font-style="italic" officeooo:rsid="0015f489" style:font-style-asian="italic" style:font-style-complex="italic"/>
    </style:style>
    <style:style style:name="T8" style:family="text">
      <style:text-properties fo:font-style="italic" officeooo:rsid="002cb095" style:font-style-asian="italic" style:font-style-complex="italic"/>
    </style:style>
    <style:style style:name="T9" style:family="text">
      <style:text-properties fo:font-style="italic" officeooo:rsid="001741a2" style:font-style-asian="italic" style:font-style-complex="italic"/>
    </style:style>
    <style:style style:name="T10" style:family="text">
      <style:text-properties fo:font-style="italic" officeooo:rsid="001909a4" style:font-style-asian="italic" style:font-style-complex="italic"/>
    </style:style>
    <style:style style:name="T11" style:family="text">
      <style:text-properties fo:font-style="italic" officeooo:rsid="001b8e61" style:font-style-asian="italic" style:font-style-complex="italic"/>
    </style:style>
    <style:style style:name="T12" style:family="text">
      <style:text-properties fo:font-style="italic" officeooo:rsid="0011bc9c" style:font-style-asian="italic" style:font-style-complex="italic"/>
    </style:style>
    <style:style style:name="T13" style:family="text">
      <style:text-properties officeooo:rsid="002b820b"/>
    </style:style>
    <style:style style:name="T14" style:family="text">
      <style:text-properties officeooo:rsid="000c96a4"/>
    </style:style>
    <style:style style:name="T15" style:family="text">
      <style:text-properties officeooo:rsid="000e41ed"/>
    </style:style>
    <style:style style:name="T16" style:family="text">
      <style:text-properties officeooo:rsid="002cb095"/>
    </style:style>
    <style:style style:name="T17" style:family="text">
      <style:text-properties officeooo:rsid="000fbdca"/>
    </style:style>
    <style:style style:name="T18" style:family="text">
      <style:text-properties officeooo:rsid="001169b7"/>
    </style:style>
    <style:style style:name="T19" style:family="text">
      <style:text-properties officeooo:rsid="0030ad3f"/>
    </style:style>
    <style:style style:name="T20" style:family="text">
      <style:text-properties officeooo:rsid="00128971"/>
    </style:style>
    <style:style style:name="T21" style:family="text">
      <style:text-properties officeooo:rsid="002db1e0"/>
    </style:style>
    <style:style style:name="T22" style:family="text">
      <style:text-properties officeooo:rsid="0025e34c"/>
    </style:style>
    <style:style style:name="T23" style:family="text">
      <style:text-properties officeooo:rsid="0026e38c"/>
    </style:style>
    <style:style style:name="T24" style:family="text">
      <style:text-properties officeooo:rsid="000dfdcc"/>
    </style:style>
    <style:style style:name="T25" style:family="text">
      <style:text-properties officeooo:rsid="000f789c"/>
    </style:style>
    <style:style style:name="T26" style:family="text">
      <style:text-properties officeooo:rsid="00110364"/>
    </style:style>
    <style:style style:name="T27" style:family="text">
      <style:text-properties officeooo:rsid="00158503"/>
    </style:style>
    <style:style style:name="T28" style:family="text">
      <style:text-properties officeooo:rsid="00160e78"/>
    </style:style>
    <style:style style:name="T29" style:family="text">
      <style:text-properties officeooo:rsid="0015f489"/>
    </style:style>
    <style:style style:name="T30" style:family="text">
      <style:text-properties officeooo:rsid="00250539"/>
    </style:style>
    <style:style style:name="T31" style:family="text">
      <style:text-properties officeooo:rsid="001741a2"/>
    </style:style>
    <style:style style:name="T32" style:family="text">
      <style:text-properties officeooo:rsid="001909a4"/>
    </style:style>
    <style:style style:name="T33" style:family="text">
      <style:text-properties officeooo:rsid="000e215b"/>
    </style:style>
    <style:style style:name="T34" style:family="text">
      <style:text-properties officeooo:rsid="000e5c28"/>
    </style:style>
    <style:style style:name="T35" style:family="text">
      <style:text-properties officeooo:rsid="0019c0c1"/>
    </style:style>
    <style:style style:name="T36" style:family="text">
      <style:text-properties officeooo:rsid="0019f039"/>
    </style:style>
    <style:style style:name="T37" style:family="text">
      <style:text-properties officeooo:rsid="001b8e61"/>
    </style:style>
    <style:style style:name="T38" style:family="text">
      <style:text-properties officeooo:rsid="0011bc9c"/>
    </style:style>
    <style:style style:name="T39" style:family="text">
      <style:text-properties officeooo:rsid="00139c48"/>
    </style:style>
    <style:style style:name="T40" style:family="text">
      <style:text-properties style:font-name="Liberation Serif" fo:font-size="14pt" style:font-size-asian="14pt" style:font-size-complex="14pt"/>
    </style:style>
    <style:style style:name="T41" style:family="text">
      <style:text-properties style:font-name="Liberation Serif" fo:font-size="14pt" fo:font-weight="normal" style:font-size-asian="14pt" style:font-weight-asian="normal" style:font-size-complex="14pt" style:font-weight-complex="normal"/>
    </style:style>
    <style:style style:name="T42" style:family="text">
      <style:text-properties style:font-name="Liberation Serif" fo:font-size="14pt" fo:font-weight="normal" officeooo:rsid="000f789c" style:font-size-asian="14pt" style:font-weight-asian="normal" style:font-size-complex="14pt" style:font-weight-complex="normal"/>
    </style:style>
    <style:style style:name="T43" style:family="text">
      <style:text-properties style:font-name="Liberation Serif" fo:font-size="14pt" fo:font-weight="normal" officeooo:rsid="0015f489" style:font-size-asian="14pt" style:font-weight-asian="normal" style:font-size-complex="14pt" style:font-weight-complex="normal"/>
    </style:style>
    <style:style style:name="T44" style:family="text">
      <style:text-properties style:font-name="Liberation Serif" fo:font-size="14pt" fo:font-style="normal" fo:font-weight="normal" officeooo:rsid="0015f489" style:font-size-asian="14pt" style:font-style-asian="normal" style:font-weight-asian="normal" style:font-size-complex="14pt" style:font-style-complex="normal" style:font-weight-complex="normal"/>
    </style:style>
    <style:style style:name="T45" style:family="text">
      <style:text-properties style:font-name="Liberation Serif" fo:font-size="14pt" fo:font-style="normal" fo:font-weight="normal" officeooo:rsid="000dfdcc" style:font-size-asian="14pt" style:font-style-asian="normal" style:font-weight-asian="normal" style:font-size-complex="14pt" style:font-style-complex="normal" style:font-weight-complex="normal"/>
    </style:style>
    <style:style style:name="T46" style:family="text">
      <style:text-properties style:font-name="Liberation Serif" fo:font-size="14pt" fo:font-style="normal" fo:font-weight="normal" officeooo:rsid="0030ad3f" style:font-size-asian="14pt" style:font-style-asian="normal" style:font-weight-asian="normal" style:font-size-complex="14pt" style:font-style-complex="normal" style:font-weight-complex="normal"/>
    </style:style>
    <style:style style:name="T47" style:family="text">
      <style:text-properties style:font-name="Liberation Serif" fo:font-size="14pt" fo:font-style="normal" fo:font-weight="normal" officeooo:rsid="00250539" style:font-size-asian="14pt" style:font-style-asian="normal" style:font-weight-asian="normal" style:font-size-complex="14pt" style:font-style-complex="normal" style:font-weight-complex="normal"/>
    </style:style>
    <style:style style:name="T48" style:family="text">
      <style:text-properties officeooo:rsid="001e2809"/>
    </style:style>
    <style:style style:name="T49" style:family="text">
      <style:text-properties officeooo:rsid="00201ff6"/>
    </style:style>
    <style:style style:name="T50" style:family="text">
      <style:text-properties officeooo:rsid="0015cc1c"/>
    </style:style>
    <style:style style:name="T51" style:family="text">
      <style:text-properties officeooo:rsid="0021c758"/>
    </style:style>
    <style:style style:name="T52" style:family="text">
      <style:text-properties style:text-underline-style="solid" style:text-underline-width="auto" style:text-underline-color="font-color" officeooo:rsid="001741a2"/>
    </style:style>
    <style:style style:name="T53" style:family="text">
      <style:text-properties style:text-underline-style="solid" style:text-underline-width="auto" style:text-underline-color="font-color" officeooo:rsid="0030ad3f"/>
    </style:style>
    <style:style style:name="T54" style:family="text">
      <style:text-properties style:text-underline-style="solid" style:text-underline-width="auto" style:text-underline-color="font-color" officeooo:rsid="002cb095"/>
    </style:style>
    <style:style style:name="T55" style:family="text">
      <style:text-properties officeooo:rsid="00216c12"/>
    </style:style>
    <style:style style:name="T56" style:family="text">
      <style:text-properties officeooo:rsid="0021e4f6"/>
    </style:style>
    <style:style style:name="T57" style:family="text">
      <style:text-properties fo:font-weight="normal" officeooo:rsid="0026dacf"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nima e corpo. Un dualismo ingannevole. <text:span text:style-name="T1">(Galimberti)</text:span></text:p>
      <text:p text:style-name="P4"/>
      <text:h text:style-name="P38" text:outline-level="4"><text:span text:style-name="T57">Introduzione</text:span> </text:h>
      <text:p text:style-name="P37">La filosofia ha una funzione. <text:span text:style-name="T2">P</text:span>iù che un sapere, è un atteggiamento, l'atteggiam<text:span text:style-name="T3">e</text:span>nto di mettere in questione le idee che si hanno in testa. <text:span text:style-name="T2">I</text:span>nnanzi tutto bisogna capire perché ho queste idee: ho queste idee perché ho una fede e quindi accolgo le idee di quella fede? Le ho in testa perché un retore o un sofista, attraverso la mozione degli affetti mi ha entusiasmato, per cui quello che dice per me è oro colato? Le ho perché la persona che io stimo molto e quindi sono della sua idea? Bene dice Socrate, tutte queste idee non servono a niente, queste idee sono infondate, queste idee sono un sentito dire e questa cosa è più evidente oggi di quanto non lo fosse all'epoca. <text:span text:style-name="T2">P</text:span>ensiamo alle idee che sono state fornite dalla televisio<text:span text:style-name="T3">n</text:span>e, quelle che sono state fornite dai giornali, quelle che sono state fornite dai social. <text:span text:style-name="T2">U</text:span>no ha quelle idee senza avere il fondamento di queste idee. </text:p>
      <text:p text:style-name="P4">La fi<text:span text:style-name="T3">lo</text:span>sofia ti chiede qual è il fondamento, l'argomentazione che fa si che quell'idea che tu hai in mente abbia una sua plausibilità e quindi una sua dignità e quindi una possibilità di essere argomentata?</text:p>
      <text:p text:style-name="P4">Dice Socrate, quando <text:span text:style-name="T24">adunava</text:span> intorno a s<text:span text:style-name="T3">e</text:span> i suoi allievi e chiedeva a uno che cos'è la giustizia e poi all'altro e <text:soft-page-break/>poi all'altro ancora e alla fine cercava di individuare se le ragioni per cui ciascuno proponeva la <text:span text:style-name="T24">propria </text:span>opinione, questa opinione conteneva o meno contraddizioni o dei sentit<text:span text:style-name="T3">o</text:span> dire o delle influenze emotive, e dice che tutte queste considerazioni <text:span text:style-name="T24">agivano da filtro, per cui le</text:span> opinioni fondate su queste ragioni venivano escluse dalla discussione e <text:span text:style-name="T24">alla fine </text:span>restava in piedi solo l'idea che era ben argomentata, non contraddittoria, <text:span text:style-name="T2">una idea </text:span>con fondamento. </text:p>
      <text:p text:style-name="P4">I Greci dicevano che questa idea aveva la dignità della episteme. <text:span text:style-name="T2">E</text:span>pisteme è una parola greca che <text:span text:style-name="T2">erroneamente </text:span>avevamo tradotto con scienza, ma con la scienza non ha niente a che <text:span text:style-name="T2">vedere.</text:span> <text:span text:style-name="T2">E</text:span>pisteme vuol dire ciò che sta su da se, non per sentito dire ma perché è bene argomentata.</text:p>
      <text:p text:style-name="P4"><text:span text:style-name="T4">Istemi </text:span>è appunto lo star su come sta <text:span text:style-name="T3">su </text:span>una colonna <text:span text:style-name="T4">ep </text:span>su <text:span text:style-name="T24">se stessa</text:span>, non si appoggia a niente. Compito della filosofia è mettere in questione le nostre idee, <text:s/>perché le nostre idee ogni tanto si addormentano, ogni tanto si irrigidiscono, ogni tanto si spengono come le stelle, oppure diventano delle abitudini mentali all'interno delle quali noi ci acco<text:span text:style-name="T2">modiamo,</text:span> ci d<text:span text:style-name="T24">anno</text:span> sicurezza, evitiamo di cambiarla perché dovremmo cambiare la nostra visione del mondo. <text:span text:style-name="T3">A</text:span>d essa ci affidiamo, quando diventiamo vecchi, le chiamiamo addirittura principi, semplicemente perché ci siamo abituati a pensare a quelle idee, e non <text:span text:style-name="T2">ad </text:span>altre, solo quelle. </text:p>
      <text:p text:style-name="P4"><text:soft-page-break/>La filosofia fa questo lavoro, mette in questione le tue idee, assume nei confronti delle tue idee un atteggiamento critico. <text:span text:style-name="T2">C</text:span>ritico è una parola greca che viene da crisis, è ovvio che quando <text:span text:style-name="T24">uno</text:span> mett<text:span text:style-name="T24">e</text:span> in questione le <text:span text:style-name="T24">proprie</text:span> idee va in crisi. <text:span text:style-name="T2">L</text:span>a gente tende a non andare in crisi, a non problematizzare e succede <text:span text:style-name="T24">di</text:span> condu<text:span text:style-name="T24">rre</text:span> una vita sbagliata <text:span text:style-name="T24">a causa di</text:span><text:span text:style-name="T2"> quelle </text:span>idee sbagliate. <text:span text:style-name="T2">A</text:span>ll<text:span text:style-name="T3">o</text:span>ra le idee vanno messe in gioco continuamente, continuamente discusse e messe alla prova.</text:p>
      <text:p text:style-name="P4"/>
      <text:h text:style-name="P38" text:outline-level="4">Dualismo <text:span text:style-name="T24">tra </text:span>anima e corpo</text:h>
      <text:p text:style-name="P5"><text:span text:style-name="T3">T</text:span>ra le idee <text:span text:style-name="T13">che metteremo </text:span>alla prova, <text:span text:style-name="T13">ce ne sono due:</text:span> una si chiama <text:span text:style-name="T4">anima</text:span> l'altra si chiama <text:span text:style-name="T4">corpo.</text:span> <text:span text:style-name="T13">L</text:span>'idea che <text:span text:style-name="T13">comunemente </text:span>noi <text:span text:style-name="T13">tutti</text:span> abbiamo è quella di essere composti di anima e corpo. Niente di più falso.</text:p>
      <text:p text:style-name="P9"><text:span text:style-name="T24">Si potrebbe dire </text:span>in enunciato che l'anima <text:span text:style-name="T14">non esiste, l’anima è una parola venerabile che ha avuto un grande successo nella nostra cultura, evocata da poeti, utilizzata da psicologi che, senza anima non saprebbero di che cosa occuparsi. </text:span><text:span text:style-name="T13">M</text:span><text:span text:style-name="T14">a l’anima davvero non esiste, non esiste perché è nata <text:s/>con Platone. </text:span><text:span text:style-name="T13">E’</text:span><text:span text:style-name="T14"> Platone che ha messo in circolazione la parola anima e siccome nella visione dell’occidente </text:span><text:span text:style-name="T13">rappresenta </text:span><text:span text:style-name="T14">la grecità </text:span><text:span text:style-name="T13">e </text:span><text:span text:style-name="T14">quindi Platone e la tradizione giudaico-cristiana </text:span><text:span text:style-name="T13">e </text:span><text:span text:style-name="T14">quindi </text:span><text:span text:style-name="T24">la </text:span><text:span text:style-name="T14">bibbia e</text:span><text:span text:style-name="T24">d il</text:span><text:span text:style-name="T14"> vangelo. </text:span></text:p>
      <text:p text:style-name="P9"><text:soft-page-break/><text:span text:style-name="T14">Ebbene sia nella bibbia che nel vangelo con c’è la minima nozione di anima, non c’è, </text:span><text:span text:style-name="T13">c’è </text:span><text:span text:style-name="T14">invece nella cultura greca, ma non da sempre. La parola greca che sta per corpus è detta soma, da qui malattie psicosomatiche e la parola che sta per anima è la parola psiche. Le incontriamo per la prima volta in Omero <text:s/>e Omero usa la parola psiche </text:span><text:span text:style-name="T24">col significato </text:span><text:span text:style-name="T14">che vuol dire respiro, solo in occasione dell’ultimo respiro, quando si esala la psiche, per il resto non compare mai. Nel 800 a.C. anche per Omero esiste solo il corpo perché non c’era ancora il dualismo tra anima e corpo. Lui non usa la parola soma perché per lui è un corpo vivente che viene descritto dai suoi gesti, dalle sue azioni, dai suoi movimenti, dalla sua relazione con il mondo. Ulisse, quando torna ad Itaca, esprime la sua ira non attraverso il sentimento dell’anima, ma attraverso il corpo </text:span><text:span text:style-name="T24">q</text:span><text:span text:style-name="T14">uando impugna l’arco e la faretra, l’ira è questa cosa, determinata dal mondo circostante in cui viene a trovarsi. L’ira non è un sentimento dell’anima di cui il corpo si fa espressione, il corpo non è rappresentativo di qualcosa che si muove alle sue spalle, il corpo è immediatamente espressivo per Omero.</text:span></text:p>
      <text:p text:style-name="P31"/>
      <text:h text:style-name="P38" text:outline-level="4">Platone e il concetto di anima</text:h>
      <text:p text:style-name="P16">Le cose continuano cosi per un po di tempo, finché con Platone appare questa nozione di anima. <text:span text:style-name="T15">Perché Platone </text:span><text:soft-page-break/><text:span text:style-name="T15">introduce la parola anima? </text:span><text:span text:style-name="T16">A</text:span><text:span text:style-name="T15"> cosa gli serviva? Gli serviva per introdurre un problema fondamentale. Platone dice che se vogliamo costruire un sapere universale valido per tutti, non possiamo fidarci delle sensazioni del nostro corpo, </text:span><text:span text:style-name="T16">bensì</text:span><text:span text:style-name="T15"> attraverso idee, numeri, misure, quantità, rapporti, cose astratte non sensazioni corporee. </text:span><text:span text:style-name="T16">M</text:span><text:span text:style-name="T15">a qual é l’organo di queste cose astratte? Platone la chiama anima (psiche) che voleva dire vento, respiro e che si accordava con il respiro della terra che si chiamava anemos da cui la parola latina anima. </text:span><text:span text:style-name="T17">Attraverso questo processo, Platone </text:span><text:span text:style-name="T18">opera </text:span><text:span text:style-name="T17">la massima distanza che viene a costituirsi tra occidente e oriente, </text:span><text:span text:style-name="T18">perché il pensiero orientale pensava in maniera concreta, </text:span><text:span text:style-name="T16">mentre </text:span><text:span text:style-name="T18">il pensiero occidentale ha iniziato a pensare in maniera astratta per idee, misure, numeri, quantità, rapporti. </text:span><text:span text:style-name="T16">S</text:span><text:span text:style-name="T18">i dice che Platone avesse fatto scrivere all’ingresso della sua accademia: “qui non si entra se non si è geometri.”</text:span></text:p>
      <text:p text:style-name="P17"><text:span text:style-name="T18">Quindi in occidente si iniziò a ragionare in termini di idee, attraverso l’idea di albero, </text:span><text:span text:style-name="T24">si </text:span><text:span text:style-name="T18">nomina</text:span><text:span text:style-name="T24">no</text:span><text:span text:style-name="T18"> tutti gli alberi della terra, mentre ad oriente, vi era ancora un pensiero concreto, ad oriente non si sarebbe mai detto questo albero ma l’albero della luce e delle tenebre, questo albero della vita e della morte, cioè un riferimento al concreto, che poi è il modo con </text:span><text:span text:style-name="T16">cui </text:span><text:span text:style-name="T18">parlano e pensano i bambini che devono ancora arrivare all’età della ragione. <text:s/></text:span></text:p>
      <text:p text:style-name="P16"><text:soft-page-break/></text:p>
      <text:h text:style-name="P38" text:outline-level="4">La ragione secondo Platone</text:h>
      <text:p text:style-name="P19">Platone ha dato un contributo fondamentale allo sviluppo del pensiero razionale in Occidente. La sua teoria delle Idee, esposta in opere come la "Repubblica" e il "Simposio", propone l'esistenza di un mondo di realtà perfette e immutabili, a cui il mondo materiale che percepiamo è solo una copia imperfetta. Questa teoria ha avuto un'influenza profonda sulla filosofia occidentale, contribuendo a definire il concetto di razionalità come la capacità di cogliere l'essenza immutabile delle cose al di là delle apparenze ingannevoli del mondo materiale.</text:p>
      <text:p text:style-name="P18"><text:span text:style-name="T16">Tuttavia, è importante sottolineare che la nozione di ragione esisteva già prima di Platone. Filosofi precedenti come Parmenide e Socrate avevano già esplorato l'idea di un ordine razionale sottostante al mondo. Platone, però, ha dato a questa idea una forma più sistematica e articolata, collegandola al concetto di Idee e sviluppando il metodo dialettico come strumento per la ricerca della verità. La ragione è certamente legata alla logica, che fornisce gli strumenti per il ragionamento corretto e la formulazione di argomenti validi.</text:span><text:span text:style-name="T18"> </text:span></text:p>
      <text:p text:style-name="P18"><text:soft-page-break/><text:span text:style-name="T24">Q</text:span><text:span text:style-name="T18">uesto sistema di regole ci serve per intenderci, è un sistema necessario senza il quale non potremmo prevedere i comportamenti. La ragione non dice la verità, è un ottimo strumento per intendersi, è regolato dal principio di non contraddizione per cui il microfono che ho in mano è un microfono e non altro, ma questo corrisponde al vero? No non è vero, perché in questo momento posso prendere il microfono e scagliarlo contro qualcuno.</text:span></text:p>
      <text:p text:style-name="P16"><text:span text:style-name="T18">A questo punto il microfono diventa un’arma impropria. Cambia significato, tutte le cose possono cambiare significato. I bambini che non sono ancora arrivati all’età della ragione trattano le cose cambiando continuamente significato. Un bambino prende un pennarello e fa un disegno sulla carta, poi lo mette in bocca e lo fa diventare una caramella, poi lo tira al fratellino e lo </text:span><text:span text:style-name="T16">fa </text:span><text:span text:style-name="T18">diventare un’arma impropria. Cambia continuamente significato. Chi è nella verità? L’adulto che sa la regola della ragione o il bambino. Il bambino perché è fedele alla pluralità dei significati che tutte le cose possiedono. </text:span></text:p>
      <text:p text:style-name="P16"><text:span text:style-name="T18">In un contesto del genere evidentemente non ci si può intendere perché se io dico dammi un microfono, tu non puoi darmi una forchetta o una bottiglia perché non </text:span><text:span text:style-name="T19">conosci </text:span><text:span text:style-name="T5">il principio di non contraddizione</text:span><text:span text:style-name="T18">. Come fanno i bambini ad arrivare all’età della ragione? Attraverso </text:span><text:span text:style-name="T24">l’esercizio che le mamme usano mettendo in atto la </text:span><text:soft-page-break/><text:span text:style-name="T24">strategia di Platone. Tutti </text:span><text:span text:style-name="T18">i no che le mamme </text:span><text:span text:style-name="T24">dicono ai loro bambini, equivale all’insegnamento del principio di non contraddizione</text:span><text:span text:style-name="T18">, le mamme non lo sanno ma stanno usando la strategia di Platone. Quando il bambino disegna va bene, quando il bambino mette in bocca il pennarello </text:span><text:span text:style-name="T20">e lo fa diventare una caramella</text:span><text:span text:style-name="T18">, la mamma gli dice </text:span><text:span text:style-name="T20">subito </text:span><text:span text:style-name="T18">di no, e così comincia </text:span><text:span text:style-name="T20">pian piano </text:span><text:span text:style-name="T18">ad acquisire la regola della ragione. </text:span><text:span text:style-name="T20">S</text:span><text:span text:style-name="T24">e </text:span><text:span text:style-name="T20">togliete </text:span><text:span text:style-name="T24">ad un bambino </text:span><text:span text:style-name="T20">il suo orsacchiotto, fa</text:span><text:span text:style-name="T24">rà</text:span><text:span text:style-name="T20"> dei versi disperati, piange</text:span><text:span text:style-name="T24">rà</text:span><text:span text:style-name="T20">. Gliene date un altro , </text:span><text:span text:style-name="T19">ma </text:span><text:span text:style-name="T20">non è quello, ecco qui il pensiero concreto, il bambino non riesce a capire che l’orsacchiotto rientra nella serie degli orsacchiotti, tutti gli orsacchiotti sono uguali, non riesce ad astrarre a prescindere dalla concretezza del suo orsacchiotto. </text:span></text:p>
      <text:p text:style-name="P32">I bambini non hanno ancora sviluppato appieno la capacità di pensiero astratto. Per loro, l'orsacchiotto che hanno davanti è un'entità unica e distinta, non un rappresentante di una categoria più ampia. Questo significa che non riescono a cogliere il concetto di "orsacchiotto in generale" e ad applicarlo a nuovi contesti.</text:p>
      <text:p text:style-name="P11"><text:span text:style-name="T20">Con il pensiero <text:s/>astratto noi abbiamo fatto un’</text:span><text:span text:style-name="T6">economia mentale</text:span><text:span text:style-name="T20"> </text:span><text:span text:style-name="T24">notevole</text:span><text:span text:style-name="T19">, </text:span><text:span text:style-name="T24">si </text:span><text:span text:style-name="T20">prendono decisioni in condizioni di incertezza e limitatezza cognitiva. </text:span><text:span text:style-name="T24">La</text:span><text:span text:style-name="T20"> mente umana non </text:span><text:span text:style-name="T24">è</text:span><text:span text:style-name="T20"> un computer perfetto, ma piuttosto un sistema che cerca di risparmiare tempo ed energia utilizzando </text:span><text:soft-page-break/><text:span text:style-name="T20">euristiche e scorciatoie mentali.</text:span><text:span text:style-name="T19"> </text:span><text:span text:style-name="T24">I</text:span><text:span text:style-name="T20">l bambino non è in grado di salire a questo livello di astrazione e capire che l’orsacchiotto è uno di una seria, per lui esiste, </text:span><text:span text:style-name="T24">è </text:span><text:span text:style-name="T20">solo quell’orsacchiotto. Poi arrivano all’età della ragione e cominciano a diventare tristi perché le cose hanno un solo significato e non ne hanno un’infinità come quando erano bambini. </text:span></text:p>
      <text:p text:style-name="P11"><text:span text:style-name="T24">Possiamo dire che </text:span><text:span text:style-name="T29">Platone ha inventato la ragione, e oggi parliamo mettendo in successione soggetto, predicato e complemento. </text:span><text:span text:style-name="T24">T</text:span><text:span text:style-name="T29">uttavia, è importante sottolineare che, la nozione di ragione esisteva già prima di Platone. Filosofi precedenti come Parmenide e Socrate avevano già esplorato l'idea di un ordine razionale sottostante al mondo. Prima di Platone, non si parlava in modo ragionevole, </text:span><text:span text:style-name="T19">si facevano</text:span><text:span text:style-name="T29"> delle analogie o dei paragoni. Omero diceva: - </text:span><text:span text:style-name="T7">così come il leone assale la gazzella, così Aiace …… -</text:span><text:span text:style-name="T29"> noi parliamo per logica non per analogie e questo modo di parlare funziona da 2300 anni. Tutto questo è andato a carico dell’anima, la tradizione giudaico – cristiana non aveva <text:s/>la minima nozione di anima. C’è una parola in aramaico “</text:span><text:span text:style-name="T7">nefe</text:span><text:span text:style-name="T8">š</text:span><text:span text:style-name="T29">” che quando la bibbia è stata tradotta in greco da 70 traduttori, questi hanno tradotto la parola “</text:span><text:span text:style-name="T7">nefe</text:span><text:span text:style-name="T8">š</text:span><text:span text:style-name="T29">” con la parola “</text:span><text:span text:style-name="T7">pysiché</text:span><text:span text:style-name="T29">” anima e questa parola si è trascinata tutta la cultura greca che è una cultura dualistica da Platone in poi, anima e corpo. In aramaico </text:span><text:span text:style-name="T7">nefe</text:span><text:span text:style-name="T8">š </text:span><text:span text:style-name="T29">vuol dire tante cose, vuol dire tutto ciò che concorre a </text:span><text:soft-page-break/><text:span text:style-name="T19">mantenerci i</text:span><text:span text:style-name="T29">n vita, per esempio </text:span><text:span text:style-name="T19">la frase</text:span><text:span text:style-name="T29">: “</text:span><text:span text:style-name="T7">misero le catene ai miei piedi <text:s/>e i lacci alla mia nefe</text:span><text:span text:style-name="T8">š</text:span><text:span text:style-name="T29">”, </text:span><text:span text:style-name="T19">nefeš assume il significato di gola </text:span><text:span text:style-name="T29">perché serve per respirare quindi concorre alla vita, non è vero che nella bibbia c’è scritto: “</text:span><text:span text:style-name="T7">muoia Sansone con tutti i filiste</text:span><text:span text:style-name="T29">i” ma “</text:span><text:span text:style-name="T7">muoia la mia nefe</text:span><text:span text:style-name="T8">š</text:span><text:span text:style-name="T7"> con tutti i filistei</text:span><text:span text:style-name="T29">”, “</text:span><text:span text:style-name="T7">occhi per occhio, nefe</text:span><text:span text:style-name="T8">š</text:span><text:span text:style-name="T7"> per nefe</text:span><text:span text:style-name="T8">š</text:span><text:span text:style-name="T7">”</text:span><text:span text:style-name="T29"> vuol dire “vita per vita” e non anima. </text:span></text:p>
      <text:p text:style-name="P5"><text:span text:style-name="T24">Gli</text:span><text:span text:style-name="T29"> ebrei, </text:span><text:span text:style-name="T24">nell’antico testamento (la bibbia)</text:span><text:span text:style-name="T29"> trasmettono le colpe dei padri ai figli, per cui se il padre ha commesso una colpa e non paga durante la sua vita, la sua colpa la pagherà suo figlio e se non la paga suo figlio la pagherà suo nipote e così avanti per sette generazioni, perché non essendoci una sopravvivenza dell’anima la giustizia si compie sulla terra, se non si compie in chi ha commesso il male si <text:s/>compie nella sua generazione. </text:span></text:p>
      <text:p text:style-name="P20">La cosa incredibile è che nel nuovo testamento la religione è del tutto corporea, innanzi tutto il fondamento del cristianesimo è l’incarnazione. Dio si fa corpo, questo corpo nasce, cresce, predica, muore, risorge, è sempre il corpo che fa tutto questo. Nell’ultima cena Gesù dice: mangerete il mio corpo ed il mio sangue, pane e vino sono i simboli del corpo e del sangue, non dell’anima. I cristiani quando recitano il Credo, se stanno attenti alle parole che dicono, dovrebbero rendersi conto che <text:s/>non dicono di credere <text:soft-page-break/>nella immortalità dell’anima perché credono nella resurrezione del corpo. </text:p>
      <text:p text:style-name="P20">Paolo di Tarso era convinto che i cristiani dopo la resurrezione di Cristo, non sarebbero mai morti, ma sarebbero stati assunti in cielo. Da Corinto gli scrivono, guarda che qui ci sono cristiani che sono morti e lui da Roma parte per andare a vederli. <text:span text:style-name="T16">A</text:span>rriva a Corinto ma nel frattempo subisce un naufragio, si salva, arriva a Corinto e dice: si ho visto anch’io da vicino la morte e allora se sono morti vuol dire che risorgeranno come Cristo. L’ultimo giorno risorgeranno.</text:p>
      <text:p text:style-name="P5"><text:span text:style-name="T29">Ma non si accontenta, Paolo va all’areopago, che è quel giardino stupendo che è sotto la </text:span><text:span text:style-name="T19">A</text:span><text:span text:style-name="T29">cropoli, </text:span><text:span text:style-name="T16">(</text:span><text:span text:style-name="T29">dove anche Socrate parlava</text:span><text:span text:style-name="T16">)</text:span><text:span text:style-name="T29"> e Paolo parla agli ateniesi e dice loro che dopo che Cristo è risorto risorgeranno anche tutti coloro che credono in lui. E qui Luca, secondo il vangelo di Luca al capitolo 14, dice: “</text:span><text:span text:style-name="T7">sentendo queste cose, gli ateniesi in parte risero, altri gli dissero queste cose ce le vieni a raccontare un’altra volta e se ne andarono”.</text:span><text:span text:style-name="T29"> Luca ci da questa testimonianza per </text:span><text:span text:style-name="T19">farci intendere </text:span><text:span text:style-name="T29">la distanza abissale che c’è tra la cultura greca e la cultura giudaico-cristiana, e questo per ribadire che per i cristiani è il corpo il fondamento della verità, la redenzione di Cristo avviene con il corpo non con l’anima, perché dell’anima non si aveva la più pallida no</text:span><text:span text:style-name="T30">zione</text:span><text:span text:style-name="T29">. Questo concetto del corpo, </text:span><text:span text:style-name="T30">è </text:span><text:span text:style-name="T29">reso evidente </text:span><text:soft-page-break/><text:span text:style-name="T29">anche dai martiri cristiani che testimoniano la loro fede con il sacrificio del loro corpo.</text:span></text:p>
      <text:h text:style-name="P40" text:outline-level="4"><text:span text:style-name="T42">Sant’</text:span><text:span text:style-name="T43">A</text:span><text:span text:style-name="T41">gostino d’Ippona fa sue le idee di Platone</text:span></text:h>
      <text:h text:style-name="P41" text:outline-level="4"><text:span text:style-name="T44">Succede che a cavallo tra il IV e V sec. d.C. , un grande filosofo platonico, Agostino <text:s/>d’Ippona </text:span><text:span text:style-name="T45">(Sant’Agostino), </text:span><text:span text:style-name="T44">non gli par vero di ricavare dalla teoria platonica, la distinzione </text:span><text:span text:style-name="T46">tra </text:span><text:span text:style-name="T44">anima e corpo che Platone aveva introdotto per risolvere un problema di conoscenza. </text:span><text:span text:style-name="T47">C</text:span><text:span text:style-name="T44">ome si fa a produrre un sapere universale valido per tutti se noi dobbiamo fidarci delle sensazioni corporee? Agostino prende il dualismo che Platone ha inaugurato, lo sgancia dal problema di conoscenza e lo inserisce in un altro scenario che è lo scenario della salvezza. </text:span></text:h>
      <text:p text:style-name="P5"><text:span text:style-name="T29">Succede quindi che nell’anima si manifesta </text:span><text:span text:style-name="T30">D</text:span><text:span text:style-name="T29">io </text:span><text:span text:style-name="T30">C</text:span><text:span text:style-name="T29">risto, la verità “</text:span><text:span text:style-name="T7">interioritate anime</text:span><text:span text:style-name="T29">” dice Agostino “</text:span><text:span text:style-name="T7">habitat deus, habitat christus, habitat veritas”</text:span><text:span text:style-name="T29">. Il du</text:span><text:span text:style-name="T30">a</text:span><text:span text:style-name="T29">lismo ripreso da Platone per risolvere un problema di conoscenza, Agostino ne fa un problema di salvezza. </text:span><text:span text:style-name="T19">Q</text:span><text:span text:style-name="T29">uesto dualismo si ripercuote anche in termini sociologici per cui si </text:span><text:span text:style-name="T19">ipotizzano</text:span><text:span text:style-name="T29"> due città, una città terrena caduca come caduco è il corpo corruttibile, e una città celeste incorruttibile dove accederà l’anima dopo la morte. Questa impostazione di Agostino è quella più diffusa oggi. </text:span><text:span text:style-name="T52">Ancor</text:span><text:span text:style-name="T53">a</text:span><text:span text:style-name="T52"> oggi siamo tutti convinti di avere un’anima ed un corpo. A che cosa dobbiamo questa convinzione? </text:span><text:span text:style-name="T54">L</text:span><text:span text:style-name="T52">a convinzione deriva dal fatto che noi </text:span><text:soft-page-break/><text:span text:style-name="T52">rifiutiamo la morte, non vogliamo morire definitivamente e l’idea che sopravviviamo come anima per qualcuno è una forma di consolazione, di conforto. </text:span></text:p>
      <text:p text:style-name="P10"><text:span text:style-name="T16">Q</text:span><text:span text:style-name="T31">uesta è un’idea che abitiamo da secoli e nessuno potrà distoglierci dal pensarlo. Con questa configurazione che l’anima è immortale e che quindi noi non moriremo mai anche se non è previsto dal canone cristiano perché la chiesa parla di resurrezione dei corpi non di mortalità dell’anima. Con questa strategia il cristianesimo ha messo fuori gioco la cultura greca che è una cultura tragica, la cultura cristiana è una cultura di speranza, di fede che il futuro porterà il rimedio ai mali del passato, se di qua c’è una vita di dolore, di là ci sarà una vita di felicità, di gioia che si chiama paradiso. </text:span></text:p>
      <text:h text:style-name="P39" text:outline-level="4"/>
      <text:h text:style-name="P39" text:outline-level="4">Il senso della vita</text:h>
      <text:p text:style-name="P11"><text:span text:style-name="T31">Dante, nel canto X dell’inferno, giunge al sesto girone, quello degli eretici e li trova Epicuro e gli epicurei “</text:span><text:span text:style-name="T9">che l’anima col corpo morta fanno</text:span><text:span text:style-name="T31">”, quindi Dante è platonico, pensa come Platone. Platone, vedeva l'anima (psychè) come l'elemento individuale che costituisce l'unità della persona, pensa e guida il corpo nei suoi movimenti ed è un soggetto morale responsabile. L'anima, non solo è distinta dal corpo, ma se ne separa anche effettivamente al momento della morte ed è immortale.</text:span></text:p>
      <text:p text:style-name="P11"><text:soft-page-break/><text:span text:style-name="T31">Nietzsche dice: questo è stato il colpo di genio del cristianesimo, aver detto agli uomini non morirete mai. I greci avevano una visione tragica, nel senso che i greci consideravano l’uomo come appare a tutti i viventi, destinato a seguire le leggi di natura, natura che non era creatura di Dio per i greci. Eraclito </text:span><text:span text:style-name="T24">dice:</text:span><text:span text:style-name="T31"> che questo cosmo nessun uomo fece, nessun dio fece è sempre stato e sarà, e questa legge di questo cosmo regolato dalla necessità che vincola la natura alle sue leggi, che tutti i viventi nascono, crescono, generano e muoiono. </text:span></text:p>
      <text:p text:style-name="P11"><text:span text:style-name="T31">L</text:span><text:span text:style-name="T16">e</text:span><text:span text:style-name="T31"> prim</text:span><text:span text:style-name="T16">e</text:span><text:span text:style-name="T31"> parol</text:span><text:span text:style-name="T16">e</text:span><text:span text:style-name="T31"> di filosofia che abbiamo </text:span><text:span text:style-name="T16">sono</text:span><text:span text:style-name="T31"> quell</text:span><text:span text:style-name="T16">e</text:span><text:span text:style-name="T31"> di Anassimandro che dice: da dove i venti hanno la loro nascita, lì hanno anche la loro dissoluzione, perché devono pagare la loro pena dovuta alla tracotanza della loro esistenza, quando uno nasce ha un privilegio rispetto a quelli che non sono nati al posto suo e quindi deve pagare questo privilegio con la morte, secondo l’ordine del tempo dice Anassimandro. Naturalmente questa visione è tragica e la tragedia consiste nel fatto che l’uomo a differenza degli animali, per vivere ha bisogno di costruire un senso. Quante volte la gente si chiede qual’é il senso della mia vita, abbiamo da costruire un senso in vista della morte che è la dissoluzione di ogni senso. Quando re Mida incontra il saggio Sileno, gli chiede quale sia la cosa migliore e più desiderabile per l’uomo. Sileno risponde in due parti. Prima dice: “</text:span><text:span text:style-name="T9">stirpe miserabile ed effimera, figlio del </text:span><text:soft-page-break/><text:span text:style-name="T9">caso e della pena, perché vuoi sapere quello che per te sarebbe meglio non sapere?”</text:span><text:span text:style-name="T31"> Poi continua dicendo: </text:span><text:span text:style-name="T9">“la cosa più desiderabile per l’uomo sarebbe non sapere.”</text:span><text:span text:style-name="T31"> Questa affermazione si contrappone al detto greco, di cui Socrate fu incarnazione, </text:span><text:span text:style-name="T9">«conosci te stesso»</text:span><text:span text:style-name="T31">. Sileno continua dicendo che </text:span><text:span text:style-name="T9">“il meglio è assolutamente irraggiungibile, quindi sarebbe auspicabile non essere nato.  Non potendo evitare di nascere, la cosa migliore sarebbe morire presto.”</text:span><text:span text:style-name="T31"> La dimensione tragica consiste nel </text:span><text:span text:style-name="T32">fatto che l’uomo per vivere ha bisogno di costruirsi un senso in vista della morte che è l’implosione di ogni senso. Questa è la legge della natura per i greci.</text:span></text:p>
      <text:p text:style-name="P5"><text:span text:style-name="T31">Nietzsche </text:span><text:span text:style-name="T32">racconta che nel 33 dopo cristo i naviganti udirono un grande grido nel mediterraneo, il grido diceva “</text:span><text:span text:style-name="T10">il grande pan è morto e con pan è morta la tragedia”</text:span><text:span text:style-name="T32">, pan era il dio dei pastori, un dio completamente corporeo, un dio sensuale, un dio che è stato accolto da tutti gli dei con somma gioia, per questo si chiama pan, pan vuol dire tutto. Perché è morto pan? Perché nel 33 dopo cristo è arrivata la religione cristiana che ha seppellito la tragicità della cultura greca. </text:span><text:span text:style-name="T31">Nietzsche </text:span><text:span text:style-name="T32">dice che la tragedia non è un termine letterario ma è l’</text:span><text:span text:style-name="T21">essenza </text:span><text:span text:style-name="T32">della grecità e dopo la grecità non c’è più tragedia. </text:span><text:span text:style-name="T24">N</text:span><text:span text:style-name="T32">eppure Shakespeare è un tragico, racconta narrazioni tragiche ma non c’è più tragedia nella nella cultura cristiana perché c’è </text:span><text:span text:style-name="T21">la </text:span><text:span text:style-name="T32">speranza di salvezza. </text:span></text:p>
      <text:p text:style-name="P21"><text:soft-page-break/>Poi ognuno di noi si può collocare dove vuole, uno dice io preferisco essere cristiano e andare avanti come sempre, e chi lo può impedire visto che siamo schiavi delle nostre idee. <text:span text:style-name="T21">O</text:span>ppure può mettere in questione le proprie idee, cosa che la gente <text:span text:style-name="T21">comune</text:span> non vuol fare perché mettere in questione le proprie idee vuol dire andare in crisi, vuol dire sostanzialmente di rivisitare tutta la propria visione del mondo, cosa che per esempio si trovano a fare gli adolescenti perché compare la sessualità che è una cosa che li obbliga a riformulare radicalmente la loro visione del mondo. </text:p>
      <text:h text:style-name="P38" text:outline-level="4">Gli adolescenti e i loro turbamenti</text:h>
      <text:p text:style-name="P21">Prima che nascesse la sessualità, il bambino di fronte al sole che tramonta diceva: il sole è andato a nanna, dopo quando compare la sessualità il tramonto diventa un evento romantico in uno scenario d’amore, rivisitazione radicale della propria visione del mondo, ecco perché gli adolescenti sono in crisi, sono costretti a <text:span text:style-name="T24">cambiare radicalmente </text:span>tutte le idee che avevano da bambini e rimettere in gioco una visione del mondo <text:span text:style-name="T24">totalmente</text:span> nuova.</text:p>
      <text:p text:style-name="P22">In un bel saggio del 1909 Freud dice che la scuola deve fare qualcosa di meglio che indurre i giovani al suicidio, <text:span text:style-name="T24">(</text:span>si vede che allora le cose andavano in questa direzione<text:span text:style-name="T24">)</text:span>. <text:span text:style-name="T21">A</text:span>nche oggi, il numero dei suicidi scolastici sono tantissimi. Gli adolescenti subiscono una <text:soft-page-break/>trasformazione radicale, devono rivedere chi sono, capire la loro identità in una riformulazione completamente diversa, vedono le cose del mondo in una pluralità di significati che dapprima neppure erano concepibili, e questo sforzo psichico dice Freud, porta ai ragazzi, anche se non ne sono consapevoli, turbamenti, inquietudine, ansie, persino delle pulsioni di morte per cui la scuola non deve essere una prova di vita ma semplicemente un gioco della vita. <text:span text:style-name="T21">G</text:span>ioco non significa che a scuola si deve giocare, significa che il gioco ha delle regole, a scuola si imparano le regole, però se queste regole si infrangono in un contesto di gioco, e non in un contesto di vita, se sbagli, sei ancora perdonato perché non hai ancora sbagliato nella vita, ma se non le impari lì, quando sbagli nella vita, sono irrecuperabili.</text:p>
      <text:p text:style-name="P4"/>
      <text:h text:style-name="P38" text:outline-level="4"><text:span text:style-name="T21">P</text:span>latone e la follia del corpo</text:h>
      <text:p text:style-name="P12"><text:span text:style-name="T21">Con</text:span><text:span text:style-name="T32"> </text:span><text:span text:style-name="T33">Sant’</text:span><text:span text:style-name="T32">Agostino, </text:span><text:span text:style-name="T21">si modifica </text:span><text:span text:style-name="T32">lo scenario </text:span><text:span text:style-name="T21">platonico </text:span><text:span text:style-name="T32">del rapporto tra anima e corpo. Platone considera il corpo come una prigione per l'anima. Esso è materiale, corruttibile e fonte di passioni e desideri che distraggono l'anima dalla sua vera natura spirituale. Secondo la teoria delle idee, l'anima ha preesistito al corpo e ha contemplato il mondo delle idee perfette. Incarnandosi nel corpo, l'anima dimentica questa </text:span><text:soft-page-break/><text:span text:style-name="T32">conoscenza e viene imprigionata in un mondo di imperfezioni e sensi. </text:span></text:p>
      <text:p text:style-name="P13"><text:span text:style-name="T34">C</text:span><text:span text:style-name="T32">hiama folle tutto ciò che non sta alle regole della ragione, tutto ciò che non è utile per costruire un sapere universale che sia valido per tutti, e siccome uno la pensa diversamente dall’altro, è fuori dal sapere. </text:span><text:span text:style-name="T34">B</text:span><text:span text:style-name="T32">isogna distaccarsi dal corpo, e più l’anima si separa dal corpo più prescinde dalle passioni, più prescinde dalle malattie, perché il corpo cambia continuamente. </text:span></text:p>
      <text:p text:style-name="P14"><text:span text:style-name="T34">U</text:span><text:span text:style-name="T32">n conto è se </text:span><text:span text:style-name="T25">si è </text:span><text:span text:style-name="T32">bambin</text:span><text:span text:style-name="T25">i</text:span><text:span text:style-name="T32">, adolescent</text:span><text:span text:style-name="T25">i</text:span><text:span text:style-name="T32"> o adult</text:span><text:span text:style-name="T25">i</text:span><text:span text:style-name="T32">, se vecchi, se </text:span><text:span text:style-name="T25">si hanno</text:span><text:span text:style-name="T32"> passioni </text:span><text:span text:style-name="T25">o non se ne hanno</text:span><text:span text:style-name="T32">. Il corpo è </text:span><text:span text:style-name="T25">associato al mondo sensibile e materiale, soggetto a cambiamento e corruzione.</text:span><text:span text:style-name="T32"> </text:span><text:span text:style-name="T25">L</text:span><text:span text:style-name="T32">e opinioni del corpo non sono da prendere in considerazione, </text:span><text:span text:style-name="T25">per il fatto di non essere in grado di fondare il sapere e pertanto il corpo è follia. Qui</text:span><text:span text:style-name="T32"> comincia la storia tragica del corpo, svalutato da Platone il quale dice che, l’esercizio della filosofia è un esercizio di morte, di mortificazione del corpo, un contenimento delle passioni del corpo, perché le passioni deviano la mente, la rendono meno lucida e più l’anima ha la capacità di astrarre, produrre idee, di lavorare con i numeri, con i rapporti, più l’anima si separa dal corpo. </text:span><text:span text:style-name="T25">P</text:span><text:span text:style-name="T32">iù prescinde dal corpo più è pura e più raggiunge la verità. </text:span><text:span text:style-name="T35">Questo corpo che per Platone è considerato nello scenario della follia, con Agostino viene considerato il luogo del peccato, della colpa, </text:span><text:soft-page-break/><text:span text:style-name="T35">corrotto dalla carne, dalle passioni e quindi dal corpo bisogna prescindere, moriamo con un corpo corruttibile diceva san Paolo e risorgeremo con un cuore incorruttibile, il corpo è corruzione, il corpo si disfa, il corpo muore e quel corpo li non vale niente e durante la vita dobbiamo contenere le passioni, le pulsioni, dobbiamo mortificarlo e nella storia dell’occidente è stata una storia di mortificazione del corpo. </text:span></text:p>
      <text:p text:style-name="P14"><text:span text:style-name="T25">Con </text:span><text:span text:style-name="T35">Platone, </text:span><text:span text:style-name="T25">il corpo è da condannare</text:span><text:span text:style-name="T35"> perché non <text:s/>produ</text:span><text:span text:style-name="T55">ce</text:span><text:span text:style-name="T35"> un sapere universale, con Agostino lo </text:span><text:span text:style-name="T25">si </text:span><text:span text:style-name="T35">condanna perché non concorre alla salvezza dell’anima, anzi la impedisce.</text:span></text:p>
      <text:p text:style-name="P23">Naturalmente le donne, che sono più corpo dei maschi, <text:span text:style-name="T25">e </text:span>non è un disprezzo del mondo femminile <text:span text:style-name="T25">bensì</text:span> <text:span text:style-name="T25">la consapevolezza che</text:span> nella struttura della donna c’è un investimento corporeo decisamente superiore <text:span text:style-name="T26">a quello dei </text:span>maschi, se non altro perché generano, i maschi non generano. Il loro impegno per la corporeità è un impegno molto più significativo rispetto ai maschi ed è per questo che abbiamo avuto una rimozione della donna e la storia della donna ce l<text:span text:style-name="T25">a</text:span> racconta questa loro vita infelice, tragica per duemila anni.</text:p>
      <text:p text:style-name="P24"/>
      <text:h text:style-name="P38" text:outline-level="4"><text:soft-page-break/>Il corpo secondo Cartesio</text:h>
      <text:p text:style-name="P25">Facciamo un salto di mille anni, <text:span text:style-name="T26">e arriviamo all’epoca di Cartesio </text:span>per <text:span text:style-name="T26">comprendere </text:span>ché in questi mille anni non è successo niente in termini di paradigmi che cambino l’impostazione dell’anima e del corpo. Qui succede un altro disastro per il corpo. </text:p>
      <text:p text:style-name="P26">Cartesio, un filosofo ma anche scienziato, distingue tra la res cogitans, la sostanza immateriale e pensante, e la res extensa, la sostanza materiale e spaziale. Il corpo, in quanto parte della res extensa, può essere messo in dubbio, in quanto soggetto a inganni e illusioni. La mente, invece, in quanto capace di dubitare e riflettere, rappresenta una certezza incrollabile. Cartesio, dubitando sistematicamente di ogni conoscenza pregressa, giunge alla conclusione che l'unica cosa di cui può avere una certezza assoluta è la sua stessa esistenza in quanto essere pensante. Il dubbio stesso, infatti, implica l'atto del pensare, e ciò dimostra l'esistenza di un "io" che pensa, punto focale del suo pensiero filosofico, espresso nel celebre "Cogito ergo sum" (Penso, dunque sono).</text:p>
      <text:p text:style-name="P26"><text:span text:style-name="T26">I</text:span>nvece come corpo posso anche non averlo perché non concorre alla chiarificazione della res cogitans, anzi io saprò qualcosa del corpo seriamente solo se lo considero con le categorie della mente, ovvero la ragione e l'intelletto. Cartesio traduce il nostro corpo in una <text:soft-page-break/>sommatoria di organi, <text:span text:style-name="T26">nasce così </text:span>l’organismo e nasce anche la medicina. <text:span text:style-name="T26">L</text:span>a medicina era una roba da filosofi, alchimisti, stregoni, maghi, teoria degli umori e cose del genere, invece Cartesio dice: incominciamo a guardare il corpo con le idee della mente e non dobbiamo considerarlo nella sua espressione come si manifesta nel mondo della vita, <text:span text:style-name="T36">ma dobbiamo descriverlo con le idee chiare e distinte del</text:span><text:span text:style-name="T37">la </text:span><text:span text:style-name="T36">res cogitans, cioè dell’anima o della mente che dir si voglia. Quali sono le idee chiare e distinte? </text:span><text:span text:style-name="T37">Sono le idee della scienza dell’epoca di Cartesio che era la fisica. </text:span><text:span text:style-name="T26">Del </text:span><text:span text:style-name="T37">corpo ne conosc</text:span><text:span text:style-name="T26">eremo </text:span><text:span text:style-name="T37">la verità solo se lo consideriamo con le idee chiare e distinte della fisica, quindi lo consideriamo sotto il profilo della quantità, del peso, della misura, della circolazione dei liquidi, della trasmissione nervosa, questo è il corpo. </text:span><text:span text:style-name="T26">Non è</text:span><text:span text:style-name="T37"> quello che io sento nella mia vita, <text:s/>ma come è descritto dalla mente con le idee chiare e distinte che sono quelle della fisica. Nasce un concetto nuovo di corpo che è l’organismo che non è il corpo. </text:span></text:p>
      <text:p text:style-name="P27"><text:span text:style-name="T37">Quando </text:span><text:span text:style-name="T26">noi</text:span><text:span text:style-name="T37"> us</text:span><text:span text:style-name="T26">iamo </text:span><text:span text:style-name="T37">le braccia per abbracciare, st</text:span><text:span text:style-name="T26">iamo</text:span><text:span text:style-name="T37"> esprimendo un sentimento, se invece </text:span><text:span text:style-name="T26">guardiamo l’abbraccio con le idee </text:span><text:span text:style-name="T37">della fisica, il braccio viene considerato dal punto di vista della dinamica nervoso muscolare, </text:span><text:span text:style-name="T26">che </text:span><text:span text:style-name="T37">non è lo stesso braccio </text:span><text:span text:style-name="T26">che configura un abbraccio come sentimento</text:span><text:span text:style-name="T37">; quando si va dall’oculista i nostri occhi servono per instaurare un rapporto con il medico che abbiamo di fronte, vediamo se è simpatico e </text:span><text:soft-page-break/><text:span text:style-name="T37">se possiamo fidarci o non fidarci di lui, cioè i nostri occhi siamo noi, poi quando il medico ci piazza i suoi apparecchi sul nostro occhio, il nostro occhio non è più quello di prima che guarda il mondo ma diventa un oggetto guardato dagli apparecchi dell’oculista. Il </text:span><text:span text:style-name="T26">nostro</text:span><text:span text:style-name="T37"> corpo coincide con la </text:span><text:span text:style-name="T26">nostra</text:span><text:span text:style-name="T37"> soggettività ed è preso in ingaggio dal mondo in cui </text:span><text:span text:style-name="T26">ci troviamo.</text:span><text:span text:style-name="T37"> </text:span><text:span text:style-name="T26">Il</text:span><text:span text:style-name="T37"> corpo di adesso non sarà </text:span><text:span text:style-name="T26">lo stesso </text:span><text:span text:style-name="T37">corpo </text:span><text:span text:style-name="T26">di questa </text:span><text:span text:style-name="T37">sera </text:span><text:span text:style-name="T26">quando </text:span><text:span text:style-name="T37">s</text:span><text:span text:style-name="T26">aremo</text:span><text:span text:style-name="T37"> a cena. </text:span><text:span text:style-name="T26">Là</text:span><text:span text:style-name="T37"> trover</text:span><text:span text:style-name="T26">emo</text:span><text:span text:style-name="T37"> un altro corpo determinato da un’altra situazione che non è la situazione attuale. Il corpo è deciso dal modo della vita, ma se </text:span><text:span text:style-name="T26">noi</text:span><text:span text:style-name="T37"> dovessi</text:span><text:span text:style-name="T26">mo</text:span><text:span text:style-name="T37"> regolar</text:span><text:span text:style-name="T26">ci </text:span><text:span text:style-name="T37">sul modo della vita per esaminare il corpo, la medicina non sarebbe nata. </text:span><text:span text:style-name="T26">B</text:span><text:span text:style-name="T37">isogna ridurre tutto il mondo della vita </text:span><text:span text:style-name="T26">tutto ad</text:span><text:span text:style-name="T37"> organismo. Quando </text:span><text:span text:style-name="T26">ci troviamo </text:span><text:span text:style-name="T37">in ospedale e </text:span><text:span text:style-name="T26">ci</text:span><text:span text:style-name="T37"> lament</text:span><text:span text:style-name="T26">iamo</text:span><text:span text:style-name="T37"> che i medici non hanno un volto umano di che cosa </text:span><text:span text:style-name="T26">ci stiamo </text:span><text:span text:style-name="T37">lamentando, del fatto che il </text:span><text:span text:style-name="T26">nostro</text:span><text:span text:style-name="T37"> corpo è stato ridotto a organismo e </text:span><text:span text:style-name="T26">che siamo </text:span><text:span text:style-name="T37">dei rappresentanti d’organo. </text:span><text:span text:style-name="T26">Abbiamo</text:span><text:span text:style-name="T37"> mal di fegato, and</text:span><text:span text:style-name="T26">iamo</text:span><text:span text:style-name="T37"> nel reparto di patologia, a</text:span><text:span text:style-name="T26">bbiamo </text:span><text:span text:style-name="T37">i polmoni messi male, and</text:span><text:span text:style-name="T26">iamo</text:span><text:span text:style-name="T37"> nel reparto di pneumologia, </text:span><text:span text:style-name="T26">abbiamo </text:span><text:span text:style-name="T37">il cuore in disordine, and</text:span><text:span text:style-name="T26">iamo</text:span><text:span text:style-name="T37"> in cardiologia. </text:span><text:span text:style-name="T26">Diventiamo </text:span><text:span text:style-name="T37">dei rappresentanti d’organo. </text:span><text:span text:style-name="T26">I</text:span><text:span text:style-name="T37"> medici non hanno un volto umano? </text:span><text:span text:style-name="T26">M</text:span><text:span text:style-name="T37">a non lo devono avere, ma perché </text:span><text:span text:style-name="T26">c</text:span><text:span text:style-name="T37">i lament</text:span><text:span text:style-name="T26">iamo</text:span><text:span text:style-name="T37">? Perché </text:span><text:span text:style-name="T26">comprendiamo </text:span><text:span text:style-name="T37">dentro di </text:span><text:span text:style-name="T26">n</text:span><text:span text:style-name="T37">oi che l’organismo che i medici trattano non coincide con il </text:span><text:span text:style-name="T26">nostro</text:span><text:span text:style-name="T37"> corpo ma è la </text:span><text:soft-page-break/><text:span text:style-name="T37">riduzione che fanno del </text:span><text:span text:style-name="T26">no</text:span><text:span text:style-name="T37">stro corpo per poter operare in maniera scientifica. </text:span></text:p>
      <text:h text:style-name="P38" text:outline-level="4"><text:span text:style-name="T27">Il linguaggio filosofico e la</text:span> cultura umanista</text:h>
      <text:p text:style-name="P28"><text:span text:style-name="T37">I tedeschi che sono persone serie, hanno una lingua seria, non come noi italiani che abbiamo una lingua piena di aggettivi e di avverbi perché abbiamo i nomi imprecisi, noi abbiamo una lingua letteraria, infatti siamo pi</text:span><text:span text:style-name="T38">e</text:span><text:span text:style-name="T37">ni di poeti di romanzieri, di narratori, mentre i tedeschi hanno una lingua molto seria, ci sono solo due lingue </text:span><text:span text:style-name="T39">che rappresentano la filosofia,</text:span><text:span text:style-name="T37"> il greco ed il tedesco. </text:span><text:span text:style-name="T39">Altre</text:span><text:span text:style-name="T37"> lingue non sono idonee alla filosofia, non parliamo degli inglese ai quali manca l’astrazione, non hanno l’impersonale perché loro devono parlare sul concreto come fanno i bambini. </text:span></text:p>
      <text:p text:style-name="P28"><text:span text:style-name="T37">Noi italiani usiamo la parola: </text:span><text:span text:style-name="T11">si dice</text:span><text:span text:style-name="T37">; in tedesco: </text:span><text:span text:style-name="T12">e</text:span><text:span text:style-name="T11">s heißt</text:span><text:span text:style-name="T37">, in francese: </text:span><text:span text:style-name="T11">on dit</text:span><text:span text:style-name="T37">; gli inglesi dicono </text:span><text:span text:style-name="T11">you</text:span><text:span text:style-name="T37"> perché se non vedono nessuno non sanno di che cosa parlano, le forme astratte </text:span><text:span text:style-name="T11">qualcuno</text:span><text:span text:style-name="T37">, </text:span><text:span text:style-name="T11">nessuno</text:span><text:span text:style-name="T37">, </text:span><text:span text:style-name="T11">anybody</text:span><text:span text:style-name="T37">, </text:span><text:span text:style-name="T11">somebody</text:span><text:span text:style-name="T37"> se non vedono il </text:span><text:span text:style-name="T11">body</text:span><text:span text:style-name="T37"> <text:s/>non sanno di cosa parlano, non riescono ad astrarre. </text:span><text:span text:style-name="T38">Platone </text:span><text:span text:style-name="T37">non è arrivato da loro e noi stiamo buttando le nostre scuole umanistiche al livello della cultura anglo-americana e questo è un </text:span><text:span text:style-name="T39">vero </text:span><text:span text:style-name="T37">disastro.</text:span></text:p>
      <text:p text:style-name="P24"><text:span text:style-name="T37">Le facoltà umanistiche servono a formare l’uomo ed io penso che le scuole dalla prima elementare fino alle superiori sono tutti anni di formazione, bisogna formare </text:span><text:soft-page-break/><text:span text:style-name="T37">l’uomo e l’uomo lo formi con i saperi umanistici, le competenze scientifiche le impari all’università e non ci metti neanche tanto ad impararle perché nell’età della tecnica le cose da imparare sono molto schematiche, veloci e rapide. Noi però stiamo applicando questo </text:span><text:span text:style-name="T27">metodo</text:span><text:span text:style-name="T37">, riempiamo le scuole di computer invece di riempirle di letteratura e quando dico letteratura non dico una cosa qualsiasi perché noi per natura abbiamo le pulsioni, a mezza strada tra natura e cultura abbiamo le emozioni, ma i sentimenti si imparano, i sentimenti non sono naturali, i sentimenti si insegnano. Tutte le tribù primitive hanno insegnato i sentimenti attraverso miti in cui si poteva distinguere che cosa è sacro e cosa è profano, cosa è puro e cosa è impuro, cosa è vero e cosa è falso, cos’è totem e cos’è tabù. </text:span><text:span text:style-name="T27">S</text:span><text:span text:style-name="T37">ono arrivate le religioni che con i loro precetti hanno cominciato a scremare questi discorsi e a dare una struttura d’ordine all’umanità, p</text:span><text:span text:style-name="T56">ar</text:span><text:span text:style-name="T37">t</text:span><text:span text:style-name="T56">e</text:span><text:span text:style-name="T37">ndo da uno stato selvaggio ad uno stato quasi civile, è arrivata la filosofia con l’introduzione della ragione. Le </text:span><text:span text:style-name="T27">fiabe di una volta </text:span><text:span text:style-name="T37">ci raccontavano delle storie che noi possiamo considerare storie truci, perché non sono storie delicate quelle di cappuccetto rosso dove c’è il cacciatore che taglia la pancia al lupo </text:span><text:span text:style-name="T27">e </text:span><text:span text:style-name="T37">tira fuori la nonna. </text:span><text:span text:style-name="T27">R</text:span><text:span text:style-name="T37">oba truce, ma come dice Freud non do</text:span><text:span text:style-name="T27">bbiamo</text:span><text:span text:style-name="T37"> esonerare i bambini dalla visione del male perché se gli descrivete che il mondo è bello e buono e ci sono </text:span><text:span text:style-name="T27">soltanto </text:span><text:span text:style-name="T37">cose belle, il </text:span><text:soft-page-break/><text:span text:style-name="T37">bambino cresce </text:span><text:span text:style-name="T27">come dice Freud</text:span><text:span text:style-name="T37"> da handicappato psichico, perché quando si troverà di fronte al male non saprà come reagire perché non ne ha mai sentito parlare. Allo stesso modo, quando muore un parente non do</text:span><text:span text:style-name="T27">bbiamo</text:span><text:span text:style-name="T37"> mandare il bambino da una zia, lo do</text:span><text:span text:style-name="T27">bbiamo</text:span><text:span text:style-name="T37"> portare al funerale, capirà la morte limitatamente alla sua capacità di percezione, <text:s/>dimenticherà </text:span><text:span text:style-name="T27">il funerale subito</text:span><text:span text:style-name="T37"> dopo, gli </text:span><text:span text:style-name="T27">compreremo</text:span><text:span text:style-name="T37"> un gelato se è un po' triste anche se non capisce perché lo è, ma intanto ha imparato che c’è anche la morte. </text:span><text:span text:style-name="T27">Questo</text:span><text:span text:style-name="T37"> dice Freud. </text:span></text:p>
      <text:p text:style-name="P29">I miti greci, altro che falsi e bugiardi. <text:span text:style-name="T27">C’</text:span>’era una grande fenomenologia di passioni e sentimenti umani, <text:span text:style-name="T22">Z</text:span>eus era il potere, <text:span text:style-name="T22">A</text:span>tena era l’intelligenza, <text:span text:style-name="T22">A</text:span>frodite la sessualità, <text:span text:style-name="T22">A</text:span>pollo la bellezza, <text:span text:style-name="T22">D</text:span>ioniso la follia, <text:span text:style-name="T22">A</text:span>res l’aggressività.</text:p>
      <text:p text:style-name="P29"><text:span text:style-name="T27">O</text:span>ggi non possiamo più ricorrere ai miti, però abbiamo la letteratura e che cosa <text:span text:style-name="T27">ci</text:span> racconta la letteratura? <text:span text:style-name="T27">Ci</text:span> racconta cos’è il dolore in tutte le sue coniugazioni e declinazioni, cos’è l’amore, dall’amore del dolce stil novo a<text:span text:style-name="T27">lle orgie</text:span> dei primitivi, alla passione ardente a quella fantastica e tutto <text:span text:style-name="T27">c</text:span>i racconta la letteratura, <text:span text:style-name="T27">c</text:span>i racconta cos’è l’angoscia che cos’è la disperazione, che cos’è la speranza, il suicidio, la noia, se queste cose non le impari<text:span text:style-name="T27">amo</text:span> come fa<text:span text:style-name="T27">cciamo</text:span> a difender<text:span text:style-name="T27">ci</text:span> quando <text:span text:style-name="T27">c</text:span>i capita un dolore. <text:span text:style-name="T27">N</text:span>on sa<text:span text:style-name="T27">ppiamo</text:span> come definirlo perché <text:span text:style-name="T27">c</text:span>i è mancata quella cultura, se una cosa la conosc<text:span text:style-name="T27">iamo</text:span>, <text:span text:style-name="T27">c</text:span>i difende<text:span text:style-name="T27">remo</text:span> meglio di una cosa sconosciuta. La letteratura <text:span text:style-name="T27">c</text:span>i racconta tutte le strategie per uscire dal <text:soft-page-break/>dolore, non c’è soltanto la strategia del giovane <text:span text:style-name="T27">W</text:span>erther che si suicida, ci sono tante altre strategie per uscire dal dolore e le d<text:span text:style-name="T27">obbiamo</text:span> sapere. <text:span text:style-name="T27">G</text:span>iustamente <text:span text:style-name="T23">E</text:span>schilo <text:s/>dice <text:span text:style-name="T27">che </text:span>il dolore è un errore della mente, se la tua mente è sguarnita non hai gli strumenti per risolvere il dolore e allora vai a<text:span text:style-name="T27">d</text:span> <text:span text:style-name="T27">assumere</text:span> farmaci.</text:p>
      <text:p text:style-name="P3"/>
      <text:h text:style-name="P38" text:outline-level="4">Cartesio e la nascita della medicina scientifica </text:h>
      <text:p text:style-name="P6">Torniamo al nostro Cartesio, <text:span text:style-name="T27">cercando di capire </text:span>la differenza tra corpo e organismo. </text:p>
      <text:p text:style-name="P7"><text:span text:style-name="T37">I medici guardano il </text:span><text:span text:style-name="T48">nostro</text:span><text:span text:style-name="T37"> corpo come si guarda una qualsiasi cosa, lo sottopongono ad esami come si esamina qualsiasi cosa, quando </text:span><text:span text:style-name="T27">si va dal medico e facciamo gli esami</text:span><text:span text:style-name="T37"> diventano <text:s/>un oggetto di laboratorio, ma </text:span><text:span text:style-name="T27">noi</text:span><text:span text:style-name="T37"> non si</text:span><text:span text:style-name="T27">amo</text:span><text:span text:style-name="T37"> un oggetto di laboratorio, non si</text:span><text:span text:style-name="T27">amo</text:span><text:span text:style-name="T37"> solamente organismo, si</text:span><text:span text:style-name="T27">amo</text:span><text:span text:style-name="T37"> un corpo vivente che è in relazione con il mondo, il mondo che ci impegna che ci stimola, noi siamo una risposta al mondo con il nostro corpo. </text:span><text:span text:style-name="T48">Ha fatto bene Cartesio</text:span><text:span text:style-name="T37"> </text:span><text:span text:style-name="T48">a distinguere corpo e organismo, perché così ha inaugurato la medicina scientifica, siamo noi che dobbiamo sapere che il nostro corpo è irriducibile all’organismo che è tutta un’altra cosa, il nostro corpo coincide con la nostra soggettività, io non dico ho un corpo stanco, io dico sono stanco, perfetta coincidenza del mio io con il mio corpo, se si fa una scissione fra l’io ed il corpo allora si entra in una </text:span><text:soft-page-break/><text:span text:style-name="T48">zona schizofrenica, che </text:span><text:span text:style-name="T27">è </text:span><text:span text:style-name="T48">il principio della dissociazione che consiste esattamente nella scissione tra l’io ed il corpo.</text:span></text:p>
      <text:p text:style-name="P15">Dopo che Cartesio ha inaugurato questa visione organicistica del nostro corpo, nasce la medicina scientifica, il corpo ridotto a cosa.</text:p>
      <text:p text:style-name="P8"><text:span text:style-name="T49">Delle scienze psicologiche, la psichiatria è la prima a nascere, prima ancora delle scienze psicologiche, prima ancora della psicologia, prima ancora della psicanalisi, nasce la psichiatria perché gli psichiatri sono nati non tanto per curare i pazienti quanto piuttosto per difendere la società dal fastidio che da</text:span><text:span text:style-name="T27">vano</text:span><text:span text:style-name="T49"> i matti. In quel periodo, le persone con disturbi mentali erano spesso rinchiuse in manicomi o addirittura trattate come criminali. Pinel, </text:span><text:span text:style-name="T27">medico francese del XVIII secolo, </text:span><text:span text:style-name="T49">ispirandosi ai principi umanitari dell'Illuminismo e alla visione cartesiana della separazione tra mente e corpo, ha rivoluzionato il trattamento della malattia mentale. </text:span><text:span text:style-name="T27">I</text:span><text:span text:style-name="T49">l pazzo manca di due categorie per fare il male coscientemente. </text:span><text:span text:style-name="T28">Per fare il male,</text:span><text:span text:style-name="T49"> </text:span><text:span text:style-name="T27">si </text:span><text:span text:style-name="T49">dev</text:span><text:span text:style-name="T27">e</text:span><text:span text:style-name="T49"> avere piena avvertenza e deliberato consenso, dev</text:span><text:span text:style-name="T27">e</text:span><text:span text:style-name="T49"> sapere quel che fa, e </text:span><text:span text:style-name="T28">avere </text:span><text:span text:style-name="T27">la volontà di farlo</text:span><text:span text:style-name="T49">. </text:span><text:span text:style-name="T27">I</text:span><text:span text:style-name="T49"> pazzi non hanno né l’una ne l’altra cosa, quindi non possono essere assimilati ai criminali e allora portiamoli fuori dalle prigioni e mettiamo</text:span><text:span text:style-name="T27">li</text:span><text:span text:style-name="T49"> in un’altra prigione che si chiama manicomio. </text:span><text:span text:style-name="T28">Qui Galimberti evidenzia la contraddizione </text:span><text:soft-page-break/><text:span text:style-name="T28">intrinseca in questo approccio. Da un lato, dichiariamo che coloro che soffrono di malattie mentali non sono criminali e quindi non dovrebbero essere puniti. Dall'altro lato, li confiniamo in istituzioni che spesso assomigliano a carceri, rimuovendoli effettivamente dalla società e negando loro le loro libertà fondamentali.</text:span><text:span text:style-name="T49"> Questo doppio standard, secondo Galimberti, ha le sue radici nella tradizione cristiana, che storicamente ha visto la follia con un misto di paura e pietà. Questa percezione ha portato alla segregazione ed emarginazione degli individui con condizioni di salute mentale, perpetuando lo stigma e la discriminazione. </text:span></text:p>
      <text:p text:style-name="P8"><text:span text:style-name="T28">Nel XVIII secolo nasce</text:span><text:span text:style-name="T49"> la psichiatria dell’ottocento e insieme nasce anche il positivismo che vuole dare un assetto scientifico anche alla scienza dell’anima. </text:span><text:span text:style-name="T28">Qui </text:span><text:span text:style-name="T49">abbiamo quella grande definizione del grande psichiatra </text:span><text:span text:style-name="T27">Wilhelm </text:span><text:span text:style-name="T49">Griesinger che dice che le malattie dell’anima sono malattie del cervello.</text:span></text:p>
      <text:p text:style-name="P8"><text:span text:style-name="T50">L</text:span><text:span text:style-name="T49">a neuroscienze dice che sei depresso perché ti manca un po' di serotonina, se sei euforico perché ti manca un po' di dopamina, però quell</text:span><text:span text:style-name="T28">o</text:span><text:span text:style-name="T49"> che le neuroscienze non ci diranno mai, </text:span><text:span text:style-name="T28">perché non sanno </text:span><text:span text:style-name="T49">dire di che qualità è la mia depressione e che significa la mia depressione rispetto alla tua depressione. </text:span><text:span text:style-name="T28">N</text:span><text:span text:style-name="T49">on è sufficiente che </text:span><text:span text:style-name="T28">si</text:span><text:span text:style-name="T49"> dica che entrambi s</text:span><text:span text:style-name="T28">ono</text:span><text:span text:style-name="T49"> deficitari di serotonina, perché la mia depressione ha una sua configurazione, ha un </text:span><text:soft-page-break/><text:span text:style-name="T49">altro significato rispetto alla </text:span><text:span text:style-name="T28">sua</text:span><text:span text:style-name="T49">, ma la qualità specifica delle rispettive depressioni non viene a galla a livello neuroscientifico. </text:span><text:span text:style-name="T28">G</text:span><text:span text:style-name="T49">iustamente </text:span><text:span text:style-name="T51">Sartre </text:span><text:span text:style-name="T28">fa rilevare </text:span><text:span text:style-name="T51">che </text:span><text:span text:style-name="T28">poiché </text:span><text:span text:style-name="T51">noi consideriamo le cose dal punto scientifico, </text:span><text:span text:style-name="T28">nel caso di riso e pianto, </text:span><text:span text:style-name="T51">do</text:span><text:span text:style-name="T28">vremmo dire che sono la stessa cosa solo perché </text:span><text:span text:style-name="T51">impegnano la stessa muscolatura dello stesso sistema nervoso facciale? Sartre sottolinea che il significato del riso e del pianto non risiede semplicemente nella loro espressione fisiologica, ma nel contesto emotivo e cognitivo in cui si verificano.</text:span></text:p>
      <text:p text:style-name="P8"><text:span text:style-name="T28">S</text:span><text:span text:style-name="T51">e non arriviamo al significato delle cose non abbiamo colto l’essenza della malattia, allora occorre qualcos’altro, che è la parola, gli uomini parlano, sono tra gli animali quelli che parlano e parlando raccontano la storia della loro “anima” che non c’è.</text:span></text:p>
      <text:p text:style-name="P8"><text:span text:style-name="T51">Poi è arrivato Freud, anche Freud dà una mano ai psichiatri </text:span><text:span text:style-name="T28">i</text:span><text:span text:style-name="T51">n senso positivo. Una volta c’era una definizione </text:span><text:span text:style-name="T28">nella quale</text:span><text:span text:style-name="T51"> venivano raccolte tutte le malattie che </text:span><text:span text:style-name="T28">venivano classificate sotto il nome di </text:span><text:span text:style-name="T51"><text:s/>isteria, naturalmente affibbiata alle donne perché istero è </text:span><text:span text:style-name="T28">la cavità uterina, per cui </text:span><text:span text:style-name="T51">le donne sono soggette a isteria. </text:span><text:span text:style-name="T28">A</text:span><text:span text:style-name="T51">ncora oggi, </text:span><text:span text:style-name="T28">quando </text:span><text:span text:style-name="T51">i maschi litigano con le donne dicono </text:span><text:span text:style-name="T28">che è </text:span><text:span text:style-name="T51">isterica. </text:span><text:span text:style-name="T28">I maschi </text:span><text:span text:style-name="T51">invece no</text:span><text:span text:style-name="T28">n lo sono</text:span><text:span text:style-name="T51">, non hanno l’utero quindi non sono isterici. Cosa vuol dire isterico? </text:span><text:span text:style-name="T28">I</text:span><text:span text:style-name="T51">sterico è colui che sta usando il suo corpo per </text:span><text:span text:style-name="T28">chiedere</text:span><text:span text:style-name="T51"> qualcosa. </text:span><text:span text:style-name="T28">Galimberti fa questo </text:span><text:soft-page-break/><text:span text:style-name="T51">esempio: se nessuno mi ama e io voglio essere amato, se dico ho bisogno di amore non mi considera nessuno, se cado in terra con lancinanti dolori di stomaco, di svenimenti, c’è sempre qualcuno che mi raccoglie, mi rivolge una parola buona, uno sguardo attento, c’è sempre qualcuno che mi dà qualche briciola d’amore e allora il corpo serve per ottenere quello che detto verbalmente non si sarebbe potuto ottenere. E’ una strategia l’isteria non è una malattia. Quanta gente va dal medico e si fa fare certificati il cui significato è: dico a mio marito di smetterla di insultarmi o di picchiarmi, quanta gente va in tribunale con i certificati per ottenere quello che a parole non si otterrebbe perché siamo sordi alla richiesta d’aiuto, la richiesta d’amore. </text:span><text:span text:style-name="T28">N</text:span><text:span text:style-name="T51">on ci resta che il corpo per esprimerle e l’isterico è questo.</text:span></text:p>
      <text:p text:style-name="P8"><text:span text:style-name="T28">N</text:span><text:span text:style-name="T51">aturalmente ci sono anche gli uomini che fanno gli isterici. Quindi Freud dice: </text:span><text:span text:style-name="T28">all</text:span><text:span text:style-name="T51">’epoca </text:span><text:span text:style-name="T28">mia,</text:span><text:span text:style-name="T51"> gli isterici erano assunti come dei simulatori </text:span><text:span text:style-name="T28">che facevano finta di essere malati per ricevere maggiore attenzione, per essere accuditi. Ma se non sei malato e menti</text:span><text:span text:style-name="T51"> </text:span><text:span text:style-name="T28">per avere qualcosa, allora </text:span><text:span text:style-name="T51">sei colpevole </text:span><text:span text:style-name="T28">e </text:span><text:span text:style-name="T51">questo lo decidono i tribunali, quest’altro lo decid</text:span><text:span text:style-name="T28">e</text:span><text:span text:style-name="T51"> la riprovazione </text:span><text:span text:style-name="T28">e </text:span><text:span text:style-name="T51">il disinteresse collettivo, perché stai mentendo. </text:span></text:p>
      <text:p text:style-name="P8"><text:span text:style-name="T51">Freud dice no, non sta mentendo, chiede quello che si </text:span><text:span text:style-name="T28">dovrebbe </text:span><text:span text:style-name="T51">chiede</text:span><text:span text:style-name="T28">re solo se si fosse ascoltati, ma siccome </text:span><text:soft-page-break/><text:span text:style-name="T28">non si è ascoltati si ricorre a quelle ultime risorse che si hanno. </text:span></text:p>
      <text:p text:style-name="P8"><text:span text:style-name="T28">C</text:span><text:span text:style-name="T51">he cos’è la malattia? La malattia è una richiesta d’amore e su questo </text:span><text:span text:style-name="T28">argomento</text:span><text:span text:style-name="T51">, </text:span><text:span text:style-name="T28">il premio Nobel T</text:span><text:span text:style-name="T51">homas Mann scri</text:span><text:span text:style-name="T28">sse nel 1924 il libro “Der Zauberberg”</text:span><text:span text:style-name="T51"> <text:s/>ambientato in un sanatorio per tubercolotici nelle Alpi svizzere.</text:span></text:p>
      <text:p text:style-name="P1">La frase è pronunciata dal personaggio di Settembrini, un umanista e libero pensatore italiano, in una discussione con il protagonista del romanzo, Hans Castorp. Settembrini sta esprimendo la sua convinzione che la malattia possa essere un catalizzatore per l'intro­spezione e la crescita personale, e che possa anche ser­vire come promemoria della nostra comune umanità e del bisogno di connessione. La citazione è stata interpretata in vari modi, ma è generalmente vista come una riflessione sul complesso rapporto tra malattia, amore e condizione umana. Suggerisce che la malattia possa essere un modo per chiedere a gran voce attenzione e cura, e che possa anche essere un'opportunità per una più profonda comprensione di sé e compassione.</text:p>
      <text:p text:style-name="P1">Nel 900 è nata una psichiatria tutta nuova, inaugurata da <text:span text:style-name="T28">Karl </text:span>Jaspers, <text:span text:style-name="T28">filosofo e psichiatra tedesco,che ha posto le basi per la comprensione tra</text:span> psichiatria esplicativa e comprensiva. </text:p>
      <text:p text:style-name="P2"><text:soft-page-break/>La schizofrenia esplicativa è la spiegazione causa e effetto, lui dice <text:span text:style-name="T28">che si può</text:span> sapere tutto della psichiatria esplicativa e non capire nulla di uno schizofrenico. <text:span text:style-name="T28">C</text:span>i vuole una psichiatria comprensiva che st<text:span text:style-name="T28">ia</text:span> a parlare in modo tale da catturare il centro della <text:span text:style-name="T28">sua</text:span> visione del mondo. <text:span text:style-name="T28">Solo allora </text:span>possiamo incominciare a parlare a discutere, a capirci. </text:p>
      <text:p text:style-name="P1">Quando noi non andiamo d’accordo con gli altri è perché l<text:span text:style-name="T28">e</text:span> vision<text:span text:style-name="T28">i</text:span> del mondo sono così diverse tra di loro che non riusciamo mai ad entrare nella visione del mondo dell’altro.</text:p>
      <text:p text:style-name="P1">Per parlare con gli arabi non basta che due persone parlino inglese, bisogna entrare nel mondo della visione degli altri vicendevolmente, perché, se non si fa questo non ci si intende. Dobbiamo anche diventare tolleranti non nella forma nel senso, non mi piace ma lo tollero, tollerare significa che quello che dice l’altro che ha il parere esattamente contrario al mio abbia un gradiente di verità superiore al mio, tutto il resto sono chiacchiere.</text:p>
      <text:p text:style-name="P2"><text:span text:style-name="T28">A</text:span>l massimo è semplicemente buona educazione.</text:p>
      <text:p text:style-name="P1"><text:span text:style-name="T28">N</text:span>aturalmente coloro che sono convinti di avere la verità assoluta, con loro non si può parlare, perché se <text:span text:style-name="T28">uno</text:span> ha la verità assoluta, <text:span text:style-name="T28">chi è l’altro</text:span>? Un eretico, un poveraccio. La verità deve essere relativa, la verità non è un nostro possesso definitivo, la verità è una via, una strada non è una meta.</text:p>
      <text:p text:style-name="P1"><text:soft-page-break/>Se i dialoghi sono impossibili allora i guai sono a portata di mano. Le tue convinzioni sono il prodotto della tua soggettività che tu chiami libertà. Ma sei davvero libero oppure sei schiavo delle tue convinzioni? </text:p>
      <text:p text:style-name="P1">Non dovremmo abusare della parola libertà, che dal mio punto di vista non c’è. Noi abbiamo oggi un sapere che si chiama scienza, la scienza è un sapere oggettivo, valido per tutti, che ha una sperimentazione, riproducibile da chiunque, ovunque, con i medesimi risultati. Le convinzioni le mettiamo sullo stesso piano di un sapere oggettivo?</text:p>
      <text:p text:style-name="P1">Secondo <text:span text:style-name="T28">Galimberti, </text:span>questo dipende dal cristianesimo perché per i greci la comunità veniva prima dell’individuo. Aristotele dice che chi entra in una città e pensa di poter fare a meno degli altri o è bestia o è dio. <text:span text:style-name="T28">I</text:span>l cristianesimo ha invece instaurato il concetto di individuo, la cosa più importante è salvare l’anima e siccome non la salvi collettivamente ma la salvi individualmente, il fondamento dell’individualismo è il cristianesimo.</text:p>
      <text:p text:style-name="P1"><text:span text:style-name="T28">Sant’</text:span>Agostino dice che lo stato non deve preoccuparsi del bene comune, questo lo sa la chiesa lo sa la religione qual é il bene, lo stato si deve occupare degli impedimenti che si frappongo alla salvezza dell’anima. Pensate che siano pensieri arcaici?</text:p>
      <text:p text:style-name="P1"><text:soft-page-break/>L’individualismo <text:span text:style-name="T28">oggi </text:span>è diventato egoismo, narcisismo, non sappiamo neanche chi è il nostro vicino di casa. L’individualismo oggi è posto all’apice della condizione umana perché la salvezza è individuale. L’amore per il prossimo è un comandamento della religione cristiana, ma non ho bisogno di un comandamento se metto al primo posto la società, ma se metto al primo posto l’individuo devo comandare l’amore per il prossimo. <text:s text:c="5"/></text:p>
      <text:p text:style-name="P33"><text:a xlink:type="simple" xlink:href="https://www.youtube.com/watch?v=HiBH5YskK98&amp;t=627s" text:style-name="Internet_20_link" text:visited-style-name="Visited_20_Internet_20_Link"><text:span text:style-name="T40"/></text:a></text:p>
      <text:p text:style-name="P33"><text:a xlink:type="simple" xlink:href="https://www.youtube.com/watch?v=HiBH5YskK98&amp;t=627s" text:style-name="Internet_20_link" text:visited-style-name="Visited_20_Internet_20_Link"><text:span text:style-name="T40"/></text:a></text:p>
      <text:p text:style-name="P33"><text:a xlink:type="simple" xlink:href="https://www.youtube.com/watch?v=HiBH5YskK98&amp;t=627s" text:style-name="Internet_20_link" text:visited-style-name="Visited_20_Internet_20_Link"><text:span text:style-name="T40"/></text:a></text:p>
      <text:p text:style-name="P33"><text:a xlink:type="simple" xlink:href="https://www.youtube.com/watch?v=HiBH5YskK98&amp;t=627s" text:style-name="Internet_20_link" text:visited-style-name="Visited_20_Internet_20_Link"><text:span text:style-name="T40">UMBERTO GALIMBERTI - "Anima e corpo. Un dualismo ingannevole" - Festival della Bellezza (youtube.com)</text:span></text:a><text:span text:style-name="T40"> </text:span></text:p>
      <text:p text:style-name="P30"><text:s text:c="2"/></text:p>
      <text:p text:style-name="P34"><text:a xlink:type="simple" xlink:href="https://archivio.festivaletteratura.it/occor" text:style-name="Internet_20_link" text:visited-style-name="Visited_20_Internet_20_Link"><text:span text:style-name="T40">https://archivio.festivaletteratura.it/occor</text:span></text:a></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9:35:40.186000000</meta:creation-date>
    <dc:date>2026-04-02T16:49:50.594070472</dc:date>
    <meta:editing-duration>PT12H5M47S</meta:editing-duration>
    <meta:editing-cycles>20</meta:editing-cycles>
    <meta:generator>LibreOffice/24.2.7.2$Linux_X86_64 LibreOffice_project/420$Build-2</meta:generator>
    <dc:creator>corrado tafaro</dc:creator>
    <meta:document-statistic meta:table-count="0" meta:image-count="0" meta:object-count="0" meta:page-count="34" meta:paragraph-count="85" meta:word-count="7353" meta:character-count="44826" meta:non-whitespace-character-count="37493"/>
  </office:meta>
</office:document-meta>
</file>