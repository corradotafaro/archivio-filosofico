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3cm" fo:margin-bottom="0cm" style:contextual-spacing="false" fo:line-height="115%" fo:text-align="center" style:justify-single-word="false"/>
      <style:text-properties style:font-name="Noto Sans1" fo:font-size="12pt" fo:font-weight="bold" officeooo:paragraph-rsid="00134096" style:font-size-asian="12pt" style:font-weight-asian="bold" style:font-size-complex="12pt" style:font-weight-complex="bold"/>
    </style:style>
    <style:style style:name="P2" style:family="paragraph" style:parent-style-name="Standard">
      <style:paragraph-properties fo:margin-top="0.199cm" fo:margin-bottom="0cm" style:contextual-spacing="false" fo:line-height="115%" fo:text-align="center" style:justify-single-word="false"/>
      <style:text-properties style:font-name="Noto Sans1" fo:font-size="12pt" fo:font-weight="bold" officeooo:paragraph-rsid="00134096" style:font-size-asian="12pt" style:font-weight-asian="bold" style:font-size-complex="12pt" style:font-weight-complex="bold"/>
    </style:style>
    <style:style style:name="P3"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34096" style:font-size-asian="12pt" style:font-size-complex="12pt"/>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4096" style:font-size-asian="12pt" style:font-size-complex="12pt"/>
    </style:style>
    <style:style style:name="P5"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34096" style:font-size-asian="12pt" style:font-size-complex="12pt"/>
    </style:style>
    <style:style style:name="T1" style:family="text">
      <style:text-properties fo:font-size="11pt" fo:font-weight="bold" style:font-size-asian="11pt" style:font-weight-asian="bold" style:font-size-complex="11pt" style:font-weight-complex="bold"/>
    </style:style>
    <style:style style:name="T2" style:family="text">
      <style:text-properties officeooo:rsid="004b3136"/>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officeooo:rsid="004c2768"/>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7e12bc" style:font-style-asian="normal" style:font-weight-asian="normal" style:font-style-complex="normal" style:font-weight-complex="normal"/>
    </style:style>
    <style:style style:name="T9" style:family="text">
      <style:text-properties officeooo:rsid="007e12bc"/>
    </style:style>
    <style:style style:name="T10" style:family="text">
      <style:text-properties officeooo:rsid="00495b7a"/>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gomenti contro il movimento</text:p>
      <text:p text:style-name="P3">Se dire che “<text:span text:style-name="T11">l’essere è</text:span> e che il <text:span text:style-name="T11">non essere non è</text:span>” può sembrare un affermazione banale. Negare il movimento non era infatti affare da poco, <text:span text:style-name="T2">f</text:span>ilosofi <text:span text:style-name="T2">come </text:span>Eraclito lo avevano addirittura elevato a principio di tutte le cose. La stessa esperienza ci dimostra in ogni istante che le cose mutato internamente e rispetto alla posizione. </text:p>
      <text:p text:style-name="P4">Le obiezioni di Zenone si fondano tutte sul paradosso della continuità dello <text:span text:style-name="T3">spazio/tempo</text:span>. Sappiamo tutti infatti che un segmento è per definizione la linea che unisce due punti. Esso è finito e misurabile. Tuttavia è costituito da un insieme infinito di punti. Dato un segmento possiamo infatti dividerlo a metà e poi ancora a metà e ancora a metà all’infinito. Dati due punti ne esisterà sempre un’infinità in mezzo. Data questa caratteristica dello spazio, <text:span text:style-name="T2">Zenone formulò</text:span> i seguenti <text:span text:style-name="T2">paradossi sul movimento:</text:span></text:p>
      <text:p text:style-name="P3">1. <text:span text:style-name="T5">La divisibilità all’infinito dello spazio</text:span></text:p>
      <text:p text:style-name="P4">Per percorrere un tratto di strada se ne deve sempre prima percorrere una metà. Per percorrere questa metà occorre prima percorrere la metà di questa metà e così via all’infinito. Una infinità di metà separa il punto di partenza da quello di arrivo. Si tratta allora di percorrere in un tempo finito tratti infiniti, il che è manifestamente impossibile, dunque il movimento non è reale.</text:p>
      <text:p text:style-name="P3"><text:soft-page-break/>2. <text:span text:style-name="T5">Achille e la tartaruga</text:span></text:p>
      <text:p text:style-name="P5">Un argomento molto simile al primo, ma più d’effetto è detto paradosso di Achille e della tartaruga. In una gara di velocità se Achille partisse dopo la tartaruga, la distanza tra loro sarebbe incolmabile. Achille non solo non potrebbe mai superare la tartaruga, ma nemmeno raggiungerla! Perché lo spazio che lo separa dalla tartaruga è divisibile all’infinito. Senza considerare che mano mano che Achille lo colma la tartaruga si è già spostata.</text:p>
      <text:p text:style-name="P3">3. <text:span text:style-name="T5">La freccia </text:span>Il paradosso della freccia, più che confutare, spiega in che senso il movimento è un inganno dei sensi. Zenone sostiene infatti che la freccia che si vede scoccare da un arco, non si muove mai per davvero. E’ in realtà <text:s/>a riposo perché in ogni istante del suo volo essa occupa una porzione di spazio identico (sempre il suo). <text:span text:style-name="T4">Il movimento è allora una somma di stati di riposo messi in sequenza. </text:span>Cosa si muove esattamente quando vediamo un film? E nei cartelloni luminosi quando vediamo le scritte scorrere? Le lettere appaiono realmente da un lato e scompaiono dall’altro? Non è forse che resta tutto fermo? Questa è più o meno <text:span text:style-name="T6">ciò che corrisponde al</text:span>l’idea che ha Zenone del movimento.</text:p>
      <text:p text:style-name="P3">4. <text:span text:style-name="T5">Il paradosso dello stadio</text:span></text:p>
      <text:p text:style-name="P5">E’ un argomento che dimostra la relatività del movimento. Questo è infatti sempre relativo al sistema <text:soft-page-break/>di riferimento <text:span text:style-name="T6">(una posizione specifica per studiarlo)</text:span> che prendiamo in considerazione. Poniamo il caso di avere due masse A e B in uno stadio che si vengono incontro alla stessa velocità. Dal punto di vista dell’osservatore esterno C, A e B andranno entrambe alla stessa velocità. Dal punto di vista di A (o di B), cioè dal punto di vista interno al movimento stesso, la massa impiegherà la metà del tempo per raggiungere B. Alla sua velocità si sommerà la velocità di B considerato fermo.</text:p>
      <text:p text:style-name="P5"><text:span text:style-name="T7">Una spiegazione semplice: </text:span><text:span text:style-name="T8">s</text:span><text:span text:style-name="T6">e si sale su di un nastro trasportatore </text:span><text:span text:style-name="T9">e si continua a camminare </text:span><text:span text:style-name="T6">(come quelli che si vedono in aeroporto) abbiamo avuto </text:span>la sensazione di andare più veloci. Ma il <text:span text:style-name="T6">nostro</text:span> passo è <text:span text:style-name="T6">stato </text:span>sempre lo stesso. Cosa è successo? <text:span text:style-name="T10">A</text:span>lla <text:span text:style-name="T6">nostra</text:span> velocità s<text:span text:style-name="T9">i </text:span>è sommata quella del tappeto. Quest’ultimo in un certo senso <text:span text:style-name="T6">ci</text:span> fa venire incontro il terreno che <text:span text:style-name="T6">abbiamo </text:span>sotto i piedi. Mentre <text:span text:style-name="T6">noi</text:span> cammin<text:span text:style-name="T6">iamo</text:span> in avanti è come se il punto che vorr<text:span text:style-name="T6">emmo</text:span> raggiungere <text:span text:style-name="T6">ci</text:span> venisse incontro.</text:p>
      <text:p text:style-name="P4">Il principio di relatività del movimento fu in seguito espresso con chiarezza da Galileo Galilei. Lo scienziato fa un esempio probabilmente più intuitivo. Se siamo dentro ad una cabina di una nave che si muove di moto rettilineo uniforme e non abbiamo punti di riferimento esterni avremo la sensazione di essere fermi. In questo caso l’osservatore interno A non percepirà il movimento. <text:soft-page-break/>Quest’ultimo sarà percepito soltanto dal punto di vista esterno C.</text:p>
      <text:p text:style-name="P4">Velocità e movimento sono dunque unità di misura relative al sistema di riferimento. Questo argomento indusse alcuni ad affermare che Zenone aveva inconsapevolmente anticipato la teoria della relatività. Gli argomenti espressi tuttavia non era<text:span text:style-name="T6">no</text:span> intesi a dimostrare alcunché se non l’impossibilità del movimento. E’ infatti paradossale che un qualcosa si muova ad una velocità e <text:span text:style-name="T9">allo stesso tempo</text:span>, alla velocità doppia. Quindi è paradossale il movimento.</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3T16:27:05.389171102</meta:creation-date>
    <dc:date>2026-01-23T16:32:16.124433103</dc:date>
    <dc:creator>corrado tafaro</dc:creator>
    <meta:editing-duration>PT5M12S</meta:editing-duration>
    <meta:editing-cycles>1</meta:editing-cycles>
    <meta:document-statistic meta:table-count="0" meta:image-count="0" meta:object-count="0" meta:page-count="4" meta:paragraph-count="13" meta:word-count="740" meta:character-count="4485" meta:non-whitespace-character-count="3756"/>
    <meta:generator>LibreOffice/24.2.7.2$Linux_X86_64 LibreOffice_project/420$Build-2</meta:generator>
  </office:meta>
</office:document-meta>
</file>