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4C000000646CF3C3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Contents_20_1">
      <style:paragraph-properties>
        <style:tab-stops>
          <style:tab-stop style:position="11.398cm" style:type="right" style:leader-style="dotted" style:leader-text="."/>
        </style:tab-stops>
      </style:paragraph-properties>
    </style:style>
    <style:style style:name="P2" style:family="paragraph" style:parent-style-name="Contents_20_2">
      <style:paragraph-properties>
        <style:tab-stops>
          <style:tab-stop style:position="10.899cm" style:type="right" style:leader-style="dotted" style:leader-text="."/>
        </style:tab-stops>
      </style:paragraph-properties>
    </style:style>
    <style:style style:name="P3" style:family="paragraph" style:parent-style-name="Contents_20_3">
      <style:paragraph-properties>
        <style:tab-stops>
          <style:tab-stop style:position="10.398cm" style:type="right" style:leader-style="dotted" style:leader-text="."/>
        </style:tab-stops>
      </style:paragraph-properties>
    </style:style>
    <style:style style:name="P4" style:family="paragraph" style:parent-style-name="Standard">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properties fo:font-size="14pt" fo:font-style="normal" officeooo:rsid="003abe39" officeooo:paragraph-rsid="003abe39" style:font-size-asian="14pt" style:font-style-asian="normal" style:font-size-complex="14pt" style:font-style-complex="normal"/>
    </style:style>
    <style:style style:name="P5" style:family="paragraph" style:parent-style-name="Standard">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properties fo:font-size="14pt" fo:font-style="normal" officeooo:rsid="003ebafe" officeooo:paragraph-rsid="003ebafe" style:font-size-asian="14pt" style:font-style-asian="normal" style:font-size-complex="14pt" style:font-style-complex="normal"/>
    </style:style>
    <style:style style:name="P6" style:family="paragraph" style:parent-style-name="Standard">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properties fo:font-size="14pt" fo:font-style="normal" officeooo:rsid="00232237" officeooo:paragraph-rsid="00260ae9" style:font-size-asian="14pt" style:font-style-asian="normal" style:font-size-complex="14pt" style:font-style-complex="normal"/>
    </style:style>
    <style:style style:name="P7" style:family="paragraph" style:parent-style-name="Standard">
      <style:paragraph-properties fo:margin-top="0.3cm" fo:margin-bottom="0cm" style:contextual-spacing="false" fo:text-align="justify" style:justify-single-word="false"/>
      <style:text-properties fo:font-size="14pt" fo:font-style="normal" officeooo:rsid="00090761" officeooo:paragraph-rsid="00090761" style:font-size-asian="14pt" style:font-style-asian="normal" style:font-size-complex="14pt" style:font-style-complex="normal"/>
    </style:style>
    <style:style style:name="P8" style:family="paragraph" style:parent-style-name="Standard">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properties fo:font-size="14pt" fo:font-style="normal" officeooo:rsid="004e4425" officeooo:paragraph-rsid="004e4425" style:font-size-asian="14pt" style:font-style-asian="normal" style:font-size-complex="14pt" style:font-style-complex="normal"/>
    </style:style>
    <style:style style:name="P9" style:family="paragraph" style:parent-style-name="Standard">
      <style:paragraph-properties fo:margin-top="0.3cm" fo:margin-bottom="0cm" style:contextual-spacing="false" fo:text-align="justify" style:justify-single-word="false"/>
      <style:text-properties fo:font-size="14pt" fo:font-style="normal" officeooo:rsid="004a4774" officeooo:paragraph-rsid="004a4774" style:font-size-asian="12.25pt" style:font-style-asian="normal" style:font-size-complex="14pt" style:font-style-complex="normal"/>
    </style:style>
    <style:style style:name="P10" style:family="paragraph" style:parent-style-name="Standard">
      <style:paragraph-properties fo:margin-top="0.101cm" fo:margin-bottom="0cm" style:contextual-spacing="false" fo:text-align="justify" style:justify-single-word="false"/>
      <style:text-properties fo:font-size="12pt" officeooo:rsid="003492b0" officeooo:paragraph-rsid="003492b0" style:font-size-asian="10.5pt" style:font-size-complex="12pt"/>
    </style:style>
    <style:style style:name="P11" style:family="paragraph" style:parent-style-name="Standard">
      <style:paragraph-properties fo:margin-top="0.101cm" fo:margin-bottom="0cm" style:contextual-spacing="false" fo:text-align="justify" style:justify-single-word="false"/>
      <style:text-properties fo:font-size="12pt" officeooo:rsid="003492b0" officeooo:paragraph-rsid="0034f9bc" style:font-size-asian="10.5pt" style:font-size-complex="12pt"/>
    </style:style>
    <style:style style:name="P12" style:family="paragraph" style:parent-style-name="Standard">
      <style:paragraph-properties fo:margin-top="0.101cm" fo:margin-bottom="0cm" style:contextual-spacing="false"/>
      <style:text-properties fo:font-size="12pt" officeooo:rsid="003492b0" officeooo:paragraph-rsid="003492b0" style:font-size-asian="10.5pt" style:font-size-complex="12pt"/>
    </style:style>
    <style:style style:name="P13" style:family="paragraph" style:parent-style-name="Standard">
      <style:paragraph-properties fo:margin-top="0.199cm" fo:margin-bottom="0cm" style:contextual-spacing="false" fo:text-align="justify" style:justify-single-word="false"/>
      <style:text-properties fo:font-size="12pt" fo:font-style="italic" fo:font-weight="normal" officeooo:rsid="000ab6b1" officeooo:paragraph-rsid="000ab6b1" style:font-size-asian="12pt" style:font-style-asian="italic" style:font-weight-asian="normal" style:font-size-complex="12pt" style:font-style-complex="italic" style:font-weight-complex="normal"/>
    </style:style>
    <style:style style:name="P14"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ize="12pt" officeooo:rsid="004e4425" officeooo:paragraph-rsid="004e4425" style:font-size-asian="12pt" style:font-size-complex="12pt"/>
    </style:style>
    <style:style style:name="P15"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ize="12pt" fo:font-style="normal" officeooo:rsid="003ebafe" officeooo:paragraph-rsid="003ebafe" style:font-size-asian="12pt" style:font-style-asian="normal" style:font-size-complex="12pt" style:font-style-complex="normal"/>
    </style:style>
    <style:style style:name="P16"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ize="12pt" fo:font-style="normal" officeooo:rsid="004e4425" officeooo:paragraph-rsid="004e4425" style:font-size-asian="12pt" style:font-style-asian="normal" style:font-size-complex="12pt" style:font-style-complex="normal"/>
    </style:style>
    <style:style style:name="P17" style:family="paragraph" style:parent-style-name="Standard">
      <style:paragraph-properties fo:margin-top="0.3cm" fo:margin-bottom="0cm" style:contextual-spacing="false" fo:text-align="justify" style:justify-single-word="false"/>
      <style:text-properties fo:font-size="12pt" fo:font-style="normal" officeooo:rsid="004a4774" officeooo:paragraph-rsid="004bf87d" style:font-size-asian="10.5pt" style:font-style-asian="normal" style:font-size-complex="12pt" style:font-style-complex="normal"/>
    </style:style>
    <style:style style:name="P18" style:family="paragraph" style:parent-style-name="Standard">
      <style:paragraph-properties fo:margin-top="0.101cm" fo:margin-bottom="0cm" style:contextual-spacing="false" fo:text-align="justify" style:justify-single-word="false"/>
      <style:text-properties fo:font-size="12pt" fo:font-style="normal" officeooo:rsid="004b9246" officeooo:paragraph-rsid="004bf87d" style:font-size-asian="10.5pt" style:font-style-asian="normal" style:font-size-complex="12pt" style:font-style-complex="normal"/>
    </style:style>
    <style:style style:name="P19" style:family="paragraph" style:parent-style-name="Standard">
      <style:paragraph-properties fo:margin-top="0.101cm" fo:margin-bottom="0cm" style:contextual-spacing="false" fo:text-align="justify" style:justify-single-word="false"/>
      <style:text-properties fo:font-size="12pt" fo:font-style="normal" officeooo:rsid="004bf87d" officeooo:paragraph-rsid="004bf87d" style:font-size-asian="10.5pt" style:font-style-asian="normal" style:font-size-complex="12pt" style:font-style-complex="normal"/>
    </style:style>
    <style:style style:name="P20" style:family="paragraph" style:parent-style-name="Standard">
      <style:paragraph-properties fo:margin-top="0.101cm" fo:margin-bottom="0cm" style:contextual-spacing="false" fo:text-align="justify" style:justify-single-word="false"/>
      <style:text-properties officeooo:rsid="003492b0" officeooo:paragraph-rsid="0034f9bc"/>
    </style:style>
    <style:style style:name="P21" style:family="paragraph" style:parent-style-name="Standard">
      <style:paragraph-properties fo:margin-top="0.101cm" fo:margin-bottom="0cm" style:contextual-spacing="false" fo:text-align="justify" style:justify-single-word="false" fo:break-before="page"/>
      <style:text-properties officeooo:rsid="003492b0" officeooo:paragraph-rsid="0034f9bc"/>
    </style:style>
    <style:style style:name="P22" style:family="paragraph" style:parent-style-name="Standard">
      <style:paragraph-properties fo:margin-top="0.199cm" fo:margin-bottom="0cm" style:contextual-spacing="false" fo:text-align="justify" style:justify-single-word="false"/>
      <style:text-properties officeooo:rsid="003492b0" officeooo:paragraph-rsid="0034f9bc"/>
    </style:style>
    <style:style style:name="P23" style:family="paragraph" style:parent-style-name="Standard">
      <style:paragraph-properties fo:margin-top="0.101cm" fo:margin-bottom="0cm" style:contextual-spacing="false" fo:text-align="justify" style:justify-single-word="false"/>
      <style:text-properties officeooo:rsid="00090761" officeooo:paragraph-rsid="00090761"/>
    </style:style>
    <style:style style:name="P24" style:family="paragraph" style:parent-style-name="Standard">
      <style:paragraph-properties fo:margin-top="0.199cm" fo:margin-bottom="0cm" style:contextual-spacing="false" fo:text-align="justify" style:justify-single-word="false"/>
      <style:text-properties fo:font-size="11pt" fo:font-style="italic" fo:font-weight="bold" officeooo:rsid="000ab6b1" officeooo:paragraph-rsid="000ab6b1" style:font-size-asian="11pt" style:font-style-asian="italic" style:font-weight-asian="bold" style:font-size-complex="11pt" style:font-style-complex="italic" style:font-weight-complex="bold"/>
    </style:style>
    <style:style style:name="P25" style:family="paragraph" style:parent-style-name="Standard">
      <style:paragraph-properties fo:margin-top="0.199cm" fo:margin-bottom="0cm" style:contextual-spacing="false" fo:text-align="justify" style:justify-single-word="false"/>
      <style:text-properties fo:font-size="11pt" fo:font-style="normal" fo:font-weight="bold" officeooo:rsid="00409b58" officeooo:paragraph-rsid="00409b58" style:font-size-asian="11pt" style:font-style-asian="normal" style:font-weight-asian="bold" style:font-size-complex="11pt" style:font-style-complex="normal" style:font-weight-complex="bold"/>
    </style:style>
    <style:style style:name="P26" style:family="paragraph" style:parent-style-name="Standard">
      <style:paragraph-properties fo:margin-top="0.199cm" fo:margin-bottom="0cm" style:contextual-spacing="false" fo:text-align="justify" style:justify-single-word="false"/>
      <style:text-properties fo:font-size="11pt" fo:font-style="normal" fo:font-weight="bold" officeooo:rsid="00090761" officeooo:paragraph-rsid="00090761" style:font-size-asian="11pt" style:font-style-asian="normal" style:font-weight-asian="bold" style:font-size-complex="11pt" style:font-style-complex="normal" style:font-weight-complex="bold"/>
    </style:style>
    <style:style style:name="P27" style:family="paragraph" style:parent-style-name="Standard">
      <style:paragraph-properties fo:margin-top="0.101cm" fo:margin-bottom="0cm" style:contextual-spacing="false" fo:text-align="justify" style:justify-single-word="false"/>
      <style:text-properties fo:font-style="italic" officeooo:rsid="00090761" officeooo:paragraph-rsid="00090761" style:font-style-asian="italic" style:font-style-complex="italic"/>
    </style:style>
    <style:style style:name="P28" style:family="paragraph" style:parent-style-name="Standard">
      <style:paragraph-properties fo:margin-top="0.199cm" fo:margin-bottom="0cm" style:contextual-spacing="false" fo:text-align="justify" style:justify-single-word="false"/>
      <style:text-properties fo:font-style="normal" officeooo:rsid="00090761" officeooo:paragraph-rsid="00090761" style:font-style-asian="normal" style:font-style-complex="normal"/>
    </style:style>
    <style:style style:name="P29" style:family="paragraph" style:parent-style-name="Standard">
      <style:paragraph-properties fo:margin-top="0.101cm" fo:margin-bottom="0cm" style:contextual-spacing="false" fo:text-align="justify" style:justify-single-word="false"/>
      <style:text-properties fo:font-style="normal" officeooo:rsid="00090761" officeooo:paragraph-rsid="00090761" style:font-style-asian="normal" style:font-style-complex="normal"/>
    </style:style>
    <style:style style:name="P30" style:family="paragraph" style:parent-style-name="Standard">
      <style:paragraph-properties fo:margin-top="0cm" fo:margin-bottom="0cm" style:contextual-spacing="false" fo:text-align="justify" style:justify-single-word="false"/>
      <style:text-properties fo:font-style="normal" officeooo:rsid="00090761" officeooo:paragraph-rsid="00090761" style:font-style-asian="normal" style:font-style-complex="normal"/>
    </style:style>
    <style:style style:name="P31" style:family="paragraph" style:parent-style-name="Standard">
      <style:paragraph-properties fo:margin-top="0.3cm" fo:margin-bottom="0cm" style:contextual-spacing="false" fo:text-align="justify" style:justify-single-word="false"/>
      <style:text-properties fo:font-style="normal" officeooo:rsid="00090761" officeooo:paragraph-rsid="00090761" style:font-style-asian="normal" style:font-style-complex="normal"/>
    </style:style>
    <style:style style:name="P32" style:family="paragraph" style:parent-style-name="Standard">
      <style:paragraph-properties fo:margin-top="0.101cm" fo:margin-bottom="0cm" style:contextual-spacing="false" fo:text-align="justify" style:justify-single-word="false"/>
      <style:text-properties fo:font-style="normal" officeooo:rsid="00090761" officeooo:paragraph-rsid="000c42ba" style:font-style-asian="normal" style:font-style-complex="normal"/>
    </style:style>
    <style:style style:name="P33" style:family="paragraph" style:parent-style-name="Standard">
      <style:paragraph-properties fo:margin-top="0.101cm" fo:margin-bottom="0cm" style:contextual-spacing="false" fo:text-align="justify" style:justify-single-word="false"/>
      <style:text-properties fo:font-style="normal" officeooo:rsid="00090761" officeooo:paragraph-rsid="0048b629" style:font-style-asian="normal" style:font-style-complex="normal"/>
    </style:style>
    <style:style style:name="P34" style:family="paragraph" style:parent-style-name="Standard">
      <style:paragraph-properties fo:margin-top="0.101cm" fo:margin-bottom="0cm" style:contextual-spacing="false" fo:text-align="justify" style:justify-single-word="false"/>
      <style:text-properties fo:font-style="normal" officeooo:rsid="00090761" officeooo:paragraph-rsid="004909da" style:font-style-asian="normal" style:font-style-complex="normal"/>
    </style:style>
    <style:style style:name="P35" style:family="paragraph" style:parent-style-name="Standard">
      <style:paragraph-properties fo:margin-top="0.101cm" fo:margin-bottom="0cm" style:contextual-spacing="false" fo:text-align="justify" style:justify-single-word="false"/>
      <style:text-properties fo:font-style="normal" officeooo:rsid="001391f1" officeooo:paragraph-rsid="00140b00" style:font-style-asian="normal" style:font-style-complex="normal"/>
    </style:style>
    <style:style style:name="P36" style:family="paragraph" style:parent-style-name="Standard">
      <style:paragraph-properties fo:margin-top="0.101cm" fo:margin-bottom="0cm" style:contextual-spacing="false" fo:text-align="justify" style:justify-single-word="false"/>
      <style:text-properties fo:font-style="normal" officeooo:rsid="00145b44" officeooo:paragraph-rsid="002819ba" style:font-style-asian="normal" style:font-style-complex="normal"/>
    </style:style>
    <style:style style:name="P37" style:family="paragraph" style:parent-style-name="Standard">
      <style:paragraph-properties fo:margin-top="0.101cm" fo:margin-bottom="0cm" style:contextual-spacing="false" fo:text-align="justify" style:justify-single-word="false"/>
      <style:text-properties fo:font-style="normal" officeooo:rsid="0017ddb3" officeooo:paragraph-rsid="0017ddb3" style:font-style-asian="normal" style:font-style-complex="normal"/>
    </style:style>
    <style:style style:name="P38" style:family="paragraph" style:parent-style-name="Standard">
      <style:paragraph-properties fo:margin-top="0.101cm" fo:margin-bottom="0cm" style:contextual-spacing="false" fo:text-align="justify" style:justify-single-word="false"/>
      <style:text-properties fo:font-style="normal" officeooo:rsid="0017ecd2" officeooo:paragraph-rsid="001f4a07" style:font-style-asian="normal" style:font-style-complex="normal"/>
    </style:style>
    <style:style style:name="P39" style:family="paragraph" style:parent-style-name="Standard">
      <style:paragraph-properties fo:margin-top="0.101cm" fo:margin-bottom="0cm" style:contextual-spacing="false" fo:text-align="justify" style:justify-single-word="false"/>
      <style:text-properties fo:font-style="normal" officeooo:rsid="0017ecd2" officeooo:paragraph-rsid="002ad937" style:font-style-asian="normal" style:font-style-complex="normal"/>
    </style:style>
    <style:style style:name="P40" style:family="paragraph" style:parent-style-name="Standard">
      <style:paragraph-properties fo:margin-top="0.101cm" fo:margin-bottom="0cm" style:contextual-spacing="false" fo:text-align="justify" style:justify-single-word="false"/>
      <style:text-properties fo:font-style="normal" officeooo:rsid="0017ecd2" officeooo:paragraph-rsid="002dd0c6" style:font-style-asian="normal" style:font-style-complex="normal"/>
    </style:style>
    <style:style style:name="P41" style:family="paragraph" style:parent-style-name="Standard">
      <style:paragraph-properties fo:margin-top="0.101cm" fo:margin-bottom="0cm" style:contextual-spacing="false" fo:text-align="justify" style:justify-single-word="false"/>
      <style:text-properties fo:font-style="normal" officeooo:rsid="0017ecd2" officeooo:paragraph-rsid="0017ecd2" style:font-style-asian="normal" style:font-style-complex="normal"/>
    </style:style>
    <style:style style:name="P42"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tyle="normal" officeooo:rsid="00232237" officeooo:paragraph-rsid="00260ae9" style:font-style-asian="normal" style:font-style-complex="normal"/>
    </style:style>
    <style:style style:name="P43" style:family="paragraph" style:parent-style-name="Standard">
      <loext:graphic-properties draw:fill="none"/>
      <style:paragraph-properties fo:margin-left="0cm" fo:margin-right="0cm" fo:margin-top="0.199cm" fo:margin-bottom="0cm" style:contextual-spacing="false" fo:text-align="justify" style:justify-single-word="false" fo:text-indent="0cm" style:auto-text-indent="false" fo:background-color="transparent"/>
      <style:text-properties fo:font-style="normal" officeooo:rsid="00232237" officeooo:paragraph-rsid="00260ae9" style:font-style-asian="normal" style:font-style-complex="normal"/>
    </style:style>
    <style:style style:name="P44"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tyle="normal" officeooo:rsid="00232237" officeooo:paragraph-rsid="003d58bd" style:font-style-asian="normal" style:font-style-complex="normal"/>
    </style:style>
    <style:style style:name="P45"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tyle="normal" officeooo:rsid="00232237" officeooo:paragraph-rsid="003b6539" style:font-style-asian="normal" style:font-style-complex="normal"/>
    </style:style>
    <style:style style:name="P46"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tyle="normal" officeooo:rsid="003b6539" officeooo:paragraph-rsid="003b6539" style:font-style-asian="normal" style:font-style-complex="normal"/>
    </style:style>
    <style:style style:name="P47" style:family="paragraph" style:parent-style-name="Standard">
      <style:paragraph-properties fo:margin-top="0.101cm" fo:margin-bottom="0cm" style:contextual-spacing="false" fo:text-align="justify" style:justify-single-word="false"/>
      <style:text-properties fo:font-style="normal" officeooo:rsid="004909da" officeooo:paragraph-rsid="004909da" style:font-style-asian="normal" style:font-style-complex="normal"/>
    </style:style>
    <style:style style:name="P48"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officeooo:paragraph-rsid="00260ae9"/>
    </style:style>
    <style:style style:name="P49" style:family="paragraph" style:parent-style-name="Standard">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officeooo:paragraph-rsid="00314fdf"/>
    </style:style>
    <style:style style:name="P50" style:family="paragraph" style:parent-style-name="Standard">
      <style:paragraph-properties fo:margin-top="0.101cm" fo:margin-bottom="0cm" style:contextual-spacing="false" fo:text-align="justify" style:justify-single-word="false"/>
      <style:text-properties officeooo:rsid="0017ecd2" officeooo:paragraph-rsid="0017ecd2"/>
    </style:style>
    <style:style style:name="P51" style:family="paragraph" style:parent-style-name="Standard">
      <style:paragraph-properties fo:margin-top="0.101cm" fo:margin-bottom="0cm" style:contextual-spacing="false" fo:text-align="justify" style:justify-single-word="false"/>
      <style:text-properties officeooo:rsid="0017ecd2" officeooo:paragraph-rsid="001f4a07"/>
    </style:style>
    <style:style style:name="P52" style:family="paragraph" style:parent-style-name="Standard">
      <style:paragraph-properties fo:margin-top="0.101cm" fo:margin-bottom="0cm" style:contextual-spacing="false" fo:text-align="justify" style:justify-single-word="false"/>
      <style:text-properties officeooo:rsid="0017ecd2" officeooo:paragraph-rsid="0035a6d7"/>
    </style:style>
    <style:style style:name="P53" style:family="paragraph" style:parent-style-name="Standard">
      <style:paragraph-properties fo:margin-top="0.101cm" fo:margin-bottom="0cm" style:contextual-spacing="false" fo:text-align="justify" style:justify-single-word="false"/>
      <style:text-properties officeooo:rsid="0017ecd2" officeooo:paragraph-rsid="002a15be"/>
    </style:style>
    <style:style style:name="P54" style:family="paragraph" style:parent-style-name="Standard">
      <style:paragraph-properties fo:margin-top="0.199cm" fo:margin-bottom="0cm" style:contextual-spacing="false" fo:text-align="justify" style:justify-single-word="false"/>
      <style:text-properties officeooo:rsid="0017ecd2" officeooo:paragraph-rsid="0020f2b0"/>
    </style:style>
    <style:style style:name="P55" style:family="paragraph" style:parent-style-name="Standard">
      <style:paragraph-properties fo:margin-top="0.199cm" fo:margin-bottom="0cm" style:contextual-spacing="false" fo:text-align="justify" style:justify-single-word="false"/>
      <style:text-properties officeooo:rsid="0017ecd2" officeooo:paragraph-rsid="002a406d"/>
    </style:style>
    <style:style style:name="P56" style:family="paragraph" style:parent-style-name="Standard">
      <style:paragraph-properties fo:margin-top="0.101cm" fo:margin-bottom="0cm" style:contextual-spacing="false" fo:text-align="justify" style:justify-single-word="false"/>
      <style:text-properties officeooo:rsid="0017ecd2" officeooo:paragraph-rsid="002ad937"/>
    </style:style>
    <style:style style:name="P57" style:family="paragraph" style:parent-style-name="Standard">
      <style:paragraph-properties fo:margin-top="0.101cm" fo:margin-bottom="0cm" style:contextual-spacing="false" fo:text-align="justify" style:justify-single-word="false"/>
      <style:text-properties officeooo:rsid="00232237" officeooo:paragraph-rsid="0023f5fe"/>
    </style:style>
    <style:style style:name="P58" style:family="paragraph" style:parent-style-name="Standard">
      <style:paragraph-properties fo:margin-top="0.101cm" fo:margin-bottom="0cm" style:contextual-spacing="false" fo:text-align="justify" style:justify-single-word="false"/>
      <style:text-properties officeooo:rsid="00232237" officeooo:paragraph-rsid="0024bfa6"/>
    </style:style>
    <style:style style:name="P59" style:family="paragraph" style:parent-style-name="Heading_20_1">
      <style:paragraph-properties fo:margin-top="0cm" fo:margin-bottom="0cm" style:contextual-spacing="false"/>
      <style:text-properties fo:font-size="14pt" style:font-size-asian="14pt" style:font-size-complex="14pt"/>
    </style:style>
    <style:style style:name="P60" style:family="paragraph" style:parent-style-name="Heading_20_2">
      <style:text-properties fo:font-size="11pt" fo:font-weight="bold" style:font-size-asian="11pt" style:font-weight-asian="bold" style:font-size-complex="11pt" style:font-weight-complex="bold"/>
    </style:style>
    <style:style style:name="P61" style:family="paragraph" style:parent-style-name="Heading_20_3">
      <style:text-properties fo:font-size="12pt" style:font-size-asian="12pt" style:font-size-complex="12pt"/>
    </style:style>
    <style:style style:name="P62" style:family="paragraph" style:parent-style-name="Standard"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drop-cap style:lines="2" style:style-name="Strong_20_Emphasis"/>
      </style:paragraph-properties>
      <style:text-properties officeooo:rsid="003492b0" officeooo:paragraph-rsid="0034f9bc"/>
    </style:style>
    <style:style style:name="P63" style:family="paragraph" style:parent-style-name="Standard" style:list-style-name="L1" style:master-page-name="">
      <loext:graphic-properties draw:fill="none"/>
      <style:paragraph-properties fo:margin-left="0.6cm" fo:margin-right="0cm" fo:margin-top="0.101cm" fo:margin-bottom="0cm" style:contextual-spacing="false" fo:text-align="justify" style:justify-single-word="false" fo:text-indent="-0.64cm" style:auto-text-indent="false" style:page-number="auto" fo:background-color="transparent"/>
      <style:text-properties fo:font-style="normal" officeooo:rsid="0017ddb3" officeooo:paragraph-rsid="0017ddb3" style:font-style-asian="normal" style:font-style-complex="normal"/>
    </style:style>
    <style:style style:name="P64" style:family="paragraph" style:parent-style-name="Standard" style:list-style-name="L1" style:master-page-name="">
      <loext:graphic-properties draw:fill="none"/>
      <style:paragraph-properties fo:margin-left="0.6cm" fo:margin-right="0cm" fo:margin-top="0.101cm" fo:margin-bottom="0cm" style:contextual-spacing="false" fo:text-align="justify" style:justify-single-word="false" fo:text-indent="-0.64cm" style:auto-text-indent="false" style:page-number="auto" fo:background-color="transparent"/>
      <style:text-properties fo:font-style="normal" officeooo:rsid="00090761" officeooo:paragraph-rsid="0017ecd2" style:font-style-asian="normal" style:font-style-complex="normal"/>
    </style:style>
    <style:style style:name="P65" style:family="paragraph" style:parent-style-name="Standard" style:list-style-name="L1" style:master-page-name="">
      <loext:graphic-properties draw:fill="none"/>
      <style:paragraph-properties fo:margin-left="0.6cm" fo:margin-right="0cm" fo:margin-top="0.101cm" fo:margin-bottom="0cm" style:contextual-spacing="false" fo:text-align="justify" style:justify-single-word="false" fo:text-indent="-0.64cm" style:auto-text-indent="false" style:page-number="auto" fo:background-color="transparent"/>
      <style:text-properties fo:font-style="normal" officeooo:rsid="00090761" officeooo:paragraph-rsid="00090761" style:font-style-asian="normal" style:font-style-complex="normal"/>
    </style:style>
    <style:style style:name="P66"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fo:font-style="normal" officeooo:rsid="00090761" officeooo:paragraph-rsid="00090761" style:font-style-asian="normal" style:font-style-complex="normal"/>
    </style:style>
    <style:style style:name="P67" style:family="paragraph" style:parent-style-name="Standard" style:list-style-name="L2">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tyle="normal" officeooo:rsid="00232237" officeooo:paragraph-rsid="00260ae9" style:font-style-asian="normal" style:font-style-complex="normal"/>
    </style:style>
    <style:style style:name="P68" style:family="paragraph" style:parent-style-name="Standard" style:list-style-name="L1" style:master-page-name="">
      <loext:graphic-properties draw:fill="none"/>
      <style:paragraph-properties fo:margin-left="0.6cm" fo:margin-right="0cm" fo:margin-top="0.101cm" fo:margin-bottom="0cm" style:contextual-spacing="false" fo:text-align="justify" style:justify-single-word="false" fo:text-indent="-0.64cm" style:auto-text-indent="false" style:page-number="auto" fo:background-color="transparent"/>
      <style:text-properties officeooo:paragraph-rsid="00090761"/>
    </style:style>
    <style:style style:name="P69" style:family="paragraph" style:parent-style-name="Standard" style:list-style-name="L2" style:master-page-name="">
      <loext:graphic-properties draw:fill="none"/>
      <style:paragraph-properties fo:margin-left="0.6cm" fo:margin-right="0cm" fo:margin-top="0.101cm" fo:margin-bottom="0cm" style:contextual-spacing="false" fo:text-align="justify" style:justify-single-word="false" fo:text-indent="-0.6cm" style:auto-text-indent="false" style:page-number="auto" fo:background-color="transparent"/>
      <style:text-properties officeooo:paragraph-rsid="0024bfa6"/>
    </style:style>
    <style:style style:name="P70" style:family="paragraph" style:parent-style-name="Standard" style:list-style-name="L2"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text-properties officeooo:paragraph-rsid="0024bfa6"/>
    </style:style>
    <style:style style:name="P71" style:family="paragraph" style:parent-style-name="Standard" style:list-style-name="L2">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officeooo:paragraph-rsid="0024bfa6"/>
    </style:style>
    <style:style style:name="P72" style:family="paragraph" style:parent-style-name="Standard" style:list-style-name="L2">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officeooo:paragraph-rsid="00260ae9"/>
    </style:style>
    <style:style style:name="P73" style:family="paragraph" style:parent-style-name="Standard" style:list-style-name="L3">
      <loext:graphic-properties draw:fill="none"/>
      <style:paragraph-properties fo:margin-left="0.6cm" fo:margin-right="0cm" fo:margin-top="0.101cm" fo:margin-bottom="0cm" style:contextual-spacing="false" fo:text-align="justify" style:justify-single-word="false" fo:text-indent="-0.64cm" style:auto-text-indent="false" fo:background-color="transparent"/>
      <style:text-properties officeooo:paragraph-rsid="004bf87d"/>
    </style:style>
    <style:style style:name="P74" style:family="paragraph" style:parent-style-name="Standard" style:list-style-name="L3" style:master-page-name="">
      <loext:graphic-properties draw:fill="none"/>
      <style:paragraph-properties fo:margin-left="0.6cm" fo:margin-right="0cm" fo:margin-top="0.101cm" fo:margin-bottom="0cm" style:contextual-spacing="false" fo:text-align="justify" style:justify-single-word="false" fo:text-indent="-0.64cm" style:auto-text-indent="false" style:page-number="auto" fo:background-color="transparent"/>
      <style:text-properties fo:font-size="12pt" fo:font-style="normal" officeooo:rsid="004bf87d" officeooo:paragraph-rsid="004bf87d" style:font-size-asian="10.5pt" style:font-style-asian="normal" style:font-size-complex="12pt" style:font-style-complex="normal"/>
    </style:style>
    <style:style style:name="P75" style:family="paragraph" style:parent-style-name="Standard" style:list-style-name="L3">
      <loext:graphic-properties draw:fill="none"/>
      <style:paragraph-properties fo:margin-left="0.6cm" fo:margin-right="0cm" fo:margin-top="0.101cm" fo:margin-bottom="0cm" style:contextual-spacing="false" fo:text-align="justify" style:justify-single-word="false" fo:text-indent="-0.64cm" style:auto-text-indent="false" fo:background-color="transparent"/>
      <style:text-properties fo:font-size="12pt" fo:font-style="normal" officeooo:rsid="004bf87d" officeooo:paragraph-rsid="004bf87d" style:font-size-asian="10.5pt" style:font-style-asian="normal" style:font-size-complex="12pt" style:font-style-complex="normal"/>
    </style:style>
    <style:style style:name="P76" style:family="paragraph" style:parent-style-name="Standard" style:list-style-name="L3">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ize="12pt" fo:font-style="normal" officeooo:rsid="004e4425" officeooo:paragraph-rsid="004e4425" style:font-size-asian="10.5pt" style:font-style-asian="normal" style:font-size-complex="12pt" style:font-style-complex="normal"/>
    </style:style>
    <style:style style:name="P77" style:family="paragraph" style:parent-style-name="Standard" style:list-style-name="L3">
      <loext:graphic-properties draw:fill="none"/>
      <style:paragraph-properties fo:margin-top="0.3cm" fo:margin-bottom="0cm" style:contextual-spacing="false" fo:text-align="justify" style:justify-single-word="false" fo:background-color="transparent"/>
      <style:text-properties fo:font-size="12pt" officeooo:rsid="004c94c7" officeooo:paragraph-rsid="004c94c7" style:font-size-asian="10.5pt" style:font-size-complex="12pt"/>
    </style:style>
    <style:style style:name="P78" style:family="paragraph" style:parent-style-name="Standard" style:list-style-name="L3" style:master-page-name="">
      <loext:graphic-properties draw:fill="none"/>
      <style:paragraph-properties fo:margin-left="1.27cm" fo:margin-right="0cm" fo:margin-top="0.101cm" fo:margin-bottom="0cm" style:contextual-spacing="false" fo:text-align="justify" style:justify-single-word="false" fo:text-indent="-0.64cm" style:auto-text-indent="false" style:page-number="auto" fo:background-color="transparent"/>
      <style:text-properties fo:font-size="12pt" officeooo:rsid="004c94c7" officeooo:paragraph-rsid="004c94c7" style:font-size-asian="10.5pt" style:font-size-complex="12pt"/>
    </style:style>
    <style:style style:name="P79" style:family="paragraph" style:parent-style-name="Standard" style:list-style-name="L3">
      <loext:graphic-properties draw:fill="none"/>
      <style:paragraph-properties fo:margin-left="1.27cm" fo:margin-right="0cm" fo:margin-top="0.101cm" fo:margin-bottom="0cm" style:contextual-spacing="false" fo:text-align="justify" style:justify-single-word="false" fo:text-indent="-0.64cm" style:auto-text-indent="false" fo:background-color="transparent"/>
      <style:text-properties fo:font-size="12pt" officeooo:rsid="004c94c7" officeooo:paragraph-rsid="004c94c7" style:font-size-asian="10.5pt" style:font-size-complex="12pt"/>
    </style:style>
    <style:style style:name="P80" style:family="paragraph" style:parent-style-name="Standard" style:list-style-name="L3"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fo:font-size="12pt" officeooo:rsid="004e4425" officeooo:paragraph-rsid="004e4425" style:font-size-asian="10.5pt" style:font-size-complex="12pt"/>
    </style:style>
    <style:style style:name="P81" style:family="paragraph" style:parent-style-name="Standard" style:list-style-name="L3">
      <loext:graphic-properties draw:fill="none"/>
      <style:paragraph-properties fo:margin-left="0cm" fo:margin-right="0cm" fo:margin-top="0.101cm" fo:margin-bottom="0cm" style:contextual-spacing="false" fo:text-align="justify" style:justify-single-word="false" fo:text-indent="0cm" style:auto-text-indent="false" fo:background-color="transparent"/>
      <style:text-properties fo:font-size="12pt" officeooo:rsid="004e4425" officeooo:paragraph-rsid="004e4425" style:font-size-asian="10.5pt" style:font-size-complex="12pt"/>
    </style:style>
    <style:style style:name="P82" style:family="paragraph" style:parent-style-name="Standard">
      <style:paragraph-properties fo:margin-top="0.199cm" fo:margin-bottom="0cm" style:contextual-spacing="false" fo:text-align="justify" style:justify-single-word="false"/>
      <style:text-properties fo:font-size="12pt" officeooo:rsid="003492b0" officeooo:paragraph-rsid="003492b0" style:font-size-asian="10.5pt" style:font-size-complex="12pt"/>
    </style:style>
    <style:style style:name="P83" style:family="paragraph" style:parent-style-name="Standard" style:list-style-name="L3" style:master-page-name="">
      <loext:graphic-properties draw:fill="none"/>
      <style:paragraph-properties fo:margin-left="0cm" fo:margin-right="0cm" fo:margin-top="0.3cm" fo:margin-bottom="0cm" style:contextual-spacing="false" fo:text-align="justify" style:justify-single-word="false" fo:text-indent="0cm" style:auto-text-indent="false" style:page-number="auto" fo:background-color="transparent"/>
      <style:text-properties fo:font-size="14pt" fo:font-style="normal" officeooo:rsid="004bf87d" officeooo:paragraph-rsid="004bf87d" style:font-size-asian="14pt" style:font-style-asian="normal" style:font-size-complex="14pt" style:font-style-complex="normal"/>
    </style:style>
    <style:style style:name="T1" style:family="text">
      <style:text-properties officeooo:rsid="0035a6d7"/>
    </style:style>
    <style:style style:name="T2" style:family="text">
      <style:text-properties officeooo:rsid="0034f9bc"/>
    </style:style>
    <style:style style:name="T3" style:family="text">
      <style:text-properties officeooo:rsid="00458e66"/>
    </style:style>
    <style:style style:name="T4" style:family="text">
      <style:text-properties fo:font-size="12pt" style:font-size-asian="10.5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officeooo:rsid="004bf87d" style:font-size-asian="10.5pt" style:font-style-asian="normal" style:font-size-complex="12pt" style:font-style-complex="normal"/>
    </style:style>
    <style:style style:name="T7" style:family="text">
      <style:text-properties fo:font-size="12pt" fo:font-style="normal" officeooo:rsid="004c94c7" style:font-size-asian="10.5pt" style:font-style-asian="normal" style:font-size-complex="12pt" style:font-style-complex="normal"/>
    </style:style>
    <style:style style:name="T8" style:family="text">
      <style:text-properties fo:font-size="12pt" fo:font-style="italic" officeooo:rsid="004bf87d" style:font-size-asian="10.5pt" style:font-style-asian="italic" style:font-size-complex="12pt" style:font-style-complex="italic"/>
    </style:style>
    <style:style style:name="T9" style:family="text">
      <style:text-properties officeooo:rsid="00090761"/>
    </style:style>
    <style:style style:name="T10" style:family="text">
      <style:text-properties officeooo:rsid="000ab6b1"/>
    </style:style>
    <style:style style:name="T11" style:family="text">
      <style:text-properties officeooo:rsid="0051b3c2"/>
    </style:style>
    <style:style style:name="T12" style:family="text">
      <style:text-properties fo:font-style="italic" style:font-style-asian="italic" style:font-style-complex="italic"/>
    </style:style>
    <style:style style:name="T13" style:family="text">
      <style:text-properties fo:font-style="italic" officeooo:rsid="0015fb78" style:font-style-asian="italic" style:font-style-complex="italic"/>
    </style:style>
    <style:style style:name="T14" style:family="text">
      <style:text-properties fo:font-style="italic" officeooo:rsid="00232237" style:font-style-asian="italic" style:font-style-complex="italic"/>
    </style:style>
    <style:style style:name="T15" style:family="text">
      <style:text-properties fo:font-style="italic" officeooo:rsid="0017ecd2" style:font-style-asian="italic" style:font-style-complex="italic"/>
    </style:style>
    <style:style style:name="T16" style:family="text">
      <style:text-properties officeooo:rsid="0010ef0d"/>
    </style:style>
    <style:style style:name="T17" style:family="text">
      <style:text-properties officeooo:rsid="002819ba"/>
    </style:style>
    <style:style style:name="T18" style:family="text">
      <style:text-properties officeooo:rsid="000c42ba"/>
    </style:style>
    <style:style style:name="T19" style:family="text">
      <style:text-properties officeooo:rsid="000d75a6"/>
    </style:style>
    <style:style style:name="T20" style:family="text">
      <style:text-properties officeooo:rsid="0012103b"/>
    </style:style>
    <style:style style:name="T21" style:family="text">
      <style:text-properties officeooo:rsid="0015fb78"/>
    </style:style>
    <style:style style:name="T22" style:family="text">
      <style:text-properties officeooo:rsid="00139689"/>
    </style:style>
    <style:style style:name="T23" style:family="text">
      <style:text-properties officeooo:rsid="00140b00"/>
    </style:style>
    <style:style style:name="T24" style:family="text">
      <style:text-properties officeooo:rsid="0017ddb3"/>
    </style:style>
    <style:style style:name="T25" style:family="text">
      <style:text-properties officeooo:rsid="00195290"/>
    </style:style>
    <style:style style:name="T26" style:family="text">
      <style:text-properties fo:font-style="normal" style:font-style-asian="normal" style:font-style-complex="normal"/>
    </style:style>
    <style:style style:name="T27" style:family="text">
      <style:text-properties fo:font-style="normal" officeooo:rsid="00090761" style:font-style-asian="normal" style:font-style-complex="normal"/>
    </style:style>
    <style:style style:name="T28" style:family="text">
      <style:text-properties fo:font-style="normal" officeooo:rsid="0017ddb3" style:font-style-asian="normal" style:font-style-complex="normal"/>
    </style:style>
    <style:style style:name="T29" style:family="text">
      <style:text-properties fo:font-style="normal" officeooo:rsid="001b7db8" style:font-style-asian="normal" style:font-style-complex="normal"/>
    </style:style>
    <style:style style:name="T30" style:family="text">
      <style:text-properties fo:font-style="normal" officeooo:rsid="002a15be" style:font-style-asian="normal" style:font-style-complex="normal"/>
    </style:style>
    <style:style style:name="T31" style:family="text">
      <style:text-properties fo:font-style="normal" officeooo:rsid="001f4a07" style:font-style-asian="normal" style:font-style-complex="normal"/>
    </style:style>
    <style:style style:name="T32" style:family="text">
      <style:text-properties fo:font-style="normal" officeooo:rsid="002a406d" style:font-style-asian="normal" style:font-style-complex="normal"/>
    </style:style>
    <style:style style:name="T33" style:family="text">
      <style:text-properties fo:font-style="normal" officeooo:rsid="0020f2b0" style:font-style-asian="normal" style:font-style-complex="normal"/>
    </style:style>
    <style:style style:name="T34" style:family="text">
      <style:text-properties fo:font-style="normal" officeooo:rsid="002a974c" style:font-style-asian="normal" style:font-style-complex="normal"/>
    </style:style>
    <style:style style:name="T35" style:family="text">
      <style:text-properties fo:font-style="normal" officeooo:rsid="002c44c6" style:font-style-asian="normal" style:font-style-complex="normal"/>
    </style:style>
    <style:style style:name="T36" style:family="text">
      <style:text-properties fo:font-style="normal" officeooo:rsid="002ad937" style:font-style-asian="normal" style:font-style-complex="normal"/>
    </style:style>
    <style:style style:name="T37" style:family="text">
      <style:text-properties fo:font-style="normal" officeooo:rsid="002dd0c6" style:font-style-asian="normal" style:font-style-complex="normal"/>
    </style:style>
    <style:style style:name="T38" style:family="text">
      <style:text-properties fo:font-style="normal" officeooo:rsid="0024bfa6" style:font-style-asian="normal" style:font-style-complex="normal"/>
    </style:style>
    <style:style style:name="T39" style:family="text">
      <style:text-properties fo:font-style="normal" officeooo:rsid="00232237" style:font-style-asian="normal" style:font-style-complex="normal"/>
    </style:style>
    <style:style style:name="T40" style:family="text">
      <style:text-properties fo:font-style="normal" officeooo:rsid="00260ae9" style:font-style-asian="normal" style:font-style-complex="normal"/>
    </style:style>
    <style:style style:name="T41" style:family="text">
      <style:text-properties fo:font-style="normal" officeooo:rsid="0017ecd2" style:font-style-asian="normal" style:font-style-complex="normal"/>
    </style:style>
    <style:style style:name="T42" style:family="text">
      <style:text-properties fo:font-style="normal" officeooo:rsid="001d537e" style:font-style-asian="normal" style:font-style-complex="normal"/>
    </style:style>
    <style:style style:name="T43" style:family="text">
      <style:text-properties fo:font-style="normal" officeooo:rsid="00314fdf" style:font-style-asian="normal" style:font-style-complex="normal"/>
    </style:style>
    <style:style style:name="T44" style:family="text">
      <style:text-properties fo:font-style="normal" officeooo:rsid="0027c010" style:font-style-asian="normal" style:font-style-complex="normal"/>
    </style:style>
    <style:style style:name="T45" style:family="text">
      <style:text-properties fo:font-style="normal" officeooo:rsid="004bf87d" style:font-style-asian="normal" style:font-style-complex="normal"/>
    </style:style>
    <style:style style:name="T46" style:family="text">
      <style:text-properties fo:font-style="normal" officeooo:rsid="004e4425" style:font-style-asian="normal" style:font-style-complex="normal"/>
    </style:style>
    <style:style style:name="T47" style:family="text">
      <style:text-properties fo:font-style="normal" officeooo:rsid="0050549a" style:font-style-asian="normal" style:font-style-complex="normal"/>
    </style:style>
    <style:style style:name="T48" style:family="text">
      <style:text-properties fo:font-size="11pt" fo:font-style="normal" fo:font-weight="bold" style:font-size-asian="11pt" style:font-style-asian="normal" style:font-weight-asian="bold" style:font-size-complex="11pt" style:font-style-complex="normal" style:font-weight-complex="bold"/>
    </style:style>
    <style:style style:name="T49" style:family="text">
      <style:text-properties fo:font-size="11pt" fo:font-style="normal" fo:font-weight="bold" officeooo:rsid="00232237" style:font-size-asian="11pt" style:font-style-asian="normal" style:font-weight-asian="bold" style:font-size-complex="11pt" style:font-style-complex="normal" style:font-weight-complex="bold"/>
    </style:style>
    <style:style style:name="T50" style:family="text">
      <style:text-properties fo:font-size="11pt" fo:font-style="normal" fo:font-weight="bold" officeooo:rsid="0017ecd2" style:font-size-asian="11pt" style:font-style-asian="normal" style:font-weight-asian="bold" style:font-size-complex="11pt" style:font-style-complex="normal" style:font-weight-complex="bold"/>
    </style:style>
    <style:style style:name="T51" style:family="text">
      <style:text-properties fo:font-size="11pt" fo:font-weight="bold" style:font-size-asian="11pt" style:font-weight-asian="bold" style:font-size-complex="11pt" style:font-weight-complex="bold"/>
    </style:style>
    <style:style style:name="T52" style:family="text">
      <style:text-properties officeooo:rsid="002dd0c6"/>
    </style:style>
    <style:style style:name="T53" style:family="text">
      <style:text-properties officeooo:rsid="00314fdf"/>
    </style:style>
    <style:style style:name="T54" style:family="text">
      <style:text-properties officeooo:rsid="003b6539"/>
    </style:style>
    <style:style style:name="T55" style:family="text">
      <style:text-properties officeooo:rsid="003de9c0"/>
    </style:style>
    <style:style style:name="T56" style:family="text">
      <style:text-properties officeooo:rsid="003dfbda"/>
    </style:style>
    <style:style style:name="T57" style:family="text">
      <style:text-properties officeooo:rsid="003ebafe"/>
    </style:style>
    <style:style style:name="T58" style:family="text">
      <style:text-properties officeooo:rsid="0040019f"/>
    </style:style>
    <style:style style:name="T59" style:family="text">
      <style:text-properties officeooo:rsid="00365f74"/>
    </style:style>
    <style:style style:name="T60" style:family="text">
      <style:text-properties officeooo:rsid="0036e457"/>
    </style:style>
    <style:style style:name="T61" style:family="text">
      <style:text-properties officeooo:rsid="0048b629"/>
    </style:style>
    <style:style style:name="T62" style:family="text">
      <style:text-properties officeooo:rsid="004909da"/>
    </style:style>
    <style:style style:name="T63" style:family="text">
      <style:text-properties officeooo:rsid="0047c766"/>
    </style:style>
    <style:style style:name="T64" style:family="text">
      <style:text-properties officeooo:rsid="005362ff"/>
    </style:style>
    <style:style style:name="T65" style:family="text">
      <style:text-properties officeooo:rsid="004b92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 text:is-list-header="true"><text:bookmark-start text:name="__RefHeading___Toc1482_2067833096"/>Benedetto De Spinoza (1632—1677)<text:bookmark-end text:name="__RefHeading___Toc1482_2067833096"/></text:h>
      <text:p text:style-name="P82">Chi è Baruch de Spinoza? Come definirlo? <text:span text:style-name="T1">U</text:span>n uomo libero da pregiudizi? Un temerario? Un ribelle? <text:span text:style-name="T2">Un razionalista radicale?</text:span></text:p>
      <text:p text:style-name="P12">Definire Spinoza con un'unica etichetta è riduttivo, data la complessità del suo pensiero e della sua vita. Tuttavia, le definizioni propost<text:span text:style-name="T2">e</text:span> colgono aspetti importanti della sua figura.</text:p>
      <text:p text:style-name="P10">Spinoza fu un pensatore profondamente originale, si liberò dalle convenzioni del suo tempo e dalle dottrine tradizionali, sia religiose che filosofiche. La sua critica alla religione rivelata, la sua concezione di Dio come Natura e la sua analisi razionale degli affetti, testimoniano una mente libera da pregiudizi e aperta alla ricerca della verità.</text:p>
      <text:p text:style-name="P10">Era sicuramente un temerario, disposto a rischiare la sua sicurezza e la sua posizione per rimanere fedele ai suoi principi filosofici e religiosi. Rinunciò a molte delle comodità della vita, scegliendo una vita semplice di lavoro manuale come lucidatore di lenti, pur di preservare la sua indipendenza intellettuale. <text:span text:style-name="T3">Fu </text:span>un intellettuale coraggioso che difese le proprie idee contro le autorità religiose e politiche. La sua scomunica dalla comunità ebraica e le polemiche suscitate dalle sue opere dimostrano il suo coraggio intellettuale.</text:p>
      <text:p text:style-name="P10">La sua critica alla religione e la sua difesa della libertà di pensiero lo esposero a rischi considerevoli. Pubblicare il "Trattato teologico-politico" anonimamente fu una scelta <text:soft-page-break/>dettata dalla necessità di proteggersi dalle possibili persecuzioni. La sua stessa vita, trascorsa in relativa solitudine e dedicandosi alla molatura di lenti per mantenersi, testimonia una scelta di vita austera e lontana dai clamori del mondo.</text:p>
      <text:p text:style-name="P10">Spinoza fu un ribelle nel senso di un pensatore che si oppose alle dottrine consolidate e che propose una visione del mondo radicalmente nuova. La sua filosofia, con la sua concezione monistica di Dio/Natura, la sua critica al libero arbitrio e la sua analisi razionale degli affetti, rappresentò una vera e propria rivoluzione intellettuale.</text:p>
      <text:p text:style-name="P11">Spinoza portò alle estreme conseguenze l'ideale della ragione, cercando di spiegare la realtà in modo rigoroso e sistematico, attraverso un metodo che si ispirava alla matematica. La sua fiducia nella ragione come strumento per comprendere il mondo e per guidare la condotta umana è una delle caratteristiche fondamentali del suo pensiero.</text:p>
      <text:p text:style-name="P11">La sua figura si staglia nel panorama filosofico come quella di un pensatore indipendente e coraggioso, che ha lasciato un'impronta indelebile nella storia del pensiero occidentale.</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1"><text:span text:style-name="T4"/></text:p>
      <text:p text:style-name="P22"><draw:frame draw:style-name="fr1" draw:name="Immagine1" text:anchor-type="char" svg:width="2.806cm" svg:height="3.561cm" draw:z-index="0"><draw:image xlink:href="Pictures/100000000000004C000000646CF3C3CE.png" xlink:type="simple" xlink:show="embed" xlink:actuate="onLoad" draw:mime-type="image/png"/></draw:frame></text:p>
      <text:p text:style-name="P22"/>
      <text:p text:style-name="P22"/>
      <text:p text:style-name="P22"/>
      <text:p text:style-name="P22"/>
      <text:p text:style-name="P22"/>
      <text:p text:style-name="P22"/>
      <text:p text:style-name="P22"/>
      <text:p text:style-name="P62"><text:span text:style-name="T9">Tra i filosofi, Spinoza è meglio conosciuto per la sua <text:s/>Etica, un'opera monumentale che presenta una visione etica che si sviluppa da una metafisica monistica</text:span><text:span text:style-name="T9"><text:note text:id="ftn1" text:note-class="footnote"><text:note-citation>1</text:note-citation><text:note-body><text:p text:style-name="Footnote"><text:span text:style-name="T9">D</text:span>ottrina che riporta la pluralità degli esseri a un'unica sostanza o a un unico principio.</text:p></text:note-body></text:note></text:span><text:span text:style-name="T9"> in cui Dio e la Natura sono identificati. Dio non è più il creatore trascendente dell'universo che lo governa tramite la provvidenza, ma la Natura stessa, intesa come un sistema infinito, necessario e completamente deterministico di cui gli esseri umani sono parte. Gli esseri umani trovano la felicità solo attraverso una comprensione razionale di questo sistema e del loro posto al suo interno. A causa di questa e delle molte altre posizioni provocatorie che sostiene, Spinoza è rimasto una figura enormemente controversa. Per molti, è il precursore della modernità illuminata che ci chiama a vivere secondo la guida della ragione. Per altri, è il </text:span><text:soft-page-break/><text:span text:style-name="T9">nemico delle tradizioni che ci sostengono e il negatore di ciò che è nobile dentro di noi. </text:span></text:p>
      <text:p text:style-name="P23">Il giovane Spinoza, a cui fu dato il nome di Baruch, fu istruito nell'accademia della sua congregazione, la scuola Talmud Torah. Lì ricevette il tipo di istruzione che la comunità riteneva necessaria per costituire un ebreo istruito. Questa consisteva in gran parte in studi religiosi, tra cui l'istruzione in ebraico, liturgia, Torah, scritti profetici e commentari rabbinici. Sebbene Spinoza eccellesse senza dubbio in questi, non passò ai livelli superiori di studio che si concentravano sul Talmud e che erano in genere intrapresi da coloro che si preparavano per il rabbinato.</text:p>
      <text:p text:style-name="P23">La comunità ebraica di Amsterdam non era affatto chiusa, ma le attività commerciali di Spinoza lo misero in contatto con correnti di pensiero più diverse di quelle a cui era stato esposto fino a quel momento. In modo più significativo, entrò in contatto con i cosiddetti protestanti "liberi pensatori" - dissidenti dal dominante calvinismo - che mantenevano un vivo interesse per un'ampia gamma di questioni teologiche, così come per gli ultimi sviluppi in filosofia e scienza. Ciò includeva naturalmente l'opera di Cartesio, che era considerata da molti in Olanda la più promettente tra le diverse alternative alla scolastica.</text:p>
      <text:p text:style-name="P23">Per discutere i loro interessi, questi liberi pensatori si organizzarono in piccoli gruppi, che chiamavano college, che si incontravano regolarmente. Spinoza potrebbe aver partecipato a tali incontri già nella prima metà degli anni <text:soft-page-break/>'50 del Seicento, ed è molto probabile che qui abbia avuto la sua prima esposizione al pensiero cartesiano.</text:p>
      <text:p text:style-name="P23">Ciò non significa che Spinoza abbia smesso di sfruttare le risorse della sua tradizione (si immerse, ad esempio, negli scritti di figure filosoficamente importanti come Maimonide e Gersonide), ma i suoi orizzonti intellettuali si stavano espandendo e stava sperimentando un'irrequietezza che lo spinse a guardare più lontano. Fu in questo periodo che si pose sotto la tutela di un ex gesuita, Franciscus Van den Enden, che aveva da poco fondato una scuola di latino ad Amsterdam. Van den Enden si rivelò l'insegnante perfetto per Spinoza.</text:p>
      <text:p text:style-name="P23">Il riorientamento intellettuale di Spinoza, tuttavia, ebbe un costo. Le sue opinioni sempre più eterodosse e, forse, <text:span text:style-name="T10">il suo allentamento</text:span> nell'osservanza della legge ebraica misero a dura prova i suoi rapporti con la comunità. Le tensioni divennero così grandi che, nel 1656, gli anziani della sinagoga intrapresero un procedimento per scomunicarlo. Senza fornire dettagli, il mandato di scomunica lo accusa di "eresie abominevoli" e "azioni mostruose". Quindi lancia una serie di maledizioni contro di lui e proibisce ad altri di comunicare con lui, di fare affari con lui, di leggere qualsiasi cosa scriva o persino di avvicinarsi a lui. Spinoza poteva ancora essere un ebreo, ma ora era un emarginato. <text:span text:style-name="T11">Il</text:span> documento di cherem (bando o scomunica), gravissimo e mai revocato, che era assai esplicito e non faceva ricorso a eufemismi:</text:p>
      <text:p text:style-name="P24"/>
      <text:h text:style-name="P60" text:outline-level="2"><text:bookmark-start text:name="__RefHeading___Toc1484_2067833096"/><text:soft-page-break/>Il testo della scomunica<text:bookmark-end text:name="__RefHeading___Toc1484_2067833096"/></text:h>
      <text:p text:style-name="P13">“I Signori del Mahamad rendono noto che, venuti a conoscenza già da tempo delle cattive opinioni e del comportamento di Baruch Spinoza, hanno tentato in diversi modi e anche con promesse di distoglierlo dalla cattiva strada. Non essendovi riusciti e ricevendo, al contrario, ogni giorno informazioni sempre maggiori sulle orribili eresie che egli sosteneva e insegnava e sulle azioni mostruose che commetteva – cose delle quali esistono testimoni degni di fede che hanno deposto e testimoniato anche in presenza del suddetto Spinoza – questi è stato riconosciuto colpevole. Avendo esaminato tutto ciò in presenza dei Signori Rabbini, i Signori del Mahamad hanno deciso, con l'accordo dei Rabbini, che il nominato Spinoza sarebbe stato bandito (enhermado) e separato dalla Nazione d'Israele in conseguenza della scomunica (cherem) che pronunciamo adesso nei termini che seguono:</text:p>
      <text:p text:style-name="P27">Con il giudizio degli angeli e la sentenza dei santi, noi dichiariamo Baruch de Spinoza scomunicato, esecrato, maledetto ed espulso, con l'assenso di tutta la sacra comunità [...]. Sia maledetto di giorno e maledetto di notte; sia maledetto quando si corica e maledetto quando si alza; maledetto nell'uscire e maledetto nell'entrare. Possa il Signore mai piú perdonarlo; possano l'ira e la collera del Signore ardere, d'ora innanzi, quest'uomo, far pesare su di lui tutte le maledizioni scritte nel Libro della Legge, e cancellare il suo nome dal cielo; possa il Signore separarlo, per la sua malvagità, da tutte le tribú d'Israele, opprimerlo <text:soft-page-break/>con tutte le maledizioni del cielo contenute nel Libro della Legge [...]. Siete tutti ammoniti, che d'ora innanzi nessuno deve parlare con lui a voce, né comunicare con lui per iscritto; che nessuno deve prestargli servizio, né dormire sotto il suo stesso tetto, nessuno avvicinarsi a lui oltre i quattro cubiti [circa due metri], e nessuno leggere alcunché dettato da lui o scritto di suo pugno”.</text:p>
      <text:p text:style-name="P28">Si sa poco delle attività di Spinoza negli anni immediatamente successivi alla sua scomunica. Continuò gli studi con Van den Enden e occasionalmente prese residenza nella casa del suo insegnante. Poiché gli era ormai impossibile continuare a commerciare, fu molto probabile che in questo periodo intraprese l'attività di molatore di lenti. Ci sono anche prove che si recasse periodicamente a Leida per studiare all'università. Lì avrebbe ricevuto un'istruzione formale in filosofia cartesiana e avrebbe familiarizzato con l'opera di importanti cartesiani olandesi. Nel 1661, si stabilì vicino a Leida, nella città di Rijnsburg.</text:p>
      <text:p text:style-name="P32">Fu durante questo stesso periodo, alla fine degli anni 1650, che Spinoza intraprese la sua carriera letteraria. La sua prima opera, il <text:s/>“<text:span text:style-name="T12">Trattato sull'emendazione dell'intelletto”</text:span> , è un tentativo di formulare un metodo filosofico che avrebbe permesso alla mente di formare le idee chiare e distinte che sono necessarie per la sua perfezione.</text:p>
      <text:p text:style-name="P32">Il "Trattato sull'emendazione dell'intelletto" (in latino "Tractatus de intellectus emendatione") è un'opera <text:soft-page-break/>incompiuta di Baruch Spinoza, scritta probabilmente tra il 1656 e il 1661 e pubblicata postuma nel 1677. Nonostante sia incompiuta, è considerata fondamentale per comprendere il pensiero di Spinoza, in quanto espone le basi del suo metodo filosofico e la sua concezione della conoscenza.</text:p>
      <text:p text:style-name="P29">L'opera si apre con una riflessione sulla natura dei beni e dei mali. Spinoza osserva che la maggior parte delle persone ricerca beni effimeri, come la ricchezza, il piacere e la fama, che non portano alla vera felicità. Egli si propone quindi di trovare un bene autentico e duraturo, capace di appagare l'animo umano. Questo bene, secondo Spinoza, coincide con la conoscenza di Dio e della natura, che permette di raggiungere la beatitudine.</text:p>
      <text:p text:style-name="P29">Per raggiungere questa conoscenza, è necessario "emendare l'intelletto", ovvero liberarlo dai pregiudizi e dagli errori che ne ostacolano la comprensione della realtà. Spinoza critica in particolare la conoscenza sensoriale, che è parziale e ingannevole, e propone un metodo basato sulla ragione e sull'intuizione. Questo metodo consiste nell'analizzare le idee chiare e distinte, che sono innate nella mente umana, e dedurne le verità necessarie.</text:p>
      <text:p text:style-name="P29">Cosa significa "emendazione dell'intelletto"?</text:p>
      <text:p text:style-name="P29">L'espressione, si riferisce al processo di purificazione e correzione dell'intelletto umano, al fine di renderlo capace di conoscere la verità. Spinoza ritiene che <text:soft-page-break/>l'intelletto sia naturalmente incline all'errore, a causa dei pregiudizi, delle passioni e della dipendenza dai sensi. Per questo motivo, è necessario sottoporlo a un'opera di "emendazione", <text:span text:style-name="T16">attraverso un cammino che porti a:</text:span></text:p>
      <text:p text:style-name="P66">Liberazione dai pregiudizi: Spinoza critica i pregiudizi comuni, come la credenza nel libero arbitrio, nella finalità della natura e nell'esistenza di un Dio antropomorfo.</text:p>
      <text:p text:style-name="P66">Critica della conoscenza sensoriale: Spinoza mette in guardia contro l'affidamento esclusivo ai sensi, che forniscono una conoscenza parziale e distorta della realtà.</text:p>
      <text:p text:style-name="P66">Uso della ragione: Spinoza esalta il ruolo della ragione, che permette di cogliere le idee chiare e distinte e di dedurne le verità necessarie.</text:p>
      <text:p text:style-name="P66">Intuizione: Spinoza riconosce anche l'importanza dell'intuizione, una forma di conoscenza immediata e certa che permette di cogliere le verità fondamentali.</text:p>
      <text:p text:style-name="P29"><text:span text:style-name="T17">Q</text:span><text:span text:style-name="T16">uesto processo </text:span><text:span text:style-name="T17">è </text:span>essenziale per conseguire la vera felicità, che consiste nella conoscenza di Dio e della natura.</text:p>
      <text:p text:style-name="P29">Poco dopo, mentre si trovava a Rijnsburg, Spinoza si mise al lavoro sul suo <text:s/>“<text:span text:style-name="T12">Breve trattato su Dio, l'uomo e il suo benessere</text:span>” scritta probabilmente tra il 1661 e il 1662.</text:p>
      <text:p text:style-name="P29"><text:span text:style-name="T18">Quest'opera, fatta circolare privatamente tra amici, prefigura molti dei temi della sua opera </text:span><text:span text:style-name="T19">maggiore</text:span><text:span text:style-name="T18">, l' <text:s/>“Etica”. In particolare, contiene un'affermazione inequivocabile della più famosa delle tesi di Spinoza: "Deus sive Natura" l'identità di Dio e della Natura.</text:span></text:p>
      <text:p text:style-name="P29"><text:soft-page-break/>Spinoza definisce Dio come l'unica sostanza infinita ed eterna, causa di sé stesso e di tutte le cose. Dio non è un essere trascendente al mondo, ma coincide con la natura stessa (concezione panteistica). <text:span text:style-name="T20">L</text:span>'uomo <text:span text:style-name="T20">è</text:span> parte della natura, soggetto alle stesse leggi che governano l'intero universo. L'uomo è composto di corpo e mente, che non sono due sostanze distinte, ma due aspetti della stessa realtà. </text:p>
      <text:p text:style-name="P35"><text:span text:style-name="T21">Per Spinoza, i</text:span>l bene e<text:span text:style-name="T21">d</text:span> il male, <text:span text:style-name="T22">concepiti secondo tradizione, ovvero, relativi e dipendenti dalle passioni umane, come l'amore, l'odio, la gioia e la tristezza, <text:s/></text:span><text:span text:style-name="T23">possono essere controllati dalla ragione. </text:span><text:span text:style-name="T22">Spinoza </text:span><text:span text:style-name="T23">riscontra nel bene la conoscenza di Dio attraverso la natura che porta alla beatitudine.</text:span></text:p>
      <text:p text:style-name="P36">Perché Baruch Spinosa fu scomunicato? Quali furono le motivazioni che determinarono la scomunica dalla comunità ebraica del 1656? </text:p>
      <text:p text:style-name="P36"><text:span text:style-name="T21">Dio come “</text:span><text:span text:style-name="T13">unica sostanza</text:span><text:span text:style-name="T21">” sembra essere </text:span><text:span text:style-name="T24">il più alto pensiero e riconoscimento che Spinoza </text:span><text:span text:style-name="T21">potesse </text:span><text:span text:style-name="T24">fare nei confronti di Dio, eppure fu scomunicato.</text:span></text:p>
      <text:p text:style-name="P37"><text:span text:style-name="T25">Cerchiamo di comprendere </text:span>le probabili ragioni che portarono alla sua scomunica:</text:p>
      <text:list text:style-name="L1">
        <text:list-item>
          <text:p text:style-name="P63">L'identificazione di Dio con la Natura era considerata un'eresia, in quanto negava la distinzione tra Creatore e creato, tra sacro e profano. Questo implicava una critica implicita alla concezione di un Dio personale che interviene nella storia e che ha stipulato un'alleanza con il popolo ebraico.</text:p>
        </text:list-item>
        <text:list-item>
          <text:p text:style-name="P68"><text:soft-page-break/><text:span text:style-name="T27">Spinoza applicò un metodo razionalistico e storico-critico all'interpretazione delle Scritture </text:span><text:span text:style-name="T28">(Bibbia e tradizione)</text:span><text:span text:style-name="T27">, mettendo in discussione l'origine divina dei testi e la loro interpretazione tradizionale. Questo minava l'autorità delle istituzioni religiose. </text:span></text:p>
        </text:list-item>
        <text:list-item>
          <text:p text:style-name="P64">Spinoza non concepiva l'anima come un'entità separata dal corpo e immortale, ma come un aspetto della stessa sostanza. Questa posizione era in contrasto con la dottrina dell'immortalità dell'anima presente in molte tradizioni religiose. </text:p>
        </text:list-item>
        <text:list-item>
          <text:p text:style-name="P64">Spinoza negava il libero arbitrio, sostenendo che tutte le azioni umane sono determinate da cause necessarie. Questa posizione era vista come una minaccia all'etica religiosa, basata sulla responsabilità individuale e sulla possibilità di scegliere tra il bene e il male.</text:p>
        </text:list-item>
        <text:list-item>
          <text:p text:style-name="P65">La comunità ebraica di Amsterdam era una minoranza che cercava di mantenere un equilibrio con le autorità civili. Le idee radicali di Spinoza potevano essere percepite come una minaccia all'ordine pubblico e mettere a rischio la sicurezza della comunità.</text:p>
        </text:list-item>
      </text:list>
      <text:p text:style-name="P50"><text:span text:style-name="T27">P</text:span><text:span text:style-name="T26">ossiamo </text:span><text:span text:style-name="T29">intuire </text:span><text:span text:style-name="T26">che la scomunica di Spinoza non fu semplicemente una reazione alla sua concezione di Dio, ma una risposta a un insieme di idee che mettevano in discussione i fondamenti stessi della religione ebraica e dell'ordine sociale dell'epoca.</text:span></text:p>
      <text:p text:style-name="P51"><text:soft-page-break/><text:span text:style-name="T26">Baruch Spinoza, </text:span><text:span text:style-name="T29">fu </text:span><text:span text:style-name="T26">profondamente influenzato da Cartesio, <text:s/></text:span><text:span text:style-name="T29">u</text:span><text:span text:style-name="T26">n esempio notevole di questa interazione è la sua opera </text:span><text:span text:style-name="T12">"Principi della filosofia di Descartes, parte I e II, dimostrati secondo il metodo geometrico"</text:span><text:span text:style-name="T26"> (1663), a cui aggiunse i </text:span><text:span text:style-name="T12">"Pensieri metafisici"</text:span><text:span text:style-name="T26">. Il lavoro di Spinoza su Descartes dimostra che egli era interessato fin dall'inizio all'uso del metodo geometrico in filosofia. Oltre a mettere parti dei <text:s/>“</text:span><text:span text:style-name="T12">Principi”</text:span><text:span text:style-name="T26"> in forma geometrica, iniziò a sperimentare dimostrazioni geometriche di materiale tratto dal suo stesso <text:s/>“</text:span><text:span text:style-name="T12">Breve trattato”</text:span><text:span text:style-name="T26">. Fu da questa sperimentazione che nacque l'idea di una presentazione completamente geometrica del suo pensiero.</text:span></text:p>
      <text:p text:style-name="P38">In quest'opera, Spinoza espone e "<text:span text:style-name="T12">dimostra</text:span>" le tesi cartesiane utilizzando il metodo geometrico, ma allo stesso tempo si distaccò da alcuni aspetti fondamentali del suo pensiero.</text:p>
      <text:p text:style-name="P52"><text:span text:style-name="T26">Iniziò a lavorarci intorno al 1660 e nel 1665 parti sostanziali di quella che sarebbe diventata l' </text:span><text:span text:style-name="T12">Etica</text:span><text:span text:style-name="T26"> circolavano in forma di bozza tra i suoi amici ad Amsterdam. </text:span></text:p>
      <text:p text:style-name="P52"><text:span text:style-name="T26">Sebbene fosse già ben avviato nel progetto, il clima politico e religioso dell'epoca rese Spinoza esitante a completarlo. Scelse di agire con cautela e sospese il lavoro, dedicandosi invece a un libro che avrebbe preparato un pubblico ricettivo all'Etica . Questo fu il <text:s/></text:span><text:span text:style-name="T12">“Trattato teologico-politico”</text:span><text:span text:style-name="T26">, che completò e pubblicò in forma anonima nel 1670.</text:span></text:p>
      <text:p text:style-name="P53"><text:soft-page-break/><text:span text:style-name="T26">L'obiettivo di Spinoza nel <text:s/>Trattato teologico-politico era di sostenere che la stabilità e la sicurezza della società non sono minate dalla libertà di pensiero ma, piuttosto, rafforzate, principalmente </text:span><text:span text:style-name="T30">con </text:span><text:span text:style-name="T26">la libertà di filosofare. </text:span><text:span text:style-name="T31">E</text:span><text:span text:style-name="T26">gli considerava questa libertà, la minaccia primaria emanata dal clero, </text:span><text:span text:style-name="T30">e li </text:span><text:span text:style-name="T26">accusava di giocare sulle paure e le superstizioni delle persone per mantenere il potere. La sua soluzione era di spogliare il clero di ogni potere politico, persino al punto di mettere l'autorità sulla pratica della religione nelle mani del sovrano. Il sovrano, sosteneva Spinoza, avrebbe dovuto estendere ampie libertà all'interno di questo dominio, richiedendo l'adesione a non più di un credo minimo che fosse neutrale, rispetto alle sette concorrenti e il cui significato fosse aperto a una varietà di interpretazioni. Questo, sperava, avrebbe consentito ai filosofi la libertà di svolgere il loro lavoro senza i vincoli del settarismo.</text:span></text:p>
      <text:p text:style-name="P54"><text:span text:style-name="T26">Come era prevedibile, il <text:s/></text:span><text:span text:style-name="T12">Trattato teologico-politico</text:span><text:span text:style-name="T26"> fu accolto da una tempesta di critiche. Fu condannato come un'opera malvagia e il suo autore fu accusato di aver avuto intenzioni nefaste nello scriverlo. Perfino alcuni degli amici più intimi di Spinoza ne furono profondamente turbati. Sebbene avesse cercato assiduamente di evitarlo, Spinoza si ritrovò coinvolto in accese controversie religiose e gravato dalla reputazione di </text:span><text:span text:style-name="T48">ateo</text:span><text:span text:style-name="T26"> , cosa che detestava molto. </text:span></text:p>
      <text:p text:style-name="P55"><text:span text:style-name="T26">Data l'ostilità con cui fu accolto il <text:s/></text:span><text:span text:style-name="T12">Trattato teologico-politico</text:span><text:span text:style-name="T26">, </text:span><text:span text:style-name="T32">Spinoza </text:span><text:span text:style-name="T33">fu colto da </text:span><text:span text:style-name="T26">un profondo senso di </text:span><text:soft-page-break/><text:span text:style-name="T26">pessimismo </text:span><text:span text:style-name="T32">sulle sue possibilità di successo. </text:span><text:span text:style-name="T34">Ad aggravare la situazione contribuì il nuovo panorama politico che si </text:span><text:span text:style-name="T35">creò </text:span><text:span text:style-name="T34">a quel tempo </text:span><text:span text:style-name="T36">(1670)</text:span><text:span text:style-name="T34"> </text:span><text:span text:style-name="T26">, </text:span><text:span text:style-name="T36">e che </text:span><text:span text:style-name="T34">Spinoza fu testimone di una rivoluzione politica che culminò nell'assassinio del Gran Pensionario d'Olanda, Jan De Witt, insieme a suo fratello Cornelius da parte di una folla inferocita di orangisti-calvinisti.</text:span></text:p>
      <text:p text:style-name="P56"><text:span text:style-name="T37">Il</text:span><text:span text:style-name="T36"> Trattato </text:span><text:span text:style-name="T37">teologico-</text:span><text:span text:style-name="T36">politico </text:span><text:span text:style-name="T35">fu </text:span><text:span text:style-name="T37">pubblicato in forma anonima perché </text:span><text:span text:style-name="T26">percepiva che i suoi nemici erano cresciuti in influenza.</text:span></text:p>
      <text:p text:style-name="P39">La visione pubblica della dichiarazione definitiva della sua filosofia, avrebbe dovuto attendere fino a dopo la sua morte.</text:p>
      <text:p text:style-name="P40">Indebolito da una malattia respiratoria, dedicò l'ultimo anno della sua vita alla scrittura di un'opera di filosofia politica, il <text:s/><text:span text:style-name="T12">“Trattato politico” </text:span><text:span text:style-name="T52">che rimase incompiuto a causa della sua morte avvenuta nel 1677</text:span>. </text:p>
      <text:p text:style-name="P40"><text:span text:style-name="T52">L</text:span>'intenzione di Spinoza era di mostrare come i governi di tutti i tipi potessero essere migliorati e di sostenere la superiorità della democrazia rispetto ad altre forme di organizzazione politica. L'opera analizza diverse forme di governo, tra cui la monarchia, l'aristocrazia e la democrazia, con particolare attenzione a quest'ultima. <text:s/>Seguendo l'esempio di Machiavelli e Hobbes, la sua argomentazione non doveva essere utopica, basata su una valutazione realistica della natura umana tratta dalla teoria psicologica esposta nell'Etica <text:s/>. Nella parte che finì, Spinoza si dimostrò un astuto analista di diverse forme <text:soft-page-break/>costituzionali e un pensatore originale tra i teorici liberali del contratto sociale. Il Trattato politico fu pubblicato postumo nel 1677 insieme ad altre opere di Spinoza negli Opera posthuma.</text:p>
      <text:h text:style-name="P61" text:outline-level="3"><text:bookmark-start text:name="__RefHeading___Toc1486_2067833096"/>Metodo geometrico ed Etica<text:bookmark-end text:name="__RefHeading___Toc1486_2067833096"/></text:h>
      <text:p text:style-name="P41">Spinoza adotta il metodo geometrico, ispirato agli "Elementi" di Euclide, che consiste nel derivare conclusioni (teoremi) da definizioni, assiomi e postulati attraverso deduzioni logiche rigorose. Questo approccio mira a fornire una certezza assoluta alle affermazioni filosofiche, proprio come avviene nella geometria.</text:p>
      <text:p text:style-name="P57"><text:span text:style-name="T26">La forma in cui è stato scritto il capolavoro l’</text:span><text:span text:style-name="T12">Etica, è</text:span><text:span text:style-name="T26"> scritto nello stile di un trattato di geometria, molto simile <text:s/>agli Elementi di Euclide , con ogni libro che comprende un insieme di definizioni, assiomi, proposizioni, scolii e altre caratteristiche che costituiscono l'apparato formale della geometria. Ci si chiede perché Spinoza avrebbe impiegato questa modalità di presentazione? Parte di ciò è spiegato dal fatto che il diciassettesimo secolo fu un periodo in cui la geometria stava vivendo una rinascita di interesse ed era tenuta in straordinaria stima, specialmente all'interno dei circoli intellettuali in cui si muoveva Spinoza.</text:span></text:p>
      <text:p text:style-name="P58"><text:span text:style-name="T38">Abbiamo appena detto che </text:span><text:span text:style-name="T26">Cartesio </text:span><text:span text:style-name="T38">e</text:span><text:span text:style-name="T26"> Spinoza utilizzano il metodo geometrico, ma lo interpretano e lo applicano con alcune differenze significative, che riflettono le loro diverse concezioni filosofiche. </text:span><text:span text:style-name="T38">Nello specifico è</text:span><text:span text:style-name="T26"> </text:span><text:soft-page-break/><text:span text:style-name="T26">importante anche distinguere tra metodo analitico e sintetico:</text:span></text:p>
      <text:list text:style-name="L2">
        <text:list-item>
          <text:p text:style-name="P69"><text:span text:style-name="T39">Metodo Analitico (o di Risoluzione): </text:span><text:span text:style-name="T38">p</text:span><text:span text:style-name="T39">arte dal problema o dalla conclusione che si vuole dimostrare e risale alle sue cause o principi primi, scomponendo il problema in elementi più semplici fino a raggiungere verità evidenti o assiomi. È un processo di "analisi" o "risoluzione".</text:span></text:p>
        </text:list-item>
        <text:list-item>
          <text:p text:style-name="P69"><text:span text:style-name="T39">Metodo Sintetico (o di Composizione): </text:span><text:span text:style-name="T38">p</text:span><text:span text:style-name="T39">arte da principi primi, definizioni e assiomi evidenti e, attraverso deduzioni logiche, costruisce una catena di ragionamenti che portano alla conclusione o al teorema che si vuole dimostrare. È un processo di "sintesi" o "composizione".</text:span></text:p>
          <text:p text:style-name="P70"><text:span text:style-name="T49">Cartesio</text:span><text:span text:style-name="T39">, propone un metodo che si ispira alla matematica, ma che non coincide esattamente con il metodo geometrico degli antichi. Il suo metodo si articola in quattro regole:</text:span></text:p>
          <text:p text:style-name="P72"><text:span text:style-name="T14">Regola dell'evidenza</text:span><text:span text:style-name="T39">: </text:span><text:span text:style-name="T40">a</text:span><text:span text:style-name="T39">ccettare solo idee chiare e distinte, che si presentano alla mente in modo indubitabile.</text:span></text:p>
          <text:p text:style-name="P72"><text:span text:style-name="T14">Regola dell'analisi:</text:span><text:span text:style-name="T39"> </text:span><text:span text:style-name="T40">d</text:span><text:span text:style-name="T39">ividere ogni problema complesso nelle sue parti più semplici.</text:span></text:p>
          <text:p text:style-name="P71"><text:span text:style-name="T14">Regola della sintesi:</text:span><text:span text:style-name="T39"> </text:span><text:span text:style-name="T40">c</text:span><text:span text:style-name="T39">ondurre i pensieri in ordine, dai più semplici ai pi</text:span><text:span text:style-name="T38">ù </text:span><text:span text:style-name="T39">complessi.</text:span></text:p>
          <text:p text:style-name="P72"><text:span text:style-name="T14">Regola dell'enumerazione</text:span><text:span text:style-name="T39">: </text:span><text:span text:style-name="T40">c</text:span><text:span text:style-name="T39">ontrollare di non aver omesso nulla nel processo di analisi e sintesi.</text:span></text:p>
          <text:p text:style-name="P67"><text:soft-page-break/>Cartesio predilige un approccio analitico, partendo dal dubbio metodico per giungere a verità indubitabili come il "<text:span text:style-name="T12">cogito ergo sum</text:span>". La sua sintesi è poi una ricostruzione del sapere a partire da questo fondamento. Pur ispirandosi alla matematica, Cartesio non espone le sue argomentazioni in forma geometrica rigorosa, con definizioni, assiomi e dimostrazioni formali.</text:p>
        </text:list-item>
      </text:list>
      <text:p text:style-name="P49"><text:span text:style-name="T49">Spinoza</text:span><text:span text:style-name="T39">, </text:span><text:span text:style-name="T41">applica questo metodo all'esposizione della filosofia cartesiana, partendo dalle definizioni di concetti chiave come </text:span><text:span text:style-name="T50">sostanza</text:span><text:span text:style-name="T41">, </text:span><text:span text:style-name="T50">attributo</text:span><text:span text:style-name="T41"> e </text:span><text:span text:style-name="T50">modo</text:span><text:span text:style-name="T41">. Tuttavia, già in questa opera giovanile, si possono notare delle divergenze significative rispetto al pensiero di Cartesio; </text:span><text:span text:style-name="T42">m</text:span><text:span text:style-name="T41">entre Cartesio distingueva tre tipi di sostanze (</text:span><text:span text:style-name="T15">res cogitans, res extensa e Dio</text:span><text:span text:style-name="T41">), Spinoza introduce una concezione monistica della sostanza, identificandola con la Natura o Dio stesso. Questa sostanza è unica, infinita, eterna e causa di sé (causa sui). </text:span><text:span text:style-name="T43">S</text:span><text:span text:style-name="T39">eguendo il metodo geometrico, organizza la sua opera come un trattato di geometria. Inizia con definizioni (Definitiones), assiomi (Axiomata) e postulati (Postulata), e da questi deduce logicamente una serie di proposizioni (Propositiones), che sono le affermazioni o tesi che intende dimostrare. </text:span><text:span text:style-name="T44">In pratica </text:span><text:span text:style-name="T39">adotta un metodo geometrico molto più rigoroso, ispirato agli "</text:span><text:span text:style-name="T14">Elementi</text:span><text:span text:style-name="T39">" di Euclide. </text:span></text:p>
      <text:p text:style-name="P48"><text:span text:style-name="T39">La sua opera principale, l'"</text:span><text:span text:style-name="T14">Ethica ordine geometrico demonstrata</text:span><text:span text:style-name="T39">", è strutturata </text:span><text:span text:style-name="T44">nel modo seguente:</text:span></text:p>
      <text:p text:style-name="P48"><text:span text:style-name="T49">Definizioni</text:span><text:span text:style-name="T39">: </text:span><text:span text:style-name="T40">v</text:span><text:span text:style-name="T39">engono definiti i concetti fondamentali (sostanza, attributo, modo, ecc.)</text:span></text:p>
      <text:p text:style-name="P48"><text:soft-page-break/><text:span text:style-name="T49">Assiomi</text:span><text:span text:style-name="T39">: </text:span><text:span text:style-name="T40">v</text:span><text:span text:style-name="T39">engono enunciate verità evidenti che non necessitano di dimostrazione.</text:span></text:p>
      <text:p text:style-name="P48"><text:span text:style-name="T49">Postulati</text:span><text:span text:style-name="T39">: </text:span><text:span text:style-name="T40">v</text:span><text:span text:style-name="T39">engono poste delle richieste che si assumono come vere.</text:span></text:p>
      <text:p text:style-name="P48"><text:span text:style-name="T49">Proposizioni (IP)</text:span><text:span text:style-name="T39">: </text:span><text:span text:style-name="T40">v</text:span><text:span text:style-name="T39">engono enunciate le tesi che si vogliono dimostrare.</text:span></text:p>
      <text:p text:style-name="P48"><text:span text:style-name="T49">Dimostrazioni (Dim.)</text:span><text:span text:style-name="T39">: </text:span><text:span text:style-name="T40">v</text:span><text:span text:style-name="T39">engono fornite le prove logiche delle proposizioni, derivandole da definizioni, assiomi e proposizioni precedenti.</text:span></text:p>
      <text:p text:style-name="P48"><text:span text:style-name="T49">Scoli (Sch.)</text:span><text:span text:style-name="T39">: </text:span><text:span text:style-name="T40">v</text:span><text:span text:style-name="T39">engono aggiunti commenti e chiarimenti.</text:span></text:p>
      <text:p text:style-name="P43">Spinoza, parte da definizioni e assiomi per derivare una serie di proposizioni che costituiscono il suo sistema filosofico. Questo approccio <text:span text:style-name="T53">tende</text:span> a fornire una certezza assoluta alle sue affermazioni, proprio come avviene nella geometria.</text:p>
      <text:p text:style-name="P43">Ci sono alcuni aspetti che rendono il pensiero filosofico di Spinoza particolarmente "potente":</text:p>
      <text:p text:style-name="P43"><text:span text:style-name="T12">Razionalismo radicale</text:span>: basato sulla ragione e sulla deduzione logica, rifiutando ogni forma di dogmatismo e di autorità esterna.</text:p>
      <text:p text:style-name="P42"><text:span text:style-name="T12">Monismo</text:span>: che coincide con Dio e la Natura, offre una visione unitaria e coerente della realtà, superando le dualità tradizionali tra spirito e materia, tra Dio e mondo.</text:p>
      <text:p text:style-name="P42"><text:span text:style-name="T12">Etica basata sulla conoscenza</text:span>: ha sviluppato un'etica basata sulla conoscenza di Dio e della natura, che porta alla liberazione dalle passioni e alla beatitudine. Questa etica non si basa su precetti esterni o su premi e <text:soft-page-break/>punizioni, ma sulla comprensione della necessità naturale.</text:p>
      <text:p text:style-name="P4">Il conatus essendi di Spinoza</text:p>
      <text:p text:style-name="P44">Il concetto di <text:span text:style-name="T12">conatus</text:span> è centrale nella filosofia di Spinoza e riveste un ruolo fondamentale nella sua etica, nella sua psicologia e nella sua metafisica. Deriva dal latino conari, che significa "sforzarsi", "tendere a", "tentare". In Spinoza, il <text:span text:style-name="T12">conatus </text:span>designa lo sforzo intrinseco di ogni cosa di perseverare nel proprio essere.</text:p>
      <text:p text:style-name="P45">Nella Ethica, precisamente nella <text:span text:style-name="T54">IP 7,</text:span> Spinoza afferma: "Lo sforzo (conatus) con cui ogni cosa cerca di perseverare nel suo essere non è altro che l'essenza attuale della cosa stessa". </text:p>
      <text:p text:style-name="P45">Il <text:span text:style-name="T12">conatus</text:span> <text:span text:style-name="T54">è essenza e attualità, </text:span>non è qualcosa di esterno o di accidentale alla cosa, ma coincide con la sua stessa essenza. È la forza che la costituisce e che la spinge a mantenersi in esistenza. Non è una semplice tendenza, ma un'attività attuale, una forza operante.</text:p>
      <text:p text:style-name="P45">Il <text:span text:style-name="T12">conatus</text:span> <text:span text:style-name="T54">è universale, </text:span>non è proprio solo degli esseri viventi, ma di ogni cosa, sia essa animata o inanimata. Ogni modo della sostanza, dal più semplice al più complesso, possiede un conatus che lo spinge a persistere nel suo essere.</text:p>
      <text:p text:style-name="P45">Il <text:span text:style-name="T12">conatus</text:span> è quindi una tendenza all'autoconservazione, una forza che resiste alla distruzione e alla dissoluzione. La distruzione di una cosa, secondo Spinoza, può <text:soft-page-break/>avvenire solo a causa di una forza esterna che supera il suo <text:span text:style-name="T12">conatus</text:span>.</text:p>
      <text:p text:style-name="P45">Quando il <text:span text:style-name="T12">conatus</text:span> si riferisce alla mente, si chiama <text:span text:style-name="T12">volontà</text:span>. Quando si riferisce sia alla mente che al corpo, si chiama appetito o <text:span text:style-name="T12">desiderio</text:span>. Il desiderio, quindi, non è qualcosa di irrazionale o di esterno alla natura umana, ma è l'espressione stessa del conatus che si manifesta a livello cosciente.</text:p>
      <text:p text:style-name="P46">Nella filosofia di Spinoza, il <text:span text:style-name="T12">conatus</text:span> permette di superare il dualismo tra mente e corpo. Entrambi, infatti, sono espressioni dello stesso <text:span text:style-name="T12">conatus</text:span>, che si manifesta in modi diversi a seconda dell'attributo considerato: Pensiero <text:span text:style-name="T55">(Res Cogitans) </text:span>o Estensione <text:span text:style-name="T55">(Res Extensa</text:span>), <text:span text:style-name="T56">un’idea è un modo del pensiero, mentre un corpo è un modo dell’estensione.</text:span></text:p>
      <text:p text:style-name="P46"><text:span text:style-name="T57">Anche l</text:span>'etica di Spinoza è basata sul <text:span text:style-name="T12">conatus</text:span>. Il bene, per Spinoza, è ciò che favorisce l'aumento della potenza di agire, cioè l'espressione del conatus. Il male, invece, è ciò che ostacola questa espressione. La virtù, quindi, consiste nel vivere secondo la ragione, che ci permette di comprendere la nostra vera natura e di agire in accordo con il nostro conatus.</text:p>
      <text:p text:style-name="P46">Il conatus è alla base della teoria degli affetti di Spinoza. Gli affetti, sono variazioni del conatus, che si manifestano come gioia (aumento della potenza di agire) o tristezza (diminuzione della potenza di agire).<text:line-break/>Il conatus <text:span text:style-name="T57">è</text:span> la forza che la spinge a esprimersi e a manifestarsi nei modi finiti.</text:p>
      <text:p text:style-name="P5"><text:soft-page-break/>C’è qualche attinenza tra il termine Conatus di Spinoza e il Daimonion di Socrate?</text:p>
      <text:p text:style-name="P15">Pur essendoci delle analogie superficiali, si tratta di concetti profondamente diversi nel loro significato e nella loro funzione.</text:p>
      <text:p text:style-name="P46">Entrambi i concetti si riferiscono a una sorta di forza o impulso interiore che guida l'individuo. Il conatus è lo sforzo intrinseco di ogni cosa di perseverare nel proprio essere, mentre il daimonion è una voce interiore che dissuade Socrate dal compiere determinate azioni. <text:span text:style-name="T58">Entrambi i termini, i</text:span>nfluenzano il comportamento dell'individuo, <text:span text:style-name="T58">con la differenza che il</text:span> conatus spinge l'individuo ad agire in modo da conservare e aumentare la propria potenza, mentre il daimonion lo frena da azioni che potrebbero nuocergli.</text:p>
      <text:p text:style-name="P46">Sebbene ci siano delle analogie superficiali tra il conatus di Spinoza e il daimonion di Socrate, si tratta di concetti profondamente diversi. Il conatus è una forza naturale e immanente, legata alla ragione e alla ricerca della propria realizzazione. Il daimonion è una voce misteriosa e trascendente, che inibisce determinate azioni senza fornire indicazioni positive. Paragonarli significa forzare un'analogia che non tiene conto delle differenze sostanziali tra i due concetti e i contesti filosofici in cui si inseriscono.</text:p>
      <text:p text:style-name="P6">L'influenza di Spinoza sul pensiero <text:span text:style-name="T59">filosofico </text:span>successivo.</text:p>
      <text:p text:style-name="P29"><text:soft-page-break/>Il pensiero di Spinoza ha avuto un'influenza enorme su numerosi filosofi, scrittori e intellettuali successivi. </text:p>
      <text:p text:style-name="P28"><text:span text:style-name="T51">Hegel</text:span>: Hegel, pur riconoscendo l'importanza fondamentale di Spinoza nella storia della filosofia, mosse diverse critiche al suo sistema, soprattutto in relazione al concetto di sostanza. </text:p>
      <text:p text:style-name="P29">La critica più importante di Hegel a Spinoza riguarda l'assenza di un vero e proprio Soggetto nel suo sistema. Per Spinoza, la Sostanza (Dio/Natura) è unica, infinita e causa di sé, ma è una sostanza statica, priva di movimento interno e di differenziazione. Hegel, invece, concepisce la realtà come un processo dinamico, un continuo divenire in cui il Soggetto (l'Assoluto) si autoproduce attraverso la dialettica. In Spinoza manca questo dinamismo, questa "autoproduzione" del Soggetto. La sostanza spinoziana è "sostanza soltanto", non è ancora "soggetto".</text:p>
      <text:p text:style-name="P29"><text:span text:style-name="T60">L</text:span>a sostanza spinoziana è unica e infinita, le determinazioni finite (i modi) appaiono come semplici modificazioni accidentali, prive di vera autonomia e di significato intrinseco. Hegel critica questa "indifferenza delle determinazioni", sostenendo che il finito non è semplicemente un'illusione o un'apparenza, ma ha una sua realtà e una sua necessità all'interno del processo dialettico. Il finito, nel sistema hegeliano, è un momento necessario del dispiegarsi dell'Assoluto.</text:p>
      <text:p text:style-name="P29">La sostanza spinoziana, essendo unica e indifferenziata, è accusata da Hegel di essere astratta e vuota. Non è in <text:soft-page-break/>grado di spiegare la concretezza del mondo e la molteplicità delle cose. Hegel, al contrario, cerca di conciliare l'unità e la molteplicità, l'infinito e il finito, attraverso il concetto di "concreto universale", che si realizza nel processo dialettico.</text:p>
      <text:p text:style-name="P30">Poiché tutto è determinato dalla necessità della sostanza, nel sistema di Spinoza non c'è spazio per la libertà umana. Hegel, pur riconoscendo l'importanza del concetto di necessità, cerca di conciliarlo con la libertà, intesa come autocoscienza e autodeterminazione del Soggetto. La libertà, per Hegel, non è l'arbitrio indeterminato, ma la comprensione e l'accettazione della necessità, che si realizza nel processo storico e nello sviluppo dello Spirito.</text:p>
      <text:p text:style-name="P30">Sebbene Hegel riconosca il valore del metodo geometrico nel contesto storico in cui operò Spinoza, lo considera inadeguato per la filosofia. Il metodo geometrico, secondo Hegel, è troppo statico e formale, incapace di cogliere la dinamicità e la concretezza della realtà. La filosofia, invece, ha bisogno di un metodo dialettico, che sappia cogliere il movimento del pensiero e la contraddizione intrinseca alla realtà.</text:p>
      <text:p text:style-name="P30">È importante sottolineare che, nonostante queste critiche, Hegel riconosce a Spinoza il merito di aver superato il dualismo cartesiano e di aver posto le basi per una concezione monistica della realtà. Spinoza, per Hegel, è un precursore importante del suo sistema, un momento necessario, anche se non definitivo, nel cammino della filosofia.</text:p>
      <text:p text:style-name="P25"><text:soft-page-break/>Goethe : <text:span text:style-name="T5">pur appartenendo ad un <text:s/>contesto storico e culturale diverso, condivide una profonda affinità intellettuale con Spinoza, soprattutto per quanto riguarda la loro concezione della Natura e dell'uomo. Entrambi rifiutano il dualismo cartesiano tra mente e corpo e propongono una visione monistica della realtà. Per Spinoza, esiste un'unica sostanza, Dio/Natura, di cui mente e corpo sono attributi. Per Goethe, la Natura è un tutto organico e unitario, in cui l'uomo è parte integrante. Il monismo <text:s/>Dio/Natura è immanente al mondo, non trascendente e separato da esso. Dio è nella Natura e si manifesta attraverso di essa.<text:line-break/>Entrambi criticano la visione antropocentrica che pone l'uomo al centro dell'universo. Per Spinoza, l'uomo è un modo finito della sostanza infinita. Per Goethe, l'uomo è parte della Natura e non ha uno statuto privilegiato.</text:span></text:p>
      <text:p text:style-name="P29">Sia Spinoza che Goethe valorizzano l'esperienza e l'intuizione come vie di accesso alla conoscenza della Natura. Spinoza, pur utilizzando il metodo geometrico, non trascura l'importanza dell'esperienza sensibile. Goethe, attraverso la sua ricerca scientifica, sviluppa un metodo basato sull'osservazione diretta dei fenomeni naturali.</text:p>
      <text:p text:style-name="P26">Nietzsche: <text:span text:style-name="T5">vede in Spinoza un pensatore che anticipa molte delle sue idee, specialmente riguardo alla critica delle morali tradizionali e delle metafisiche trascendenti. Questa affinità permette a Nietzsche di trovare in </text:span><text:soft-page-break/><text:span text:style-name="T5">Spinoza una fonte di ispirazione e un alleato nella sua filosofia della vita e della natura.</text:span></text:p>
      <text:p text:style-name="P29">Nietzsche ammirava Spinoza per il suo rifiuto delle morali basate su valori trascendenti e religiosi. Per Spinoza, la morale deve essere fondata sulla ragione e sulla comprensione delle leggi naturali. Questo si rispecchia nella visione di Nietzsche, che critica la moralità cristiana tradizionale, considerandola come un sistema che impone valori e regole estranei alla natura umana. Entrambi filosofi promuovono una morale che nasce dalla vita stessa e dalla comprensione delle sue dinamiche intrinseche. </text:p>
      <text:p text:style-name="P29">Anche sulla questione metafisica, Nietzsche vede in Spinoza un alleato. Spinoza rifiuta le concezioni dualistiche e trascendenti di Dio e dell'universo, sostenendo un monismo che identifica Dio con la Natura. Nietzsche apprezza questa visione anti-dualista e immanente, in quanto si oppone alle tradizioni metafisiche che separano la realtà in mondi distinti e superiori.</text:p>
      <text:p text:style-name="P7"><text:span text:style-name="T61">La filosofia morale </text:span>di Spinoza, intesa come "la buona vita" <text:span text:style-name="T61">come</text:span> mezz<text:span text:style-name="T61">o per gli</text:span> esseri umani <text:span text:style-name="T61">di</text:span> raggiungere <text:span text:style-name="T61">il controllo </text:span>delle proprie passioni.</text:p>
      <text:p text:style-name="P31">Nella sua opera principale, l'Etica, Baruch Spinoza sviluppa una filosofia morale che si discosta dalle concezioni tradizionali, concentrandosi sulla <text:soft-page-break/>comprensione delle passioni umane e sul raggiungimento della "vita buona" attraverso la ragione.</text:p>
      <text:p text:style-name="P33">Spinoza non considera le passioni come qualcosa di negativo da reprimere, ma come espressioni della natura umana <text:span text:style-name="T61">da cui derivano gli sforzi</text:span> (conatus) di ogni essere, <text:span text:style-name="T61">a</text:span> perseverare nel proprio essere.</text:p>
      <text:p text:style-name="P33">Distingue tra affetti primari (gioia, tristezza e desiderio) e affetti derivati, che nascono dalle combinazioni dei primi.<text:line-break/>Le passioni possono essere "passioni" nel senso di passività, quando l'uomo è in balia degli eventi esterni e non comprende le cause delle proprie emozioni, oppure possono essere guidate dalla ragione, portando a una maggiore libertà interiore.</text:p>
      <text:p text:style-name="P34"><text:span text:style-name="T62">L</text:span>a conoscenza delle cause delle passioni, <text:span text:style-name="T62">porta </text:span>l'uomo alla comprensione dell'ordine necessario del mondo e alla liberazione dalle passioni che derivano da idee inadeguate. <text:span text:style-name="T63">L</text:span>a vera libertà non consiste nel libero arbitrio, ma nella comprensione della necessità che governa tutte le cose. Comprendere che tutto ciò che accade segue le leggi della natura porta alla serenità e alla pace interiore.</text:p>
      <text:p text:style-name="P34">La "vita buona" o beatitudine consiste quindi nella conoscenza di Dio/Natura e nell'amore intellettuale verso di essa. Questo amore non è un'emozione passeggera, ma una stabile disposizione dell'animo che deriva dalla comprensione della verità.</text:p>
      <text:p text:style-name="P29">A differenza di molte altre teorie morali, quella di Spinoza non è prescrittiva. Non fornisce un elenco di regole o <text:soft-page-break/>comandamenti da seguire, ma descrive la natura umana e il cammino verso la libertà attraverso la ragione.<text:line-break/>Il bene e il male non sono quindi qualità intrinseche delle azioni, ma concetti relativi che dipendono dal nostro utile. Ciò che ci aiuta a perseverare nel nostro essere e ad aumentare la nostra potenza è considerato bene, mentre ciò che ostacola questo processo è considerato male.</text:p>
      <text:p text:style-name="P47">Qui Spinoza inserisce i concetti di uomo libero e uomo forte. L'uomo libero è colui che agisce secondo la ragione e non è condizionato dalle passioni e dagli affetti, l'uomo forte, è colui che riesce a dominare le proprie passioni e a mantenere la calma e la serenità anche di fronte alle difficoltà.</text:p>
      <text:p text:style-name="P9">Nel sistema di Spinoza, tutto è determinato dalla sostanza Dio/Natura e non c’è spazio per la libertà umana. Quindi, a quale libertà e beatitudine si <text:span text:style-name="T64">r</text:span>iferisce Spinoza?</text:p>
      <text:p text:style-name="P17">Il rapporto tra necessità e libertà è un punto cruciale e spesso è frainteso <text:span text:style-name="T65">n</text:span>ella filosofia di Spinoza, <text:span text:style-name="T65">anche se sembra paradossale parlare di libertà in un sistema in cui tutto è determinato dalla necessità della Sostanza (Dio/Natura).</text:span></text:p>
      <text:p text:style-name="P18">Spinoza nega esplicitamente il libero arbitrio, ovvero la capacità di scegliere tra diverse alternative in modo assolutamente indipendente da cause esterne o interne. Secondo lui, questa idea è un'illusione che nasce dall'ignoranza delle cause che determinano le nostre <text:soft-page-break/>azioni. Ci sembra di essere liberi di scegliere perché non siamo consapevoli di tutte le cause che ci influenzano.</text:p>
      <text:p text:style-name="P18">La libertà, non consiste nel poter fare altrimenti, ma nel comprendere le cause che determinano le nostre azioni e le nostre passioni. </text:p>
      <text:p text:style-name="P19">I punti cardini per comprendere la concezione di libertà secondo Spinoza sono:</text:p>
      <text:list text:style-name="L3">
        <text:list-item>
          <text:p text:style-name="P74">Dio/Natura è "causa sui", ovvero causa di sé stesso. Agisce in base alla propria natura, senza essere determinato da nulla di esterno. Questa è la massima libertà possibile.</text:p>
        </text:list-item>
        <text:list-item>
          <text:p text:style-name="P73"><text:span text:style-name="T6">Tutto ciò che accade segue le leggi </text:span><text:span text:style-name="T8">necessarie</text:span><text:span text:style-name="T6"> della natura divina. Non c'è spazio per il caso o la contingenza. Questo non significa che siamo "burattini" nelle mani del destino, ma che le nostre azioni sono determinate da cause che possiamo comprendere.</text:span></text:p>
        </text:list-item>
        <text:list-item>
          <text:p text:style-name="P75">Le passioni nascono da idee inadeguate, ovvero da una conoscenza parziale e confusa delle cause. La ragione, invece, ci permette di comprendere le cause delle nostre passioni e di passare da uno stato di passività a uno di attività.</text:p>
        </text:list-item>
        <text:list-item>
          <text:p text:style-name="P73"><text:span text:style-name="T6">Libertà come autonomia, </text:span><text:span text:style-name="T7">q</text:span><text:span text:style-name="T6">uesto significa essere autonomi, governati da sé stessi, e non eteronomi, governati da cause esterne.</text:span></text:p>
          <text:p text:style-name="P83">In che modo la comprensione della necessità porta alla beatitudine?</text:p>
        </text:list-item>
        <text:list-item>
          <text:p text:style-name="P77"><text:soft-page-break/><text:span text:style-name="T45">Accetta</text:span><text:span text:style-name="T26">re e</text:span><text:span text:style-name="T45"> </text:span><text:span text:style-name="T26">c</text:span><text:span text:style-name="T45">omprendere che tutto ciò che accade segue le leggi necessarie della natura, </text:span><text:span text:style-name="T26">che </text:span><text:span text:style-name="T45">porta all'accettazione della realtà e alla liberazione dall'angoscia e dalla paura.</text:span></text:p>
        </text:list-item>
        <text:list-item>
          <text:p text:style-name="P78"><text:span text:style-name="T46">La p</text:span><text:span text:style-name="T45">adronanza delle passioni ci permette di governarle e di non esserne schiavi. Questo porta a una maggiore serenità e pace interiore.</text:span></text:p>
        </text:list-item>
        <text:list-item>
          <text:p text:style-name="P79"><text:span text:style-name="T46">L’u</text:span><text:span text:style-name="T45">nione con la </text:span><text:span text:style-name="T46">n</text:span><text:span text:style-name="T45">atura ci unisce alla totalità dell'essere e ci fa sentire parte di un ordine armonioso.</text:span></text:p>
          <text:p text:style-name="P80"><text:span text:style-name="T45">T</text:span><text:span text:style-name="T26">raduciamo con un esempio:</text:span></text:p>
          <text:p text:style-name="P76">Immaginiamo di provare rabbia verso qualcuno che ci ha fatto un torto. Se ci lasciamo sopraffare dalla passione, agiremo impulsivamente, magari vendicandoci. Se invece comprendiamo le cause del suo comportamento (magari la sua ignoranza o la sua sofferenza), possiamo superare la rabbia e agire in modo più razionale e pacifico. In questo modo, siamo più liberi, perché non siamo schiavi della nostra passione.</text:p>
          <text:p text:style-name="P81"><text:span text:style-name="T47">I</text:span><text:span text:style-name="T26"> sentimenti negativi, come la tristezza, la paura, l'odio e l'invidia, nascono da idee inadeguate, ovvero da una conoscenza parziale e confusa della realtà. Queste passioni ci rendono passivi e ci allontanano dalla vera libertà.</text:span></text:p>
        </text:list-item>
      </text:list>
      <text:p text:style-name="P8">In che modo questo si collega alla morte?</text:p>
      <text:p text:style-name="P14"><text:span text:style-name="T26">I sentimenti negativi spesso derivano dall'attaccamento alle cose transitorie, come la ricchezza, il potere o la </text:span><text:soft-page-break/><text:span text:style-name="T26">fama. Sapendo che queste cose sono destinate a finire, l'uomo prova ansia e paura di perderle. Questo attaccamento lo rende vulnerabile e lo allontana dalla serenità che deriva dalla comprensione della necessità.</text:span></text:p>
      <text:p text:style-name="P16">L'amore intellettuale verso Dio/Natura, che è la forma più alta di conoscenza e di libertà per Spinoza, implica l'accettazione dell'ordine necessario del mondo, inclusa la morte. Chi vive in questo amore non teme la morte, perché comprende che è parte integrante della totalità.</text:p>
      <text:list text:continue-numbering="true" text:style-name="L3">
        <text:list-header>
          <text:p text:style-name="P81"><text:span text:style-name="T47">L</text:span><text:span text:style-name="T26">a riflessione sulla morte non deve essere il fulcro della vita, bensì la comprensione della vita stessa e delle sue leggi. Come afferma nella proposizione 67 dell'Etica, parte IV: "</text:span><text:span text:style-name="T12">L'uomo libero a nessuna cosa pensa meno che alla morte, e la sua sapienza è una meditazione non della morte, ma della vita"</text:span><text:span text:style-name="T26">.</text:span></text:p>
        </text:list-header>
      </text:list>
      <text:p text:style-name="P47"><text:span text:style-name="T11">L</text:span>a paura della vecchiaia e della malattia può essere vista come una forma di paura della morte, legata alla consapevolezza del declino fisico e della fine della vita. Questa paura può generare ansia e angoscia, allontanando l'individuo dalla serenità.</text:p>
      <text:p text:style-name="P29"/>
      <text:p text:style-name="P29"/>
      <text:p text:style-name="P29"><text:a xlink:type="simple" xlink:href="https://iep.utm.edu/spinoza/#H1" text:style-name="Internet_20_link" text:visited-style-name="Visited_20_Internet_20_Link">https://iep.utm.edu/spinoza/#H1</text:a></text:p>
      <text:p text:style-name="P29"><text:a xlink:type="simple" xlink:href="https://iep.utm.edu/spin-mor/" text:style-name="Internet_20_link" text:visited-style-name="Visited_20_Internet_20_Link">https://iep.utm.edu/spin-mor/</text:a></text:p>
      <text:p text:style-name="P29"><text:a xlink:type="simple" xlink:href="https://it.wikipedia.org/wiki/Baruch_Spinoza" text:style-name="Internet_20_link" text:visited-style-name="Visited_20_Internet_20_Link">https://it.wikipedia.org/wiki/Baruch_Spinoza</text:a></text:p>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ans"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fo:font-size="10pt"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2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0.9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5-01-06T11:38:37.135000000</meta:creation-date>
    <dc:date>2026-04-04T17:57:33.928824363</dc:date>
    <dc:creator>corrado tafaro</dc:creator>
    <meta:editing-duration>PT5H23M42S</meta:editing-duration>
    <meta:editing-cycles>23</meta:editing-cycles>
    <meta:generator>LibreOffice/24.2.7.2$Linux_X86_64 LibreOffice_project/420$Build-2</meta:generator>
    <meta:document-statistic meta:table-count="0" meta:image-count="1" meta:object-count="0" meta:page-count="30" meta:paragraph-count="140" meta:word-count="6122" meta:character-count="40457" meta:non-whitespace-character-count="34467"/>
  </office:meta>
</office:document-meta>
</file>