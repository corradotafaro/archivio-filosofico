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style:font-name="Liberation Serif" fo:font-size="10pt" officeooo:rsid="003dce3c" officeooo:paragraph-rsid="003dce3c" style:font-size-asian="10pt" style:font-size-complex="10pt"/>
    </style:style>
    <style:style style:name="P2" style:family="paragraph" style:parent-style-name="Heading_20_4" style:master-page-name="Standard">
      <style:paragraph-properties style:page-number="55" fo:break-before="page"/>
      <style:text-properties style:font-name="Liberation Serif" fo:font-size="16pt" fo:font-style="normal" fo:font-weight="normal" officeooo:paragraph-rsid="0011822a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margin-top="0.199cm" fo:margin-bottom="0cm" style:contextual-spacing="false" fo:line-height="90%" fo:text-align="justify" style:justify-single-word="false"/>
      <style:text-properties style:font-name="Liberation Serif" fo:font-size="14pt" officeooo:rsid="003c6b9d" officeooo:paragraph-rsid="0011822a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Liberation Serif" fo:font-size="14pt" officeooo:rsid="003c6b9d" officeooo:paragraph-rsid="0011822a" style:font-size-asian="14pt" style:font-size-complex="14pt"/>
    </style:style>
    <style:style style:name="P5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Liberation Serif" fo:font-size="14pt" officeooo:rsid="003c6b9d" officeooo:paragraph-rsid="0011822a" style:font-size-asian="14pt" style:font-size-complex="14pt"/>
    </style:style>
    <style:style style:name="P6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Liberation Serif" fo:font-size="14pt" officeooo:rsid="003c6b9d" officeooo:paragraph-rsid="0011822a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Liberation Serif" fo:font-size="14pt" officeooo:rsid="003c6b9d" officeooo:paragraph-rsid="0011822a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Liberation Serif" fo:font-size="14pt" officeooo:rsid="00360db3" officeooo:paragraph-rsid="0011822a" style:font-size-asian="14pt" style:font-size-complex="14pt"/>
    </style:style>
    <style:style style:name="P9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Liberation Serif" fo:font-size="14pt" officeooo:rsid="00360db3" officeooo:paragraph-rsid="0011822a" style:font-size-asian="14pt" style:font-size-complex="14pt"/>
    </style:style>
    <style:style style:name="P10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Liberation Serif" fo:font-size="14pt" officeooo:paragraph-rsid="0011822a" style:font-size-asian="14pt" style:font-size-complex="14pt"/>
    </style:style>
    <style:style style:name="P1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Liberation Serif" fo:font-size="14pt" officeooo:paragraph-rsid="0011822a" style:font-size-asian="14pt" style:font-size-complex="14pt"/>
    </style:style>
    <style:style style:name="P12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Liberation Serif" fo:font-size="14pt" officeooo:rsid="0038649b" officeooo:paragraph-rsid="0011822a" style:font-size-asian="14pt" style:font-size-complex="14pt"/>
    </style:style>
    <style:style style:name="P13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Liberation Serif" fo:font-size="14pt" officeooo:rsid="0038649b" officeooo:paragraph-rsid="0011822a" style:font-size-asian="14pt" style:font-size-complex="14pt"/>
    </style:style>
    <style:style style:name="P14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Liberation Serif" fo:font-size="14pt" officeooo:rsid="003dce3c" officeooo:paragraph-rsid="0011822a" style:font-size-asian="14pt" style:font-size-complex="14pt"/>
    </style:style>
    <style:style style:name="P15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Liberation Serif" fo:font-size="14pt" fo:font-style="italic" officeooo:rsid="003c6b9d" officeooo:paragraph-rsid="0011822a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Liberation Serif" fo:font-size="14pt" fo:font-style="italic" fo:font-weight="normal" officeooo:paragraph-rsid="0011822a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Liberation Serif" fo:font-size="14pt" fo:font-style="normal" officeooo:rsid="003c6b9d" officeooo:paragraph-rsid="0011822a" style:font-size-asian="14pt" style:font-style-asian="normal" style:font-size-complex="14pt" style:font-style-complex="normal"/>
    </style:style>
    <style:style style:name="P18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Liberation Serif" fo:font-size="14pt" fo:font-weight="normal" officeooo:rsid="00360db3" officeooo:paragraph-rsid="0011822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Liberation Serif" fo:font-size="14pt" fo:font-weight="normal" officeooo:rsid="00360db3" officeooo:paragraph-rsid="0011822a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Liberation Serif" fo:font-size="14pt" fo:font-weight="normal" officeooo:paragraph-rsid="0011822a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Liberation Serif" fo:font-size="14pt" fo:font-weight="normal" officeooo:paragraph-rsid="0011822a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Liberation Serif" fo:font-size="14pt" fo:font-weight="normal" officeooo:paragraph-rsid="0011822a" style:font-size-asian="14pt" style:font-weight-asian="normal" style:font-size-complex="14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Liberation Serif" fo:font-size="14pt" fo:font-weight="normal" officeooo:paragraph-rsid="0011822a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top="0.199cm" fo:margin-bottom="0cm" style:contextual-spacing="false" fo:line-height="90%" fo:text-align="justify" style:justify-single-word="false"/>
      <style:text-properties style:font-name="Liberation Serif" fo:font-size="16pt" officeooo:rsid="003c6b9d" officeooo:paragraph-rsid="0011822a" style:font-size-asian="16pt" style:font-size-complex="16pt"/>
    </style:style>
    <style:style style:name="P25" style:family="paragraph" style:parent-style-name="Standard">
      <style:paragraph-properties fo:margin-top="0.101cm" fo:margin-bottom="0cm" style:contextual-spacing="false" fo:line-height="90%" fo:text-align="justify" style:justify-single-word="false"/>
      <style:text-properties style:font-name="Liberation Serif" fo:font-size="16pt" officeooo:rsid="00360db3" officeooo:paragraph-rsid="0011822a" style:font-size-asian="16pt" style:font-size-complex="16pt"/>
    </style:style>
    <style:style style:name="P26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Liberation Serif" fo:font-size="16pt" fo:font-weight="normal" officeooo:paragraph-rsid="0011822a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ff8bf" style:font-weight-asian="normal" style:font-weight-complex="normal"/>
    </style:style>
    <style:style style:name="T3" style:family="text">
      <style:text-properties fo:font-weight="normal" officeooo:rsid="0037aebd" style:font-weight-asian="normal" style:font-weight-complex="normal"/>
    </style:style>
    <style:style style:name="T4" style:family="text">
      <style:text-properties fo:font-weight="normal" officeooo:rsid="00360db3" style:font-weight-asian="normal" style:font-weight-complex="normal"/>
    </style:style>
    <style:style style:name="T5" style:family="text">
      <style:text-properties fo:font-weight="normal" officeooo:rsid="0038649b" style:font-weight-asian="normal" style:font-weight-complex="normal"/>
    </style:style>
    <style:style style:name="T6" style:family="text">
      <style:text-properties fo:font-weight="normal" officeooo:rsid="003b2e24" style:font-weight-asian="normal" style:font-weight-complex="normal"/>
    </style:style>
    <style:style style:name="T7" style:family="text">
      <style:text-properties fo:font-weight="normal" officeooo:rsid="003b7984" style:font-weight-asian="normal" style:font-weight-complex="normal"/>
    </style:style>
    <style:style style:name="T8" style:family="text">
      <style:text-properties fo:font-weight="normal" officeooo:rsid="003b85c7" style:font-weight-asian="normal" style:font-weight-complex="normal"/>
    </style:style>
    <style:style style:name="T9" style:family="text">
      <style:text-properties fo:font-weight="normal" officeooo:rsid="003c6b9d" style:font-weight-asian="normal" style:font-weight-complex="normal"/>
    </style:style>
    <style:style style:name="T10" style:family="text">
      <style:text-properties fo:font-weight="normal" officeooo:rsid="003dce3c" style:font-weight-asian="normal" style:font-weight-complex="normal"/>
    </style:style>
    <style:style style:name="T11" style:family="text">
      <style:text-properties fo:font-weight="normal" officeooo:rsid="00451c56" style:font-weight-asian="normal" style:font-weight-complex="normal"/>
    </style:style>
    <style:style style:name="T12" style:family="text">
      <style:text-properties fo:font-weight="normal" officeooo:rsid="006de1e2" style:font-weight-asian="normal" style:font-weight-complex="normal"/>
    </style:style>
    <style:style style:name="T13" style:family="text">
      <style:text-properties fo:font-weight="normal" officeooo:rsid="004aa6b8" style:font-weight-asian="normal" style:font-weight-complex="normal"/>
    </style:style>
    <style:style style:name="T14" style:family="text">
      <style:text-properties fo:font-weight="normal" officeooo:rsid="004d3797" style:font-weight-asian="normal" style:font-weight-complex="normal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37aeb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b85c7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style:font-size-asian="12pt" style:font-style-asian="italic" style:font-weight-asian="normal" style:font-style-complex="italic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1pt" fo:font-weight="normal" officeooo:rsid="003b2e24" style:font-size-asian="11pt" style:font-weight-asian="normal" style:font-size-complex="11pt" style:font-weight-complex="normal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officeooo:rsid="003c6b9d"/>
    </style:style>
    <style:style style:name="T26" style:family="text">
      <style:text-properties officeooo:rsid="003e6316"/>
    </style:style>
    <style:style style:name="T27" style:family="text">
      <style:text-properties officeooo:rsid="003f6a11"/>
    </style:style>
    <style:style style:name="T28" style:family="text">
      <style:text-properties officeooo:rsid="003f7abe"/>
    </style:style>
    <style:style style:name="T29" style:family="text">
      <style:text-properties officeooo:rsid="0040ee68"/>
    </style:style>
    <style:style style:name="T30" style:family="text">
      <style:text-properties officeooo:rsid="0045a1f0"/>
    </style:style>
    <style:style style:name="T3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4ff8bf" style:font-size-asian="12pt" style:font-weight-asian="normal" style:font-size-complex="12pt" style:font-weight-complex="normal"/>
    </style:style>
    <style:style style:name="T34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4"><text:bookmark-start text:name="__RefHeading___Toc4099_3560524389"/>Rivoluzione nel Sapere: Da Aristotele all'Alba del Metodo Scientifico con Telesio e Bacone.<text:bookmark-end text:name="__RefHeading___Toc4099_3560524389"/></text:h>
      <text:p text:style-name="P10"><text:span text:style-name="T1">Immagin</text:span><text:span text:style-name="T2">iamo</text:span><text:span text:style-name="T1"> il pensiero classico come un maestoso edificio eretto su fondamenta solide di logica e meta­fisica. Aristotele, in particolare, aveva fornito un siste­ma di conoscenza enciclopedico, dove ogni cosa aveva il suo posto e la sua spiegazione. Il suo "metodo de­duttivo", partendo da principi universali per arrivare a conclusioni particolari, era potente e influente per se­coli. Tuttavia, il limite era spesso la scarsa enfasi sull'"indagine diretta della natura" e sulla "verifica em­pirica" di quei principi di partenza. Molte "verità" veni­vano accettate perché logicamente consistenti all'interno del sistema, o perché derivate da un'auto­rità riconosciuta, piuttosto che perché provate dall'esperienza. Prima dell'avvento di Telesio e Baco­ne, e in generale prima della Rivoluzione Scientifica (XVI-XVII secolo), il sapere sulla natura si basava su presupposti molto diversi da quelli odierni </text:span><text:span text:style-name="T3">e p</text:span><text:span text:style-name="T4">er </text:span><text:span text:style-name="T3">dirla con parole di Hegel, il progresso storico del sapere si sviluppa attraverso una dialettica che oppone vecchie e nuove concezioni, generando avanzamenti attraver­so il confronto e la risoluzione di contraddizioni. La transizione dalla conoscenza speculativa a quella em­pirica non fu immediata né priva di resistenze, ma fu </text:span><text:soft-page-break/><text:span text:style-name="T3">proprio attraverso tali conflitti che si costruì il moder­no approccio scientifico.</text:span></text:p>
      <text:p text:style-name="P11"><text:span text:style-name="T3">Q</text:span><text:span text:style-name="T5">uesto lungo processo attraverso 2000 anni di storia parte dalla dall’Antichità Classica fino al Medioevo.</text:span></text:p>
      <text:p text:style-name="P12"><text:span text:style-name="T16">N</text:span><text:span text:style-name="T15">ell’Antichità Classica</text:span><text:span text:style-name="T1">, principalmente la Grecia antica, la conoscenza della natura era intrinsecamente legata alla </text:span><text:span text:style-name="T18">filosofia</text:span><text:span text:style-name="T1">, alla </text:span><text:span text:style-name="T18">metafisica</text:span><text:span text:style-name="T1"> e alla </text:span><text:span text:style-name="T18">cosmologia,</text:span><text:span text:style-name="T17"> in cui i</text:span><text:span text:style-name="T1"> principali presupposti erano:</text:span></text:p>
      <text:p text:style-name="P12"><text:span text:style-name="T1">Autorità dei filosofi, in cui era predominante la figura di Aristotele (IV secolo a.C.). Il suo sistema di pensiero era così coerente e onnicomprensivo da diventare la base per quasi tutto il sapere occidentale per oltre un millennio. Le sue opere di </text:span><text:span text:style-name="T18">filosofia naturale</text:span><text:span text:style-name="T1"> (come la Fi­sica o Sul cielo) erano considerate la fonte ultima della conoscenza.</text:span></text:p>
      <text:p text:style-name="P13"><text:span text:style-name="T1">Il metodo privilegiato era la deduzione</text:span><text:span text:style-name="T22"> </text:span><text:span text:style-name="T6">(ragionamento deduttivo)</text:span><text:span text:style-name="T1">, ovvero partire da principi generali e auto-evidenti (o ritenuti tali) per ricavarne conclusioni parti­colari. L'esempio più lampante è la geometria eucli­dea, dove da pochi assiomi si deduce un'intera strut­tura di teoremi. Questo era applicato anche alla natu­ra: si partiva da presupposti metafisici (es. la perfezio­ne dei corpi celesti) per dedurre il loro movimento.</text:span></text:p>
      <text:p text:style-name="P13"><text:span text:style-name="T1">La spiegazione dei fenomeni naturali si basava su</text:span><text:span text:style-name="T6">l</text:span><text:span text:style-name="T1"> </text:span><text:span text:style-name="T6">qualitativismo, </text:span><text:span text:style-name="T7">tecniche utilizzate senza l’ausilio di for­mule, modelli matematici o statistici, </text:span><text:span text:style-name="T6">e finalismo,</text:span><text:span text:style-name="T1"> qua­</text:span><text:soft-page-break/><text:span text:style-name="T1">lità intrinseche (es. il "caldo" o il "freddo", il "secco" o l'"umido") e su cause finali (ogni cosa ha uno scopo, un fine per cui esiste o si muove). Ad esempio, una pietra cade perché il suo "luogo naturale" è al centro dell'universo (il geocentrismo). Il movimento dei corpi celesti era circolare perché il cerchio era la figura più perfetta e quindi adatta a corpi divini e incorruttibili.</text:span></text:p>
      <text:p text:style-name="P13"><text:span text:style-name="T1">L'osservazione c'era, ma era spesso passiva e non si­stematica, </text:span><text:span text:style-name="T7">l</text:span><text:span text:style-name="T1">'esperimento </text:span><text:span text:style-name="T7">controllato, </text:span><text:span text:style-name="T1">inteso come ma­nipolazione controllata della natura per verificarne le ipotesi era quasi assente. L'idea che la natura potesse essere "interrogata" attivamente attraverso esperi­menti era aliena.</text:span></text:p>
      <text:p text:style-name="P12"><text:span text:style-name="T1">Nella fisica aristotelica, il mondo terrestre </text:span><text:span text:style-name="T18">sublunare</text:span><text:span text:style-name="T1"> era composto da quattro elementi (terra, acqua, aria, fuoco) ed era soggetto a corruzione e movimenti retti­linei, </text:span><text:span text:style-name="T8">ed il mondo </text:span><text:span text:style-name="T19">celeste</text:span><text:span text:style-name="T8">. Aristotele introduce <text:s/></text:span><text:span text:style-name="T1">l'etere come quinto elemento costitutivo dell'universo, </text:span><text:span text:style-name="T8">la quintessenza</text:span><text:span text:style-name="T1">, aggiunto ai quattro della fisica di Empe­docle, </text:span><text:span text:style-name="T8">perché incorruttibile, il cui movimento circolare era </text:span><text:span text:style-name="T9">uniforme eterno e perfetto</text:span><text:span text:style-name="T1">. Questa separazione impediva una visione unitaria delle leggi naturali.</text:span></text:p>
      <text:p text:style-name="P12"><text:span text:style-name="T1">La matematica era usata per descrivere i movimenti celesti (es. con Tolomeo), ma non era considerata il linguaggio intrinseco della natura o uno strumento </text:span><text:span text:style-name="T9">esplicativo </text:span><text:span text:style-name="T1">per scoprire le sue leggi fondamentali.</text:span></text:p>
      <text:p text:style-name="P4"><text:soft-page-break/><text:span text:style-name="T24">Il Medioevo</text:span><text:span text:style-name="T1"> ha ereditato e reinterpretato il sapere greco, in particolare quello aristotelico, integrandolo con la teologia cristiana. </text:span><text:span text:style-name="T10">I</text:span><text:span text:style-name="T1">l sapere era principalmente Scolastico, </text:span><text:span text:style-name="T11">una </text:span><text:span text:style-name="T10">sintesi tra Fede e Ragione.</text:span></text:p>
      <text:p text:style-name="P5"><text:span text:style-name="T10">Il principale obiettivo era conciliare la ragione filosofi­ca (aristotelica) con la verità rivelata della fede cristia­na. La scienza o "filosofia naturale" era vista come una ancella della teologia, uno strumento per comprende­re meglio la creazione divi­na. Oltre ad Aristotele, si dava grande peso ai testi sa­cri </text:span><text:span text:style-name="T12">della</text:span><text:span text:style-name="T10"> Bibbia e ai Padri della Chiesa. Le dispute si ri­solvevano spesso appel­landosi all'autorità di un testo o di un'interpretazione consolidata. Il lavoro intellet­tuale principale non era la scoperta di nuove cono­scenze attraverso l'osservazio­ne, ma il commento, la glossa</text:span><text:span text:style-name="T10"><text:note text:id="ftn3" text:note-class="footnote"><text:note-citation>1</text:note-citation><text:note-body><text:p text:style-name="P1">Glossa deriva dal greco e significa parola rara o parola da spiegare.</text:p></text:note-body></text:note></text:span><text:span text:style-name="T10"> e l'interpretazione dei testi autorevoli (Aristo­tele, la Bibbia, ecc.). </text:span></text:p>
      <text:p text:style-name="P14"><text:span text:style-name="T1">Sebbene ci fossero brillanti pensatori e innovazioni isolate, ad esempio nel mondo arabo o alcune intui­zioni in Europa sulla dinamica, la concezione di una "scienza" che progredisce cumulativamente attraverso nuove scoperte e verifiche empiriche era quasi assente. La conoscenza era vista più come un insieme di ve­rità da apprendere e trasmettere. </text:span><text:span text:style-name="T25">L'universo era visto come un grande organismo vivente, </text:span><text:span text:style-name="T26">s</text:span><text:span text:style-name="T25">pesso si attribuiva alla </text:span><text:soft-page-break/><text:span text:style-name="T25">natura un'anima o forze vitali intrinseche, un retaggio di antiche credenze e filo­sofie. </text:span></text:p>
      <text:p text:style-name="P4"><text:span text:style-name="T26">P</text:span>rima di Telesio e Bacone, la conoscenza della natura era caratterizzata da:</text:p>
      <text:p text:style-name="P5">- Predominanza dell'autorità (Aristotele, testi sacri).</text:p>
      <text:p text:style-name="P4">- Metodo deduttivo da principi a priori.</text:p>
      <text:p text:style-name="P4">- Spiegazioni qualitative, finalistiche e teleologiche.</text:p>
      <text:p text:style-name="P5">- <text:span text:style-name="T27">Totale assenza</text:span> dell'esperimento controllato.</text:p>
      <text:p text:style-name="P4">- Assenza di un linguaggio matematico per la descri­zione delle leggi naturali (se non in astronomia de­scrittiva).</text:p>
      <text:p text:style-name="P4">- Concezione del sapere come contemplazione e inter­pretazione di verità consolidate, piuttosto che come scoperta attiva.</text:p>
      <text:p text:style-name="P3"><text:span text:style-name="T34">Si fa fatica a credere che furono Telesio e Bacone a insegnare agli scienziati la via che dovevano seguire nelle loro ricerche e che senza quei due filosofi la scienza moderna non avrebbe fatto probabilmente i progressi che ha fatto</text:span>.</text:p>
      <text:p text:style-name="P6">Telesio e Bacone, ognuno a suo modo, hanno iniziato a scardinare questi presupposti, promuovendo un ap­proccio che poneva al centro l'esperienza sensibile, l'osservazione diretta e la necessità di un nuovo meto­do per <text:span text:style-name="T21">leggere</text:span> il <text:span text:style-name="T21">libro della natura</text:span>, preparando il terreno per l'esplosione della scienza moderna con fi­gure come Galileo, Keplero e Newton.</text:p>
      <text:p text:style-name="P7"><text:soft-page-break/><text:span text:style-name="T27">P</text:span>uò sembrare una semplificazione eccessiva attribuire a due soli filosofi, per quanto influenti, l'intero percor­so della scienza moderna, <text:span text:style-name="T27">però è innegabile che Bernardino Telesio e Francesco Bacone abbiano giocato un ruolo cruciale nel ridefinire l'approccio alla cono­scenza e alla ricerca scientifica, gettando le basi per quello che oggi riconosciamo come metodo scientifi­co.</text:span></text:p>
      <text:p text:style-name="P24">Il Contributo di Telesio: L'Empirismo e l'Autonomia della Natura.</text:p>
      <text:p text:style-name="P6">Bernardino Telesio (1509-1588), con la sua opera "De rerum natura iuxta propria principia" (Sulla natura delle cose secondo i loro propri principi), fu un pionie­re nel sostenere che la natura andava studiata in sé stessa, attraverso l'osservazione diretta e l'esperienza sensibile, e non attraverso i principi astratti della me­tafisica o della teologia aristotelica.</text:p>
      <text:p text:style-name="P4">Telesio contestò l'autorità indiscussa di Aristotele, invi­tando a una rinnovata attenzione per l'esperienza di­retta, <text:span text:style-name="T28">a</text:span>ffermò che la conoscenza deriva primariamen­te dai sensi, che sono gli unici strumenti affidabili per comprendere i fenomeni naturali. Postulò che la natu­ra è governata da principi attivi (caldo e freddo) che interagiscono e producono i fenomeni, superando le spiegazioni puramente qualitative e astratte dell'ari­stotelismo <text:span text:style-name="T28">e fu un precursore dell'empirismo, sottoli­neando l'importanza dell'osservazione e anticipando la </text:span><text:soft-page-break/><text:span text:style-name="T28">necessità di un'indagine della natura basata sui suoi stessi meccanismi.</text:span></text:p>
      <text:p text:style-name="P24">Il Contributo di Bacone: Il Metodo Induttivo e la Scienza come Potere.</text:p>
      <text:p text:style-name="P6">Francesco Bacone (1561-1626) è spesso considerato il "profeta" della scienza moderna per il suo forte appel­lo a un nuovo metodo di indagine e per la sua visione della scienza come strumento di progresso e dominio sulla natura. La sua opera più celebre, il "Novum Or­ganum" (Nuovo Strumento), è una critica al vecchio "Organon" aristotelico e una proposta per un nuovo approccio.</text:p>
      <text:p text:style-name="P4">Bacone identificò i "quattro idoli" (della Tribù, della Ca­verna, del Foro, del Teatro), ovvero i pregiudizi e le fal­se nozioni che ostacolano la vera conoscenza. Liberar­si da questi idoli è il primo passo per una ricerca effi­cace. Bacone intendeva "idola" non nel senso religioso di falsi dei, ma come false nozioni, preconcetti, pregiu­dizi o inclinazioni umane intrinseche che ostacolano o distorcono la nostra comprensione del mondo. Sono come illusioni che oscurano la nostra visione, impe­dendoci di percepire la verità in modo chiaro e ogget­tivo. Per Bacone, purificare la mente da questi idoli era il primo e più cruciale passo verso la vera ricerca scientifica, simile a sgombrare il terreno prima di co­struire solide fondamenta. </text:p>
      <text:p text:style-name="P5"><text:soft-page-break/>Egli classificò questi idoli in quattro tipologie principali:</text:p>
      <text:p text:style-name="P5"><text:span text:style-name="T21">Idola Tribus</text:span> (Idoli della Tribù)</text:p>
      <text:p text:style-name="P4">Questi sono insiti nella natura umana stessa, comuni a tutta l'umanità (da cui "tribù"). Derivano dalla strut­tura stessa della mente umana, che, secondo Bacone, non è una "luce arida" ma è "infusa di volontà ed emozioni" e quindi incline all'errore.</text:p>
      <text:p text:style-name="P5"><text:span text:style-name="T29">S</text:span>iamo più inclini a notare e ricordare fatti che confer­mano le nostre convinzioni preesistenti, ignorando o respingendo le prove che le contraddicono. <text:s/><text:span text:style-name="T29">I</text:span> bias <text:span text:style-name="T30">di conferma</text:span> rappresentano il modo con cui il nostro cer­vello distorce di fatto la realtà, nelle valutazioni di fatti e avvenimenti. <text:span text:style-name="T29">T</text:span>endiamo a trarre conclusioni affretta­te sulla base di dati limitati. <text:span text:style-name="T29">I</text:span> nostri sensi possono in­gannarci, oppure i limiti dei nostri organi sensoriali possono impedirci di percepire determinati aspetti della realtà (ad esempio, percependo solo uno spettro limitato di luce). <text:span text:style-name="T29">A</text:span>ttribuire caratteristiche, intenzioni o scopi umani a fenomeni naturali. </text:p>
      <text:p text:style-name="P15">Idola Specus (Idoli della Caverna)</text:p>
      <text:p text:style-name="P5">Gli Idola Specus, o Idoli della Caverna, rappresentano le influenze soggettive che condizionano la percezio­ne della realtà di ciascun individuo, il quale, come se vivesse in una caverna, interpreta il mondo attraverso una prospettiva limitata e personale. Questi idoli deri­<text:soft-page-break/>vano dall'educazione, dalle abitudini, dalle esperienze vissute e dalla costituzione unica di ogni persona, dando origine a pregiudizi individuali: ciò che per qualcuno risulta rilevante e affascinante può apparire banale o irrilevante per un altro. L'eccessiva dipenden­za da metodi consolidati o autorità riconosciute può influenzare la visione di uno studioso, legato ai testi che ha approfondito, o di uno scienziato, attaccato a una tecnica sperimentale perfezionata nel tempo. Seppur indispensabile, la formazione specialistica può talvolta generare una visione ristretta, impedendo di comprendere e cogliere fenomeni al di fuori del pro­prio ambito. Anche l'indole personale gioca un ruolo cruciale: alcune persone tendono a focalizzarsi sulle differenze, altre sulle somiglianze; alcuni prediligono le tradizioni antiche, altri sono affascinati dalla novità. Queste inclinazioni influenzano inconsciamente il giu­dizio, rendendo essenziale una costante consapevo­lezza di sé e una profonda introspezione critica per giungere a una conoscenza più obiettiva.</text:p>
      <text:p text:style-name="P15">Idola Fori (Idoli del Mercato)</text:p>
      <text:p text:style-name="P17">Gli Idola Fori, o Idoli del Mercato, sorgono dai rapporti sociali e dall'interazione tra gli individui, principalmen­te attraverso il linguaggio e la comunicazione. Il "mer­cato", inteso come spazio di scambio intellettuale, era il luogo in cui le persone si incontravano e condivide­vano <text:soft-page-break/>idee, ma secondo Bacone, le parole, pur essendo strumenti deputati a favorire la comprensione, spesso si trasformano in fonti di confusione ed errore. L'ambiguità e l'imprecisione del linguaggio costitui­scono una problematica centrale, poiché i termini pos­sono assumere molteplici significati o modificarne la portata nel tempo, generando fraintendimenti e inter­pretazioni errate. La nomenclatura fuorviante, che at­tribuisce nomi a entità inesistenti o definisce in modo impreciso concetti poco compresi, rappresenta un ul­teriore ostacolo alla chiarezza concettuale; esempi di ciò sono espressioni come "motore primario" o "causa finale", prive di un fondamento empirico adeguato. La reificazione, ovvero la tendenza a trattare idee astrat­te come entità concrete e indipendenti, amplifica l'errore interpretativo: parlare di "fortuna" o "gravità" come di entità dotate di un'azione autonoma, anziché come descrizioni di fenomeni osservabili, conduce a imprecisioni e distorsioni teoriche. Infine, il discorso superficiale, basato su mera retorica o su definizioni tradizionali prive di fondamento empirico, compro­mette la qualità delle argomentazioni e ostacola il progresso della conoscenza. Per Bacone, la precisione linguistica e la definizione rigorosa dei concetti, fon­date sull'osservazione empirica, erano imprescindibili per garantire un'efficace comunicazione scientifica e un sapere libero da distorsioni e preconcetti.</text:p>
      <text:p text:style-name="P15"><text:soft-page-break/>Idola Theatri (Idoli del Teatro)</text:p>
      <text:p text:style-name="P5">Gli Idola Theatri, o Idoli del Teatro, rappresentano le influenze derivanti dall'accettazione acritica di sistemi filosofici, tradizioni consolidate e dogmi, spesso fon­dati su principi errati o su metodologie dimostrative fallaci. Tale denominazione evoca l'immagine di sce­nari teatrali elaborati e artificiali, in cui la rappresenta­zione della realtà viene sostituita da costruzioni fittizie e illusorie. L'adesione cieca a specifici sistemi filosofici, come l'aristotelismo, la scolastica o le antiche scuole greche, senza una verifica empirica, costituisce una delle principali fonti di errore, poiché questi modelli, pur essendo internamente coerenti, non necessaria­mente riflettono la reale struttura della natura. Il dog­matismo, inteso come accettazione di determinati principi o teorie esclusivamente in virtù della loro anti­chità, della loro diffusione o della loro autorevolezza, rappresenta un ulteriore ostacolo alla conoscenza, in quanto non si fonda su prove empiriche. L'eccessivo affidamento sul ragionamento astratto, basato su de­duzioni a partire da assiomi non dimostrati, privo del supporto di dati osservativi, costituisce un limite me­todologico che Bacone contestava apertamente, poi­ché considerava la logica tradizionale eccessivamente focalizzata sulla deduzione, a scapito dell'induzione derivante dall'esperienza. Infine, la commistione tra fi­losofia, teologia e superstizione era per Bacone un elemento di <text:soft-page-break/>distorsione della conoscenza scientifica, poiché l'ingerenza di dottrine teologiche nell'indagine naturale rischiava di compromettere la comprensione oggettiva dei fenomeni. A tal proposito, egli propu­gnava una rigorosa separazione tra ricerca scientifica e credenze religiose, al fine di preservare l'autonomia e l'affidabilità del metodo empirico.</text:p>
      <text:p text:style-name="P5">La sua analisi degli idoli fu una potente critica al clima intellettuale del suo tempo, che considerava impanta­nato in speculazioni improduttive e nell'aderenza ad autorità obsolete. Evidenziando queste fonti di errore, Bacone gettò le basi per un approccio alla ricerca scientifica più empirico, critico e consapevole, pre­parando il terreno per la rivoluzione scientifica che se­guì.</text:p>
      <text:p text:style-name="P5">Propose un metodo che parte dall'osservazione siste­matica dei fenomeni particolari per arrivare a genera­lizzazioni e leggi universali. Questo non era una sem­plice enumerazione, ma un'induzione che procedeva attraverso la raccolta di dati in "tavole" (di presenza, assenza e gradi) e l'eliminazione delle ipotesi false. Ba­cone non si limitò all'osservazione, ma enfatizzò l'importanza dell'esperimento, inteso come un'interro­gazione attiva della natura per svelarne i segreti. Il fa­moso aforisma <text:span text:style-name="T18">"Sapere è potere"</text:span> (scientia potentia est) riassume la sua visione: la scienza non è un fine a sé <text:soft-page-break/>stante, ma uno strumento per migliorare la condi­zione umana e dominare la natura, attraverso lo svi­luppo di tecnologie e invenzioni utili. </text:p>
      <text:p text:style-name="P25"><text:span text:style-name="T13">Quali</text:span><text:span text:style-name="T1"> sono le evidenze o dimostrazioni di fenomeni che hanno dato prova di ciò che hanno postulato sia Telesio che Bacone?</text:span></text:p>
      <text:p text:style-name="P9"><text:span text:style-name="T1">La validità delle intuizioni di Telesio e delle proposte metodologiche di Bacone non si basa su "prove" o "esperimenti" diretti condotti da loro stessi (Bacon era più un teorico del metodo che uno sperimentatore, e Telesio, pur basandosi sull'osservazione, non conduce­va esperimenti nel senso moderno), ma piut­tosto sull' "influenza che il loro pensiero ha avuto sullo sviluppo successivo della scienza e sulla coerenza dei loro principi con le pratiche scientifiche di successo"</text:span></text:p>
      <text:p text:style-name="P18">L'evidenza della correttezza dell'approccio di Telesio ri­siede nel modo in cui la scienza si è effettivamente sviluppata, privilegiando l'osservazione diretta e lo studio della natura "secondo i suoi propri principi". </text:p>
      <text:p text:style-name="P18">Nascita della Fisica Sperimentale:</text:p>
      <text:p text:style-name="P8"><text:span text:style-name="T1">- Galileo Galilei (1564-1642): </text:span><text:span text:style-name="T14">s</text:span><text:span text:style-name="T1">ebbene Galileo sia famo­so per l'uso della matematica, la sua grandezza risiede nella sua incessante osservazione dei fenomeni natu­rali e nell'uso di esperimenti per validare le sue teorie. Le sue osservazioni del pendolo, la caduta dei gravi, le fasi di Venere, i satelliti di Giove, sono tutte </text:span><text:soft-page-break/><text:span text:style-name="T1">dimostra­zioni pratiche del principio che la natura si rivela attra­verso l'esperienza sensibile. Galileo, pur non essendo un allievo diretto di Telesio, incarnò pienamente il suo spirito anti-aristotelico e l'enfasi sull'osservazione di­retta.</text:span></text:p>
      <text:p text:style-name="P19">- Keplero (1571-1630): Le sue leggi sul moto plane­tario non derivarono da postulati metafisici, ma da anni di meticolose osservazioni astronomiche (quelle di Tycho Brahe) e dalla sua capacità di "leggere" i dati senza pregiudizi, pur con un background filosofico neoplatonico.</text:p>
      <text:p text:style-name="P19">Tycho Brahe rivoluzionò la concezione aristotelica dell'universo con le sue precise osservazioni astrono­miche, dimostrando che il cielo non era immutabile come si era creduto per secoli. Le comete del 1577 e del 1585 furono decisive per tale confutazione, poiché i loro moti dimostrarono che non potevano apparte­nere alla sfera sublunare e che attraversavano le re­gioni eteree senza ostacoli, smentendo l'idea di sfere solide e cristalline in cui, secondo Aristotele, i corpi ce­lesti erano incastonati. Questo risultato, ottenuto gra­zie alla meticolosità delle osservazioni di Brahe, con­tribuì a minare le fondamenta della cosmologia tradi­zionale e aprì la strada a una visione dell'universo ba­sata sull'osservazione empirica, piuttosto che sull'autorità di dogmi filosofici.</text:p>
      <text:p text:style-name="P18"/>
      <text:p text:style-name="P18"><text:soft-page-break/>Affermarsi del Naturalismo:</text:p>
      <text:p text:style-name="P18">La medicina moderna, la biologia, la geologia e molte altre discipline scientifiche si fondano sulla convinzio­ne che i fenomeni naturali debbano essere spiegati con cause naturali, osservabili e verificabili, senza ri­correre a spiegazioni soprannaturali o a principi astratti esterni alla natura stessa. Questo è il cuore della posizione di Telesio.</text:p>
      <text:p text:style-name="P18">Filosofi Empiristi successivi:</text:p>
      <text:p text:style-name="P18">John Locke, George Berkeley, David Hume, filo­sofi inglesi del XVII e XVIII secolo svilupparono in modo più sistematico l'empirismo, sostenendo che tutta la conoscenza deriva dall'esperienza sensibile. Essi non erano scienziati, ma le loro teorie epistemo­logiche fornirono una base filosofica robusta all'approccio empirico che stava prendendo piede nel­la scienza.</text:p>
      <text:p text:style-name="P8"><text:span text:style-name="T14">L</text:span><text:span text:style-name="T1">'intera storia della scienza moderna, a partire dal Ri­nascimento, può essere vista come una progressiva conferma dell'idea di Telesio: per capire la natura, bi­sogna osservarla direttamente e lasciarla "parlare da sé", senza imporle schemi preconcetti.</text:span></text:p>
      <text:p text:style-name="P20">L'influenza di Bacone è forse ancora più evidente, dato che il suo appello a un metodo sistematico e la sua critica agli "idola" sono diventati parte integrante della "cassetta degli attrezzi" mentale di ogni scienziato.</text:p>
      <text:p text:style-name="P21"/>
      <text:p text:style-name="P21"><text:soft-page-break/>L'applicazione del Metodo Induttivo (e sue evoluzioni).</text:p>
      <text:p text:style-name="P22">Sebbene il metodo induttivo puro di Bacone (tabelle di presenza, assenza, gradi) sia stato considerato troppo laborioso e poco flessibile per la pratica scientifica quotidiana, il principio di raccogliere sistematicamen­te i dati, analizzarli per trovare schemi e poi formulare ipotesi è fondamentale.</text:p>
      <text:p text:style-name="P10"><text:span text:style-name="T18">Chimica:</text:span><text:span text:style-name="T1"> La scoperta della legge delle proporzioni defi­nite da Proust o la tavola periodica degli elementi di Mendeleev sono esempi di come l'osservazione e la catalogazione di un gran numero di dati (induzione) abbiano portato a generalizzazioni e leggi fondamen­tali. Mendeleev, in particolare, compilò una vasta mole di dati sugli elementi noti e, attraverso un processo in­duttivo, identificò le periodicità nelle loro proprietà, prevedendo anche l'esistenza di elementi non ancora scoperti.</text:span></text:p>
      <text:p text:style-name="P10"><text:span text:style-name="T18">Biologia:</text:span><text:span text:style-name="T1"> L'elaborazione della teoria dell'evoluzione di Charles Darwin è un esempio magistrale di metodo induttivo. Darwin accumulò un'enorme quantità di os­servazioni (dati) durante il suo viaggio sul Beagle e ne­gli anni successivi, per poi indurre da essi la teoria del­la selezione naturale. Non partì da un principio astratto per poi dedurre le conseguenze, ma dalle osserva­zioni risalì alla teoria.</text:span></text:p>
      <text:p text:style-name="P21"><text:soft-page-break/>La Consapevolezza dei Bias Cognitivi (Corrispondenti agli "Idola")</text:p>
      <text:p text:style-name="P16">Rigore Sperimentale e Controllo delle Variabili</text:p>
      <text:p text:style-name="P21">La scienza moderna è ossessionata dal controllo delle variabili per eliminare gli errori. Quando uno scienzia­to progetta un esperimento, si preoccupa di eliminare i potenziali "idoli della tribù" (pregiudizi umani innati), "idoli della caverna" (bias individuali) e "idoli del foro" (ambiguità del linguaggio).</text:p>
      <text:p text:style-name="P16">Studi in doppio cieco</text:p>
      <text:p text:style-name="P21">In medicina, ad esempio, gli studi in doppio cieco per testare l'efficacia di un farmaco sono un'applicazione pratica del tentativo di minimizzare gli "idoli della tri­bù" e della "caverna" (il bias dell'osservatore e del sog­getto). Né il paziente né il medico sanno chi riceve il farmaco e chi il placebo, per evitare che le aspettative influenzino i risultati.</text:p>
      <text:p text:style-name="P16">Standardizzazione del linguaggio scientifico</text:p>
      <text:p text:style-name="P23">La creazione di una nomenclatura universale in chimi­ca, biologia e altre discipline serve a contrastare gli "idoli del foro", garantendo che gli scienziati in diverse parti del mondo comprendano esattamente ciò di cui si sta parlando.</text:p>
      <text:p text:style-name="P16">Revisione Paritaria (Peer Review) e Falsificabilità</text:p>
      <text:p text:style-name="P21">La pratica della revisione paritaria delle pubblicazioni scientifiche (dove altri scienziati esperti esaminano il <text:soft-page-break/>lavoro altrui) è un meccanismo sociale per contrastare gli "idoli della caverna" e del "teatro" (pregiudizi indivi­duali o accettazione acritica di teorie consolidate). La filosofia della scienza moderna, in particolare con Karl Popper, ha sottolineato l'importanza della falsificabili­tà delle teorie: una teoria scientifica deve poter essere smentita da prove empiriche. Questo è un modo per combattere gli "idoli del teatro", impedendo che teo­rie non verificabili o infondate si radichino come dog­mi. Solo attraverso questo processo di critica e revisio­ne costante si può evitare che modelli privi di fonda­mento si radichino come verità incontestabili, perpe­tuando una visione distorta della realtà. In tal senso, la filosofia di Popper non solo preserva l'integrità del­la ricerca scientifica, ma promuove un approccio dina­mico alla conoscenza, capace di adattarsi alle nuove scoperte e di superare le limitazioni imposte da para­digmi obsoleti. </text:p>
      <text:p text:style-name="P26">Il Collegamento tra Scienza e Tecnologia ("Sapere è Potere")</text:p>
      <text:p text:style-name="P21">L'intero sviluppo tecnologico moderno, dall'ingegne­ria all'informatica, dalla medicina alle comunicazioni, è una gigantesca dimostrazione della massima baco­niana "Sapere è potere". La conoscenza scientifica non è solo contemplazione, ma strumento per agire sul mondo e modificarlo. Ogni invenzione, ogni migliora­mento nella <text:soft-page-break/>produzione, ogni cura medica è una con­ferma di questo principio.</text:p>
      <text:p text:style-name="P10"><text:span text:style-name="T2">A</text:span><text:span text:style-name="T1">nche se Telesio e Bacone non hanno condotto espe­rimenti che hanno "provato" le loro teorie filosofiche nel senso stretto delle scienze naturali, il loro pensiero ha fornito le fondamenta concettuali e metodologiche su cui l'intera costruzione della scienza moderna si è eretta. L'efficacia e i successi della scienza nei secoli successivi sono la più grande "evidenza" e "dimostra­zione" della validità dei principi che essi hanno postulato.</text:span>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99cm" fo:margin-bottom="1.499cm" fo:margin-left="1.799cm" fo:margin-right="1.7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4-03T18:39:10.043391293</meta:creation-date>
    <dc:date>2026-04-03T18:50:55.204287421</dc:date>
    <dc:creator>corrado tafaro</dc:creator>
    <meta:editing-duration>PT1M12S</meta:editing-duration>
    <meta:editing-cycles>1</meta:editing-cycles>
    <meta:document-statistic meta:table-count="0" meta:image-count="0" meta:object-count="0" meta:page-count="19" meta:paragraph-count="71" meta:word-count="3448" meta:character-count="24394" meta:non-whitespace-character-count="21008"/>
    <meta:generator>LibreOffice/24.2.7.2$Linux_X86_64 LibreOffice_project/420$Build-2</meta:generator>
  </office:meta>
</office:document-meta>
</file>