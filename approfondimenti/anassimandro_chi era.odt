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officeooo:rsid="00038447" officeooo:paragraph-rsid="00038447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4eda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0d11a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erif" fo:font-size="14pt" officeooo:rsid="0027e024" officeooo:paragraph-rsid="0000975a" style:font-size-asian="14pt" style:font-size-complex="14pt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8403c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8e3fc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8e3fc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style="normal" officeooo:rsid="00572710" officeooo:paragraph-rsid="00092fc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top="0.101cm" fo:margin-bottom="0cm" style:contextual-spacing="false" fo:line-height="115%" fo:text-align="center" style:justify-single-word="false"/>
      <style:text-properties style:font-name="Liberation Serif" fo:font-size="14pt" fo:font-style="normal" officeooo:rsid="00572710" officeooo:paragraph-rsid="0000975a" style:font-size-asian="14pt" style:font-style-asian="normal" style:font-size-complex="14pt" style:font-style-complex="normal"/>
    </style:style>
    <style:style style:name="T1" style:family="text">
      <style:text-properties officeooo:rsid="0028adfc"/>
    </style:style>
    <style:style style:name="T2" style:family="text">
      <style:text-properties officeooo:rsid="004c276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adfc" style:font-style-asian="italic" style:font-style-complex="italic"/>
    </style:style>
    <style:style style:name="T5" style:family="text">
      <style:text-properties fo:font-style="italic" officeooo:rsid="0083b457" style:font-style-asian="italic" style:font-style-complex="italic"/>
    </style:style>
    <style:style style:name="T6" style:family="text">
      <style:text-properties fo:font-style="italic" officeooo:rsid="0085087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8adfc" style:font-style-asian="normal" style:font-style-complex="normal"/>
    </style:style>
    <style:style style:name="T10" style:family="text">
      <style:text-properties fo:font-style="normal" officeooo:rsid="0083b457" style:font-style-asian="normal" style:font-style-complex="normal"/>
    </style:style>
    <style:style style:name="T11" style:family="text">
      <style:text-properties fo:font-style="normal" officeooo:rsid="0057271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83b457"/>
    </style:style>
    <style:style style:name="T15" style:family="text">
      <style:text-properties officeooo:rsid="0002c858"/>
    </style:style>
    <style:style style:name="T16" style:family="text">
      <style:text-properties officeooo:rsid="0008403c"/>
    </style:style>
    <style:style style:name="T17" style:family="text">
      <style:text-properties officeooo:rsid="0008e3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nassimandro</text:h>
      <text:p text:style-name="P5"><text:span text:style-name="T12">Il secondo filosofo</text:span> è Anassimandro, <text:span text:style-name="T1">il suo pensiero non è di facile comprensione però possiamo supporre che la sua teoria di mondo, a differenza di Talete, non può basarsi solo su una singola materia (l’acqua) bensì su una moltitudine di mondi possibili che nascono da qualcosa e muoi</text:span><text:span text:style-name="T2">o</text:span><text:span text:style-name="T1">no in qualcosa che egli chiamò </text:span><text:span text:style-name="T4">ápeiron, </text:span><text:span text:style-name="T9">cioè </text:span><text:span text:style-name="T10">l’origine ed il principio costituente dell’universo.</text:span><text:span text:style-name="T9"> Ciò da cui tutto viene creato deve essere diverso da ciò che è creato per cui ciò che avviene prima e dopo rappresenta l’infinito e ciò che è creato il finito, </text:span><text:span text:style-name="T11">attraverso un processo di separazione dei contrari.</text:span></text:p>
      <text:p text:style-name="P2">Per Anassimandro, il mondo nasce <text:span text:style-name="T14">a causa del movimento rotatorio dell’ </text:span><text:span text:style-name="T6">á</text:span><text:span text:style-name="T5">peiron</text:span><text:span text:style-name="T5"><text:note text:id="ftn1" text:note-class="footnote"><text:note-citation>1</text:note-citation><text:note-body><text:p text:style-name="P1"><text:span text:style-name="T3">Apeiron </text:span><text:span text:style-name="T8">deriva dal greco ed è composta da </text:span><text:span text:style-name="T7">a</text:span><text:span text:style-name="T3"> </text:span><text:span text:style-name="T8">(non) e da </text:span><text:span text:style-name="T13">péras </text:span><text:span text:style-name="T12">(limite) ovvero il principio originario di tutte le cose. Significa </text:span><text:span text:style-name="T13">Illimitato, Indefinito.</text:span></text:p></text:note-body></text:note></text:span><text:span text:style-name="T5">,</text:span> <text:span text:style-name="T14">le cose presero a separarsi a coppie di contrari dando origine al cosmo:</text:span> <text:span text:style-name="T14">la luce e le tenebre, il giorno e la notte, la vita e la morte, </text:span>il caldo e il freddo. Il caldo dà origine al fuoco, che si dispone in una sfera che circonda la terra e l'aria. Il freddo dà origine alla terra e all'aria.</text:p>
      <text:p text:style-name="P2">Anassimandro di Mileto (vissuto tra il VII e il VI secolo a.C.) introduce il concetto di giustizia cosmica (espresso con il termine Diké) nel contesto della sua spiegazione <text:soft-page-break/>sulla nascita e la morte di tutte le cose a partire dall'Ápeiron (l'infinito o l'indeterminato).</text:p>
      <text:p text:style-name="P3">Questo concetto ci è giunto attraverso il suo unico frammento superstite, considerato il più antico testo della filosofia occidentale. Il celebre testo, tramandato dal filosofo Simplicio, recita:</text:p>
      <text:p text:style-name="P13">«<text:span text:style-name="T3">Principio degli esseri è l'infinito (ápeiron)... da dove infatti gli esseri hanno l'origine, ivi hanno anche la distruzione secondo necessità; poiché essi pagano l'uno all'altro la pena e il riscatto dell'ingiustizia secondo l'ordine del tempo</text:span>.»</text:p>
      <text:p text:style-name="P2">Per capire perché Anassimandro parli di "giustizia" (e ingiustizia) in senso cosmico, bisogna calarsi nel suo modello di universo. <text:span text:style-name="T16">Perché il </text:span>distacco dall'Ápeiron <text:span text:style-name="T16">è considerato </text:span>come "Ingiustizia" (Adikía)?</text:p>
      <text:p text:style-name="P9">Secondo Anassimandro, l'universo è costituito da coppie di elementi contrari (il caldo e il freddo, il secco e l'umido) che lottano costantemente tra loro. La nascita delle cose e dei singoli elementi avviene quando questi si separano dall'unità originaria dell'Ápeiron. Questa <text:s/>separazione e l'esistenza stessa delle cose particolari, viene vista come un atto di prepotenza, una ingiustizia (adikía), perché ogni elemento, per esistere, deve sopraffare o limitare il suo contrario (ad esempio, l'inverno "sconfigge" l'estate portando il freddo e scacciando il caldo).</text:p>
      <text:p text:style-name="P2"><text:soft-page-break/>Nessun contrario può prevalere per sempre. Esiste una legge cosmica necessaria, una giustizia immanente, che regola questo scontro. Il tempo agisce come un giudice.</text:p>
      <text:p text:style-name="P2">Quando il tempo di un elemento giunge al termine, questo deve subire la stessa sopraffazione che ha inflitto, morendo e ritornando nell'Ápeiron. L'alternanza delle stagioni, il ciclo del giorno e della notte, la vita e la morte sono i modi in cui gli elementi "pagano la pena" per la loro ingiustizia transitoria.</text:p>
      <text:p text:style-name="P2">La vera rivoluzione di Anassimandro sta nel fatto che, per la prima volta, un concetto nato nell'ambito sociale e giuridico umano (la colpa, il tribunale, la pena, la giustizia) viene esteso all'intero universo.</text:p>
      <text:p text:style-name="P9">Non sono più gli dei dell'Olimpo a decidere il destino del mondo con i loro capricci; è una legge razionale, geometrica e necessaria che mantiene il cosmo in perfetto equilibrio. L'ordine della natura non è dominato dal caos, ma da una giustizia universale e impersonale.</text:p>
      <text:p text:style-name="P9">In Anassimandro, la relazione tra giustizia sociale e fenomeni naturali si configura come un trasferimento di concetti dalla sfera della vita cittadina (polis) a quella del cosmo.</text:p>
      <text:p text:style-name="P7"><text:span text:style-name="T16">Q</text:span>uesto legame si esprime attraverso <text:span text:style-name="T16">la seguente lettura:</text:span></text:p>
      <text:p text:style-name="P11">Anassimandro proietta l'idea di diritto, tipica dell'organizzazione sociale umana, all'interno della filosofia naturale. Il concetto di dikè (giustizia). </text:p>
      <text:p text:style-name="P10"><text:soft-page-break/>Il divenire (nascita) e il perire (morte) delle cose non sono visti come eventi casuali, ma come una vera e pro­pria contesa giudiziaria. La natura <text:s text:c="2"/><text:span text:style-name="T17">come </text:span>processo giudiziario.</text:p>
      <text:p text:style-name="P11">I fenomeni naturali sono descritti come entità che devono pagarsi reciprocamente, ammenda e risarcimento per la propria "ingiustizia". </text:p>
      <text:p text:style-name="P11">Questo suggerisce che l'esistenza stessa di una cosa possa essere interpretata come un'usurpazione ai danni di un'altra.</text:p>
      <text:p text:style-name="P11">Il garante di questo equilibrio cosmico è il Tempo, che agisce come un giudice emettendo sentenze e ristabilendo l'ordine tra le parti in conflitto.</text:p>
      <text:p text:style-name="P12"><text:span text:style-name="T15">P</text:span>er Anassimandro la natura segue le stesse leggi di giustizia che regolano la società umana, trasformando l'ordine cosmico in un riflesso dell'ordine giuridico della polis.</text:p>
      <text:p text:style-name="P12">È stato il primo a sostenere che la terra è una sfera e che si trova al centro dell'universo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1T16:48:54.959560843</meta:creation-date>
    <dc:date>2026-07-21T18:23:12.253849224</dc:date>
    <dc:creator>corrado tafaro</dc:creator>
    <meta:editing-duration>PT40M4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22" meta:word-count="749" meta:character-count="4807" meta:non-whitespace-character-count="4074"/>
  </office:meta>
</office:document-meta>
</file>