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note">
      <style:paragraph-properties fo:line-height="80%"/>
      <style:text-properties style:font-name="Liberation Serif" fo:font-size="10pt" officeooo:rsid="005a4631" officeooo:paragraph-rsid="005a4631" style:font-size-asian="10pt" style:font-size-complex="10pt"/>
    </style:style>
    <style:style style:name="P2" style:family="paragraph" style:parent-style-name="Heading_20_4" style:master-page-name="Standard">
      <style:paragraph-properties fo:text-align="center" style:justify-single-word="false" style:page-number="5"/>
      <style:text-properties fo:font-size="14pt" fo:font-style="normal" fo:font-weight="normal" officeooo:paragraph-rsid="0002dcd5" style:font-size-asian="14pt" style:font-style-asian="normal" style:font-weight-asian="normal" style:font-size-complex="14pt" style:font-style-complex="normal" style:font-weight-complex="normal"/>
    </style:style>
    <style:style style:name="P3" style:family="paragraph" style:parent-style-name="Standard">
      <style:paragraph-properties fo:line-height="115%" fo:text-align="center" style:justify-single-word="false"/>
      <style:text-properties fo:font-size="14pt" officeooo:rsid="0017c730" officeooo:paragraph-rsid="0002dcd5" style:font-size-asian="14pt" style:font-size-complex="14pt"/>
    </style:style>
    <style:style style:name="P4" style:family="paragraph" style:parent-style-name="Standard">
      <style:paragraph-properties fo:margin-top="0.199cm" fo:margin-bottom="0cm" style:contextual-spacing="false" fo:line-height="115%" fo:text-align="justify" style:justify-single-word="false"/>
      <style:text-properties officeooo:rsid="00152e09" officeooo:paragraph-rsid="0002dcd5"/>
    </style:style>
    <style:style style:name="P5" style:family="paragraph" style:parent-style-name="Standard">
      <style:paragraph-properties fo:line-height="115%" fo:text-align="justify" style:justify-single-word="false"/>
      <style:text-properties officeooo:rsid="00152e09" officeooo:paragraph-rsid="0002dcd5"/>
    </style:style>
    <style:style style:name="P6" style:family="paragraph" style:parent-style-name="Standard">
      <style:paragraph-properties fo:margin-top="0cm" fo:margin-bottom="0cm" style:contextual-spacing="false" fo:line-height="115%" fo:text-align="justify" style:justify-single-word="false"/>
      <style:text-properties officeooo:rsid="00152e09" officeooo:paragraph-rsid="0002dcd5"/>
    </style:style>
    <style:style style:name="P7" style:family="paragraph" style:parent-style-name="Standard">
      <style:paragraph-properties fo:margin-top="0.101cm" fo:margin-bottom="0cm" style:contextual-spacing="false" fo:line-height="115%" fo:text-align="justify" style:justify-single-word="false"/>
      <style:text-properties officeooo:rsid="00152e09" officeooo:paragraph-rsid="0002dcd5"/>
    </style:style>
    <style:style style:name="P8" style:family="paragraph" style:parent-style-name="Standard">
      <style:paragraph-properties fo:margin-top="0cm" fo:margin-bottom="0cm" style:contextual-spacing="false" fo:line-height="115%" fo:text-align="justify" style:justify-single-word="false"/>
      <style:text-properties officeooo:rsid="0021e93a" officeooo:paragraph-rsid="0002dcd5"/>
    </style:style>
    <style:style style:name="P9" style:family="paragraph" style:parent-style-name="Standard">
      <style:paragraph-properties fo:margin-top="0.101cm" fo:margin-bottom="0cm" style:contextual-spacing="false" fo:line-height="115%" fo:text-align="justify" style:justify-single-word="false"/>
      <style:text-properties officeooo:rsid="0021e93a" officeooo:paragraph-rsid="0002dcd5"/>
    </style:style>
    <style:style style:name="P10" style:family="paragraph" style:parent-style-name="Standard">
      <style:paragraph-properties fo:margin-top="0cm" fo:margin-bottom="0cm" style:contextual-spacing="false" fo:line-height="115%" fo:text-align="justify" style:justify-single-word="false"/>
      <style:text-properties officeooo:rsid="00225a6b" officeooo:paragraph-rsid="0002dcd5"/>
    </style:style>
    <style:style style:name="P11" style:family="paragraph" style:parent-style-name="Standard">
      <style:paragraph-properties fo:margin-top="0.101cm" fo:margin-bottom="0cm" style:contextual-spacing="false" fo:line-height="115%" fo:text-align="justify" style:justify-single-word="false"/>
      <style:text-properties officeooo:rsid="00225a6b" officeooo:paragraph-rsid="0002dcd5"/>
    </style:style>
    <style:style style:name="P12" style:family="paragraph" style:parent-style-name="Standard">
      <style:paragraph-properties fo:margin-top="0.101cm" fo:margin-bottom="0cm" style:contextual-spacing="false" fo:line-height="115%" fo:text-align="justify" style:justify-single-word="false"/>
      <style:text-properties officeooo:rsid="00238fb8" officeooo:paragraph-rsid="0002dcd5"/>
    </style:style>
    <style:style style:name="P13" style:family="paragraph" style:parent-style-name="Standard">
      <style:paragraph-properties fo:margin-top="0cm" fo:margin-bottom="0cm" style:contextual-spacing="false" fo:line-height="115%" fo:text-align="justify" style:justify-single-word="false"/>
      <style:text-properties officeooo:rsid="00238fb8" officeooo:paragraph-rsid="0002dcd5"/>
    </style:style>
    <style:style style:name="T1" style:family="text">
      <style:text-properties officeooo:rsid="0026bdbd"/>
    </style:style>
    <style:style style:name="T2" style:family="text">
      <style:text-properties officeooo:rsid="00173cb1"/>
    </style:style>
    <style:style style:name="T3" style:family="text">
      <style:text-properties officeooo:rsid="00182e42"/>
    </style:style>
    <style:style style:name="T4" style:family="text">
      <style:text-properties officeooo:rsid="0018750e"/>
    </style:style>
    <style:style style:name="T5" style:family="text">
      <style:text-properties officeooo:rsid="001955df"/>
    </style:style>
    <style:style style:name="T6" style:family="text">
      <style:text-properties officeooo:rsid="0019577e"/>
    </style:style>
    <style:style style:name="T7" style:family="text">
      <style:text-properties officeooo:rsid="001aabdb"/>
    </style:style>
    <style:style style:name="T8" style:family="text">
      <style:text-properties officeooo:rsid="001c0b9d"/>
    </style:style>
    <style:style style:name="T9" style:family="text">
      <style:text-properties officeooo:rsid="00206a04"/>
    </style:style>
    <style:style style:name="T10" style:family="text">
      <style:text-properties officeooo:rsid="0022ebb7"/>
    </style:style>
    <style:style style:name="T11" style:family="text">
      <style:text-properties officeooo:rsid="0026f0ad"/>
    </style:style>
    <style:style style:name="T12" style:family="text">
      <style:text-properties officeooo:rsid="002534e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4"><text:bookmark-start text:name="__RefHeading___Toc4095_3560524389"/>La legge morale è la negazione del vero amore.<text:bookmark-end text:name="__RefHeading___Toc4095_3560524389"/></text:h>
      <text:p text:style-name="P4">Gesù predicava l’amore, un amore incondizionato, anche verso i peccatori. Su questo amore si fondano i rapporti degli uomini fra loro e quelli fra Dio e gli uo­mini.</text:p>
      <text:p text:style-name="P5"><text:span text:style-name="T1">Q</text:span>uesto amore si concilia con la moralità e con la giu­stizia?</text:p>
      <text:p text:style-name="P5">Se la morale implica valutazione, giudizio e distinzione tra merito e colpa, l'amore, nella sua essenza più pura, sembrerebbe trascendere queste categorie, acco­gliendo incondizionatamente l'altro al di là delle sue azioni o qualità.</text:p>
      <text:p text:style-name="P5">Questa prospettiva mette in luce una tensione profon­da che spesso si manifesta nelle nostre relazioni e nel­le nostre concezioni etiche. La morale, intesa come in­sieme di norme e principi che guidano il comporta­mento e distinguono il bene dal male, sembra inevita­bilmente portare a un giudizio sull'altro.</text:p>
      <text:p text:style-name="P5">Se una persona agisce in modo contrario a questi principi, la morale la valuta negativamente, attribuen­dole una "colpa".</text:p>
      <text:p text:style-name="P6">L'amore, d'altra parte, nella sua accezione più ideale, è spesso descritto come un sentimento o un atteggia­mento di accettazione totale, di benevolenza incondi­zionata verso l'altro, indipendentemente dai suoi me­riti o <text:soft-page-break/>demeriti. L'amore <text:span text:style-name="T2">(carità)</text:span> "non tiene conto del male ricevuto" (1 Corinzi 13:5).</text:p>
      <text:p text:style-name="P7">È possibile un amore che non tenga minimamente conto del comportamento dell'altro? E una morale che sia completamente priva di amore, rischia di diventare fredda e inumana?</text:p>
      <text:p text:style-name="P7"><text:span text:style-name="T3">L</text:span>a morale sembra intrinsecamente legata alla valuta­zione, al giudizio, alla distinzione tra ciò che è giusto e ciò che è sbagliato, tra chi merita approvazione e chi biasimo. Essa stabilisce dei criteri, dei principi in base ai quali le azioni e le persone vengono giudicate.</text:p>
      <text:p text:style-name="P7"><text:span text:style-name="T4">L’essere umano, nel</text:span> senso cristiano del peccato origi­nale, è colpevole <text:span text:style-name="T4">a prescindere, </text:span>anche se non ha pec­cato è destinato a peccare. Non ha possibilità di sal­vezza se non <text:span text:style-name="T4">in un altro mondo</text:span>. Se un uomo uccide un innocente senza una ragione, il cristiano non avrà nessun moto di indignazione, di protesta o di ribellio­ne? Come risponderà il cristiano, con l'amore per il suo carnefice?</text:p>
      <text:p text:style-name="P7">Di fronte a un atto di violenza gratuita e alla sofferen­za inflitta a un innocente, la reazione umana naturale è di indignazione, di protesta, di ribellione contro l'ingiustizia. Come si concilia questa reazione con il co­mandamento cristiano dell'amore, persino verso i ne­mici?</text:p>
      <text:p text:style-name="P7"><text:soft-page-break/>È lecito, per un cristiano, provare indignazione di fron­te al male, o questo sentimento è già una forma di giudizio morale che nega l'amore?</text:p>
      <text:p text:style-name="P7"><text:span text:style-name="T4">Laddove viene rinnegata la legge dell’amore, c</text:span>'è una pena <text:span text:style-name="T4">alternativa </text:span>ed è quella del Dolore. Una madre soffre tutto il peso di un'azione malvagia compiuta dal figlio tanto amato. Ne sente il peso come se quella azione l'avesse commessa lei. Non si sentirà colpevole di fronte alla giustizia ma dal punto di vista dell'amore per il figlio ne porterà il peso e non si chiederà se è giusto o ingiusto che debba patire il dolore per una colpa commessa da altri. <text:span text:style-name="T5">Sarà lei a portare la croce per la colpa del figlio.</text:span></text:p>
      <text:p text:style-name="P6">In questo scenario, la "pena" non è inflitta da un tribu­nale o da un'autorità esterna, ma sorge spontanea­mente dal cuore stesso dell'amore. È il dolore empati­co, la sofferenza per la sofferenza dell'altro, che si fa carico del peso della sua azione. La madre non si in­terroga sulla giustizia o sull'ingiustizia di questo suo patire; l'amore per il figlio è una forza così potente da superare queste considerazioni razionali. <text:span text:style-name="T6">Il</text:span> legame di interdipendenza così profondo che la colpa e il dolore di uno si riversano sull'altro, <text:span text:style-name="T6">il</text:span> confine tra l'io e l'altro si fa più labile, e il patimento del figlio diventa, in un certo senso, il patimento, <text:span text:style-name="T7">la sofferenza</text:span> della madre.</text:p>
      <text:p text:style-name="P7"><text:soft-page-break/>L'immagine della madre che "porta la croce per la col­pa del figlio" è particolarmente significativa nel conte­sto cristiano, richiamando il sacrificio di Cristo per i peccati dell'umanità. Sebbene la natura e la portata di questi due <text:span text:style-name="T7">parallelismi siano diversi </text:span>"portare la croce", suggerisce una dinamica universale dell'amore che si fa carico del fardello altrui, che soffre per la sua soffe­renza, che si offre come espiazione o come sostegno nel cammino di redenzione. Questo tipo di "pena del dolore" inflitta dall'amore non è una punizione in sen­so stretto, ma piuttosto una conseguenza inevitabile del legame affettivo. Non mira alla vendetta, ma alla comprensione, al sostegno e, in ultima analisi, alla guarigione e alla riconciliazione.</text:p>
      <text:p text:style-name="P6"><text:span text:style-name="T6">Questa </text:span>riflessione ci riporta ancora una volta alla complessità del rapporto tra amore e giustizia. Mentre la giustizia umana cerca di stabilire la colpa individua­le e di comminare una pena proporzionata all'azione, l'amore sembra operare su un piano diverso, dove il dolore non è necessariamente legato alla responsabi­lità diretta, ma alla profondità del legame affettivo. Questo non significa che l'amore ignori la gravità dell'azione malvagia, ma che la sua risposta va oltre la semplice punizione. Cerca la comprensione delle radi­ci del male, offre sostegno nel percorso di cambia­mento e non recide il legame, anche quando questo comporta un grande dolore. La "pena del dolore" è una testimonianza della <text:soft-page-break/>forza trasformativa dell'amo­re, capace di farsi carico del peso altrui senza calcolo e senza riserve. È una forma di amore sacrificale che si avvicina all'ideale evangelico, pur manifestandosi in un contesto umano e relazionale specifico.</text:p>
      <text:p text:style-name="P6"><text:span text:style-name="T8">La madre soffre per le colpe del figlio che invece rima­ne indifferente, e questo è un aspetto doloroso e pa­radossale dell</text:span>'amore: la sua potenziale capacità di ge­nerare ingiustizie, sia per chi ama che per chi non è amato. </text:p>
      <text:p text:style-name="P6">L'amore, per sua natura, è spesso parziale e selettivo. Rivolgiamo il nostro affetto, la nostra cura e la nostra dedizione a persone specifiche: familiari, amici, part­ner. Questa parzialità, se da un lato è fonte di gioia e di sostegno reciproco, dall'altro può creare disparità e sofferenza. Chi ama profondamente può trovarsi a dare molto più di quanto riceve, sopportando pesi e dolori che l'altro non condivide o addirittura ignora. </text:p>
      <text:p text:style-name="P6"><text:span text:style-name="T9">L</text:span>a sfida radicale del comandamento evangelico di amare il prossimo come se stessi, <text:span text:style-name="T9">non trova corri­spondenza nella giustizia umana anzi diventa un assioma</text:span><text:span text:style-name="T9"><text:note text:id="ftn1" text:note-class="footnote"><text:note-citation>1</text:note-citation><text:note-body><text:p text:style-name="P1">Proposizione posta a base di un ragionamento, che non ha bisogno di essere dimostrato perché evidente di per sé.</text:p></text:note-body></text:note></text:span><text:span text:style-name="T9"> che esclude ogni possibile mediazione: ciò che è secondo la legge dell'amore è intrinsecamente con­trario alla giustizia, e la scelta è inevitabilmente tra l'uno e l'altra.</text:span></text:p>
      <text:p text:style-name="P6"><text:soft-page-break/>Da un lato, la "legge dell'amore" con la sua enfasi sul­la compassione, la misericordia, il perdono incondizio­nato; dall'altro, la "giustizia" con la sua ricerca di equi­tà, di imparzialità, di applicazione universale di nor­me.</text:p>
      <text:p text:style-name="P8">Ci si chiede come Gesù abbia fatto a pensare che l’amore incondizionato che andava predicando avreb­be potuto reggere un sol giorno e avere la praticabili­tà all’interno della società?</text:p>
      <text:p text:style-name="P9">Se interpretiamo l'amore incondizionato in senso as­soluto, come assenza di giudizio, di conseguenze per le azioni negative, di distinzione tra giusto e sbagliato, allora è difficile immaginare come una comunità uma­na complessa potrebbe funzionare. La violenza, la so­praffazione, la mancanza di rispetto per i diritti altrui potrebbero dilagare senza meccanismi di controllo e di riparazione.</text:p>
      <text:p text:style-name="P10">Gesù Cristo era convinto che fosse ormai vicina la fine del mondo <text:span text:style-name="T10">e m</text:span>olti studiosi del Nuovo Testamento concordano sul fatto che Gesù e i suoi primi seguaci credevano nell'imminenza del Regno di Dio, un evento cataclismico che avrebbe segnato la fine dell'era pre­sente e l'instaurazione del dominio divino sulla terra. <text:s/><text:span text:style-name="T10">C</text:span>osì si spiega il suo modo di pensare e di concepire le cose; la rinunzia ad ogni attività, ad ogni interesse, la indifferenza per ogni legge, compresa quella morale, e al posto di tutto questo solo l’amore, è proprio l’atteggiamento di colui che vede la fine di tutte le cose. </text:p>
      <text:p text:style-name="P10"><text:soft-page-break/><text:span text:style-name="T10">T</text:span>utto appare senza importanza <text:span text:style-name="T10">all</text:span>'uomo che vede prossima la fine di tutte le cose. In quel momento di­mentica tutto ciò che lo divide dagli altri, rivalità, invi­die e gelosie, rancori per affronti subiti. Vede nell'altro che è in procinto di subire la stessa sorte, solo un po­vero essere umano che lo affratella e lo unisce nel momento della morte. In quel momento di consape­volezza della fragilità e della caducità dell'esistenza, ciò che veramente conta emerge con forza: la comune umanità, il legame che unisce nella stessa sorte. Riva­lità, invidie, rancori appaiono futili e insignificanti di fronte alla prospettiva della morte. </text:p>
      <text:p text:style-name="P11">Trasponendo questa dinamica alla visione cristiana, con la "sempre incombente ombra della morte", la chiamata all'amore fraterno e al perdono assume una nuova luce. Se la morte è la grande livellatrice, se tutti siamo destinati alla stessa fine, allora ciò che ci divide nel presente perde la sua importanza definitiva. Ciò che conta è il legame umano fondamentale, la com­passione per la comune fragilità.</text:p>
      <text:p text:style-name="P11"><text:span text:style-name="T11">Viene da pensare se è</text:span><text:span text:style-name="T12"> questa</text:span> la “morale dei disperati”?</text:p>
      <text:p text:style-name="P12">La morale dei disperati può sembrare provocatoria ma è illuminante, non nel senso di una disperazione nichilista, ma di una disperazione di fronte alla caduci­tà del mondo e delle sue logiche. È una morale che ra­dica il suo valore non nelle gerarchie terrene o nelle <text:soft-page-break/>conquiste effimere, ma nella condivisione della condi­zione umana e nella prospettiva di un destino comu­ne.</text:p>
      <text:p text:style-name="P13">La consapevolezza della morte ci spoglia delle nostre illusioni di grandezza e ci riconduce all'essenziale: la relazione con gli altri e la compassione per la comune condizione umana. In questo senso, la "morale dei di­sperati" potrebbe essere paradossalmente la morale più autentica e profonda, capace di superare le me­schinità e le divisioni che spesso ci intrappolano nella vita quotidiana.</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2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FreeSans" style:font-family-complex="FreeSans" style:font-family-generic-complex="swis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799cm" fo:margin-bottom="1.499cm" fo:margin-left="1.799cm" fo:margin-right="1.799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6-04-03T18:19:51.328973271</meta:creation-date>
    <dc:date>2026-04-03T18:23:51.262403836</dc:date>
    <dc:creator>corrado tafaro</dc:creator>
    <meta:editing-duration>PT4M1S</meta:editing-duration>
    <meta:editing-cycles>1</meta:editing-cycles>
    <meta:document-statistic meta:table-count="0" meta:image-count="0" meta:object-count="0" meta:page-count="8" meta:paragraph-count="29" meta:word-count="1533" meta:character-count="9750" meta:non-whitespace-character-count="8241"/>
    <meta:generator>LibreOffice/24.2.7.2$Linux_X86_64 LibreOffice_project/420$Build-2</meta:generator>
  </office:meta>
</office:document-meta>
</file>