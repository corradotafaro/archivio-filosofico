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15%" fo:text-align="justify" style:justify-single-word="false"/>
      <style:text-properties style:font-name="Noto Sans1" fo:font-size="12pt" officeooo:paragraph-rsid="000ea709" style:font-size-asian="12pt" style:font-size-complex="12pt"/>
    </style:style>
    <style:style style:name="P2" style:family="paragraph" style:parent-style-name="Heading_20_3">
      <style:paragraph-properties fo:line-height="115%" fo:text-align="justify" style:justify-single-word="false"/>
      <style:text-properties style:font-name="Noto Sans1" fo:font-size="12pt" officeooo:paragraph-rsid="000ea709" style:font-size-asian="12pt" style:font-size-complex="12pt"/>
    </style:style>
    <style:style style:name="P3" style:family="paragraph" style:parent-style-name="Quotations">
      <style:paragraph-properties fo:margin-top="0.101cm" fo:margin-bottom="0cm" style:contextual-spacing="false" fo:line-height="100%" fo:text-align="center" style:justify-single-word="false"/>
      <style:text-properties fo:font-size="9pt" officeooo:paragraph-rsid="0011d62e" style:font-size-asian="9pt" style:font-size-complex="9pt"/>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2pt" fo:font-style="normal" fo:font-weight="normal" officeooo:rsid="001c02ae" officeooo:paragraph-rsid="000ea709" style:font-size-asian="12pt" style:font-style-asian="normal" style:font-weight-asian="normal" style:font-size-complex="12pt" style:font-style-complex="normal" style:font-weight-complex="normal"/>
    </style:style>
    <style:style style:name="P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style="normal" officeooo:rsid="001c02ae" officeooo:paragraph-rsid="000ea709" style:font-size-asian="12pt" style:font-style-asian="normal" style:font-size-complex="12pt" style:font-style-complex="normal"/>
    </style:style>
    <style:style style:name="P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0ea709" style:font-size-asian="12pt" style:font-size-complex="12pt"/>
    </style:style>
    <style:style style:name="P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0ea709" style:font-size-asian="12pt" style:font-size-complex="12pt"/>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fo:font-weight="bold" officeooo:paragraph-rsid="000ea709" style:font-size-asian="12pt" style:font-weight-asian="bold" style:font-size-complex="12pt" style:font-weight-complex="bold"/>
    </style:style>
    <style:style style:name="P20" style:family="paragraph" style:parent-style-name="Text_20_body">
      <style:paragraph-properties fo:line-height="100%" fo:text-align="justify" style:justify-single-word="false"/>
      <style:text-properties fo:font-size="9pt" style:font-size-asian="9pt" style:font-size-complex="9pt"/>
    </style:style>
    <style:style style:name="P21" style:family="paragraph" style:parent-style-name="Text_20_body">
      <style:paragraph-properties fo:margin-top="0cm" fo:margin-bottom="0cm" style:contextual-spacing="false" fo:line-height="100%" fo:text-align="justify" style:justify-single-word="false"/>
      <style:text-properties fo:font-size="9pt" style:font-size-asian="9pt" style:font-size-complex="9pt"/>
    </style:style>
    <style:style style:name="P22" style:family="paragraph" style:parent-style-name="Text_20_body">
      <style:paragraph-properties fo:margin-top="0.101cm" fo:margin-bottom="0cm" style:contextual-spacing="false" fo:line-height="100%" fo:text-align="justify" style:justify-single-word="false"/>
    </style:style>
    <style:style style:name="T1" style:family="text">
      <style:text-properties style:font-name="Noto Sans1"/>
    </style:style>
    <style:style style:name="T2" style:family="text">
      <style:text-properties style:font-name="Noto Sans1" fo:font-style="normal" officeooo:rsid="001c02ae" style:font-style-asian="normal" style:font-style-complex="normal"/>
    </style:style>
    <style:style style:name="T3" style:family="text">
      <style:text-properties style:font-name="Noto Sans1" fo:font-style="normal" officeooo:rsid="00336864" style:font-style-asian="normal" style:font-style-complex="normal"/>
    </style:style>
    <style:style style:name="T4" style:family="text">
      <style:text-properties style:font-name="Noto Sans1"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8aa31" style:font-style-asian="normal" style:font-style-complex="normal"/>
    </style:style>
    <style:style style:name="T7" style:family="text">
      <style:text-properties fo:font-style="normal" officeooo:rsid="001c02ae" style:font-style-asian="normal" style:font-style-complex="normal"/>
    </style:style>
    <style:style style:name="T8" style:family="text">
      <style:text-properties fo:font-style="normal" officeooo:rsid="00336864"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officeooo:rsid="0029c3ce"/>
    </style:style>
    <style:style style:name="T12" style:family="text">
      <style:text-properties officeooo:rsid="01d5c377"/>
    </style:style>
    <style:style style:name="T13" style:family="text">
      <style:text-properties officeooo:rsid="01d9d0ee"/>
    </style:style>
    <style:style style:name="T14" style:family="text">
      <style:text-properties style:use-window-font-color="true" loext:opacity="0%" fo:background-color="transparent" loext:char-shading-value="0"/>
    </style:style>
    <style:style style:name="T15" style:family="text">
      <style:text-properties fo:font-weight="bold"/>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ize="10pt" officeooo:rsid="0011d62e" style:font-size-asian="10pt" style:font-size-complex="10pt"/>
    </style:style>
    <style:style style:name="T19" style:family="text">
      <style:text-properties fo:font-size="9pt" style:font-size-asian="9pt" style:font-size-complex="9pt"/>
    </style:style>
    <style:style style:name="T20" style:family="text">
      <style:text-properties fo:font-size="9pt" officeooo:rsid="0011d62e" style:font-size-asian="9pt" style:font-size-complex="9pt"/>
    </style:style>
    <style:style style:name="T21" style:family="text">
      <style:text-properties fo:font-size="9pt" fo:font-style="italic"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start text:name="__RefHeading___Toc18154_3602757520"/>La morte e l'accettazione della mortalità:<text:bookmark-end text:name="__RefHeading___Toc18154_3602757520"/></text:h>
      <text:p text:style-name="P4">La consapevolezza della propria mortalità può sembrare un concetto cupo, ma per Seneca è una fonte di liberazione. Accettare la morte ci permette di vivere pienamente e senza paura.</text:p>
      <text:h text:style-name="P2" text:outline-level="3"><text:bookmark-start text:name="__RefHeading___Toc18156_3602757520"/><text:span text:style-name="T6">L</text:span><text:span text:style-name="T7">ettera 4</text:span><text:bookmark-end text:name="__RefHeading___Toc18156_3602757520"/></text:h>
      <text:p text:style-name="P6">Persevera come hai cominciato e affrettati quanto sei in grado: potrai così godere più a lungo di un animo puro e sereno. Anzi ne godi già mentre lo correggi, mentre lo acquieti: ma ben altro piacere è quello che si riceve dalla contemplazione di un'anima immacolata e limpida.</text:p>
      <text:p text:style-name="P7">Certo ricordi la gioia provata quando sostituisti la veste da fanciullo con la toga virile e fosti condotto nel foro: ebbene, aspettane una maggiore quando avrai deposto l'animo infantile e la filosofia ti avrà registrato fra gli uomini. Poiché la tua non è puerizia, bensì , cosa più grave, puerilità, e, quel che è peggio, noi abbiamo l'autorità degli anziani e i difetti dei bambini, anzi non dei bambini, ma dei neonati; i bambini hanno paura di sciocchezze, i neonati di false immagini, noi di tutte e due. Cerca di progredire: capirai che certe cose proprio per questo sono meno da temere, perché fanno molta paura. Nessun male è grande se è l'ultimo. La morte ti viene incontro: la dovresti temere se potesse rimanere con te: ma necessariamente o non è ancora arrivata o <text:soft-page-break/>passa oltre. “<text:span text:style-name="T10">È difficile</text:span>", ribatti, "<text:span text:style-name="T10">indurre lo spirito a disprezzare la vita</text:span>." Ma non ti accorgi per quali insulsi motivi essa viene disprezzata? Uno si impicca davanti alla porta dell'amica, un altro si butta giù dal tetto per non sentire più le sfuriate del padrone, l'evaso si ficca un pugnale in corpo per sfuggire alla cattura: non pensi che si possa compiere per coraggio un'azione che si compie per eccessiva paura?</text:p>
      <text:p text:style-name="P7">Non può vivere una vita serena chi si preoccupa troppo di prolungarla e annovera fra i grandi beni i molti anni vissuti. Tu, invece, preparati ogni giorno a lasciare serenamente questa vita a cui tanti si avvinghiano e si aggrappano, come chi è trascinato via dalla corrente si aggrappa ai rovi e alle rocce. I più ondeggiano infelici tra il timore della morte e le angosce della vita: non vogliono vivere, né sanno morire.</text:p>
      <text:p text:style-name="P7">Abbandona ogni preoccupazione per la tua esistenza e te la renderai piacevole. Possedere un bene non serve a niente se non si è pronti a perderlo. E i beni la cui perdita è più facilmente tollerabile sono quelli che, perduti, non possono essere oggetto di rimpianto. Fatti, dunque, animo e cor<text:span text:style-name="T11">a</text:span>zzati contro i casi che possono capitare anche ai più potenti. Della vita di Pompeo decisero un ragazzino e un eunuco, di quella di Crasso un <text:span text:style-name="T12">pa</text:span>rto crudele e barbaro. Gaio Cesare impose a Lepido di porgere il collo al tribuno Destro, ma poi lui stesso porse <text:soft-page-break/>il suo a Cherea. La sorte non ha innalzato nessuno tanto da non ritorcere contro di lui quanto gli aveva concesso di fare. Non fidarti della momentanea bonaccia: fa presto il mare ad agitarsi; nello stesso giorno le barche affondano là dove si erano spinte per diporto.</text:p>
      <text:p text:style-name="P7">Pensa che tanto un bandito che un nemico possono puntarti un pugnale alla gola; in assenza di un'autorità più grande ogni servo ha potere di vita o di morte su di te. Voglio dire: chiunque disprezzi la propria vita, è padrone della tua. Ricorda gli esempi di uomini uccisi dai propri schiavi, o con aperta violenza o con l'inganno: ti renderai conto che il furore dei servi non ha causato meno stragi dell'ira dei re.</text:p>
      <text:p text:style-name="P7">Che ti importa, dunque, quanto sia potente l'uomo che temi, quando il male che temi te lo può fare chiunque? </text:p>
      <text:p text:style-name="P7">Metti il caso che tu cada in mano ai nemici, il vincitore comanderà di condurti proprio là dove stai andando. Perché inganni te stesso e ti rendi conto solo in quel momento di una cosa che subivi da tempo? Ascoltami: verso la morte sei spinto dal momento della nascita. Su questo e su pensieri del genere dobbiamo meditare, se vogliamo attendere serenamente quell'ultima ora che ci spaventa e ci rende inquiete tutte le altre.</text:p>
      <text:p text:style-name="P7">Ma, per mettere fine alla mia lettera, senti il pensiero che ho scelto oggi - anche questo l'ho preso dal giardino di un altro.</text:p>
      <text:p text:style-name="P7"><text:soft-page-break/>"<text:span text:style-name="T10">È una grande ricchezza la povertà regolata dalla legge di natura</text:span>." Li conosci i confini che ci ha fissato la legge di natura? Non patire la fame, né la sete, né il freddo. Per scacciare la fame e la sete non occorre sedere presso la soglia di superbi padroni, né sopportare una fastidiosa arroganza e una cortesia affettata e perciò offensiva, non è necessario affrontare i pericoli della navigazione o partire per la guerra. Quanto esige la natura è facile a procurarsi e a portata di mano.</text:p>
      <text:p text:style-name="P5">E, invece, ci affanniamo per il superfluo; ecco che cosa logora la toga, cosa ci costringe a invecchiare sotto una tenda e cosa ci spinge in terre straniere, mentre quel che ci basta è a portata di mano. Chi si adatta bene alla povertà è ricco. Stammi bene.</text:p>
      <text:p text:style-name="P19"/>
      <text:h text:style-name="P2" text:outline-level="3"><text:bookmark-start text:name="__RefHeading___Toc18158_3602757520"/>Lettera 26<text:bookmark-end text:name="__RefHeading___Toc18158_3602757520"/></text:h>
      <text:p text:style-name="P6">Poco fa ti dicevo di essere in cospetto della vecchiaia: ora temo di essermela già lasciata alle spalle. Ai miei anni e a questo mio fisico conviene ormai un altro termine; vecchiaia indica un'età stanca, ma non priva di forze; mettimi, invece, nel numero degli uomini decrepiti, vicini alla fine.</text:p>
      <text:p text:style-name="P7">Posso, tuttavia, dirti che sono grato a me stesso: i danni dell'età, benché li avverta nel corpo, non li sento nello spirito. Solo i vizi e gli strumenti dei vizi sono invecchiati: <text:soft-page-break/>lo spirito è forte e gioisce di non aver molto in comune con il corpo: ha ormai deposto gran parte del suo peso. Esulta e discute con me sulla vecchiaia: dice che questo è il suo fiore. Crediamogli: si goda il suo bene.</text:p>
      <text:p text:style-name="P6">Mi esorta a pensare e a individuare quanto di questa tranquillità e moderazione di costumi io debba alla saggezza, quanto all'età, e ad esaminare con attenzione quello che non posso e quello che non voglio fare, e io mi compiaccio di considerare quello che non posso fare, come se non lo volessi: quale motivo di lagnarsi, quale danno c'è, se sono venute a mancare cose destinate a finire? "<text:span text:style-name="T10">Ma è un danno gravissimo</text:span>," dici, "<text:span text:style-name="T10">consumarsi, deperire o, meglio, sfarsi. Non siamo colpiti e abbattuti all'improvviso: ci logoriamo a poco a poco e ogni giorno ci toglie un po' delle nostre forze.</text:span>" C'è una conclusione migliore che scivolare verso la propria fine perché il fisico si dissolve naturalmente? Non che un attacco e un decesso improvviso siano un male, ma è dolce questo modo di essere portati via a poco a poco. Come se si avvicinasse la prova e giungesse il giorno fatale che dovrà giudicare di tutti i miei anni, mi osservo e dico a me stesso:</text:p>
      <text:p text:style-name="P7">"<text:span text:style-name="T10">Fino a oggi non è niente quello che ho dimostrato a fatti o a parole; l'animo ha dato pegni fallaci e di poco conto, avviluppati in mille ornamenti esteriori: alla morte mi affiderò per giudicare i miei progressi. Con coraggio mi </text:span><text:soft-page-break/><text:span text:style-name="T10">preparo a quel giorno in cui, deposto ogni artificio e ogni inganno, giudicherò di me stesso: se sono forte a parole o nell'intimo; se furono simulazione e farsa le parole sprezzanti scagliate contro la sorte. Lascia da parte i giudizi degli uomini: sono sempre incerti e ambigui. Lascia da parte gli studi fatti durante tutta la vita: ti giudicherà la morte. La vera forza d'animo non la mettono in luce le dispute filosofiche e le conversazioni letterarie, le parole raccolte dall'insegnamento dei saggi e i discorsi eruditi: anche gli uomini più vili sono capaci di parole coraggiose. Quanto hai fatto sarà evidente solo in punto di morte. Accetto questa condizione, non temo il giudizio."</text:span></text:p>
      <text:p text:style-name="P6">Così dico a me stesso, ma è come se parlassi anche con te. Tu sei più giovane: che importa? Gli anni non contano. Non puoi sapere dove ti attenda la morte; perciò aspettala dovunque.</text:p>
      <text:p text:style-name="P6">Volevo ormai finire e già mi accingevo a concludere, ma devo preparare il denaro e darlo come viatico a questa lettera. Non ti dico da chi prenderò il prestito: tu sai a quale forziere ricorro. Aspetta ancora un poco ed effettuerò il pagamento con i miei averi; intanto mi farà un prestito Epicuro; scrive: "<text:span text:style-name="T10">Pensa alla morte</text:span>." Oppure, se così il senso è più chiaro: "<text:span text:style-name="T10">È cosa egregia imparare a morire.</text:span>" Forse ritieni superfluo imparare una cosa di cui dobbiamo servirci una volta sola. Proprio per questo motivo si deve pensare alla morte: bisogna sempre <text:soft-page-break/>imparare ciò che non possiamo esser certi di conoscere bene. "<text:span text:style-name="T10">Pensa alla morte</text:span>": chi dice queste parole ci esorta a riflettere sulla libertà. Chi ha imparato a morire, ha disimparato a essere schiavo: è superiore a ogni umana potenza o, almeno, ne è al di fuori. Che gli importa del carcere, delle guardie, delle catene? Ha sempre la porta aperta. Una sola è la catena che ci vincola, l'amore per la vita: non dobbiamo soffocarlo, ma ridurlo, così che, se le circostanze lo richiedono, niente ci trattenga, né ci impedisca di essere pronti a compiere subito un passo che presto o tardi bisogna compiere. Stammi bene.</text:p>
      <text:h text:style-name="P2" text:outline-level="3"><text:bookmark-start text:name="__RefHeading___Toc30108_2330915828"/>Lettera 30<text:bookmark-end text:name="__RefHeading___Toc30108_2330915828"/></text:h>
      <text:p text:style-name="P6">Ho visto Aufidio Basso, gran brava persona, mal ridotto e in lotta con l'età. Ma questa ormai pesa a tal punto su di lui da non permettergli più di riaversi; la vecchiaia gli sta addosso con tutto il suo tremendo peso. Sai che ha sempre avuto un fisico debole e smunto; a lungo l'ha sostenuto, anzi, per meglio dire, rabberciato: improvvisamente ha ceduto.</text:p>
      <text:p text:style-name="P7">Quando una nave imbarca acqua, si tamponano ora l'una ora l'altra falla, ma se incomincia a cedere e ad aprirsi in più punti, non c'è rimedio per l'imbarcazione che si sfascia; allo stesso modo un fisico vecchio e debole si può tenere in piedi e puntellare fino a un certo punto.</text:p>
      <text:p text:style-name="P7"><text:soft-page-break/>Quando tutte le commessure si aprono, come in un edificio marcio, e mentre ne ripari una, se ne spacca un'altra, bisogna cercare il modo di venirne fuori.</text:p>
      <text:p text:style-name="P7">Tuttavia il nostro Basso ha uno spirito vivace: questo ti dà la filosofia: essere sereno di fronte alla morte, forte e addirittura lieto indipendentemente dalle condizioni fisiche, e non cedere anche se le forze non reggono più.</text:p>
      <text:p text:style-name="P7">Un pilota abile naviga pure se la velatura è a brandelli e, se ha perso le sartie, segue ugualmente la rotta con quel che resta della nave. Così fa il nostro Basso e guarda alla sua fine con quello spirito e quel volto che apparirebbero eccessivamente tranquilli persino per uno che guardasse la morte di un altro.</text:p>
      <text:p text:style-name="P7">È questa, Lucilio mio, una lezione importante, che va imparata e meditata a lungo: andarsene con animo sereno, quando si avvicina l'ora fatale. Altri generi di morte non escludono una speranza di salvezza: una malattia può finire, un incendio si può spegnere, a volte un crollo ha lasciato incolumi persone che pareva dovesse schiacciare; il mare ha gettato sulla riva sani e salvi i naufraghi con la stessa violenza con cui li aveva inghiottiti; il soldato ha ritirato la spada proprio dal collo della vittima; ma se uno lo trascina a morte la vecchiaia, non ha nessuna speranza: solo a essa non ci si può opporre. Nessun tipo di morte è più dolce, ma neppure più lunga.</text:p>
      <text:p text:style-name="P7"><text:soft-page-break/>Mi sembrava quasi che il nostro Basso assistesse ai suoi funerali e alla sua sepoltura, e continuasse poi a vivere come fosse superstite a se stesso, sopportando con saggezza la propria perdita. Parla molto della morte e si dà da fare per persuaderci che, se questa faccenda è spiacevole e terribile, la colpa è di chi muore, non della morte; in essa non c'è dolore, come non ce n'è dopo.</text:p>
      <text:p text:style-name="P7">Se uno teme disgrazie che poi non subirà, è pazzo quanto chi teme una cosa che non potrà avvertire. Oppure qualcuno crede che sentirà la morte, quando, invece, per merito suo non sentiremo più niente? "Quindi," egli conclude, "la morte è così al di fuori da ogni male da essere al di fuori anche da ogni paura di mali."</text:p>
      <text:p text:style-name="P6">Questi concetti li hanno ripetuti spesso e spesso devono essere ripetuti, lo so bene; ma io non ne ho tratto mai tanto giovamento a leggerli o ad ascoltarli da persone che sostenevano che non si deve temere la morte, e ne erano lontane: Basso, invece, parla della fine ormai vicina e le sue parole sono per me autorevolissime.</text:p>
      <text:p text:style-name="P6">Ti dirò come la penso: se uno si trova in punto di morte ha, secondo me, più coraggio di chi è prossimo alla morte. La morte imminente, infatti, ha dato anche a uomini ignoranti la forza di affrontare l'inevitabile; così il gladiatore, pieno di paura per tutto il combattimento, offre la gola all'avversario e dirige contro di sé la spada <text:soft-page-break/>esitante. Ma quando la morte è vicina e destinata ad arrivare in ogni caso, richiede una fermezza d'animo tenace che è piuttosto rara e la può dimostrare solo il saggio.</text:p>
      <text:p text:style-name="P6">Perciò ascoltavo molto volentieri Basso, come se egli esprimesse un giudizio sulla morte e ne indicasse la vera natura, quasi l'avesse osservata più da vicino. Tu crederesti di più, io penso, e attribuiresti maggior peso a uno che resuscitasse e ti dicesse per sua esperienza che nella morte non c'è nessun male: il turbamento che porta l'avvicinarsi della morte, potrebbero spiegartelo benissimo quelli che le sono stati vicini, l'hanno vista arrivare e l'hanno accolta.</text:p>
      <text:p text:style-name="P7">Tra costoro metti Basso che ci ha voluto liberare dall'errore. Temere la morte, dice, è da stupidi come temere la vecchiaia; la vecchiaia segue l'adolescenza, e la morte la vecchiaia. Se uno non vuole morire, non vuole vivere: la vita ci è stata data con la condizione della morte; noi avanziamo verso di essa. Perciò è da pazzi temerla: solo gli eventi dubbi si temono, quelli certi si aspettano.</text:p>
      <text:p text:style-name="P7">La morte è una necessità uguale per tutti e invincibile: e nessuno può lamentarsi di essere in una situazione comune a tutti. Condizione prima della giustizia è l'uguaglianza. Ma ora è superfluo difendere la natura che ha voluto per noi una legge analoga alla sua: essa <text:soft-page-break/>distrugge tutto ciò che ha formato e riforma quanto ha distrutto. Se a uno è capitato che la vecchiaia lo allontani lentamente dalla vita, senza strapparlo all'improvviso, ma sottraendovelo a poco a poco, non deve ringraziare tutti gli dèi? Ormai sazio viene condotto a quel riposo necessario all'uomo e gradito a chi è stanco. Tu lo vedi: certi desiderano la morte e con più intensità di quanto solitamente si chiede la vita. Non so se ci infonde più coraggio chi implora la morte o chi l'aspetta lieto e sereno: quel desiderio nasce talvolta da furore o da sdegno improvviso, mentre questa tranquillità deriva da una valutazione ponderata. Qualcuno va incontro alla morte pieno d'ira: solo chi vi si è preparato a lungo, ne accoglie lieto l'arrivo.</text:p>
      <text:p text:style-name="P7">Confesso di essere andato piuttosto di frequente da quest'uomo, a me caro per moltissimi motivi, per vedere se lo avrei trovato ogni volta nella stessa disposizione di spirito, o se insieme alla forza fisica diminuisse il suo vigore spirituale; ma questo cresceva in lui come l'esultanza degli aurighi diventa più evidente quando, al settimo giro, si avvicinano alla vittoria.</text:p>
      <text:p text:style-name="P7">Egli, seguendo gli insegnamenti di Epicuro, diceva di sperare prima di tutto che non ci fosse nessuna sofferenza in quell'anelito supremo; e se poi c'era, il fatto stesso che fosse di breve durata rappresentava già un grande sollievo: nessun dolore intenso dura a lungo. Ma <text:soft-page-break/>anche al momento del distacco dell'anima dal corpo, nel caso fosse doloroso, lo avrebbe aiutato il pensiero che dopo quella sofferenza non avrebbe più potuto soffrire. Non dubitava, poi, che la sua anima senile fosse a fior di labbra e che si sarebbe staccata dal corpo senza grande violenza. "<text:span text:style-name="T10">Il fuoco, quando si propaga a materiali infiammabili, bisogna spegnerlo con l'acqua, e a volte demolendo tutto; se gli manca alimento si estingue da solo.</text:span>"</text:p>
      <text:p text:style-name="P6">Mio caro, queste parole le ascolto volentieri, non perché mi siano nuove, ma perché mi mettono di fronte alla realtà. E dunque? Non ho visto molti togliersi la vita? Sì , li ho visti, ma per me ha più valore chi arriva alla morte senza odiare la vita, e la accoglie, senza tirarsela addosso. Basso sosteneva poi che quel tormento noi lo sentiamo per colpa nostra, perché ci lasciamo prendere dal panico quando crediamo che la morte ci sia vicina: ma la morte è vicina a ognuno, pronta a ghermirci in ogni luogo e in ogni momento. "<text:span text:style-name="T10">Quando ci sembra che si avvicini un pericolo di morte," </text:span><text:span text:style-name="T5">diceva</text:span><text:span text:style-name="T10">, "consideriamo quanto ci sono più vicini altri pericoli di cui non abbiamo paura</text:span>."</text:p>
      <text:p text:style-name="P6">Un tale era minacciato di morte da un suo nemico e invece è morto prima di indigestione. Se vorremo analizzare le cause dei nostri timori, ne troveremo alcune reali, altre apparenti. Noi non temiamo la morte, temiamo il pensiero della morte; dalla morte siamo sempre ugualmente lontani. Così se va temuta, va <text:soft-page-break/>temuta sempre: non c'è momento della vita che ne sia privo.</text:p>
      <text:p text:style-name="P7">Ma temo che lettere tanto lunghe tu finisca per odiarle più della morte. Perciò concludo: tu, però alla morte pensaci sempre per non temerla mai. Stammi bene.</text:p>
      <text:h text:style-name="P2" text:outline-level="3"><text:bookmark-start text:name="__RefHeading___Toc18162_3602757520"/>Lettera 70<text:bookmark-end text:name="__RefHeading___Toc18162_3602757520"/></text:h>
      <text:p text:style-name="P6">Ho rivisto la tua Pompei dopo molto tempo. Mi ha riportato indietro alla mia giovinezza; mi sembrava di poter ripetere tutte le mie giovanili imprese compiute là, e che fossero recenti.</text:p>
      <text:p text:style-name="P7">Navigando, Lucilio, ci siamo lasciati alle spalle la vita e come in mare si allontanano paesi e città, scrive il nostro Virgilio<text:note text:id="ftn0" text:note-class="footnote"><text:note-citation>1</text:note-citation><text:note-body><text:p text:style-name="P21"><text:s/>Seneca, nella sua <text:span text:style-name="T9">Lettera 70 a Lucilio</text:span>, fa riferimento al più celebre dei poeti latini: <text:span text:style-name="T15">Publio Virgilio Marone</text:span>, l'autore dell' <text:span text:style-name="T9">Eneide</text:span>.Nello specifico, Seneca sta citando (quasi letteralmente) un verso del terzo libro dell'<text:span text:style-name="T15">Eneide</text:span> (III, 72):</text:p><text:p text:style-name="P3"><text:span text:style-name="T9">"...provehimur portu terraeque urbesque recedunt"</text:span> </text:p><text:p text:style-name="P3">(ci allontaniamo dal porto e terre e città recedono)</text:p><text:p text:style-name="P22"><text:span text:style-name="T19">Seneca utilizza questa immagine poetica di Virgilio — che descrive la sensazione fisica di chi naviga e vede la terraferma allontanarsi come potente</text:span><text:span text:style-name="T20">m</text:span><text:span text:style-name="T19">etafora filosofica per descrivere lo scorrere inesorabile del tempo. Come il marinaio vede sparire la costa, così l'uomo vede dileguarsi le diverse fasi della vita (infanzia, giovinezza, maturità) mentre corre verso la "fine comune".</text:span></text:p><text:p text:style-name="P20">In molte altre opere, Seneca cita Virgilio chiamandolo spesso "il nostro Virgilio" (<text:span text:style-name="T9">Virgilius noster</text:span>), a testimonianza della profonda ammirazione e della familiarità che la cultura stoica dell'epoca aveva con l'opera del poeta mantovano.</text:p><text:p text:style-name="Footnote"/></text:note-body></text:note>, così in questa corsa rapidissima del tempo ci siamo lasciati dietro prima la fanciullezza, poi l'adolescenza, poi tra giovinezza e vecchiaia quell'età che confina con entrambe, poi gli anni migliori della <text:soft-page-break/>vecchiaia; ora in ultimo comincia a mostrarsi quella che è la fine comune di tutti gli uomini.</text:p>
      <text:p text:style-name="P7">A noi, nella nostra immensa stupidità, appare come uno scoglio: e invece, è un porto: non lo si deve mai evitare, anzi talvolta bisogna cercarlo, e se uno ci arriva nei primi anni della vita, non se ne lamenti, come non si lamenta chi ha portato a termine con rapidità la sua traversata per mare. Uno, lo sai, è trattenuto da venti deboli che si prendono gioco di lui e lo stancano con una bonaccia tenace ed esasperante; un altro, invece, un soffio costante lo trasporta a gran velocità. Pensa che per noi è lo stesso: alcuni la vita li porta molto rapidamente a quella meta, che, anche temporeggiando, dovevano raggiungere, altri li snerva e li fiacca. Non sempre, lo sai, la vita va conservata: il bene non consiste nel vivere, ma nel vivere bene. Perciò il saggio vivrà non quanto può ma quanto deve, <text:span text:style-name="T13">e</text:span> considererà dove vivere, con chi, in che modo, e quale attività svolgere. Egli bada sempre alla qualità, non alla lunghezza della vita. Se le avversità che gli si presentano sono tante e turbano la sua serenità, si libera e non aspetta di trovarsi alle strette: non appena comincia a sospettare della sorte, considera seriamente se non sia il momento di farla finita.</text:p>
      <text:p text:style-name="P7">Non ritiene importante cercare la morte o accoglierla, morire prima o poi: non teme la morte come un grave danno: uno stillicidio non causa a nessuno grandi <text:soft-page-break/>perdite. Non importa morire presto o tardi, ma morire bene o male; morire bene significa sfuggire al pericolo di vivere male. Giudico, perciò vilissime le parole di quel famoso rodiese, che, gettato dal re in una gabbia e nutrito come una fiera, rispose a uno che gli consigliava di non toccare cibo: "<text:span text:style-name="T10">Finché c'è vita, c'è speranza</text:span>". Se anche fosse vero, non ci si deve comprare la vita a qualunque prezzo. Ammettiamo pure che si offrano beni cospicui e sicuri, io non vorrei ottenerli con una vergognosa professione di viltà: dovrei pensare che la fortuna ha pieni poteri su chi è in vita e non che è impotente contro chi sa morire?</text:p>
      <text:p text:style-name="P7">A volte, tuttavia, il saggio, anche se lo minaccia una morte sicura e sa di essere destinato alla pena capitale, non presterà la mano al suo supplizio: farebbe un piacere a se stesso. Morire per paura della morte è da insensati: il boia viene, aspettalo. Perché vuoi precederlo? Perché ti fai carico della crudeltà altrui? Invidi il tuo carnefice, oppure ne hai compassione?</text:p>
      <text:p text:style-name="P7">Socrate avrebbe potuto mettere fine alla sua vita col digiuno e morire di fame invece che di veleno; eppure stette in carcere trenta giorni aspettando la morte: non pensava che ogni esito era possibile e che un periodo di tempo tanto lungo consentiva molte speranze; voleva mostrarsi obbediente alle leggi e offrire agli amici la possibilità di trarre profitto dai suoi ultimi giorni.</text:p>
      <text:p text:style-name="P7"><text:soft-page-break/>Disprezzare la morte, ma temere il veleno non sarebbe stato l'atteggiamento più insensato? Scribonia, donna austera, era zia materna di Druso Libone, un giovane nobile, ma scriteriato, che nutriva speranze irrealizzabili per chiunque in quell'epoca o per lui stesso in ogni altra. Egli, malato, venne ricondotto dal senato in lettiga; non lo accompagnavano in molti: tutti i congiunti lo avevano piantato in asso senza nessuna compassione: ormai era più un cadavere che un imputato. Cominciò a riflettere se dovesse darsi la morte o aspettarla.</text:p>
      <text:p text:style-name="P7">Gli disse Scribonia: "<text:span text:style-name="T10">Che gioia ti dà sbrigare una faccenda che tocca ad altri?</text:span>" Non lo persuase: egli si suicidò e a ragione. Se uno è destinato a morire entro tre o quattro giorni ad arbitrio del suo nemico, se vive, sbriga proprio una faccenda d'altri.</text:p>
      <text:p text:style-name="P7">Quando una forza esterna minaccia la morte, si deve aspettare o prevenirla? Non si può stabilire una regola generale; molte sono le circostanze che possono fare propendere per l'una o per l'altra decisione. Se l'alternativa è una morte fra atroci sofferenze oppure una morte naturale e facile, perché non approfittare di quest'ultima? Come scelgo la nave, se devo andare per mare, e la casa in cui vivere, così sceglierò la morte quando dovrò lasciare questa vita. E poi, una vita più lunga non è necessariamente migliore, ma una morte attesa più a lungo è senz'altro peggiore. In nessuna cosa <text:soft-page-break/>più che nella morte siamo tenuti ad obbedire alla volontà dell'anima. Esca per quella strada che ha preso di slancio: sia che cerchi una spada o un cappio o un veleno che scorre nelle vene, avanzi decisa e spezzi le catene della sua schiavitù.</text:p>
      <text:p text:style-name="P7">La vita ognuno di noi deve renderla accettabile anche agli altri, la morte solo a se stesso: quella che riesce gradita è la migliore. È insensato pensare: "<text:span text:style-name="T10">Qualcuno dirà che ho agito da vigliacco, qualcuno con troppa sconsideratezza, qualcun altro che c'era un genere di morte più eroico.</text:span>" Vuoi convincerti che si tratta di una decisione in cui non bisogna tenere conto dell'opinione altrui! Bada a una sola cosa: a sottrarti nel modo più rapido al capriccio della sorte; del resto ci sarà sempre qualcuno pronto a criticare il tuo gesto.</text:p>
      <text:p text:style-name="P7">Troverai anche uomini che hanno fatto professione di saggezza e sostengono che non si debba fare violenza a se stessi; per loro il suicidio è un delitto: bisogna aspettare il termine fissato dalla natura. Non si accorgono che in questo modo si precludono la via della libertà? <text:span text:style-name="T14">Averci dato un solo ingresso alla vita, ma diverse vie di uscita è quanto di meglio abbia stabilito la legge divina. Dovrei aspettare la crudeltà di una malattia o di un uomo, quando posso invece sottrarmi ai tormenti e stroncare le avversità? Ecco l'unico motivo per cui non possiamo lamentarci della vita: non trattiene nessuno.</text:span></text:p>
      <text:p text:style-name="P7"><text:soft-page-break/>La condizione dell'uomo poggia su buone basi: nessuno è infelice se non per sua colpa. Ti piace vivere? Vivi; se no, puoi tornare da dove sei venuto. Contro il mal di testa sei spesso ricorso a un salasso; si apre una vena per diminuire la pressione del sangue. Non è necessario squarciarsi il petto con una vasta ferita: è sufficiente un bisturi ad aprire la via a quella famosa grande libertà: la serenità dipende da un forellino. Cos'è, allora, che ci rende indolenti e inetti? Prima o poi dovremo lasciare questa dimora, ma nessuno di noi lo pensa. Ci comportiamo come inquilini di vecchia data che l'abitudine e l'attaccamento al posto trattiene anche in mezzo ai disagi. Vuoi essere indipendente dal corpo? Abitalo come se stessi per trasferirti. Tienilo presente: questa convivenza verrà a mancare, prima o poi: sarai più forte di fronte alla necessità di andartene. Ma se uno non ha limiti in tutti i suoi desideri, come potrà venirgli in mente il pensiero della propria fine? Non c'è cosa su cui si debba meditare come sulla morte; per altre evenienze ci si esercita forse inutilmente.</text:p>
      <text:p text:style-name="P7">Lo spirito si è preparato alla povertà: e invece, siamo rimasti ricchi. Ci siamo armati per disprezzare il dolore: e invece, il nostro corpo si è mantenuto fortunatamente integro e sano e non ha mai richiesto che mettessimo alla prova questa virtù. Ci siamo preparati a sopportare da forti il rimpianto di cari perduti; e invece, il destino ha tenuto in vita tutti quelli che amavamo.</text:p>
      <text:p text:style-name="P7"><text:soft-page-break/>La meditazione della morte è l'unica che un giorno dovrà essere messa in pratica. Non pensare che solo i grandi uomini abbiano avuto la forza di spezzare le catene della schiavitù umana; Catone strappò con le sue mani l'anima che non era riuscito a gittar fuori con la spada; non credere che possa farlo lui solo: uomini di infima condizione sociale si sono messi in salvo con straordinario impeto e, non potendo morire a loro agio e nemmeno scegliere il mezzo che volevano per darsi la morte, hanno afferrato quello che capitava sotto mano e con la loro violenza hanno tramutato in armi oggetti di per sé innocui. Non molto tempo fa, durante i combattimenti tra gladiatori e bestie feroci, uno dei Germani, mentre si preparava per gli spettacoli del mattino, si appartò per evacuare gli intestini. Era l'unico momento in cui gli fosse concesso stare solo senza essere sorvegliato: lì c'era un bastone con attaccata una spugna per pulire gli escrementi: se lo cacciò in gola e morì soffocato. Uno sfregio alla morte. Proprio così , in maniera immonda e indecente: fare gli schizzinosi davanti alla morte è la cosa più stupida. Che uomo forte, degno di poter scegliere il proprio destino! Con quanta fermezza avrebbe usato la spada, con quanto coraggio si sarebbe gettato negli abissi del mare o in un burrone. Era privo di ogni mezzo, eppure trovò il modo e l'arma per uccidersi; la mancanza di volontà è il solo ostacolo alla morte: egli ce lo dimostra.</text:p>
      <text:p text:style-name="P7"><text:soft-page-break/>Ognuno giudichi come crede l'azione di quest'uomo indomito, ma sia chiaro: alla schiavitù più pulita è preferibile la morte più sozza.</text:p>
      <text:p text:style-name="P7">Visto che ho cominciato con esempi sordidi, continuerò così : esigeremo di più da noi stessi, vedendo che la morte può essere disprezzata anche dagli uomini più disprezzati. Catone, Scipione e altri, i cui nomi sono abitualmente oggetto di ammirazione, li giudichiamo inimitabili: ma io ti dimostrerò che esempi di questa virtù tra i gladiatori ce ne sono quanti tra i capi della guerra civile.</text:p>
      <text:p text:style-name="P7">Una mattina, poco tempo fa, un gladiatore mentre veniva trasportato sotto scorta allo spettacolo, come se gli ciondolasse la testa per il sonno, la piegò fino a infilarla tra i raggi di una ruota e rimase fermo al suo posto finché questa girando non gli spezzò l'osso del collo; con lo stesso mezzo che lo portava al supplizio vi si sottrasse. Se uno vuole spezzare le catene e fuggire, non ci sono ostacoli: la natura ci custodisce in un carcere aperto. Quando le circostanze lo permettono, si cerchi una via di uscita agevole; se poi uno ha a portata di mano più possibilità di affrancarsi, faccia la sua scelta e consideri il modo migliore di liberarsi. Mancano le occasioni? Allora afferri la prima che gli capita come se fosse la migliore, anche se è strana e insolita. A chi non <text:soft-page-break/>manca il coraggio non mancherà una strada ingegnosa verso la morte.</text:p>
      <text:p text:style-name="P7">Non vedi che anche gli schiavi più umili, quando li pungola la sofferenza, prendono coraggio ed eludono anche la più stretta sorveglianza? L'uomo che non solo decide di morire, ma trova anche il modo di farlo, è grande. Ti ho promesso più esempi dello stesso genere. Durante il secondo spettacolo di naumachia un barbaro si cacciò in gola tutta quanta la lancia che impugnava per combattere gli avversari. "<text:span text:style-name="T10">Ma perché, perché?</text:span>" disse, "<text:span text:style-name="T10">non sfuggo subito a ogni tormento, a ogni umiliazione? Ho in mano un'arma, perché aspetto la morte?</text:span>" Questo spettacolo fu tanto più bello quanto è più onorevole che gli uomini imparino a morire e non a uccidere.</text:p>
      <text:p text:style-name="P7"><text:span text:style-name="T7">E allora? Persino degli sciagurati, dei delinquenti hanno questo coraggio: e non lo avrà chi a questa evenienza è preparato da una lunga meditazione e dalla ragione, maestra di vita? Essa ci insegna che gli accessi alla morte sono numerosi, ma il punto di arrivo è lo stesso; non importa da dove cominci una cosa che arriva senz'altro. La ragione stessa invita a morire, se è consentito, come ci piace, altrimenti come possiamo, e ad afferrare qualunque cosa c</text:span><text:span text:style-name="T8">a</text:span><text:span text:style-name="T7">piti per darci la morte. È vergognoso vivere di rapina, morire di rapina, invece, è bellissimo. Stammi b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28T12:15:49.732215939</dc:date>
    <dc:creator>corrado tafaro</dc:creator>
    <meta:editing-duration>PT29M1S</meta:editing-duration>
    <meta:editing-cycles>2</meta:editing-cycles>
    <meta:generator>LibreOffice/24.2.7.2$Linux_X86_64 LibreOffice_project/420$Build-2</meta:generator>
    <meta:document-statistic meta:table-count="0" meta:image-count="0" meta:object-count="0" meta:page-count="21" meta:paragraph-count="64" meta:word-count="4980" meta:character-count="29072" meta:non-whitespace-character-count="24152"/>
  </office:meta>
</office:document-meta>
</file>