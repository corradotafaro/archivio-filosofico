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40000018C0D1A1D0C.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aption">
      <style:paragraph-properties fo:text-align="center" style:justify-single-word="false"/>
      <style:text-properties style:font-name="Liberation Serif" fo:font-size="10.5pt" style:font-size-asian="10.5pt" style:font-size-complex="10.5pt"/>
    </style:style>
    <style:style style:name="P2" style:family="paragraph" style:parent-style-name="Standard">
      <style:text-properties style:font-name="Liberation Serif" fo:font-size="14pt" officeooo:rsid="000e1b97" officeooo:paragraph-rsid="000e1b97" style:font-size-asian="14pt" style:font-size-complex="14pt"/>
    </style:style>
    <style:style style:name="P3" style:family="paragraph" style:parent-style-name="Standard">
      <style:paragraph-properties fo:line-height="115%" fo:text-align="justify" style:justify-single-word="false"/>
      <style:text-properties style:font-name="Liberation Serif" fo:font-size="14pt" officeooo:rsid="000e1b97" officeooo:paragraph-rsid="000e1b97" style:font-size-asian="14pt" style:font-size-complex="14pt"/>
    </style:style>
    <style:style style:name="P4"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e1b97" officeooo:paragraph-rsid="000e1b97" style:font-size-asian="14pt" style:font-size-complex="14pt"/>
    </style:style>
    <style:style style:name="P5"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0e1b97" officeooo:paragraph-rsid="000e1b97" style:font-size-asian="14pt" style:font-size-complex="14pt"/>
    </style:style>
    <style:style style:name="P6" style:family="paragraph" style:parent-style-name="Standard">
      <style:paragraph-properties fo:margin-top="0.101cm" fo:margin-bottom="0cm" style:contextual-spacing="false" fo:text-align="justify" style:justify-single-word="false"/>
      <style:text-properties style:font-name="Liberation Serif" fo:font-size="14pt" style:font-size-asian="14pt" style:font-size-complex="14pt"/>
    </style:style>
    <style:style style:name="P7" style:family="paragraph" style:parent-style-name="Standard">
      <style:paragraph-properties fo:margin-top="0.199cm" fo:margin-bottom="0cm" style:contextual-spacing="false" fo:text-align="justify" style:justify-single-word="false"/>
      <style:text-properties style:font-name="Liberation Serif" fo:font-size="14pt" style:font-size-asian="14pt" style:font-size-complex="14pt"/>
    </style:style>
    <style:style style:name="P8"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0e1b97" style:font-size-asian="14pt" style:font-size-complex="14pt"/>
    </style:style>
    <style:style style:name="P9" style:family="paragraph" style:parent-style-name="Standard">
      <style:paragraph-properties fo:margin-top="0.101cm" fo:margin-bottom="0cm" style:contextual-spacing="false" fo:line-height="115%" fo:text-align="justify" style:justify-single-word="false"/>
      <style:text-properties style:font-name="Liberation Serif" fo:font-size="14pt" style:font-size-asian="14pt" style:font-size-complex="14pt"/>
    </style:style>
    <style:style style:name="P10" style:family="paragraph" style:parent-style-name="Standard">
      <style:paragraph-properties fo:margin-top="0cm" fo:margin-bottom="0cm" style:contextual-spacing="false" fo:text-align="justify" style:justify-single-word="false"/>
      <style:text-properties style:font-name="Liberation Sans" fo:font-size="14pt" officeooo:rsid="000e1b97" officeooo:paragraph-rsid="000e1b97" style:font-size-asian="14pt" style:font-size-complex="14pt"/>
    </style:style>
    <style:style style:name="P11" style:family="paragraph" style:parent-style-name="Standard">
      <style:paragraph-properties fo:margin-top="0.101cm" fo:margin-bottom="0cm" style:contextual-spacing="false" fo:line-height="115%" fo:text-align="justify" style:justify-single-word="false"/>
      <style:text-properties style:font-name="Liberation Sans" fo:font-size="14pt" officeooo:rsid="000e1b97" officeooo:paragraph-rsid="000e1b97" style:font-size-asian="14pt" style:font-size-complex="14pt"/>
    </style:style>
    <style:style style:name="P12" style:family="paragraph" style:parent-style-name="Standard">
      <style:text-properties style:font-name="Liberation Sans" fo:font-size="14pt" style:font-size-asian="14pt" style:font-size-complex="14pt"/>
    </style:style>
    <style:style style:name="P13" style:family="paragraph" style:parent-style-name="Standard" style:list-style-name="L1">
      <style:paragraph-properties fo:margin-top="0.101cm" fo:margin-bottom="0cm" style:contextual-spacing="false" fo:line-height="115%" fo:text-align="justify" style:justify-single-word="false"/>
      <style:text-properties style:font-name="Liberation Serif" fo:font-size="14pt" officeooo:paragraph-rsid="000e1b97" style:font-size-asian="14pt" style:font-size-complex="14pt"/>
    </style:style>
    <style:style style:name="P14" style:family="paragraph" style:parent-style-name="Standard" style:list-style-name="L2">
      <style:text-properties style:font-name="Liberation Serif" fo:font-size="14pt" style:font-size-asian="14pt" style:font-size-complex="14pt"/>
    </style:style>
    <style:style style:name="P15" style:family="paragraph" style:parent-style-name="Standard" style:list-style-name="L3">
      <style:paragraph-properties fo:margin-top="0.101cm" fo:margin-bottom="0cm" style:contextual-spacing="false" fo:text-align="justify" style:justify-single-word="false"/>
      <style:text-properties style:font-name="Liberation Serif" fo:font-size="14pt" style:font-size-asian="14pt" style:font-size-complex="14pt"/>
    </style:style>
    <style:style style:name="P16" style:family="paragraph" style:parent-style-name="Standard" style:list-style-name="L4">
      <style:paragraph-properties fo:margin-top="0.101cm" fo:margin-bottom="0cm" style:contextual-spacing="false" fo:text-align="justify" style:justify-single-word="false"/>
      <style:text-properties style:font-name="Liberation Serif" fo:font-size="14pt" style:font-size-asian="14pt" style:font-size-complex="14pt"/>
    </style:style>
    <style:style style:name="P17" style:family="paragraph" style:parent-style-name="Standard">
      <style:paragraph-properties fo:margin-top="0.3cm" fo:margin-bottom="0cm" style:contextual-spacing="false" fo:text-align="justify" style:justify-single-word="false"/>
      <style:text-properties style:font-name="Liberation Serif" fo:font-size="16pt" style:font-size-asian="16pt" style:font-size-complex="16pt"/>
    </style:style>
    <style:style style:name="P18" style:family="paragraph" style:parent-style-name="Standard">
      <style:paragraph-properties fo:margin-top="0.199cm" fo:margin-bottom="0cm" style:contextual-spacing="false" fo:text-align="justify" style:justify-single-word="false"/>
      <style:text-properties fo:font-size="14pt" officeooo:paragraph-rsid="0010c308" style:font-size-asian="14pt" style:font-size-complex="14pt"/>
    </style:style>
    <style:style style:name="P19" style:family="paragraph" style:parent-style-name="Standard">
      <style:paragraph-properties fo:text-align="justify" style:justify-single-word="false"/>
      <style:text-properties fo:font-size="14pt" officeooo:paragraph-rsid="0010c308" style:font-size-asian="14pt" style:font-size-complex="14pt"/>
    </style:style>
    <style:style style:name="P20" style:family="paragraph" style:parent-style-name="Standard">
      <style:paragraph-properties fo:margin-top="0.101cm" fo:margin-bottom="0cm" style:contextual-spacing="false" fo:text-align="justify" style:justify-single-word="false"/>
      <style:text-properties fo:font-size="14pt" officeooo:paragraph-rsid="0010c308" style:font-size-asian="14pt" style:font-size-complex="14pt"/>
    </style:style>
    <style:style style:name="P21" style:family="paragraph" style:parent-style-name="Standard">
      <style:text-properties fo:font-size="14pt" officeooo:paragraph-rsid="0010c308" style:font-size-asian="14pt" style:font-size-complex="14pt"/>
    </style:style>
    <style:style style:name="P22" style:family="paragraph" style:parent-style-name="Standard">
      <style:paragraph-properties fo:margin-top="0.199cm" fo:margin-bottom="0cm" style:contextual-spacing="false" fo:text-align="justify" style:justify-single-word="false"/>
      <style:text-properties officeooo:paragraph-rsid="0010c308"/>
    </style:style>
    <style:style style:name="P23" style:family="paragraph" style:parent-style-name="Standard">
      <style:paragraph-properties fo:margin-top="0.101cm" fo:margin-bottom="0cm" style:contextual-spacing="false" fo:text-align="justify" style:justify-single-word="false"/>
      <style:text-properties officeooo:paragraph-rsid="0010c308"/>
    </style:style>
    <style:style style:name="P24" style:family="paragraph" style:parent-style-name="Standard">
      <style:paragraph-properties fo:text-align="justify" style:justify-single-word="false"/>
      <style:text-properties officeooo:paragraph-rsid="0010c308"/>
    </style:style>
    <style:style style:name="P25" style:family="paragraph" style:parent-style-name="Standard">
      <style:paragraph-properties fo:text-align="justify" style:justify-single-word="false"/>
      <style:text-properties fo:font-size="16pt" officeooo:paragraph-rsid="0010c308" style:font-size-asian="16pt" style:font-size-complex="16pt"/>
    </style:style>
    <style:style style:name="P26" style:family="paragraph" style:parent-style-name="Standard">
      <style:text-properties fo:font-size="16pt" officeooo:paragraph-rsid="0010c308" style:font-size-asian="16pt" style:font-size-complex="16pt"/>
    </style:style>
    <style:style style:name="P27" style:family="paragraph" style:parent-style-name="Standard">
      <style:text-properties officeooo:paragraph-rsid="0010c308"/>
    </style:style>
    <style:style style:name="T1" style:family="text">
      <style:text-properties fo:font-size="13pt" fo:font-weight="bold" style:font-size-asian="13pt" style:font-weight-asian="bold" style:font-size-complex="13pt" style:font-weight-complex="bold"/>
    </style:style>
    <style:style style:name="T2" style:family="text">
      <style:text-properties officeooo:rsid="000e437e"/>
    </style:style>
    <style:style style:name="T3" style:family="text">
      <style:text-properties officeooo:rsid="000f8139"/>
    </style:style>
    <style:style style:name="T4" style:family="text">
      <style:text-properties officeooo:rsid="000dada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 primi quattro concili ecumenici</text:p>
      <text:p text:style-name="P2"/>
      <text:p text:style-name="P3">La maggior parte delle questioni divine, furono sistemate nei concili ecumenici che si tennero a Nicea nel 325, a Costantinopoli nel 381, a Efeso nel 431 e a Calcedonia nel 451. </text:p>
      <text:p text:style-name="P4">Noti come i primi quattro concili ecumenici, costituiscono le fondamenta assolute della teologia cristiana, sia per i cattolici che per gli ortodossi e le principali confessioni protestanti.</text:p>
      <text:p text:style-name="P11"/>
      <text:p text:style-name="P10"><draw:frame draw:style-name="fr1" draw:name="Cornice1" text:anchor-type="char" svg:width="10.373cm" draw:z-index="0"><draw:text-box fo:min-height="6.223cm"><text:p text:style-name="P1"><draw:frame draw:style-name="fr2" draw:name="Immagine1" text:anchor-type="paragraph" svg:width="10.373cm" style:rel-width="100%" svg:height="6.223cm" style:rel-height="scale" draw:z-index="1"><draw:image xlink:href="Pictures/10000001000002A40000018C0D1A1D0C.gif" xlink:type="simple" xlink:show="embed" xlink:actuate="onLoad" draw:mime-type="image/gif"/></draw:frame>I luoghi dei primi quattro grandi concili ecumenici nell'Impero Romano d'Oriente.</text:p></draw:text-box></draw:frame></text:p>
      <text:p text:style-name="P5">In quel periodo il cristianesimo doveva definire con precisione la propria identità, rispondendo a una <text:soft-page-break/>domanda cruciale: Chi è esattamente Gesù rispetto a Dio Padre, e come coesistono in lui l'umanità e la divinità?</text:p>
      <text:list text:style-name="L1">
        <text:list-item>
          <text:p text:style-name="P13">1. Concilio di Nicea (325 d.C.) – La divinità di Gesù</text:p>
        </text:list-item>
      </text:list>
      <text:p text:style-name="P8"><text:span text:style-name="T1">Il problema</text:span>: Un sacerdote di Alessandria d'Egitto, di nome Ario, sosteneva che Gesù fosse una creatura straordinaria, la più perfetta di tutte, ma comunque creata da Dio Padre e quindi a lui inferiore. Questa dottrina (l'arianesimo) stava spaccando l'Impero.</text:p>
      <text:p text:style-name="P8"><text:span text:style-name="T1">Cosa fu deciso:</text:span> Il concilio condannò l'arianesimo e stabilì che il Figlio è "della stessa sostanza" (homooúsios) del Padre. Gesù non è stato creato, ma è Dio tanto quanto il Padre.</text:p>
      <text:p text:style-name="P8"><text:span text:style-name="T1">Cosa si tramanda oggi</text:span>: Nacque qui la prima parte del Credo (il Simbolo niceno), che si recita ancora oggi nella messa domenicale, inclusa la formula "generato, non creato, della stessa sostanza del Padre". Fu stabilito anche il metodo di calcolo per la data della Pasqua.</text:p>
      <text:p text:style-name="P12"/>
      <text:list text:style-name="L2">
        <text:list-item>
          <text:p text:style-name="P14">2. Concilio di Costantinopoli I (381 d.C.) – La Trinità è completa</text:p>
        </text:list-item>
      </text:list>
      <text:p text:style-name="P6"><text:span text:style-name="T1">Il problema</text:span>: Risolta (in parte) la questione su Gesù, sorse il dibattito sullo Spirito Santo. Alcuni teologi sostenevano che lo Spirito fosse una forza o un'entità inferiore al Padre e al F<text:span text:style-name="T2">iglio</text:span>.</text:p>
      <text:p text:style-name="P9"><text:soft-page-break/><text:span text:style-name="T1">Cosa fu deciso:</text:span> Il concilio affermò la piena divinità dello Spirito Santo, definendolo "Signore e dà la vita", procedendo dal Padre e adorato insieme al Padre e al Figlio. Viene così formulato definitivamente il dogma della Trinità: un solo Dio in tre Persone uguali e distinte.</text:p>
      <text:p text:style-name="P6"><text:span text:style-name="T1">Cosa si tramanda oggi:</text:span> Il testo del Credo venne ampliato e divenne il Credo Niceno-Costantinopolitano, la preghiera ufficiale che descrive lo Spirito Santo e la Chiesa ("Credo la Chiesa, una santa cattolica e apostolica...").</text:p>
      <text:p text:style-name="P6"/>
      <text:list text:style-name="L3">
        <text:list-item>
          <text:p text:style-name="P15">3. Concilio di Efeso (431 d.C.) – Maria, Madre di Dio</text:p>
        </text:list-item>
      </text:list>
      <text:p text:style-name="P6"><text:span text:style-name="T1">Il problema:</text:span> Nestorio, patriarca di Costantinopoli, sosteneva che in Gesù ci fossero due persone separate (quella umana e quella divina). Di conseguenza, affermava che Maria fosse madre solo dell'uomo Gesù, e rifiutava di chiamarla "Madre di Dio".</text:p>
      <text:p text:style-name="P6"><text:span text:style-name="T1">Cosa fu deciso</text:span>: Il concilio stabilì che in Gesù l'umanità e la divinità sono unite in un'unica persona. Pertanto, Maria può e deve essere chiamata Theotókos ("Madre di Dio"), perché ha dato alla luce Gesù che è pienamente Dio.</text:p>
      <text:p text:style-name="P6"><text:span text:style-name="T1">Cosa si tramanda oggi</text:span>: Il dogma di Maria Madre di Dio, pilastro del culto mariano. Inoltre, la seconda parte della preghiera dell'Ave Maria ("Santa Maria, Madre di Dio...") affonda le sue radici teologiche proprio nelle decisioni di questo concilio.</text:p>
      <text:p text:style-name="P6"><text:soft-page-break/></text:p>
      <text:list text:style-name="L4">
        <text:list-item>
          <text:p text:style-name="P16">4. Concilio di Calcedonia (451 d.C.) – Vero Dio e vero uomo</text:p>
        </text:list-item>
      </text:list>
      <text:p text:style-name="P6"><text:span text:style-name="T1">Il problema</text:span>: Per reazione a Nestorio, un monaco di nome Eutiche passò all'eccesso opposto (il monofisismo), dicendo che in Gesù la natura divina aveva completamente assorbito quella umana, come una goccia di vino nell'oceano. Gesù, in pratica, non sarebbe stato davvero umano.</text:p>
      <text:p text:style-name="P6"><text:span text:style-name="T1">Cosa fu deciso</text:span>: Il concilio trovò l'equilibrio definitivo con la celebre formula delle due nature: Gesù è perfetto nella sua divinità e perfetto nella sua umanità. Le due nature coesistono in una sola persona "senza confusione, senza mutamento, senza divisione, senza separazione".</text:p>
      <text:p text:style-name="P6"><text:span text:style-name="T1">Cosa si tramanda oggi:</text:span> È il cuore della cristologia moderna. Gesù è pienamente solidale con l'umanità (ha sofferto, pianto e provato fatica come noi) ma allo stesso tempo possiede la natura divina per salvare l'umanità.</text:p>
      <text:p text:style-name="P7">L'eredità storica: Questi quattro concili non solo hanno fissato le formule della fede (i dogmi), ma hanno anche stabilito che l'autorità suprema della Chiesa risiedesse nell'assemblea dei vescovi (il concilio) e non in un singolo patriarca, un principio che ancora oggi regola la vita delle diverse confessioni cristiane.</text:p>
      <text:p text:style-name="P17"><text:span text:style-name="T3">R</text:span>uolo e influenza degli imperatori romani, come Costantino e Teodosio, nella convocazione e nello svolgimento dei primi concili ecumenici.</text:p>
      <text:p text:style-name="P22"><text:soft-page-break/>Il ruolo degli imperatori romani nei primi concili ecumenici fu a dir poco monumentale. Senza la loro autorità, la loro logistica e, in molti casi, la loro pressione politica, la Chiesa non avrebbe mai potuto definire i propri dogmi nella forma che conosciamo oggi.</text:p>
      <text:p text:style-name="P23">Lungi dall'essere semplici spettatori o protettori distaccati, Costantino, Teodosio I e i loro successori (come Marciano e l'imperatrice Pulcheria) agirono come veri e propri "registi" di queste assemblee. Il loro obiettivo primario, tuttavia, non era strettamente teologico, ma politico: l'unità della Chiesa era vista come lo specchio e il garante dell'unità dell'Impero.</text:p>
      <text:p text:style-name="P24"/>
      <text:p text:style-name="P26">1. Il potere esclusivo di convocazione</text:p>
      <text:p text:style-name="P22">Nessun papa o patriarca dell'epoca aveva il potere di radunare centinaia di vescovi da ogni angolo del mondo conosciuto. Solo l'imperatore poteva farlo.</text:p>
      <text:p text:style-name="P23">Nicea (325): Fu convocato da Costantino I, che non era nemmeno battezzato (lo farà solo in punto di morte).</text:p>
      <text:p text:style-name="P23">Costantinopoli (381): Convocato da Teodosio I per consolidare l'ortodossia nicena e porre fine definitivo all'arianesimo.</text:p>
      <text:p text:style-name="P23">Efeso (431) e Calcedonia (451): Convocati rispettivamente da Teodosio II e da Marciano (spinto dalla determinata imperatrice Pulcheria).</text:p>
      <text:p text:style-name="P24">L'imperatore non si limitava a firmare il decreto di convocazione: metteva a disposizione dei vescovi il sistema della cursus publicus (la posta e i trasporti imperiali di stato), coprendo interamente le spese di <text:soft-page-break/>viaggio, vitto e alloggio a carico delle casse pubbliche. Un dispendio di risorse che solo il vertice dello Stato poteva permettersi.</text:p>
      <text:p text:style-name="P24"/>
      <text:p text:style-name="P26">2. La presidenza e la direzione dei lavori</text:p>
      <text:p text:style-name="P22">Gli imperatori, o i loro funzionari di altissimo livello, erano fisicamente presenti e sedevano al centro delle assemblee, spesso orientandone lo svolgimento.</text:p>
      <text:p text:style-name="P24"/>
      <text:p text:style-name="P27"><text:s text:c="13"/><text:tab/> <text:s/>IL TRONO IMPERIALE <text:s text:c="19"/></text:p>
      <text:p text:style-name="P27"><text:s text:c="10"/>(Costantino a Nicea / Marciano a Calcedonia) <text:s text:c="6"/></text:p>
      <text:p text:style-name="P27"/>
      <text:p text:style-name="P27">[Vescovi Ortodossi/Niceni] <text:s text:c="10"/>[Fazioni Dissidenti]</text:p>
      <text:p text:style-name="P27"><text:s text:c="29"/></text:p>
      <text:p text:style-name="P27"><text:s text:c="13"/>[IL CONSENSO / FORMULA FINALE]</text:p>
      <text:p text:style-name="P27"><text:s text:c="10"/>(Spesso mediato o imposto dall'Imperatore)</text:p>
      <text:p text:style-name="P27"/>
      <text:p text:style-name="P24">Costantino a Nicea: Aprì il concilio con un discorso solenne in latino, esortando i vescovi alla concordia. Sebbene il dibattito teologico fosse guidato da vescovi come Ossio di Cordova, fu Costantino stesso a suggerire (o caldeggiare fortemente) l'inserimento nel Credo del termine chiave homooúsios ("della stessa sostanza"), una parola che proveniva dal linguaggio filosofico e che ser­viva a tagliare definitivamente le gambe all'arianesimo.</text:p>
      <text:p text:style-name="P24">Marciano e Pulcheria a Calcedonia: La coppia imperiale partecipò di persona alla sesta sessione. Marciano affermò esplicitamente di aver voluto presiedere il concilio sul modello di Costantino, non per fare sfoggio <text:soft-page-break/>di potere, ma per confermare la fede e garantire che le decisioni fossero prese senza disordini.</text:p>
      <text:p text:style-name="P27"/>
      <text:p text:style-name="P26">3. La trasformazione del dogma in Legge di Stato</text:p>
      <text:p text:style-name="P22">Il passo politico più formidabile compiuto dagli imperatori fu l'istituzionalizzazione delle decisioni conciliari. Una volta che il concilio approvava un decreto di fede, l'imperatore lo firmava, trasformandolo in legge imperiale.</text:p>
      <text:p text:style-name="P23">L'Editto di Tessalonica (380): Prima ancora del Concilio di Costantinopoli, Teodosio I decretò che il cristianesimo niceno era l'unica religione ufficiale dell'impero. Chi non vi si adeguava non era solo un eretico, ma un criminale per lo Stato.</text:p>
      <text:p text:style-name="P23">La repressione del dissenso: Dopo Nicea, Costantino esiliò Ario e ordinò il rogo dei suoi scritti. Chiunque venisse sorpreso a nascondere un libro di Ario rischiava la pena di morte. Lo stesso accadde a Nestorio dopo Efeso. L'eresia divenne a tutti gli effetti un reato di lesa maestà.</text:p>
      <text:p text:style-name="P27"/>
      <text:p text:style-name="P26">L'ambiguità del ruolo: il "Cesaropapismo"</text:p>
      <text:p text:style-name="P22">Questo legame strettissimo portò alla nascita di una tendenza nota come “cesaropapismo”, in cui l'imperatore tendeva a comportarsi come un "vescovo esterno" o il capo supremo della Chiesa.</text:p>
      <text:p text:style-name="P23">Ciò non fu privo di storture: se l'imperatore di turno simpatizzava per un'eresia, l'intero Impero veniva scosso. <text:soft-page-break/>Ad esempio, i successori di Costantino (come il figlio Costanzo II) favorirono l'arianesimo, arrivando a perseguitare e mandare in esilio i vescovi ortodossi che avevano firmato Nicea.</text:p>
      <text:p text:style-name="P23">Senza l'abbraccio politico dell'Impero Romano, la Chiesa dei primi secoli non avrebbe avuto la forza strutturale per unificare la propria dottrina. I dogmi che si tramandano ancora oggi sono il frutto di una complessa e affascinante sinergia tra la ricerca teologica dei vescovi e la stringente necessità di stabilità geopolitica dei sovrani romani.</text:p>
      <text:p text:style-name="P27"/>
      <text:p text:style-name="P26">Come si manifestarono le prime tensioni e rivalità geopolitiche tra la sede di Roma (Occidente) e quella di Costantinopoli (Oriente) durante questi primi quattro concili?</text:p>
      <text:p text:style-name="P18">Durante i primi quattro concili ecumenici, i dibattiti teologici sulla natura di Cristo fecero da palcoscenico a una spietata lotta di potere geopolitica. Non si scontravano solo idee, ma vere e proprie sfere d'influenza all'interno dell'Impero Romano, con due protagonisti principali ai lati opposti del Mediterraneo: Roma, l'antica capitale legata alla tradizione e al primato dell'apostolo Pietro, e Costantinopoli, la "Nuova Roma", la sfolgorante capitale politica voluta da Costantino.</text:p>
      <text:p text:style-name="P20">Le tensioni tra queste due sedi si manifestarono principalmente attraverso tre dinamiche: la rivalità sui canoni d'onore, lo scontro linguistico-culturale e l'uso strumentale delle alleanze con le altre grandi sedi d'Oriente.</text:p>
      <text:p text:style-name="P19"><text:soft-page-break/></text:p>
      <text:p text:style-name="P25"><text:span text:style-name="T4">1</text:span>. La guerra dei Canoni: Chi viene prima?</text:p>
      <text:p text:style-name="P18">Il terreno di scontro più esplicito fu la definizione dei ranghi di importanza delle varie sedi episcopali (la cosiddetta “pentarchia”).</text:p>
      <text:p text:style-name="P20">Il Canone 3 di Costantinopoli (381 d.C.): Questo concilio, svoltosi interamente in Oriente senza la presenza del Papa di Roma (rappresentato solo da delegati), approvò un canone dirompente: «Il vescovo di Costantinopoli abbia il primato d'onore dopo il vescovo di Roma, perché tale città è la Nuova Roma».</text:p>
      <text:p text:style-name="P20">Per Costantinopoli era un balzo in avanti clamoroso, che scavalcava le antichissime sedi di Alessandria e Antiochia. Roma ricevette questo affronto con enorme freddezza: per il Papa, il primato non poteva derivare dall'importanza “politica” di una città (l'essere capitale dell'Impero), ma solo dalla successione apostolica (il fatto che a Roma avessero predicato e subito il martirio Pietro e Paolo).</text:p>
      <text:p text:style-name="P20">Il Canone 28 di Calcedonia (451 d.C.) – Lo strappo: Il concilio di Calcedonia andò persino oltre, decretando che Costantinopoli godeva di privilegi uguali a quelli della vecchia Roma, estendendo la sua giurisdizione su tutti i territori d'Oriente non ancora assegnati.</text:p>
      <text:p text:style-name="P19">I legati papali protestarono violentemente durante il concilio e Papa Leone I il Grande rifiutò categoricamente di approvare questo canone, cassandolo ufficialmente. Questo rifiuto creò una ferita istituzionale insanabile che rimarrà aperta per i secoli a venire.</text:p>
      <text:p text:style-name="P19"><text:soft-page-break/></text:p>
      <text:p text:style-name="P25">2. Il "Blocco di Potere" e la diplomazia ecclesiastica</text:p>
      <text:p text:style-name="P18">Il Mediterraneo era diviso in zone d'influenza. Per arginare l'ascesa geopolitica di Costantinopoli, Roma strinse spesso un'asse strategico con Alessandria d'Egitto, la sede più ricca e intellettualmente formidabile d'Oriente, che mal digeriva la sottomissione alla nuova capitale imperiale.</text:p>
      <text:p text:style-name="P19"/>
      <text:p text:style-name="P21"><text:s text:c="7"/>[ ASSE GEOPOLITICO OCCIDENTE-EGITTO ]</text:p>
      <text:p text:style-name="P21"><text:s text:c="19"/><text:tab/><text:tab/><text:tab/> (V sec. d.C.)</text:p>
      <text:p text:style-name="P21"/>
      <text:p text:style-name="P21"><text:s text:c="8"/>ROMA (Papa) <text:s/>&lt;=====&gt; <text:s/>ALESSANDRIA (Ciril.)</text:p>
      <text:p text:style-name="P21"><text:s text:c="12"/></text:p>
      <text:p text:style-name="P21"><text:s text:c="12"/>(Arginano l'ascesa e <text:s/>le dottrine teologiche) </text:p>
      <text:p text:style-name="P21"/>
      <text:p text:style-name="P21"><text:tab/><text:tab/> COSTANTINOPOLI (Patriarca) <text:s text:c="3"/></text:p>
      <text:p text:style-name="P21"><text:s text:c="8"/><text:tab/> <text:s text:c="21"/>"La Nuova Roma" <text:s text:c="5"/></text:p>
      <text:p text:style-name="P21"><text:s text:c="6"/></text:p>
      <text:p text:style-name="P19">Il caso di Efeso (431 d.C.): Quando Nestorio, patriarca di Costantinopoli, propose la sua dottrina (le due persone separate in Cristo), Cirillo d'Alessandria si mosse immediatamente per abbatterlo politicamente. Roma appoggiò in pieno Cirillo. Il concilio di Efeso si trasformò in una vera e propria imboscata geopolitica: Cirillo aprì i lavori prima ancora che arrivassero i vescovi della Siria (alleati di Nestorio), condannando il <text:soft-page-break/>patriarca della capitale e infliggendo un duro colpo al prestigio di Costantinopoli.</text:p>
      <text:p text:style-name="P21"/>
      <text:p text:style-name="P26">3. Incomprensioni linguistiche e culturali</text:p>
      <text:p text:style-name="P18">Dietro i conflitti geopolitici si nascondeva anche una profonda fessura culturale.</text:p>
      <text:p text:style-name="P19">L'Occidente parlava latino ed era dominato da una mentalità giuridica, pratica e sintetica. L'Oriente parlava greco, amava la speculazione filosofica astratta, le sfumature linguistiche e la precisione metafisica.</text:p>
      <text:p text:style-name="P20">Durante i concili, i latini faticavano a comprendere le sottili distinzioni greche tra termini come “ousía” (sostanza), “phýsis” (natura) e “hypóstasis” (persona). I greci, d'altro canto, guardavano spesso i latini dall'alto in basso, considerandoli teologicamente rozzi e privi di finezza speculativa.</text:p>
      <text:p text:style-name="P20">Quando Papa Leone I inviò a Calcedonia il suo celebre trattato teologico (il “Tomus ad Flavianum”), i vescovi orientali lo esaminarono parola per parola con diffidenza, accettandolo solo dopo essersi accertati che coincidesse con il pensiero del "loro" Cirillo d'Alessandria.</text:p>
      <text:p text:style-name="P20">L'eredità delle tensioni: la via verso il Grande ScismaQuesti primi quattro concili, pur unificando la fede dogmatica, tracciarono i confini geopolitici di quella frattura che sarebbe diventata definitiva secoli dopo.L'Occidente si stringeva sempre più attorno alla figura monarchica del Papa di Roma, indipendente dal potere politico (specie dopo il crollo dell'Impero d'Occidente nel 476). L'Oriente, invece, si strutturava <text:soft-page-break/>attorno al sistema dei patriarchi sottomessi all'Imperatore di Costantinopoli. I semi del Grande Scisma del 1054 — che separerà definitivamente cattolici e ortodossi — furono gettati proprio tra i banchi e i canoni di Costantinopoli e Calcedon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5-31T17:01:52.025190549</meta:creation-date>
    <dc:date>2026-06-10T19:57:23.292690805</dc:date>
    <dc:creator>corrado tafaro</dc:creator>
    <meta:editing-duration>PT3M55S</meta:editing-duration>
    <meta:editing-cycles>4</meta:editing-cycles>
    <meta:generator>LibreOffice/24.2.7.2$Linux_X86_64 LibreOffice_project/420$Build-2</meta:generator>
    <meta:document-statistic meta:table-count="0" meta:image-count="1" meta:object-count="0" meta:page-count="12" meta:paragraph-count="75" meta:word-count="2034" meta:character-count="13810" meta:non-whitespace-character-count="11613"/>
  </office:meta>
</office:document-meta>
</file>