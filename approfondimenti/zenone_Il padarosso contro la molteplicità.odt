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3cm" fo:margin-bottom="0cm" style:contextual-spacing="false" fo:line-height="115%" fo:text-align="justify" style:justify-single-word="false"/>
      <style:text-properties style:font-name="Noto Sans1" fo:font-size="12pt" fo:font-weight="bold" officeooo:paragraph-rsid="00138924" style:font-size-asian="12pt" style:font-weight-asian="bold" style:font-size-complex="12pt" style:font-weight-complex="bold"/>
    </style:style>
    <style:style style:name="P2" style:family="paragraph" style:parent-style-name="Standard">
      <style:paragraph-properties fo:margin-top="0.199cm" fo:margin-bottom="0cm" style:contextual-spacing="false" fo:line-height="115%" fo:text-align="justify" style:justify-single-word="false"/>
      <style:text-properties style:font-name="Noto Sans1" fo:font-size="12pt" officeooo:paragraph-rsid="00134096" style:font-size-asian="12pt" style:font-size-complex="12pt"/>
    </style:style>
    <style:style style:name="P3"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34096" style:font-size-asian="12pt" style:font-size-complex="12pt"/>
    </style:style>
    <style:style style:name="P4"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134096" style:font-size-asian="12pt" style:font-size-complex="12pt"/>
    </style:style>
    <style:style style:name="P5" style:family="paragraph" style:parent-style-name="Standard">
      <style:paragraph-properties fo:margin-top="0.199cm" fo:margin-bottom="0cm" style:contextual-spacing="false" fo:line-height="115%" fo:text-align="justify" style:justify-single-word="false"/>
      <style:text-properties style:font-name="Noto Sans1" fo:font-size="12pt" officeooo:paragraph-rsid="00138924" style:font-size-asian="12pt" style:font-size-complex="12pt"/>
    </style:style>
    <style:style style:name="P6"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38924" style:font-size-asian="12pt" style:font-size-complex="12pt"/>
    </style:style>
    <style:style style:name="P7"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138924" style:font-size-asian="12pt" style:font-size-complex="12pt"/>
    </style:style>
    <style:style style:name="P8" style:family="paragraph" style:parent-style-name="Standard">
      <style:paragraph-properties fo:margin-top="0.199cm" fo:margin-bottom="0cm" style:contextual-spacing="false" fo:line-height="115%" fo:text-align="center" style:justify-single-word="false" fo:break-before="page"/>
      <style:text-properties style:font-name="Noto Sans1" fo:font-size="12pt" officeooo:paragraph-rsid="00138924" style:font-size-asian="12pt" style:font-size-complex="12pt"/>
    </style:style>
    <style:style style:name="P9" style:family="paragraph" style:parent-style-name="Standard">
      <style:paragraph-properties fo:margin-top="0.199cm" fo:margin-bottom="0cm" style:contextual-spacing="false" fo:line-height="115%" fo:text-align="center" style:justify-single-word="false"/>
      <style:text-properties style:font-name="Noto Sans1" fo:font-size="12pt" officeooo:paragraph-rsid="00138924" style:font-size-asian="12pt" style:font-size-complex="12pt"/>
    </style:style>
    <style:style style:name="T1" style:family="text">
      <style:text-properties fo:font-size="11pt" fo:font-weight="bold" style:font-size-asian="11pt" style:font-weight-asian="bold" style:font-size-complex="11pt" style:font-weight-complex="bold"/>
    </style:style>
    <style:style style:name="T2" style:family="text">
      <style:text-properties officeooo:rsid="004b3136"/>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officeooo:rsid="004c2768"/>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7e12bc" style:font-style-asian="normal" style:font-weight-asian="normal" style:font-style-complex="normal" style:font-weight-complex="normal"/>
    </style:style>
    <style:style style:name="T9" style:family="text">
      <style:text-properties officeooo:rsid="007e12bc"/>
    </style:style>
    <style:style style:name="T10" style:family="text">
      <style:text-properties officeooo:rsid="00495b7a"/>
    </style:style>
    <style:style style:name="T11" style:family="text">
      <style:text-properties fo:font-weight="bold" style:font-weight-asian="bold" style:font-weight-complex="bold"/>
    </style:style>
    <style:style style:name="T12" style:family="text">
      <style:text-properties officeooo:rsid="007f56ab"/>
    </style:style>
    <style:style style:name="T13" style:family="text">
      <style:text-properties officeooo:rsid="00b1695e"/>
    </style:style>
    <style:style style:name="T14" style:family="text">
      <style:text-properties style:font-name="Noto Sans" officeooo:rsid="00b1695e"/>
    </style:style>
    <style:style style:name="T15" style:family="text">
      <style:text-properties officeooo:rsid="0072af0b"/>
    </style:style>
    <style:style style:name="T16" style:family="text">
      <style:text-properties officeooo:rsid="004e25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1">Argomenti contro la molteplicità</text:span> </text:p>
      <text:p text:style-name="P5">L’essere di Parmenide era uno e indivisibile. Zenone intende dimostrare come il tentativo di pensare la molteplicità e la divisibilità dell’essere conduca solo a paradossi. I due concetti sono legati tra loro. <text:s/>Per dimostrare che esiste la molteplicità infatti dovremmo dividere l’unità in sottoinsiemi più piccoli. Dovrebbero allora esserci molteplici unità. Basterà dunque dimostrare che non è possibile che esistano molteplici unità.</text:p>
      <text:p text:style-name="P6">Abbiamo appena visto come l’argomento della continuità dello spazio/tempo è quello che di fatto non riconosce “salti” nel vuoto. Un argomento simile torna come vedremo a proposito delle grandezze. Anche la materia infatti se ha una grandezza misurabile deve poter essere divisibile (almeno finché la grandezza è misurabile).</text:p>
      <text:p text:style-name="P5">1. Infinitamente piccolo e infinitamente grande.</text:p>
      <text:p text:style-name="P6">Immagin<text:span text:style-name="T13">iamo</text:span> di avere una matita. Zenone ci dice che se la tagli a metà, ottieni due mezze matite. Se tagli di nuovo una mezza matita, ottieni due quarti di matita. E puoi continuare a tagliare all'infinito. Secondo Zenone, se la matita fosse davvero un oggetto, non potremmo tagliarla all'infinito. Prima o poi dovremmo arrivare a un punto in cui non è più possibile tagliare. Questo punto <text:soft-page-break/>sarebbe un "infinitamente piccolo". Ma un infinitamente piccolo è come se non esistesse proprio. Non ha dimensioni, non può essere visto o toccato.</text:p>
      <text:p text:style-name="P7">Quindi, se la matita fosse composta da infiniti “infinitamente piccoli”, sarebbe come se fosse composta da nulla. E una matita composta da nulla non potrebbe esistere. Ecco il paradosso: la matita dovrebbe essere composta da infiniti “infinitamente piccoli”, ma allo stesso tempo dovrebbe essere un oggetto reale. Ma come può qualcosa di composto da nulla essere reale?</text:p>
      <text:p text:style-name="P6">Discorso simile vale per la grandezza. Giacché per quanto piccola ogni grandezza è divisibile infinite volte, questo qualcosa essendo composto da infine molteplicità dovrebbe essere infinitamente grande. La conclusione è che le molteplici unità dovrebbero essere sia infinitamente piccole che infinitamente grandi. Questo è tuttavia impossibile.</text:p>
      <text:p text:style-name="P5">2. Infiniti e finiti per numero.</text:p>
      <text:p text:style-name="P6">Discorso del tutto analogo viene applicato alla quantità. Se gli esseri fossero molteplici dovrebbero essere allo stesso tempo finiti e infiniti. Finiti perché sono quanti sono, infiniti perché tra uno e l’altro vi sono infiniti esseri. Infatti qualunque cosa estesa tra una cosa e l’altra è sempre divisibile all’infinito.</text:p>
      <text:p text:style-name="P5">3. Lo spazio non esiste.</text:p>
      <text:p text:style-name="P6"><text:soft-page-break/>Il terzo argomento nega l’esistenza dello spazio che è condizione di esistenza della molteplicità. <text:span text:style-name="T13">Immaginiamo lo</text:span> spazio <text:span text:style-name="T13">come un grande contenitore che racchiude tutti gli oggetti. Zenone sostiene che questo contenitore non può esistere perché, per essere tale, dovrebbe a sua volta essere contenuto in un altro contenitore ancora più grande, e così via all'infinito. </text:span>Lo spazio dunque non può esistere.</text:p>
      <text:p text:style-name="P5">4. L’uno e i molti si comportano in modo diverso.</text:p>
      <text:p text:style-name="P6">Dall’esperienza si nota che, se cadono molti chicchi di grano fanno rumore, mentre se ne cade uno, o una parte anche infinitesimale di uno, no. Se un chicco fosse una parte dei molti dovrebbe fare rumore in proporzione e così la parte infinitesimale di esso. I molti assieme hanno un comportamento che il singolo da solo non ha. I singoli chicchi da soli non scrosciano se agitati, messi tutti assieme si. Il tutto quindi non è la somma delle singole parti. Il tutto si comporta come tutto (uno) e non come insieme di parti.</text:p>
      <text:p text:style-name="P9"><text:span text:style-name="T14">«</text:span>Lo spazio/tempo e l’anima<text:span text:style-name="T14">»</text:span></text:p>
      <text:p text:style-name="P5">A partire dalle affermazioni di Zenone, <text:span text:style-name="T15">a</text:span>bbiamo detto che per gli eleati esiste solo l’essere. Quest’ultimo non ha parti, né un prima o un dopo. L’unica cosa che esiste dunque è l’eterno istante inteso ad un tempo <text:s/>come punto immateriale, privo di grandezza o spessore. <text:soft-page-break/>L’istante è un’eterna presenza. In natura non sussistono innumerevoli istanti separati l’uno dall’altro e successivi, così come non esistono infiniti punti sequenziali e successivi in un segmento.</text:p>
      <text:p text:style-name="P6">Al pari di quanto succede con lo spazio che è divisibile in infiniti punti, dato un lasso di tempo infatti questo è sempre divisibile in infiniti istanti. All’istante puoi sommarne infiniti altri, resta sempre un unico istante. Un instante lo puoi dividere infinite volte senza avergli ancora sottratto nulla. Un punto non ha una dimensione e non occupa uno spazio. La somma di infiniti punti continuerà a non occupare uno spazio. Perché allora percepiamo il movimento? Pare che spazio e tempo non siano delle realtà oggettive. Il movimento che è il rapporto dello spazio sul tempo dunque non è oggettivo anch’esso?</text:p>
      <text:p text:style-name="P9"/>
      <text:p text:style-name="P9"><text:span text:style-name="T14">«</text:span>L’istante è fuori dal tempo<text:span text:style-name="T14">»</text:span></text:p>
      <text:p text:style-name="P5">Una successione di istanti non è dunque possibile, come non è possibile una successione di punti. Tanto l’istante, quando i punti sono unità adimensionali. Questa è la dimensione dell’eternità, dell’Essere e per chi ci crede, di Dio. Nell’istante tutto resta fermo. Nel punto tutto resta immobile. Per avere il movimento dovremmo infatti avere sia un prima e un dopo temporali, <text:span text:style-name="T16">sia</text:span> la possibilità <text:soft-page-break/>di immaginare due punti in sequenza e successivi. <text:s/>Solo ciò che occupa uno spazio può essere posto in successione. Per sempli<text:span text:style-name="T10">fi</text:span>care, è come se la realtà fosse soltanto un insieme di foto e fossimo noi a ricostruire il film. Il movimento è dunque nell’anima, perché è nell’anima che avviene la ricomposizione degli infiniti punti in uno spazio continuo e degli infiniti istanti in un tempo continuo.</text:p>
      <text:p text:style-name="P9"><text:span text:style-name="T14">«</text:span>Il movimento funzione dell’occhio<text:span text:style-name="T14">»</text:span></text:p>
      <text:p text:style-name="P5">Si tratta di un’operazione del tutto istintuale e inconscia, di una funzione dell’occhio potremmo dire. Tuttavia è la nostra vista che porta in sequenza gli istanti, che li racchiude nell’armonia del movimento. Il nostro occhio vede la scritta del tabellone scorrere. La continua a vedere anche quando sappiamo perfettamente che in realtà si tratta soltanto di luci fisse che si accendono e si spengono. Il tempo è nell’anima dirà per questa ragione Sant’Agostino. <text:s/>Kant nella sua Critica della ragion pura definirà poi lo spazio e il tempo come intuizioni trascendentali <text:span text:style-name="T4">a priori</text:span>. Il fatto che siano “apparenze” dei sensi non rende i loro prodotti meno reali per noi.</text:p>
      <text:p text:style-name="P6">Zenone tuttavia non è né Kant, né Sant’Agostino. A lui non interessava nemmeno risolvere i paradossi che lui stesso ideò. Suo obiettivo, ricordiamolo, era confutare l’esistenza del movimento e del molteplice.</text:p>
      <text:p text:style-name="P9"><text:soft-page-break/><text:span text:style-name="T14">«</text:span>Come si sciolgono i paradossi di Zenone<text:span text:style-name="T14">»</text:span></text:p>
      <text:p text:style-name="P5">Quell<text:span text:style-name="T16">i</text:span> che vengono evidenziati da Zenone sono in realtà i paradossi che si creano applicando la logica del finito all’infinito. E’ evidente che, ragionando su misure finite, la somma è maggiore delle parti. <text:s/>2 più 3 fa 5 e questo è più grande sia del 2 che del 3. Allo stesso modo se sottraggo una parte ad una unità otterrò un che di più piccolo. Se ho 5 e tolgo 2 otterrò 3, che è più piccolo di 5. Questo tuttavia non vale né con l’infinitamente piccolo, né con l’infinitamente grande. La logica dell’infinito è del tutto diversa, paradossale se vista con gli occhi del finito.</text:p>
      <text:p text:style-name="P6">All’infinito puoi sommare qualsiasi quantità senza che esso venga modificato in nulla. La somma è dunque uguale alle parti. Puoi ancora <text:s/>sottrarre qualsiasi cifra senza che all’infinito venga tolto nulla. Il segmento è composto da infiniti punti, ma la somma di questi infiniti non mi da una lunghezza infinita, perché la somma degli infiniti punti resta il punto stesso (infinitamente piccolo). Dall’applicazione della logica del finito all’infinito scattano dei cortocircuiti dai quali Zenone trae l’assurdità delle tesi che vuole confutare.</text:p>
      <text:p text:style-name="P1">Conclusioni</text:p>
      <text:p text:style-name="P6"><text:span text:style-name="T13">I</text:span> paradossi di Zenone sono ancora oggi oggetto di discussioni e dibattiti. Non c'è un consenso unanime <text:soft-page-break/>sulla loro validità, ma hanno avuto un'influenza profonda sul pensiero filosofico.</text:p>
      <text:p text:style-name="P7">La novità risiede piuttosto nell’aver inaugurato un modello argomentativo di straordinaria importanza. Il paradosso è un cortocircuito della ragione che origina come visto, sovrapposizioni di piani logici diversi. Divenne presto l’artificio retorico preferito dai sofisti e dai retori. L’arte dell’avere ragione era infatti l’abilità nel confutare entrambe le tesi contraddittorie, dimostrando con ciò che tutte le cose erano vere e false ad un tempo. Dalla sofistica nasce poi la teoria socratica e l’atteggiamento filosofico in senso pieno. <text:span text:style-name="T12">Per cui</text:span> possiamo dire che, Zenone è il primo vero filosof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3T16:27:05.389171102</meta:creation-date>
    <dc:date>2026-01-23T16:36:10.810613580</dc:date>
    <dc:creator>corrado tafaro</dc:creator>
    <meta:editing-duration>PT9M6S</meta:editing-duration>
    <meta:editing-cycles>2</meta:editing-cycles>
    <meta:generator>LibreOffice/24.2.7.2$Linux_X86_64 LibreOffice_project/420$Build-2</meta:generator>
    <meta:document-statistic meta:table-count="0" meta:image-count="0" meta:object-count="0" meta:page-count="7" meta:paragraph-count="27" meta:word-count="1301" meta:character-count="8251" meta:non-whitespace-character-count="6970"/>
  </office:meta>
</office:document-meta>
</file>