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0c507" style:font-size-asian="12pt" style:font-size-complex="12pt"/>
    </style:style>
    <style:style style:name="P6" style:family="paragraph" style:parent-style-name="Standard">
      <style:paragraph-properties fo:margin-top="0.101cm" fo:margin-bottom="0cm" style:contextual-spacing="false" fo:line-height="115%" fo:text-align="center" style:justify-single-word="false"/>
      <style:text-properties style:font-name="Noto Sans1" fo:font-size="12pt" officeooo:paragraph-rsid="0010c507" style:font-size-asian="12pt" style:font-size-complex="12pt"/>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b5411" officeooo:paragraph-rsid="0010c507" style:font-size-asian="12pt" style:font-weight-asian="normal" style:font-size-complex="12pt" style:font-weight-complex="normal"/>
    </style:style>
    <style:style style:name="P8" style:family="paragraph" style:parent-style-name="Standard">
      <style:paragraph-properties fo:margin-top="0.101cm" fo:margin-bottom="0cm" style:contextual-spacing="false" fo:line-height="115%" fo:text-align="center" style:justify-single-word="false"/>
      <style:text-properties style:font-name="Noto Sans1" fo:font-size="12pt" fo:font-style="italic" officeooo:paragraph-rsid="0010c507" style:font-size-asian="12pt" style:font-style-asian="italic" style:font-size-complex="12pt" style:font-style-complex="italic"/>
    </style:style>
    <style:style style:name="P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499cm" style:auto-text-indent="false" style:page-number="auto" fo:background-color="transparent"/>
      <style:text-properties style:font-name="Noto Sans1" fo:font-size="12pt" fo:font-style="normal" officeooo:rsid="001c02ae" officeooo:paragraph-rsid="0010c507" style:font-size-asian="12pt" style:font-style-asian="normal" style:font-size-complex="12pt" style:font-style-complex="normal"/>
    </style:style>
    <style:style style:name="P10" style:family="paragraph" style:parent-style-name="Footnote">
      <style:text-properties style:font-name="Noto Sans1"/>
    </style:style>
    <style:style style:name="P11" style:family="paragraph" style:parent-style-name="Footnote">
      <style:paragraph-properties fo:text-align="justify" style:justify-single-word="false"/>
      <style:text-properties style:font-name="Noto Sans1"/>
    </style:style>
    <style:style style:name="P12" style:family="paragraph" style:parent-style-name="Footnote">
      <style:paragraph-properties fo:line-height="100%" fo:text-align="justify" style:justify-single-word="false"/>
      <style:text-properties style:font-name="Noto Sans1"/>
    </style:style>
    <style:style style:name="P13" style:family="paragraph" style:parent-style-name="Footnote">
      <style:text-properties style:font-name="Noto Sans1" fo:font-size="9pt" style:font-size-asian="9pt" style:font-size-complex="9pt"/>
    </style:style>
    <style:style style:name="P14" style:family="paragraph" style:parent-style-name="Heading_20_2">
      <style:text-properties officeooo:paragraph-rsid="0010c507"/>
    </style:style>
    <style:style style:name="P15" style:family="paragraph" style:parent-style-name="Heading_20_2">
      <style:text-properties style:font-name="Noto Sans1" fo:font-size="12pt" officeooo:paragraph-rsid="0011126a" style:font-size-asian="12pt" style:font-size-complex="12pt"/>
    </style:style>
    <style:style style:name="P16" style:family="paragraph" style:parent-style-name="Heading_20_3">
      <style:text-properties officeooo:paragraph-rsid="0010c507"/>
    </style:style>
    <style:style style:name="P17" style:family="paragraph" style:parent-style-name="Heading_20_3">
      <style:text-properties fo:font-weight="normal" officeooo:paragraph-rsid="0010c507" style:font-weight-asian="normal" style:font-weight-complex="normal"/>
    </style:style>
    <style:style style:name="P18" style:family="paragraph" style:parent-style-name="Heading_20_3">
      <style:text-properties style:font-name="Noto Sans1" fo:font-size="12pt" officeooo:paragraph-rsid="0011126a" style:font-size-asian="12pt" style:font-size-complex="12pt"/>
    </style:style>
    <style:style style:name="P19" style:family="paragraph" style:parent-style-name="Heading_20_3">
      <style:paragraph-properties fo:margin-top="0.3cm" fo:margin-bottom="0.21cm" style:contextual-spacing="false"/>
      <style:text-properties style:font-name="Noto Sans1" fo:font-size="12pt" officeooo:paragraph-rsid="0011126a" style:font-size-asian="12pt" style:font-size-complex="12pt"/>
    </style:style>
    <style:style style:name="P20"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2bb611" officeooo:paragraph-rsid="0011126a" style:font-size-asian="12pt" style:font-weight-asian="normal" style:font-size-complex="12pt" style:font-weight-complex="normal"/>
    </style:style>
    <style:style style:name="P21"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612c6b" officeooo:paragraph-rsid="0011126a"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612c6b" officeooo:paragraph-rsid="0011126a"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12c6b" officeooo:paragraph-rsid="0011126a"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1126a" style:font-size-asian="12pt" style:font-size-complex="12pt"/>
    </style:style>
    <style:style style:name="P2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1126a" style:font-size-asian="12pt" style:font-size-complex="12pt"/>
    </style:style>
    <style:style style:name="P26" style:family="paragraph" style:parent-style-name="Standard">
      <style:paragraph-properties fo:line-height="115%" fo:text-align="justify" style:justify-single-word="false"/>
      <style:text-properties style:font-name="Noto Sans1" fo:font-size="12pt" officeooo:paragraph-rsid="0011126a" style:font-size-asian="12pt" style:font-size-complex="12pt"/>
    </style:style>
    <style:style style:name="P27" style:family="paragraph" style:parent-style-name="Standard">
      <style:paragraph-properties fo:margin-top="0.101cm" fo:margin-bottom="0cm" style:contextual-spacing="false" fo:line-height="115%" fo:text-align="center" style:justify-single-word="false"/>
      <style:text-properties style:font-name="Noto Sans1" fo:font-size="12pt" officeooo:paragraph-rsid="0011126a" style:font-size-asian="12pt" style:font-size-complex="12pt"/>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officeooo:paragraph-rsid="0011126a" style:font-size-asian="12pt" style:font-style-asian="italic" style:font-size-complex="12pt" style:font-style-complex="italic"/>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bold" officeooo:rsid="00612c6b" officeooo:paragraph-rsid="0011126a"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rsid="00612c6b" officeooo:paragraph-rsid="0011126a"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219981" style:font-style-asian="italic" style:font-style-complex="italic"/>
    </style:style>
    <style:style style:name="T3" style:family="text">
      <style:text-properties fo:font-style="italic" officeooo:rsid="001c02ae" style:font-style-asian="italic" style:font-style-complex="italic"/>
    </style:style>
    <style:style style:name="T4" style:family="text">
      <style:text-properties fo:font-style="italic" officeooo:rsid="0060410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b5411" style:font-size-asian="12pt" style:font-weight-asian="normal" style:font-size-complex="12pt" style:font-weight-complex="normal"/>
    </style:style>
    <style:style style:name="T9" style:family="text">
      <style:text-properties style:font-name="Noto Sans1" fo:font-size="12pt" fo:font-weight="normal" style:font-size-asian="12pt" style:font-weight-asian="normal" style:font-size-complex="12pt" style:font-weight-complex="normal"/>
    </style:style>
    <style:style style:name="T10" style:family="text">
      <style:text-properties style:font-name="Noto Sans1" fo:font-size="12pt" fo:font-weight="normal" officeooo:rsid="0062c30a" style:font-size-asian="12pt" style:font-weight-asian="normal" style:font-size-complex="12pt" style:font-weight-complex="normal"/>
    </style:style>
    <style:style style:name="T11" style:family="text">
      <style:text-properties style:font-name="Noto Sans1" fo:font-weight="normal" style:font-weight-asian="normal" style:font-weight-complex="normal"/>
    </style:style>
    <style:style style:name="T12" style:family="text">
      <style:text-properties style:font-name="Noto Sans1" fo:font-weight="normal" officeooo:rsid="0062c30a" style:font-weight-asian="normal" style:font-weight-complex="normal"/>
    </style:style>
    <style:style style:name="T13" style:family="text">
      <style:text-properties fo:font-style="normal" officeooo:rsid="001c02ae" style:font-style-asian="normal" style:font-style-complex="normal"/>
    </style:style>
    <style:style style:name="T14" style:family="text">
      <style:text-properties fo:font-style="normal" fo:font-weight="normal" officeooo:rsid="001c02ae" style:font-style-asian="normal" style:font-weight-asian="normal" style:font-style-complex="normal" style:font-weight-complex="normal"/>
    </style:style>
    <style:style style:name="T15" style:family="text">
      <style:text-properties fo:font-style="normal" fo:font-weight="normal" officeooo:rsid="0021b0eb"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62c30a" style:font-weight-asian="normal" style:font-weight-complex="normal"/>
    </style:style>
    <style:style style:name="T18" style:family="text">
      <style:text-properties officeooo:rsid="001b5411"/>
    </style:style>
    <style:style style:name="T19" style:family="text">
      <style:text-properties officeooo:rsid="00161fce"/>
    </style:style>
    <style:style style:name="T20" style:family="text">
      <style:text-properties officeooo:rsid="001f4b8f"/>
    </style:style>
    <style:style style:name="T21" style:family="text">
      <style:text-properties officeooo:rsid="00219981"/>
    </style:style>
    <style:style style:name="T22" style:family="text">
      <style:text-properties officeooo:rsid="00612c6b"/>
    </style:style>
    <style:style style:name="T23" style:family="text">
      <style:text-properties officeooo:rsid="0062c3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8198_3602757520"/>Il ritiro dalla vita pubblica e l'importanza dell'otium<text:bookmark-end text:name="__RefHeading___Toc18198_3602757520"/></text:h>
      <text:p text:style-name="P20">Il filosofo sottolinea l'importanza del ritiro dalla vita pubblica per dedicarsi alla riflessione e alla crescita personale. L'ozio, inteso come tempo dedicato allo studio e alla contemplazione, è essenziale per la vita filosofica.</text:p>
      <text:h text:style-name="P18" text:outline-level="3"><text:bookmark-start text:name="__RefHeading___Toc30110_2330915828"/>Lettera 8<text:bookmark-end text:name="__RefHeading___Toc30110_2330915828"/></text:h>
      <text:p text:style-name="P24">"<text:span text:style-name="T1">Mi esorti a evitare la folla</text:span>," scrivi, "<text:span text:style-name="T1">e a starmene per conto mio, pago della mia coscienza? Che fine hanno fatto dunque i precetti della vostra filosofia che impongono di essere attivi fino alla morte?</text:span>" Ma come? Credi che io ti inviti all'inerzia? Io mi sono appartato e ho sbarrato le porte per essere utile a molta gente. Non trascorro mai la giornata in ozio: parte della notte la dedico allo studio; non mi abbandono al sonno, vi soccombo e costringo al lavoro gli occhi che si chiudono stanchi per la veglia. Mi sono allontanato non tanto dagli uomini quanto dagli impegni e prima di tutto dai miei impegni personali: sono al servizio dei posteri. Scrivo cose che possano servire loro; affido alle mie pagine consigli salutari, come se fossero ricette di medicamenti utili; ne ho sperimentata l'efficacia sulle mie ferite che non sono guarite completamente, ma almeno non si sono diffuse.</text:p>
      <text:p text:style-name="P25">Mostro agli altri la via giusta: io l'ho conosciuta tardi e stanco del lungo errare. Grido: "<text:span text:style-name="T1">Evitate tutto ciò che piace al volgo e che viene dal caso; fermatevi sospettosi e pavidi di </text:span><text:soft-page-break/><text:span text:style-name="T1">fronte ad ogni bene fortuito: l'esca alletta fiere e pesci e li inganna. Li credete doni della fortuna? Sono trappole. Chi di voi vuole vivere una vita sicura, eviti il più possibile questi beni vischiosi, che tradiscono, noi, poveri infelici, anche in questo: pensiamo di tenerli in pugno e, invece, ci siamo attaccati. Questa strada ci porta alla rovina; il destino di una persona salita tanto in alto è precipitare. E dopo non si può resistere, quando la prosperità comincia a farci deviare: o si prosegue diritti o si precipita una volta per tutte; la sorte non solo ci travolge, ma ci abbatte e ci cola a picc</text:span><text:span text:style-name="T4">o.</text:span></text:p>
      <text:p text:style-name="P28">Seguite questa sana e salutare regola di vita: concedete al corpo solo quanto basta a mantenerlo in salute. Bisogna trattarlo con una certa durezza perché non disobbedisca alla mente: il cibo deve estinguere la fame, il bere la sete, i vesti devono proteggere dal freddo, la casa difendere dalle intemperie. Non importa se è stata costruita con zolle o con marmo variegato di importazione: sappiate che un tetto di foglie copre bene quanto uno d'oro. Ornamenti e fregi ottenuti grazie a inutili fatiche, disprezzateli tutti; pensate che nulla è straordinario tranne l'anima e per un'anima grande nulla è grande."</text:p>
      <text:p text:style-name="P25">Dico queste cose a me stesso, le dico ai posteri; e non mi rendo più utile secondo te che se mi presentassi come difensore in giudizio o imprimessi il sigillo ai testamenti o mettessi gesto e voce a servizio di un candidato senatoriale? Credimi, fa di più chi sembra che non faccia <text:soft-page-break/>niente: si cura nello stesso tempo delle faccende divine e di quelle umane.</text:p>
      <text:p text:style-name="P25">Ma ormai è tempo di concludere e, come stabilito, devo pagare il mio tributo per questa lettera. Non è farina del mio sacco: ancora una volta saccheggio Epicuro; oggi ho letto queste sue parole: "<text:span text:style-name="T1">Consacrati alla filosofia, se vuoi essere veramente libero.</text:span>" Chi si sottomette e si affida a essa, non deve attendere: è libero subito; infatti questo stesso servire la filosofia è libertà. Probabilmente mi chiederai perché io riporti tante belle frasi di Epicuro, invece che quelle degli Stoici: ma perché ritieni di Epicuro queste massime e non patrimonio comune? Quanti poeti esprimono concetti già formulati o che dovrebbero essere formulati dai filosofi! Non menzionerò i tragici e nemmeno le nostre commedie togate, che per la loro gravità sono una via di mezzo fra tragedia e commedia: quanti versi eloquentissimi ci sono nei mimi! Quante frasi di Publilio dovrebbero essere recitate in una tragedia, non in un mimo. Ti citerò un unico suo verso che riguarda la filosofia e l'argomento or ora discusso.</text:p>
      <text:p text:style-name="P25">Egli sostiene che non dobbiamo considerare nostri i beni fortuiti: <text:span text:style-name="T22">n</text:span>on ci appartiene quanto accade secondo i nostri desideri. Ricordo che anche tu hai espresso lo stesso concetto assai meglio e con maggiore concisione: </text:p>
      <text:p text:style-name="P27"><text:span text:style-name="T22">N</text:span>on è tuo ciò che la fortuna ha fatto tuo.</text:p>
      <text:p text:style-name="P26"><text:soft-page-break/>Ma voglio citare quest'altra tua massima ancora migliore: <text:span text:style-name="T22">U</text:span>n bene che può essere dato, può anche essere tolto. <text:span text:style-name="T13">Questo non lo calcolo come pagamento: ti restituisco un bene già tuo. Stammi bene.</text:span></text:p>
      <text:h text:style-name="P19" text:outline-level="3"><text:bookmark-start text:name="__RefHeading___Toc18202_3602757520"/>Lettera 56<text:bookmark-end text:name="__RefHeading___Toc18202_3602757520"/></text:h>
      <text:p text:style-name="P29"><text:span text:style-name="T16">Che io possa morire se, quando uno se ne sta appartato a studiare, il silenzio è necessario come si pensa. Ecco, intorno a me risuonano da ogni parte schiamazzi di tutti i tipi: abito proprio sopra uno stabilimento balneare. Immagina ora ogni genere di baccano odioso agli orecchi: quando i più forti si allenano e fanno sollevamento pesi, quando faticano o fingono di faticare, odo gemiti, e, tutte le volte che trattengono il fiato ed espirano, sibili e ansiti; quando c</text:span><text:span text:style-name="T17">a</text:span><text:span text:style-name="T16">pita qualcuno pigro che si contenta di un normale massaggio, sento lo scroscio delle mani che percuotono le spalle e che d</text:span><text:span text:style-name="T17">a</text:span><text:span text:style-name="T16">nno un suono diverso se battono piatte o ricurve. Se poi arrivano quelli che giocano a palla e cominciano a contare i colpi, è fatta. Mettici ancora l'attaccabrighe, il ladro colto in flagrante, quello cui piace sentire la propria voce mentre fa il bagno, e poi le persone che si tuffano in piscina e smuovendo l'acqua fanno un fracasso indiavolato. Oltre a tutti questi che, se non altro, hanno voci normali, pensa al depilatore che spesso sfodera una vocetta sottile e stridula per farsi notare e tace solo quando depila le ascelle e costringe un altro a gridare al suo posto. Poi ci </text:span><text:soft-page-break/><text:span text:style-name="T16">sono i vari richiami del venditore di bibite, il salsicciaio, il pasticcere e tutti gli esercenti delle taverne che vendono la loro merce con una particolare modulazione della voce.</text:span></text:p>
      <text:p text:style-name="P30"><text:span text:style-name="T16">"</text:span><text:span text:style-name="T5">Sei di ferro</text:span><text:span text:style-name="T16">", dici, "</text:span><text:span text:style-name="T5">oppure sordo, se rimani presente a te stesso fra tanti rumori diversi e discordi, mentre al nostro Crisippo sembra di morire per il continuo salutare.</text:span><text:span text:style-name="T16">" Ma, perbacco, io di questo frastuono non mi curo più che dello scorrere o del cadere dell'acqua, sebbene senta che un popolo si è trasferito altrove per questo solo motivo: non poteva sopportare il fragore delle cascate del Nilo</text:span><text:span text:style-name="T16"><text:note text:id="ftn30" text:note-class="footnote"><text:note-citation>1</text:note-citation><text:note-body><text:p text:style-name="P13">Seneca parla del popolo dei Catadupi, che vivevano nelle vicinanze delle cascate del Nilo. Il frastuono incessante delle cascate era talmente forte che molti di loro decisero di trasferirsi altrove per trovare un po' di pace </text:p></text:note-body></text:note></text:span><text:span text:style-name="T16">.</text:span></text:p>
      <text:p text:style-name="P30"><text:span text:style-name="T16">Secondo me la voce distrae più del frastuono: quella attira l'attenzione, quest'ultimo riempie e colpisce solo le orecchie. Tra i rumori che mi risuonano intorno senza distrarmi metto le vetture che passano in corsa, l'artigiano, mio coinquilino, e il vicino fabbro, oppure quel tale che, presso la Meta Sudante</text:span><text:span text:style-name="T16"><text:note text:id="ftn31" text:note-class="footnote"><text:note-citation>2</text:note-citation><text:note-body><text:p text:style-name="P13"><text:span text:style-name="T23">U</text:span>na fontana monumentale edificata in età flavia.</text:p></text:note-body></text:note></text:span><text:span text:style-name="T16">, prova trombette e flauti, e non suona, ma strepita: un suono intermittente mi dà, però più fastidio di uno continuo. Ma ormai mi sono così corazzato contro tutti questi rumori, che potrei udire persino il comito dare il tempo ai rematori con voce stridula. Costringo la mente a rimanere assorta in se stessa senza farsi distrarre da fattori esterni; risuoni pure fuori di me ogni genere di fracasso, purché </text:span><text:soft-page-break/><text:span text:style-name="T16">interiormente non ci sia scompiglio, purché non combattano tra loro cupidigia e paura, purché l'avarizia e l'intemperanza non siano in lotta e l'una non tormenti l'altra. A che serve il silenzio dell'intero quartiere, se le passioni si agitano in noi?</text:span></text:p>
      <text:p text:style-name="P22">Tutto era tranquillo nella placida quiete della notte.</text:p>
      <text:p text:style-name="P21">È falso: non esiste nessuna placida quiete se non quella regolata dalla ragione; la notte rivela l'inquietudine, non la elimina, cambia semplicemente gli affanni. Quando dormiamo, i nostri sogni sono tormentati come le nostre giornate: la vera tranquillità è quella in cui si dispiega la saggezza. Guarda quell'uomo cui si cerca di conciliare il sonno facendo silenzio nell'ampia dimora: tutta la schiera dei servi tace e quelli che si avvicinano alla sua stanza camminano in punta di piedi, perché nessun rumore disturbi le sue orecchie: ma lui si gira di qua e di là e cerca di prendere un po' di sonno tra le sue preoccupazioni; si lamenta di aver udito qualcosa, in realtà non ha sentito niente. Secondo te qual è il motivo? È l'anima che strepita dentro di lui. Questa bisogna placare, è la sua rivolta che deve essere sedata; non devi pensare che l'anima è tranquilla, se il corpo riposa: talvolta la quiete stessa è carica di inquietudine; perciò dobbiamo essere spronati ad agire e impegnarci a svolgere qualche nobile attività tutte le volte che l'inerzia, insofferente di se stessa, ci fa star male. I grandi <text:soft-page-break/>generali, quando vedono che un soldato obbedisce controvoglia, lo tengono a freno con qualche occupazione e lo impiegano in spedizioni militari. Chi ha molto da fare non ha tempo di abbandonarsi alla dissolutezza. Senza dubbio il lavoro cancella i vizi generati dall'ozio.</text:p>
      <text:p text:style-name="P23">Spesso ci si ritira a vita privata apparentemente per disgusto dell'attività politica e malcontenti di una posizione sterile e sgradita; tuttavia in quel nascondiglio dove ci hanno gettato la paura e la stanchezza a volte si risveglia l'ambizione: non era stata estirpata; era come spossata o anche sdegnata per il fallimento delle proprie aspettative. Lo stesso vale per la dissolutezza: a volte sembra essere definitivamente scomparsa, ma poi tormenta coloro che hanno fatto professione di moderazione e nella parsimonia ricerca i piaceri: erano stati abbandonati, ma non condannati e li ricerca con più impeto quanto più è nascosta. Tutti i vizi, se manifesti, sono meno gravi; anche le malattie si avviano alla guarigione quando esplodono e mostrano la loro virulenza. Sappi che l'avarizia, l'ambizione e le altre infermità spirituali dell'uomo sono pericolosissime se si nascondono sotto un'apparente salute.</text:p>
      <text:p text:style-name="P22">Sembriamo quieti, ma in realtà non è così . Se siamo in buona fede, se abbiamo chiamato a raccolta le nostre forze, se, come dicevo poco prima, abbiamo disprezzato <text:soft-page-break/>le belle apparenze, niente ci distoglierà: nessuna voce di uomini o canto di uccelli interromperà i nostri buoni propositi, ormai saldi e fermi.</text:p>
      <text:p text:style-name="P22">Chi presta attenzione alle voci e agli eventi fortuiti, ha un'indole incostante e incapace di raccoglimento interiore; ha in sé preoccupazioni e timori che lo rendono ansioso, come scrive il nostro Virgilio: e io, che poco tempo fa non temevo i dardi scagliati, né i Greci raccolti in schiere contro di noi, ora sono spaventato da ogni soffio di vento, ogni suono mi scuote e mi tiene in sospeso e temo in egual misura sia per il compagno che per il peso che porto.</text:p>
      <text:p text:style-name="P22"><text:span text:style-name="T14">Il primo è il saggio che non teme i dardi scagliatigli contro, né l'urto degli eserciti in fila serrata, né il fragore di una città attaccata dai nemici: quest'altro non conosce la filosofia, teme per i suoi beni e trasale a ogni più piccolo rumore, si abbatte per una qualsiasi voce scambiandola per una minaccia, resta senza fiato al più lieve movimento ed è timoroso per i suoi bagagli. </text:span><text:span text:style-name="T13">Scegli una qualunque tra queste persone fortunate che si tirano dietro o che portano su di sé molti beni, la vedrai "</text:span><text:span text:style-name="T3">temere per il compagno e per il peso</text:span><text:span text:style-name="T13">". Sappi che sarai veramente tranquillo solo quando non ti toccherà nessun clamore, quando nessuna voce ti scuoterà, né blanda, né minacciosa, né vana e menzognera. </text:span><text:span text:style-name="T3">"E allora? Non è preferibile fare a meno una volta buona di questo </text:span><text:soft-page-break/><text:span text:style-name="T3">schiamazzo?</text:span><text:span text:style-name="T13">" Certo; perciò me ne andrò da questa casa. Ho voluto mettermi alla prova ed esercitarmi: che necessità c'è di farsi tormentare più a lungo, quando Ulisse trovò per i suoi compagni un rimedio tanto semplice anche contro le Sirene?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9T16:59:54.871201205</dc:date>
    <dc:creator>corrado tafaro</dc:creator>
    <meta:editing-duration>PT31M55S</meta:editing-duration>
    <meta:editing-cycles>7</meta:editing-cycles>
    <meta:generator>LibreOffice/24.2.7.2$Linux_X86_64 LibreOffice_project/420$Build-2</meta:generator>
    <meta:document-statistic meta:table-count="0" meta:image-count="0" meta:object-count="0" meta:page-count="9" meta:paragraph-count="23" meta:word-count="1935" meta:character-count="11603" meta:non-whitespace-character-count="9689"/>
  </office:meta>
</office:document-meta>
</file>