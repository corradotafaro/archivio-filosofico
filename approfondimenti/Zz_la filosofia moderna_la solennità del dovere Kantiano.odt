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6d0c" officeooo:paragraph-rsid="00126d0c"/>
    </style:style>
    <style:style style:name="P2" style:family="paragraph" style:parent-style-name="Standard">
      <style:paragraph-properties fo:margin-top="0.101cm" fo:margin-bottom="0cm" style:contextual-spacing="false" fo:text-align="justify" style:justify-single-word="false"/>
      <style:text-properties officeooo:rsid="00126d0c" officeooo:paragraph-rsid="00126d0c"/>
    </style:style>
    <style:style style:name="P3" style:family="paragraph" style:parent-style-name="Standard">
      <style:paragraph-properties fo:text-align="justify" style:justify-single-word="false"/>
      <style:text-properties officeooo:rsid="00126d0c" officeooo:paragraph-rsid="00126d0c"/>
    </style:style>
    <style:style style:name="P4" style:family="paragraph" style:parent-style-name="Standard">
      <style:paragraph-properties fo:margin-top="0.199cm" fo:margin-bottom="0cm" style:contextual-spacing="false" fo:text-align="justify" style:justify-single-word="false"/>
      <style:text-properties officeooo:rsid="00126d0c" officeooo:paragraph-rsid="00126d0c"/>
    </style:style>
    <style:style style:name="P5" style:family="paragraph" style:parent-style-name="Standard" style:master-page-name="">
      <loext:graphic-properties draw:fill="none"/>
      <style:paragraph-properties fo:margin-left="0.499cm" fo:margin-right="0cm" fo:margin-top="0.101cm" fo:margin-bottom="0cm" style:contextual-spacing="false" fo:text-align="justify" style:justify-single-word="false" fo:text-indent="0cm" style:auto-text-indent="false" style:page-number="auto" fo:background-color="transparent"/>
      <style:text-properties officeooo:rsid="00126d0c" officeooo:paragraph-rsid="00126d0c"/>
    </style:style>
    <style:style style:name="P6" style:family="paragraph" style:parent-style-name="Standard">
      <style:paragraph-properties fo:margin-top="0.199cm" fo:margin-bottom="0cm" style:contextual-spacing="false" fo:text-align="justify" style:justify-single-word="false"/>
      <style:text-properties officeooo:rsid="00126d0c" officeooo:paragraph-rsid="0015b09c"/>
    </style:style>
    <style:style style:name="P7" style:family="paragraph" style:parent-style-name="Standard">
      <style:paragraph-properties fo:margin-top="0.199cm" fo:margin-bottom="0cm" style:contextual-spacing="false" fo:text-align="justify" style:justify-single-word="false"/>
      <style:text-properties officeooo:rsid="00126d0c" officeooo:paragraph-rsid="001792c0"/>
    </style:style>
    <style:style style:name="P8" style:family="paragraph" style:parent-style-name="Standard">
      <style:text-properties fo:font-style="italic" officeooo:rsid="00126d0c" officeooo:paragraph-rsid="00126d0c" style:font-style-asian="italic" style:font-style-complex="italic"/>
    </style:style>
    <style:style style:name="P9" style:family="paragraph" style:parent-style-name="Standard" style:list-style-name="L1">
      <style:paragraph-properties fo:margin-top="0.199cm" fo:margin-bottom="0cm" style:contextual-spacing="false" fo:text-align="justify" style:justify-single-word="false"/>
      <style:text-properties officeooo:rsid="00126d0c" officeooo:paragraph-rsid="00126d0c"/>
    </style:style>
    <style:style style:name="P10" style:family="paragraph" style:parent-style-name="Standard" style:list-style-name="L2">
      <style:paragraph-properties fo:margin-top="0.199cm" fo:margin-bottom="0cm" style:contextual-spacing="false" fo:text-align="justify" style:justify-single-word="false"/>
      <style:text-properties officeooo:rsid="00126d0c" officeooo:paragraph-rsid="00126d0c"/>
    </style:style>
    <style:style style:name="P11" style:family="paragraph" style:parent-style-name="Standard" style:list-style-name="L3">
      <style:paragraph-properties fo:margin-top="0.199cm" fo:margin-bottom="0cm" style:contextual-spacing="false" fo:text-align="justify" style:justify-single-word="false"/>
      <style:text-properties officeooo:rsid="00126d0c" officeooo:paragraph-rsid="00126d0c"/>
    </style:style>
    <style:style style:name="P12" style:family="paragraph" style:parent-style-name="Standard" style:list-style-name="L4">
      <style:paragraph-properties fo:margin-top="0.101cm" fo:margin-bottom="0cm" style:contextual-spacing="false" fo:text-align="justify" style:justify-single-word="false"/>
      <style:text-properties officeooo:rsid="00126d0c" officeooo:paragraph-rsid="00126d0c"/>
    </style:style>
    <style:style style:name="P13" style:family="paragraph" style:parent-style-name="Standard" style:list-style-name="L4">
      <style:paragraph-properties fo:margin-top="0.199cm" fo:margin-bottom="0cm" style:contextual-spacing="false" fo:text-align="justify" style:justify-single-word="false"/>
      <style:text-properties officeooo:rsid="00126d0c" officeooo:paragraph-rsid="00126d0c"/>
    </style:style>
    <style:style style:name="P14" style:family="paragraph" style:parent-style-name="Standard">
      <style:paragraph-properties fo:margin-top="0.101cm" fo:margin-bottom="0cm" style:contextual-spacing="false" fo:text-align="justify" style:justify-single-word="false"/>
      <style:text-properties officeooo:rsid="00126d0c" officeooo:paragraph-rsid="00126d0c"/>
    </style:style>
    <style:style style:name="P15" style:family="paragraph" style:parent-style-name="Standard">
      <style:paragraph-properties fo:margin-top="0.101cm" fo:margin-bottom="0cm" style:contextual-spacing="false" fo:text-align="justify" style:justify-single-word="false"/>
      <style:text-properties officeooo:rsid="00126d0c" officeooo:paragraph-rsid="001792c0"/>
    </style:style>
    <style:style style:name="P16" style:family="paragraph" style:parent-style-name="Standard">
      <style:paragraph-properties fo:margin-top="0.101cm" fo:margin-bottom="0cm" style:contextual-spacing="false" fo:text-align="justify" style:justify-single-word="false"/>
      <style:text-properties officeooo:rsid="00126d0c" officeooo:paragraph-rsid="001905f2"/>
    </style:style>
    <style:style style:name="P17" style:family="paragraph" style:parent-style-name="Standard">
      <style:paragraph-properties fo:margin-top="0cm" fo:margin-bottom="0cm" style:contextual-spacing="false" fo:text-align="justify" style:justify-single-word="false"/>
      <style:text-properties officeooo:rsid="0015b09c" officeooo:paragraph-rsid="001792c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5b09c"/>
    </style:style>
    <style:style style:name="T4" style:family="text">
      <style:text-properties officeooo:rsid="001792c0"/>
    </style:style>
    <style:style style:name="T5" style:family="text">
      <style:text-properties officeooo:rsid="0017ffc3"/>
    </style:style>
    <style:style style:name="T6" style:family="text">
      <style:text-properties officeooo:rsid="001c34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solennità del Dovere Kantiano</text:p>
      <text:p text:style-name="P1"/>
      <text:p text:style-name="P8">«Dovere! nome sublime e grande, che non contieni niente di piacevole che implichi lusinga, ma chiedi la sommissione»</text:p>
      <text:p text:style-name="P4">Questa splendida e celebre citazione appartiene a Immanuel Kant, tratta da una delle sue opere fondamentali: la "Critica della ragion pratica" (1788). Si tratta dell'incipit del famoso <text:span text:style-name="T1">Inno al dovere</text:span>, una delle pagine più liriche e solenni di tutta la storia della filosofia.</text:p>
      <text:p text:style-name="P2">In questo passo, Kant personifica il dovere per metterne in luce la natura pura, severa e priva di compromessi. Per il filosofo tedesco, la vera moralità non ha nulla a che fare con il calcolo utilitaristico o con la ricerca della felicità personale.</text:p>
      <text:p text:style-name="P3">Il dovere non cerca di "sedurci" promettendoci premi, vantaggi o sensazioni piacevoli. Se compiamo un'azione generosa solo perché ci fa sentire bene o per ottenere l'approvazione altrui, per Kant quell'azione è encomiabile, ma non ha un autentico valore morale.</text:p>
      <text:p text:style-name="P3">Il dovere si presenta alla coscienza come un comando incondizionato: "Tu devi perché devi". Chiede "sommissione" (sottomissione), ma non a un tiranno esterno, bensì alla legge della nostra stessa ragione.</text:p>
      <text:p text:style-name="P3">È proprio sottomettendoci a questo comando austero che l'essere umano eleva se stesso al di sopra del mondo animale e degli istinti ciechi, scoprendo la propria vera libertà (autonomia).</text:p>
      <text:p text:style-name="P2"><text:soft-page-break/>Per capire davvero cosa intenda Kant per "dovere", dobbiamo smontarlo nei suoi tre pilastri fondamentali.</text:p>
      <text:list text:style-name="L1">
        <text:list-item>
          <text:p text:style-name="P9">1. Agire "per dovere" contro agire "in conformità al dovere"</text:p>
        </text:list-item>
      </text:list>
      <text:p text:style-name="P2">Kant fa una distinzione sottile ma cruciale che cambia completamente il modo di valutare un'azione. Prendiamo un esempio pratico, molto simile a uno fatto da Kant stesso: un commerciante che non imbroglia un cliente inesperto.</text:p>
      <text:p text:style-name="P5">Scenario A: Il commerciante è onesto perché sa che, se imbrogliasse la gente, perderebbe la clientela e la sua attività fallirebbe. Qui sta agendo in conformità al dovere. L'azione esterna è corretta, ma la motivazione è l'interesse personale. Per Kant, questa azione non ha alcun valore morale.</text:p>
      <text:p text:style-name="P5">Scenario B: Il commerciante è onesto semplicemente perché ritiene che imbrogliare sia sbagliato, anche se potesse farla franca al 100% senza alcuna conseguenza. Qui sta agendo per dovere. Solo in questo caso l'azione è autenticamente morale.</text:p>
      <text:p text:style-name="P2">Per Kant, la moralità non risiede nel risultato di ciò che fai, ma nell'intenzione (la volontà buona) con cui lo fai.</text:p>
      <text:list text:style-name="L2">
        <text:list-item>
          <text:p text:style-name="P10">2. La bussola: L'Imperativo Categorico</text:p>
        </text:list-item>
      </text:list>
      <text:p text:style-name="P2">Come facciamo a sapere qual è il nostro dovere nelle situazioni concrete? Kant non ci dà un elenco di comandamenti ("non rubare", "non mentire"), ma ci offre una formula logica per capirlo da soli, chiamata Imperativo Categorico.</text:p>
      <text:p text:style-name="P2"><text:soft-page-break/>A differenza degli imperativi ipotetici (che seguono la struttura "Se vuoi X, allora devi fare Y"), l'imperativo categorico è assoluto: "Devi e basta". La sua formulazione più famosa funziona come un test di universalizzazione:</text:p>
      <text:p text:style-name="P4">"<text:span text:style-name="T1">Agisci soltanto secondo quella massima che puoi volere che divenga una legge universale.</text:span>"</text:p>
      <text:p text:style-name="P2">In parole semplici: prima di fare qualcosa, chiediti: "Cosa succederebbe se TUTTI si comportassero esattamente come mi sto per comportare io?"</text:p>
      <text:p text:style-name="P2">Se decidi di mentire per salvarti da un imbarazzo, prova a immaginare un mondo in cui la menzogna sia la norma per tutti. In quel mondo, la fiducia crollerebbe e la parola stessa perderebbe di significato. Di conseguenza, la tua massima non regge il test logico: hai scoperto il tuo dovere (dire la verità).</text:p>
      <text:list text:style-name="L3">
        <text:list-item>
          <text:p text:style-name="P11">3. Il grande paradosso: Il dovere ti rende libero</text:p>
        </text:list-item>
      </text:list>
      <text:p text:style-name="P2">Qui arriviamo al punto più profondo. Come può un comando severo che chiede "sommissione" essere legato alla libertà?</text:p>
      <text:p text:style-name="P2">Kant spiega che noi esseri umani viviamo a metà tra due mondi:</text:p>
      <text:list text:style-name="L4">
        <text:list-item>
          <text:p text:style-name="P12">Il mondo della natura, dove siamo guidati da istinti, impulsi biologici, paure e desideri (la ricerca del piacere, l'evitare il dolore).</text:p>
        </text:list-item>
        <text:list-item>
          <text:p text:style-name="P13">Il mondo della ragione, che ci permette di darci delle regole da soli.</text:p>
        </text:list-item>
      </text:list>
      <text:p text:style-name="P2"><text:soft-page-break/>Se agisci seguendo solo i tuoi desideri o le tue paure, non sei davvero libero: stai solo obbedendo alle leggi biologiche o psicologiche della natura. Sei "eteronomo" (ricevi la legge dall'esterno).</text:p>
      <text:p text:style-name="P2">Quando invece decidi di fare il tuo dovere, anche se questo costa sacrificio, stai spezzando la catena degli istinti naturali. Stai obbedendo a una legge che la tua stessa ragione ha creato. Questa è l'autonomia (darsi la legge da sé), che per Kant coincide con la vera, autentica libertà. </text:p>
      <text:p text:style-name="P6">Kant sostiene che la nostra capacità di agire moralmente e il nostro senso di dovere implicano l'esistenza di Dio come garante della moralità. Dio non è conoscibile attraverso la ragione speculativa, ma è necessario come postulato, <text:span text:style-name="T3">cioè come principio fondamentale che si accetta come vero, senza bisogno di dimostrazione.</text:span> <text:span text:style-name="T4">C</text:span>iò che conta non è tanto credere in Dio in senso dogmatico, quanto vivere “<text:span text:style-name="T2">come se Dio esistesse</text:span>” orientando le proprie azioni secondo il dovere e la legge morale.</text:p>
      <text:p text:style-name="P17">Dopo aver smantellato nella Critica della ragion pura tutte le prove tradizionali dell'esistenza di Dio (ontologica, cosmologica, teleologica), dimostrando che la mente umana non può conoscere scientificamente ciò che va oltre l'esperienza sensibile, Kant fa rientrare Dio dalla porta della morale. Ma lo fa con una prospettiva totalmente rivoluzionata rispetto al passato.</text:p>
      <text:p text:style-name="P15">Per capire perché Kant abbia bisogno di Dio come postulato, dobbiamo guardare a quello che lui chiama il Sommo Bene. Nella sua visione, l'ideale a cui la nostra <text:soft-page-break/>parte razionale aspira non è semplicemente la virtù (agire per dovere), ma l'unione di Virtù e Felicità.</text:p>
      <text:p text:style-name="P7">Qui sorge il paradosso tragico della condizione umana:</text:p>
      <text:p text:style-name="P7">La morale ci impone di essere virtuosi, indipendentemente dal fatto che questo ci renda felici o meno, <text:span text:style-name="T5">t</text:span>uttavia, la nostra natura umana tende inevitabilmente alla ricerca della felicità. Nel mondo reale, queste due dimensioni sono scisse: spesso chi agisc<text:span text:style-name="T5">e</text:span> <text:span text:style-name="T5">re</text:span>ttamente soffre, mentre chi imbroglia prospera. La natura segue le sue leggi fisiche, ciniche e indifferenti alla giustizia morale. Se il mondo finisse qui, l'impegno morale rischierebbe di apparire un assurdo controsenso esistenziale: uno sforzo immane che non produce armonia.</text:p>
      <text:p text:style-name="P16">È qui che scatta il concetto di postulato. Dobbiamo postulare l'esistenza di una causa suprema della natura, dotata di intelletto e volontà, che sia in grado di decretare, in una dimensione che va oltre questa vita terrena, quel perfetto accordo tra virtù e felicità che in questo mondo è strutturalmente impossibile. Per Kant, Dio è esattamente questo: una esigenza della speranza, non della conoscenza.</text:p>
      <text:p text:style-name="P16">L'uomo kantiano non è morale perché crede in Dio, se agiss<text:span text:style-name="T6">e</text:span> per paura di una punizione divina o per guadagnarci una ricompensa ultraterrena, la <text:span text:style-name="T6">sua</text:span> morale sarebbe distrutta, perché non agire<text:span text:style-name="T6">bbe</text:span> più per dovere, ma per utilità ed egoismo. La religione, in questo modo, diventa una conseguenza della morale, e non il suo <text:soft-page-break/>fondamento. È il tentativo di dare una "casa" metafisica al nostro profondo senso del dov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5-30T15:13:49.959777195</meta:creation-date>
    <dc:date>2026-05-31T16:06:33.723155209</dc:date>
    <dc:creator>corrado tafaro</dc:creator>
    <meta:editing-duration>PT57M54S</meta:editing-duration>
    <meta:editing-cycles>4</meta:editing-cycles>
    <meta:generator>LibreOffice/24.2.7.2$Linux_X86_64 LibreOffice_project/420$Build-2</meta:generator>
    <meta:document-statistic meta:table-count="0" meta:image-count="0" meta:object-count="0" meta:page-count="6" meta:paragraph-count="33" meta:word-count="1087" meta:character-count="6858" meta:non-whitespace-character-count="5808"/>
  </office:meta>
</office:document-meta>
</file>