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40adbd" officeooo:paragraph-rsid="000cea6c"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40adbd" officeooo:paragraph-rsid="000cea6c" style:font-size-asian="12pt" style:font-style-asian="normal" style:font-weight-asian="normal" style:font-size-complex="12pt" style:font-style-complex="normal" style:font-weight-complex="normal"/>
    </style:style>
    <style:style style:name="P3" style:family="paragraph" style:parent-style-name="Footnote">
      <style:paragraph-properties fo:text-align="justify" style:justify-single-word="false"/>
    </style:style>
    <style:style style:name="P4" style:family="paragraph" style:parent-style-name="Quotations">
      <style:paragraph-properties fo:margin-top="0.3cm" fo:margin-bottom="0cm" style:contextual-spacing="false" fo:line-height="115%" fo:text-align="start" style:justify-single-word="false"/>
      <style:text-properties fo:font-style="italic" officeooo:paragraph-rsid="000cea6c" style:font-style-asian="italic" style:font-style-complex="italic"/>
    </style:style>
    <style:style style:name="P5" style:family="paragraph" style:parent-style-name="Quotations">
      <style:paragraph-properties fo:margin-top="0.199cm" fo:margin-bottom="0cm" style:contextual-spacing="false" fo:line-height="115%" fo:text-align="center" style:justify-single-word="false"/>
      <style:text-properties fo:font-style="italic" officeooo:paragraph-rsid="000cea6c" style:font-style-asian="italic" style:font-style-complex="italic"/>
    </style:style>
    <style:style style:name="P6" style:family="paragraph" style:parent-style-name="Quotations"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fo:font-size="12pt" officeooo:paragraph-rsid="000cea6c" style:font-size-asian="12pt" style:font-size-complex="12pt"/>
    </style:style>
    <style:style style:name="P7" style:family="paragraph" style:parent-style-name="Standard">
      <style:paragraph-properties fo:margin-top="0.199cm" fo:margin-bottom="0cm" style:contextual-spacing="false" fo:line-height="115%" fo:text-align="justify" style:justify-single-word="false"/>
      <style:text-properties officeooo:rsid="0040adbd" officeooo:paragraph-rsid="000cea6c"/>
    </style:style>
    <style:style style:name="P8" style:family="paragraph" style:parent-style-name="Footnote">
      <style:paragraph-properties fo:text-align="justify" style:justify-single-word="false"/>
      <style:text-properties officeooo:rsid="005d6074" officeooo:paragraph-rsid="005d6074"/>
    </style:style>
    <style:style style:name="P9" style:family="paragraph" style:parent-style-name="Footnote">
      <style:paragraph-properties fo:text-align="justify" style:justify-single-word="false"/>
      <style:text-properties officeooo:rsid="005f3e58" officeooo:paragraph-rsid="005f3e58"/>
    </style:style>
    <style:style style:name="P10" style:family="paragraph" style:parent-style-name="Footnote">
      <style:paragraph-properties fo:text-align="justify" style:justify-single-word="false"/>
    </style:style>
    <style:style style:name="P11" style:family="paragraph" style:parent-style-name="Footnote">
      <style:paragraph-properties fo:text-align="justify" style:justify-single-word="false"/>
      <style:text-properties officeooo:paragraph-rsid="0084a5ed"/>
    </style:style>
    <style:style style:name="P12" style:family="paragraph" style:parent-style-name="Footnote">
      <style:text-properties officeooo:rsid="0082b87d" officeooo:paragraph-rsid="0082b87d"/>
    </style:style>
    <style:style style:name="P13" style:family="paragraph" style:parent-style-name="Footnote">
      <style:text-properties officeooo:rsid="005c14d8" officeooo:paragraph-rsid="005c14d8"/>
    </style:style>
    <style:style style:name="P14" style:family="paragraph" style:parent-style-name="Footnote">
      <style:text-properties officeooo:rsid="00618dff" officeooo:paragraph-rsid="00618dff"/>
    </style:style>
    <style:style style:name="P15" style:family="paragraph" style:parent-style-name="Footnote">
      <style:text-properties officeooo:rsid="00623f03" officeooo:paragraph-rsid="00623f03"/>
    </style:style>
    <style:style style:name="P16" style:family="paragraph" style:parent-style-name="Footnote">
      <style:text-properties officeooo:rsid="007706d4" officeooo:paragraph-rsid="007706d4"/>
    </style:style>
    <style:style style:name="P17" style:family="paragraph" style:parent-style-name="Footnote">
      <style:text-properties officeooo:rsid="00aa8909" officeooo:paragraph-rsid="00aa8909"/>
    </style:style>
    <style:style style:name="P18" style:family="paragraph" style:parent-style-name="Footnote">
      <style:text-properties officeooo:rsid="0077f95e" officeooo:paragraph-rsid="0077f95e"/>
    </style:style>
    <style:style style:name="P19"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1pt" fo:font-style="normal" fo:font-weight="bold" officeooo:rsid="008fb05a" officeooo:paragraph-rsid="000db157" style:font-size-asian="11pt" style:font-style-asian="normal" style:font-weight-asian="bold" style:font-size-complex="11pt" style:font-style-complex="normal" style:font-weight-complex="bold"/>
    </style:style>
    <style:style style:name="P20" style:family="paragraph" style:parent-style-name="Quotations" style:master-page-name="">
      <loext:graphic-properties draw:fill="none"/>
      <style:paragraph-properties fo:margin-left="0cm" fo:margin-right="0.499cm" fo:margin-top="0.499cm" fo:margin-bottom="0.4cm" style:contextual-spacing="false" fo:line-height="115%" fo:text-align="center" style:justify-single-word="false" fo:text-indent="0cm" style:auto-text-indent="false" style:page-number="auto" fo:background-color="transparent"/>
      <style:text-properties officeooo:paragraph-rsid="000db157"/>
    </style:style>
    <style:style style:name="P21" style:family="paragraph" style:parent-style-name="Quotations">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officeooo:paragraph-rsid="000db157"/>
    </style:style>
    <style:style style:name="P22" style:family="paragraph" style:parent-style-name="Quotations" style:master-page-name="">
      <loext:graphic-properties draw:fill="none"/>
      <style:paragraph-properties fo:margin-left="0.499cm" fo:margin-right="0.199cm" fo:margin-top="0.199cm" fo:margin-bottom="0cm" style:contextual-spacing="false" fo:line-height="115%" fo:text-align="start" style:justify-single-word="false" fo:text-indent="-0.3cm" style:auto-text-indent="false" style:page-number="auto" fo:background-color="transparent"/>
      <style:text-properties officeooo:paragraph-rsid="000db157"/>
    </style:style>
    <style:style style:name="P23" style:family="paragraph" style:parent-style-name="Quotations">
      <loext:graphic-properties draw:fill="none"/>
      <style:paragraph-properties fo:margin-left="0cm" fo:margin-right="0cm" fo:margin-top="0.101cm" fo:margin-bottom="0cm" style:contextual-spacing="false" fo:line-height="115%" fo:text-align="start" style:justify-single-word="false" fo:text-indent="0cm" style:auto-text-indent="false" fo:break-before="page" fo:background-color="transparent"/>
      <style:text-properties officeooo:paragraph-rsid="000db157"/>
    </style:style>
    <style:style style:name="P24" style:family="paragraph" style:parent-style-name="Quotations" style:list-style-name="L4">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25" style:family="paragraph" style:parent-style-name="Quotations" style:list-style-name="L4"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6" style:family="paragraph" style:parent-style-name="Quotations" style:list-style-name="L5">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27" style:family="paragraph" style:parent-style-name="Quotations" style:list-style-name="L5">
      <loext:graphic-properties draw:fill="none"/>
      <style:paragraph-properties fo:margin-top="0cm" fo:margin-bottom="0cm" style:contextual-spacing="false" fo:line-height="115%" fo:text-align="justify" style:justify-single-word="false" fo:background-color="transparent"/>
      <style:text-properties officeooo:paragraph-rsid="000db157"/>
    </style:style>
    <style:style style:name="P28" style:family="paragraph" style:parent-style-name="Quotations" style:list-style-name="L5"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9" style:family="paragraph" style:parent-style-name="Quotations" style:list-style-name="L5">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30" style:family="paragraph" style:parent-style-name="Quotations"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31"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0db157"/>
    </style:style>
    <style:style style:name="P32"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paragraph-rsid="000db157"/>
    </style:style>
    <style:style style:name="P33"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34"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35"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36"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37"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38"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39"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0"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1"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2"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3"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4"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5"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6"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7"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8"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9"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0"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1"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2"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3"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4"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5"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56"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57"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db157"/>
    </style:style>
    <style:style style:name="P58" style:family="paragraph" style:parent-style-name="Standard">
      <style:paragraph-properties fo:margin-left="0cm" fo:margin-right="0cm" fo:margin-top="0.101cm" fo:margin-bottom="0cm" style:contextual-spacing="false" fo:line-height="115%" fo:text-align="justify" style:justify-single-word="false" fo:orphans="2" fo:widows="2" fo:text-indent="0cm" style:auto-text-indent="false"/>
      <style:text-properties officeooo:paragraph-rsid="000db157"/>
    </style:style>
    <style:style style:name="P5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60"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0db157"/>
    </style:style>
    <style:style style:name="P61" style:family="paragraph" style:parent-style-name="Standard">
      <style:paragraph-properties fo:margin-left="0cm" fo:margin-right="0cm" fo:margin-top="0.3cm" fo:margin-bottom="0cm" style:contextual-spacing="false" fo:line-height="115%" fo:text-align="justify" style:justify-single-word="false" fo:orphans="2" fo:widows="2" fo:text-indent="0cm" style:auto-text-indent="false"/>
      <style:text-properties officeooo:paragraph-rsid="000db157"/>
    </style:style>
    <style:style style:name="P62" style:family="paragraph" style:parent-style-name="Standard" style:master-page-name="">
      <loext:graphic-properties draw:fill="none"/>
      <style:paragraph-properties fo:margin-left="0cm" fo:margin-right="-0.101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63" style:family="paragraph" style:parent-style-name="Standard" style:master-page-name="">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64" style:family="paragraph" style:parent-style-name="Standard">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fo:background-color="transparent"/>
      <style:text-properties officeooo:paragraph-rsid="000db157"/>
    </style:style>
    <style:style style:name="P65" style:family="paragraph" style:parent-style-name="Standard">
      <style:paragraph-properties fo:margin-top="0.199cm" fo:margin-bottom="0cm" style:contextual-spacing="false" fo:line-height="115%" fo:text-align="justify" style:justify-single-word="false"/>
      <style:text-properties officeooo:paragraph-rsid="000db157"/>
    </style:style>
    <style:style style:name="P66" style:family="paragraph" style:parent-style-name="Standard">
      <style:paragraph-properties fo:margin-top="0.201cm" fo:margin-bottom="0.101cm" style:contextual-spacing="false" fo:line-height="115%" fo:text-align="center" style:justify-single-word="false" fo:break-before="page"/>
      <style:text-properties style:font-name="Noto Sans1" fo:font-size="12pt" fo:font-style="normal" fo:font-weight="bold" officeooo:rsid="004ce0ab" officeooo:paragraph-rsid="000db157" style:font-size-asian="12pt" style:font-style-asian="normal" style:font-weight-asian="bold" style:font-size-complex="12pt" style:font-style-complex="normal" style:font-weight-complex="bold"/>
    </style:style>
    <style:style style:name="P67" style:family="paragraph" style:parent-style-name="Standard">
      <style:paragraph-properties fo:margin-top="0.201cm" fo:margin-bottom="0.101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201cm" fo:margin-bottom="0.101cm" style:contextual-spacing="false" fo:line-height="115%" fo:text-align="center"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38d74" officeooo:paragraph-rsid="000db157" style:font-size-asian="12pt" style:font-style-asian="normal" style:font-weight-asian="normal" style:font-size-complex="12pt" style:font-style-complex="normal" style:font-weight-complex="normal"/>
    </style:style>
    <style:style style:name="P71" style:family="paragraph" style:parent-style-name="Standard" style:list-style-name="L1">
      <style:paragraph-properties fo:margin-top="0.101cm" fo:margin-bottom="0.101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101cm" fo:margin-bottom="0cm" style:contextual-spacing="false" fo:line-height="115%" fo:text-align="justify" style:justify-single-word="false"/>
      <style:text-properties style:font-name="Noto Sans1" officeooo:rsid="000e5273" officeooo:paragraph-rsid="000db157"/>
    </style:style>
    <style:style style:name="P74" style:family="paragraph" style:parent-style-name="Standard">
      <style:paragraph-properties fo:margin-top="0.101cm" fo:margin-bottom="0cm" style:contextual-spacing="false" fo:line-height="115%" fo:text-align="justify" style:justify-single-word="false"/>
      <style:text-properties style:font-name="Noto Sans1" officeooo:paragraph-rsid="000db157"/>
    </style:style>
    <style:style style:name="P75" style:family="paragraph" style:parent-style-name="Standard">
      <style:paragraph-properties fo:line-height="115%" fo:text-align="justify" style:justify-single-word="false"/>
      <style:text-properties style:font-name="Noto Sans1" officeooo:paragraph-rsid="000db157"/>
    </style:style>
    <style:style style:name="T1" style:family="text">
      <style:text-properties officeooo:rsid="004f4021"/>
    </style:style>
    <style:style style:name="T2" style:family="text">
      <style:text-properties fo:font-style="italic" style:font-style-asian="italic" style:font-style-complex="italic"/>
    </style:style>
    <style:style style:name="T3" style:family="text">
      <style:text-properties fo:font-style="italic" officeooo:rsid="005af8e9"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538b7a"/>
    </style:style>
    <style:style style:name="T6" style:family="text">
      <style:text-properties style:font-name="Noto Sans1"/>
    </style:style>
    <style:style style:name="T7" style:family="text">
      <style:text-properties style:font-name="Noto Sans1" fo:font-style="normal" style:font-style-asian="normal" style:font-style-complex="normal"/>
    </style:style>
    <style:style style:name="T8" style:family="text">
      <style:text-properties style:font-name="Noto Sans1" fo:font-style="normal" officeooo:rsid="00394a50" style:font-style-asian="normal" style:font-style-complex="normal"/>
    </style:style>
    <style:style style:name="T9" style:family="text">
      <style:text-properties style:font-name="Noto Sans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Noto Sans1"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Noto Sans1" officeooo:rsid="00418d38"/>
    </style:style>
    <style:style style:name="T12" style:family="text">
      <style:text-properties style:font-name="Noto Sans1" officeooo:rsid="00446aa3"/>
    </style:style>
    <style:style style:name="T13" style:family="text">
      <style:text-properties style:font-name="Noto Sans1" fo:font-style="italic" fo:font-weight="normal" style:font-style-asian="italic" style:font-weight-asian="normal" style:font-style-complex="italic" style:font-weight-complex="normal"/>
    </style:style>
    <style:style style:name="T14" style:family="text">
      <style:text-properties style:font-name="Noto Sans1" fo:font-style="italic" fo:font-weight="normal" officeooo:rsid="00572710" style:font-style-asian="italic" style:font-weight-asian="normal" style:font-style-complex="italic" style:font-weight-complex="normal"/>
    </style:style>
    <style:style style:name="T15" style:family="text">
      <style:text-properties fo:font-size="11pt" fo:font-weight="bold" style:font-size-asian="11pt" style:font-weight-asian="bold" style:font-size-complex="11pt" style:font-weight-complex="bold"/>
    </style:style>
    <style:style style:name="T16" style:family="text">
      <style:text-properties officeooo:rsid="0054c9e2"/>
    </style:style>
    <style:style style:name="T17" style:family="text">
      <style:text-properties officeooo:rsid="005af8e9"/>
    </style:style>
    <style:style style:name="T18" style:family="text">
      <style:text-properties officeooo:rsid="00538d74"/>
    </style:style>
    <style:style style:name="T19" style:family="text">
      <style:text-properties officeooo:rsid="0050a8f1"/>
    </style:style>
    <style:style style:name="T20" style:family="text">
      <style:text-properties officeooo:rsid="0052280b"/>
    </style:style>
    <style:style style:name="T21" style:family="text">
      <style:text-properties officeooo:rsid="00808f8d"/>
    </style:style>
    <style:style style:name="T22" style:family="text">
      <style:text-properties officeooo:rsid="00558ae9"/>
    </style:style>
    <style:style style:name="T23" style:family="text">
      <style:text-properties officeooo:rsid="0057fc96"/>
    </style:style>
    <style:style style:name="T24" style:family="text">
      <style:text-properties officeooo:rsid="005c14d8"/>
    </style:style>
    <style:style style:name="T25" style:family="text">
      <style:text-properties officeooo:rsid="006c1c97"/>
    </style:style>
    <style:style style:name="T26" style:family="text">
      <style:text-properties fo:font-variant="normal" fo:text-transform="none" fo:color="#222222" loext:opacity="100%" style:font-name="Noto Sans1" fo:font-size="11pt" fo:letter-spacing="normal" fo:font-style="normal" fo:font-weight="bold" officeooo:rsid="00850d10" style:font-size-asian="11pt" style:font-style-asian="normal" style:font-weight-asian="bold" style:font-size-complex="11pt" style:font-style-complex="normal" style:font-weight-complex="bold" loext:padding="0cm" loext:border="none"/>
    </style:style>
    <style:style style:name="T27" style:family="text">
      <style:text-properties fo:font-variant="normal" fo:text-transform="none" fo:color="#222222" loext:opacity="100%" style:font-name="Noto Sans1" fo:font-size="11pt" fo:letter-spacing="normal" fo:font-style="normal" fo:font-weight="bold" officeooo:rsid="005af8e9" style:font-size-asian="11pt" style:font-style-asian="normal" style:font-weight-asian="bold" style:font-size-complex="11pt" style:font-style-complex="normal" style:font-weight-complex="bold" loext:padding="0cm" loext:border="none"/>
    </style:style>
    <style:style style:name="T28" style:family="text">
      <style:text-properties fo:font-variant="normal" fo:text-transform="none" fo:color="#222222" loext:opacity="100%" style:font-name="Noto Sans1" fo:font-size="11pt" fo:letter-spacing="normal" fo:font-style="normal" fo:font-weight="bold" officeooo:rsid="005b06eb" style:font-size-asian="11pt" style:font-style-asian="normal" style:font-weight-asian="bold" style:font-size-complex="11pt" style:font-style-complex="normal" style:font-weight-complex="bold" loext:padding="0cm" loext:border="none"/>
    </style:style>
    <style:style style:name="T29" style:family="text">
      <style:text-properties fo:font-variant="normal" fo:text-transform="none" fo:color="#222222" loext:opacity="100%" style:font-name="Noto Sans1" fo:font-size="11pt" fo:letter-spacing="normal" fo:font-style="normal" fo:font-weight="normal" officeooo:rsid="005c14d8" style:font-size-asian="11pt" style:font-style-asian="normal" style:font-size-complex="11pt" style:font-style-complex="normal" loext:padding="0cm" loext:border="none"/>
    </style:style>
    <style:style style:name="T30"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size-complex="12pt" style:font-style-complex="normal" loext:padding="0cm" loext:border="none"/>
    </style:style>
    <style:style style:name="T31" style:family="text">
      <style:text-properties fo:font-variant="normal" fo:text-transform="none" fo:color="#222222" loext:opacity="100%" style:font-name="Noto Sans1" fo:font-size="12pt" fo:letter-spacing="normal" fo:font-style="normal" fo:font-weight="normal" officeooo:rsid="00808f8d" style:font-size-asian="12pt" style:font-style-asian="normal" style:font-size-complex="12pt" style:font-style-complex="normal" loext:padding="0cm" loext:border="none"/>
    </style:style>
    <style:style style:name="T32" style:family="text">
      <style:text-properties fo:font-variant="normal" fo:text-transform="none" fo:color="#222222" loext:opacity="100%" style:font-name="Noto Sans1" fo:font-size="12pt" fo:letter-spacing="normal" fo:font-style="normal" fo:font-weight="normal" officeooo:rsid="00538d74" style:font-size-asian="12pt" style:font-style-asian="normal" style:font-size-complex="12pt" style:font-style-complex="normal" loext:padding="0cm" loext:border="none"/>
    </style:style>
    <style:style style:name="T33" style:family="text">
      <style:text-properties fo:font-variant="normal" fo:text-transform="none" fo:color="#222222" loext:opacity="100%" style:font-name="Noto Sans1" fo:font-size="12pt" fo:letter-spacing="normal" fo:font-style="normal" fo:font-weight="normal" officeooo:rsid="0086d4c9" style:font-size-asian="12pt" style:font-style-asian="normal" style:font-size-complex="12pt" style:font-style-complex="normal" loext:padding="0cm" loext:border="none"/>
    </style:style>
    <style:style style:name="T34" style:family="text">
      <style:text-properties fo:font-variant="normal" fo:text-transform="none" fo:color="#222222" loext:opacity="100%" style:font-name="Noto Sans1" fo:font-size="12pt" fo:letter-spacing="normal" fo:font-style="normal" fo:font-weight="normal" officeooo:rsid="00818809" style:font-size-asian="12pt" style:font-style-asian="normal" style:font-size-complex="12pt" style:font-style-complex="normal" loext:padding="0cm" loext:border="none"/>
    </style:style>
    <style:style style:name="T35" style:family="text">
      <style:text-properties fo:font-variant="normal" fo:text-transform="none" fo:color="#222222" loext:opacity="100%" style:font-name="Noto Sans1" fo:font-size="12pt" fo:letter-spacing="normal" fo:font-style="normal" fo:font-weight="normal" officeooo:rsid="0081a06b" style:font-size-asian="12pt" style:font-style-asian="normal" style:font-size-complex="12pt" style:font-style-complex="normal" loext:padding="0cm" loext:border="none"/>
    </style:style>
    <style:style style:name="T36" style:family="text">
      <style:text-properties fo:font-variant="normal" fo:text-transform="none" fo:color="#222222" loext:opacity="100%" style:font-name="Noto Sans1" fo:font-size="12pt" fo:letter-spacing="normal" fo:font-style="normal" fo:font-weight="normal" officeooo:rsid="00572710" style:font-size-asian="12pt" style:font-style-asian="normal" style:font-size-complex="12pt" style:font-style-complex="normal" loext:padding="0cm" loext:border="none"/>
    </style:style>
    <style:style style:name="T37" style:family="text">
      <style:text-properties fo:font-variant="normal" fo:text-transform="none" fo:color="#222222" loext:opacity="100%" style:font-name="Noto Sans1" fo:font-size="12pt" fo:letter-spacing="normal" fo:font-style="normal" fo:font-weight="normal" officeooo:rsid="0082b87d" style:font-size-asian="12pt" style:font-style-asian="normal" style:font-size-complex="12pt" style:font-style-complex="normal" loext:padding="0cm" loext:border="none"/>
    </style:style>
    <style:style style:name="T38" style:family="text">
      <style:text-properties fo:font-variant="normal" fo:text-transform="none" fo:color="#222222" loext:opacity="100%" style:font-name="Noto Sans1" fo:font-size="12pt" fo:letter-spacing="normal" fo:font-style="normal" fo:font-weight="normal" officeooo:rsid="0086f205" style:font-size-asian="12pt" style:font-style-asian="normal" style:font-size-complex="12pt" style:font-style-complex="normal" loext:padding="0cm" loext:border="none"/>
    </style:style>
    <style:style style:name="T39"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size-complex="12pt" style:font-style-complex="normal" loext:padding="0cm" loext:border="none"/>
    </style:style>
    <style:style style:name="T40" style:family="text">
      <style:text-properties fo:font-variant="normal" fo:text-transform="none" fo:color="#222222" loext:opacity="100%" style:font-name="Noto Sans1" fo:font-size="12pt" fo:letter-spacing="normal" fo:font-style="normal" fo:font-weight="normal" officeooo:rsid="0084a5ed" style:font-size-asian="12pt" style:font-style-asian="normal" style:font-size-complex="12pt" style:font-style-complex="normal" loext:padding="0cm" loext:border="none"/>
    </style:style>
    <style:style style:name="T41" style:family="text">
      <style:text-properties fo:font-variant="normal" fo:text-transform="none" fo:color="#222222" loext:opacity="100%" style:font-name="Noto Sans1" fo:font-size="12pt" fo:letter-spacing="normal" fo:font-style="normal" fo:font-weight="normal" officeooo:rsid="00008d96" style:font-size-asian="12pt" style:font-style-asian="normal" style:font-size-complex="12pt" style:font-style-complex="normal" loext:padding="0cm" loext:border="none"/>
    </style:style>
    <style:style style:name="T42" style:family="text">
      <style:text-properties fo:font-variant="normal" fo:text-transform="none" fo:color="#222222" loext:opacity="100%" style:font-name="Noto Sans1" fo:font-size="12pt" fo:letter-spacing="normal" fo:font-style="normal" fo:font-weight="normal" officeooo:rsid="0057fc96" style:font-size-asian="12pt" style:font-style-asian="normal" style:font-size-complex="12pt" style:font-style-complex="normal" loext:padding="0cm" loext:border="none"/>
    </style:style>
    <style:style style:name="T43" style:family="text">
      <style:text-properties fo:font-variant="normal" fo:text-transform="none" fo:color="#222222" loext:opacity="100%" style:font-name="Noto Sans1" fo:font-size="12pt" fo:letter-spacing="normal" fo:font-style="normal" fo:font-weight="normal" officeooo:rsid="0003151e" style:font-size-asian="12pt" style:font-style-asian="normal" style:font-size-complex="12pt" style:font-style-complex="normal" loext:padding="0cm" loext:border="none"/>
    </style:style>
    <style:style style:name="T44" style:family="text">
      <style:text-properties fo:font-variant="normal" fo:text-transform="none" fo:color="#222222" loext:opacity="100%" style:font-name="Noto Sans1" fo:font-size="12pt" fo:letter-spacing="normal" fo:font-style="normal" fo:font-weight="normal" officeooo:rsid="0003bb5f" style:font-size-asian="12pt" style:font-style-asian="normal" style:font-size-complex="12pt" style:font-style-complex="normal" loext:padding="0cm" loext:border="none"/>
    </style:style>
    <style:style style:name="T45"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size-complex="12pt" style:font-style-complex="normal" loext:padding="0cm" loext:border="none"/>
    </style:style>
    <style:style style:name="T46" style:family="text">
      <style:text-properties fo:font-variant="normal" fo:text-transform="none" fo:color="#222222" loext:opacity="100%" style:font-name="Noto Sans1" fo:font-size="12pt" fo:letter-spacing="normal" fo:font-style="normal" fo:font-weight="normal" officeooo:rsid="005c14d8" style:font-size-asian="12pt" style:font-style-asian="normal" style:font-size-complex="12pt" style:font-style-complex="normal" loext:padding="0cm" loext:border="none"/>
    </style:style>
    <style:style style:name="T47"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size-complex="12pt" style:font-style-complex="normal" loext:padding="0cm" loext:border="none"/>
    </style:style>
    <style:style style:name="T48" style:family="text">
      <style:text-properties fo:font-variant="normal" fo:text-transform="none" fo:color="#222222" loext:opacity="100%" style:font-name="Noto Sans1" fo:font-size="12pt" fo:letter-spacing="normal" fo:font-style="normal" fo:font-weight="normal" officeooo:rsid="005ca1fb" style:font-size-asian="12pt" style:font-style-asian="normal" style:font-size-complex="12pt" style:font-style-complex="normal" loext:padding="0cm" loext:border="none"/>
    </style:style>
    <style:style style:name="T49"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222222" loext:opacity="100%" style:font-name="Noto Sans1" fo:font-size="12pt" fo:letter-spacing="normal" fo:font-style="normal" fo:font-weight="normal" officeooo:rsid="005d6074" style:font-size-asian="12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222222" loext:opacity="100%" style:font-name="Noto Sans1" fo:font-size="12pt" fo:letter-spacing="normal" fo:font-style="normal" fo:font-weight="normal" officeooo:rsid="00623f03" style:font-size-asian="12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222222" loext:opacity="100%" style:font-name="Noto Sans1" fo:font-size="12pt" fo:letter-spacing="normal" fo:font-style="normal" fo:font-weight="normal" officeooo:rsid="00618dff" style:font-size-asian="12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222222" loext:opacity="100%" style:font-name="Noto Sans1" fo:font-size="12pt" fo:letter-spacing="normal" fo:font-style="normal" fo:font-weight="normal" officeooo:rsid="006c1c97" style:font-size-asian="12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222222" loext:opacity="100%" style:font-name="Noto Sans1" fo:font-size="12pt" fo:letter-spacing="normal" fo:font-style="normal" fo:font-weight="normal" officeooo:rsid="006dd619"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222222" loext:opacity="100%" style:font-name="Noto Sans1"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222222" loext:opacity="100%" style:font-name="Noto Sans1" fo:font-size="12pt" fo:letter-spacing="normal" fo:font-style="normal" fo:font-weight="normal" officeooo:rsid="00657c18"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222222" loext:opacity="100%" style:font-name="Noto Sans1" fo:font-size="12pt" fo:letter-spacing="normal" fo:font-style="normal" fo:font-weight="normal" officeooo:rsid="0065a674"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222222" loext:opacity="100%" style:font-name="Noto Sans1" fo:font-size="12pt" fo:letter-spacing="normal" fo:font-style="normal" fo:font-weight="normal" officeooo:rsid="00696e76"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222222" loext:opacity="100%" style:font-name="Noto Sans1" fo:font-size="12pt" fo:letter-spacing="normal" fo:font-style="normal" fo:font-weight="normal" officeooo:rsid="006787a4"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222222" loext:opacity="100%" style:font-name="Noto Sans1" fo:font-size="12pt" fo:letter-spacing="normal" fo:font-style="normal" fo:font-weight="normal" officeooo:rsid="008aef35"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222222" loext:opacity="100%" style:font-name="Noto Sans1" fo:font-size="12pt" fo:letter-spacing="normal" fo:font-style="normal" fo:font-weight="normal" officeooo:rsid="006f04a3"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222222" loext:opacity="100%" style:font-name="Noto Sans1" fo:font-size="12pt" fo:letter-spacing="normal" fo:font-style="normal" fo:font-weight="normal" officeooo:rsid="000e5273"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222222" loext:opacity="100%" style:font-name="Noto Sans1" fo:font-size="12pt" fo:letter-spacing="normal" fo:font-style="normal" fo:font-weight="normal" officeooo:rsid="00764323"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222222" loext:opacity="100%" style:font-name="Noto Sans1" fo:font-size="12pt" fo:letter-spacing="normal" fo:font-style="normal" fo:font-weight="normal" officeooo:rsid="000de9d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222222" loext:opacity="100%" style:font-name="Noto Sans1" fo:font-size="12pt" fo:letter-spacing="normal" fo:font-style="normal" fo:font-weight="normal" officeooo:rsid="006aeb05"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222222" loext:opacity="100%" style:font-name="Noto Sans1" fo:font-size="12pt" fo:letter-spacing="normal" fo:font-style="normal" fo:font-weight="normal" officeooo:rsid="0009c0e2"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222222" loext:opacity="100%" style:font-name="Noto Sans1" fo:font-size="12pt" fo:letter-spacing="normal" fo:font-style="normal" fo:font-weight="normal" officeooo:rsid="0071dacb"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222222" loext:opacity="100%" style:font-name="Noto Sans1" fo:font-size="12pt" fo:letter-spacing="normal" fo:font-style="normal" fo:font-weight="normal" officeooo:rsid="008bb650"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222222" loext:opacity="100%" style:font-name="Noto Sans1" fo:font-size="12pt" fo:letter-spacing="normal" fo:font-style="normal" fo:font-weight="normal" officeooo:rsid="006f130a"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222222" loext:opacity="100%" style:font-name="Noto Sans1" fo:font-size="12pt" fo:letter-spacing="normal" fo:font-style="normal" fo:font-weight="normal" officeooo:rsid="008c60d2"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222222" loext:opacity="100%" style:font-name="Noto Sans1" fo:font-size="12pt" fo:letter-spacing="normal" fo:font-style="normal" fo:font-weight="normal" officeooo:rsid="00737e21"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222222" loext:opacity="100%" style:font-name="Noto Sans1" fo:font-size="12pt" fo:letter-spacing="normal" fo:font-style="normal" fo:font-weight="normal" officeooo:rsid="005b06eb"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222222" loext:opacity="100%" style:font-name="Noto Sans1"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222222" loext:opacity="100%" style:font-name="Noto Sans1"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222222" loext:opacity="100%" style:font-name="Noto Sans1"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222222" loext:opacity="100%" style:font-name="Noto Sans1" fo:font-size="12pt" fo:letter-spacing="normal" fo:font-style="normal" fo:font-weight="normal" officeooo:rsid="005bffd5"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222222" loext:opacity="100%" style:font-name="Noto Sans1" fo:font-size="12pt" fo:letter-spacing="normal" fo:font-style="normal" fo:font-weight="normal" officeooo:rsid="009a67bf" style:font-size-asian="12pt" style:font-style-asian="normal" style:font-weight-asian="normal" style:font-size-complex="12pt" style:font-style-complex="normal" style:font-weight-complex="normal" loext:padding="0cm" loext:border="none"/>
    </style:style>
    <style:style style:name="T81" style:family="text">
      <style:text-properties fo:font-variant="normal" fo:text-transform="none" fo:color="#222222" loext:opacity="100%" style:font-name="Noto Sans1" fo:font-size="12pt" fo:letter-spacing="normal" fo:font-style="normal" fo:font-weight="normal" officeooo:rsid="007ac290"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222222" loext:opacity="100%" style:font-name="Noto Sans1" fo:font-size="12pt" fo:letter-spacing="normal" fo:font-style="normal" fo:font-weight="normal" officeooo:rsid="009b4c79" style:font-size-asian="12pt" style:font-style-asian="normal" style:font-weight-asian="normal" style:font-size-complex="12pt" style:font-style-complex="normal" style:font-weight-complex="normal" loext:padding="0cm" loext:border="none"/>
    </style:style>
    <style:style style:name="T83" style:family="text">
      <style:text-properties fo:font-variant="normal" fo:text-transform="none" fo:color="#222222" loext:opacity="100%" style:font-name="Noto Sans1" fo:font-size="12pt" fo:letter-spacing="normal" fo:font-style="normal" fo:font-weight="normal" officeooo:rsid="0097f051" style:font-size-asian="12pt" style:font-style-asian="normal" style:font-weight-asian="normal" style:font-size-complex="12pt" style:font-style-complex="normal" style:font-weight-complex="normal" loext:padding="0cm" loext:border="none"/>
    </style:style>
    <style:style style:name="T84" style:family="text">
      <style:text-properties fo:font-variant="normal" fo:text-transform="none" fo:color="#222222" loext:opacity="100%" style:font-name="Noto Sans1" fo:font-size="12pt" fo:letter-spacing="normal" fo:font-style="normal" fo:font-weight="normal" officeooo:rsid="0077f95e" style:font-size-asian="12pt" style:font-style-asian="normal" style:font-weight-asian="normal" style:font-size-complex="12pt" style:font-style-complex="normal" style:font-weight-complex="normal" loext:padding="0cm" loext:border="none"/>
    </style:style>
    <style:style style:name="T85" style:family="text">
      <style:text-properties fo:font-variant="normal" fo:text-transform="none" fo:color="#222222" loext:opacity="100%" style:font-name="Noto Sans1" fo:font-size="12pt" fo:letter-spacing="normal" fo:font-style="normal" fo:font-weight="normal" officeooo:rsid="0097a67f" style:font-size-asian="12pt" style:font-style-asian="normal" style:font-weight-asian="normal" style:font-size-complex="12pt" style:font-style-complex="normal" style:font-weight-complex="normal" loext:padding="0cm" loext:border="none"/>
    </style:style>
    <style:style style:name="T86" style:family="text">
      <style:text-properties fo:font-variant="normal" fo:text-transform="none" fo:color="#222222" loext:opacity="100%" style:font-name="Noto Sans1" fo:font-size="12pt" fo:letter-spacing="normal" fo:font-style="normal" fo:font-weight="bold" officeooo:rsid="005af8e9" style:font-size-asian="12pt" style:font-style-asian="normal" style:font-weight-asian="bold" style:font-size-complex="12pt" style:font-style-complex="normal" style:font-weight-complex="bold" loext:padding="0cm" loext:border="none"/>
    </style:style>
    <style:style style:name="T87" style:family="text">
      <style:text-properties fo:font-variant="normal" fo:text-transform="none" fo:color="#222222" loext:opacity="100%" style:font-name="Noto Sans1" fo:font-size="12pt" fo:letter-spacing="normal" fo:font-style="normal" fo:font-weight="bold" officeooo:rsid="00850d10" style:font-size-asian="12pt" style:font-style-asian="normal" style:font-weight-asian="bold" style:font-size-complex="12pt" style:font-style-complex="normal" style:font-weight-complex="bold" loext:padding="0cm" loext:border="none"/>
    </style:style>
    <style:style style:name="T88"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size-complex="12pt" style:font-style-complex="italic" loext:padding="0cm" loext:border="none"/>
    </style:style>
    <style:style style:name="T89"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222222" loext:opacity="100%" style:font-name="Noto Sans1"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color="#222222" loext:opacity="100%" style:font-name="Noto Sans1" fo:font-size="12pt" fo:letter-spacing="normal" fo:font-weight="normal" officeooo:rsid="00008d96" style:font-size-asian="12pt" style:font-size-complex="12pt" loext:padding="0cm" loext:border="none"/>
    </style:style>
    <style:style style:name="T92" style:family="text">
      <style:text-properties fo:font-variant="normal" fo:text-transform="none" fo:color="#222222" loext:opacity="100%" style:font-name="Noto Sans1" fo:letter-spacing="normal" fo:font-weight="normal" officeooo:rsid="00008d96" loext:padding="0cm" loext:border="none"/>
    </style:style>
    <style:style style:name="T93" style:family="text">
      <style:text-properties fo:font-variant="normal" fo:text-transform="none" fo:color="#222222" loext:opacity="100%" style:font-name="Liberation Serif" fo:font-size="12pt" fo:letter-spacing="normal" fo:font-style="italic" fo:font-weight="normal" officeooo:rsid="005c14d8" style:font-size-asian="12pt" style:font-style-asian="italic" style:font-size-complex="12pt" style:font-style-complex="italic" loext:padding="0cm" loext:border="none"/>
    </style:style>
    <style:style style:name="T94" style:family="text">
      <style:text-properties fo:font-variant="normal" fo:text-transform="none" fo:color="#222222" loext:opacity="100%" style:font-name="Liberation Serif"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95" style:family="text">
      <style:text-properties fo:font-variant="normal" fo:text-transform="none" fo:color="#222222" loext:opacity="100%" style:font-name="Liberation Serif" fo:font-size="12pt" fo:letter-spacing="normal" fo:font-style="italic" fo:font-weight="normal" officeooo:rsid="00639354" style:font-size-asian="12pt" style:font-style-asian="italic" style:font-weight-asian="normal" style:font-size-complex="12pt" style:font-style-complex="italic" style:font-weight-complex="normal" loext:padding="0cm" loext:border="none"/>
    </style:style>
    <style:style style:name="T96" style:family="text">
      <style:text-properties fo:font-variant="normal" fo:text-transform="none" fo:color="#222222" loext:opacity="100%" style:font-name="Liberation Serif" fo:font-size="12pt" fo:letter-spacing="normal" fo:font-style="italic" fo:font-weight="normal" officeooo:rsid="00696e76" style:font-size-asian="12pt" style:font-style-asian="italic" style:font-weight-asian="normal" style:font-size-complex="12pt" style:font-style-complex="italic" style:font-weight-complex="normal" loext:padding="0cm" loext:border="none"/>
    </style:style>
    <style:style style:name="T97" style:family="text">
      <style:text-properties fo:font-variant="normal" fo:text-transform="none" fo:color="#222222" loext:opacity="100%" style:font-name="Liberation Serif" fo:font-size="12pt" fo:letter-spacing="normal" fo:font-style="italic" fo:font-weight="normal" officeooo:rsid="00ae96c0" style:font-size-asian="12pt" style:font-style-asian="italic" style:font-weight-asian="normal" style:font-size-complex="12pt" style:font-style-complex="italic" style:font-weight-complex="normal" loext:padding="0cm" loext:border="none"/>
    </style:style>
    <style:style style:name="T98" style:family="text">
      <style:text-properties fo:font-variant="normal" fo:text-transform="none" fo:color="#222222" loext:opacity="100%" style:font-name="Liberation Serif" fo:font-size="12pt" fo:letter-spacing="normal" fo:font-style="italic" fo:font-weight="normal" officeooo:rsid="00657c18" style:font-size-asian="12pt" style:font-style-asian="italic" style:font-weight-asian="normal" style:font-size-complex="12pt" style:font-style-complex="italic" style:font-weight-complex="normal" loext:padding="0cm" loext:border="none"/>
    </style:style>
    <style:style style:name="T99" style:family="text">
      <style:text-properties fo:font-variant="normal" fo:text-transform="none" fo:color="#222222" loext:opacity="100%" style:font-name="Liberation Serif"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100" style:family="text">
      <style:text-properties fo:font-variant="normal" fo:text-transform="none" fo:color="#222222" loext:opacity="100%"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101" style:family="text">
      <style:text-properties fo:font-variant="normal" fo:text-transform="none" fo:color="#222222" loext:opacity="100%" fo:font-size="12pt" fo:letter-spacing="normal" fo:font-style="normal" fo:font-weight="normal" officeooo:rsid="005bec25" style:font-size-asian="12pt" style:font-style-asian="normal" style:font-weight-asian="normal" style:font-size-complex="12pt" style:font-style-complex="normal" style:font-weight-complex="normal" loext:padding="0cm" loext:border="none"/>
    </style:style>
    <style:style style:name="T102" style:family="text">
      <style:text-properties fo:font-variant="normal" fo:text-transform="none" fo:color="#222222" loext:opacity="100%"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103" style:family="text">
      <style:text-properties fo:font-variant="normal" fo:text-transform="none" fo:color="#222222" loext:opacity="100%"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104" style:family="text">
      <style:text-properties fo:font-variant="normal" fo:text-transform="none" fo:color="#222222" loext:opacity="100%"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105" style:family="text">
      <style:text-properties fo:font-variant="normal" fo:text-transform="none" fo:color="#222222" loext:opacity="100%"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106" style:family="text">
      <style:text-properties fo:font-variant="normal" fo:text-transform="none" fo:color="#222222" loext:opacity="100%" fo:font-size="12pt" fo:letter-spacing="normal" fo:font-style="italic" fo:font-weight="normal" officeooo:rsid="00aa8909" style:font-size-asian="12pt" style:font-style-asian="italic" style:font-weight-asian="normal" style:font-size-complex="12pt" style:font-style-complex="italic" style:font-weight-complex="normal" loext:padding="0cm" loext:border="none"/>
    </style:style>
    <style:style style:name="T107" style:family="text">
      <style:text-properties fo:font-variant="normal" fo:text-transform="none" fo:color="#222222" loext:opacity="100%" fo:font-size="11pt" fo:letter-spacing="normal" fo:font-style="normal" fo:font-weight="bold" officeooo:rsid="007ca108" style:font-size-asian="11pt" style:font-style-asian="normal" style:font-weight-asian="bold" style:font-size-complex="11pt" style:font-style-complex="normal" style:font-weight-complex="bold" loext:padding="0cm" loext:border="none"/>
    </style:style>
    <style:style style:name="T108" style:family="text">
      <style:text-properties officeooo:rsid="00862ac3"/>
    </style:style>
    <style:style style:name="T109" style:family="text">
      <style:text-properties officeooo:rsid="0084a5ed"/>
    </style:style>
    <style:style style:name="T110" style:family="text">
      <style:text-properties officeooo:rsid="0086f205"/>
    </style:style>
    <style:style style:name="T111" style:family="text">
      <style:text-properties officeooo:rsid="00572710"/>
    </style:style>
    <style:style style:name="T112" style:family="text">
      <style:text-properties officeooo:rsid="007706d4"/>
    </style:style>
    <style:style style:name="T113" style:family="text">
      <style:text-properties officeooo:rsid="00ae96c0"/>
    </style:style>
    <style:style style:name="T114" style:family="text">
      <style:text-properties officeooo:rsid="000ba69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L’arte del dialogo</text:p>
      <text:p text:style-name="P67">Socrate non si dava affatto l’aria di voler istruire gli altri: al contrario dava l’impressione di non sapere, considerava molto importante il contatto diretto con l’interlocutore, lo scambio di idee era necessario al fine di tirar fuori pensieri assolutamente personali, <text:span text:style-name="T16">incalzava l’altro ripetutamente con domande (come fa il cane che morde la caviglia del malcapitato) </text:span><text:span text:style-name="T17">e servendosi dell’</text:span><text:span text:style-name="T3">ironia</text:span><text:span text:style-name="T17">, parola che in greco vuol dire “interrogare dissimulando” finge sempre di voler imparare dall’interlocutore, gli chiede sempre continue precisazioni e alla fine lo mette di fronte alle sue stesse contraddizioni. I pregiudizi, i falsi ideali, le superstizioni che prima occupavano la sua mente, vengono estirpati come erba <text:s/>che invade un campo incolto, e la mente, liberata da queste scorie è pronta per far nascere la vera conoscenza. </text:span><text:span text:style-name="T18">E’</text:span><text:span text:style-name="T17"> qui che interviene la </text:span><text:span text:style-name="T3">maieutica</text:span><text:span text:style-name="T17"> ovvero “l’arte di far partorire le menti” </text:span><text:span text:style-name="T19">. L</text:span>a conoscenza viene da dentro, semplicemente usando la ragione <text:span text:style-name="T17">e Socrate non si presenta come depositario di una “sua verità” al massimo aiuta gli altri a cercarla in se stessi:</text:span></text:p>
      <text:p text:style-name="P69"><text:span text:style-name="T17"><text:s/>“</text:span><text:span text:style-name="T3">giacché <text:s/>sono sterile di sapienza, ed è per questo che il dio mi costrinse a far da ostetrico, pur vietandomi di generare”</text:span><text:span text:style-name="T17">. </text:span></text:p>
      <text:p text:style-name="P68"><text:soft-page-break/>Recitando la parte di colui che non sa<text:span text:style-name="T19">peva niente, un po' stupido e sprovveduto</text:span>, Socrate, <text:span text:style-name="T17">per esercitare la </text:span><text:span text:style-name="T3">maieutica, </text:span><text:s/><text:span text:style-name="T17">doveva</text:span><text:span text:style-name="T19"> familiarizzare ed entrare nell’intimo dell’altro, stabil</text:span><text:span text:style-name="T17">ire </text:span><text:span text:style-name="T19">un dialogo privo di pregiudizi e preconcetti </text:span><text:span text:style-name="T17">ovvero di improvvisare il suo discorso senza punti fermi, </text:span><text:span text:style-name="T20">ma </text:span><text:span text:style-name="T17">che </text:span><text:span text:style-name="T20">si adattavano alla situazione dell’interlocutore </text:span><text:span text:style-name="T16">e tutto questo </text:span>avveniva pubblicamente in una piazza <text:span text:style-name="T16">o in una strada. </text:span><text:span text:style-name="T18">Nel dialogo più breve di Platone, Il Lachete</text:span><text:span text:style-name="T3"><text:note text:id="ftn7" text:note-class="footnote"><text:note-citation>1</text:note-citation><text:note-body><text:p text:style-name="P8">Il Lachete è un dialogo nel quale Socrate fornisce un esempio di quello che, secondo Platone, era il suo modo di interrogare gli interlocutori.</text:p></text:note-body></text:note></text:span><text:span text:style-name="T3">, </text:span><text:span text:style-name="T18">un noto generale ateniese, che viene interpellato da Lisimaco e Melesia, due giovani uomini interessati ad apprendere la disciplina della scherma per sviluppare il coraggio. Lachete, inizialmente entusiasta, si ritrova presto in difficoltà nel definire chiaramente cosa sia il coraggio, rivelando le sue stesse perplessità sulla sua essenza e sulla sua relazione con la disciplina della scherma.</text:span></text:p>
      <text:p text:style-name="P70">Socrate, presente alla conversazione, prende parte al dibattito, sfidando Lachete e i suoi interlocutori a definire il coraggio in modo preciso e coerente. Socrate dimostra che le loro definizioni sono vaghe e ambigue, portandoli a riconoscere che non riescono a cogliere l'essenza del coraggio. </text:p>
      <text:p text:style-name="P70">Platone evidenzia le capacità investigative di Socrate e <text:span text:style-name="T17">racconta che “chiunque veni</text:span>sse<text:span text:style-name="T17"> avvicinato da Socrate e </text:span><text:soft-page-break/><text:span text:style-name="T17">si metteva a parlare con lui, qualunque fosse l’argomento della conversazione, non poteva più andar via senza aver prima reso conto di sé”.</text:span></text:p>
      <text:p text:style-name="P70"><text:span text:style-name="T17">Diogene Laerzio</text:span><text:span text:style-name="T17"><text:note text:id="ftn8" text:note-class="footnote"><text:note-citation>2</text:note-citation><text:note-body><text:p text:style-name="P9">Storico greco antico, la cui opera <text:span text:style-name="T2">Vite dei filosofi</text:span> è una delle fonti principali sulla storia della filosofia greca.</text:p></text:note-body></text:note></text:span><text:span text:style-name="T17"> aggiunge che, molte volte “i suoi interlocutori, per potersene liberare, lo prendevano a pugni </text:span><text:span text:style-name="T21">o</text:span><text:span text:style-name="T17"> gli strappavano i capelli”.</text:span></text:p>
      <text:p text:style-name="P68"><text:span text:style-name="T16">Questo</text:span> comportamento provocatorio era considerato <text:span text:style-name="T16">indisponente e </text:span>irritante <text:span text:style-name="T16">da</text:span> coloro che <text:span text:style-name="T16">appartenevano alla classe dei benestanti e da coloro che godevano di una certa reputazione in campo politico.</text:span> <text:span text:style-name="T22">In alcune situazioni fare domande poteva essere più pericoloso se tendevano a mettere in discussione l’auto</text:span><text:span text:style-name="T18">r</text:span><text:span text:style-name="T22">ità.</text:span></text:p>
      <text:p text:style-name="P67"><text:span text:style-name="T23">Socrate </text:span>fu accusato <text:span text:style-name="T24">(più che accuse furono dei pretesti per liberarsi di un perso</text:span><text:span text:style-name="T25">na</text:span><text:span text:style-name="T24">ggio scomodo) da alcuni esponenti </text:span><text:span text:style-name="T23">della classe </text:span><text:span text:style-name="T24">nobiliare e intellettu</text:span><text:span text:style-name="T18">a</text:span><text:span text:style-name="T24">le,</text:span><text:span text:style-name="T23"> </text:span>di <text:span text:style-name="T19">sovvertire l’ordine precostituito delle cose </text:span>e di portare i giovani alla perdizione. <text:span text:style-name="T19">Venne</text:span> processato <text:span text:style-name="T19">e</text:span> giudicato colpevole, <text:span text:style-name="T19">fu condannato a </text:span>morte. Avrebbe potuto chiedere la grazia a patto di lasciare Atene e di rinnegare tutte le sue convinzioni, ma questo sarebbe stato in contrasto con la sua coscienza e sopratutto con la verità che poneva al di sopra di tutto anche della sua stessa vita. </text:p>
      <text:p text:style-name="P72"><text:soft-page-break/>Platone ha dedicato al processo e alla morte di Socrate ben quattro dialoghi:</text:p>
      <text:list text:style-name="L1">
        <text:list-item>
          <text:p text:style-name="P71">l’<text:span text:style-name="T2">Eutifrone </text:span>dove vediamo il filosofo, ancora libero, recarsi in tribunale per conoscere le accuse che gli sono state mosse da Meleto;</text:p>
        </text:list-item>
        <text:list-item>
          <text:p text:style-name="P71">l’<text:span text:style-name="T2">Apologia</text:span> con la descrizione del processo;</text:p>
        </text:list-item>
        <text:list-item>
          <text:p text:style-name="P71">il <text:span text:style-name="T2">Critone</text:span> con la visita in carcere del suo amico più caro;</text:p>
        </text:list-item>
        <text:list-item>
          <text:p text:style-name="P71">il <text:span text:style-name="T2">Fedone</text:span> con gli ultimi istanti di vita ed il discorso dell’immortalità dell’anima. </text:p>
        </text:list-item>
      </text:list>
      <text:p text:style-name="P57"><text:span text:style-name="Strong_20_Emphasis"><text:span text:style-name="T26">Eutifrone</text:span></text:span><text:span text:style-name="Strong_20_Emphasis"><text:span text:style-name="T30"> - </text:span></text:span><text:span text:style-name="Strong_20_Emphasis"><text:span text:style-name="T31">Il dialogo tra Socrate e Eutifrone si svolge presso il portico dell’arconte, dove entrambi sono in coda per parlare con il magistrato che nella democrazia ateniese, aveva ereditato le funzioni giudiziarie e religiose tipiche della regalità arcaica. Al suo ruolo si aggiungeva il compito di assegnare i casi ai tribunali popolari dell'Eliea</text:span></text:span><text:span text:style-name="Strong_20_Emphasis"><text:span text:style-name="T31"><text:note text:id="ftn9" text:note-class="footnote"><text:note-citation>3</text:note-citation><text:note-body><text:p text:style-name="P3"><text:span text:style-name="T108">E</text:span>ra il massimo tribunale popolare dell’antica Atene, costituito da cittadini con più di trenta anni, sorteggiati annualmente. Tale tribunale si occupava della gran parte dei processi celebrati ad Atene, ma facevano eccezione i delitti di sangue.</text:p></text:note-body></text:note></text:span></text:span><text:span text:style-name="Strong_20_Emphasis"><text:span text:style-name="T31">. Chi si recava al suo portico, dunque, poteva farlo o per ricevere la notificazione di un'accusa, com'è il caso di Socrate, o per presentare un'accusa contro qualcun altro, </text:span></text:span><text:span text:style-name="Strong_20_Emphasis"><text:span text:style-name="T32">come</text:span></text:span><text:span text:style-name="Strong_20_Emphasis"><text:span text:style-name="T31"> è il caso di Eutifrone.</text:span></text:span></text:p>
      <text:p text:style-name="P58"><text:span text:style-name="Strong_20_Emphasis"><text:span text:style-name="T31">Eutifrone è sorpreso di incontrare Socrate in un luogo a lui così poco consueto. In effetti per Socrate era la prima </text:span></text:span><text:soft-page-break/><text:span text:style-name="Strong_20_Emphasis"><text:span text:style-name="T31">volta che veniva convocato dall’arconte non avendo mai avuto a che fare con la giustizia. Gli spiega di aver ricevuto un'accusa da un tale Meleto, il quale, ritenendo che egli corromp</text:span></text:span><text:span text:style-name="Strong_20_Emphasis"><text:span text:style-name="T33">eva</text:span></text:span><text:span text:style-name="Strong_20_Emphasis"><text:span text:style-name="T31"> i giovani <text:s/>è corso dalla polis </text:span></text:span><text:span text:style-name="Strong_20_Emphasis"><text:span text:style-name="T33">per denunciarlo così </text:span></text:span><text:span text:style-name="Strong_20_Emphasis"><text:span text:style-name="T31">come si corre dalla mamma perché non </text:span></text:span><text:span text:style-name="Strong_20_Emphasis"><text:span text:style-name="T33">si </text:span></text:span><text:span text:style-name="Strong_20_Emphasis"><text:span text:style-name="T31">è in grado di difendersi da sé. </text:span></text:span></text:p>
      <text:p text:style-name="P58"><text:span text:style-name="Strong_20_Emphasis"><text:span text:style-name="T31">L'ironia di questa narrazione fa intuire la presenza di persone e fazioni che si accusano vicendevolmente per un </text:span></text:span><text:span text:style-name="Strong_20_Emphasis"><text:span text:style-name="T33">reato di calunnia o diffamazione</text:span></text:span><text:span text:style-name="Strong_20_Emphasis"><text:span text:style-name="T31"> o per </text:span></text:span><text:span text:style-name="Strong_20_Emphasis"><text:span text:style-name="T33">una accusa di un reato inesistente allo scopo di ottenere un vantaggio nella </text:span></text:span><text:span text:style-name="Strong_20_Emphasis"><text:span text:style-name="T31">carriera politica.</text:span></text:span></text:p>
      <text:p text:style-name="P58"><text:span text:style-name="Strong_20_Emphasis"><text:span text:style-name="T31">Eutifrone, senza cogliere l'ironia di Socrate, gli chiede chiarimenti sui capi dell'accusa. Socrate spiega che il suo accusatore lo rappresenta come un creatore di divinità nuove </text:span></text:span><text:span text:style-name="Strong_20_Emphasis"><text:span text:style-name="T33">e </text:span></text:span><text:span text:style-name="Strong_20_Emphasis"><text:span text:style-name="T31">non </text:span></text:span><text:span text:style-name="Strong_20_Emphasis"><text:span text:style-name="T33">riconosce</text:span></text:span><text:span text:style-name="Strong_20_Emphasis"><text:span text:style-name="T31"> quelle antiche.</text:span></text:span></text:p>
      <text:p text:style-name="P60"><text:span text:style-name="Strong_20_Emphasis"><text:span text:style-name="T31">La religione greca era una religione civica politeistica, i cui contenuti venivano formati e tramandati dal mito e dal canto dei poeti. Socrate è dunque accusato di essere un poeta che propone una teologia alternativa a quella della città: la natura della sua accusa è politica e religiosa a un tempo.</text:span></text:span></text:p>
      <text:p text:style-name="P58"><text:span text:style-name="Strong_20_Emphasis"><text:span text:style-name="T31">Eutifrone invece si trova in quel luogo per accusare il padre di aver fatto morire di stenti un suo dipendente dopo che quest’ultimo, in preda all’alcol aveva ucciso un servo. </text:span></text:span></text:p>
      <text:p text:style-name="P58"><text:soft-page-break/><text:span text:style-name="Strong_20_Emphasis"><text:span text:style-name="T31">Socrate intuisce </text:span></text:span><text:span text:style-name="Strong_20_Emphasis"><text:span text:style-name="T33">subito </text:span></text:span><text:span text:style-name="Strong_20_Emphasis"><text:span text:style-name="T31">che Eutifrone </text:span></text:span><text:span text:style-name="Strong_20_Emphasis"><text:span text:style-name="T33">deve essere </text:span></text:span><text:span text:style-name="Strong_20_Emphasis"><text:span text:style-name="T31">un </text:span></text:span><text:span text:style-name="Strong_20_Emphasis"><text:span text:style-name="T33">uomo di sani principi morali ed etici, </text:span></text:span><text:span text:style-name="Strong_20_Emphasis"><text:span text:style-name="T31">se arriva al punto di citare in giudizio </text:span></text:span><text:span text:style-name="Strong_20_Emphasis"><text:span text:style-name="T33">il</text:span></text:span><text:span text:style-name="Strong_20_Emphasis"><text:span text:style-name="T31"> padre, </text:span></text:span><text:span text:style-name="Strong_20_Emphasis"><text:span text:style-name="T33">quindi, gli chiede dei consigli sulla linea difensiva da adottare</text:span></text:span><text:span text:style-name="Strong_20_Emphasis"><text:span text:style-name="T31"> per difender</text:span></text:span><text:span text:style-name="Strong_20_Emphasis"><text:span text:style-name="T33">si</text:span></text:span><text:span text:style-name="Strong_20_Emphasis"><text:span text:style-name="T31"> dalle accuse </text:span></text:span><text:span text:style-name="Strong_20_Emphasis"><text:span text:style-name="T33">di corruzione e di empietà. G</text:span></text:span><text:span text:style-name="Strong_20_Emphasis"><text:span text:style-name="T31">li chiede un parere su cosa è pio e su cosa è empio. </text:span></text:span></text:p>
      <text:p text:style-name="P58"><text:span text:style-name="Strong_20_Emphasis"><text:span text:style-name="T34">Eutifrone risponde portando ad esempio il suo caso, ossia </text:span></text:span><text:span text:style-name="Strong_20_Emphasis"><text:span text:style-name="T33">è pio colui che </text:span></text:span><text:span text:style-name="Strong_20_Emphasis"><text:span text:style-name="T34">denuncia il padre che ha commesso un’ingiustizia. Socrate gli </text:span></text:span><text:span text:style-name="Strong_20_Emphasis"><text:span text:style-name="T33">fa presente che nella risposta Eutifrone ha portato solamente un esempio, ma non è entrato nel merito dell’essenza </text:span></text:span><text:span text:style-name="Strong_20_Emphasis"><text:span text:style-name="T34">di ciò che è pio nel senso universale del termine.</text:span></text:span><text:span text:style-name="Strong_20_Emphasis"><text:span text:style-name="T34"><text:note text:id="ftn10" text:note-class="footnote"><text:note-citation>4</text:note-citation><text:note-body><text:p text:style-name="P11"><text:span text:style-name="T109">E’</text:span> una delle grandi questioni poste nella storia della filosofia <text:span text:style-name="T110">che s</text:span>uggerisce una distinzione tra una prospettiva essenzialista e una convenzionalista. Gli essenzialisti applicano etichette alle cose <text:span text:style-name="T18">che le</text:span> rendono ciò che sono. Il punto di vista convenzionalista è il modo in cui consider<text:span text:style-name="T111">a</text:span> le cose <text:span text:style-name="T111">che </text:span>determina ciò che sono. <text:span text:style-name="T18">Un </text:span>esempio: le opere d'arte sono nei musei perché sono opere d'arte, o le chiamiamo "opere d'arte" perché sono nei musei? Gli essenzialisti affermano la prima posizione, i convenzionalisti la seconda. </text:p></text:note-body></text:note></text:span></text:span></text:p>
      <text:p text:style-name="P58"><text:span text:style-name="Strong_20_Emphasis"><text:span text:style-name="T34">Eutifrone prende atto dell’obiezione mossa da Socrate e dà un’altra definizione di pio: pio è ciò che è gradito agli dei. <text:s/>Socrate sembra appagato dalla nuova definizione ma gli rimane ancora il dubbio che questa non sia la definizione universale </text:span></text:span><text:span text:style-name="Strong_20_Emphasis"><text:span text:style-name="T35">che si sta cercando. </text:span></text:span><text:span text:style-name="Strong_20_Emphasis"><text:span text:style-name="T34">Socrate </text:span></text:span><text:span text:style-name="Strong_20_Emphasis"><text:span text:style-name="T35">aggiunge che le discussioni su ciò che è pio e santo sono difficili da risolvere in quanto incommensurabili. Difatti egli afferma che, come spesso accade a due persone che discutono ad esempio sulla stima di una </text:span></text:span><text:soft-page-break/><text:span text:style-name="Strong_20_Emphasis"><text:span text:style-name="T35">lunghezza, o sulla grandezza di un numero, le disparità di opinioni verrebbero subito chiarite con degli opportuni calcoli e la questione sarebbe risolta. In questo caso, ognuno degli interlocutori cercherà di portare l'altro dalla sua parte e, qualora lo convinca, non ci sarà nessuna misurazione che possa confermare chi dei due avesse ragione e chi torto.</text:span></text:span></text:p>
      <text:p text:style-name="P58"><text:span text:style-name="Strong_20_Emphasis"><text:span text:style-name="T35">Se Eutifrone è d'accordo con questa affermazione allora dovrà convenire che ci sarà disaccordo anche tra gli d</text:span></text:span><text:span text:style-name="Strong_20_Emphasis"><text:span text:style-name="T36">e</text:span></text:span><text:span text:style-name="Strong_20_Emphasis"><text:span text:style-name="T35">i su che cosa sia pio e su che cosa sia empio. </text:span></text:span><text:span text:style-name="Strong_20_Emphasis"><text:span text:style-name="T37">Per deduzione,</text:span></text:span><text:span text:style-name="Strong_20_Emphasis"><text:span text:style-name="T35"> la definizione data da Eutifrone </text:span></text:span><text:span text:style-name="Strong_20_Emphasis"><text:span text:style-name="T38">sembra </text:span></text:span><text:span text:style-name="Strong_20_Emphasis"><text:span text:style-name="T35">errata o almeno incompleta </text:span></text:span><text:span text:style-name="Strong_20_Emphasis"><text:span text:style-name="T37">poiché, </text:span></text:span><text:span text:style-name="Strong_20_Emphasis"><text:span text:style-name="T35">ad alcuni dèi apparirà pia una certa azione, ad altri </text:span></text:span><text:span text:style-name="Strong_20_Emphasis"><text:span text:style-name="T38">una diversa</text:span></text:span><text:span text:style-name="Strong_20_Emphasis"><text:span text:style-name="T35"> e così via <text:s/>ci sarà perenne dissenso. Dunque una cosa potrà essere nello stesso tempo santa ed empia.</text:span></text:span></text:p>
      <text:p text:style-name="P57"><text:span text:style-name="Strong_20_Emphasis"><text:span text:style-name="T35">Eutifrone allora si corregge: pio è ciò che tutti gli dei gradiscono ed empio è tutto ciò che gli dèi detestano. Eutifrone è convinto che la definizione data sia impeccabile. Inizia qui il passo più complesso di tutta l'opera. Socrate non è ancora certo della perfezione della definizione data da Eutifrone, e dunque lo invita a riflettere su</text:span></text:span><text:span text:style-name="Strong_20_Emphasis"><text:span text:style-name="T37">l seguente</text:span></text:span><text:span text:style-name="Strong_20_Emphasis"><text:span text:style-name="T35"> </text:span></text:span><text:span text:style-name="Strong_20_Emphasis"><text:span text:style-name="T37">dilemma</text:span></text:span><text:span text:style-name="Strong_20_Emphasis"><text:span text:style-name="T35">: </text:span></text:span></text:p>
      <text:p text:style-name="P20"><text:span text:style-name="Strong_20_Emphasis"><text:span text:style-name="T13">"il pio è amato dagli d</text:span></text:span><text:span text:style-name="Strong_20_Emphasis"><text:span text:style-name="T14">ei</text:span></text:span><text:span text:style-name="Strong_20_Emphasis"><text:span text:style-name="T13"> perché è pio, oppure è pio perché è amato dagli d</text:span></text:span><text:span text:style-name="Strong_20_Emphasis"><text:span text:style-name="T14">ei</text:span></text:span><text:span text:style-name="Strong_20_Emphasis"><text:span text:style-name="T13">?"</text:span></text:span></text:p>
      <text:p text:style-name="P61"><text:soft-page-break/><text:span text:style-name="Strong_20_Emphasis"><text:span text:style-name="T35">Eutifrone mostra dapprima di non capire, poi protende per la seconda ipotesi. Allora, </text:span></text:span><text:span text:style-name="Strong_20_Emphasis"><text:span text:style-name="T39">s</text:span></text:span><text:span text:style-name="Strong_20_Emphasis"><text:span text:style-name="T35">e è vera la seconda ipotesi bisogna riconoscere che la definizione di santo non è ancora stata data: si è infatti confusa la sostanza con l'accidente</text:span></text:span><text:span text:style-name="Strong_20_Emphasis"><text:span text:style-name="T35"><text:note text:id="ftn11" text:note-class="footnote"><text:note-citation>5</text:note-citation><text:note-body><text:p text:style-name="P12">In filosofia la sostanza è ciò che definisce l’essenza di un ente, mentre gli accidenti sono caratteristiche che possono cambiare senza alterare l’essenza dell’ente. </text:p></text:note-body></text:note></text:span></text:span><text:span text:style-name="Strong_20_Emphasis"><text:span text:style-name="T35">: essere gradito agli d</text:span></text:span><text:span text:style-name="Strong_20_Emphasis"><text:span text:style-name="T36">ei</text:span></text:span><text:span text:style-name="Strong_20_Emphasis"><text:span text:style-name="T35"> non definisce la pietà, ma è solo qualcosa che le accade. </text:span></text:span><text:span text:style-name="Strong_20_Emphasis"><text:span text:style-name="T37">Il</text:span></text:span><text:span text:style-name="Strong_20_Emphasis"><text:span text:style-name="T35"> fatto che un'azione sia pia non deve dipendere dall'apprezzamento degli d</text:span></text:span><text:span text:style-name="Strong_20_Emphasis"><text:span text:style-name="T36">ei</text:span></text:span><text:span text:style-name="Strong_20_Emphasis"><text:span text:style-name="T35">, ma da una sua proprietà altrimenti accertata. Socrate sprona ancora Eutifrone a definire il santo.</text:span></text:span></text:p>
      <text:p text:style-name="P62"><text:span text:style-name="Strong_20_Emphasis"><text:span text:style-name="T37">Eutifrone sembra frastornato e non riesce a proseguire, allora Socrate lo incalza chiedendogli di definire se la giustizia sia una parte della pietà, o se piuttosto non sia la pietà ad essere una parte della giustizia. Eutifrone propende ancora per la seconda ipotesi, la pietà è parte della giustizia. Socrate gli chiede allora di spiegargli se ”tutto ciò che è giusto è pio, o che tutto ciò che è pio è anche giusto?</text:span></text:span></text:p>
      <text:p text:style-name="P58"><text:span text:style-name="Strong_20_Emphasis"><text:span text:style-name="T37">Eutifrone è molto preciso questa volta: la pietà consiste nel prendersi cura degli d</text:span></text:span><text:span text:style-name="Strong_20_Emphasis"><text:span text:style-name="T36">e</text:span></text:span><text:span text:style-name="Strong_20_Emphasis"><text:span text:style-name="T37">i. Tanto per non smentirsi, Socrate però ha seri dubbi al riguardo: che cosa intende Eutifrone col termine prendersi cura? Socrate elenca numerosi esempi di prendersi cura: l'ippica si prende cura del cavallo, la cinegetica dei cani </text:span></text:span><text:span text:style-name="Strong_20_Emphasis"><text:span text:style-name="T39">e così via</text:span></text:span><text:span text:style-name="Strong_20_Emphasis"><text:span text:style-name="T37">. </text:span></text:span><text:soft-page-break/><text:span text:style-name="Strong_20_Emphasis"><text:span text:style-name="T37">Eutifrone </text:span></text:span><text:span text:style-name="Strong_20_Emphasis"><text:span text:style-name="T38">ascolta e subito </text:span></text:span><text:span text:style-name="Strong_20_Emphasis"><text:span text:style-name="T37">dichiara che è proprio questo il genere di prendersi cura che intende. Tuttavia Socrate fa notare al suo interlocutore che quel tipo di prendersi cura è fatto per procurare giovamento a chi ne subisce gli effetti. Difatti il cavallo è ben curato e sta bene e lo stesso dicasi dei cani. È allora possibile che gli uomini contribuiscano a rendere migliori gli d</text:span></text:span><text:span text:style-name="Strong_20_Emphasis"><text:span text:style-name="T36">e</text:span></text:span><text:span text:style-name="Strong_20_Emphasis"><text:span text:style-name="T37">i, a procurar loro giovamento? Non dovrebbe piuttosto essere il contrario?</text:span></text:span></text:p>
      <text:p text:style-name="P58"><text:span text:style-name="Strong_20_Emphasis"><text:span text:style-name="T37">Eutifrone, allora precisa che la cura per gli dei ricorda più la cura che i servi hanno nei confronti dei padroni. A questo punto Socrate <text:s/>gli chiede una riflessione più profonda: i padroni, infatti, richiedono il servizio degli schiavi o dei subalterni quando serva loro; ad esempio si può ordinare ad un servo di zappare il terreno, o ancora un medico può chiedere ad un suo assistente di tamponare la ferita di un paziente. Eutifrone si dichiara d'accordo. Ma allora quale servizio potrebbero mai rendere gli uomini agli d</text:span></text:span><text:span text:style-name="Strong_20_Emphasis"><text:span text:style-name="T36">e</text:span></text:span><text:span text:style-name="Strong_20_Emphasis"><text:span text:style-name="T37">i? La questione può anche essere posta così: per fare che cosa gli d</text:span></text:span><text:span text:style-name="Strong_20_Emphasis"><text:span text:style-name="T36">e</text:span></text:span><text:span text:style-name="Strong_20_Emphasis"><text:span text:style-name="T37">i chiederebbero l'ausilio degli uomini? Se l’uomo la compie è evidente che ne riceve qualcosa di buono in cambio e dunque, dato che gli uomini pregano gli dei e gli offrono sacrifici per ricevere qualcosa in cambio, come afferma Eutifrone, è chiaro per Socrate che la cura degli dei è simile al commercio. </text:span></text:span><text:span text:style-name="Strong_20_Emphasis"><text:span text:style-name="T38">A </text:span></text:span><text:span text:style-name="Strong_20_Emphasis"><text:span text:style-name="T37">questo punto </text:span></text:span><text:soft-page-break/><text:span text:style-name="Strong_20_Emphasis"><text:span text:style-name="T37">Eutifrone fa un passo indietro, infatti, più che un commercio, ritiene queste azioni delle opere gradite agli dei </text:span></text:span><text:span text:style-name="Strong_20_Emphasis"><text:span text:style-name="T40">come adempiere ad un sacrificio o il pregare,</text:span></text:span><text:span text:style-name="Strong_20_Emphasis"><text:span text:style-name="T37"> e </text:span></text:span><text:span text:style-name="Strong_20_Emphasis"><text:span text:style-name="T40">c</text:span></text:span><text:span text:style-name="Strong_20_Emphasis"><text:span text:style-name="T37">on la preghiera, infatti, gli uomini chiedono l'aiuto degli d</text:span></text:span><text:span text:style-name="Strong_20_Emphasis"><text:span text:style-name="T36">e</text:span></text:span><text:span text:style-name="Strong_20_Emphasis"><text:span text:style-name="T37">i e con il sacrificio fanno loro dei doni </text:span></text:span><text:span text:style-name="Strong_20_Emphasis"><text:span text:style-name="T40">in segno di </text:span></text:span><text:span text:style-name="Strong_20_Emphasis"><text:span text:style-name="T37">ringraziamento. Eutifrone dubita che gli dei traggono vantaggi dagli uomini ed è più vicino alla vecchia idea del rapporto servo-padrone. Così, Socrate dice che bisogna fare tutto il ragionamento da capo e chiedersi di nuovo che cosa è il santo. </text:span></text:span><text:span text:style-name="Strong_20_Emphasis"><text:span text:style-name="T40">A questo punto Eutifrone, rivolgendosi a Socrate gli dice: “Oh caro, è questo il momento? Scusa, Socrate, devo andare".</text:span></text:span></text:p>
      <text:p text:style-name="P58"><text:span text:style-name="Strong_20_Emphasis"><text:span text:style-name="T40">Eutifrone abbandona il campo e priva Socrate, come egli afferma in chiusura, della possibilità di vivere meglio.</text:span></text:span></text:p>
      <text:p text:style-name="P57"><text:span text:style-name="Strong_20_Emphasis"><text:span text:style-name="T27">L’Apologia</text:span></text:span><text:span text:style-name="Strong_20_Emphasis"><text:span text:style-name="T86"> </text:span></text:span><text:span text:style-name="Strong_20_Emphasis"><text:span text:style-name="T41">inizia con la prima difesa di Socrate, presumibilmente verificatasi appena dopo l'arringa accusatoria di Meleto. Pessimo poeta, Meleto era il presentatore legale dell'accusa, spinto da Anito assieme a Licone, oratore e astuto demagogo. Socrate qui fa sfoggio della sua famosa ironia, dichiarando di essere rimasto stupefatto dall'ar</text:span></text:span><text:span text:style-name="Strong_20_Emphasis"><text:span text:style-name="T42">te</text:span></text:span><text:span text:style-name="Strong_20_Emphasis"><text:span text:style-name="T41"> oratoria dell'accusa, al punto da non credere quasi più alla propria innocenza, sebbene sappia che essi non abbiano detto nulla di vero. Lo colpisce particolarmente che l'accusa lo abbia dipinto come un ottimo oratore, ed abbia avvertito i giudici di non lasciarsi trarre in inganno: è la base di </text:span></text:span><text:soft-page-break/><text:span text:style-name="Strong_20_Emphasis"><text:span text:style-name="T41">partenza da cui Socrate si lancerà in una captatio benevolentiae e in una violentissima accusa al tempo stesso. Ripetendo di parlare alla buona perché conosce poco le logiche del tribunale (ribadisce quindi implicitamente di essere un cittadino responsabile, dato che non è mai stato chiamato a giudizio) e di non saper dire altro che la verità, punterà gli occhi dei giudici sulle proprie doti e allo stesso tempo criticherà i sofisti, cui paragona Meleto.</text:span></text:span></text:p>
      <text:p text:style-name="P57"><text:span text:style-name="Strong_20_Emphasis"><text:span text:style-name="T41">Nella replica, Socrate cerca di difendersi dalle vecchie accuse di empietà, </text:span></text:span><text:span text:style-name="Strong_20_Emphasis"><text:span text:style-name="T43">di </text:span></text:span><text:span text:style-name="Strong_20_Emphasis"><text:span text:style-name="T41">specula</text:span></text:span><text:span text:style-name="Strong_20_Emphasis"><text:span text:style-name="T43">re</text:span></text:span><text:span text:style-name="Strong_20_Emphasis"><text:span text:style-name="T41"> su cose celesti, </text:span></text:span><text:span text:style-name="Strong_20_Emphasis"><text:span text:style-name="T42">e </text:span></text:span><text:span text:style-name="Strong_20_Emphasis"><text:span text:style-name="T44">di manipolare l</text:span></text:span><text:span text:style-name="Strong_20_Emphasis"><text:span text:style-name="T41">e menti dei giovani. </text:span></text:span></text:p>
      <text:p text:style-name="P57"><text:span text:style-name="Strong_20_Emphasis"><text:span text:style-name="T91">Ammetterà di essersi interessato a queste cose ma di esservisi staccato in quanto non gli davano la sapienza necessaria; per l'accusa di insegnarle, <text:s/>c'è la consueta professione d'ignoranza da parte di Socrate: come può egli insegnare se non sa nulla? Questo gli darà l'occasione di lanciarsi in un altro attacco contro i sofisti, rei di farsi pagare per le proprie lezioni. Secondo Socrate essi non possiedono la sapienza, e se la possedessero sarebbe disdicevole farsi pagare per condividerla.</text:span></text:span></text:p>
      <text:p text:style-name="P58"><text:span text:style-name="Strong_20_Emphasis"><text:span text:style-name="T43">Socrate c</text:span></text:span><text:span text:style-name="Strong_20_Emphasis"><text:span text:style-name="T41">ita il celeberrimo episodio del suo amico Cherefonte, il quale domandò all'oracolo di Delfi se vi fosse qualcuno più sapiente di Socrate; la risposta </text:span></text:span><text:soft-page-break/><text:span text:style-name="Strong_20_Emphasis"><text:span text:style-name="T41">dell'oracolo fu "</text:span></text:span><text:span text:style-name="Strong_20_Emphasis"><text:span text:style-name="T88">nessuno è più sapiente di Socrate</text:span></text:span><text:span text:style-name="Strong_20_Emphasis"><text:span text:style-name="T41">". Il filosofo, che sapeva che il dio non mente, sapendo però di non sapere, non poté credere a quella risposta: cercò qualcuno che fosse più sapiente di lui, recandosi dai politici con fama di sapienti ed interrogandoli, scopr</text:span></text:span><text:span text:style-name="Strong_20_Emphasis"><text:span text:style-name="T42">ì</text:span></text:span><text:span text:style-name="Strong_20_Emphasis"><text:span text:style-name="T41"> che essi in verità non sapevano nulla di quel che dicevano di sapere. Pur rendendosi conto di attirarsi l'odio di coloro di cui confutava la sapienza, Socrate passò poi all'esame dei poeti e degli artigiani. Egli scoprì che i primi non sapevano neanche di cosa stessero poetando, mentre i secondi per la loro conoscenza della propria tecnica si ritenevano sapienti in molti altri campi. Da questa ricerca nacquero le inimicizie verso Socrate e la sua fama di uomo sapiente: chiunque vedeva esposta la propria ignoranza pensava che Socrate sapesse. Il filosofo capì quindi che l'oracolo aveva parlato in forma di enigma: Socrate è sapiente perché è il solo essere umano a sapere di non sapere, a differenza degli altri: la vera sapienza è puramente divina, e all'uomo non è dato raggiungerla. </text:span></text:span></text:p>
      <text:p text:style-name="P57"><text:span text:style-name="Strong_20_Emphasis"><text:span text:style-name="T41">Anche l'accusa di insegnare ai giovani a far vincere il discorso peggiore gli deriva dai suoi esami: i giovani più ricchi avevano piacere di vedere Socrate mettere a nudo l'ignoranza della gente, e provavano anche in sua assenza a far lo stesso. Meleto, Anito e Licone </text:span></text:span><text:soft-page-break/><text:span text:style-name="Strong_20_Emphasis"><text:span text:style-name="T41">rappresentano dunque la voglia di rivalsa delle categorie umiliate da Socrate: poeti, politici e oratori. </text:span></text:span></text:p>
      <text:p text:style-name="P57"><text:span text:style-name="Strong_20_Emphasis"><text:span text:style-name="T41">Socrate passa all'esame delle accuse recenti: egli è definito reo di corrompere i giovani; di non riconoscere gli d</text:span></text:span><text:span text:style-name="Strong_20_Emphasis"><text:span text:style-name="T45">e</text:span></text:span><text:span text:style-name="Strong_20_Emphasis"><text:span text:style-name="T41">i della città e di introdurne di nuovi. Chiamerà direttamente Meleto a rendere conto delle accuse, e gli verrà facile dimostrare come esse fossero strumentali; costui infatti non si è mai occupato realmente della cura dei giovani e dimostra facilmente la sua ignoranza in materia: secondo lui tutti i cittadini ateniesi si curano dei giovani nel giusto modo tranne Socrate, che invece li travia. A Socrate basteranno poche battute per farlo cadere in contraddizione, facendogli ammettere come sia impossibile che la maggioranza delle persone abbia scienza di cosa sia giusto fare e di cosa non fare. Meleto ammette anche che le persone accettano di stare solo con chi apporta loro dei beni, e rifuggono da chi apporta mali. Pertanto, o Socrate non può insegnare il male – poiché nessuno starebbe con lui – o, se lo fa, lo fa in modo inconsapevole, poiché altrimenti saprebbe che insegnandolo si ritroverebbe ben presto solo. E secondo le leggi ateniesi, chi sbaglia senza saperlo non va processato ma istruito. L'impietosa distruzione della figura di Meleto continua nella confutazione dell'accusa di non credere agli d</text:span></text:span><text:span text:style-name="Strong_20_Emphasis"><text:span text:style-name="T45">e</text:span></text:span><text:span text:style-name="Strong_20_Emphasis"><text:span text:style-name="T41">i e di professarne di nuovi (nella fattispecie il daimon socratico): Meleto, incalzato da </text:span></text:span><text:soft-page-break/><text:span text:style-name="Strong_20_Emphasis"><text:span text:style-name="T41">Socrate, reputa quest'ultimo un ateo, seguace delle dottrine di Anassagora; Socrate gli fa notare come sia impossibile non credere agli d</text:span></text:span><text:span text:style-name="Strong_20_Emphasis"><text:span text:style-name="T45">e</text:span></text:span><text:span text:style-name="Strong_20_Emphasis"><text:span text:style-name="T41">i ma </text:span></text:span><text:span text:style-name="Strong_20_Emphasis"><text:span text:style-name="T44">di</text:span></text:span><text:span text:style-name="Strong_20_Emphasis"><text:span text:style-name="T41"> professarne alcuni, pertanto Meleto sta contraddicendo la propria accusa. Da qui, Socrate dovrà solo provare di credere in un dio della città e reputarne il suo daimon figlio, sebbene non lo dica mai – e vi riesce per analogie: non possono esistere cose attinenti ai cavalli senza cavalli, né sonate di flauto senza suonatori di flauto: allo stesso modo non possono esistere nuovi d</text:span></text:span><text:span text:style-name="Strong_20_Emphasis"><text:span text:style-name="T45">e</text:span></text:span><text:span text:style-name="Strong_20_Emphasis"><text:span text:style-name="T41">i se non originati dagli d</text:span></text:span><text:span text:style-name="Strong_20_Emphasis"><text:span text:style-name="T45">e</text:span></text:span><text:span text:style-name="Strong_20_Emphasis"><text:span text:style-name="T41">i, sia pure come figli impuri.</text:span></text:span></text:p>
      <text:p text:style-name="P57"><text:span text:style-name="Strong_20_Emphasis"><text:span text:style-name="T41">Socrate ribadisce infine che, se sarà condannato, sarà solo per l'odio fomentato dalle antiche accuse. Ma ciò non lo scalfisce: egli non ragiona in termini di vita o di morte, teme solo di non vivere nel giusto; se non fosse questa la giusta condotta di vita, andrebbero biasimati tutti coloro che persero la vita in battaglia pur di aiutare il compagno in difficoltà; inoltre, Socrate sottolinea l'incoerenza in cui sprofonderebbe, lui che rimase al proprio posto nelle battaglie (ovvia captatio benevolentiae; una descrizione più approfondita del comportamento di Socrate in guerra si trova nel Simposio 219) e non dovrebbe rimanervi ora che ad ordinargli di vivere filosofando è il dio Apollo. In aggiunta, egli non teme la morte perché sa di non sapere: sarebbe una contraddizione temerla, poiché si </text:span></text:span><text:soft-page-break/><text:span text:style-name="Strong_20_Emphasis"><text:span text:style-name="T41">può temere solo qualcosa che si sa essere un male (la natura della morte sarà poi il tema centrale del Fedone). La sola cosa che Socrate sa è che non si deve vivere nell'ingiustizia, sia verso l'uomo che verso il dio: se fosse rilasciato a patto di non esercitare più la "filosofia", egli non potrebbe accettare, in quanto starebbe contravvenendo agli ordini divini e non si starebbe prendendo cura degli ateniesi che ama, lasciandoli in balia di sé stessi:</text:span></text:span></text:p>
      <text:p text:style-name="P58"><text:span text:style-name="Strong_20_Emphasis"><text:span text:style-name="T4">«O miei concittadini di Atene, io vi sono obbligato e vi amo; ma obbedirò piuttosto al dio che a voi, e finché abbia respiro, e finché ne sia capace, non cesserò mai di filosofare e di ammonirvi [...] Tu che sei ateniese, cittadino della più grande città, non ti vergogni a darti pensiero delle ricchezze per ammassarne quante più possibile, e della tua anima, affinché essa diventi quanto più possibile ottima, non ti dai cura?»</text:span></text:span></text:p>
      <text:p text:style-name="P63"><text:span text:style-name="Strong_20_Emphasis"><text:span text:style-name="T41">Egli filosofa, per l'amore che nutre per gli ateniesi e per il compito assegnatogli dal dio, quello di risvegliarli </text:span></text:span><text:span text:style-name="Strong_20_Emphasis"><text:span text:style-name="T46">dalla loro indifferenza</text:span></text:span><text:span text:style-name="Strong_20_Emphasis"><text:span text:style-name="T41">; è un tafano messo al fianco di un cavallo nobile </text:span></text:span><text:span text:style-name="Strong_20_Emphasis"><text:span text:style-name="T46">che punzecchia</text:span></text:span><text:span text:style-name="Strong_20_Emphasis"><text:span text:style-name="T47">to </text:span></text:span><text:span text:style-name="Strong_20_Emphasis"><text:span text:style-name="T46">gli impedisce di </text:span></text:span><text:span text:style-name="Strong_20_Emphasis"><text:span text:style-name="T41">impigri</text:span></text:span><text:span text:style-name="Strong_20_Emphasis"><text:span text:style-name="T46">rsi</text:span></text:span><text:span text:style-name="Strong_20_Emphasis"><text:span text:style-name="T41">, prova ne sia che egli per dedicarsi completamente a quest'obbligo si è ridotto in povertà. Afferma che il suo daimon gli impedisce di compiere il male, e ricorda la sua condotta:</text:span></text:span></text:p>
      <text:p text:style-name="P64"><text:soft-page-break/><text:span text:style-name="Strong_20_Emphasis"><text:span text:style-name="T41"><text:s/></text:span></text:span><text:span text:style-name="Strong_20_Emphasis"><text:span text:style-name="T46">(...</text:span></text:span><text:span text:style-name="Strong_20_Emphasis"><text:span text:style-name="T93">è quella voce che ho dentro di me fin da fanciullo, la quale ogni volta che si fa sentire, è sempre per dissuadermi dal fare qualcosa, mai per farmi agire.</text:span></text:span><text:span text:style-name="Strong_20_Emphasis"><text:span text:style-name="T29">)</text:span></text:span><text:span text:style-name="Strong_20_Emphasis"><text:span text:style-name="T46"><text:note text:id="ftn12" text:note-class="footnote"><text:note-citation>6</text:note-citation><text:note-body><text:p text:style-name="P13">Platone, Apologia, 31 d.</text:p></text:note-body></text:note></text:span></text:span><text:span text:style-name="Strong_20_Emphasis"><text:span text:style-name="T46"> </text:span></text:span></text:p>
      <text:p text:style-name="P64"><text:span text:style-name="Strong_20_Emphasis"><text:span text:style-name="T39">E</text:span></text:span><text:span text:style-name="Strong_20_Emphasis"><text:span text:style-name="T41">gli ha sempre cercato di vivere nella giustizia, anche se questo gli comportava il rischio di morte. Quando fece parte del consiglio fu il solo a votare contro il processo dei comandanti che non raccolsero i naufraghi dopo la battaglia delle Arginuse, non perché li reputasse innocenti, quanto perché processarli in blocco era contro la legge; e altrettanto fece quando gli fu dato ordine dal governo dei trenta tiranni di uccidere Leonte di Salamina; egli si rifiutò, certo della sua condanna a morte, che non sopravvenne solo perché il regime fu rovesciato.</text:span></text:span></text:p>
      <text:p text:style-name="P58"><text:span text:style-name="Strong_20_Emphasis"><text:span text:style-name="T41">Ripet</text:span></text:span><text:span text:style-name="Strong_20_Emphasis"><text:span text:style-name="T45">é</text:span></text:span><text:span text:style-name="Strong_20_Emphasis"><text:span text:style-name="T41"> di non poter corrompere i giovani semplicemente perché non ha nulla da insegnare loro; egli non è un maestro né chiede denari: pertanto, se qualcuno (come Crizia e Alcibiade) diventa maligno, egli non può averne colpa; a riprova di questo vi sia che nessuno dei suoi seguaci si sia mai rivolto a un tribunale contro di lui, e nessuno dei suoi amici o parenti ha mai pensato che Socrate </text:span></text:span><text:span text:style-name="Strong_20_Emphasis"><text:span text:style-name="T46">fosse corrotto e </text:span></text:span><text:span text:style-name="Strong_20_Emphasis"><text:span text:style-name="T41">stesse corrompendo. Socrate ricorda ai giudici che egli avrebbe potuto far ricorso alle suppliche, alle proprie come a quelle dei suoi figli e della moglie Santippe: in </text:span></text:span><text:soft-page-break/><text:span text:style-name="Strong_20_Emphasis"><text:span text:style-name="T41">questo modo vuole riproporsi come uomo determinato a fare il giusto, come spinto dalla verità e come rispettoso delle leggi: se supplicasse la grazia, e gli venisse accordata, farebbe infrangere ai giudici il giuramento di giudicare secondo legge. Con queste ultime considerazioni, si va al verdetto. </text:span></text:span></text:p>
      <text:p text:style-name="P57"><text:span text:style-name="Strong_20_Emphasis"><text:span text:style-name="T41">Sono 500 i votanti, egli viene trovato colpevole per soli 30 voti: 220 a favore, 280 contro; se solo 30 persone in più fossero state persuase, si sarebbe risolto in un 250 a 250 e secondo la legge di quel tempo non vi sarebbe stata nessuna pena.</text:span></text:span></text:p>
      <text:p text:style-name="P58"><text:span text:style-name="Strong_20_Emphasis"><text:span text:style-name="T41">Ironicamente Socrate sottolinea come Meleto, se avesse presentato l'accusa insieme ad Anito e Licone anziché farsi appoggiare esternamente, forse avrebbe dovuto pagare una multa di mille dracme (giacché era previsto che se l'accusatore non avesse raggiunto almeno un quinto dei voti avrebbe dovuto pagare tale cifra, per scoraggiare la pratica di trascinare in tribunale per futili motivi;</text:span></text:span></text:p>
      <text:p text:style-name="P58"><text:span text:style-name="Strong_20_Emphasis"><text:span text:style-name="T41">Secondo le leggi del tribunale ateniese, tanto il processato quanto l'accusa dovevano proporre una pena, e metterla al voto. Ma come può Socrate proporre una pena per sé, cioè per chi sa non aver commesso reato? Infiamma il tribunale chiedendo come pena, di essere mantenuto a spese dello stato nel pritanèo, onore concesso alle personalità più illustri di Atene; </text:span></text:span><text:soft-page-break/><text:span text:style-name="Strong_20_Emphasis"><text:span text:style-name="T41">dopodiché, considera le altre opzioni: il carcere e l'esilio. Se non considera giusto essere carcerato e ridotto in schiavitù, assai meno probabile e onorevole gli sembra l'esilio: se è stato condannato dal popolo che ama, chi mai potrà accoglierlo, lui e il suo filosofare? Anche perché egli non può smettere di farlo: per obbedienza al dio, come per convinzione personale.</text:span></text:span></text:p>
      <text:p text:style-name="P58"><text:span text:style-name="Strong_20_Emphasis"><text:span text:style-name="T41">Nel suo ultimo intervento, Socrate fa notare le conseguenze del verdetto, ai giudici a lui avversi: egli, già molto avanti negli anni, sarebbe morto da sé entro poco tempo. Con la condanna a morte, gli ateniesi avranno fama di aver ucciso Socrate, uomo sapiente, anche se sapiente non era. Socrate sa che sarà considerato un martire dai suoi amici, e che molti ne seguiranno le orme: se prima era uno, a punzecchiare i potenti di Atene, ora si moltiplicheranno; il solo modo che i potenti avessero di contrastare questi "tafani", come li chiamerà Socrate, sarebbe stato adoperarsi a conseguire la virtù, come ha fatto Socrate: egli non solo non ha implorato pietà, ma non ha neppure usato belle parole, falsi argomenti e citazioni – proprie dei sofisti – per ingannare i giudici: egli si è rimesso al loro giudizio per quel che è.</text:span></text:span></text:p>
      <text:p text:style-name="P59"><text:span text:style-name="Strong_20_Emphasis"><text:span text:style-name="T41">Ai giudici che votarono in suo favore rivolge ancora qualche parola: </text:span></text:span><text:span text:style-name="Strong_20_Emphasis"><text:span text:style-name="T48">n</text:span></text:span><text:span text:style-name="Strong_20_Emphasis"><text:span text:style-name="T41">é quando uscì di casa per recarsi al tribunale, né durante tutta la sua difesa, il daimon gli </text:span></text:span><text:soft-page-break/><text:span text:style-name="Strong_20_Emphasis"><text:span text:style-name="T41">impedì di parlare, come era suo solito quando Socrate errava: egli stava agendo nel giusto, pertanto il destino gli apporterà dei beni: ma quali beni può portare una condanna a morte? In questo caso, la morte dovrà giocoforza essere un piacevole sonno, profondo e senza sogni o un ritrovarsi nell'Ade con i più grandi eroi dell'antichità; Socrate non si smentisce, pensando al piacere che proverà in questo caso a esaminarli uno per uno, per scoprire chi sia sapiente e chi non lo sia.</text:span></text:span></text:p>
      <text:p text:style-name="P58"><text:span text:style-name="Strong_20_Emphasis"><text:span text:style-name="T41">Con queste sue ultime parole, Socrate ricorda ai giudici che ad un uomo per bene non è possibile che accadano dei mali, e li esorta ad interrogare i propri figli come avrebbe fatto lui, per avvicinarli alla virtù.</text:span></text:span></text:p>
      <text:p text:style-name="P22"><text:span text:style-name="Strong_20_Emphasis"><text:span text:style-name="T89">«E dovete sperare bene anche voi, o giudici, dinanzi alla morte e credere fermamente che a colui che è buono non può accadere nulla di male, né da vivo né da morto, e che gli Dei si prenderanno cura della sua sorte. Quel che a me è avvenuto ora non è stato così per caso, poiché vedo che il morire e l'essere liberato dalle angustie del mondo era per me il meglio. Per questo non mi ha contrariato l'avvertimento divino ed io non sono affatto in collera con quelli che mi hanno votato contro e con i miei accusatori, sebbene costoro non mi avessero votato contro con questa intenzione, ma credendo invece di farmi del male. E in questo essi sono da biasimare. Tuttavia io li prego ancora di </text:span></text:span><text:soft-page-break/><text:span text:style-name="Strong_20_Emphasis"><text:span text:style-name="T89">questo: quando i miei figlioli saranno grandi, castigateli, o Ateniesi, tormentateli come io ho tormentato voi se vi sembrano di avere più cura del denaro o d'altro piuttosto che della virtù; e se mostrano di essere qualche cosa senza valere nulla, svergognateli come ho fatto io con voi per ciò che non curano quello che conviene curare e credono di valere quando non valgono nulla. Se farete ciò, avremo avuto da voi ciò che era giusto avere, io e i miei figli. Ma vedo che è tempo ormai di andar via, io a morire, voi a vivere. Chi di noi avrà sorte migliore, nascosto è a ognuno, tranne che al dio.» </text:span></text:span></text:p>
      <text:p text:style-name="P30"><text:span text:style-name="Strong_20_Emphasis"><text:span text:style-name="T26">Critone</text:span></text:span><text:span text:style-name="Strong_20_Emphasis"><text:span text:style-name="T87"> -</text:span></text:span><text:span text:style-name="Strong_20_Emphasis"><text:span text:style-name="T49"> </text:span></text:span><text:span text:style-name="Strong_20_Emphasis"><text:span text:style-name="T50">Socrate non venne giustiziato subito dopo il processo, </text:span></text:span><text:span text:style-name="Strong_20_Emphasis"><text:span text:style-name="T51">poich</text:span></text:span><text:span text:style-name="Strong_20_Emphasis"><text:span text:style-name="T52">é</text:span></text:span><text:span text:style-name="Strong_20_Emphasis"><text:span text:style-name="T50"> in quel periodo tutte le esecuzioni capitali</text:span></text:span><text:span text:style-name="Strong_20_Emphasis"><text:span text:style-name="T50"><text:note text:id="ftn13" text:note-class="footnote"><text:note-citation>7</text:note-citation><text:note-body><text:p text:style-name="P8">Quando Teseo partì per Creta con le sette coppie di vergini e di bambini da dare in pasto al Minotauro, gli ateniesi fecero un voto: se le vittime si fossero salvate, avrebbero inviato a Delo, ogni anno, un ambasceria in onore del dio Apollo e ad Atene, durante il viaggio della nave, nessuno sarebbe stato ucciso per ordine dello Stato. </text:p></text:note-body></text:note></text:span></text:span><text:span text:style-name="Strong_20_Emphasis"><text:span text:style-name="T50"> erano sospese per via del viaggio della Nave Sacra per Delo. Dopo una ventina di giorni, lo troviamo ancora in carcere con il suo compaesano e coetaneo Critone. </text:span></text:span></text:p>
      <text:p text:style-name="P31"><text:span text:style-name="Strong_20_Emphasis"><text:span text:style-name="T50">il dialogo tra Socrate e Critone, si svolge all'alba nelle carceri di Atene dove Socrate era stato rinchiuso in attesa del giorno dell'esecuzione della pena capitale.</text:span></text:span></text:p>
      <text:p text:style-name="P32"><text:soft-page-break/><text:span text:style-name="Strong_20_Emphasis"><text:span text:style-name="T53">N</text:span></text:span><text:span text:style-name="Strong_20_Emphasis"><text:span text:style-name="T50">on appena Socrate si sveglia, l'amico </text:span></text:span><text:span text:style-name="Strong_20_Emphasis"><text:span text:style-name="T53">che gli era stato vicino tutta la notte,</text:span></text:span><text:span text:style-name="Strong_20_Emphasis"><text:span text:style-name="T50"> gli annuncia che l'arrivo della nave da Delo era imminente, quindi il momento di morire era vicino. </text:span></text:span></text:p>
      <text:p text:style-name="P33"><text:span text:style-name="Strong_20_Emphasis"><text:span text:style-name="T50">“</text:span></text:span><text:span text:style-name="Strong_20_Emphasis"><text:span text:style-name="T54">Sono qui, o Socrate, per recarti una brutta notizia, alcuni amici mi hanno riferito che la nave di Delo ha appena doppiato il capo Sunio. Oggi o al massimo domani dovrebbe arrivare ad Atene.” </text:span></text:span></text:p>
      <text:p text:style-name="P33"><text:span text:style-name="Strong_20_Emphasis"><text:span text:style-name="T50">“E </text:span></text:span><text:span text:style-name="Strong_20_Emphasis"><text:span text:style-name="T54">che c’è di strano? Prima o poi doveva arrivare” replica Socrate “vuol dire che così è piaciuto agli Dei.”</text:span></text:span></text:p>
      <text:p text:style-name="P33"><text:span text:style-name="Strong_20_Emphasis"><text:span text:style-name="T54">“Non parlare in questo modo e lasciati persuadere a metterti in salvo. Ho già preso accordi con i carcerieri: non <text:s/>mi chiedono </text:span></text:span><text:span text:style-name="Strong_20_Emphasis"><text:span text:style-name="T53">molto denaro</text:span></text:span><text:span text:style-name="Strong_20_Emphasis"><text:span text:style-name="T54"> per farti fuggire, e comunque si sono offerti di finanziare la tua fuga anche Simmia di Tebe, Cebète e molti altri</text:span></text:span><text:span text:style-name="Strong_20_Emphasis"><text:span text:style-name="T50">; gli spiega che </text:span></text:span><text:span text:style-name="Strong_20_Emphasis"><text:span text:style-name="T53">un domani, </text:span></text:span><text:span text:style-name="Strong_20_Emphasis"><text:span text:style-name="T50">la gente </text:span></text:span><text:span text:style-name="Strong_20_Emphasis"><text:span text:style-name="T53">avrebbe potuto </text:span></text:span><text:span text:style-name="Strong_20_Emphasis"><text:span text:style-name="T50">pensare che egli, pur avendone avuta l'opportunità, non avesse voluto salvar</text:span></text:span><text:span text:style-name="Strong_20_Emphasis"><text:span text:style-name="T53">e l’amico</text:span></text:span><text:span text:style-name="Strong_20_Emphasis"><text:span text:style-name="T50">.”</text:span></text:span></text:p>
      <text:p text:style-name="P33"><text:span text:style-name="Strong_20_Emphasis"><text:span text:style-name="T50">“</text:span></text:span><text:span text:style-name="Strong_20_Emphasis"><text:span text:style-name="T54">Sono pronto a prendere la fuga: prima però vorrei che decidessimo insieme se sia giusto che io tenti di uscire dal carcere contro il volere degli ateniesi. Se è giusto lo faremo, se è ingiusto ci asterremo dal farlo.”</text:span></text:span></text:p>
      <text:p text:style-name="P32"><text:span text:style-name="Strong_20_Emphasis"><text:span text:style-name="T54">“Dici bene, o Socrate.”</text:span></text:span></text:p>
      <text:p text:style-name="P32"><text:span text:style-name="Strong_20_Emphasis"><text:span text:style-name="T54">“Non credi tu, o Critone, che nella vita per nessuna ragione si deve commettere ingiustizia?</text:span></text:span></text:p>
      <text:p text:style-name="P32"><text:soft-page-break/><text:span text:style-name="Strong_20_Emphasis"><text:span text:style-name="T54">“Per nessuna ragione.”</text:span></text:span></text:p>
      <text:p text:style-name="P32"><text:span text:style-name="Strong_20_Emphasis"><text:span text:style-name="T54">“Neanche se prima ci è stata fatta ingiustizia?”</text:span></text:span></text:p>
      <text:p text:style-name="P32"><text:span text:style-name="Strong_20_Emphasis"><text:span text:style-name="T54">“Ne</text:span></text:span><text:span text:style-name="Strong_20_Emphasis"><text:span text:style-name="T52">a</text:span></text:span><text:span text:style-name="Strong_20_Emphasis"><text:span text:style-name="T54">nche in questo caso.”</text:span></text:span></text:p>
      <text:p text:style-name="P32"><text:span text:style-name="Strong_20_Emphasis"><text:span text:style-name="T54">“E supponiamo che nel momento in cui io sto pe</text:span></text:span><text:span text:style-name="Strong_20_Emphasis"><text:span text:style-name="T52">r</text:span></text:span><text:span text:style-name="Strong_20_Emphasis"><text:span text:style-name="T54"> fuggire ci venissero incontro le Leggi e ci domandassero: “Dicci o Socrate, che cosa hai in mente di fare? Non mediti forse di distruggere noi, che siamo le Leggi, e con noi tutta la città?” In tal caso, che cosa potremmo rispondere a queste parole? Risponderemmo forse che prima della fuga ci fu inflitta una condanna ingiusta?” </text:span></text:span></text:p>
      <text:p text:style-name="P32"><text:span text:style-name="Strong_20_Emphasis"><text:span text:style-name="T54">“Certo: questo risponderemmo.”</text:span></text:span></text:p>
      <text:p text:style-name="P32"><text:span text:style-name="Strong_20_Emphasis"><text:span text:style-name="T54">“E se le </text:span></text:span><text:span text:style-name="Strong_20_Emphasis"><text:span text:style-name="T52">l</text:span></text:span><text:span text:style-name="Strong_20_Emphasis"><text:span text:style-name="T54">eggi mi dicessero: </text:span></text:span><text:span text:style-name="Strong_20_Emphasis"><text:span text:style-name="T52">s</text:span></text:span><text:span text:style-name="Strong_20_Emphasis"><text:span text:style-name="T54">appi o Socrate, che bisogna ubbidire a tutte le sentenze, giuste o ingiuste che siano, giacché l’intera esistenza dell’uomo è regolata dalle </text:span></text:span><text:span text:style-name="Strong_20_Emphasis"><text:span text:style-name="T52">l</text:span></text:span><text:span text:style-name="Strong_20_Emphasis"><text:span text:style-name="T54">eggi. Non fummo forse noi a darti la vita? E non è stato grazie a noi che tuo padre ha preso in moglie tua madre e ti ha generato? Non fummo noi a <text:s/>insegnarti a rispettare la patria e a non indietreggiare di fronte al nemico?” <text:s/>Se queste fossero le domande che cosa potremmo rispondere: che dicono il vero o che dicono il falso?”</text:span></text:span></text:p>
      <text:p text:style-name="P32"><text:span text:style-name="Strong_20_Emphasis"><text:span text:style-name="T54">“Che dicono il vero.”</text:span></text:span></text:p>
      <text:p text:style-name="P32"><text:span text:style-name="Strong_20_Emphasis"><text:span text:style-name="T54">“Ciò nonostante tu vorresti che io scappasi da Atene per rifugi</text:span></text:span><text:span text:style-name="Strong_20_Emphasis"><text:span text:style-name="T52">a</text:span></text:span><text:span text:style-name="Strong_20_Emphasis"><text:span text:style-name="T54">rmi in T</text:span></text:span><text:span text:style-name="Strong_20_Emphasis"><text:span text:style-name="T53">e</text:span></text:span><text:span text:style-name="Strong_20_Emphasis"><text:span text:style-name="T54">ssaglia, li dove gli uomini sono soliti </text:span></text:span><text:soft-page-break/><text:span text:style-name="Strong_20_Emphasis"><text:span text:style-name="T54">vivere nel disordine e nella dissolutezza e tutto questo per prolungare di qualche anno la mia vita che ormai volge al termine. E quali ragionamenti potrei fare sulla virtù e sulla giustizia dopo aver infranto le Leggi?”</text:span></text:span></text:p>
      <text:p text:style-name="P32"><text:span text:style-name="Strong_20_Emphasis"><text:span text:style-name="T54">“Nessuno in verit</text:span></text:span><text:span text:style-name="Strong_20_Emphasis"><text:span text:style-name="T52">à</text:span></text:span><text:span text:style-name="Strong_20_Emphasis"><text:span text:style-name="T54">”</text:span></text:span></text:p>
      <text:p text:style-name="P32"><text:span text:style-name="Strong_20_Emphasis"><text:span text:style-name="T54">“Come vedi mio buon amico, non mi è proprio possibile fuggire; se però tu sei convinto di potermi convincere, parla che io ti ascolterò con la massima attenzione.”</text:span></text:span></text:p>
      <text:p text:style-name="P32"><text:span text:style-name="Strong_20_Emphasis"><text:span text:style-name="T54">Così, dopo questa attenta analisi, Socrate lascia a Critone lo spazio per una replica. Ma Critone, sconsolato, ammette di non sapere cosa dire. Così, Socrate conclude il dialogo in questo modo.</text:span></text:span></text:p>
      <text:p text:style-name="P21"><text:span text:style-name="Strong_20_Emphasis"><text:span text:style-name="T4">“E allora lascia andare, o Critone, e facciamo in questo modo, perché in questo modo il Dio ci indica la via”</text:span></text:span><text:span text:style-name="Strong_20_Emphasis"><text:span text:style-name="T4"><text:note text:id="ftn14" text:note-class="footnote"><text:note-citation>8</text:note-citation><text:note-body><text:p text:style-name="P14">Citazione di Socrate dall’opera “Fedone”</text:p></text:note-body></text:note></text:span></text:span></text:p>
      <text:p text:style-name="P56"><text:span text:style-name="Strong_20_Emphasis"><text:span text:style-name="T53">Il giorno dopo è quello dell’esecuzione. Gli amici si danno appuntamento davanti alla porta del carcere e attendono che il capo degli </text:span></text:span><text:span text:style-name="Strong_20_Emphasis"><text:span text:style-name="T90">Undici</text:span></text:span><text:span text:style-name="Strong_20_Emphasis"><text:span text:style-name="T90"><text:note text:id="ftn15" text:note-class="footnote"><text:note-citation>9</text:note-citation><text:note-body><text:p text:style-name="P15">I magistrati che comandavano il corpo di polizia incaricato agli arresti e all’esecuzione delle condanne.</text:p></text:note-body></text:note></text:span></text:span><text:span text:style-name="Strong_20_Emphasis"><text:span text:style-name="T53"> li faccia entrare. Ci sono quasi tutti, c’è il fedele Apollodoro, il sempre presente Critone, </text:span></text:span><text:span text:style-name="Strong_20_Emphasis"><text:span text:style-name="T55">il più vecchio amico e sostenitore di Socrate</text:span></text:span><text:span text:style-name="Strong_20_Emphasis"><text:span text:style-name="T53">, il giovane Fedone, Antistene il cinico, </text:span></text:span><text:span text:style-name="Strong_20_Emphasis"><text:span text:style-name="T55">studente di Socrate che ist</text:span></text:span><text:span text:style-name="Strong_20_Emphasis"><text:span text:style-name="T52">i</text:span></text:span><text:span text:style-name="Strong_20_Emphasis"><text:span text:style-name="T55">tuì una scuola ad Atene che insegnava a diverse classi di ateniesi, </text:span></text:span><text:span text:style-name="Strong_20_Emphasis"><text:span text:style-name="T53">Ermogene il povero (per </text:span></text:span><text:soft-page-break/><text:span text:style-name="Strong_20_Emphasis"><text:span text:style-name="T53">distinguerlo dal fratello il più ricco di Atene), Epigene, Menesseno, Ctesippo ed Eschine. Qualcuno è venuto da lontano come i tebani Simmia e Cébete,</text:span></text:span><text:span text:style-name="Strong_20_Emphasis"><text:span text:style-name="T55"> studenti del Filolao pitagorico e due di Megara fra cui il filosofo Euclide, che avrebbe fornito rifugio a Platone e ai suoi amici, dopo l’esecuzione di Socrate, quando Atene era insicura</text:span></text:span><text:span text:style-name="Strong_20_Emphasis"><text:span text:style-name="T53">. Tra i discepoli più noti mancano Aristippo, Cleombroto e soprattutto Platone che proprio quel giorno </text:span></text:span><text:span text:style-name="Strong_20_Emphasis"><text:span text:style-name="T55">era malato</text:span></text:span><text:span text:style-name="Strong_20_Emphasis"><text:span text:style-name="T53">. </text:span></text:span></text:p>
      <text:p text:style-name="P32"><text:span text:style-name="Strong_20_Emphasis"><text:span text:style-name="T53">Quando i discepoli entrano nella cella, il maestro si trova in compagnia della moglie Santippe</text:span></text:span><text:span text:style-name="Strong_20_Emphasis"><text:span text:style-name="T53"><text:note text:id="ftn16" text:note-class="footnote"><text:note-citation>10</text:note-citation><text:note-body><text:p text:style-name="Footnote">Moglie di Socrate, divenuta proverbiale come tipo della moglie insopportabile, <text:span text:style-name="T112">secondo testimon</text:span><text:span text:style-name="T113">i</text:span><text:span text:style-name="T112">anze di Diogene Laerzio.</text:span></text:p></text:note-body></text:note></text:span></text:span><text:span text:style-name="Strong_20_Emphasis"><text:span text:style-name="T53"> e del figlio più piccolo </text:span></text:span><text:span text:style-name="Strong_20_Emphasis"><text:span text:style-name="T56">e quando quest’ultima percepì la nostra presenza, iniziò a gridare </text:span></text:span><text:span text:style-name="Strong_20_Emphasis"><text:span text:style-name="T53">disperatamente:“ </text:span></text:span><text:span text:style-name="Strong_20_Emphasis"><text:span text:style-name="T94">O Socrate</text:span></text:span><text:span text:style-name="Strong_20_Emphasis"><text:span text:style-name="T53">, </text:span></text:span><text:span text:style-name="Strong_20_Emphasis"><text:span text:style-name="T94">questa è l’ultima volta che gli amici parleranno a te e tu a loro</text:span></text:span><text:span text:style-name="Strong_20_Emphasis"><text:span text:style-name="T53">.” </text:span></text:span><text:span text:style-name="Strong_20_Emphasis"><text:span text:style-name="T56">e un diluvio di lacrime interruppe le sue parole, </text:span></text:span><text:span text:style-name="Strong_20_Emphasis"><text:span text:style-name="T53">al che il filosofo si rivol</text:span></text:span><text:span text:style-name="Strong_20_Emphasis"><text:span text:style-name="T52">se</text:span></text:span><text:span text:style-name="Strong_20_Emphasis"><text:span text:style-name="T53"> a Critone </text:span></text:span><text:span text:style-name="Strong_20_Emphasis"><text:span text:style-name="T52">dicendogli</text:span></text:span><text:span text:style-name="Strong_20_Emphasis"><text:span text:style-name="T53">: “ </text:span></text:span><text:span text:style-name="Strong_20_Emphasis"><text:span text:style-name="T94">Qualcuno per favore li riporti a casa.</text:span></text:span><text:span text:style-name="Strong_20_Emphasis"><text:span text:style-name="T53">” “</text:span></text:span><text:span text:style-name="Strong_20_Emphasis"><text:span text:style-name="T94">Ma tu muori innocente</text:span></text:span><text:span text:style-name="Strong_20_Emphasis"><text:span text:style-name="T53">!” esclama Santippe mentre la portano fuori dalla cella. “</text:span></text:span><text:span text:style-name="Strong_20_Emphasis"><text:span text:style-name="T94">E che volevi</text:span></text:span><text:span text:style-name="Strong_20_Emphasis"><text:span text:style-name="T53">:” risponde Socrate “</text:span></text:span><text:span text:style-name="Strong_20_Emphasis"><text:span text:style-name="T94">che morissi colpevole?</text:span></text:span><text:span text:style-name="Strong_20_Emphasis"><text:span text:style-name="T53">”</text:span></text:span></text:p>
      <text:p text:style-name="P32"><text:span text:style-name="Strong_20_Emphasis"><text:span text:style-name="T57">Nel frattempo uno dei carcerieri ha provveduto a togliere la catena dalla caviglia del prigioniero. Socrate, sedendosi sul letto, piegò la gamba e la massaggiò con la mano e mentre la massaggiava, disse: </text:span></text:span></text:p>
      <text:p text:style-name="P33"><text:soft-page-break/><text:span text:style-name="Strong_20_Emphasis"><text:span text:style-name="T57">“</text:span></text:span><text:span text:style-name="Strong_20_Emphasis"><text:span text:style-name="T95">Che strana cosa sono il dolore e il piacere, sembra che ognuno di loro segua sempre il suo contrario e che tutte e due non vogliono mai trovarsi insieme nella stessa persona. Ma, qualora uno insegua uno dei due e lo prenda, è costretto in qualche modo a prendere sempre anche l’altro, come se fossero attaccati a un’unica testa, nonostante siano due. Se Esopo avesse riflettuto su questo rapporto dolore-piacere, di sicuro ne avrebbe composto un racconto secondo cui il dio, volendo riconciliare questi, che sono in guerra, </text:span></text:span><text:span text:style-name="Strong_20_Emphasis"><text:span text:style-name="T96">e </text:span></text:span><text:span text:style-name="Strong_20_Emphasis"><text:span text:style-name="T95">poiché non ci riusciva </text:span></text:span><text:span text:style-name="Strong_20_Emphasis"><text:span text:style-name="T96">a riconciliarli</text:span></text:span><text:span text:style-name="Strong_20_Emphasis"><text:span text:style-name="T95">, legò insieme le loro teste e per </text:span></text:span><text:span text:style-name="Strong_20_Emphasis"><text:span text:style-name="T97">questo </text:span></text:span><text:span text:style-name="Strong_20_Emphasis"><text:span text:style-name="T95">motivo, ogni volta che è presente uno dei due, segue poi anche l’altro</text:span></text:span><text:span text:style-name="Strong_20_Emphasis"><text:span text:style-name="T57">”. </text:span></text:span><text:span text:style-name="Strong_20_Emphasis"><text:span text:style-name="T58">Qu</text:span></text:span><text:span text:style-name="Strong_20_Emphasis"><text:span text:style-name="T57">indi la conversazione si sposta sul tema della morte e dell’aldilà.</text:span></text:span></text:p>
      <text:p text:style-name="P32"><text:span text:style-name="Strong_20_Emphasis"><text:span text:style-name="T26">Fedone</text:span></text:span><text:span text:style-name="Strong_20_Emphasis"><text:span text:style-name="T87"> - </text:span></text:span><text:span text:style-name="Strong_20_Emphasis"><text:span text:style-name="T59">Socrate inizia il suo discorso descrivendo la vita filosofica come una progressiva liberazione dell’anima dal corpo. Per il filosofo il giorno della morte è il giorno della liberazione definitiva e di fronte alla prospettiva di lasciare questo mondo, <text:s/>Socrate </text:span></text:span><text:span text:style-name="Strong_20_Emphasis"><text:span text:style-name="T60">dice</text:span></text:span><text:span text:style-name="Strong_20_Emphasis"><text:span text:style-name="T59">: </text:span></text:span></text:p>
      <text:p text:style-name="P33"><text:span text:style-name="Strong_20_Emphasis"><text:span text:style-name="T59">“</text:span></text:span><text:span text:style-name="Strong_20_Emphasis"><text:span text:style-name="T98">Non provo dolore e non mi indigno poiché </text:span></text:span><text:span text:style-name="Strong_20_Emphasis"><text:span text:style-name="T95">ritengo che ai morti sia riservato un futuro e questo futuro sia migliore per i buoni che non per i cattivi</text:span></text:span><text:span text:style-name="Strong_20_Emphasis"><text:span text:style-name="T99">.</text:span></text:span><text:span text:style-name="Strong_20_Emphasis"><text:span text:style-name="T57">” </text:span></text:span></text:p>
      <text:p text:style-name="P32"><text:span text:style-name="Strong_20_Emphasis"><text:span text:style-name="T57">Il tebano Simmia interviene subito dopo e paragona il corpo a uno strumento musicale e l’anima all’armonia che nasce dallo strumento. Quando lo strumento si rompe, muore la lira e contemporaneamente muore anche l’armonia, cioè l’anima.</text:span></text:span></text:p>
      <text:p text:style-name="P32"><text:soft-page-break/><text:span text:style-name="Strong_20_Emphasis"><text:span text:style-name="T57">Ceb</text:span></text:span><text:span text:style-name="Strong_20_Emphasis"><text:span text:style-name="T61">è</text:span></text:span><text:span text:style-name="Strong_20_Emphasis"><text:span text:style-name="T57">te è l’interlocutore più attivo nella discussione e avanza l’ipotesi della reincarnazione </text:span></text:span><text:span text:style-name="Strong_20_Emphasis"><text:span text:style-name="T59">dell’anima come una replica della medesima anima in una serie di corpi distinti:</text:span></text:span></text:p>
      <text:p text:style-name="P32"><text:span text:style-name="Strong_20_Emphasis"><text:span text:style-name="T57">“</text:span></text:span><text:span text:style-name="Strong_20_Emphasis"><text:span text:style-name="T95">L’anima è come un uomo che nella vita abbia consumato molti mantelli. </text:span></text:span><text:span text:style-name="Strong_20_Emphasis"><text:span text:style-name="T98">Tutti i mantelli, ovvero tu</text:span></text:span><text:span text:style-name="Strong_20_Emphasis"><text:span text:style-name="T96">t</text:span></text:span><text:span text:style-name="Strong_20_Emphasis"><text:span text:style-name="T98">te le reincarnazioni, saranno meno longevi del loro</text:span></text:span><text:span text:style-name="Strong_20_Emphasis"><text:span text:style-name="T59"> </text:span></text:span><text:span text:style-name="Strong_20_Emphasis"><text:span text:style-name="T98">proprietario, a eccezione dell’ultimo che vivrà più a lungo del proprietario</text:span></text:span><text:span text:style-name="Strong_20_Emphasis"><text:span text:style-name="T59">”</text:span></text:span></text:p>
      <text:p text:style-name="P31"><text:span text:style-name="Strong_20_Emphasis"><text:span text:style-name="T59">La struttura logica dell’argomento di Ceb</text:span></text:span><text:span text:style-name="Strong_20_Emphasis"><text:span text:style-name="T61">è</text:span></text:span><text:span text:style-name="Strong_20_Emphasis"><text:span text:style-name="T59">te si può sintetizzare in questo modo:</text:span></text:span></text:p>
      <text:list text:style-name="L4">
        <text:list-item>
          <text:p text:style-name="P24"><text:span text:style-name="Strong_20_Emphasis"><text:span text:style-name="T59">L’anima è una entità dotata di una energia vitale finita;</text:span></text:span></text:p>
        </text:list-item>
        <text:list-item>
          <text:p text:style-name="P24"><text:span text:style-name="Strong_20_Emphasis"><text:span text:style-name="T59">L’anima interagisce con il corpo;</text:span></text:span></text:p>
        </text:list-item>
        <text:list-item>
          <text:p text:style-name="P24"><text:span text:style-name="Strong_20_Emphasis"><text:span text:style-name="T59">Nell’interazione, l’anima consuma la propria energia vitale.</text:span></text:span></text:p>
          <text:p text:style-name="P25"><text:span text:style-name="Strong_20_Emphasis"><text:span text:style-name="T59">Da queste premesse deriva la conclusione che l’anima deve, in un tempo <text:s/>finito, esaurire la propria energia vitale e quindi annientarsi, morire. Questa interpretazione quindi, attribuisce a Ceb</text:span></text:span><text:span text:style-name="Strong_20_Emphasis"><text:span text:style-name="T61">è</text:span></text:span><text:span text:style-name="Strong_20_Emphasis"><text:span text:style-name="T59">te la credenza della palingenesi dell’anima.</text:span></text:span></text:p>
        </text:list-item>
      </text:list>
      <text:p text:style-name="P32"><text:span text:style-name="Strong_20_Emphasis"><text:span text:style-name="T59">La risposta di Socrate all’obiezione di Ceb</text:span></text:span><text:span text:style-name="Strong_20_Emphasis"><text:span text:style-name="T61">è</text:span></text:span><text:span text:style-name="Strong_20_Emphasis"><text:span text:style-name="T59">te </text:span></text:span><text:span text:style-name="Strong_20_Emphasis"><text:span text:style-name="T62">è</text:span></text:span><text:span text:style-name="Strong_20_Emphasis"><text:span text:style-name="T59"> centrata sull’analisi delle idee di “anima”, “vita” </text:span></text:span><text:span text:style-name="Strong_20_Emphasis"><text:span text:style-name="T63">e</text:span></text:span><text:span text:style-name="Strong_20_Emphasis"><text:span text:style-name="T59"> “morte” </text:span></text:span><text:span text:style-name="Strong_20_Emphasis"><text:span text:style-name="T64">secondo la quale, occorre </text:span></text:span><text:span text:style-name="Strong_20_Emphasis"><text:span text:style-name="T59">considerare “</text:span></text:span><text:span text:style-name="Strong_20_Emphasis"><text:span text:style-name="T62">a priori”</text:span></text:span><text:span text:style-name="Strong_20_Emphasis"><text:span text:style-name="T59"> che il concetto di anima è implic</text:span></text:span><text:span text:style-name="Strong_20_Emphasis"><text:span text:style-name="T62">i</text:span></text:span><text:span text:style-name="Strong_20_Emphasis"><text:span text:style-name="T59">to </text:span></text:span><text:span text:style-name="Strong_20_Emphasis"><text:span text:style-name="T62">a</text:span></text:span><text:span text:style-name="Strong_20_Emphasis"><text:span text:style-name="T59">l concetto di vita o vitalità, cosicché non c’è vita senza anima né anima senza vita. </text:span></text:span><text:span text:style-name="Strong_20_Emphasis"><text:span text:style-name="T65">Socrate </text:span></text:span><text:soft-page-break/><text:span text:style-name="Strong_20_Emphasis"><text:span text:style-name="T65">sostiene che l'anima è immortale perché è immateriale. L'anima è ciò che ci rende umani, e ciò che ci distingue dagli animali. Gli animali sono esseri materiali, e la loro morte è la fine della loro esistenza. L'anima, invece, è immateriale, e quindi non è soggetta alle stesse leggi della materia.</text:span></text:span></text:p>
      <text:p text:style-name="P73"><text:span text:style-name="Strong_20_Emphasis"><text:span text:style-name="T100">Se le anime degli uomini perisc</text:span></text:span><text:span text:style-name="Strong_20_Emphasis"><text:span text:style-name="T101">o</text:span></text:span><text:span text:style-name="Strong_20_Emphasis"><text:span text:style-name="T100">no dopo la morte, <text:s/></text:span></text:span><text:span text:style-name="Strong_20_Emphasis"><text:span text:style-name="T101">allora </text:span></text:span><text:span text:style-name="Strong_20_Emphasis"><text:span text:style-name="T100">non ci sarebbe alcun modo per garantire che giustizia venga fatta. </text:span></text:span><text:span text:style-name="Strong_20_Emphasis"><text:span text:style-name="T101">L</text:span></text:span><text:span text:style-name="Strong_20_Emphasis"><text:span text:style-name="T100">a giustizia richiede che le persone siano punite per le loro azioni cattive e ricompensate per le loro azioni buone.</text:span></text:span></text:p>
      <text:p text:style-name="P32"><text:span text:style-name="Strong_20_Emphasis"><text:span text:style-name="T62">Questa risposta non sembra neanche a Socrate essere funzionale alle obiezioni poste da Ceb</text:span></text:span><text:span text:style-name="Strong_20_Emphasis"><text:span text:style-name="T61">è</text:span></text:span><text:span text:style-name="Strong_20_Emphasis"><text:span text:style-name="T62">te e quindi </text:span></text:span><text:span text:style-name="Strong_20_Emphasis"><text:span text:style-name="T64">con celata rassegnazione dice:</text:span></text:span></text:p>
      <text:p text:style-name="P33"><text:span text:style-name="Strong_20_Emphasis"><text:span text:style-name="T64">“Penso che non sia necessario amici miei, insistere ulteriormente sull</text:span></text:span><text:span text:style-name="Strong_20_Emphasis"><text:span text:style-name="T66">a debolezza </text:span></text:span><text:span text:style-name="Strong_20_Emphasis"><text:span text:style-name="T64">di queste opinioni, poiché siamo tutti certi che viviamo sotto l'immediata protezione della Provvidenza, e non sperimentiamo alcuna benedizione o maledizione di vita che egli non dispensa. Conosciamo una via d'uscita più sicura e facile da questo labirinto </text:span></text:span><text:span text:style-name="Strong_20_Emphasis"><text:span text:style-name="T63">che ci porti verso una logica </text:span></text:span><text:span text:style-name="Strong_20_Emphasis"><text:span text:style-name="T64">comprension</text:span></text:span><text:span text:style-name="Strong_20_Emphasis"><text:span text:style-name="T63">e</text:span></text:span><text:span text:style-name="Strong_20_Emphasis"><text:span text:style-name="T64">?</text:span></text:span></text:p>
      <text:p text:style-name="P33"><text:span text:style-name="Strong_20_Emphasis"><text:span text:style-name="T64">“Per vedere il destino di un singolo uomo nella sua giusta luce, dovremmo considerarlo in tutta la sua eternità. Non possiamo esaminare e giudicare le vie della Provvidenza, a meno che non possiamo ridurre la </text:span></text:span><text:soft-page-break/><text:span text:style-name="Strong_20_Emphasis"><text:span text:style-name="T64">durata eterna di un essere razionale sotto un unico punto di vista, adattato alla debolezza delle nostre percezioni. Ma se questo fosse possibile, siate certi, amici miei, allora non dovremmo né censurare, né mormorare, né lamentarci, ma intimoriti e sbalorditi, adorare e testimoniare la nostra ammirazione per l'infinita saggezza e bontà dell'essere che governa l'universo. Da tutte queste prove, prese insieme, penso che possiamo trarre la certezza più positiva di una vita futura”.</text:span></text:span></text:p>
      <text:p text:style-name="P32"><text:span text:style-name="Strong_20_Emphasis"><text:span text:style-name="T64">“Ognuno di voi potrebbe ora dirmi”: </text:span></text:span></text:p>
      <text:p text:style-name="P33"><text:span text:style-name="Strong_20_Emphasis"><text:span text:style-name="T64">“Ebbene, Socrate, ci hai convinto che c'è una vita futura per l'uomo; </text:span></text:span><text:span text:style-name="Strong_20_Emphasis"><text:span text:style-name="T66">m</text:span></text:span><text:span text:style-name="Strong_20_Emphasis"><text:span text:style-name="T64">a dicci anche dove abiteranno i nostri spiriti defunti? In quale regione eterica dimoreranno? Come saranno impiegati? Quale ricompensa incontreranno le anime virtuose? E i malvagi saranno illuminati e re</text:span></text:span><text:span text:style-name="Strong_20_Emphasis"><text:span text:style-name="T63">denti</text:span></text:span><text:span text:style-name="Strong_20_Emphasis"><text:span text:style-name="T64">?"</text:span></text:span></text:p>
      <text:p text:style-name="P33"><text:span text:style-name="Strong_20_Emphasis"><text:span text:style-name="T64">“Se qualcuno </text:span></text:span><text:span text:style-name="Strong_20_Emphasis"><text:span text:style-name="T63">di voi </text:span></text:span><text:span text:style-name="Strong_20_Emphasis"><text:span text:style-name="T64">mi pone queste domande, gli dir</text:span></text:span><text:span text:style-name="Strong_20_Emphasis"><text:span text:style-name="T67">ò”</text:span></text:span><text:span text:style-name="Strong_20_Emphasis"><text:span text:style-name="T64">:</text:span></text:span></text:p>
      <text:p text:style-name="P33"><text:span text:style-name="Strong_20_Emphasis"><text:span text:style-name="T62">“</text:span></text:span><text:span text:style-name="Strong_20_Emphasis"><text:span text:style-name="T68">Solo i malvagi possono augurarsi che </text:span></text:span><text:span text:style-name="Strong_20_Emphasis"><text:span text:style-name="T64">dopo la morte ci sia il nulla , ed è logico che così la pensino, perché è nel loro intere</text:span></text:span><text:span text:style-name="Strong_20_Emphasis"><text:span text:style-name="T63">s</text:span></text:span><text:span text:style-name="Strong_20_Emphasis"><text:span text:style-name="T64">se. Io sono sicuro che essi navigheranno angosciati nelle profondità della Terra che </text:span></text:span><text:span text:style-name="Strong_20_Emphasis"><text:span text:style-name="T63">O</text:span></text:span><text:span text:style-name="Strong_20_Emphasis"><text:span text:style-name="T64">mero ed altri hanno chiamato T</text:span></text:span><text:span text:style-name="Strong_20_Emphasis"><text:span text:style-name="T63">ar</text:span></text:span><text:span text:style-name="Strong_20_Emphasis"><text:span text:style-name="T64">taro.</text:span></text:span><text:span text:style-name="Strong_20_Emphasis"><text:span text:style-name="T68"> Solo chi ha trascorso la vita in onestà e virtù, sarà ammesso a vedere la Vera Terra.” </text:span></text:span></text:p>
      <text:p text:style-name="P32"><text:soft-page-break/><text:span text:style-name="Strong_20_Emphasis"><text:span text:style-name="T64">A</text:span></text:span><text:span text:style-name="Strong_20_Emphasis"><text:span text:style-name="T68"> questo punto Simmia gli chiede cosa intendesse dire con Vera Terra e chi dice queste cose?</text:span></text:span></text:p>
      <text:p text:style-name="P32"><text:span text:style-name="Strong_20_Emphasis"><text:span text:style-name="T68">Socrate ignora l’interruzione e prosegue: “Simmia, io non ti dirò che ho visto la Verità, come se fossi stato in Egitto e avessi visto le statue di Memnone, o come se avessi visto gli oracoli di Dodona o di Delfi. Ma, come ho già detto, ho appreso da uomini che erano degni di fede, e che avevano una conoscenza superiore alla mia, che c'è un luogo al di là del cielo e della terra, dove dimorano le anime dei giusti, dopo la loro morte. Questo luogo è chiamato Verità, e lì le anime vivono in un corpo fatto di pure idee”.</text:span></text:span></text:p>
      <text:p text:style-name="P33"><text:span text:style-name="Strong_20_Emphasis"><text:span text:style-name="T68">"Non posso darti prove di queste cose, ma posso dirti che sono convinto che siano vere. E se tu sei convinto che la giustizia sia la cosa più importante, allora dovresti anche essere convinto che le anime dei giusti vivono in un luogo migliore di questo.”</text:span></text:span></text:p>
      <text:p text:style-name="P32"><text:span text:style-name="Strong_20_Emphasis"><text:span text:style-name="T68">Simmia non ancora convinto di quello che ha sentito, dice al maestro:</text:span></text:span></text:p>
      <text:p text:style-name="P32"><text:span text:style-name="Strong_20_Emphasis"><text:span text:style-name="T68">“Credi davvero nelle cose che hai detto, o Socrate?”</text:span></text:span></text:p>
      <text:p text:style-name="P32"><text:span text:style-name="Strong_20_Emphasis"><text:span text:style-name="T68">Socrate risponde:</text:span></text:span></text:p>
      <text:p text:style-name="P33"><text:span text:style-name="Strong_20_Emphasis"><text:span text:style-name="T68">“</text:span></text:span><text:span text:style-name="Strong_20_Emphasis"><text:span text:style-name="T69">Io non so se queste cose siano vere o no. Ma mi sembrano una bella e affascinante visione del mondo. E mi piace pensarle, anche se non so se sono vere. </text:span></text:span><text:span text:style-name="Strong_20_Emphasis"><text:span text:style-name="T68">Crederci forse non si addice ad un uomo assennato, ma </text:span></text:span><text:soft-page-break/><text:span text:style-name="Strong_20_Emphasis"><text:span text:style-name="T68">in compenso ripeterselo, procura un grande benessere interiore.”</text:span></text:span></text:p>
      <text:p text:style-name="P32"><text:span text:style-name="Strong_20_Emphasis"><text:span text:style-name="T68">Proprio in quel momento uno schiavo appare sulla soglia con in mano un recipiente di marmo con la cicuta da pestare.</text:span></text:span></text:p>
      <text:p text:style-name="P33"><text:span text:style-name="Strong_20_Emphasis"><text:span text:style-name="T68">“Ecco che il destino mi chiama” dice Socrate alzandosi in piedi.</text:span></text:span></text:p>
      <text:p text:style-name="P33"><text:span text:style-name="Strong_20_Emphasis"><text:span text:style-name="T68">“Hai qualche ordine da darci?”, “In che modo vuoi essere seppellito?” mormora Critone</text:span></text:span></text:p>
      <text:p text:style-name="P33"><text:span text:style-name="Strong_20_Emphasis"><text:span text:style-name="T68">“Come più vi piace, sempre che </text:span></text:span><text:span text:style-name="Strong_20_Emphasis"><text:span text:style-name="T64">io rimanga fermo e non fugga altrove.</text:span></text:span><text:span text:style-name="Strong_20_Emphasis"><text:span text:style-name="T68">” risponde ridendo Socrate. “Ma insomma, mio buon Critone, come posso convincerti che Socrate sono solo io, quello che adesso sta conversando con te, e non quell’altro che tra poco vedrai cadavere su quel lettino?” Nel frattempo vengono fatti entrare Santippe, Mirto</text:span></text:span><text:span text:style-name="Strong_20_Emphasis"><text:span text:style-name="T68"><text:note text:id="ftn17" text:note-class="footnote"><text:note-citation>11</text:note-citation><text:note-body><text:p text:style-name="P16">Secondo Aristotele ebbe due mogli, di cui la prima (Santippe) gli diede un figlio, e la seconda (Mirto) altri due (altre fonti parlano di una sola moglie, Santippe)</text:p></text:note-body></text:note></text:span></text:span><text:span text:style-name="Strong_20_Emphasis"><text:span text:style-name="T68"> e i tre bambini per l’ultimo saluto. Socrate li abbraccia affettuosamente e poi li invita ad uscire. </text:span></text:span></text:p>
      <text:p text:style-name="P32"><text:span text:style-name="Strong_20_Emphasis"><text:span text:style-name="T55">Entra di nuovo il messo e rivolgendosi a Socrate gli dice: </text:span></text:span></text:p>
      <text:p text:style-name="P33"><text:span text:style-name="Strong_20_Emphasis"><text:span text:style-name="T55">“Oh, Socrate", disse: "</text:span></text:span><text:span text:style-name="Strong_20_Emphasis"><text:span text:style-name="T70">v</text:span></text:span><text:span text:style-name="Strong_20_Emphasis"><text:span text:style-name="T55">edo in te qualcosa di molto diverso dagli altri uomini. Sono stato abituato a incontrare sguardi sprezzanti e imprecazioni quando ho annunciato i comandi della giustizia, e ho ordinato loro di prepararsi a bere </text:span></text:span><text:span text:style-name="Strong_20_Emphasis"><text:span text:style-name="T70">per l’ultima volta</text:span></text:span><text:span text:style-name="Strong_20_Emphasis"><text:span text:style-name="T55">; </text:span></text:span><text:span text:style-name="Strong_20_Emphasis"><text:span text:style-name="T64">m</text:span></text:span><text:span text:style-name="Strong_20_Emphasis"><text:span text:style-name="T55">a tu sei l'uomo </text:span></text:span><text:soft-page-break/><text:span text:style-name="Strong_20_Emphasis"><text:span text:style-name="T55">più calmo e tranquillo che sia mai entrato in queste mura, e in questo momento sembri ancora più superiore. Se il tuo seno provasse risentimento, sono certo che non sarebbe verso di me, ma verso coloro che conosci. Credo di non aver bisogno di aggiungere altro: capisci il messaggio che devo consegnarti. Addio; soffri con pazienza il destino che ti è stato assegnato."</text:span></text:span></text:p>
      <text:p text:style-name="P32"><text:span text:style-name="Strong_20_Emphasis"><text:span text:style-name="T55">A queste parole si allontanò da Socrate e si ritirò in lacrime.</text:span></text:span></text:p>
      <text:p text:style-name="P32"><text:span text:style-name="Strong_20_Emphasis"><text:span text:style-name="T55">Socrate gli rispose dolcemente mentre andava: </text:span></text:span></text:p>
      <text:p text:style-name="P33"><text:span text:style-name="Strong_20_Emphasis"><text:span text:style-name="T55">“</text:span></text:span><text:span text:style-name="Strong_20_Emphasis"><text:span text:style-name="T64">a</text:span></text:span><text:span text:style-name="Strong_20_Emphasis"><text:span text:style-name="T55">mico, addio; </text:span></text:span><text:span text:style-name="Strong_20_Emphasis"><text:span text:style-name="T64">f</text:span></text:span><text:span text:style-name="Strong_20_Emphasis"><text:span text:style-name="T55">aremo come voi desiderate.” Poi rivolgendosi a noi: </text:span></text:span><text:span text:style-name="Strong_20_Emphasis"><text:span text:style-name="T71">o</text:span></text:span><text:span text:style-name="Strong_20_Emphasis"><text:span text:style-name="T55">sservate, disse Socrate:</text:span></text:span></text:p>
      <text:p text:style-name="P33"><text:span text:style-name="Strong_20_Emphasis"><text:span text:style-name="T55">“quest'uomo mi ha visitato e conversato spesso; ha un cuore veramente gentile e compassionevole; </text:span></text:span><text:span text:style-name="Strong_20_Emphasis"><text:span text:style-name="T66">v</text:span></text:span><text:span text:style-name="Strong_20_Emphasis"><text:span text:style-name="T55">edete come piange sinceramente. Ma, Critone, dobbiamo obbedirgli: sia portato il veleno, se è pronto; </text:span></text:span><text:span text:style-name="Strong_20_Emphasis"><text:span text:style-name="T71">i</text:span></text:span><text:span text:style-name="Strong_20_Emphasis"><text:span text:style-name="T55">n caso contrario, che sia preparato.”</text:span></text:span></text:p>
      <text:p text:style-name="P32"><text:span text:style-name="Strong_20_Emphasis"><text:span text:style-name="T55">Perché tanta fretta, mio caro Socrate, disse Critone: </text:span></text:span></text:p>
      <text:p text:style-name="P33"><text:span text:style-name="Strong_20_Emphasis"><text:span text:style-name="T55">“Credo che il sole splenda ancora sui monti. Molte persone, prima di assaggiare il calice della morte, mangiano e bevono, e dedicano i loro ultimi momenti all'amore.”</text:span></text:span></text:p>
      <text:p text:style-name="P33"><text:span text:style-name="Strong_20_Emphasis"><text:span text:style-name="T55">“Coloro che considerano ogni sospensione momentanea del loro destino come un guadagno, possono farlo. Ho motivi per </text:span></text:span><text:span text:style-name="Strong_20_Emphasis"><text:span text:style-name="T66">avere</text:span></text:span><text:span text:style-name="Strong_20_Emphasis"><text:span text:style-name="T55"> una condotta </text:span></text:span><text:soft-page-break/><text:span text:style-name="Strong_20_Emphasis"><text:span text:style-name="T55">diversa. Non credo di poter ottenere nulla con il ritardo; e apparirei ridicolo a me stesso se diventassi avido della vita, quando non è più mia.”</text:span></text:span></text:p>
      <text:p text:style-name="P32"><text:span text:style-name="Strong_20_Emphasis"><text:span text:style-name="T55">Critone fece quindi un segno allo schiavo </text:span></text:span><text:span text:style-name="Strong_20_Emphasis"><text:span text:style-name="T72">e dopo un po' torno l’ufficiale</text:span></text:span><text:span text:style-name="Strong_20_Emphasis"><text:span text:style-name="T55"> con una tazza di veleno in mano, e avanzò con essa verso Socrate.</text:span></text:span></text:p>
      <text:p text:style-name="P32"><text:span text:style-name="Strong_20_Emphasis"><text:span text:style-name="T55">Il virtuoso Socrate </text:span></text:span><text:span text:style-name="Strong_20_Emphasis"><text:span text:style-name="T72">gli andò incontro</text:span></text:span><text:span text:style-name="Strong_20_Emphasis"><text:span text:style-name="T55"> e disse: </text:span></text:span></text:p>
      <text:p text:style-name="P33"><text:span text:style-name="Strong_20_Emphasis"><text:span text:style-name="T55">“Amico, dammelo e dimmi come devo fare.</text:span></text:span><text:span text:style-name="Strong_20_Emphasis"><text:span text:style-name="T72">”</text:span></text:span></text:p>
      <text:p text:style-name="P33"><text:span text:style-name="Strong_20_Emphasis"><text:span text:style-name="T55">“Niente, disse l'ufficiale, se non camminare avanti e indietro dopo averlo bevuto fino a quando i tuoi piedi divent</text:span></text:span><text:span text:style-name="Strong_20_Emphasis"><text:span text:style-name="T73">eranno</text:span></text:span><text:span text:style-name="Strong_20_Emphasis"><text:span text:style-name="T55"> pesanti; </text:span></text:span><text:span text:style-name="Strong_20_Emphasis"><text:span text:style-name="T72">p</text:span></text:span><text:span text:style-name="Strong_20_Emphasis"><text:span text:style-name="T55">oi sdraiati, questo è tutto.”</text:span></text:span></text:p>
      <text:p text:style-name="P32"><text:span text:style-name="Strong_20_Emphasis"><text:span text:style-name="T55">Socrate prese tranquillamente la coppa da</text:span></text:span><text:span text:style-name="Strong_20_Emphasis"><text:span text:style-name="T66">lle sua mani </text:span></text:span><text:span text:style-name="Strong_20_Emphasis"><text:span text:style-name="T55">e, fissando </text:span></text:span><text:span text:style-name="Strong_20_Emphasis"><text:span text:style-name="T66">lo sguardo fermo dell’</text:span></text:span><text:span text:style-name="Strong_20_Emphasis"><text:span text:style-name="T55">ufficiale, gli chiese se pensava che qualche goccia potesse essere versata in libagione agli dei.</text:span></text:span></text:p>
      <text:p text:style-name="P32"><text:span text:style-name="Strong_20_Emphasis"><text:span text:style-name="T55">L'ufficiale rispose: “non c'è più della quantità necessaria”.</text:span></text:span></text:p>
      <text:p text:style-name="P32"><text:span text:style-name="Strong_20_Emphasis"><text:span text:style-name="T55">È abbastanza, di</text:span></text:span><text:span text:style-name="Strong_20_Emphasis"><text:span text:style-name="T58">sse</text:span></text:span><text:span text:style-name="Strong_20_Emphasis"><text:span text:style-name="T55"> Socrate. Una preghiera, tuttavia, </text:span></text:span><text:span text:style-name="Strong_20_Emphasis"><text:span text:style-name="T74">devo</text:span></text:span><text:span text:style-name="Strong_20_Emphasis"><text:span text:style-name="T55"> ancora rivolgere: "Voi d</text:span></text:span><text:span text:style-name="Strong_20_Emphasis"><text:span text:style-name="T75">e</text:span></text:span><text:span text:style-name="Strong_20_Emphasis"><text:span text:style-name="T55">i che mi chiamate, garantitemi un felice viaggio".</text:span></text:span></text:p>
      <text:p text:style-name="P32"><text:span text:style-name="Strong_20_Emphasis"><text:span text:style-name="T55">Dopo aver pronunciato queste parole, sollevò il calice alle labbra e </text:span></text:span><text:span text:style-name="Strong_20_Emphasis"><text:span text:style-name="T66">bevve</text:span></text:span><text:span text:style-name="Strong_20_Emphasis"><text:span text:style-name="T55"> senza scoprire la più piccola emozione.</text:span></text:span></text:p>
      <text:p text:style-name="P32"><text:span text:style-name="Strong_20_Emphasis"><text:span text:style-name="T55">“In quel momento la nostra forza d'animo ci </text:span></text:span><text:span text:style-name="Strong_20_Emphasis"><text:span text:style-name="T74">venne</text:span></text:span><text:span text:style-name="Strong_20_Emphasis"><text:span text:style-name="T55"> meno, e un'ondata di dolore <text:s/>scoppi</text:span></text:span><text:span text:style-name="Strong_20_Emphasis"><text:span text:style-name="T74">ò</text:span></text:span><text:span text:style-name="Strong_20_Emphasis"><text:span text:style-name="T55"> </text:span></text:span><text:span text:style-name="Strong_20_Emphasis"><text:span text:style-name="T72">in</text:span></text:span><text:span text:style-name="Strong_20_Emphasis"><text:span text:style-name="T55"> tutti noi. <text:s/></text:span></text:span><text:soft-page-break/><text:span text:style-name="Strong_20_Emphasis"><text:span text:style-name="T55">Sprofondai sotto i miei dolori e, per dare libero passaggio alle mie lacrime, mi coprii il viso con il mio mantello”.</text:span></text:span></text:p>
      <text:p text:style-name="P32"><text:span text:style-name="Strong_20_Emphasis"><text:span text:style-name="T55">Critone, che era ancora meno in grado di trattenere le sue emozioni, si alzò e camminò su e giù per la prigione come una persona </text:span></text:span><text:span text:style-name="Strong_20_Emphasis"><text:span text:style-name="T74">in preda alla disperazione</text:span></text:span><text:span text:style-name="Strong_20_Emphasis"><text:span text:style-name="T55">.</text:span></text:span></text:p>
      <text:p text:style-name="P32"><text:span text:style-name="Strong_20_Emphasis"><text:span text:style-name="T55">Apollodoro, che non aveva mai cessato di piangere, quasi per tutto il giorno, cominciò ora a pronunciare amari lamenti.</text:span></text:span></text:p>
      <text:p text:style-name="P32"><text:span text:style-name="Strong_20_Emphasis"><text:span text:style-name="T55">Socrate, che continuava </text:span></text:span><text:span text:style-name="Strong_20_Emphasis"><text:span text:style-name="T74">ad essere</text:span></text:span><text:span text:style-name="Strong_20_Emphasis"><text:span text:style-name="T55"> impassibile, ci chiamò e disse: amici miei, state tranquilli; “</text:span></text:span><text:span text:style-name="Strong_20_Emphasis"><text:span text:style-name="T72">h</text:span></text:span><text:span text:style-name="Strong_20_Emphasis"><text:span text:style-name="T55">o mandato via le donne per non essere turbat</text:span></text:span><text:span text:style-name="Strong_20_Emphasis"><text:span text:style-name="T72">o</text:span></text:span><text:span text:style-name="Strong_20_Emphasis"><text:span text:style-name="T55"> dalla loro debolezza. Mi è stato detto che un uomo dovrebbe sforzarsi di lasciare il mondo tra preghiere e benedizioni; </text:span></text:span><text:span text:style-name="Strong_20_Emphasis"><text:span text:style-name="T72">s</text:span></text:span><text:span text:style-name="Strong_20_Emphasis"><text:span text:style-name="T55">pero, pertanto, che vi comporterete come uomini.”</text:span></text:span></text:p>
      <text:p text:style-name="P32"><text:span text:style-name="Strong_20_Emphasis"><text:span text:style-name="T55">Questa incrollabile costanza d'animo in Socrate ci </text:span></text:span><text:span text:style-name="Strong_20_Emphasis"><text:span text:style-name="T74">fece</text:span></text:span><text:span text:style-name="Strong_20_Emphasis"><text:span text:style-name="T55"> vergognare e </text:span></text:span><text:span text:style-name="Strong_20_Emphasis"><text:span text:style-name="T74">fummo costretti a mettere</text:span></text:span><text:span text:style-name="Strong_20_Emphasis"><text:span text:style-name="T55"> in pausa il nostro dolore.</text:span></text:span></text:p>
      <text:p text:style-name="P32"><text:span text:style-name="Strong_20_Emphasis"><text:span text:style-name="T55">Camminò nella prigione fino a quando i suoi piedi cominciarono </text:span></text:span><text:span text:style-name="Strong_20_Emphasis"><text:span text:style-name="T74">ad essere</text:span></text:span><text:span text:style-name="Strong_20_Emphasis"><text:span text:style-name="T55"> pesanti, poi si sdraiò sul letto </text:span></text:span><text:span text:style-name="Strong_20_Emphasis"><text:span text:style-name="T74">di</text:span></text:span><text:span text:style-name="Strong_20_Emphasis"><text:span text:style-name="T55"> schiena, come gli era stato ordinato. Poco dopo l'ufficiale venne ad osservarlo; gli pizzicò il piede e gli chiese se lo sentiva. Socrate rispose: “No”.</text:span></text:span></text:p>
      <text:p text:style-name="P32"><text:span text:style-name="Strong_20_Emphasis"><text:span text:style-name="T55">Fece lo stesso alla sua coscia </text:span></text:span><text:span text:style-name="Strong_20_Emphasis"><text:span text:style-name="T74">e </text:span></text:span><text:span text:style-name="Strong_20_Emphasis"><text:span text:style-name="T55">immediatamente si voltò verso di noi e ci disse che era freddo e rigido. Lo sentì di </text:span></text:span><text:soft-page-break/><text:span text:style-name="Strong_20_Emphasis"><text:span text:style-name="T55">nuovo, e disse: "Il suo basso ventre comincia ad essere colpito: non appena il veleno raggiungerà il suo cuore spirerà”.</text:span></text:span></text:p>
      <text:p text:style-name="P32"><text:span text:style-name="Strong_20_Emphasis"><text:span text:style-name="T55">Socrate, che era stato coperto dall'ufficiale, si scoprì e disse: Critone, non dimenticare il mio amico, di offrire un gallo a Esculapio; Gli dobbiamo un sacrificio.</text:span></text:span></text:p>
      <text:p text:style-name="P32"><text:span text:style-name="Strong_20_Emphasis"><text:span text:style-name="T55">Critone rispose: "Sarà fatto". Hai qualcos'altro da comandare?</text:span></text:span></text:p>
      <text:p text:style-name="P32"><text:span text:style-name="Strong_20_Emphasis"><text:span text:style-name="T55">A questo non seguì alcuna risposta.</text:span></text:span></text:p>
      <text:p text:style-name="P32"><text:span text:style-name="Strong_20_Emphasis"><text:span text:style-name="T55">Un attimo dopo fu convulso. L'ufficiale lo scoprì, ma </text:span></text:span><text:span text:style-name="Strong_20_Emphasis"><text:span text:style-name="T74">il</text:span></text:span><text:span text:style-name="Strong_20_Emphasis"><text:span text:style-name="T55"> suo </text:span></text:span><text:span text:style-name="Strong_20_Emphasis"><text:span text:style-name="T74">volto</text:span></text:span><text:span text:style-name="Strong_20_Emphasis"><text:span text:style-name="T55"> era fiss</text:span></text:span><text:span text:style-name="Strong_20_Emphasis"><text:span text:style-name="T74">o e immobile</text:span></text:span><text:span text:style-name="Strong_20_Emphasis"><text:span text:style-name="T55"> su cui Critone chiuse la bocca e gli occhi.</text:span></text:span></text:p>
      <text:p text:style-name="P32"><text:span text:style-name="Strong_20_Emphasis"><text:span text:style-name="T55">Questo, </text:span></text:span><text:span text:style-name="Strong_20_Emphasis"><text:span text:style-name="T75">e</text:span></text:span><text:span text:style-name="Strong_20_Emphasis"><text:span text:style-name="T55">secrato, fu la fine del nostro amico </text:span></text:span><text:span text:style-name="Strong_20_Emphasis"><text:span text:style-name="T75"> </text:span></text:span><text:span text:style-name="Strong_20_Emphasis"><text:span text:style-name="T55">- un uomo che, di tutti gli uomini che abbiamo conosciuto, era certamente il più virtuoso, saggio e giusto.</text:span></text:span></text:p>
      <text:p text:style-name="P21"><text:span text:style-name="Strong_20_Emphasis"><text:span text:style-name="T28"/></text:span></text:p>
      <text:p text:style-name="P23"><text:span text:style-name="Strong_20_Emphasis"><text:span text:style-name="T28">Epilogo</text:span></text:span></text:p>
      <text:p text:style-name="P65"><text:span text:style-name="Strong_20_Emphasis"><text:span text:style-name="T76">La filosofia ha una funzione, più che un sapere è un atteggiamento, l'atteggiam</text:span></text:span><text:span text:style-name="Strong_20_Emphasis"><text:span text:style-name="T77">e</text:span></text:span><text:span text:style-name="Strong_20_Emphasis"><text:span text:style-name="T76">nto di mettere in questione le idee che </text:span></text:span><text:span text:style-name="Strong_20_Emphasis"><text:span text:style-name="T78">ognuno di noi ha in testa. Perché ho queste idee?</text:span></text:span><text:span text:style-name="Strong_20_Emphasis"><text:span text:style-name="T76"> </text:span></text:span><text:span text:style-name="Strong_20_Emphasis"><text:span text:style-name="T78">H</text:span></text:span><text:span text:style-name="Strong_20_Emphasis"><text:span text:style-name="T76">o queste idee perché ho una fede e quindi accolgo le idee di quella fede? Le ho in testa perché un retore o un sofista attraverso la mozione degli affetti mi ha entusiasmato per cui quello che dice per me è oro colato? Le ho perché </text:span></text:span><text:span text:style-name="Strong_20_Emphasis"><text:span text:style-name="T78">sono le idee di una </text:span></text:span><text:span text:style-name="Strong_20_Emphasis"><text:span text:style-name="T76">persona che io stimo molto e quindi sono della sua idea? Bene dice Socrate, tutte queste idee non servono a niente, queste idee sono infondate, queste idee sono un sentito dire. </text:span></text:span><text:span text:style-name="Strong_20_Emphasis"><text:span text:style-name="T58">Q</text:span></text:span><text:span text:style-name="Strong_20_Emphasis"><text:span text:style-name="T76">uesta cosa è più evidente oggi di quanto non lo fosse all'epoca. </text:span></text:span><text:span text:style-name="Strong_20_Emphasis"><text:span text:style-name="T78">P</text:span></text:span><text:span text:style-name="Strong_20_Emphasis"><text:span text:style-name="T76">ensiamo alle idee che sono state fornite dalla televisio</text:span></text:span><text:span text:style-name="Strong_20_Emphasis"><text:span text:style-name="T77">n</text:span></text:span><text:span text:style-name="Strong_20_Emphasis"><text:span text:style-name="T76">e, quelle che sono state fornite dai giornali, quelle che sono state fornite dai social, uno ha quelle idee senza avere il fondamento di queste idee.</text:span></text:span></text:p>
      <text:p text:style-name="P74">La fi<text:span text:style-name="T114">lo</text:span>sofia ti chiede qual'<text:span text:style-name="T114">é</text:span> il fondamento, l'argomentazione che fa si che quell'idea che tu hai in mente, abbia una sua plausibilità e quindi una sua dignità e quindi una possibilità di essere argomentata?</text:p>
      <text:p text:style-name="P74"><text:span text:style-name="Strong_20_Emphasis"><text:span text:style-name="T102">Dice Socrate, quando raccoglieva intorno a s</text:span></text:span><text:span text:style-name="Strong_20_Emphasis"><text:span text:style-name="T103">e</text:span></text:span><text:span text:style-name="Strong_20_Emphasis"><text:span text:style-name="T102"> i suoi allievi e chiedeva a </text:span></text:span><text:span text:style-name="Strong_20_Emphasis"><text:span text:style-name="T104">ciascuno di loro,</text:span></text:span><text:span text:style-name="Strong_20_Emphasis"><text:span text:style-name="T102"> che cos'è la giustizia, e poi all'altro e poi all'altro ancora e alla fine </text:span></text:span><text:soft-page-break/><text:span text:style-name="Strong_20_Emphasis"><text:span text:style-name="T102">cercava di individuare se le ragioni per cui ciascuno proponeva la sua opinione, conteneva o meno contraddizioni o dei sentit</text:span></text:span><text:span text:style-name="Strong_20_Emphasis"><text:span text:style-name="T103">o</text:span></text:span><text:span text:style-name="Strong_20_Emphasis"><text:span text:style-name="T102"> dire o delle influenze emotive, e tutte queste considerazioni facevano sì che opinioni fondate su queste ragioni veni</text:span></text:span><text:span text:style-name="Strong_20_Emphasis"><text:span text:style-name="T104">ssero </text:span></text:span><text:span text:style-name="Strong_20_Emphasis"><text:span text:style-name="T102">escluse dalla discussione e restava in piedi solo l'idea che era ben argomentata, non contraddittoria, con fondamento. </text:span></text:span></text:p>
      <text:p text:style-name="P74"><text:span text:style-name="Strong_20_Emphasis"><text:span text:style-name="T102">I Greci dicevano che questa idea aveva la dignità della </text:span></text:span><text:span text:style-name="Strong_20_Emphasis"><text:span text:style-name="T107">episteme.</text:span></text:span><text:span text:style-name="Strong_20_Emphasis"><text:span text:style-name="T102"> </text:span></text:span><text:span text:style-name="Strong_20_Emphasis"><text:span text:style-name="T105">E</text:span></text:span><text:span text:style-name="Strong_20_Emphasis"><text:span text:style-name="T102">pisteme è una parola greca </text:span></text:span><text:span text:style-name="Strong_20_Emphasis"><text:span text:style-name="T105">che deriva da due radici: </text:span></text:span><text:span text:style-name="Strong_20_Emphasis"><text:span text:style-name="T106">Epi</text:span></text:span><text:span text:style-name="Strong_20_Emphasis"><text:span text:style-name="T105">, preposizione che significa “su”, “sopra”, “oltre” ed </text:span></text:span><text:span text:style-name="Strong_20_Emphasis"><text:span text:style-name="T106">Istemi</text:span></text:span><text:span text:style-name="Strong_20_Emphasis"><text:span text:style-name="T105">, verbo che significa “stare”, “porre”, “stabilire”. Combinando questi due elementi, si ottiene il significato di “</text:span></text:span><text:span text:style-name="Strong_20_Emphasis"><text:span text:style-name="T106">conoscenza che si pone su una base solida</text:span></text:span><text:span text:style-name="Strong_20_Emphasis"><text:span text:style-name="T105">”</text:span></text:span><text:span text:style-name="Strong_20_Emphasis"><text:span text:style-name="T102">, non </text:span></text:span><text:span text:style-name="Strong_20_Emphasis"><text:span text:style-name="T105">conoscenza </text:span></text:span><text:span text:style-name="Strong_20_Emphasis"><text:span text:style-name="T102">per sentito dire, ma perché è bene argomentata </text:span></text:span><text:span text:style-name="Strong_20_Emphasis"><text:span text:style-name="T105">e poggia su basi solide.</text:span></text:span></text:p>
      <text:p text:style-name="P74"><text:span text:style-name="Strong_20_Emphasis"><text:span text:style-name="T102">Compito della filosofia è mettere in questione le nostre idee, <text:s/>perché le nostre idee ogni tanto si addormentano, ogni tanto si irrigidiscono, ogni tanto si spengono come le stelle, oppure diventano delle abitudini mentali all'interno delle quali ci </text:span></text:span><text:span text:style-name="Strong_20_Emphasis"><text:span text:style-name="T104">si </text:span></text:span><text:span text:style-name="Strong_20_Emphasis"><text:span text:style-name="T102">accovaccia </text:span></text:span><text:span text:style-name="Strong_20_Emphasis"><text:span text:style-name="T105">per pigrizia <text:s/>o perché ci danno </text:span></text:span><text:span text:style-name="Strong_20_Emphasis"><text:span text:style-name="T102">sicurezza. </text:span></text:span><text:span text:style-name="Strong_20_Emphasis"><text:span text:style-name="T105">E</text:span></text:span><text:span text:style-name="Strong_20_Emphasis"><text:span text:style-name="T102">vitiamo di cambiarla perché dovremmo cambiare la nostra visione del mondo. </text:span></text:span><text:span text:style-name="Strong_20_Emphasis"><text:span text:style-name="T103">A</text:span></text:span><text:span text:style-name="Strong_20_Emphasis"><text:span text:style-name="T102">d essa ci affidiamo quando diventiamo vecchi, le chiamiamo addirittura principi, semplicemente perché </text:span></text:span><text:soft-page-break/><text:span text:style-name="Strong_20_Emphasis"><text:span text:style-name="T102">ci siamo abituati a pensare a quelle idee, e non altre, solo quelle. </text:span></text:span></text:p>
      <text:p text:style-name="P75"><text:span text:style-name="Strong_20_Emphasis"><text:span text:style-name="T102">La filosofia fa questo lavoro, mette in questione le tue idee, assume nei confronti delle tue idee un atteggiamento critico, critico è </text:span></text:span><text:span text:style-name="Strong_20_Emphasis"><text:span text:style-name="T105">anch’essa </text:span></text:span><text:span text:style-name="Strong_20_Emphasis"><text:span text:style-name="T102">una parola greca che viene da </text:span></text:span><text:span text:style-name="Strong_20_Emphasis"><text:span text:style-name="T105">k</text:span></text:span><text:span text:style-name="Strong_20_Emphasis"><text:span text:style-name="T102">risis, è ovvio che quando io metto in questione le mie idee vado in crisi </text:span></text:span><text:span text:style-name="Strong_20_Emphasis"><text:span text:style-name="T105">perché devo fare delle scelte,</text:span></text:span><text:span text:style-name="Strong_20_Emphasis"><text:span text:style-name="T102"> e la gente tende a non andare in crisi, a non problematizzare, e succede </text:span></text:span><text:span text:style-name="Strong_20_Emphasis"><text:span text:style-name="T103">c</text:span></text:span><text:span text:style-name="Strong_20_Emphasis"><text:span text:style-name="T102">he con idee sbagliate, conduco una vita sbagliata, all</text:span></text:span><text:span text:style-name="Strong_20_Emphasis"><text:span text:style-name="T103">o</text:span></text:span><text:span text:style-name="Strong_20_Emphasis"><text:span text:style-name="T102">ra le idee vanno messe in gioco continuamente, continuamente discusse e messe alla prova.</text:span></text:span><text:span text:style-name="Strong_20_Emphasis"><text:span text:style-name="T102"><text:note text:id="ftn18" text:note-class="footnote"><text:note-citation>12</text:note-citation><text:note-body><text:p text:style-name="P17">Umberto Galimberti – Festival della bellezza 2021</text:p></text:note-body></text:note></text:span></text:span></text:p>
      <text:p text:style-name="P32"><text:span text:style-name="Strong_20_Emphasis"><text:span text:style-name="T76">In tutte le argomentazioni e nei dialoghi con i suoi allievi, emerge in maniera chiara e inconfutabile che Socrate non ha timore per la propria morte.</text:span></text:span><text:span text:style-name="Strong_20_Emphasis"><text:span text:style-name="T79"> L’anima essendo immortale sopravviverà alla morte del corpo e continuerà ad esistere in un altro luogo. Egli ha trascorso la sua vita a cercare la verità, e ritiene che questa sia la cosa più importante nella vita. La sua paura è invece, rivolta alla morte del logos, cioè della ragione e della verità. Si corre il</text:span></text:span><text:span text:style-name="Strong_20_Emphasis"><text:span text:style-name="T76"> rischio che il ragionamento muoia e di conseguenza si cade nella misologia ovvero si inizi a diffidare del logos come strumento di indagine, che si ingenera in colui che non conoscendo l’arte del ragionare, crede veri, </text:span></text:span><text:soft-page-break/><text:span text:style-name="Strong_20_Emphasis"><text:span text:style-name="T76">ragionamenti in seguito rivelatisi falsi. </text:span></text:span><text:span text:style-name="Strong_20_Emphasis"><text:span text:style-name="T79">Per un filosofo, la morte del logos è una prospettiva che non può essere accettata. </text:span></text:span></text:p>
      <text:p text:style-name="P32"><text:span text:style-name="Strong_20_Emphasis"><text:span text:style-name="T80">Umberto Eco, ha scritto parole di grande effetto nel suo libro "Apocalittici e integrati", nel capitolo <text:s/>"Il linguaggio dei filosofi", per sottolineare l'importanza dei quattro filosofi greci - Socrate, Platone, Aristotele e Kant - per la storia della filosofia.</text:span></text:span></text:p>
      <text:p text:style-name="P56"><text:span text:style-name="Strong_20_Emphasis"><text:span text:style-name="T81">Eco sostiene che questi quattro filosofi sono i pilastri su cui si regge l'intera tradizione filosofica occidentale. Socrate è il fondatore della filosofia, e ha posto le basi per il pensiero critico e la ricerca della verità. Platone ha sviluppato le idee di Socrate, e ha creato una visione del mondo che ha avuto una profonda influenza sulla cultura occidentale. Aristotele ha sistematizzato il pensiero filosofico precedente, e ha fornito le basi per la scienza moderna. Kant ha posto le basi per la filosofia moderna, e ha sfidato le idee tradizionali sulla conoscenza e la realtà.</text:span></text:span></text:p>
      <text:p text:style-name="P56"><text:span text:style-name="Strong_20_Emphasis"><text:span text:style-name="T80">Umberto Eco </text:span></text:span><text:span text:style-name="Strong_20_Emphasis"><text:span text:style-name="T82">dice</text:span></text:span><text:span text:style-name="Strong_20_Emphasis"><text:span text:style-name="T80">:</text:span></text:span></text:p>
      <text:p text:style-name="P32"><text:span text:style-name="Strong_20_Emphasis"><text:span text:style-name="T81">“</text:span></text:span><text:span text:style-name="Strong_20_Emphasis"><text:span text:style-name="T83">P</text:span></text:span><text:span text:style-name="Strong_20_Emphasis"><text:span text:style-name="T84">rovate a prendere un’enc</text:span></text:span><text:span text:style-name="Strong_20_Emphasis"><text:span text:style-name="T76">ic</text:span></text:span><text:span text:style-name="Strong_20_Emphasis"><text:span text:style-name="T84">lopedia di filosofia organizzata per autori, in cui ogni volume è dedicato ad un filosofo. Mettete i libri accatastati uno </text:span></text:span><text:span text:style-name="Strong_20_Emphasis"><text:span text:style-name="T75">sopra</text:span></text:span><text:span text:style-name="Strong_20_Emphasis"><text:span text:style-name="T84"> </text:span></text:span><text:span text:style-name="Strong_20_Emphasis"><text:span text:style-name="T75">l’</text:span></text:span><text:span text:style-name="Strong_20_Emphasis"><text:span text:style-name="T84">altro in ordine cronologico ascendente, </text:span></text:span><text:span text:style-name="Strong_20_Emphasis"><text:span text:style-name="T76">simile ad una piramide di mattoni.</text:span></text:span></text:p>
      <text:p text:style-name="P32"><text:span text:style-name="Strong_20_Emphasis"><text:span text:style-name="T76"/></text:span></text:p>
      <text:list text:style-name="L5">
        <text:list-item>
          <text:p text:style-name="P26"><text:soft-page-break/><text:span text:style-name="Strong_20_Emphasis"><text:span text:style-name="T76">t</text:span></text:span><text:span text:style-name="Strong_20_Emphasis"><text:span text:style-name="T84">ogliete Kant, la torre si sbilancia;</text:span></text:span></text:p>
        </text:list-item>
        <text:list-item>
          <text:p text:style-name="P27"><text:span text:style-name="Strong_20_Emphasis"><text:span text:style-name="T76">t</text:span></text:span><text:span text:style-name="Strong_20_Emphasis"><text:span text:style-name="T84">ogliete Aristotele, qualche libro cadrà; </text:span></text:span></text:p>
        </text:list-item>
        <text:list-item>
          <text:p text:style-name="P27"><text:span text:style-name="Strong_20_Emphasis"><text:span text:style-name="T76">p</text:span></text:span><text:span text:style-name="Strong_20_Emphasis"><text:span text:style-name="T84">rovate a togliere Platone, gran parte dei mattoni scivoler</text:span></text:span><text:span text:style-name="Strong_20_Emphasis"><text:span text:style-name="T75">a</text:span></text:span><text:span text:style-name="Strong_20_Emphasis"><text:span text:style-name="T84">nno via; </text:span></text:span></text:p>
        </text:list-item>
        <text:list-item>
          <text:p text:style-name="P27"><text:span text:style-name="Strong_20_Emphasis"><text:span text:style-name="T76">t</text:span></text:span><text:span text:style-name="Strong_20_Emphasis"><text:span text:style-name="T84">ogliete Socrate, vedrete che, irrimediabilmente, tutta la torre crollerà e non rimarranno che macerie.”</text:span></text:span></text:p>
          <text:p text:style-name="P28"><text:span text:style-name="Strong_20_Emphasis"><text:span text:style-name="T84"/></text:span></text:p>
          <text:p text:style-name="P29"><text:span text:style-name="Strong_20_Emphasis"><text:span text:style-name="T84">Socrate è il pilastro della filosofia occidentale, </text:span></text:span><text:span text:style-name="Strong_20_Emphasis"><text:span text:style-name="T64">ha lasciato ai suoi allievi un grande patrimonio di pensiero e di insegnamenti. </text:span></text:span><text:span text:style-name="Strong_20_Emphasis"><text:span text:style-name="T85">L’allievo</text:span></text:span><text:span text:style-name="Strong_20_Emphasis"><text:span text:style-name="T64"> più famos</text:span></text:span><text:span text:style-name="Strong_20_Emphasis"><text:span text:style-name="T85">o</text:span></text:span><text:span text:style-name="Strong_20_Emphasis"><text:span text:style-name="T64"> è </text:span></text:span><text:span text:style-name="Strong_20_Emphasis"><text:span text:style-name="T85">senza dubbio </text:span></text:span><text:span text:style-name="Strong_20_Emphasis"><text:span text:style-name="T64">Platone, che fond</text:span></text:span><text:span text:style-name="Strong_20_Emphasis"><text:span text:style-name="T85">ò</text:span></text:span><text:span text:style-name="Strong_20_Emphasis"><text:span text:style-name="T64"> l'Accademia di Atene e </text:span></text:span><text:span text:style-name="Strong_20_Emphasis"><text:span text:style-name="T85">che trasmise </text:span></text:span><text:span text:style-name="Strong_20_Emphasis"><text:span text:style-name="T64">molti dei dialoghi di Socrate attraverso i suoi scritti. </text:span></text:span><text:span text:style-name="Strong_20_Emphasis"><text:span text:style-name="T76">T</text:span></text:span><text:span text:style-name="Strong_20_Emphasis"><text:span text:style-name="T64">ra gli allievi di Socrate vi fu Antistene, </text:span></text:span><text:span text:style-name="Strong_20_Emphasis"><text:span text:style-name="T76">a</text:span></text:span><text:span text:style-name="Strong_20_Emphasis"><text:span text:style-name="T64">nche se non rinomato come Platone, fu maestro di Diogene di Sinope e che riprese il tema del dubbio socratico facendone il fulcro della corrente dei cinici, dalla quale nacque, con Zenone di Cizio, lo stoicismo che annoverava tra i suoi membri Cicerone, Seneca, </text:span></text:span><text:span text:style-name="Strong_20_Emphasis"><text:span text:style-name="T58">Epitteto </text:span></text:span><text:span text:style-name="Strong_20_Emphasis"><text:span text:style-name="T64">e Marco Aurelio</text:span></text:span><text:span text:style-name="Strong_20_Emphasis"><text:span text:style-name="T64"><text:note text:id="ftn19" text:note-class="footnote"><text:note-citation>13</text:note-citation><text:note-body><text:p text:style-name="P18">Imperatore, filosofo e scrittore romano</text:p></text:note-body></text:note></text:span></text:span><text:span text:style-name="Strong_20_Emphasis"><text:span text:style-name="T64">.</text:span></text:span></text:p>
        </text:list-item>
      </text:list>
      <text:p text:style-name="P19"><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4T16:32:29.992294674</meta:creation-date>
    <dc:date>2026-01-25T10:00:05.403625946</dc:date>
    <dc:creator>corrado tafaro</dc:creator>
    <meta:editing-duration>PT14M8S</meta:editing-duration>
    <meta:editing-cycles>3</meta:editing-cycles>
    <meta:generator>LibreOffice/24.2.7.2$Linux_X86_64 LibreOffice_project/420$Build-2</meta:generator>
    <meta:document-statistic meta:table-count="0" meta:image-count="0" meta:object-count="0" meta:page-count="39" meta:paragraph-count="165" meta:word-count="8176" meta:character-count="49629" meta:non-whitespace-character-count="41566"/>
  </office:meta>
</office:document-meta>
</file>