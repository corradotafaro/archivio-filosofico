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1cfe11" officeooo:paragraph-rsid="000d4898" style:font-size-asian="14pt" style:font-size-complex="14pt"/>
    </style:style>
    <style:style style:name="P2"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cfe11" officeooo:paragraph-rsid="000d4898" style:font-size-asian="14pt" style:font-size-complex="14pt"/>
    </style:style>
    <style:style style:name="P3"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cfe11" officeooo:paragraph-rsid="000ddfe8" style:font-size-asian="14pt" style:font-size-complex="14pt"/>
    </style:style>
    <style:style style:name="P4" style:family="paragraph" style:parent-style-name="Standard">
      <style:paragraph-properties fo:margin-top="0cm" fo:margin-bottom="0cm" style:contextual-spacing="false" fo:line-height="115%" fo:text-align="center" style:justify-single-word="false"/>
      <style:text-properties style:font-name="Liberation Serif" fo:font-size="14pt" officeooo:rsid="001cfe11" officeooo:paragraph-rsid="000d4898" style:font-size-asian="14pt" style:font-size-complex="14pt"/>
    </style:style>
    <style:style style:name="P5" style:family="paragraph" style:parent-style-name="Standard">
      <style:paragraph-properties fo:margin-top="0.3cm" fo:margin-bottom="0cm" style:contextual-spacing="false" fo:line-height="115%" fo:text-align="center" style:justify-single-word="false"/>
      <style:text-properties style:font-name="Liberation Serif" fo:font-size="14pt" officeooo:rsid="001cfe11" officeooo:paragraph-rsid="000ddfe8" style:font-size-asian="14pt" style:font-size-complex="14pt"/>
    </style:style>
    <style:style style:name="P6" style:family="paragraph" style:parent-style-name="Standard">
      <style:paragraph-properties fo:margin-top="0cm" fo:margin-bottom="0cm" style:contextual-spacing="false" fo:line-height="90%" fo:text-align="justify" style:justify-single-word="false"/>
      <style:text-properties style:font-name="Liberation Serif" fo:font-size="14pt" officeooo:rsid="00aa3551" officeooo:paragraph-rsid="000d4898" style:font-size-asian="14pt" style:font-size-complex="14pt"/>
    </style:style>
    <style:style style:name="P7" style:family="paragraph" style:parent-style-name="Standard">
      <style:paragraph-properties fo:margin-top="0cm" fo:margin-bottom="0cm" style:contextual-spacing="false" fo:line-height="90%" fo:text-align="center" style:justify-single-word="false"/>
      <style:text-properties style:font-name="Liberation Serif" fo:font-size="14pt" officeooo:rsid="00aa3551" officeooo:paragraph-rsid="000d4898" style:font-size-asian="14pt" style:font-size-complex="14pt"/>
    </style:style>
    <style:style style:name="P8"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Liberation Serif" fo:font-size="14pt" officeooo:rsid="00aa3551" officeooo:paragraph-rsid="000d4898" style:font-size-asian="14pt" style:font-size-complex="14pt"/>
    </style:style>
    <style:style style:name="P9"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Liberation Serif" fo:font-size="14pt" officeooo:rsid="00aa3551" officeooo:paragraph-rsid="000d4898" style:font-size-asian="14pt" style:font-size-complex="14pt"/>
    </style:style>
    <style:style style:name="P10"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Liberation Serif" fo:font-size="14pt" officeooo:rsid="00aa3551" officeooo:paragraph-rsid="000d4898" style:font-size-asian="14pt" style:font-size-complex="14pt"/>
    </style:style>
    <style:style style:name="P11"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Liberation Serif" fo:font-size="14pt" officeooo:rsid="00aa3551" officeooo:paragraph-rsid="000d4898" style:font-size-asian="14pt" style:font-size-complex="14pt"/>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Liberation Serif" fo:font-size="14pt" officeooo:rsid="00aa3551" officeooo:paragraph-rsid="000d4898" style:font-size-asian="14pt" style:font-size-complex="14pt"/>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Liberation Serif" fo:font-size="14pt" officeooo:rsid="00aa3551" officeooo:paragraph-rsid="000d4898" style:font-size-asian="14pt" style:font-size-complex="14pt"/>
    </style:style>
    <style:style style:name="P14"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aa3551" officeooo:paragraph-rsid="000d4898" style:font-size-asian="14pt" style:font-size-complex="14pt"/>
    </style:style>
    <style:style style:name="P1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499cm" style:auto-text-indent="false" style:page-number="auto" fo:background-color="transparent"/>
      <style:text-properties style:font-name="Liberation Serif" fo:font-size="14pt" officeooo:rsid="00aa3551" officeooo:paragraph-rsid="000d4898" style:font-size-asian="14pt" style:font-size-complex="14pt"/>
    </style:style>
    <style:style style:name="P16"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499cm" style:auto-text-indent="false" fo:background-color="transparent"/>
      <style:text-properties style:font-name="Liberation Serif" fo:font-size="14pt" officeooo:rsid="00aa3551" officeooo:paragraph-rsid="000d4898" style:font-size-asian="14pt" style:font-size-complex="14pt"/>
    </style:style>
    <style:style style:name="P17" style:family="paragraph" style:parent-style-name="Standard" style:master-page-name="Standard">
      <style:paragraph-properties fo:margin-top="0.101cm" fo:margin-bottom="0cm" style:contextual-spacing="false" fo:line-height="90%" fo:text-align="justify" style:justify-single-word="false" style:page-number="155"/>
      <style:text-properties style:font-name="Liberation Serif" fo:font-size="16pt" officeooo:rsid="001cfe11" officeooo:paragraph-rsid="000d4898" style:font-size-asian="16pt" style:font-size-complex="16pt"/>
    </style:style>
    <style:style style:name="P18" style:family="paragraph" style:parent-style-name="Standard">
      <style:paragraph-properties fo:margin-top="0cm" fo:margin-bottom="0cm" style:contextual-spacing="false" fo:line-height="115%" fo:text-align="center" style:justify-single-word="false"/>
      <style:text-properties style:font-name="Liberation Serif" fo:font-size="16pt" officeooo:rsid="001cfe11" officeooo:paragraph-rsid="000d4898" style:font-size-asian="16pt" style:font-size-complex="16pt"/>
    </style:style>
    <style:style style:name="P19" style:family="paragraph" style:parent-style-name="Standard">
      <style:paragraph-properties fo:margin-top="0.199cm" fo:margin-bottom="0cm" style:contextual-spacing="false" fo:line-height="115%" fo:text-align="center" style:justify-single-word="false"/>
      <style:text-properties style:font-name="Liberation Serif" fo:font-size="16pt" officeooo:rsid="001cfe11" officeooo:paragraph-rsid="000d4898" style:font-size-asian="16pt" style:font-size-complex="16pt"/>
    </style:style>
    <style:style style:name="P20" style:family="paragraph" style:parent-style-name="Standard">
      <style:paragraph-properties fo:margin-top="0cm" fo:margin-bottom="0cm" style:contextual-spacing="false" fo:line-height="90%" fo:text-align="center" style:justify-single-word="false"/>
      <style:text-properties style:font-name="Liberation Serif" fo:font-size="16pt" officeooo:rsid="00aa3551" officeooo:paragraph-rsid="000d4898" style:font-size-asian="16pt" style:font-size-complex="16pt"/>
    </style:style>
    <style:style style:name="T1" style:family="text">
      <style:text-properties fo:font-style="italic" style:font-style-asian="italic" style:font-style-complex="italic"/>
    </style:style>
    <style:style style:name="T2" style:family="text">
      <style:text-properties officeooo:rsid="00a5d6b8"/>
    </style:style>
    <style:style style:name="T3" style:family="text">
      <style:text-properties officeooo:rsid="00a77d41"/>
    </style:style>
    <style:style style:name="T4" style:family="text">
      <style:text-properties officeooo:rsid="00a8581d"/>
    </style:style>
    <style:style style:name="T5" style:family="text">
      <style:text-properties officeooo:rsid="00ac2ce1"/>
    </style:style>
    <style:style style:name="T6" style:family="text">
      <style:text-properties officeooo:rsid="00adb9dd"/>
    </style:style>
    <style:style style:name="T7" style:family="text">
      <style:text-properties officeooo:rsid="00ad2591"/>
    </style:style>
    <style:style style:name="T8" style:family="text">
      <style:text-properties officeooo:rsid="00af6efc"/>
    </style:style>
    <style:style style:name="T9" style:family="text">
      <style:text-properties officeooo:rsid="000aa04d"/>
    </style:style>
    <style:style style:name="T10"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artin Heidegger e le chiacchiere. Parole contro parole, nulla contro nulla: la banalità del parlare tanto per aprir bocca ?</text:p>
      <text:p text:style-name="P1">Martin Heidegger aveva anticipato in modo profondo e critico quella che lui chiamava "chiacchiera" (Gerede) in "Essere e Tempo". La sua analisi non era una semplice lamentela sulla superficialità del linguaggio comune, ma una critica ontologica fondamentale al modo in cui l'esistenza umana (il Dasein) si manifesta nell'"<text:span text:style-name="T1">esistenza inautentica</text:span>".</text:p>
      <text:p text:style-name="P2">Heidegger non usava il termine "chiacchiera" con un'accezione puramente negativa o moralistica, anche se il suo significato è tutt'altro che positivo. Per lui, la "chiacchiera" è una delle tre caratteristiche fondamentali della "deiezione" (Verfallen), il modo in cui il Dasein è abitualmente "gettato" nel mondo e tende a perdersi nella sua quotidianità e nella sua dimensione pubblica impersonale. Le altre due caratteristiche sono la "curiosità" (Neugier) e l'"equivoco" (Zweideutigkeit).</text:p>
      <text:p text:style-name="P2">La chiacchiera si manifesta quando il linguaggio non è più uno strumento per dischiudere l'Essere o per esprimere una comprensione autentica del mondo e di sé stessi, ma diventa un fine a sé stesso. Le parole vengono ripetute senza una vera comprensione, l'informazione è trasmessa senza un fondamento esperienziale o una riflessione genuina. La chiacchiera offre una falsa <text:soft-page-break/>sensazione di comprensione su ogni cosa, senza che ci sia un reale approfondimento o una messa in discussione. Tutto è "<text:span text:style-name="T1">già capito</text:span>", "<text:span text:style-name="T1">già detto</text:span>", e non richiede alcuno sforzo per essere compreso autenticamente. Le discussioni si basano su "<text:span text:style-name="T1">si dice</text:span>" e "<text:span text:style-name="T1">si sa</text:span>", su opinioni diffuse e non su una conoscenza o un'esperienza personale radicata. La chiacchiera tende a livellare ogni significato, riducendo concetti complessi a slogan o frasi fatte, in modo che "chiunque" possa comprenderli superficialmente. Questo impedisce una comprensione profonda e autentica. Nella chiacchiera, il Dasein si disperde nel "<text:span text:style-name="T1">si</text:span>" impersonale (Das Man). Non è più l'individuo a parlare e a comprendere, ma è "si" che parla e "si" che comprende. Quando il Dasein si disperde <text:span text:style-name="T2">nell’impersonale, </text:span>si allontana dalla sua autenticità, <text:span text:style-name="T2">n</text:span>on si assume la responsabilità della propria esistenza, ma si lascia guidare da ciò che è "normale" o "convenzionale". Questo comporta una fuga dalle sue possibilità più proprie, in particolare dalla consapevolezza della morte.</text:p>
      <text:p text:style-name="P2">La morte è per Heidegger la possibilità più radicale e ineludibile del Dasein, quella che lo rende finito e gli dà un limite. Confrontarsi con la propria mortalità significa assumere la piena consapevolezza della propria esistenza finita e, di conseguenza, della necessità di scegliere e agire in modo autentico, rendendo la propria <text:soft-page-break/>vita significativa. Evitare questo confronto, rifugiandosi nel Das Man, significa vivere un'esistenza inautentica, priva di un vero senso di responsabilità individuale. </text:p>
      <text:p text:style-name="P2">Cerchiamo di comprendere e semplificare il concetto <text:s/>di Heidegger sulla "chiacchiera" (Gerede) e come questa oscuri la verità dell'Essere per il Dasein.</text:p>
      <text:p text:style-name="P2">Immaginiamo il Dasein come uno di noi, come essere umano che è qui, che esiste nel mondo. Non è l'anima, non è la coscienza in senso cartesiano, ma proprio il nostro "esserci" concreto, il nostro modo di stare nel mondo. Heidegger osserva che nella vita di tutti i giorni, la maggior parte del tempo, il Dasein vive in un modo che lui definisce "inautentico". Non è un giudizio morale, ma una descrizione di come tendiamo a perderci nella routine, nelle convenzioni sociali, in ciò che "<text:span text:style-name="T1">si fa</text:span>" e "<text:span text:style-name="T1">si dice</text:span>". Pensa alla chiacchiera non solo come il pettegolezzo, ma come ogni forma di parlare superficiale, di ripetere cose sentite dire, di usare frasi fatte, di esprimere opinioni non basate su una vera comprensione o esperienza personale.</text:p>
      <text:p text:style-name="P2">Ecco come la chiacchiera oscura la "verità dell'Essere":</text:p>
      <text:p text:style-name="P2">Immagina di parlare di un film che non hai mai visto, ma di cui hai sentito molti pareri. Ripeti le critiche comuni, usi le stesse espressioni che hai letto online o sentito dagli amici. Ti senti come se "capissi" il film, ma in realtà non lo hai mai sperimentato direttamente. La <text:soft-page-break/>chiacchiera ti fa credere di sapere, senza che tu abbia fatto lo sforzo di capire davvero. Se ti accontenti della chiacchiera, non senti il bisogno di approfondire, di interrogarti, di cercare la tua personale esperienza o comprensione. È come se ti venisse servito un riassunto preconfezionato di tutto, e tu lo accettassi senza leggere il libro intero. La chiacchiera tende a rendere tutto uguale, a banalizzare anche i concetti più complessi. Le discussioni diventano piatte, le sfumature si perdono. Non c'è spazio per il dubbio, per la ricerca, per l'originalità del pensiero. Tutto è "già detto", "già chiaro", anche se non lo è affatto. Se ti perdi nella chiacchiera, non sei più tu a pensare e a esprimere la tua comprensione del mondo. È il "si" impersonale che parla attraverso di te. È come se tu fossi un eco di ciò che "si dice", anziché una voce originale. Questo ti impedisce di confrontarti con la tua esistenza in modo autentico, di capire chi sei veramente e quali sono le tue possibilità più proprie.</text:p>
      <text:p text:style-name="P2">Nel dialetto siciliano ( dove la ricchezza espressiva è davvero notevole) c'è un termine che potrebbe essere usato quale corrispondente del termine Heideggeriano "<text:span text:style-name="T1">si dice</text:span>" e viene utilizzato quando qualcuno non è in grado di rispondere ad una domanda o non ha conoscenza di un fatto, e quindi, in modo carino, rimette la risposta a "<text:span text:style-name="T1">Iddu</text:span>". Questo termine è un esempio <text:soft-page-break/>perfetto di come il dialetto non sia solo un modo di parlare, ma un vero e proprio patrimonio culturale che racchiude modi di pensare, atteggiamenti verso la vita e un'ironia sottile. "<text:span text:style-name="T1">Iddu</text:span>" riconosce che non si può sapere tutto, senza per questo sentirsi inferiori. A volte, "Iddu" può rimandare a una forza superiore, al destino, a Dio stesso, che detiene le risposte ai grandi misteri o agli eventi inspiegabili, oppure invece di dire un brusco "<text:span text:style-name="T1">non lo so</text:span>" o di inventare una risposta, "<text:span text:style-name="T1">Iddu</text:span>" permette di stemperare la situazione con un sorriso, mantenendo un'atmosfera conviviale.</text:p>
      <text:p text:style-name="P2">Tornando alle chiacch<text:span text:style-name="T3">i</text:span>ere di Heideg<text:span text:style-name="T3">g</text:span>er, la "verità dell'Essere" non è un fatto oggettivo da scoprire, ma un disvelamento, un modo in cui le cose si mostrano a <text:span text:style-name="T3">noi</text:span> nella loro autenticità. La chiacchiera, con la sua superficialità e la sua tendenza a dare una falsa comprensione, agisce come una nebbia o un velo che copre questa verità. Ci impedisce di vedere le cose come sono veramente, di comprenderle in modo profondo e personale, ci allontana dalla possibilità di vivere la nostra esistenza in modo autentico.</text:p>
      <text:p text:style-name="P2">Martin Heidegger e Umberto Eco, seppur con approcci e linguaggi diversi, hanno espresso una profonda preoccupazione per la degenerazione del linguaggio e della comunicazione in quella che si potrebbe definire una "banalità pervasiva". Umberto Eco, con la sua <text:soft-page-break/>inconfondibile lucidità e ironia, divenne una voce molto critica nei confronti dell'impatto dei social media. La sua celebre frase pronunciata nel 2015, poco prima della sua scomparsa, è diventata quasi un monito profetico: "I social media danno diritto di parola a legioni di imbecilli che prima parlavano solo al bar dopo un bicchiere di vino, senza danneggiare la collettività. Venivano subito messi a tacere, mentre ora hanno lo stesso diritto di parola di un Premio Nobel. È l'invasione degli imbecilli."</text:p>
      <text:p text:style-name="P2">Entrambi, seppur con approcci e linguaggi diversi, hanno espresso una profonda preoccupazione per la degenerazione del linguaggio e della comunicazione in quella che si potrebbe definire una "banalità pervasiva". Eco non era contrario alla tecnologia in sé, né alla democrazia del dialogo. La sua preoccupazione era piuttosto legata alla mancanza di filtro e di gerarchie di valore nella diffusione delle informazioni e delle opinioni. In un contesto in cui chiunque può esprimere qualsiasi cosa, senza alcun controllo di qualità, verifica o competenza, si rischia di perdere la capacità di distinguere il vero dal falso, il sensato dall'insensato. Per Eco, il problema non è tanto l'esistenza degli "imbecilli" (che ci sono sempre stati), quanto il fatto che i social media amplifichino la loro voce, conferendo loro un'autorità e una visibilità che prima non avevano. </text:p>
      <text:p text:style-name="P1"><text:soft-page-break/>Nonostante le differenze di epoca e di approccio filosofico, ci sono chiari paralleli tra la "chiacchiera" di Heidegger e le critiche di Eco ai social media.</text:p>
      <text:p text:style-name="P19">Superficialità e Indifferenziazione</text:p>
      <text:p text:style-name="P2"><text:span text:style-name="T4">L</text:span>a chiacchiera è un parlare che non si cura di comprendere l'Essere, ma si limita a ripetere ciò che "si dice". Per Eco, la facilità di espressione sui social porta a una proliferazione di opinioni non fondate, superficiali e prive di reale valore.</text:p>
      <text:p text:style-name="P19">Assenza di Fondamento</text:p>
      <text:p text:style-name="P3">Sia la chiacchiera che la diffusione di "idiozie" sui social mancano di un fondamento solido, che sia l'esperienza autentica per Heidegger o la competenza/verifica per Eco. Si basano su un "sentito dire" o su "si dice che", anziché su una comprensione genuina o su fatti accertati.</text:p>
      <text:p text:style-name="P5"><text:span text:style-name="T10">Livellamento dell'Autorità</text:span></text:p>
      <text:p text:style-name="P2">Heidegger parlava del Dasein che si perde nel "si" impersonale, dove ogni individualità e responsabilità autentica si annulla. Eco osserva come i social abbiano abolito le gerarchie, dando "lo stesso diritto di parola di un Premio Nobel" anche a chi non ha alcuna competenza o argomentazione valida, livellando il discorso pubblico.</text:p>
      <text:p text:style-name="P4"/>
      <text:p text:style-name="P18"><text:soft-page-break/>Pericolo per la Verità</text:p>
      <text:p text:style-name="P2">Per Heidegger, la chiacchiera oscura la verità dell'Essere, impedendo al Dasein di accedere a una comprensione autentica. Per Eco, la proliferazione di idiozie e "bufale" minaccia direttamente la verità fattuale e la capacità della società di basarsi su una conoscenza condivisa e verificabile.</text:p>
      <text:p text:style-name="P2">In sintesi, sia Heidegger che Eco hanno individuato una patologia del linguaggio e della comunicazione che precede (Heidegger) o è amplificata (Eco) dai mezzi di comunicazione di massa. Entrambi ci mettono in guardia sul pericolo di una comunicazione che, anziché connettere e approfondire, finisce per disperdere, banalizzare e confondere, rendendo difficile distinguere il senso dal non-senso e la verità dalla falsità.</text:p>
      <text:p text:style-name="P7"/>
      <text:p text:style-name="P20">La chiacchiera oscura la verità dell'Essere.</text:p>
      <text:p text:style-name="P8">Cosa intende Heidegger quando dice che la chiacchie­ra impedisce al Dasein una comprensione autentica? </text:p>
      <text:p text:style-name="P10">Immaginiamo il Dasein, come essere umano che è qui <text:span text:style-name="T5">con</text:span> noi, che esiste nel mondo. Non è l'anima <text:span text:style-name="T6">e </text:span>non è la coscienza in senso cartesiano, ma proprio il tuo "esserci" concreto, il tuo modo di stare nel mondo. Ora, Heidegger osserva che nella vita di tutti i giorni, la maggior parte del tempo, il Dasein vive in un modo che lui definisce "inautentico". Non è un giudizio mo­rale, <text:soft-page-break/>ma una descrizione di come tendiamo a perderci nella routine, nelle convenzioni sociali, in ciò che "<text:span text:style-name="T1">si fa</text:span>" e "<text:span text:style-name="T1">si dice</text:span>". </text:p>
      <text:p text:style-name="P14">Pensa alla chiacchiera non solo come il pettegolezzo, ma come ogni forma di parlare superficiale, di ripete­re cose sentite dire, di usare frasi fatte, di esprimere opinioni non basate su una vera comprensione o esperienza personale.</text:p>
      <text:p text:style-name="P14">Immagina di parlare di un film che non hai mai visto, ma di cui hai sentito molti pareri. Ripeti le critiche co­muni, usi le stesse espressioni che hai letto online o sentito dagli amici. Ti senti come se "capissi" il film, ma in realtà non lo hai mai sperimentato direttamen­te. La chiacchiera ti fa credere di sapere, senza che tu abbia fatto lo sforzo di capire davvero.</text:p>
      <text:p text:style-name="P14">Se ti accontenti della chiacchiera, non senti il bisogno di approfondire, di interrogarti, di cercare la tua per­sonale esperienza o comprensione. È come se ti venis­se servito un riassunto preconfezionato di tutto, e tu lo accettassi senza leggere il libro intero.</text:p>
      <text:p text:style-name="P14">La chiacchiera tende a rendere tutto uguale, a banaliz­zare anche i concetti più complessi. Le discussioni di­ventano piatte, le sfumature si perdono <text:span text:style-name="T5">e non </text:span>c'è spa­zio per il dubbio, per la ricerca, per l'originalità del pensiero. Tutto è "già detto", "già chiaro", anche se non lo è affatto.</text:p>
      <text:p text:style-name="P14"><text:soft-page-break/>Se ti perdi nella chiacchiera, non sei più tu a pensare e a esprimere la tua comprensione del mondo. È il "si" impersonale che parla attraverso di te. È come se tu fossi un eco di ciò che "si dice", anziché una voce origi­nale. Questo ti impedisce di confrontarti con la tua esistenza in modo autentico, di capire chi sei vera­mente e quali sono le tue possibilità più proprie.</text:p>
      <text:p text:style-name="P14"><text:span text:style-name="T7">L</text:span>a "verità dell'Essere" non è un fatto oggettivo da sco­prire, ma un disvelamento, un modo in cui le cose si mostrano a te nella loro autenticità. La chiacchiera, con la sua superficialità e la sua tendenza a dare una falsa comprensione, agisce come una nebbia o un velo che copre questa verità. Ti impedisce di vedere le cose come sono veramente, di comprenderle in modo profondo e personale, e quindi ti allontana dalla pos­sibilità di vivere la tua esistenza in modo autentico.</text:p>
      <text:p text:style-name="P6"/>
      <text:p text:style-name="P20">Il Dasein non è anima e non è coscienza <text:span text:style-name="T8">nel</text:span> senso cartesiano.</text:p>
      <text:p text:style-name="P8">Il Dasein è il tuo esserci qui, ora, in questo mondo, impegnato con le cose e con gli altri, in un tempo limi­tato. <text:span text:style-name="T6">Q</text:span>uesta è una distinzione fondamentale per com­prendere Heidegger e per non confondere il Dasein con concetti filosofici precedenti.</text:p>
      <text:p text:style-name="P15">Quando parliamo di anima in filosofia, spesso ci ri­feriamo a un'entità immateriale, eterna, separata dal corpo e considerata la sede della vita, del pensiero, della <text:soft-page-break/>moralità, o addirittura l'essenza spirituale dell'essere umano. Questo concetto ha radici profon­de nella filosofia greca (Platone) e nella tradizione cri­stiana. Heidegger si distanzia da questa idea per di­versi motivi: </text:p>
      <text:p text:style-name="P12">Il Dasein non è un'entità "<text:span text:style-name="T1">dentro</text:span>" un corpo o se­parata da esso. Per Heidegger, l'uomo è sempre e in­scindibilmente un "essere-nel-mondo". Non puoi se­parare l'esistenza del Dasein dal suo coinvolgimento concreto con il mondo e con gli altri enti. L'anima, in­vece, è spesso concepita come potenziale di esistere anche senza il corpo. Il concetto di anima spesso im­plica l'immortalità. Per Heidegger, la <text:span text:style-name="T1">finitudine</text:span> (cioè l'essere limitato dal tempo e dalla morte) è una carat­teristica essenziale del Dasein. Il Dasein è un essere che "<text:span text:style-name="T1">è-verso-la-morte</text:span>". L'immortalità dell'anima non rientra nella sua analisi dell'esistenza. L'anima è spes­so vista come una "sostanza" (qualcosa che esiste di per sé). Il Dasein, invece, è più un processo, un "<text:span text:style-name="T1">poter-essere</text:span>", una costante progettazione di sé nel mondo, piuttosto che una cosa fissa.</text:p>
      <text:p text:style-name="P12"><text:span text:style-name="T9">I</text:span>l Dasein non è una "cosa" (una res) separata dal mondo fisico. La visione cartesiana crea una dicoto­mia tra soggetto (coscienza) e oggetto (mondo), un problema che Heidegger cerca di superare. Il Dasein è sempre già "aperto" al mondo, non è una coscienza isolata che poi si rapporta al mondo. La coscienza car­tesiana è definita <text:soft-page-break/>dal pensare, dal dubitare, dal ragio­nare. Per Heidegger, il Dasein è prima di tutto un es­sere-nel-mondo pratico e affettivo. Il Dasein si trova già immerso in situazioni, si prende cura delle cose, prova stati d'animo (angoscia, noia).</text:p>
      <text:p text:style-name="P13">La coscienza cartesiana può essere concepita come autosufficiente e isolata. Il Dasein, invece, è costituti­vamente un "essere-con" gli altri. La sua esistenza è intrinsecamente sociale e relazionale. Non può essere compreso isolatamente. Per Cartesio, la verità si trova attraverso la chiara e distinta idea della coscienza. Per Heidegger, la verità ("Aletheia", il disvelamento) non è solo un atto intellettuale della coscienza, ma un even­to che accade nell'apertura del Dasein al mondo, spes­so attraverso l'esperienza pratica o emotiva.</text:p>
      <text:p text:style-name="P11">Heidegger voleva liberare il pensiero filosofico da millenni di interpretazioni dell'uomo come "anima" o "coscienza" per riportare l'attenzione all'esperienza concreta e vissuta dell'esistenza. Il Dasein è il punto di partenza per capire cos'è l'essere, proprio perché il Dasein è l'unico ente che si pone la domanda sull'Essere stesso.</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6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4-04T16:06:55.395726797</meta:creation-date>
    <dc:date>2026-04-04T16:29:15.314749707</dc:date>
    <dc:creator>corrado tafaro</dc:creator>
    <meta:editing-duration>PT36S</meta:editing-duration>
    <meta:editing-cycles>1</meta:editing-cycles>
    <meta:document-statistic meta:table-count="0" meta:image-count="0" meta:object-count="0" meta:page-count="12" meta:paragraph-count="39" meta:word-count="2485" meta:character-count="15700" meta:non-whitespace-character-count="13249"/>
    <meta:generator>LibreOffice/24.2.7.2$Linux_X86_64 LibreOffice_project/420$Build-2</meta:generator>
  </office:meta>
</office:document-meta>
</file>