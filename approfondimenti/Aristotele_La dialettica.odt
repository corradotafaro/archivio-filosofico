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101cm" fo:margin-bottom="0cm" style:contextual-spacing="false"/>
    </style:style>
    <style:style style:name="P2" style:family="paragraph" style:parent-style-name="Standard">
      <style:paragraph-properties fo:margin-top="0.199cm" fo:margin-bottom="0cm" style:contextual-spacing="false"/>
      <style:text-properties officeooo:paragraph-rsid="000dfd75"/>
    </style:style>
    <style:style style:name="P3" style:family="paragraph" style:parent-style-name="Standard">
      <style:paragraph-properties fo:margin-top="0.101cm" fo:margin-bottom="0cm" style:contextual-spacing="false"/>
      <style:text-properties officeooo:paragraph-rsid="000dfd75"/>
    </style:style>
    <style:style style:name="P4" style:family="paragraph" style:parent-style-name="Standard">
      <style:paragraph-properties fo:margin-top="0.101cm" fo:margin-bottom="0cm" style:contextual-spacing="false"/>
      <style:text-properties officeooo:paragraph-rsid="000eb8ed"/>
    </style:style>
    <style:style style:name="P5" style:family="paragraph" style:parent-style-name="Standard">
      <style:text-properties officeooo:paragraph-rsid="001097a8"/>
    </style:style>
    <style:style style:name="P6" style:family="paragraph" style:parent-style-name="Standard">
      <style:paragraph-properties fo:margin-top="0.101cm" fo:margin-bottom="0cm" style:contextual-spacing="false"/>
      <style:text-properties officeooo:paragraph-rsid="001097a8"/>
    </style:style>
    <style:style style:name="P7" style:family="paragraph" style:parent-style-name="Heading_20_1">
      <style:paragraph-properties fo:break-before="page"/>
    </style:style>
    <style:style style:name="T1" style:family="text">
      <style:text-properties officeooo:rsid="000dfd75"/>
    </style:style>
    <style:style style:name="T2" style:family="text">
      <style:text-properties officeooo:rsid="000eb8ed"/>
    </style:style>
    <style:style style:name="T3" style:family="text">
      <style:text-properties officeooo:rsid="001097a8"/>
    </style:style>
    <style:style style:name="T4" style:family="text">
      <style:text-properties officeooo:rsid="001292b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La dialettica di Aristotele</text:h>
      <text:p text:style-name="P2">La dialettica è un metodo di ragionamento che si basa sulla discussione e sulla controversia. Essa è finalizzata a trovare la verità attraverso il confronto di opinioni diverse. Aristotele riteneva che la dialettica fosse un'importante abilità per la discussione filosofica e politica. </text:p>
      <text:p text:style-name="P3">Mentre il sillogismo è la forma di ragionamento che ha per oggetto il necessario, la dialettica è una forma di ragionamento che partendo da premesse possibili arriva a conclusioni possibili. Essa viene analizzata nei “Topici” forma d’arte in cui si usa la dialettica <text:s/>e la retorica.</text:p>
      <text:p text:style-name="P3">I "Topici", insieme a Categorie, De Interpretatione, Analitici primi, Analitici secondi, e Confutazioni sofistiche, <text:span text:style-name="T4">f</text:span>anno parte dell'Organon, una raccolta di sei opere di Aristotele sulla logica. I Topici, composta da otto libri, presenta l'arte della dialettica, con l'invenzione e la scoperta di argomenti in cui le proposizioni si basano su opinioni o endoxa comunemente condivise. </text:p>
      <text:p text:style-name="P3">Gli endoxa sono luoghi comuni della ragione su cui coloro che contestano coscienziosamente concordano in linea di principio. I topoi sono "luoghi" da cui tali argomenti possono essere scoperti o inventati. Nel primo libro, Aristotele introduce una serie di principi preliminari sui quali deve procedere l'argomentazione dialettica e stabilisce quattro basi:</text:p>
      <text:p text:style-name="P1"><text:soft-page-break/><text:span text:style-name="T1">L</text:span>’accidente: è un attributo che può essere presente o assente in un soggetto senza alterarne la natura.</text:p>
      <text:p text:style-name="P1"><text:span text:style-name="T1">L</text:span>a proprietà: è un attributo che è sempre presente in un soggetto.</text:p>
      <text:p text:style-name="P1"><text:span text:style-name="T1">I</text:span>l genere: è un insieme di soggetti che condividono una o più proprietà comuni.</text:p>
      <text:p text:style-name="P3"><text:span text:style-name="T1">L</text:span>a definizione: è la formula che specifica le proprietà essenziali di un soggetto, da cui procede l'invenzione del ragionamento per condurre una discussione dialettica razionale e costruttiva:</text:p>
      <text:p text:style-name="P3">Si può utilizzare l'accidente per identificare un'affermazione che è falsa. Se qualcuno afferma che "tutti gli esseri umani sono bianchi", si può utilizzare l'accidente per identificare che l'attributo del colore bianco non è presente in tutti gli esseri umani.</text:p>
      <text:p text:style-name="P3">Si può utilizzare la proprietà per condurre una discussione costruttiva. Se si discute della tesi che "tutti gli esseri umani sono liberi", si può utilizzare la proprietà della libertà per identificare gli argomenti che supportano o contraddicono la tesi.</text:p>
      <text:p text:style-name="P3">Si può utilizzare il genere per identificare che un'affermazione è ambigua. Se qualcuno afferma che "gli animali sono intelligenti", si può utilizzare il genere degli animali per identificare che l'affermazione è ambigua, poiché alcuni animali sono intelligenti, mentre altri non lo sono.</text:p>
      <text:p text:style-name="P3">Si può utilizzare la definizione per condurre una discussione filosofica. Se si discute della tesi che "la verità è relativa", si può utilizzare la definizione di <text:soft-page-break/>verità per identificare gli argomenti che supportano o contraddicono la tesi.</text:p>
      <text:p text:style-name="P1">Gli scritti topici di Aristotele, di Cicerone, di Boezio sono esempi noti di questa pratica.</text:p>
      <text:p text:style-name="P1">L’opera retorica “I Topica” composta da Marco Tullio Cicerone nel 44 a.C., è indirizzata all’amico giurista Gaio Trabezio Testa, il quale aveva chiesto a Cicerone di enunciare e semplificare il contenuto dei Topica di Aristotele, in cui ampia parte della trattazione è riservata proprio all’uso dei topoi in campo giuridico.</text:p>
      <text:p text:style-name="P4">Questi “topoi” o “luoghi comuni” sono essenzialmente schemi di argomentazione o ragionamenti che possono essere applicati a vari argomenti. Eccone alcuni:</text:p>
      <text:p text:style-name="P4">Contrasto: questo luogo comune coinvolge l'uso del contrasto o dell'opposizione per sottolineare un punto: "Mentre alcuni vedono il cambiamento come una minaccia, io lo vedo come un'opportunità."</text:p>
      <text:p text:style-name="P4">Causa ed effetto: questo schema di argomentazione implica un legame causale tra due eventi o situazioni: "A causa della nostra mancanza di preparazione, abbiamo perso l'opportunità."</text:p>
      <text:p text:style-name="P4">Esempi storici: L'uso di esempi storici è un altro luogo comune efficace: "Come ha dimostrato la storia, le grandi nazioni cadono quando diventano compiacenti."</text:p>
      <text:p text:style-name="P4">Analogia: Le analogie possono essere utilizzate per rendere un argomento più comprensibile o per trarre paralleli tra due situazioni: "<text:span text:style-name="T2">g</text:span>uidare un'azienda è come navigare in mare aperto. Ci sono tempeste e mari calmi, <text:soft-page-break/>ma con una buona squadra e una mappa affidabile, possiamo raggiungere la nostra destinazione."</text:p>
      <text:p text:style-name="P4">Etica: Fare appello all'etica o alla morale è un altro luogo comune: "È nostro dovere morale proteggere i più vulnerabili nella nostra società."</text:p>
      <text:p text:style-name="P1">L'efficacia di questi luoghi comuni dipenderà dal contesto e dal pubblico a cui ci si rivolge.</text:p>
      <text:p text:style-name="P1">Un’altra opera fondamentale e di notevole importanza nella storia della cultura e della politica è Retorica, opera <text:s/>divisa in tre libri. Il primo libro tratta della natura della retorica e dei suoi scopi, <text:span text:style-name="T3">i</text:span>l secondo libro tratta dell'inventio o dell'arte di trovare argomenti per sostenere una tesi, <text:span text:style-name="T3">i</text:span>l terzo libro tratta dell'elocutio, o dell'arte di utilizzare il linguaggio in modo efficace.</text:p>
      <text:p text:style-name="P5">Aristotele sostiene che la retorica è un'arte che può essere utilizzata per persuadere gli altri su qualsiasi argomento. Egli identifica tre fattori che contribuiscono alla persuasione: </text:p>
      <text:p text:style-name="P6">Ethos: l'autorevolezza e <text:s/>credibilità dell'oratore.</text:p>
      <text:p text:style-name="P6">Pathos: le emozioni del pubblico.</text:p>
      <text:p text:style-name="P6">Logos: la logica degli argomenti.</text:p>
      <text:p text:style-name="P6">Aristotele sostiene che questi tre fattori devono essere combinati in modo efficace per ottenere una persuasione efficace, <text:span text:style-name="T3">u</text:span>n oratore che ignora uno di questi fattori può ridurre la sua capacità di persuadere il suo pubblico.</text:p>
      <text:p text:style-name="P6">Aristotele riconosce che la dialettica e la retorica hanno un punto debole, che è la loro capacità di convincere, ma non di dimostrare. La dialettica, infatti, si basa su premesse probabili, piuttosto che certe, ciò significa che <text:soft-page-break/>la conclusione di un ragionamento dialettico non è necessariamente vera. </text:p>
      <text:p text:style-name="P6">La retorica invece, può utilizzare una varietà di tecniche per persuadere il pubblico, anche se queste tecniche non sono necessariamente basate sulla logica.</text:p>
      <text:p text:style-name="Standard">Aristotele sostiene che la dialettica e la retorica sono comunque importanti discipline, perché possono essere utilizzate per discutere di argomenti complessi e per difendere le proprie convinzioni.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799cm" fo:margin-bottom="1.499cm" fo:margin-left="1.7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1-25T17:42:15.158494688</meta:creation-date>
    <dc:date>2026-07-19T10:43:59.464075385</dc:date>
    <dc:creator>corrado tafaro</dc:creator>
    <meta:editing-duration>PT25M25S</meta:editing-duration>
    <meta:editing-cycles>6</meta:editing-cycles>
    <meta:generator>LibreOffice/24.2.7.2$Linux_X86_64 LibreOffice_project/420$Build-2</meta:generator>
    <meta:document-statistic meta:table-count="0" meta:image-count="0" meta:object-count="0" meta:page-count="5" meta:paragraph-count="31" meta:word-count="908" meta:character-count="6058" meta:non-whitespace-character-count="5173"/>
  </office:meta>
</office:document-meta>
</file>