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automatic-styles>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justify" style:justify-single-word="false"/>
      <style:text-properties officeooo:paragraph-rsid="000dfabc"/>
    </style:style>
    <style:style style:name="P3" style:family="paragraph" style:parent-style-name="Standard">
      <style:paragraph-properties fo:line-height="115%" fo:text-align="justify" style:justify-single-word="false"/>
      <style:text-properties officeooo:paragraph-rsid="000f3b6b"/>
    </style:style>
    <style:style style:name="P4" style:family="paragraph" style:parent-style-name="Standard">
      <style:paragraph-properties fo:margin-top="0.101cm" fo:margin-bottom="0cm" style:contextual-spacing="false" fo:line-height="115%" fo:text-align="justify" style:justify-single-word="false"/>
      <style:text-properties officeooo:paragraph-rsid="000f3b6b"/>
    </style:style>
    <style:style style:name="P5" style:family="paragraph" style:parent-style-name="Standard">
      <style:paragraph-properties fo:margin-top="0.101cm" fo:margin-bottom="0cm" style:contextual-spacing="false" fo:line-height="115%" fo:text-align="justify" style:justify-single-word="false"/>
    </style:style>
    <style:style style:name="P6" style:family="paragraph" style:parent-style-name="Standard">
      <style:paragraph-properties fo:line-height="115%" fo:text-align="justify" style:justify-single-word="false"/>
      <style:text-properties officeooo:paragraph-rsid="00103fd4"/>
    </style:style>
    <style:style style:name="P7" style:family="paragraph" style:parent-style-name="Standard">
      <style:paragraph-properties fo:margin-top="0.101cm" fo:margin-bottom="0cm" style:contextual-spacing="false" fo:line-height="115%" fo:text-align="justify" style:justify-single-word="false"/>
      <style:text-properties officeooo:paragraph-rsid="0011c89a"/>
    </style:style>
    <style:style style:name="P8" style:family="paragraph" style:parent-style-name="Standard">
      <style:paragraph-properties fo:margin-top="0cm" fo:margin-bottom="0cm" style:contextual-spacing="false" fo:line-height="115%" fo:text-align="justify" style:justify-single-word="false"/>
      <style:text-properties officeooo:paragraph-rsid="0011c89a"/>
    </style:style>
    <style:style style:name="P9" style:family="paragraph" style:parent-style-name="Standard">
      <style:paragraph-properties fo:margin-top="0.101cm" fo:margin-bottom="0cm" style:contextual-spacing="false" fo:line-height="115%" fo:text-align="justify" style:justify-single-word="false"/>
      <style:text-properties officeooo:paragraph-rsid="001308b0"/>
    </style:style>
    <style:style style:name="P10" style:family="paragraph" style:parent-style-name="Standard">
      <style:paragraph-properties fo:line-height="115%" fo:text-align="justify" style:justify-single-word="false"/>
      <style:text-properties officeooo:paragraph-rsid="0013d875"/>
    </style:style>
    <style:style style:name="P11" style:family="paragraph" style:parent-style-name="Standard">
      <style:paragraph-properties fo:margin-top="0.101cm" fo:margin-bottom="0cm" style:contextual-spacing="false" fo:line-height="115%" fo:text-align="justify" style:justify-single-word="false"/>
      <style:text-properties officeooo:paragraph-rsid="0013d875"/>
    </style:style>
    <style:style style:name="P12" style:family="paragraph" style:parent-style-name="Standard">
      <style:paragraph-properties fo:margin-top="0.101cm" fo:margin-bottom="0cm" style:contextual-spacing="false" fo:line-height="115%" fo:text-align="justify" style:justify-single-word="false"/>
      <style:text-properties officeooo:paragraph-rsid="000c9659"/>
    </style:style>
    <style:style style:name="P13" style:family="paragraph" style:parent-style-name="Standard">
      <style:paragraph-properties fo:line-height="115%" fo:text-align="justify" style:justify-single-word="false"/>
      <style:text-properties officeooo:paragraph-rsid="0016d282"/>
    </style:style>
    <style:style style:name="P14" style:family="paragraph" style:parent-style-name="Footnote">
      <style:text-properties officeooo:rsid="001a46dc" officeooo:paragraph-rsid="001a46dc"/>
    </style:style>
    <style:style style:name="P15" style:family="paragraph" style:parent-style-name="Footnote">
      <style:text-properties officeooo:rsid="001b74e8" officeooo:paragraph-rsid="001b74e8"/>
    </style:style>
    <style:style style:name="P16" style:family="paragraph" style:parent-style-name="Standard">
      <style:paragraph-properties fo:line-height="115%" fo:text-align="justify" style:justify-single-word="false"/>
      <style:text-properties officeooo:rsid="0016d282" officeooo:paragraph-rsid="0016d282"/>
    </style:style>
    <style:style style:name="P17" style:family="paragraph" style:parent-style-name="Standard">
      <style:paragraph-properties fo:line-height="115%"/>
      <style:text-properties style:font-name="Noto Sans" fo:font-size="12pt" officeooo:paragraph-rsid="000c8a67" style:font-size-asian="9pt" style:font-size-complex="10.25pt"/>
    </style:style>
    <style:style style:name="P18" style:family="paragraph" style:parent-style-name="Standard">
      <style:paragraph-properties fo:line-height="115%"/>
      <style:text-properties style:font-name="Noto Sans" fo:font-size="12pt" fo:font-weight="bold" officeooo:rsid="000dfabc" officeooo:paragraph-rsid="000dfabc" style:font-size-asian="12pt" style:font-weight-asian="bold" style:font-size-complex="12pt" style:font-weight-complex="bold"/>
    </style:style>
    <style:style style:name="P19" style:family="paragraph" style:parent-style-name="Standard">
      <style:paragraph-properties fo:margin-top="0.101cm" fo:margin-bottom="0cm" style:contextual-spacing="false" fo:line-height="115%" fo:text-align="justify" style:justify-single-word="false"/>
      <style:text-properties officeooo:paragraph-rsid="0013d875"/>
    </style:style>
    <style:style style:name="P20" style:family="paragraph" style:parent-style-name="Standard">
      <style:paragraph-properties fo:line-height="115%" fo:text-align="justify" style:justify-single-word="false"/>
      <style:text-properties officeooo:paragraph-rsid="000dfabc"/>
    </style:style>
    <style:style style:name="P21" style:family="paragraph" style:parent-style-name="Standard">
      <style:paragraph-properties fo:margin-top="0.101cm" fo:margin-bottom="0cm" style:contextual-spacing="false" fo:line-height="115%" fo:text-align="justify" style:justify-single-word="false"/>
      <style:text-properties officeooo:paragraph-rsid="000dfabc"/>
    </style:style>
    <style:style style:name="P22" style:family="paragraph" style:parent-style-name="Standard">
      <style:paragraph-properties fo:line-height="115%" fo:text-align="justify" style:justify-single-word="false"/>
      <style:text-properties style:font-name="Liberation Serif1" fo:font-size="14pt" officeooo:paragraph-rsid="000dfabc" style:font-size-asian="14pt" style:font-size-complex="14pt"/>
    </style:style>
    <style:style style:name="P23" style:family="paragraph" style:parent-style-name="Standard">
      <style:paragraph-properties fo:margin-top="0.101cm" fo:margin-bottom="0cm" style:contextual-spacing="false" fo:line-height="115%" fo:text-align="justify" style:justify-single-word="false"/>
      <style:text-properties style:font-name="Liberation Serif1" fo:font-size="14pt" officeooo:paragraph-rsid="000dfabc" style:font-size-asian="14pt" style:font-size-complex="14pt"/>
    </style:style>
    <style:style style:name="P24" style:family="paragraph" style:parent-style-name="Standard">
      <style:paragraph-properties fo:line-height="115%" fo:text-align="justify" style:justify-single-word="false"/>
      <style:text-properties fo:font-size="12pt" fo:font-weight="bold" officeooo:rsid="0020a6df" officeooo:paragraph-rsid="0020a6df" style:font-size-asian="12pt" style:font-weight-asian="bold" style:font-size-complex="12pt" style:font-weight-complex="bold"/>
    </style:style>
    <style:style style:name="T1" style:family="text">
      <style:text-properties officeooo:rsid="000c8a67"/>
    </style:style>
    <style:style style:name="T2" style:family="text">
      <style:text-properties officeooo:rsid="000f3b6b"/>
    </style:style>
    <style:style style:name="T3" style:family="text">
      <style:text-properties fo:font-style="italic" style:font-style-asian="italic" style:font-style-complex="italic"/>
    </style:style>
    <style:style style:name="T4" style:family="text">
      <style:text-properties fo:font-style="italic" officeooo:rsid="000f3b6b" style:font-style-asian="italic" style:font-style-complex="italic"/>
    </style:style>
    <style:style style:name="T5" style:family="text">
      <style:text-properties fo:font-style="italic" officeooo:rsid="00103fd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103fd4"/>
    </style:style>
    <style:style style:name="T8" style:family="text">
      <style:text-properties officeooo:rsid="0011c89a"/>
    </style:style>
    <style:style style:name="T9" style:family="text">
      <style:text-properties officeooo:rsid="001308b0"/>
    </style:style>
    <style:style style:name="T10" style:family="text">
      <style:text-properties officeooo:rsid="0013d875"/>
    </style:style>
    <style:style style:name="T11" style:family="text">
      <style:text-properties officeooo:rsid="0014dc84"/>
    </style:style>
    <style:style style:name="T12" style:family="text">
      <style:text-properties officeooo:rsid="0016d282"/>
    </style:style>
    <style:style style:name="T13" style:family="text">
      <style:text-properties officeooo:rsid="0017532a"/>
    </style:style>
    <style:style style:name="T14" style:family="text">
      <style:text-properties officeooo:rsid="00194567"/>
    </style:style>
    <style:style style:name="T15" style:family="text">
      <style:text-properties style:font-name="Noto Sans" fo:font-size="12pt" fo:font-weight="bold" style:font-size-asian="12pt" style:font-weight-asian="bold" style:font-size-complex="12pt" style:font-weight-complex="bold"/>
    </style:style>
    <style:style style:name="T16" style:family="text">
      <style:text-properties style:font-name="Noto Sans" fo:font-size="12pt" style:font-size-asian="9pt" style:font-size-complex="10.25pt"/>
    </style:style>
    <style:style style:name="T17" style:family="text">
      <style:text-properties style:font-name="Noto Sans" fo:font-size="12pt" officeooo:rsid="00194567" style:font-size-asian="9pt" style:font-size-complex="10.25pt"/>
    </style:style>
    <style:style style:name="T18" style:family="text">
      <style:text-properties officeooo:rsid="001d10d7"/>
    </style:style>
    <style:style style:name="T19" style:family="text">
      <style:text-properties officeooo:rsid="001fbc5c"/>
    </style:style>
    <style:style style:name="T20" style:family="text">
      <style:text-properties style:font-name="Liberation Serif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l male per Schopenhauer</text:p>
      <text:p text:style-name="P17"/>
      <text:p text:style-name="P1">Schopenhauer ha una concezione soggettivistica dei valori. Riprendendo una tradizione che risale fino a <text:span text:style-name="T1">H</text:span>obbes, sostiene che il bene e il male sono determinati da ciò che l'uomo vuole o da ciò che l'uomo non vuole: tutto ciò che l'uomo cerca di conseguire, viene considerato bene, tutto ciò che cerca di evitare, è male.</text:p>
      <text:p text:style-name="P1">La realtà per Schopenhauer presenta molti aspetti che l'uomo non vorrebbe fossero così. In primo luogo l'uomo è sgradevolmente colpito dalla brevità dell'esistenza: l'uomo vorrebbe vivere a lungo ed essere felice e non riesce ad essere tale. Il tempo scorre velocemente, l'uomo cerca con ogni mezzo di evitare tutti i pericoli che lo possono condurre alla morte, ma, con un'espressione famosa, Schopenhauer afferma che noi guidiamo la nave della nostra esistenza con ogni cura, cercando di evitare scogli, gorghi ecc. ma siamo sicuri che alla fine non arriveremo ad un porto: ci sarà il</text:p>
      <text:p text:style-name="P3">naufragio della morte, il cessare di questa vita. </text:p>
      <text:p text:style-name="P4">Tutta la nostra cura nel condurre la nostra esistenza deriva dal fatto che siamo continuamente minacciati da malattie, sofferenze, dolore, fame. Schopenhauer vive nella prima metà dell'Ottocento quando la miseria era molto diffusa fra le classi sociali meno abbienti e aveva una viva coscienza della situazione di assoluto privilegio in cui poteva vivere, avendo ereditato una <text:soft-page-break/>fortuna cospicua da par<text:span text:style-name="T2">t</text:span>e del padre che gli consent<text:span text:style-name="T2">ì</text:span> di vivere di rendita per tutta la vita. C'è un'espressione che viene citata spesso per attribuire a Schopenhauer una particolare sensibilità sociale, forse in misura un po' esagerata: <text:span text:style-name="T3">lavorare dodici ore in una fabbrica in mezzo al fumo, alla polvere, per potersi comprare un tozzo di pane per mangiare è il caro prezzo che la maggior parte della gente deve pagare per continuare a vivere</text:span>.</text:p>
      <text:p text:style-name="P4">Alle condizioni oggettive di contorno della vita umana, che rendono difficile l'esistenza, si aggiungono poi le condizioni soggettive, legate alla natura stessa all'uomo. Schopenhauer non aveva un'opinione positiva dell'uomo in generale; in proposito fa sua la concezione hobbesiana espressa dalla nota espressione Homo homìni lupus: di norma ogni uomo è un lupo, ha un atteggiamento aggressivo e violento nei confronti degli altri uomini. </text:p>
      <text:p text:style-name="P4">Egoismo e crudeltà secondo Schopenhauer caratterizzano il modo d'essere normale degli individui. Per quanto si scelga come interlocutori gli autori del Settecento, Kant, Voltaire (a suo avviso la filosofia idealistica era una follia cui solo i tedeschi avevano creduto), Schopenhauer non condivide l'idea settecentesca secondo cui esistono nell'uomo delle virtù sociali, ovvero una naturale tendenza ad un atteggiamento benevolo nei confronti di altri uomini, <text:soft-page-break/>almeno in certe circostanze. Gli uomini sono in genere reciprocamente ostili, appena possono cercano di danneggiare gli altri a proprio vantaggio. Questo modo di vedere risulta ancora più angosciante, se si tien conto del fatto che per Schopenhauer l'uomo ha un carattere immutabile, non migliorabile, non correggibile: come nasce, tale muore. Se è criminale dalla nascita, criminale rimarrà fino alla morte. Schopenhauer sì oppone radicalmente all'idea che le pene abbiano come scopo la rieducazione morale dei condannati, uno scopo assolutamente irraggiungibile; questo è un aspetto molto cupo della sua antropologia.</text:p>
      <text:p text:style-name="P1">L'uomo non solo è aggressivo nei confronti dei suoi simili, non solo ha difficoltà a soddisfare i propri bisogni, ma non raggiunge mai una soddisfazione durevole: <text:span text:style-name="T3">appena soddisfatto un desiderio, immediatamente se ne presenta un altro</text:span>. A questa concezione si collega la nota tesi del carattere negativo del piacere: in breve, secondo Schopenhauer, quando l'uomo prova piacere, la sostanza di questo sentimento si risolve nel toglimento della condizione di disagio che precede tale piacere e che ne è condizione. Il conseguimento del piacere è sempre preceduto da una situazione di disagio e di sofferenza, per cui il piacere è - leopardianamente - «figlio d' affanno».</text:p>
      <text:p text:style-name="P1">Gli uomini hanno grande difficoltà a soddisfare i propri bisogni. Le poche persone appartenenti al ceto borghese, <text:soft-page-break/>di cui Schopenhauer faceva parte, in genere hanno minori difficoltà nel liberarsi dai bisogni, ma sono perseguitati da un altro male, ovvero, quando hanno soddisfatto i loro desideri, cadono vittima della noia, un flagello caratteristico delle classi elevate. Schopenhauer indica con questo sentimento la condizione in cui l'uomo si trova quando non sa che cosa desiderare: è insoddisfatto ma non sa come liberarsi da tale disagio; è un desiderare indeterminato e in quanto tale impossibile da soddisfare. Schopenhauer è talmente convinto della gravità della sofferenza derivante dalla noia, che mostra di condividere pienamente la famosa espressione usata da Giovenale: <text:span text:style-name="T3">pa</text:span><text:span text:style-name="T4">nem</text:span><text:span text:style-name="T3"> et </text:span><text:span text:style-name="T4">c</text:span><text:span text:style-name="T3">ircenses</text:span>: gli imperatori romani sapevano benissimo che non bastava dare da mangiare alla plebe; bisognava anche evitare che il popolo si annoiasse, una condizione altrettanto pericolosa della mancanza del pane.</text:p>
      <text:p text:style-name="P5">Queste condizioni di vita estremamente difficili, caratterizzate dal bisogno e dalla noia, sono presenti anche nel mondo animale. Schopenhauer era un animalista, si commuoveva di più per un cane bastona<text:span text:style-name="T7">t</text:span>o, che per un povero bastonato, non avendo un carattere socievole. Per questo in mol<text:span text:style-name="T7">t</text:span>e pagine descrive la terribile vita degli animali, unicamente indirizzata alla riproduzione e ancora più insensata di quella degli uomini. Tali descrizioni sono funzionali per giungere a certe conclusioni sulla natura complessiva di questo <text:soft-page-break/>macchinario sofferente, che è il mondo nel quale ci troviamo.</text:p>
      <text:p text:style-name="P5">Dare un senso, cercare di comprendere cosa significa <text:span text:style-name="T7">t</text:span>utto ciò è compito specifico della filosofia e Schopenhauer - contro Aristotele - sostiene che è la sofferenza che scorgiamo nel mondo - e non la meraviglia - la vera molla della riflessione filosofica. Schopenhauer si considera fino alla fine un discepolo di Kant, in quanlo ritiene che sia impossibile avere qualsiasi conoscenza sufficientemente prova<text:span text:style-name="T7">t</text:span>a e convincente riguardo a reallà che vanno al di là della nos<text:span text:style-name="T7">t</text:span>ra esperienza. Questo potrà suonare strano a chi ha presente come Schopenhauer rivendichi come suo merito fondamentale nei confronti della filosofia kantiana, quello di avere risolto il problema della cosa in sé, ovvero dell'essenza della realtà.</text:p>
      <text:p text:style-name="P1">Secondo Kant noi consociamo soltanto la superficie della realtà, ma quello che sta dietro, la cosa in sé, il fondamento metafisico di questa realtà è ina<text:span text:style-name="T7">tt</text:span>ingibile. Kan<text:span text:style-name="T7">t</text:span> non ha dunque risolto il problema del fondamento metafisico della realtà, mentre lui, Schopenhauer, ritiene di aver trovato la risposta giusta: il fondamento metafisico di tutta la realtà è la volontà.</text:p>
      <text:p text:style-name="P6">A ben vedere tuttavia Schopenhauer si mantiene fedele a Kant almeno nel ritenere impossibile determinare compiutamente la natura di ciò che sta a fondamento del mondo: solo alcuni aspetti di questo fondamento ci sono <text:soft-page-break/>accessibili. <text:span text:style-name="T7">L</text:span>a natura della filosofia di Schopenhauer <text:span text:style-name="T7">si può </text:span>esprimere nel modo migliore utilizzando una metafora, da lui stesso utilizzata: <text:span text:style-name="T3">il mondo si presenta ai nostri occhi come un libro scritto in una lingua che non riusciamo a decifrare; non intendiamo che cosa ci stia dicendo questo mondo pieno di sofferenza. </text:span><text:span text:style-name="T5">Il</text:span><text:span text:style-name="T3"> significato di un testo scritto in una lingua sconosciuta può essere trovato quando riusciamo a capire che cosa vuol dire qualche parola di tale testo. Se ciò avviene, piano piano arriviamo a decifrare la lingua e il senso dell'enigmatico testo. Ora l'esperienza che noi facciamo del nostro volere è qualcosa che ci fa comprendere un aspetto importante del mondo e la volontà è la parola che ci permette di decifrare l'oscuro testo del mondo. Quando riflettiamo sulla nostra volontà, quando comprendiamo la natura e le forme del nostro volere entriamo in possesso della chiave per decifrare tutto il mondo.</text:span> Possiamo dire che ad avviso di Schopenhauer l'uomo inizia a capire che cos'è questo mondo, riesce a dare un senso parziale alla sua organizzazione e alle sue parti, se immagina che sia il prodotto, l'espressione di qualcosa di simile a ciò che sperimenta in se stesso come la volontà. La volontà diventa lo strumento che serve per spiegare la natura del mondo.</text:p>
      <text:p text:style-name="P1">Va ricordato che Schopenhauer dissente completamente da Kant circa il modo di intendere la volontà: per Kant la volontà è una facoltà razionale, che si determina <text:soft-page-break/>attraverso la ragione. Per Schopenhauer invece la volontà è una forza impulsiva, totalmente irrazionale. Tale forza è decisiva nell'uomo, ma si presenta come qualcosa di impenetrabile alla coscienza dell'uomo stesso. In un passo famoso Schopenhauer ci dice che noi, di fronte alla volontà, siamo come dei servi che dopo aver presentato vari motivi al proprio padrone (la volontà) attendono che cosa deciderà la volontà, senza poter influire sulle sue decisioni né comprenderne le ragioni. E' luogo comune intendere la volontà di Schopenhauer come qualcosa di simile all'inconscio freudiano, qualcosa di impenetrabile all'uomo e di non dominabile dalla ragione. Freud del resto apprezzava molto Schopenhauer e temeva di essere influenzato dalle sue tesi (speculative) nello sviluppo della psicoanalisi.</text:p>
      <text:p text:style-name="P7">La volontà dunque è la chiave che Schopenhauer vuole utilizzare per comprendere il mondo, per renderlo qualcosa di leggibile. In molte occasioni tuttavia Schopenhauer fa capire di non voler intendere la volontà come qualcosa di paragonabile ad un principio metafìsico trascendente che spieghi tutto. Illuminante da questo punto di vista è la polemica con il suo discepolo Frauenstàdt. Questi, in precedenza allievo di Hegel, riteneva dì poter porre sullo stesso piano il vecchio e il nuovo maestro: per il primo (Hegel) l'Assoluto è ragione e la realtà è manifestazione della ragione, per il <text:span text:style-name="T8">se</text:span>condo <text:soft-page-break/>(Schopenhauer) l'Assoluto è volontà e la realtà è manifestazione della volontà. In Hegel c'è una specie di panteologismo, in Schopenhauer invece c'è una specie di pandemonismo, a fondamento del mondo non c'è Dìo, ma un demonio (la volontà).</text:p>
      <text:p text:style-name="P7">La polemica tra Arthur Schopenhauer e Julius Frauenstädt è un capitolo affascinante della storia della filosofia, perché rappresenta il momento in cui il "pensiero unico" del maestro si scontra con la necessità del discepolo di adattarlo ai tempi (e alla scienza). Frauenstädt fu fondamentale per il successo di Schopenhauer: fu lui a curare le edizioni delle opere e a far uscire il filosofo dall'anonimato. Tuttavia, essendo stato originariamente un allievo di Hegel, portava con sé una formazione che Schopenhauer detestava.</text:p>
      <text:p text:style-name="P7"><text:span text:style-name="T8">I</text:span>l punto di rottura più profondo riguardava la concezione della natura e della storia.</text:p>
      <text:p text:style-name="P7">Frauenstädt, <text:span text:style-name="T8">i</text:span>nfluenzato dalle nascenti teorie evoluzionistiche (pre-darwiniane) e dal panlogismo hegeliano, cercava di inserire la Volontà in un processo di sviluppo storico e progressivo. Vedeva nella natura un'ascesa verso forme sempre più alte.</text:p>
      <text:p text:style-name="P7"><text:span text:style-name="T8">Per </text:span>Schopenhauer, la Volontà è eterna e immutabile. Non c'è progresso, non c'è evoluzione sensata; la storia è solo un ripetersi ciclico di dolore. Schopenhauer accusò Frauenstädt di voler "hegelizzare" il suo sistema, <text:soft-page-break/>trasformando l'impulso cieco in una sorta di "spirito" che impara dai suoi errori.</text:p>
      <text:p text:style-name="P7">Frauenstädt cercò di ammorbidire il determinismo ferreo del maestro, <text:span text:style-name="T8">cercando di </text:span>vole<text:span text:style-name="T8">r</text:span> recuperare uno spazio per la libertà individuale e la responsabilità morale all'interno del mondo fenomenico.</text:p>
      <text:p text:style-name="P7">Schopenhauer fu irremovibile, l'uomo è assolutamente determinato dal suo carattere (che è un'estrinsecazione della Volontà). L'unica libertà possibile è la negazione totale della volontà stessa (Noluntas), non una scelta morale "borghese" o razionale nel quotidiano.</text:p>
      <text:p text:style-name="P8">Schopenhauer, noto per il suo carattere difficile e la sua autostima smisurata, trattava Frauenstädt quasi come un suddito, <text:span text:style-name="T8">l</text:span>o chiamava il suo "Arcievangelista", ma non gli perdonava la minima deviazione dottrinale. Nelle lettere, Schopenhauer usava toni sarcastici e sprezzanti ogni volta che Frauenstädt provava a proporre una "correzione" al sistema.</text:p>
      <text:p text:style-name="P8">Questa disputa dimostra che il sistema di Schopenhauer è chiuso e assoluto: o lo si accetta in blocco (con il suo pessimismo cosmico e l'irrazionalità totale), o si finisce per distorcerlo. Frauenstädt voleva rendere Schopenhauer "accettabile" per il mondo accademico e scientifico, ma per il Maestro questo significava uccidere l'essenza stessa della sua filosofia.</text:p>
      <text:p text:style-name="P9"><text:soft-page-break/>Schopenhauer rifiuta nel modo più deciso <text:span text:style-name="T9">il</text:span> parallelismo <text:span text:style-name="T9">(</text:span>l'Assoluto è ragione <text:span text:style-name="T9">e l'Assoluto è volontà), </text:span>sostenendo di non aver mai parlato di Assoluto o di realtà trascendenti. Ritiene invece di essere rimasto fedele a Kant: la sua metafisica non è nulla di più che un'interpretazione complessiva della realtà empirica: molti aspetti di questa realtà risultano incomprensibili, non spiegati e Schopenhauer lo sa benissimo, come sa benissimo che nulla si può sapere di ciò che va al di là dell'esperienza.</text:p>
      <text:p text:style-name="P10">Se leggiamo il mondo attraverso questa metafora della volontà, se lo immaginiamo come sua manifestazione, comprendiamo che questo mondo non è organizzato finalisticamente, non è costruito in modo da perseguire un determinato fine. La massiccia e continua presenza del dolore rende difficile pensare che questo mondo sia opera di un Dio: esso - rovesciando le tesi di Leibniz - non è il migliore, ma il peggiore dei mondi possibili, nel senso che l'ateleologismo in esso presente, se aumentasse anche di poco, ne renderebbe impossibile l'esistenza. </text:p>
      <text:p text:style-name="P10"><text:span text:style-name="T10">La </text:span>frase <text:span text:style-name="T10">appena citata </text:span>rappresenta l'attacco frontale di Schopenhauer a tutta la teologia e la filosofia ottimista del Settecento. Per capirla bene, dobbiamo smontarla in tre passaggi chiave.</text:p>
      <text:p text:style-name="P11"><text:span text:style-name="T10">1) </text:span>Gottfried Wilhelm Leibniz, nel XVIII secolo, aveva sostenuto che Dio, essendo onnipotente e infinitamente <text:soft-page-break/>buono, non poteva che aver creato "il migliore dei mondi possibili". Secondo Leibniz, anche il male che vediamo ha una funzione nel disegno divino complessivo.</text:p>
      <text:p text:style-name="P10">Schopenhauer risponde con sarcasmo: guarda il mondo, guarda le malattie, la fame, la crudeltà degli animali che si sbranano tra loro. Se questo fosse il lavoro di un Dio, sarebbe un Dio crudele o incompetente. Pertanto, il mondo non è un progetto divino, ma il prodotto di una Volontà cieca e irrazionale.</text:p>
      <text:p text:style-name="P11"><text:span text:style-name="T10">2) </text:span>Il "Peggiore dei mondi possibili" è una provocazione logica geniale. Schopenhauer non dice solo che il mondo è "brutto", ma sfida la definizione di Leibniz con un criterio quasi ingegneristico: <text:span text:style-name="T14">u</text:span>n mondo "migliore" può sempre essere immaginato (un mondo senza cancro, senza guerre, ecc.). Ma il nostro mondo è il peggiore possibile perché è al limite estremo della sopravvivenza.</text:p>
      <text:p text:style-name="P11"><text:span text:style-name="T10">3) </text:span>L'Ateleologismo e il limite di rottura <text:span text:style-name="T10">e</text:span> arriviamo alla parte più tecnica della frase.</text:p>
      <text:p text:style-name="P10"><text:span text:style-name="T15">Ateleologismo</text:span>: <text:span text:style-name="T14">s</text:span>ignifica "assenza di fine" o "assenza di scopo" (dal greco telos, scopo). Il mondo non va da nessuna parte, è un caos che cerca solo di perpetuare se stesso. Schopenhauer osserva che la sofferenza e il disordine sono così elevati che, se le cose andassero anche solo un pochino peggio, il sistema crollerebbe.</text:p>
      <text:p text:style-name="P10"><text:soft-page-break/>Esempio pratico: <text:span text:style-name="T17">s</text:span><text:span text:style-name="T16">e</text:span> la Terra fosse leggermente più vicina al Sole, bruceremmo; se le risorse fossero ancora più scarse, ci saremmo già estinti tutti; se il dolore fosse appena più intenso, l'organismo morirebbe subito.</text:p>
      <text:p text:style-name="P10">Il mondo, quindi, è "il peggiore" perché è il minimo indispensabile per esistere. È una macchina tarata sul limite della distruzione: basta un piccolo aumento del male o del disordine perché l'esistenza stessa diventi impossibile. Non è un giardino creato da Dio, ma un'arena di lotta che sta insieme per miracolo (o per sventura).</text:p>
      <text:p text:style-name="P11">Il mondo non può essere opera di un Dio buono, a meno che si pensi a un Dio assolutamente trascendente i cui disegni siano totalmente incomprensibile per l'uomo. Ma se restiamo al mondo che vediamo e di cui cerchiamo di dare un'interpretazione comprensibile, è impossibile intenderlo come opera di un Dio buono e provvidente. Ancora più insostenibile è il panteismo<text:note text:id="ftn0" text:note-class="footnote"><text:note-citation>1</text:note-citation><text:note-body><text:p text:style-name="P14">Concezione filosofica e religiosa secondo cui Dio coincide con l’universo e la natura.</text:p></text:note-body></text:note>, che identificando il mondo con Dio, giungerebbe all'assurdo di sostenere che Dio si autoinfligga sofferenza nel mondo.</text:p>
      <text:p text:style-name="P11"><text:span text:style-name="T10">Per quanto </text:span>riguard<text:span text:style-name="T10">a</text:span> al rapporto con il cristianesimo, Schopenhauer, quando presenta all'editore il manoscritto del Mondo come volontà e rappresentazione, lo rassicura circa eventuali interventi della censura, <text:soft-page-break/>affermando che l'opera è assolutamente conforme al cristianesimo: "<text:span text:style-name="T6">io mio considero filosofo cristianissimo</text:span>", una affermazione che appare piuttosto stravagante, se non compresa nel contesto della concezione schopenhaueriana della religione.</text:p>
      <text:p text:style-name="P11">Le religioni, in generale, hanno la loro ragion d'essere nel fatto che l'uomo ha un "bisogno metafisico", ovvero ha bisogno di dare un senso complessivo alla realtà in cui vive. Le religioni sono una metafisica popolare, ovvero sono una rappresentazione mitologica, metaforica, non razionale della realtà, insomma offrono una risposta semplicistica al bisogno di cui s'è detto. Schopenhauer divide le religioni in due grandi categorie: le religioni ottimistiche e quelle pessimistiche, le religioni che sostengono che il mondo è stato creato da un Dio buono e quelle che sostengono che il mondo è una valle di lacrime, un luogo di sofferenza da cui bisogna liberarsi. Le religioni ottimistiche sono l'ebraismo e l'islamismo, quelle pessimistiche sono il cristianesimo e tutte le religioni indiane. In questa classificazione colpisce la radicale cesura che viene posta fra ebraismo e cristianesimo. Il genuino insegnamento di Cristo - nella misura in cui ha al suo centro una profonda visione pessimistica del mondo - è necessariamente ateo; purtroppo Cristo è vissuto nel mondo ebraico e non ha potuto fare a meno di collegare a questa sua religione pessimistica una parte <text:soft-page-break/>dell'ebraismo, facendo propria l'idea di un Dio padre, buono, provvidente. Ma se si prende il cristianesimo e gli si toglie il Dio buono e provvidente, la redenzione, l'immortalità dell'anima, la beatitudine eterna, quello che resta non è altro che la filosofia di Schopenhauer: un mondo visto come valle di lacrime, un uomo malvagio e incapace (da solo) di correggersi e salvarsi. E non per caso di tutta la teologia ebraica Schopenhauer salva solo l'idea del peccato originale, garanzia teologica della incorreggibile corruzione dell'uomo. Ecco le ragioni per cui Schopenhauer – che Nietzsche definisce "<text:span text:style-name="T3">il primo ateo dichiarato e irremovibile</text:span>" fra i filosofi tedeschi - si considerava un cristiano, anche se forse sapeva di non essere un "buon cristiano", per il suo incorreggibile cattivo carattere. </text:p>
      <text:p text:style-name="P12">Tornando ora al problema del male: la conclusione del discorso è dunque che non c'è alcuna giustificazione del male, non c'è alcuna possibile teodicea<text:note text:id="ftn1" text:note-class="footnote"><text:note-citation>2</text:note-citation><text:note-body><text:p text:style-name="P15">Termine introdotto da Leibniz nel 1710 che tenta di conciliare l’esistenza di un Dio onnipotente e buono con la presenza del male nel mondo. </text:p></text:note-body></text:note>; si può solo prendere atto che il mondo è fatto cosi, è fondamentalmente caratterizzato dal male. Non c'è alcuna vìa d'uscita da questa condizione, c'è solo una prospettiva naturalistica: una vita sofferente, limitata nel tempo e infine la morte.</text:p>
      <text:p text:style-name="P12">Qui si inserisce però l'altra componente della filosofìa di Schopenhauer, quella caratterizzata dalla negazione del <text:soft-page-break/>volere, dalla celebre noluntas. Alla sua base c'è una considerazione molto semplice. Tutte le sofferenze derivano dal fatto che l'uomo - e tutta la natura - vuole, ovvero cerca e non trova soddisfazione; se fosse possibile rinunciare alla ricerca della soddisfazione, se insomma si rinunciasse a volere, cesserebbero tutti <text:span text:style-name="T11">i </text:span>dolori. Per Schopenhauer questa negazione della volontà - questa opposizione all'essenza che costituisce il mondo - è possibile nell'uomo: l'uomo può giungere alla noluntas. Ci sono intorno a questa dottrina un'infinità di problemi. In primo luogo, bisogna rilevare che per Schopenhauer alla base di questa dottrina c'è una constatazione empirica: nel mondo vivono e sono vissute persone - asceti, santi, fachiri indiani -, che seguono un tipo di vita che nega la soddisfazione dei bisogni, che pratica la "mortificazione": mortificarsi vuol dire uccidere i propri bisogni, fermare il desiderio. Queste poche, rare persone – fra gli altri viene citato san Francesco - mostrano di non essere più reattive agli stimoli interni ed esterni, non mangiano da giorni e non reagiscono alla stimolazione del cibo, non si proteggono dal caldo o dal freddo, insomma sembrano aver rotto l'ordine naturale delle cose. Da qui deriva l'impossibilità di descrivere adeguatamente tale modo d'essere – il linguaggio funziona per il mondo fenomenico - e da qui il sorprendente - ma filosoficamente giustificato - ricorso ai mistici, gli unici che, nella misura in cui fanno <text:soft-page-break/>esperienza della negazione della volontà, cercano nei loro scritti di dare qualche indicazione riguardo a questo modo d'essere completamente diverso. E Schopenhauer nota che, al di là dei rivestimenti teologici in cui si esprimono i mistici, l'elemento comune è l'esperienza di una condizione <text:span text:style-name="T11">di </text:span>pace e serenità.</text:p>
      <text:p text:style-name="P13">La dottrina della negazione del volere è legata alla interpretazione che Schopenhauer dà della dottrina kantiana della libertà, <text:span text:style-name="T13">nella </text:span><text:span text:style-name="T12">quale aveva notato un paradosso: nel mondo dei fenomeni (quello che vediamo), tutto è causato da qualcos'altro. Se io muovo un braccio, c'è un impulso nervoso. Non c'è libertà: c'è solo necessità.</text:span></text:p>
      <text:p text:style-name="P16">Nel mondo noumenico (la "cosa in sé"), deve però esistere la libertà, altrimenti non potremmo essere responsabili delle nostre azioni morali.</text:p>
      <text:p text:style-name="P13"><text:span text:style-name="T12">Kant però non spiegava come queste due cose potessero coesistere senza contraddirsi. </text:span>Schopenhauer risolve l'inestricabile problema di come sia pensabile l'accordo fra la libertà <text:span text:style-name="T18">e responsabilità</text:span> e la necessità del mondo fenomenico, riducendo lo spazio della libertà all'atto (libero) con il quale l'uomo si dà un certo carattere. Si tratta di una rivisitazione del famoso mito di Er di Platone, il quale immaginava che all'uomo, prima di scendere sulla terra, venisse data la facoltà di scegliersi un certo carattere, carattere che avrebbe poi determinato per intero il suo comportamento terreno. Schopenhauer <text:soft-page-break/>concorda sostanzialmente con Platone - l'agire dell'uomo è predeterminato dal suo carattere - ma dà spazio nella vita terrena ad una manifestazione della libertà: si tratta del misterioso atto con cui l'uomo rinuncia al volere. Proprio perché la negazione del volere è un atto libero, esso non può essere "causato", ovvero non può essere prodotto dalla predicazione morale o da quant'altro. Schopenhauer cerca di illustrare la sua posizione facendo riferimento anche all'interpretazione protestante della grazia, secondo cui l'uomo non può salvarsi senza la grazia gratuitamente donatagli da Dio: allo stesso modo la negazione della volontà non è il risultato di una scelta razionale dell'uomo, l'esito necessario di un percorso ascetico, ma un evento misterioso e inspiegabile.</text:p>
      <text:p text:style-name="P2">La negazione del volere - il rifiuto di soddisfare i propri bisogni - dovrebbe portare infine alla morte (ma qui Schopenhauer è piuttosto evasivo). Quello che è certo è però che la soluzione più a portata di mano per sottrarsi alle sofferenze della vista - il suicidio - è decisamente rifiutata da Schopenhauer. Esso non sarebbe espressione della rinuncia alla vita, ma della incapacità di sopportare la sofferenza derivante da un desiderio fortemente sentito e non soddisfatto: qui Schopenhauer si riferisce alla tradizione romantica dei suicidi per amore.</text:p>
      <text:p text:style-name="P2">Sembra quindi che la negazione del volere offra la via per sottrarsi alla sofferenza e addirittura Schopenhauer <text:soft-page-break/>in qualche passo abbozza una sorta di teodicea, secondo cui la presenza del male nel mondo sarebbe la condizione necessaria per spingerci a raggiungere il nostro "fine", ovvero la negazione della volontà. Ma, a prescindere dal fatto che la noluntas è un percorso di pochissimi, il senso complessivo di questo discorso dipende dal modo di intendere l'esito della negazione del volere.</text:p>
      <text:p text:style-name="P2">In proposito, il finale del Mondo come realtà e rappresentazione - che tratta della condizione conseguente alla noluntas - è ambiguo: vi si dice che colui che ha compiutamente negato la propria volontà, toglie la radice della sua esistenza - la volontà - e perciò precipita nel nulla. Ma si dice anche che il concetto di nulla è solo relativo, ovvero esprime solo il non essere di qualcosa di determinato. Di conseguenza, per colui che ha negato la volontà, il nulla dovrebbe essere inteso come il non essere del mondo che esprime l'affermazione della volontà. La negazione del volere non è allora annichilimento dell'individuo ma apre ad una forma di esistenza diversa e - presumibilmente - più alta? Si tratta di un problema "trascendente" su cui Schopenhauer non può evidentemente pronunciarsi: quello che la filosofia può dire è che con il venir meno della volontà vi<text:span text:style-name="T13">en </text:span>meno ciò che è la sua affermazione, ovvero l'individuo. Ma nei suoi ultimi scritti di carattere aforistico si trovano effettivamente alcuni accenni ad <text:soft-page-break/>una nuova forma di esistenza successiva alla negazione del volere. Fra i non molti, si può citare questo: "<text:span text:style-name="T3">Con la nostra morte faremo esperienza di una luce al confronto della quale la luce del sole ci parrà pura ombra</text:span>". </text:p>
      <text:p text:style-name="P2"/>
      <text:p text:style-name="P24">Di lui si disse:</text:p>
      <text:p text:style-name="P21"><text:span text:style-name="T20">La storia del successo di Schopenhauer è uno dei "colpi di scena" più ironici della storia della filosofia. Per oltre trent'anni, Schopenhauer visse nell'oscurità più totale, convinto di essere un genio incompreso mentre le aule di Hegel erano gremite di studenti.</text:span></text:p>
      <text:p text:style-name="P23">Il suo passaggio da "filosofo fantasma" a "<text:span text:style-name="T3">idolo dell'Europa</text:span>" avvenne quasi improvvisamente intorno al 1851, grazie a una serie di fattori storici e psicologici.</text:p>
      <text:p text:style-name="P23">Il 1848 fu l'anno delle rivoluzioni in tutta Europa. Le persone credevano nel progresso, nella democrazia e nelle grandi speranze politiche (idee care a Hegel).</text:p>
      <text:p text:style-name="P22">Quando le rivoluzioni fallirono e tornarono la restaurazione e l'autoritarismo, l'ottimismo hegeliano crollò.</text:p>
      <text:p text:style-name="P22">La gente iniziò a pensare che forse Schopenhauer aveva ragione: il mondo non è guidato dalla Ragione, ma da un impulso cieco e irrazionale; la storia non progredisce, è solo un inutile spargimento di sangue. Il suo pessimismo cosmico divenne improvvisamente la spiegazione più realistica della realtà.</text:p>
      <text:p text:style-name="P23"><text:soft-page-break/>Dopo il fallimento commerciale del suo capolavoro (Il mondo come volontà e rappresentazione), Schopenhauer pubblicò nel 1851 una raccolta di saggi e aforismi intitolata "Parerga e Paralipomena" (letteralmente: "Appendici e omissioni").</text:p>
      <text:p text:style-name="P22">Uno stile nuovo <text:span text:style-name="T19">a </text:span>differenza dei pesanti trattati accademici, questi testi erano scritti con uno stile brillante, sarcastico, chiaro e accessibile.</text:p>
      <text:p text:style-name="P22">Contenevano gli Aforismi sulla saggezza del vivere, dove Schopenhauer spiegava come sopravvivere in un mondo di dolore senza necessariamente diventare asceti. Fu un successo editoriale clamoroso: il pubblico borghese, che prima lo ignorava, iniziò a divorare i suoi libri.</text:p>
      <text:p text:style-name="P23">Nonostante le polemiche di cui abbiamo parlato, fu proprio la cerchia dei suoi seguaci (soprannominati da lui "gli apostoli") a diffondere il verbo.</text:p>
      <text:p text:style-name="P22">Frauenstädt scrisse articoli e recensioni ovunque, agendo come un moderno ufficio stampa. Un articolo anonimo su una rivista inglese (Westminster Review) nel 1853 lo definì il più grande filosofo tedesco vivente, scatenando un interesse internazionale che rimbalzò in Germania.</text:p>
      <text:p text:style-name="P23">Negli ultimi anni della sua vita (morirà nel 1860), Schopenhauer divenne una celebrità locale e internazionale a Francoforte.</text:p>
      <text:p text:style-name="P22"><text:soft-page-break/>I visitatori arrivavano da tutta Europa solo per vederlo mangiare al suo tavolo abituale all'hotel Englischer Hof.</text:p>
      <text:p text:style-name="P22">Riceveva lettere di ammirazione da ogni parte del mondo. Lui, che aveva passato la vita a insultare il genere umano, si godeva finalmente la gloria, commentando con la sua solita acidità: "<text:span text:style-name="T3">La mia fama è arrivata tardi, ma per questo durerà più a lungo</text:span>".</text:p>
      <text:p text:style-name="P23">Il successo di Schopenhauer segnò la fine dell'era dell'Idealismo e l'inizio di una nuova sensibilità che avrebbe influenzato Wagner, Nietzsche, Freud, Kafka e Einstein. Aveva trasformato la filosofia da un esercizio accademico a una riflessione cruda e onesta sulla condizione uma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4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4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 fo:font-family="'Liberation Serif'" style:font-family-generic="roman"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Arial" style:font-family-complex="Arial"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3-29T16:33:35.038064000</meta:creation-date>
    <dc:date>2026-03-30T17:01:17.729325868</dc:date>
    <dc:creator>corrado tafaro</dc:creator>
    <meta:editing-duration>PT1H6M24S</meta:editing-duration>
    <meta:editing-cycles>8</meta:editing-cycles>
    <meta:generator>LibreOffice/24.2.7.2$Linux_X86_64 LibreOffice_project/420$Build-2</meta:generator>
    <meta:document-statistic meta:table-count="0" meta:image-count="0" meta:object-count="0" meta:page-count="21" meta:paragraph-count="61" meta:word-count="4286" meta:character-count="27949" meta:non-whitespace-character-count="23715"/>
  </office:meta>
</office:document-meta>
</file>