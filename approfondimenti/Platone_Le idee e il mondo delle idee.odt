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700000046B765922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Bahnschrift SemiBold" svg:font-family="'Bahnschrift 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Footnote">
      <style:paragraph-properties fo:margin-top="0cm" fo:margin-bottom="0cm" style:contextual-spacing="false" fo:text-align="justify" style:justify-single-word="false"/>
    </style:style>
    <style:style style:name="P3" style:family="paragraph" style:parent-style-name="Footnote" style:master-page-name="">
      <loext:graphic-properties draw:fill="none"/>
      <style:paragraph-properties fo:margin-left="0.6cm" fo:margin-right="0cm" fo:text-align="justify" style:justify-single-word="false" fo:text-indent="-0.6cm" style:auto-text-indent="false" style:page-number="auto" fo:background-color="transparent" text:number-lines="false" text:line-number="0"/>
    </style:style>
    <style:style style:name="P4" style:family="paragraph" style:parent-style-name="Footnote">
      <style:paragraph-properties fo:margin-top="0cm" fo:margin-bottom="0cm" style:contextual-spacing="false" fo:line-height="50%"/>
    </style:style>
    <style:style style:name="P5" style:family="paragraph" style:parent-style-name="Footnote">
      <style:text-properties officeooo:rsid="0014c9b4" officeooo:paragraph-rsid="0014c9b4"/>
    </style:style>
    <style:style style:name="P6" style:family="paragraph" style:parent-style-name="Footnote">
      <style:paragraph-properties fo:text-align="justify" style:justify-single-word="false"/>
      <style:text-properties officeooo:rsid="0014c9b4" officeooo:paragraph-rsid="0014c9b4"/>
    </style:style>
    <style:style style:name="P7" style:family="paragraph" style:parent-style-name="Footnote">
      <style:paragraph-properties fo:text-align="justify" style:justify-single-word="false"/>
      <style:text-properties officeooo:rsid="00e9dffe" officeooo:paragraph-rsid="00e9dffe"/>
    </style:style>
    <style:style style:name="P8" style:family="paragraph" style:parent-style-name="Standard">
      <style:paragraph-properties fo:margin-top="0.199cm" fo:margin-bottom="0cm" style:contextual-spacing="false" fo:line-height="115%" fo:text-align="justify" style:justify-single-word="false"/>
      <style:text-properties style:font-name="Noto Sans1" fo:font-size="12pt" officeooo:paragraph-rsid="00105638" style:font-size-asian="12pt" style:font-size-complex="12pt"/>
    </style:style>
    <style:style style:name="P9"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05638" style:font-size-asian="12pt" style:font-size-complex="12pt"/>
    </style:style>
    <style:style style:name="P10" style:family="paragraph" style:parent-style-name="Standard">
      <style:paragraph-properties fo:margin-top="0.199cm" fo:margin-bottom="0cm" style:contextual-spacing="false" fo:line-height="115%" fo:text-align="justify" style:justify-single-word="false"/>
      <style:text-properties style:font-name="Noto Sans1" officeooo:paragraph-rsid="00105638"/>
    </style:style>
    <style:style style:name="P11" style:family="paragraph" style:parent-style-name="Standard">
      <style:paragraph-properties fo:margin-top="0.101cm" fo:margin-bottom="0cm" style:contextual-spacing="false" fo:line-height="115%" fo:text-align="justify" style:justify-single-word="false"/>
      <style:text-properties style:font-name="Noto Sans1" officeooo:paragraph-rsid="00105638"/>
    </style:style>
    <style:style style:name="P12" style:family="paragraph" style:parent-style-name="Text_20_body">
      <style:paragraph-properties fo:margin-top="0.199cm" fo:margin-bottom="0.199cm" style:contextual-spacing="false" fo:line-height="115%" fo:text-align="justify" style:justify-single-word="false" fo:break-before="page"/>
      <style:text-properties style:font-name="Noto Sans1" officeooo:paragraph-rsid="00105638"/>
    </style:style>
    <style:style style:name="P13" style:family="paragraph" style:parent-style-name="Text_20_body">
      <style:paragraph-properties fo:margin-top="0cm" fo:margin-bottom="0cm" style:contextual-spacing="false" fo:line-height="115%" fo:text-align="justify" style:justify-single-word="false"/>
      <style:text-properties style:font-name="Noto Sans1" officeooo:paragraph-rsid="00105638"/>
    </style:style>
    <style:style style:name="P14" style:family="paragraph" style:parent-style-name="Text_20_body">
      <style:paragraph-properties fo:margin-top="0.199cm" fo:margin-bottom="0cm" style:contextual-spacing="false" fo:line-height="115%" fo:text-align="justify" style:justify-single-word="false"/>
      <style:text-properties style:font-name="Noto Sans1" officeooo:paragraph-rsid="00105638"/>
    </style:style>
    <style:style style:name="P15" style:family="paragraph" style:parent-style-name="Text_20_body">
      <style:paragraph-properties fo:line-height="115%" fo:text-align="justify" style:justify-single-word="false"/>
      <style:text-properties style:font-name="Noto Sans1" officeooo:paragraph-rsid="00105638"/>
    </style:style>
    <style:style style:name="P16" style:family="paragraph" style:parent-style-name="Text_20_body">
      <style:paragraph-properties fo:margin-top="0.101cm" fo:margin-bottom="0cm" style:contextual-spacing="false" fo:line-height="115%" fo:text-align="justify" style:justify-single-word="false"/>
      <style:text-properties style:font-name="Noto Sans1" officeooo:paragraph-rsid="00105638"/>
    </style:style>
    <style:style style:name="P17" style:family="paragraph" style:parent-style-name="Text_20_body">
      <style:paragraph-properties fo:line-height="115%" fo:text-align="justify" style:justify-single-word="false"/>
      <style:text-properties style:font-name="Noto Sans1" officeooo:paragraph-rsid="00105638"/>
    </style:style>
    <style:style style:name="P18" style:family="paragraph" style:parent-style-name="Text_20_body">
      <style:paragraph-properties fo:margin-top="0cm" fo:margin-bottom="0cm" style:contextual-spacing="false" fo:line-height="115%" fo:text-align="justify" style:justify-single-word="false"/>
      <style:text-properties style:font-name="Noto Sans1" fo:font-size="12pt" officeooo:paragraph-rsid="00105638" style:font-size-asian="12pt" style:font-size-complex="12pt"/>
    </style:style>
    <style:style style:name="P19" style:family="paragraph" style:parent-style-name="Text_20_body">
      <style:paragraph-properties fo:margin-top="0.199cm" fo:margin-bottom="0cm" style:contextual-spacing="false" fo:line-height="115%" fo:text-align="justify" style:justify-single-word="false"/>
      <style:text-properties style:font-name="Noto Sans1" fo:font-size="12pt" officeooo:paragraph-rsid="00105638" style:font-size-asian="12pt" style:font-size-complex="12pt"/>
    </style:style>
    <style:style style:name="P20" style:family="paragraph" style:parent-style-name="Text_20_body">
      <style:paragraph-properties fo:line-height="115%" fo:text-align="justify" style:justify-single-word="false"/>
      <style:text-properties style:font-name="Noto Sans1" fo:font-size="12pt" officeooo:paragraph-rsid="00105638" style:font-size-asian="12pt" style:font-size-complex="12pt"/>
    </style:style>
    <style:style style:name="P21" style:family="paragraph" style:parent-style-name="Text_20_body">
      <style:paragraph-properties fo:margin-top="0.101cm" fo:margin-bottom="0cm" style:contextual-spacing="false" fo:line-height="115%" fo:text-align="justify" style:justify-single-word="false"/>
      <style:text-properties style:font-name="Noto Sans1" fo:font-size="12pt" officeooo:paragraph-rsid="00105638" style:font-size-asian="12pt" style:font-size-complex="12pt"/>
    </style:style>
    <style:style style:name="P22" style:family="paragraph" style:parent-style-name="Text_20_body">
      <style:paragraph-properties fo:margin-top="0.199cm" fo:margin-bottom="0.25cm" style:contextual-spacing="false" fo:line-height="115%" fo:text-align="justify" style:justify-single-word="false"/>
      <style:text-properties style:font-name="Noto Sans1" fo:font-size="12pt" officeooo:paragraph-rsid="00105638" style:font-size-asian="12pt" style:font-size-complex="12pt"/>
    </style:style>
    <style:style style:name="P23" style:family="paragraph" style:parent-style-name="Text_20_body">
      <style:paragraph-properties fo:margin-top="0cm" fo:margin-bottom="0cm" style:contextual-spacing="false" fo:line-height="115%" fo:text-align="start" style:justify-single-word="false"/>
      <style:text-properties style:font-name="Noto Sans1" fo:font-size="12pt" officeooo:rsid="00198e5d" officeooo:paragraph-rsid="00105638" style:font-size-asian="12pt" style:font-size-complex="12pt"/>
    </style:style>
    <style:style style:name="P24" style:family="paragraph" style:parent-style-name="Text_20_body">
      <style:paragraph-properties fo:margin-top="0cm" fo:margin-bottom="0cm" style:contextual-spacing="false" fo:line-height="115%" fo:text-align="justify" style:justify-single-word="false"/>
      <style:text-properties style:font-name="Noto Sans1" fo:font-size="12pt" officeooo:rsid="00e9dffe" officeooo:paragraph-rsid="00105638" style:font-size-asian="12pt" style:font-size-complex="12pt"/>
    </style:style>
    <style:style style:name="P25" style:family="paragraph" style:parent-style-name="Text_20_body">
      <style:paragraph-properties fo:margin-top="0cm" fo:margin-bottom="0cm" style:contextual-spacing="false" fo:line-height="115%" fo:text-align="start" style:justify-single-word="false"/>
      <style:text-properties style:font-name="Noto Sans1" fo:font-size="12pt" officeooo:rsid="00198e5d" officeooo:paragraph-rsid="00105638" style:font-name-asian="Arial" style:font-size-asian="12pt" style:font-name-complex="Arial" style:font-size-complex="12pt"/>
    </style:style>
    <style:style style:name="T1" style:family="text">
      <style:text-properties fo:font-size="12pt" style:font-size-asian="12pt" style:font-size-complex="12pt"/>
    </style:style>
    <style:style style:name="T2" style:family="text">
      <style:text-properties fo:font-style="italic" officeooo:rsid="00e9dffe" style:font-style-asian="italic" style:font-style-complex="italic"/>
    </style:style>
    <style:style style:name="T3" style:family="text">
      <style:text-properties fo:font-style="normal" officeooo:rsid="00e9dff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officeooo:rsid="0062a038"/>
    </style:style>
    <style:style style:name="T7" style:family="text">
      <style:text-properties style:text-underline-style="none"/>
    </style:style>
    <style:style style:name="T8" style:family="text">
      <style:text-properties fo:font-weight="bold" style:font-weight-asian="bold" style:font-weight-complex="bold"/>
    </style:style>
    <style:style style:name="T9" style:family="text">
      <style:text-properties fo:font-weight="bold" officeooo:rsid="00198e5d" style:font-weight-asian="bold" style:font-weight-complex="bold"/>
    </style:style>
    <style:style style:name="T10" style:family="text">
      <style:text-properties fo:font-weight="bold" officeooo:rsid="001b0d35" style:font-weight-asian="bold" style:font-weight-complex="bold"/>
    </style:style>
    <style:style style:name="T11" style:family="text">
      <style:text-properties fo:font-weight="bold" officeooo:rsid="00105638" style:font-weight-asian="bold" style:font-weight-complex="bold"/>
    </style:style>
    <style:style style:name="T12" style:family="text">
      <style:text-properties fo:font-weight="bold" officeooo:rsid="00116341"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05638"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officeooo:rsid="007a711a"/>
    </style:style>
    <style:style style:name="T17" style:family="text">
      <style:text-properties officeooo:rsid="001849fb"/>
    </style:style>
    <style:style style:name="T18" style:family="text">
      <style:text-properties officeooo:rsid="001b0d35"/>
    </style:style>
    <style:style style:name="T19" style:family="text">
      <style:text-properties officeooo:rsid="001b0d35" style:font-name-asian="Segoe UI" style:font-name-complex="Tahoma"/>
    </style:style>
    <style:style style:name="T20" style:family="text">
      <style:text-properties officeooo:rsid="0062a038" style:font-name-asian="Segoe UI" style:font-name-complex="Tahoma"/>
    </style:style>
    <style:style style:name="T21" style:family="text">
      <style:text-properties officeooo:rsid="00e9dffe"/>
    </style:style>
    <style:style style:name="T22" style:family="text">
      <style:text-properties style:font-name-asian="Arial" style:font-name-complex="Arial"/>
    </style:style>
    <style:style style:name="T23" style:family="text">
      <style:text-properties officeooo:rsid="001b0d35" style:font-name-asian="Arial" style:font-name-complex="Arial"/>
    </style:style>
    <style:style style:name="T24" style:family="text">
      <style:text-properties style:font-name="Noto Sans1" fo:font-size="12pt" style:font-size-asian="12pt" style:font-size-complex="12pt"/>
    </style:style>
    <style:style style:name="T25" style:family="text">
      <style:text-properties style:font-name="Noto Sans1" fo:font-size="12pt" officeooo:rsid="00140ce0" style:font-size-asian="12pt" style:font-size-complex="12pt"/>
    </style:style>
    <style:style style:name="T26" style:family="text">
      <style:text-properties style:font-name="Noto Sans1" fo:font-size="12pt" officeooo:rsid="00d3cdeb" style:font-size-asian="12pt" style:font-size-complex="12pt"/>
    </style:style>
    <style:style style:name="T27" style:family="text">
      <style:text-properties style:font-name="Noto Sans1" fo:font-size="12pt" officeooo:rsid="0062a038" style:font-size-asian="12pt" style:font-size-complex="12pt"/>
    </style:style>
    <style:style style:name="T28" style:family="text">
      <style:text-properties style:font-name="Noto Sans1" fo:font-size="12pt" officeooo:rsid="00105638" style:font-size-asian="12pt" style:font-size-complex="12pt"/>
    </style:style>
    <style:style style:name="T29" style:family="text">
      <style:text-properties style:font-name="Noto Sans1" fo:font-size="12pt" fo:font-weight="normal" style:font-size-asian="12pt" style:font-weight-asian="normal" style:font-size-complex="12pt" style:font-weight-complex="normal"/>
    </style:style>
    <style:style style:name="T30" style:family="text">
      <style:text-properties style:font-name="Noto Sans1" fo:font-size="12pt" fo:font-weight="bold" officeooo:rsid="00105638" style:font-size-asian="12pt" style:font-weight-asian="bold" style:font-size-complex="12pt" style:font-weight-complex="bold"/>
    </style:style>
    <style:style style:name="T31" style:family="text">
      <style:text-properties officeooo:rsid="001056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Strong_20_Emphasis"><text:span text:style-name="T24">Le </text:span></text:span><text:span text:style-name="Strong_20_Emphasis"><text:span text:style-name="T25">i</text:span></text:span><text:span text:style-name="Strong_20_Emphasis"><text:span text:style-name="T24">dee </text:span></text:span><text:span text:style-name="Strong_20_Emphasis"><text:span text:style-name="T25">e</text:span></text:span><text:span text:style-name="Strong_20_Emphasis"><text:span text:style-name="T24"> </text:span></text:span><text:span text:style-name="Strong_20_Emphasis"><text:span text:style-name="T25">i</text:span></text:span><text:span text:style-name="Strong_20_Emphasis"><text:span text:style-name="T24">l </text:span></text:span><text:span text:style-name="Strong_20_Emphasis"><text:span text:style-name="T25">m</text:span></text:span><text:span text:style-name="Strong_20_Emphasis"><text:span text:style-name="T24">ondo </text:span></text:span><text:span text:style-name="Strong_20_Emphasis"><text:span text:style-name="T25">d</text:span></text:span><text:span text:style-name="Strong_20_Emphasis"><text:span text:style-name="T24">elle </text:span></text:span><text:span text:style-name="Strong_20_Emphasis"><text:span text:style-name="T25">i</text:span></text:span><text:span text:style-name="Strong_20_Emphasis"><text:span text:style-name="T24">dee </text:span></text:span><text:span text:style-name="Strong_20_Emphasis"><text:span text:style-name="T28">di Platone</text:span></text:span></text:p>
      <text:p text:style-name="P18">La teoria delle idee nasce in Platone a partire da un elemento introdotto dal suo maestro Socrate: egli ricercava infatti la verità nel <text:span text:style-name="T5">concetto</text:span><text:span text:style-name="T4"><text:note text:id="ftn49" text:note-class="footnote"><text:note-citation>1</text:note-citation><text:note-body><text:p text:style-name="P2">Un concetto filosofico è un'idea o una nozione che esprime i caratteri essenziali e costanti di una data realtà, che si forma afferrando insieme i vari aspetti di un determinato oggetto che alla mente preme aver presenti nel suo complesso. Nella filosofia antica, il concetto indicava l'essenza, ciò che rimane stabile al di là della mutevolezza del dato sensibile e della molteplicità delle apparenze, la realtà autentica e immutabile. In altre parole, un concetto filosofico è un'idea astratta che cerca di catturare l'essenza di una cosa, al di là delle sue manifestazioni superficiali.</text:p><text:p text:style-name="P4"/></text:note-body></text:note></text:span>, rifiutando di definire i valori umani con delle loro esemplificazioni (es.: il coraggio non si può definire con esempi di comportamenti coraggiosi). Questo concetto era ricercato a partire dalla domanda “che cos’è” (in greco tì ésti), e la sua conoscenza corrispondeva alla scienza (episteme, sophia). Da questo punto di partenza Platone elabora la dottrina delle idee in questo modo: “essendo convinto che ciò che conosciamo, cioè il pensiero/concetto nella nostra mente, è riflesso di qualcosa che esiste nella realtà, giunge a chiedersi cosa corrisponda al concetto nel mondo reale?”. <text:s/>Molti degli interlocutori di Socrate, nei dialoghi del primo periodo, erano caduti nell’errore di rispondere citando esempi del concetto che non corrispondevano mai al concetto stesso, perché il concetto è l’universale che contiene tutte le cose particolari; ma Platone sa che non può <text:soft-page-break/>trovare nel mondo dell’esperienza ciò che corrisponde all’universale, che definisce l’essenza delle cose. Giunge così a pensare che l’oggetto proprio della conoscenza, di cui il concetto è un riflesso in quanto pensiero dell’esistente, siano entità immutabili e perfette che esistono autonomamente dal mondo dell’esperienza, in un luogo chiamato “iperuranio” (letteralmente “al di là del cielo”): le idee. </text:p>
      <text:p text:style-name="P18">Queste idee sono ciò che il concetto conosce, di cui è riflesso, dunque esse esistono: Platone parla infatti delle idee come <text:span text:style-name="T7">ousía</text:span><text:span text:style-name="T15"><text:note text:id="ftn50" text:note-class="footnote"><text:note-citation>2</text:note-citation><text:note-body><text:p text:style-name="P3">L'ousìa è un termine greco che può essere tradotto come "essenza" o "sostanza". Platone utilizza indifferentemente i termini idea, ed ousìa per indicare la forma comune di tutti i concetti. L'idea platonica sottintende un'uniformità naturale, in cui alle diverse manifestazioni degli oggetti fa capo un'unica forma pura, o "idea", che le accomuna tutte, in maniera simile a un modello o un archetipo.</text:p></text:note-body></text:note></text:span>, cioè una sostanza o realtà autonoma con caratteristiche strutturali diverse dalle cose del mondo che conosciamo con l’esperienza.</text:p>
      <text:p text:style-name="P18">Ricapitolando, Platone elabora la dottrina delle idee, <text:span text:style-name="T6">seguendo questi passaggi</text:span><text:span text:style-name="T13">: </text:span><text:span text:style-name="T8">C</text:span><text:span text:style-name="T11">onoscenza/Scienza</text:span> = possesso del concetto → <text:span text:style-name="T11">Concetto</text:span> = contenuto mentale che riflette qualcosa che esiste → <text:span text:style-name="T11">Idea</text:span><text:span text:style-name="T8"> </text:span>= ciò che corrisponde al contenuto mentale.</text:p>
      <text:p text:style-name="P21">Una volta stabilita l’esistenza delle idee, Platone si trova a dover specificare <text:span text:style-name="T6">qual </text:span><text:span text:style-name="T16">è</text:span> il rapporto tra le idee e le cose: sintetizzando si può dire che secondo la dottrina delle idee, le cose del mondo imitano la perfezione delle <text:soft-page-break/>idee (mimesi)<text:note text:id="ftn51" text:note-class="footnote"><text:note-citation>3</text:note-citation><text:note-body><text:p text:style-name="P5">Termine con il quale Platone designa la somiglianza delle cose sensibili alle idee.</text:p></text:note-body></text:note>, partecipano all’esistenza delle idee perché le idee sono l’universale che contiene tutti i particolari (metessi)<text:note text:id="ftn52" text:note-class="footnote"><text:note-citation>4</text:note-citation><text:note-body><text:p text:style-name="P5">Dal greco “partecipazione”. Per Platone, le cose molteplici e mutevoli traggono l’elemento reale della loro natura dalla “presenza” delle idee in esse. </text:p></text:note-body></text:note>, e contengono le idee avendone alcuni degli attributi (parousìa)<text:note text:id="ftn53" text:note-class="footnote"><text:note-citation>5</text:note-citation><text:note-body><text:p text:style-name="P6">Il termine è usato in vari ambiti filosofici e teologici. Nella filosofia platonica la par<text:span text:style-name="T6">o</text:span>usìa indica la presenza nel mondo sensibile dell’essenza ideale. Nella teologia cristiana, la par<text:span text:style-name="T6">o</text:span>usìa indica il ritorno sulla terra di Gesù alla fine dei tempi.</text:p></text:note-body></text:note>. Sebbene idee e cose siano distinte e appartengano a due mondi diversi, con caratteristiche ontologiche differenti, il loro rapporto è strettissimo ed è duplice: causale e gnoseologico. Nel giudicare le cose del mondo facciamo riferimento alle idee (possiamo conoscere la sedia perché la sedia partecipa dell'idea di sedia<text:span text:style-name="T6">),</text:span> che figurano come criterio di giudizio delle cose (rapporto gnoseologico); inoltre, le cose che esistono sono a immagine delle idee perfette e astratte (la sedia partecipa dell'idea di sedia, che è la forma perfetta di sedi<text:span text:style-name="T6">a), </text:span>per cui le cose non esisterebbero senza le idee (rapporto causale).</text:p>
      <text:p text:style-name="P18">Platone sostiene che le idee sono la realtà autentica, mentre le cose sono solo delle ombre della realtà. Le cose sono reali solo in quanto partecipano delle ide<text:span text:style-name="T6">e.</text:span></text:p>
      <text:p text:style-name="P13"><text:span text:style-name="Strong_20_Emphasis"><text:span text:style-name="T24"/></text:span></text:p>
      <text:p text:style-name="P13"><text:soft-page-break/><text:span text:style-name="Strong_20_Emphasis"><text:span text:style-name="T24">L’uomo e la conoscenza secondo la dottrina delle idee</text:span></text:span></text:p>
      <text:p text:style-name="P19">Nel momento in cui Platone elabora la dottrina delle idee compie una separazione tra il mondo materiale e il mondo delle idee, che si trova oltre il cielo, tale da sconvolgere tutti gli assunti della filosofia precedente e da condizionare il pensiero occidentale per sempre. Analizzando i gradi di conoscenza che Platone teorizza rispetto alla conoscenza delle cose e alla conoscenza delle idee, si vede infatti che il mondo delle idee sembra avere una consistenza ontologica maggiore, cioè che le idee esistono di più delle cose e che la realtà in cui viviamo la nostra vita è potenzialmente un sogno. <text:span text:style-name="T6">Un’</text:span>altra faccia di una vita più autentica, lontana da quello che crediamo essere la realtà. Questa idea sembra a primo a<text:span text:style-name="T17">c</text:span>chito del tutto insensata, ma studiando la filosofia ci si può accorgere della sua fondatezza, nonostante sia difficile da accettare; essa risulta inoltre di grande ispirazione per le teorie filosofiche legate alla diffusione del cristianesimo. </text:p>
      <text:p text:style-name="P20">Per spiegare la conoscenza dell’uomo di questi due mondi, nel libro VI della Repubblica Platone ci propone la teoria della linea, che rappresenta la completa formulazione della sua teoria della conoscenza. Alla base di questa teoria si trova per l’appunto la sostanziale e insanabile differenza tra il mondo sensibile <text:soft-page-break/>oggetto di opinione e il mondo intelligibile o mondo delle idee oggetto di verità. Questi due gradi di conoscenza sono articolati in ulteriori due stadi, dividendo la linea già spezzata a metà in 4 parti.</text:p>
      <text:p text:style-name="P18"><draw:frame draw:style-name="fr1" draw:name="Immagine5" text:anchor-type="char" svg:x="0.399cm" svg:y="0.291cm" svg:width="10.541cm" svg:height="1.852cm" draw:z-index="0"><draw:image xlink:href="Pictures/10000000000001F700000046B7659227.jpg" xlink:type="simple" xlink:show="embed" xlink:actuate="onLoad" draw:mime-type="image/jpeg"/></draw:frame></text:p>
      <text:p text:style-name="P15"><text:span text:style-name="Strong_20_Emphasis"><text:span text:style-name="T28">Opinione</text:span></text:span><text:span text:style-name="T24"> (doxa) conoscenza del mondo sensibile </text:span><text:span text:style-name="T26">(A-C)</text:span></text:p>
      <text:p text:style-name="P15"><text:span text:style-name="T24">1.1 </text:span><text:span text:style-name="T30">Immaginazione</text:span><text:span text:style-name="T24"> (eikasia) conoscenza della manifestazione degli oggetti visibili tramite ombre, riflessi, illusioni ottiche, proiezioni. </text:span><text:span text:style-name="T26">(A-B)</text:span></text:p>
      <text:p text:style-name="P15"><text:span text:style-name="T24">1.2 </text:span><text:span text:style-name="T30">Credenza</text:span><text:span text:style-name="T24"> (pistis) conoscenza degli oggetti veri e propri cioè le cose, gli animali, gli elementi naturali, gli altri uomini… </text:span><text:span text:style-name="T26">(B-C)</text:span></text:p>
      <text:p text:style-name="P15"><text:span text:style-name="Strong_20_Emphasis"><text:span text:style-name="T28">Scienza</text:span></text:span><text:span text:style-name="T24">(episteme)conoscenza del mondo delle idee</text:span><text:span text:style-name="T26">(C-E)</text:span></text:p>
      <text:p text:style-name="P15"><text:span text:style-name="T24">2.1 </text:span><text:span text:style-name="T30">Ragione discorsiva</text:span><text:span text:style-name="T24"> (dianoia) conoscenza delle idee matematiche e delle verità raggiunte per astrazione (la geometria e le scienze) </text:span><text:span text:style-name="T26">(C-D)</text:span></text:p>
      <text:p text:style-name="P15"><text:span text:style-name="T24">2.2 </text:span><text:span text:style-name="T30">Intellezione</text:span><text:span text:style-name="T24"> (noesis) conoscenza delle idee valori, raggiunte per mezzo dell’intuizione e della filosofia </text:span><text:span text:style-name="T26">(D-E)</text:span></text:p>
      <text:p text:style-name="P15"><text:span text:style-name="T1">In questa teoria l’ultimo dei 4 stadi è il più alto, è la conoscenza che giunge alla verità, direttamente alle </text:span><text:soft-page-break/><text:span text:style-name="T1">idee; difatti per quanto la ragione discorsiva astragga dal mondo sensibile, lo usa comunque come punto di partenza (il punto, la linea ecc.) per giungere a ipotesi astratte indimostrabili secondo Platone. La conoscenza raggiunta dalla filosofia è invece quella che giunge ai principi supremi: le idee del Bene, della Giustizia che hanno riscontro nei problemi dell’uomo e della città.</text:span></text:p>
      <text:p text:style-name="P15"><text:span text:style-name="T1">Quando Platone elabora la dottrina delle idee vuole giungere alla teorizzazione di una verità assoluta e con grande originalità riesce a farlo immaginando qualcosa che sfugga completamente, stando addirittura in un altro luogo, all’imperfezione del mondo sensibile in cui tutto è dicibile e in cui il relativismo sofistico non risulta ancora sconfitto. Ma se il mondo delle idee è così lontano dal mondo sensibile per la sua diversità, resta da capire come l’uomo possa conoscerlo senza compiere alcun viaggio nell’iperuranio. Nei tre dialoghi </text:span><text:span text:style-name="Strong_20_Emphasis"><text:span text:style-name="T1">Menone, Fedone, Fedro</text:span></text:span><text:span text:style-name="T1"> si trovano le argomentazioni che nell’insieme danno consistenza alla teoria della conoscenza delle idee. Il presupposto di tale teoria è nell’immortalità dell’anima, già assunta dalla credenza orfico-pitagorica della metempsicosi</text:span><text:span text:style-name="T1"><text:note text:id="ftn54" text:note-class="footnote"><text:note-citation>6</text:note-citation><text:note-body><text:p text:style-name="P1">La credenza orfico-pitagorica della metempsicosi è una dottrina religiosa che sostiene che dopo la morte, l'anima trasmigra da un corpo all'altro fino a quando non si libera completamente dalla materia. Questa dottrina ha origine nell'antica India ed è stata accettata e perfezionata dal buddismo. In Occidente, la dottrina della metempsicosi si ritrova nella religione mistica degli orfici, da cui è poi passata nella filosofia greca. Secondo questa dottrina, la metempsicosi non termina con l'annientamento dell'individualità umana, come nel buddismo, ma con il trionfo completo dello spirito sulla materia. </text:p></text:note-body></text:note></text:span><text:span text:style-name="T1"> o trasmigrazione </text:span><text:soft-page-break/><text:span text:style-name="T1">delle anime; sulla base di questo presupposto si può pensare che l’anima viva nel mondo delle idee prima di calarsi nel corpo che ha vita nel mondo sensibile. Una volta discesa nel mondo sensibile, l’anima conserva un ricordo sopito di ciò che ha veduto, che si risveglia via via che si fa esperienza delle cose, delle verità e dei valori cui corrispondono le idee nell’iperuranio. Per questo Platone afferma che “conoscere è ricordare”, dando alla sua gnoseologia il carattere di innatismo</text:span><text:span text:style-name="T1"><text:note text:id="ftn55" text:note-class="footnote"><text:note-citation>7</text:note-citation><text:note-body><text:p text:style-name="P1">L'innatismo è una teoria filosofica che sostiene che alcune conoscenze sono innate, ovvero presenti nella mente di una persona fin dalla nascita. Secondo questa teoria, esistono nozioni e concetti che non vengono appresi tramite l'esperienza, ma sono già presenti nella mente. Un esempio classico di innatismo è la teoria dell'anamnesi di Platone, che sostiene che l'uomo possiede tutti i concetti prima dell'esperienza e che l'esperienza si limita a stimolarne il ricordo. Nel pensiero moderno, l'innatismo è stato riformulato in modo da considerare come innate solo le capacità di organizzazione dei dati di esperienza. </text:p></text:note-body></text:note></text:span><text:span text:style-name="T1">, sostenendo cioè che l’uomo possiede delle conoscenze connaturate all’intelletto, che non hanno bisogno di esperienza sensibile per nascere. In questo modo la maieutica di Socrate subisce una radicalizzazione metafisica, poiché ciò che viene “tirato fuori” è una verità assoluta e incontrovertibile, realmente situata nell’uomo come riflesso di idee perfette.</text:span></text:p>
      <text:p text:style-name="P21">Uno dei passaggi più famosi di tutta l'opera di Platone, anzi di tutta la filosofia, si trova a metà del <text:span text:style-name="T8">Menone</text:span>. <text:soft-page-break/>Menone chiede a Socrate se può dimostrare la verità della sua strana affermazione secondo cui "tutto l'apprendimento è ricordo" (un'affermazione che Socrate collega all'idea della reincarnazione). Socrate risponde chiamando a sé un ragazzo schiavo e, dopo aver accertato che non ha avuto alcuna formazione matematica, gli sottopone un problema di geometria.</text:p>
      <text:p text:style-name="P8">Al ragazzo viene chiesto come raddoppiare l'area di un quadrato. La sua prima risposta sicura è che puoi ottenere questo risultato raddoppiando la lunghezza dei lati. Socrate gli mostra che questo, in effetti, crea un quadrato quattro volte più grande dell'originale. Il ragazzo allora suggerisce di allungare i lati della metà della loro lunghezza. Socrate sottolinea che questo trasformerebbe un quadrato 2x2 (area = 4) in un quadrato 3x3 (area = 9). A questo punto il ragazzo si arrende e si dichiara perplesso. Socrate poi lo guida attraverso semplici domande passo dopo passo fino alla risposta corretta, che consiste nell'utilizzare la diagonale del quadrato originale come base per il nuovo quadrato.</text:p>
      <text:p text:style-name="P9">Secondo Socrate, la capacità del ragazzo di raggiungere la verità e di riconoscerla come tale dimostra che egli aveva già dentro di sé questa conoscenza; le domande che gli furono poste semplicemente "lo agitarono", rendendogli più facile ricordarlo. Egli sostiene inoltre che, poiché il ragazzo non ha acquisito tale conoscenza <text:soft-page-break/>in questa vita, deve averla acquisita in un momento precedente; infatti, dice Socrate, deve averlo sempre saputo, il che indica che l'anima è immortale. Del resto, ciò che è stato dimostrato per la geometria vale anche per ogni altra branca della conoscenza: l'anima, in un certo senso, possiede già la verità su tutte le cose.</text:p>
      <text:p text:style-name="P9">A proposito dell’anima e del suo rapportarsi alle idee, Platone elabora la dottrina delle idee pensando a una forza che la conduce a conoscerle; non solo il ricordo dunque, ma anche una forza che spinge e attrae l’anima verso le idee: essa è l’amore.</text:p>
      <text:p text:style-name="P11"><text:span text:style-name="T24">Nei dialoghi </text:span><text:span text:style-name="Strong_20_Emphasis"><text:span text:style-name="T24">Convito e Fedro</text:span></text:span><text:span text:style-name="T24">, si parla rispettivamente dell’oggetto di amore, individuato nella bellezza, e dell’amore come aspirazione alla bellezza che conduce alle idee. L’amore è descritto come una spinta rivolta a qualcosa che non si possiede, ma di cui si sente il bisogno, a un bene che rende felici, individuato da Platone nella bellezza. Dalla bellezza del corpo nata nel mondo sensibile l’uomo passa all’amore della bellezza corporea in generale, da questa passa alla bellezza dell’anima, poi alla bellezza delle istituzioni e poi alla bellezza delle scienze. Infine, l’amore filosofico giunge al di sopra di tutto, all’Idea di Bellezza in sé che è eterna, perfetta e sempre uguale a se stessa, fonte di ogni altra bellezza. Si vede come l’idea della bellezza ha una funzione fondamentale nel fare </text:span><text:span text:style-name="T27">da</text:span><text:span text:style-name="T24"> mediatrice tra </text:span><text:soft-page-break/><text:span text:style-name="T24">l’uomo e le idee: alla sua vista nel mondo delle apparenze l’uomo risponde con amore, dando avvio al processo che può condurlo fino al mondo delle idee, cui giunge evidentemente solo il filosofo.</text:span></text:p>
      <text:p text:style-name="P10"><text:span text:style-name="Strong_20_Emphasis"><text:span text:style-name="T25">D</text:span></text:span><text:span text:style-name="Strong_20_Emphasis"><text:span text:style-name="T24">al mondo delle idee alla società giusta</text:span></text:span></text:p>
      <text:p text:style-name="P14"><text:span text:style-name="T24">Dei 5 dialoghi della maturità, la Repubblica rappresenta una specie di compendio in cui Platone elabora la dottrina delle idee in modo compiuto, connettendo tutti i temi fino ad ora esposti alla teorizzazione della comunità perfetta. Come abbiamo più volte specificato, l’interesse di Platone per la pratica filosofica ha profonde radici nel contesto storico politico che egli vive in prima persona, di fronte al quale egli si era convinto che “il genere umano non sarebbe mai stato liberato dal male, se prima non fossero giunti al potere i veri filosofi o se i reggitori di Stato non fossero, per sorte divina, diventati veramente filosofi” (dalla Lettera VII). Nel dialogo “Repubblica” la </text:span><text:span text:style-name="Strong_20_Emphasis"><text:span text:style-name="T24">comunità perfetta</text:span></text:span><text:span text:style-name="T24"> prende forma e viene descritta a partire dal suo </text:span><text:span text:style-name="Strong_20_Emphasis"><text:span text:style-name="T29">scopo</text:span></text:span><text:span text:style-name="T24">: </text:span><text:span text:style-name="Strong_20_Emphasis"><text:span text:style-name="T24">la realizzazione della giustizia</text:span></text:span><text:span text:style-name="T24">. Perché la giustizia si realizzi nella teoria politica di Platone, è sufficiente che ogni uomo eserciti il proprio compito in base alla classe sociale di appartenenza; essa non è determinata dalla nascita, ma dalla propria anima. Nel dialogo viene descritta la tripartizione dell’anima e insieme ad essa vengono specificate le virtù principali dell’uomo: </text:span><text:soft-page-break/><text:span text:style-name="T24">secondo Platone esiste nell’individuo una predisposizione personale, un’indole, per cui una parte dell’anima predomina sulle altre, questo lo porta ad appartenere a una classe piuttosto che a un’altra. Vediamo la tripartizione dell’anima:</text:span></text:p>
      <text:p text:style-name="P16"><text:span text:style-name="Strong_20_Emphasis"><text:span text:style-name="T28">Parte Razionale</text:span></text:span><text:span text:style-name="Strong_20_Emphasis"><text:span text:style-name="T24">:</text:span></text:span><text:span text:style-name="T24"> quella per cui l’anima ragiona e domina gli impulsi, vi corrisponde la saggezza; <text:s/></text:span></text:p>
      <text:p text:style-name="P16"><text:span text:style-name="Strong_20_Emphasis"><text:span text:style-name="T28">Parte Concupiscibile:</text:span></text:span><text:span text:style-name="T24"> è il principio di tutti gli impulsi corporei, la virtù che permette l’equilibrio è la temperanza;</text:span></text:p>
      <text:p text:style-name="P13"><text:span text:style-name="Strong_20_Emphasis"><text:span text:style-name="T28">Parte Irascibile</text:span></text:span><text:span text:style-name="T24">: è ausiliaria del principio razionale e si sdegna lottando per ciò che la ragione ritiene giusto, le appartiene il coraggio.</text:span></text:p>
      <text:p text:style-name="P16"><text:span text:style-name="T24">Richiamandosi di nuovo all’immortalità dell’anima e alla trasmigrazione, Platone spiega la disposizione personale dell’individuo con il </text:span><text:span text:style-name="Strong_20_Emphasis"><text:span text:style-name="T24">mito di Er</text:span></text:span><text:span text:style-name="T24"> alla fine del dialogo, dicendo che ogni anima sceglie tale disposizione prima di incarnarsi. Per descrivere la società giusta Platone stabilisce una corrispondenza precisa tra tipo di anima, virtù, classe sociale e compito corrispondente, ripartito come segue:</text:span></text:p>
      <text:p text:style-name="P21"><text:span text:style-name="T12">Anima</text:span><text:span text:style-name="T9"><text:tab/><text:tab/> </text:span><text:span text:style-name="T12">Virtù</text:span><text:span text:style-name="T9"><text:tab/><text:tab/><text:tab/></text:span><text:span text:style-name="T12">Classe Sociale</text:span></text:p>
      <text:p text:style-name="P23">Concupiscibile <text:s/><text:span text:style-name="T22">→<text:tab/> Temperanza <text:s/>→<text:tab/> Produttori</text:span></text:p>
      <text:p text:style-name="P25">Irascibile<text:tab/>→<text:tab/> Coraggio<text:tab/>→<text:tab/> Guerrieri</text:p>
      <text:p text:style-name="P25">Razionale<text:tab/>→<text:tab/> Saggezza<text:tab/>→<text:tab/> Governanti</text:p>
      <text:p text:style-name="P19"><text:soft-page-break/>Siccome all’idea di Giustizia appartengono tutte e tre le virtù, essa si realizza quando ciascun cittadino attende al suo compito, contribuendo con la sua attività alla vita della comunità. Allo stesso modo, considerando che in ogni individuo l’anima è divisa nelle tre parti, la giustizia nell’uomo si realizza quando ognuna delle tre parti dell’anima compie la propria funzione in equilibrio con le altre. Platone crea una corrispondenza tra la giustizia della comunità e la giustizia del singolo individuo, stabilendo che solo se l’individuo è in equilibrio con se stesso sarà in comunione con la sua comunità, rispettando l’ordine delle cose e contribuendo alla giustizia. In conclusione egli afferma: la Giustizia è nell’unità dello Stato e nell’equilibrio dell’individuo. Affinché lo Stato funzioni bene e la giustizia sia realizzata, Platone suggerisce l’eliminazione della proprietà privata e la comunanza dei beni per la classe superiore; alla classe dei governanti è riservata dunque la comunanza dei beni così come l’assenza di ricchezze e di una propria famiglia, perché possa gestire la cosa pubblica al di là dei propri interessi.</text:p>
      <text:p text:style-name="P20">In questa descrizione della società perfetta, Platone concepisce una utopia di stampo aristocratico (il potere politico ai migliori), consapevole del fatto che uno Stato del genere non esiste in nessun luogo sulla terra, ma vuole che esso rappresenti un modello ideale sulla cui <text:soft-page-break/>base migliorare gli stati esistenti. Allo stato ideale corrispondono per Platone tre possibili degenerazioni, di cui probabilmente egli ha fatto esperienza nella realtà, confermando la sua teoria per cui il mondo sensibile è una derivazione imperfetta del mondo ideale; ad ogni degenerazione della forma politica ne corrisponde una del singolo, che avviene nel momento in cui l’anima non è più in equilibrio e un aspetto predomina sugli altri.</text:p>
      <text:p text:style-name="P18"><text:span text:style-name="T8">Timocrazia</text:span>: governo fondato sull’onore, nasce quando i governanti si appropriano di terre e di case → uomo timocratico, ambizioso, amante del potere e diffidente verso i sapienti;</text:p>
      <text:p text:style-name="P18"><text:span text:style-name="T8">Oligarchia</text:span>: governo fondato sul censo<text:note text:id="ftn56" text:note-class="footnote"><text:note-citation>8</text:note-citation><text:note-body><text:p text:style-name="P1">Il censo è un termine che può avere diversi significati. In generale, il censo si riferisce al patrimonio o alla ricchezza di una persona o di una famiglia. In Roma antica, il censo era la compilazione delle liste dei cittadini e la registrazione dei loro averi, operazioni affidate a magistrati speciali detti censori. Nel medioevo e nell'età moderna, il censo poteva anche riferirsi a <text:span text:style-name="T6">vari</text:span> tributi feudali. </text:p></text:note-body></text:note>, in cui il potere è riservato ai più ricchi → uomo oligarchico avido di ricchezze;</text:p>
      <text:p text:style-name="P18"><text:span text:style-name="T8">Democrazia</text:span>: stato in cui tutti i cittadini sono liberi → uomo democratico che tende ad abbandonarsi ai piaceri smodati in assenza di regole;</text:p>
      <text:p text:style-name="P18"><text:span text:style-name="T10">Tirannide</text:span><text:span text:style-name="T18">: conseguenza della democrazia </text:span><text:span text:style-name="T23">→</text:span><text:span text:style-name="T19"> uomo che prima si schiera a difen</text:span><text:span text:style-name="T20">s</text:span><text:span text:style-name="T19">ore del popolo, poi prende il potere e schiaccia il popolo per i suoi interessi.</text:span></text:p>
      <text:p text:style-name="P21"><text:soft-page-break/>La più bassa di tutte le forme di governo è la tirannide, che spesso nasce dall’eccessiva libertà della democrazia; il tiranno è l’unico ad avere il potere e dovendo difendersi dall’odio dei cittadini si circonda degli uomini peggiori.</text:p>
      <text:p text:style-name="P18">Vista l’importanza data all’equilibrio dell’individuo e al riflesso che questo ha sull’intera comunità per la realizzazione delle Giustizia, nella Repubblica Platone dedica tantissimo spazio all’educazione del singolo, che pure nella sofistica ha un ruolo decisamente centrale, <text:span text:style-name="T13">paidéia</text:span><text:span text:style-name="T13"><text:note text:id="ftn57" text:note-class="footnote"><text:note-citation>9</text:note-citation><text:note-body><text:p text:style-name="P1">Paidéia è un termine che nell'antica Grecia denotava il modello pedagogico in vigore ad Atene nel V secolo a.C., riferendosi non solo all'istruzione scolastica dei fanciulli, ma anche al loro sviluppo etico e spirituale al fine di renderli cittadini perfetti e completi, una forma elevata di cultura in grado di guidare il loro inserimento armonico nella società. </text:p></text:note-body></text:note></text:span>. In particolare la classe sociale cui è attribuita maggiore responsabilità nella realizzazione della comunità giusta è quella dei governanti che, non essendo sottoposti all’approvazione popolare, sono i custodi di questa stessa giustizia e responsabili del dominio di sé per evitare di perseguire il proprio tornaconto. Alla predisposizione personale di coloro che appartengono alle classi dei governanti e dei guerrieri, Platone affianca una educazione al sapere e alla virtù che rappresenta la garanzia della realizzazione della giustizia; tale educazione coincide con l’educazione alla filosofia. Per questo, governanti e guerrieri avranno maestri in grado di guidarli lungo la linea della <text:soft-page-break/>conoscenza, per elevarsi, anche grazie alla loro indole, dalla conoscenza del mondo sensibile alla verità del mondo delle idee. Come nel caso della spiegazione dell’immortalità dell’anima e dell’indole dell’individuo. (mito di Er)</text:p>
      <text:p text:style-name="P18">Platone ricorre a un’esemplificazione allegorica di questo processo di accesso alla conoscenza nel celebre mito della caverna, fondamentale per comprendere, al di là delle dimostrazioni razionali, il rapporto tra la realtà delle cose e il mondo delle idee. <text:s/></text:p>
      <text:p text:style-name="P24">Quando si vede un’ombra, di certo si pensa che sia causata dalla presenza di qualcosa. Si scorge l’ombra di un animale, forse è un cavallo, ma non si è sicuri. Così, ci si volta indietro e si vede il vero cavallo che naturalmente è molto più bello e più definito dell’instabile “ombra del cavallo”.</text:p>
      <text:p text:style-name="P18"><text:span text:style-name="T21">Analogamente, secondo Platone, </text:span><text:span text:style-name="T2">tutti i fenomeni in natura sono solo ombre delle forme (o idee). </text:span><text:span text:style-name="T3">Eppure</text:span><text:span text:style-name="T2"> </text:span><text:span text:style-name="T3">molti</text:span><text:span text:style-name="T2"> </text:span><text:span text:style-name="T3">individui sono soddisfatti della loro vita tra le ombre e non pensano che debba esistere qualcosa che le produca. </text:span></text:p>
      <text:p text:style-name="P18"><text:span text:style-name="T3">Credendo che le ombre siano tutto quello che esiste, ci si dimentica che la propria anima è immortale. Quello che Platone descrive nel mito della caverna</text:span><text:span text:style-name="T3"><text:note text:id="ftn58" text:note-class="footnote"><text:note-citation>10</text:note-citation><text:note-body><text:p text:style-name="P7">Immagina che un gruppo di uomini sia vissuto fin dall’inizio in una caverna sotterran<text:span text:style-name="T6">e</text:span>a, collegata all’esterno da una galleria piuttosto lunga. Immagina che questi uomini seduti con la schiena verso l’apertura abbiano catene al collo alle gambe e sono nell’impossibilità di girarsi verso la luce. Alle loro spalle è acceso un gran fuoco il cui riverbero colpisce la parete di fondo della caverna, l’unica che gli uomini incatenati possono vedere. Tra loro ed il fuoco, c’è un muretto dietro il quale vanno e vengono uomini portando oggetti di vario tipo (statuette di uomini o di animali e altre cose di vario genere.) Gli oggetti sporgono al di sopra del muretto e la luce del fuoco fa sì che le loro ombre si proiettino sulla parete di fondo della caverna. Per gli uomini in catene, quelle ombre sono l’unica cosa esistente.</text:p></text:note-body></text:note></text:span><text:span text:style-name="T3"> è la via che </text:span><text:soft-page-break/><text:span text:style-name="T3">la filosofia segue per giungere alle idee che si trovano dietro i fenomeni naturali. Nel suo pensiero, Socrate venne ucciso dagli “abitanti della caverna” perché aveva osato criticare le rappresentazioni abituali, volendo mostrare la strada per giungere ad una vera conoscenza. In questo modo, il mito diventa l’immagine del coraggio della filosofia e della sua responsabilità pedagogica. <text:s/></text:span></text:p>
      <text:p text:style-name="P19">Concludendo la trattazione dei dialoghi platonici più importanti, in cui raggiungendo la maturità del suo pensiero, Platone elabora la dottrina delle idee, si vede come egli riesce nell’intento del ribaltamento totale della sofistica: l’idea è misura delle cose, la verità, misura dell’uomo viene affermat<text:span text:style-name="T6">a</text:span> a scapito della teoria sofistica per cui l’uomo è misura delle cose, l’uomo è misura della verità. </text:p>
      <text:p text:style-name="P22">Nella fase successiva della sua vita e del suo pensiero Platone si occuperà di sistemare una serie di contraddizioni e domande irrisolte che egli stesso, anche grazie al lavoro svolto con gli alunni <text:soft-page-break/>dell’Accademia, riscontra nei suoi dialoghi. Avremo così la terza e ultima fase del pensiero filosofico di Plato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Bahnschrift SemiBold" svg:font-family="'Bahnschrift 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6:20:44.310499176</meta:creation-date>
    <dc:date>2026-01-25T16:51:24.375180062</dc:date>
    <dc:creator>corrado tafaro</dc:creator>
    <meta:editing-duration>PT19M45S</meta:editing-duration>
    <meta:editing-cycles>3</meta:editing-cycles>
    <meta:generator>LibreOffice/24.2.7.2$Linux_X86_64 LibreOffice_project/420$Build-2</meta:generator>
    <meta:document-statistic meta:table-count="0" meta:image-count="1" meta:object-count="0" meta:page-count="17" meta:paragraph-count="56" meta:word-count="3576" meta:character-count="23237" meta:non-whitespace-character-count="19689"/>
  </office:meta>
</office:document-meta>
</file>