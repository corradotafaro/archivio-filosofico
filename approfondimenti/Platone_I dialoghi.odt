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c07241" officeooo:paragraph-rsid="00c07241"/>
    </style:style>
    <style:style style:name="P2" style:family="paragraph" style:parent-style-name="Footnote">
      <style:text-properties officeooo:rsid="00c11895" officeooo:paragraph-rsid="00c11895"/>
    </style:style>
    <style:style style:name="P3" style:family="paragraph" style:parent-style-name="Footnote">
      <style:paragraph-properties fo:text-align="justify" style:justify-single-word="false"/>
      <style:text-properties style:font-name="Liberation Serif"/>
    </style:style>
    <style:style style:name="P4" style:family="paragraph" style:parent-style-name="Footnote">
      <style:text-properties officeooo:rsid="00d1ce4c" officeooo:paragraph-rsid="00d1ce4c"/>
    </style:style>
    <style:style style:name="P5" style:family="paragraph" style:parent-style-name="Footnote">
      <style:paragraph-properties fo:text-align="justify" style:justify-single-word="false"/>
    </style:style>
    <style:style style:name="P6" style:family="paragraph" style:parent-style-name="Preformatted_20_Text">
      <style:paragraph-properties fo:margin-top="0.199cm" fo:margin-bottom="0cm" style:contextual-spacing="false" fo:line-height="115%" fo:text-align="justify" style:justify-single-word="false"/>
      <style:text-properties style:font-name="Noto Sans1" fo:font-size="12pt" officeooo:paragraph-rsid="000f34bf" style:font-size-asian="12pt" style:font-size-complex="12pt"/>
    </style:style>
    <style:style style:name="P7" style:family="paragraph" style:parent-style-name="Preformatted_20_Text">
      <style:paragraph-properties fo:margin-top="0.199cm" fo:margin-bottom="0cm" style:contextual-spacing="false" fo:line-height="115%" fo:text-align="center" style:justify-single-word="false" fo:break-before="page"/>
      <style:text-properties style:font-name="Noto Sans1" fo:font-size="12pt" fo:font-weight="bold" officeooo:rsid="000f34bf" officeooo:paragraph-rsid="000f34bf" style:font-size-asian="12pt" style:font-weight-asian="bold" style:font-size-complex="12pt" style:font-weight-complex="bold"/>
    </style:style>
    <style:style style:name="P8" style:family="paragraph" style:parent-style-name="Preformatted_20_Text">
      <style:paragraph-properties fo:margin-top="0.199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9"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2209" style:font-size-asian="12pt" style:font-size-complex="12pt"/>
    </style:style>
    <style:style style:name="P10" style:family="paragraph" style:parent-style-name="Quotations">
      <style:paragraph-properties fo:margin-top="0.4cm" fo:margin-bottom="0.4cm" style:contextual-spacing="false" fo:line-height="115%" fo:text-align="center" style:justify-single-word="false"/>
      <style:text-properties style:font-name="Noto Sans1" fo:font-size="12pt" officeooo:paragraph-rsid="000e2209" style:font-size-asian="12pt" style:font-size-complex="12pt"/>
    </style:style>
    <style:style style:name="P11" style:family="paragraph" style:parent-style-name="Quotations">
      <style:paragraph-properties fo:margin-top="0.199cm" fo:margin-bottom="0.199cm" style:contextual-spacing="false" fo:line-height="115%"/>
      <style:text-properties style:font-name="Noto Sans1" fo:font-size="12pt" officeooo:paragraph-rsid="000e2209" style:font-size-asian="12pt" style:font-size-complex="12pt"/>
    </style:style>
    <style:style style:name="P1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c07241" officeooo:paragraph-rsid="000e2209"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c07241" officeooo:paragraph-rsid="000e2209"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101cm" fo:margin-bottom="0cm" style:contextual-spacing="false" fo:line-height="115%" fo:text-align="center" style:justify-single-word="false"/>
      <style:text-properties style:font-name="Noto Sans1" fo:font-size="12pt" fo:font-style="normal" fo:font-weight="normal" officeooo:rsid="00c07241" officeooo:paragraph-rsid="000e2209"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cf0515" officeooo:paragraph-rsid="000e2209"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cdfc6b" officeooo:paragraph-rsid="000e2209"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cm" style:contextual-spacing="false" fo:line-height="115%" fo:text-align="center" style:justify-single-word="false"/>
      <style:text-properties style:font-name="Noto Sans1" fo:font-size="12pt" fo:font-style="italic" fo:font-weight="normal" officeooo:rsid="00c07241" officeooo:paragraph-rsid="000e2209" style:font-size-asian="12pt" style:font-style-asian="italic" style:font-weight-asian="normal" style:font-size-complex="12pt" style:font-style-complex="italic" style:font-weight-complex="normal"/>
    </style:style>
    <style:style style:name="P18" style:family="paragraph" style:parent-style-name="Standard">
      <style:paragraph-properties fo:margin-top="0cm" fo:margin-bottom="0cm" style:contextual-spacing="false" fo:line-height="115%" fo:text-align="center" style:justify-single-word="false"/>
      <style:text-properties style:font-name="Noto Sans1" fo:font-size="12pt" fo:font-style="italic" fo:font-weight="normal" officeooo:rsid="00c07241" officeooo:paragraph-rsid="000e2209" style:font-size-asian="12pt" style:font-style-asian="italic" style:font-weight-asian="normal" style:font-size-complex="12pt" style:font-style-complex="italic" style:font-weight-complex="normal"/>
    </style:style>
    <style:style style:name="P19" style:family="paragraph" style:parent-style-name="Standard">
      <style:paragraph-properties fo:margin-top="0.3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20"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21"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22" style:family="paragraph" style:parent-style-name="Standard">
      <style:paragraph-properties fo:margin-top="0cm" fo:margin-bottom="0cm" style:contextual-spacing="false" fo:line-height="115%" fo:text-align="justify" style:justify-single-word="false"/>
      <style:text-properties style:font-name="Noto Sans1" fo:font-size="12pt" officeooo:rsid="00cdfc6b" officeooo:paragraph-rsid="000e2209" style:font-size-asian="12pt" style:font-size-complex="12pt"/>
    </style:style>
    <style:style style:name="P23" style:family="paragraph" style:parent-style-name="Standard">
      <style:paragraph-properties fo:margin-top="0.199cm" fo:margin-bottom="0cm" style:contextual-spacing="false" fo:line-height="115%" fo:text-align="justify" style:justify-single-word="false"/>
      <style:text-properties style:font-name="Noto Sans1" fo:font-size="12pt" officeooo:rsid="00cdfc6b" officeooo:paragraph-rsid="000e2209" style:font-size-asian="12pt" style:font-size-complex="12pt"/>
    </style:style>
    <style:style style:name="P24" style:family="paragraph" style:parent-style-name="Standard">
      <style:paragraph-properties fo:margin-top="0.101cm" fo:margin-bottom="0cm" style:contextual-spacing="false" fo:line-height="115%" fo:text-align="justify" style:justify-single-word="false"/>
      <style:text-properties style:font-name="Noto Sans1" fo:font-size="12pt" officeooo:rsid="00cdfc6b" officeooo:paragraph-rsid="000e2209" style:font-size-asian="12pt" style:font-size-complex="12pt"/>
    </style:style>
    <style:style style:name="P25" style:family="paragraph" style:parent-style-name="Standard">
      <style:paragraph-properties fo:margin-top="0.101cm" fo:margin-bottom="0cm" style:contextual-spacing="false" fo:line-height="115%" fo:text-align="justify" style:justify-single-word="false"/>
      <style:text-properties style:font-name="Noto Sans1" fo:font-size="12pt" officeooo:rsid="00cf0515" officeooo:paragraph-rsid="000e2209" style:font-size-asian="12pt" style:font-size-complex="12pt"/>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ize="12pt" officeooo:rsid="00c36a79" officeooo:paragraph-rsid="000e2209" style:font-size-asian="12pt" style:font-size-complex="12pt"/>
    </style:style>
    <style:style style:name="P27" style:family="paragraph" style:parent-style-name="Text_20_body" style:list-style-name="List_20_1">
      <style:paragraph-properties fo:margin-top="0cm" fo:margin-bottom="0cm" style:contextual-spacing="false" fo:line-height="115%" fo:text-align="justify" style:justify-single-word="false"/>
      <style:text-properties style:font-name="Noto Sans1" fo:font-size="12pt" officeooo:paragraph-rsid="000f34bf" style:font-size-asian="12pt" style:font-size-complex="12pt"/>
    </style:style>
    <style:style style:name="P28" style:family="paragraph" style:parent-style-name="Text_20_body" style:list-style-name="List_20_1" style:master-page-name="">
      <loext:graphic-properties draw:fill="none"/>
      <style:paragraph-properties fo:margin-left="0.3cm" fo:margin-right="0cm" fo:margin-top="0cm" fo:margin-bottom="0cm" style:contextual-spacing="false" fo:line-height="115%" fo:text-align="justify" style:justify-single-word="false" fo:text-indent="-0.4cm" style:auto-text-indent="false" style:page-number="auto" fo:background-color="transparent"/>
      <style:text-properties style:font-name="Noto Sans1" fo:font-size="12pt" officeooo:paragraph-rsid="000f34bf" style:font-size-asian="12pt" style:font-size-complex="12pt"/>
    </style:style>
    <style:style style:name="P29" style:family="paragraph" style:parent-style-name="Text_20_body" style:list-style-name="List_20_1">
      <loext:graphic-properties draw:fill="none"/>
      <style:paragraph-properties fo:margin-left="0.3cm" fo:margin-right="0cm" fo:margin-top="0cm" fo:margin-bottom="0cm" style:contextual-spacing="false" fo:line-height="115%" fo:text-align="justify" style:justify-single-word="false" fo:text-indent="-0.4cm" style:auto-text-indent="false" fo:background-color="transparent"/>
      <style:text-properties style:font-name="Noto Sans1" fo:font-size="12pt" officeooo:paragraph-rsid="000f34bf" style:font-size-asian="12pt" style:font-size-complex="12pt"/>
    </style:style>
    <style:style style:name="P30" style:family="paragraph" style:parent-style-name="Text_20_body" style:list-style-name="List_20_1">
      <loext:graphic-properties draw:fill="none"/>
      <style:paragraph-properties fo:margin-left="-0.101cm" fo:margin-right="0cm" fo:margin-top="0cm" fo:margin-bottom="0.25cm" style:contextual-spacing="false" fo:line-height="115%" fo:text-align="justify" style:justify-single-word="false" fo:text-indent="0cm" style:auto-text-indent="false" fo:background-color="transparent"/>
      <style:text-properties style:font-name="Noto Sans1" fo:font-size="12pt" officeooo:paragraph-rsid="000f34bf" style:font-size-asian="12pt" style:font-size-complex="12pt"/>
    </style:style>
    <style:style style:name="P31" style:family="paragraph" style:parent-style-name="Text_20_body" style:list-style-name="List_20_1">
      <loext:graphic-properties draw:fill="none"/>
      <style:paragraph-properties fo:margin-left="-0.101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paragraph-rsid="000f34bf" style:font-size-asian="12pt" style:font-size-complex="12pt"/>
    </style:style>
    <style:style style:name="P32" style:family="paragraph" style:parent-style-name="Text_20_body" style:list-style-name="List_20_1">
      <style:paragraph-properties fo:margin-top="0.101cm" fo:margin-bottom="0.25cm" style:contextual-spacing="false" fo:line-height="115%" fo:text-align="justify" style:justify-single-word="false"/>
      <style:text-properties style:font-name="Noto Sans1" fo:font-size="12pt" officeooo:paragraph-rsid="000f34bf" style:font-size-asian="12pt" style:font-size-complex="12pt"/>
    </style:style>
    <style:style style:name="P33" style:family="paragraph" style:parent-style-name="Text_20_body">
      <style:paragraph-properties fo:margin-top="0.199cm" fo:margin-bottom="0cm" style:contextual-spacing="false" fo:line-height="115%" fo:text-align="justify" style:justify-single-word="false"/>
      <style:text-properties style:font-name="Noto Sans1" fo:font-size="12pt" officeooo:paragraph-rsid="000f34bf" style:font-size-asian="12pt" style:font-size-complex="12pt"/>
    </style:style>
    <style:style style:name="P34" style:family="paragraph" style:parent-style-name="Text_20_body">
      <style:paragraph-properties fo:margin-top="0cm" fo:margin-bottom="0cm" style:contextual-spacing="false" fo:line-height="115%" fo:text-align="justify" style:justify-single-word="false"/>
      <style:text-properties style:font-name="Noto Sans1" fo:font-size="12pt" officeooo:paragraph-rsid="000f34bf" style:font-size-asian="12pt" style:font-size-complex="12pt"/>
    </style:style>
    <style:style style:name="P35" style:family="paragraph" style:parent-style-name="Text_20_body">
      <style:paragraph-properties fo:line-height="115%" fo:text-align="justify" style:justify-single-word="false"/>
      <style:text-properties style:font-name="Noto Sans1" fo:font-size="12pt" officeooo:paragraph-rsid="000f34bf" style:font-size-asian="12pt" style:font-size-complex="12pt"/>
    </style:style>
    <style:style style:name="P36" style:family="paragraph" style:parent-style-name="Text_20_body">
      <style:paragraph-properties fo:margin-top="0.3cm" fo:margin-bottom="0.25cm" style:contextual-spacing="false" fo:line-height="115%" fo:text-align="justify" style:justify-single-word="false"/>
      <style:text-properties style:font-name="Noto Sans1" officeooo:paragraph-rsid="000f34bf"/>
    </style:style>
    <style:style style:name="T1" style:family="text">
      <style:text-properties fo:font-size="12pt" style:font-size-asian="12pt" style:font-size-complex="12pt"/>
    </style:style>
    <style:style style:name="T2" style:family="text">
      <style:text-properties fo:font-size="12pt" officeooo:rsid="00611516" style:font-size-asian="12pt" style:font-size-complex="12pt"/>
    </style:style>
    <style:style style:name="T3" style:family="text">
      <style:text-properties fo:font-size="12pt" officeooo:rsid="00c9bec0" style:font-size-asian="12pt" style:font-size-complex="12pt"/>
    </style:style>
    <style:style style:name="T4" style:family="text">
      <style:text-properties fo:font-size="12pt" officeooo:rsid="00ca737c" style:font-size-asian="12pt" style:font-size-complex="12pt"/>
    </style:style>
    <style:style style:name="T5" style:family="text">
      <style:text-properties fo:font-size="12pt" officeooo:rsid="0062a038" style:font-size-asian="12pt" style:font-size-complex="12pt"/>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dbf98"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cf0515"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370240"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c36a79"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c839be"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d8390b"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c9bec0"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c07241"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cccd85" style:font-size-asian="12pt" style:font-style-asian="normal" style:font-weight-asian="normal" style:font-size-complex="12pt" style:font-style-complex="normal" style:font-weight-complex="normal"/>
    </style:style>
    <style:style style:name="T16" style:family="text">
      <style:text-properties fo:font-size="12pt" fo:font-style="italic" fo:font-weight="normal" officeooo:rsid="00c07241" style:font-size-asian="12pt" style:font-style-asian="italic" style:font-weight-asian="normal" style:font-size-complex="12pt" style:font-style-complex="italic"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style:font-size-asian="12pt" style:font-size-complex="12pt"/>
    </style:style>
    <style:style style:name="T19" style:family="text">
      <style:text-properties officeooo:rsid="00611516" style:font-size-asian="12pt" style:font-size-complex="12pt"/>
    </style:style>
    <style:style style:name="T20" style:family="text">
      <style:text-properties officeooo:rsid="00d3cdeb" style:font-size-asian="12pt" style:font-size-complex="12pt"/>
    </style:style>
    <style:style style:name="T21" style:family="text">
      <style:text-properties style:font-name="Noto Sans1" fo:font-size="12pt" fo:font-style="normal" fo:font-weight="normal" officeooo:rsid="00d8390b" style:font-size-asian="12pt" style:font-style-asian="normal" style:font-weight-asian="normal" style:font-size-complex="12pt" style:font-style-complex="normal" style:font-weight-complex="normal"/>
    </style:style>
    <style:style style:name="T22" style:family="text">
      <style:text-properties style:font-name="Noto Sans1" fo:font-size="12pt" fo:font-style="normal" fo:font-weight="normal" officeooo:rsid="00c839be" style:font-size-asian="12pt" style:font-style-asian="normal" style:font-weight-asian="normal" style:font-size-complex="12pt" style:font-style-complex="normal" style:font-weight-complex="normal"/>
    </style:style>
    <style:style style:name="T23" style:family="text">
      <style:text-properties style:font-name="Noto Sans1" fo:font-size="12pt" fo:font-style="normal" fo:font-weight="normal" officeooo:rsid="00c9bec0" style:font-size-asian="12pt" style:font-style-asian="normal" style:font-weight-asian="normal" style:font-size-complex="12pt" style:font-style-complex="normal" style:font-weight-complex="normal"/>
    </style:style>
    <style:style style:name="T24" style:family="text">
      <style:text-properties style:font-name="Noto Sans1" fo:font-size="12pt" fo:font-style="normal" fo:font-weight="normal" officeooo:rsid="00c07241" style:font-size-asian="12pt" style:font-style-asian="normal" style:font-weight-asian="normal" style:font-size-complex="12pt" style:font-style-complex="normal" style:font-weight-complex="normal"/>
    </style:style>
    <style:style style:name="T25" style:family="text">
      <style:text-properties style:font-name="Noto Sans1" fo:font-size="12pt" fo:font-style="normal" fo:font-weight="normal" officeooo:rsid="005dbf98" style:font-size-asian="12pt" style:font-style-asian="normal" style:font-weight-asian="normal" style:font-size-complex="12pt" style:font-style-complex="normal" style:font-weight-complex="normal"/>
    </style:style>
    <style:style style:name="T26" style:family="text">
      <style:text-properties style:font-name="Noto Sans1" fo:font-size="12pt" fo:font-style="normal" fo:font-weight="normal" officeooo:rsid="00c36a79" style:font-size-asian="12pt" style:font-style-asian="normal" style:font-weight-asian="normal" style:font-size-complex="12pt" style:font-style-complex="normal" style:font-weight-complex="normal"/>
    </style:style>
    <style:style style:name="T27" style:family="text">
      <style:text-properties style:font-name="Noto Sans1" fo:font-size="12pt" fo:font-style="normal" fo:font-weight="normal" officeooo:rsid="00cccd85" style:font-size-asian="12pt" style:font-style-asian="normal" style:font-weight-asian="normal" style:font-size-complex="12pt" style:font-style-complex="normal" style:font-weight-complex="normal"/>
    </style:style>
    <style:style style:name="T28" style:family="text">
      <style:text-properties style:font-name="Noto Sans1" fo:font-size="12pt" fo:font-style="normal" fo:font-weight="normal" officeooo:rsid="00cf0515" style:font-size-asian="12pt" style:font-style-asian="normal" style:font-weight-asian="normal" style:font-size-complex="12pt" style:font-style-complex="normal" style:font-weight-complex="normal"/>
    </style:style>
    <style:style style:name="T29" style:family="text">
      <style:text-properties style:font-name="Noto Sans1" fo:font-size="12pt" fo:font-style="italic" fo:font-weight="normal" officeooo:rsid="00c07241" style:font-size-asian="12pt" style:font-style-asian="italic" style:font-weight-asian="normal" style:font-size-complex="12pt" style:font-style-complex="italic" style:font-weight-complex="normal"/>
    </style:style>
    <style:style style:name="T30" style:family="text">
      <style:text-properties fo:font-variant="normal" fo:text-transform="none" fo:color="#111111" loext:opacity="100%" style:font-name="Noto Sans1" fo:font-size="12pt" fo:letter-spacing="normal" fo:font-style="normal" fo:font-weight="normal"/>
    </style:style>
    <style:style style:name="T31" style:family="text">
      <style:text-properties fo:font-variant="normal" fo:text-transform="none" fo:color="#111111" loext:opacity="100%" style:font-name="Noto Sans1" fo:font-size="12pt" fo:letter-spacing="normal" fo:font-style="normal" fo:font-weight="normal" officeooo:rsid="00c839be"/>
    </style:style>
    <style:style style:name="T32" style:family="text">
      <style:text-properties fo:font-variant="normal" fo:text-transform="none" fo:color="#111111" loext:opacity="100%" style:font-name="Noto Sans1" fo:font-size="12pt" fo:letter-spacing="normal" fo:font-style="normal" fo:font-weight="normal" officeooo:rsid="00c9bec0"/>
    </style:style>
    <style:style style:name="T33" style:family="text">
      <style:text-properties fo:font-variant="normal" fo:text-transform="none" fo:color="#111111" loext:opacity="100%" fo:font-size="12pt" fo:letter-spacing="normal" fo:font-style="normal" fo:font-weight="normal"/>
    </style:style>
    <style:style style:name="T34" style:family="text">
      <style:text-properties fo:font-variant="normal" fo:text-transform="none" fo:color="#111111" loext:opacity="100%" fo:font-size="12pt" fo:letter-spacing="normal" fo:font-style="normal" fo:font-weight="normal" officeooo:rsid="00c839be"/>
    </style:style>
    <style:style style:name="T35" style:family="text">
      <style:text-properties fo:font-variant="normal" fo:text-transform="none" fo:color="#111111" loext:opacity="100%" fo:font-size="12pt" fo:letter-spacing="normal" fo:font-style="normal" fo:font-weight="normal" officeooo:rsid="00c9bec0"/>
    </style:style>
    <style:style style:name="T36" style:family="text">
      <style:text-properties fo:font-variant="normal" fo:text-transform="none" fo:color="#111111" loext:opacity="100%" fo:letter-spacing="normal" fo:font-style="normal" fo:font-weight="normal"/>
    </style:style>
    <style:style style:name="T37" style:family="text">
      <style:text-properties fo:font-variant="normal" fo:text-transform="none" fo:color="#111111" loext:opacity="100%" fo:letter-spacing="normal" fo:font-style="normal" fo:font-weight="normal" officeooo:rsid="00c839be"/>
    </style:style>
    <style:style style:name="T38" style:family="text">
      <style:text-properties fo:font-variant="normal" fo:text-transform="none" fo:color="#111111" loext:opacity="100%" fo:letter-spacing="normal" fo:font-style="normal" fo:font-weight="normal" officeooo:rsid="00c9bec0"/>
    </style:style>
    <style:style style:name="T39" style:family="text">
      <style:text-properties officeooo:rsid="00c22876"/>
    </style:style>
    <style:style style:name="T40" style:family="text">
      <style:text-properties style:font-name="Liberation Serif"/>
    </style:style>
    <style:style style:name="T41" style:family="text">
      <style:text-properties style:font-name="Liberation Serif" fo:font-style="normal" style:font-style-asian="normal" style:font-style-complex="normal"/>
    </style:style>
    <style:style style:name="T42" style:family="text">
      <style:text-properties fo:font-style="italic" style:font-style-asian="italic" style:font-style-complex="italic"/>
    </style:style>
    <style:style style:name="T43" style:family="text">
      <style:text-properties fo:font-style="italic" officeooo:rsid="00cf0515" style:font-style-asian="italic" style:font-style-complex="italic"/>
    </style:style>
    <style:style style:name="T44" style:family="text">
      <style:text-properties fo:font-style="italic" officeooo:rsid="005dbf98" style:font-style-asian="italic" style:font-style-complex="italic"/>
    </style:style>
    <style:style style:name="T45" style:family="text">
      <style:text-properties fo:font-style="italic" officeooo:rsid="00c48ddb"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3744f5" style:font-style-asian="italic" style:font-weight-asian="bold" style:font-style-complex="italic" style:font-weight-complex="bold"/>
    </style:style>
    <style:style style:name="T48" style:family="text">
      <style:text-properties fo:font-style="italic" fo:font-weight="bold" officeooo:rsid="005dbf98" style:font-style-asian="italic" style:font-weight-asian="bold" style:font-style-complex="italic" style:font-weight-complex="bold"/>
    </style:style>
    <style:style style:name="T49" style:family="text">
      <style:text-properties fo:font-style="italic" fo:font-weight="normal" officeooo:rsid="00c07241" style:font-style-asian="italic" style:font-weight-asian="normal" style:font-style-complex="italic" style:font-weight-complex="normal"/>
    </style:style>
    <style:style style:name="T50" style:family="text">
      <style:text-properties officeooo:rsid="00c9bec0"/>
    </style:style>
    <style:style style:name="T51" style:family="text">
      <style:text-properties officeooo:rsid="005dbf98"/>
    </style:style>
    <style:style style:name="T52" style:family="text">
      <style:text-properties officeooo:rsid="00d069af"/>
    </style:style>
    <style:style style:name="T53" style:family="text">
      <style:text-properties style:font-name="Bahnschrift SemiBold" fo:font-style="italic" fo:font-weight="bold" officeooo:rsid="003744f5" style:font-style-asian="italic" style:font-weight-asian="bold" style:font-style-complex="italic" style:font-weight-complex="bold"/>
    </style:style>
    <style:style style:name="T54" style:family="text">
      <style:text-properties fo:font-size="11pt" fo:font-style="italic" fo:font-weight="bold" style:font-size-asian="11pt" style:font-style-asian="italic" style:font-weight-asian="bold" style:font-size-complex="11pt" style:font-style-complex="italic" style:font-weight-complex="bold"/>
    </style:style>
    <style:style style:name="T55" style:family="text">
      <style:text-properties fo:font-size="11pt" fo:font-style="italic" fo:font-weight="bold" officeooo:rsid="005dbf98" style:font-size-asian="11pt" style:font-style-asian="italic" style:font-weight-asian="bold" style:font-size-complex="11pt" style:font-style-complex="italic" style:font-weight-complex="bold"/>
    </style:style>
    <style:style style:name="T56" style:family="text">
      <style:text-properties fo:font-size="11pt" fo:font-weight="bold" style:font-size-asian="11pt" style:font-weight-asian="bold" style:font-size-complex="11pt" style:font-weight-complex="bold"/>
    </style:style>
    <style:style style:name="T57" style:family="text">
      <style:text-properties fo:font-size="11pt" fo:font-weight="bold" officeooo:rsid="00140ce0"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officeooo:rsid="00cf0515"/>
    </style:style>
    <style:style style:name="T60" style:family="text">
      <style:text-properties officeooo:rsid="00cdfc6b"/>
    </style:style>
    <style:style style:name="T61" style:family="text">
      <style:text-properties officeooo:rsid="00c36a79"/>
    </style:style>
    <style:style style:name="T62" style:family="text">
      <style:text-properties officeooo:rsid="005f6f41"/>
    </style:style>
    <style:style style:name="T63" style:family="text">
      <style:text-properties officeooo:rsid="00c48ddb"/>
    </style:style>
    <style:style style:name="T64" style:family="text">
      <style:text-properties officeooo:rsid="00c839be"/>
    </style:style>
    <style:style style:name="T65" style:family="text">
      <style:text-properties officeooo:rsid="00611516"/>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d8390b" style:font-style-asian="normal" style:font-weight-asian="normal" style:font-style-complex="normal" style:font-weight-complex="normal"/>
    </style:style>
    <style:style style:name="T69" style:family="text">
      <style:text-properties fo:font-style="normal" fo:font-weight="normal" officeooo:rsid="00c839be" style:font-style-asian="normal" style:font-weight-asian="normal" style:font-style-complex="normal" style:font-weight-complex="normal"/>
    </style:style>
    <style:style style:name="T70" style:family="text">
      <style:text-properties fo:font-style="normal" fo:font-weight="normal" officeooo:rsid="00c9bec0" style:font-style-asian="normal" style:font-weight-asian="normal" style:font-style-complex="normal" style:font-weight-complex="normal"/>
    </style:style>
    <style:style style:name="T71" style:family="text">
      <style:text-properties fo:font-style="normal" fo:font-weight="normal" officeooo:rsid="00c07241" style:font-style-asian="normal" style:font-weight-asian="normal" style:font-style-complex="normal" style:font-weight-complex="normal"/>
    </style:style>
    <style:style style:name="T72" style:family="text">
      <style:text-properties fo:font-style="normal" fo:font-weight="normal" officeooo:rsid="005dbf98" style:font-style-asian="normal" style:font-weight-asian="normal" style:font-style-complex="normal" style:font-weight-complex="normal"/>
    </style:style>
    <style:style style:name="T73" style:family="text">
      <style:text-properties fo:font-style="normal" fo:font-weight="normal" officeooo:rsid="00c36a79" style:font-style-asian="normal" style:font-weight-asian="normal" style:font-style-complex="normal" style:font-weight-complex="normal"/>
    </style:style>
    <style:style style:name="T74" style:family="text">
      <style:text-properties fo:font-style="normal" fo:font-weight="normal" officeooo:rsid="00cccd85" style:font-style-asian="normal" style:font-weight-asian="normal" style:font-style-complex="normal" style:font-weight-complex="normal"/>
    </style:style>
    <style:style style:name="T75" style:family="text">
      <style:text-properties fo:font-style="normal" fo:font-weight="normal" officeooo:rsid="00cf0515" style:font-style-asian="normal" style:font-weight-asian="normal" style:font-style-complex="normal" style:font-weight-complex="normal"/>
    </style:style>
    <style:style style:name="T76" style:family="text">
      <style:text-properties fo:font-style="normal" fo:font-weight="normal" officeooo:rsid="00370240" style:font-style-asian="normal" style:font-weight-asian="normal" style:font-style-complex="normal" style:font-weight-complex="normal"/>
    </style:style>
    <style:style style:name="T77" style:family="text">
      <style:text-properties officeooo:rsid="00d3cdeb"/>
    </style:style>
    <style:style style:name="T78" style:family="text">
      <style:text-properties officeooo:rsid="00ae96c0"/>
    </style:style>
    <style:style style:name="T79" style:family="text">
      <style:text-properties officeooo:rsid="0062a038"/>
    </style:style>
    <style:style style:name="T80" style:family="text">
      <style:text-properties officeooo:rsid="00d1ce4c"/>
    </style:style>
    <style:style style:name="T81" style:family="text">
      <style:text-properties style:text-underline-style="none"/>
    </style:style>
    <style:style style:name="T82" style:family="text">
      <style:text-properties fo:font-weight="bold" style:font-weight-asian="bold" style:font-weight-complex="bold"/>
    </style:style>
    <style:style style:name="T83" style:family="text">
      <style:text-properties fo:font-weight="bold" officeooo:rsid="00140ce0" style:font-weight-asian="bold" style:font-weight-complex="bold"/>
    </style:style>
    <style:style style:name="T84" style:family="text">
      <style:text-properties fo:font-weight="bold" officeooo:rsid="000f34bf" style:font-weight-asian="bold" style:font-weight-complex="bold"/>
    </style:style>
    <style:style style:name="T85" style:family="text">
      <style:text-properties fo:font-weight="normal" style:font-weight-asian="normal" style:font-weight-complex="normal"/>
    </style:style>
    <style:style style:name="T86" style:family="text">
      <style:text-properties officeooo:rsid="00ca73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latone - I dialoghi</text:p>
      <text:p text:style-name="P6"><text:span text:style-name="T84">Il primo preriodo</text:span> è quello dei primi 13 dialoghi, gli scritti giovanili o socratici, in cui la figura di Socrate, <text:span text:style-name="T65">per </text:span>suoi insegnamenti e l<text:span text:style-name="T65">e</text:span> sue eredità, sono centrali.</text:p>
      <text:p text:style-name="P6"><text:span text:style-name="T82">I</text:span><text:span text:style-name="T84">l secondo periodo</text:span> è quello degli scritti intermedi, della maturità. In questi scritti, tra cui si annoverano principalmente 5 dialoghi, <text:s/>si trovano le maggiori teorizzazioni filosofiche di Platone, il cui pensiero va ben oltre gli insegnamenti di Socrate.</text:p>
      <text:p text:style-name="P6"><text:span text:style-name="T82">Il </text:span><text:span text:style-name="T84">terzo periodo</text:span> riguarda gli scritti della vecchiaia, gli ultimi dialoghi in cui Platone è impegnato ad approfondire il suo sistema filosofico, ma soprattutto a metterlo in discussione per risolvere le criticità che contiene.</text:p>
      <text:p text:style-name="P6">Per comprendere cosa si intende quando diciamo che Platone ha una missione filosofica, vediamo di capire qual è il suo rapporto con Socrate, dal quale eredita 3 cose: </text:p>
      <text:list text:style-name="List_20_1">
        <text:list-item>
          <text:p text:style-name="P27">la ricerca tramite il dialogo, <text:span text:style-name="T65">analizzando</text:span> <text:span text:style-name="T65">passo dopo passo, quei concetti</text:span> che ven<text:span text:style-name="T65">ivano</text:span> via via messi in discussione;</text:p>
        </text:list-item>
        <text:list-item>
          <text:p text:style-name="P28">l’uso della razionalità nella ricerca del concetto, quindi dell’essenza;</text:p>
        </text:list-item>
        <text:list-item>
          <text:p text:style-name="P29">l’amore per la giustizia, <text:span text:style-name="T65">protesa </text:span>a ricercare costantemente la possibilità di realizzare una società <text:soft-page-break/>in cui l’uomo, po<text:span text:style-name="T65">tesse </text:span>vivere in pace e giustizia con <text:span text:style-name="T78">i</text:span> suoi simili.</text:p>
          <text:p text:style-name="P30">Considerati questi, come punti di partenza e allo stesso tempo di sfondo a tutta la sua ricerca, Platone ha la missione filosofica di andare dove Socrate non era arrivato, portando a compimento le sue intuizioni.</text:p>
          <text:p text:style-name="P31"><text:span text:style-name="T85">Tutti i dialoghi socratici del primo periodo</text:span> sono legati alla figura di Socrate e al suo insegnamento, <text:span text:style-name="T65">dove</text:span> è il protagonista <text:span text:style-name="T65">indiscusso </text:span>e l’interlocutore in ognuno <text:span text:style-name="T65">di essi</text:span>. Platone <text:span text:style-name="T65">tende a </text:span>dimostrare la razionalità e dunque la verità delle tesi sostenute dal suo maestro <text:span text:style-name="T65">e pur con alcune differenze, condividono la convinzione che la virtù sia un concetto universale, valido per tutti gli uomini, indipendentemente dal tempo, dal luogo o dalla cultura. La virtù, per loro, è la conoscenza del bene e del giusto, e si acquisisce attraverso un processo di apprendimento e di autocoscienza. Socrate riteneva che la virtù fosse innata nell'uomo, ma che fosse spesso sepolta sotto le scorie dell'ignoranza e delle passioni. Il suo metodo dialettico, basato sulla discussione e l'interrogatorio, era finalizzato a portare alla luce la verità che è già presente nell'animo umano.</text:span> Platone, invece, sosteneva che la virtù non <text:span text:style-name="T65">fosse</text:span> innata, ma che si acquisi<text:span text:style-name="T65">va </text:span>attraverso l'educazione. Egli immaginava una società ideale, la Repubblica, in cui i cittadini sono educati alla virtù attraverso un sistema di scuole e di riti. <text:soft-page-break/>L’insegnamento della virtù inteso in questo senso è molto diverso da quello dei <text:span text:style-name="T65">s</text:span>ofisti, che invece la considerano relativamente al contesto, in modo certamente non dimostrabile. Per loro, la virtù non è un concetto universale, ma varia a seconda del contesto sociale e culturale. La virtù è ciò che è utile e vantaggioso per l'individuo o per la società in un <text:span text:style-name="T65">preciso</text:span> momento.</text:p>
        </text:list-item>
      </text:list>
      <text:p text:style-name="P33">Il primo dei dialoghi giovanili di Platone è l’Apologia<text:note text:id="ftn46" text:note-class="footnote"><text:note-citation>1</text:note-citation><text:note-body><text:p text:style-name="P4">Apologia significa “discorso a favore di”</text:p></text:note-body></text:note> di Socrate, completamente incentrato sulla difesa del suo maestro dalle accuse che gli sono state rivolte. Nel difendere Socrate, Platone illustra i capisaldi del suo pensiero e della sua pratica di vita caratterizzata dall’esame di sé e degli altri, per poter accedere alla verità e alla comprensione della virtù. Nel dialogo intitolato <text:span text:style-name="T82">Critone</text:span> viene descritto il dilemma vissuto da Socrate durante il processo: pagare una multa, andare in esilio o accettare la condanna a morte. La scelta di bere il veleno mortale della cicuta e dare seguito alla decisione dei giudici ateniesi è presentata nel dialogo come coerenza al patto fatto con le leggi della città, con questa scelta Socrate vuole dimostrare come deve comportarsi un uomo giusto.</text:p>
      <text:p text:style-name="P34">I dialoghi <text:span text:style-name="T82">Eutifrone</text:span>, <text:span text:style-name="T82">Lachete</text:span> e <text:span text:style-name="T82">Carmide</text:span> sono incentrati sull’unicità della virtù: rispettivamente le virtù della <text:soft-page-break/>purezza d’animo, del coraggio e della saggezza. <text:span text:style-name="T79">Queste, </text:span>non possono essere definite elencando esempi di comportamenti puri o comportamenti coraggiosi o comportamenti saggi. La virtù è per Socrate una sola e unico è il valore, il concetto, l’ideale che essa tende a perseguire, se le virtù fossero diverse sarebbero anche diverse i valori, i concetti, gli ideali che perseguono. Questi tre dialoghi sono <text:span text:style-name="T42">aporetici</text:span> non giungono cioè a una definizione per quanto la cerchino, difatti il procedere della discussione vede Socrate smentire tutte le definizioni proposte dai tre dialoganti (Eutifrone sulla purezza d’animo, Lachete sul coraggio e Carmide sulla saggezza), senza proporne una alternativa. <text:span text:style-name="T80">L’interlocu</text:span><text:span text:style-name="T79">t</text:span><text:span text:style-name="T80">ore ammette di essere in aporia riguardo al concetto esaminato, concludendo che non sa cosa sia.</text:span></text:p>
      <text:p text:style-name="P33">Nei dialoghi <text:span text:style-name="T82">Ippia Maggiore</text:span> e <text:span text:style-name="T82">Liside</text:span> si sostiene che il bello, l’utile, il conveniente non possono essere considerati valori indipendenti, perché ognuno di essi appartiene al più grande e universale valore del bene. Questo valore è conoscibile dall’uomo e la virtù è il comportamento che deriva dalla conoscenza del bene, che cerca di realizzarlo tramite le azioni umane. La virtù quindi corrisponde alla Scienza del bene. </text:p>
      <text:p text:style-name="P35">Segue poi l’<text:span text:style-name="T82">Ippia Minore</text:span> in cui si dice: se non fosse vero che la virtù è la conoscenza del bene, risulterebbe vero che l’uomo volutamente malvagio è migliore di quello <text:soft-page-break/>che fa il male senza volerlo. L’assurdità di questa affermazione deriva nel dialogo dal seguente ragionamento: <text:s/>l’uomo che vuole il male conosce il male, se lo conosce deve saperlo distinguere dal bene, che è il suo opposto; questo significa che l’uomo che vuole il male conosce il bene ed è dunque migliore di chi non lo conosce o non sa distinguerlo dal male. Il dialogo tra Socrate e Ippia si conclude con la tesi di Socrate che un uomo che conosce il bene non può non farlo e non essere dunque virtuoso; in conclusione c’è una delle tesi più forti del pensiero attribuito a Socrate: il male è ignoranza, il bene è conoscenza. </text:p>
      <text:p text:style-name="P35">Nel dialogo intitolato <text:span text:style-name="T82">Ione</text:span> si parla della poesia: i poeti sono esempio di chi conosce tante cose, essi infatti scrivono di cose diverse e in componimenti diversi, tuttavia questa loro conoscenza di tante cose non corrisponde mai con la conoscenza del concetto, dell’essenza, di ciò che sta alla base di tutte le cose che conosciamo, ciò che per Socrate è dunque il vero. La conclusione del dialogo è che i poeti non conoscono nulla veramente e che sono presi dall’ispirazione divina quando compongono.</text:p>
      <text:p text:style-name="P35">Nel dialogo <text:span text:style-name="T82">Protagora</text:span> c’è una netta e decisa contrapposizione tra l’insegnamento di Socrate e le teorie del filosofo che dà il nome al dialogo. Essendo la virtù di cui parla Protagora un insieme di abilità <text:soft-page-break/>acquisite tramite l’esperienza, essa non è insegnabile; infatti, secondo Socrate, solo il concetto universale, l’essenza, alla cui ricerca è orientato il pensiero filosofico che ama la verità, è insegnabile. </text:p>
      <text:p text:style-name="P35">Nell’<text:span text:style-name="T82">Eutidemo</text:span> viene presa di mira l’eristica, l’arte di battagliare a parole e di confutare qualsiasi posizione, insegnata dai Sofisti. Considerando che una simile arte è basata sul presupposto che non è possibile l’errore e che “qualsiasi cosa si dica, si dice cosa che è”, dunque vera, Socrate giunge a dimostrare che l’insegnamento sarebbe in tal caso inutile, perché non c’è nulla da apprendere. A questo punto il dialogo si trasforma in un’esaltazione della filosofia intesa come amore del sapere, dimostrando che essa è l’unica disciplina che non solo produce conoscenze, ma insegna ad utilizzarle per il vantaggio dell’uomo, cioè la sua felicità.</text:p>
      <text:p text:style-name="P35">Nel <text:span text:style-name="T82">Gorgia</text:span>, ultimo dei dialoghi con protagonisti sofisti intenti a dialogare con Socrate, viene smentita la capacità persuasiva dell’arte retorica, tipica dei Sofisti. Socrate sostiene nel dialogo, che una conoscenza riesce ad essere persuasiva solo intorno all’oggetto che conosce, ma la retorica non ha un oggetto proprio e dunque non può davvero convincere l’interlocutore, se non parlando di conoscenze non vere e non dimostrabili. In conclusione si afferma che la virtù e il conseguimento del bene sono per l’uomo fonte di <text:soft-page-break/>felicità perché gli danno equilibrio e assenza di mancanze che provocano dolore. </text:p>
      <text:p text:style-name="P35">Nel dialogo <text:span text:style-name="T82">Cratilo</text:span> ci si chiede se il linguaggio abbia un’origine convenzionale, se sia cioè prodotto dall’uomo o se in alternativa abbia una connotazione naturale che lo collega direttamente alla natura delle cose. Secondo questa teoria conoscere il linguaggio corrisponde a conoscere le cose, derivando esso dalle cose per causalità diretta; invece per chi sostiene che la sua origine sia convenzionale (Sofisti e Democrito <text:s/>ad esempio) esso è stabilito arbitrariamente, per essere mezzo utile a conoscere la natura delle cose. La tesi di Platone è diversa da entrambe queste due e le contiene entrambe: egli sostiene che il linguaggio è sì il frutto di una scelta dell’uomo, ma questa produzione del linguaggio non è arbitraria, bensì diretta alla conoscenza delle essenze, cioè della natura delle cose. Le tesi sostenute in questo dialogo, ovvero il convenzionalismo e naturalismo, sono alla base di numerosi studi e corrispondono ancora oggi al dibattito interno alla disciplina della filosofia del linguaggio.</text:p>
      <text:p text:style-name="P34">Considerati i dialoghi cosiddetti socratici, tramite i quali vediamo che Platone ha la missione filosofica di testimoniare e riportare gli insegnamenti di Socrate, si vedrà che il <text:span text:style-name="T85">secondo periodo</text:span> della sua produzione comporta un notevole sviluppo e una totale originalità, <text:soft-page-break/>rispetto alle posizioni del maestro. Da qui la necessità di intendere l’<text:span text:style-name="T86">origine </text:span>del "mondo delle idee" come frutto di un impegno "politico" più complessivo e profondo.</text:p>
      <text:p text:style-name="P34"><text:span text:style-name="T82"/></text:p>
      <text:p text:style-name="P34"><text:span text:style-name="T82">Platone </text:span><text:span text:style-name="T83">p</text:span><text:span text:style-name="T82">arte </text:span><text:span text:style-name="T83">s</text:span><text:span text:style-name="T82">econda: </text:span><text:span text:style-name="T83">l</text:span><text:span text:style-name="T82">a </text:span><text:span text:style-name="T83">d</text:span><text:span text:style-name="T82">ottrina </text:span><text:span text:style-name="T83">d</text:span><text:span text:style-name="T82">elle </text:span><text:span text:style-name="T83">i</text:span><text:span text:style-name="T82">dee</text:span></text:p>
      <text:p text:style-name="P34">In seguito ad un primo periodo <text:s/>trascorso a diffondere gli insegnamenti del maestro Socrate, Platone elabora la dottrina delle idee. Egli ha infatti bisogno di dimostrare l’infondatezza della cultura sofistica diffusasi nell’Atene del V secolo, tale da negare l’esistenza di una verità assoluta; la diffusione dell’arte retorica e della tecnica eristica, accompagnate dal <text:span text:style-name="T81">relativismo</text:span><text:span text:style-name="T81"><text:note text:id="ftn47" text:note-class="footnote"><text:note-citation>2</text:note-citation><text:note-body><text:p text:style-name="P5">Il relativismo sofistico nega l'esistenza di verità assolute, o mette criticamente in discussione la possibilità di giungere a una loro definizione assoluta e definitiva. La cultura sofistica, attraverso la critica della nozione di verità, perviene ad una forma più radicale di relativismo. Non solo non esiste una verità assolutamente valida, ma l'unico metro di valutazione diviene l'individuo: per ciascuno è vera solamente la propria percezione soggettiva. Analogamente, tale visione relativistica del mondo viene applicata al campo dell'etica. Non esistono azioni buone o cattive in sé; ciascuna azione deve essere valutata caso per caso.</text:p></text:note-body></text:note></text:span> e dal <text:span text:style-name="T81">fenomenismo</text:span><text:span text:style-name="T81"><text:note text:id="ftn48" text:note-class="footnote"><text:note-citation>3</text:note-citation><text:note-body><text:p text:style-name="Footnote">Il fenomenismo è una teoria filosofica secondo cui la conoscenza si limita ai fenomeni, ovvero alle apparenze sensibili delle cose, e non può estendersi alla loro natura intrinseca. In questo senso, il fenomenismo può essere visto come una forma di relativismo gnoseologico, in quanto nega la possibilità di conoscere la verità assoluta delle cose e si limita a descrivere le loro apparenze soggettive</text:p></text:note-body></text:note></text:span> della dottrina sofistica, erano causa a suo avviso della degenerazione dei costumi della città. Per questo Platone decide di dedicarsi all’insegnamento della filosofia abbandonando l’idea della carriera politica, e si accorge presto che per sconfiggere il <text:soft-page-break/>relativismo dei sofisti è necessaria una teoria forte su cui basare il discorso sulla verità. Per questo Platone elabora la dottrina delle idee , una teoria che va ben oltre quanto insegnato da Socrate e per la quale Platone è oggetto di studi e interpretazioni da molti secoli; difatti, nel suo separare il mondo dell’apparenza dal mondo delle idee, creando la distinzione tra reale e ideale, Platone rivoluziona il pensiero occidentale in modo irreversibile. </text:p>
      <text:p text:style-name="P36"><text:span text:style-name="Strong_20_Emphasis"><text:span text:style-name="T1">I dialoghi della maturità</text:span></text:span><text:span text:style-name="T1"> o del secondo periodo sono quelli in cui Platone elabora la dottrina delle idee. </text:span><text:span text:style-name="T5">Questi dialoghi </text:span><text:span text:style-name="T1">sono : </text:span><text:span text:style-name="Strong_20_Emphasis"><text:span text:style-name="T1">Menone, Fedone, Fedro, Convito, Repubblica</text:span></text:span><text:span text:style-name="T1">. La dottrina delle idee non è inserita in uno solo di questi dialoghi, ma emerge in diverse forme e li attraversa orizzontalmente mostrando:</text:span></text:p>
      <text:list text:continue-numbering="true" text:style-name="List_20_1">
        <text:list-item>
          <text:p text:style-name="P32">l’esistenza del mondo delle idee</text:p>
        </text:list-item>
        <text:list-item>
          <text:p text:style-name="P32">il rapporto tra le idee e le cose</text:p>
        </text:list-item>
        <text:list-item>
          <text:p text:style-name="P32">la conoscenza del mondo delle cose e del mondo delle idee</text:p>
        </text:list-item>
        <text:list-item>
          <text:p text:style-name="P32">come conosciamo le idee</text:p>
        </text:list-item>
        <text:list-item>
          <text:p text:style-name="P32">in che modo il mondo delle idee influenza la creazione di una società gius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6:20:44.310499176</meta:creation-date>
    <dc:date>2026-01-25T16:37:05.936124126</dc:date>
    <dc:creator>corrado tafaro</dc:creator>
    <meta:editing-duration>PT16M23S</meta:editing-duration>
    <meta:editing-cycles>2</meta:editing-cycles>
    <meta:generator>LibreOffice/24.2.7.2$Linux_X86_64 LibreOffice_project/420$Build-2</meta:generator>
    <meta:document-statistic meta:table-count="0" meta:image-count="0" meta:object-count="0" meta:page-count="9" meta:paragraph-count="31" meta:word-count="1934" meta:character-count="12266" meta:non-whitespace-character-count="10363"/>
  </office:meta>
</office:document-meta>
</file>