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adornments="Normale"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137b5a" style:font-size-asian="12pt" style:font-size-complex="12pt"/>
    </style:style>
    <style:style style:name="P2" style:family="paragraph" style:parent-style-name="Standard">
      <style:paragraph-properties fo:margin-top="0cm" fo:margin-bottom="0cm" style:contextual-spacing="false" fo:line-height="115%" fo:text-align="justify" style:justify-single-word="false"/>
      <style:text-properties style:font-name="Noto Sans1" fo:font-size="12pt" officeooo:paragraph-rsid="00137b5a" style:font-size-asian="12pt" style:font-size-complex="12pt"/>
    </style:style>
    <style:style style:name="P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37b5a" style:font-size-asian="12pt" style:font-size-complex="12pt"/>
    </style:style>
    <style:style style:name="P4"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137b5a" style:font-size-asian="12pt" style:font-size-complex="12pt"/>
    </style:style>
    <style:style style:name="P5" style:family="paragraph" style:parent-style-name="Standard">
      <style:paragraph-properties fo:margin-top="0.199cm" fo:margin-bottom="0cm" style:contextual-spacing="false" fo:line-height="115%" fo:text-align="justify" style:justify-single-word="false"/>
      <style:text-properties style:font-name="Noto Sans1" fo:font-size="12pt" fo:font-weight="bold" officeooo:rsid="02397a74" officeooo:paragraph-rsid="00137b5a" style:font-size-asian="12pt" style:font-weight-asian="bold" style:font-size-complex="12pt" style:font-weight-complex="bold"/>
    </style:style>
    <style:style style:name="P6" style:family="paragraph" style:parent-style-name="Quotations">
      <style:paragraph-properties fo:margin-top="0.101cm" fo:margin-bottom="0cm" style:contextual-spacing="false" fo:line-height="115%"/>
      <style:text-properties style:font-name="Noto Sans1" fo:font-size="12pt" fo:font-weight="normal" officeooo:paragraph-rsid="00137b5a" style:font-size-asian="12pt" style:font-weight-asian="normal" style:font-size-complex="12pt" style:font-weight-complex="normal"/>
    </style:style>
    <style:style style:name="P7"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italic" officeooo:paragraph-rsid="00137b5a" style:font-size-asian="12pt" style:font-style-asian="italic" style:font-size-complex="12pt" style:font-style-complex="italic"/>
    </style:style>
    <style:style style:name="P8" style:family="paragraph" style:parent-style-name="Standard" style:master-page-name="">
      <loext:graphic-properties draw:fill="none"/>
      <style:paragraph-properties fo:margin-left="0cm" fo:margin-right="0cm" fo:margin-top="0.3cm" fo:margin-bottom="0cm" style:contextual-spacing="false" fo:line-height="115%" fo:text-align="justify" style:justify-single-word="false" fo:text-indent="0cm" style:auto-text-indent="false" style:page-number="auto" fo:background-color="transparent"/>
      <style:text-properties style:font-name="Noto Sans1" fo:font-size="12pt" fo:font-style="italic" officeooo:paragraph-rsid="00137b5a" style:font-size-asian="12pt" style:font-style-asian="italic" style:font-size-complex="12pt" style:font-style-complex="italic"/>
    </style:style>
    <style:style style:name="P9" style:family="paragraph" style:parent-style-name="Standard">
      <style:paragraph-properties fo:margin-top="0.101cm" fo:margin-bottom="0cm" style:contextual-spacing="false" fo:line-height="115%" fo:text-align="justify" style:justify-single-word="false"/>
      <style:text-properties style:font-name="Noto Sans1" officeooo:paragraph-rsid="00137b5a"/>
    </style:style>
    <style:style style:name="P10" style:family="paragraph" style:parent-style-name="Standard" style:master-page-name="">
      <loext:graphic-properties draw:fill="none"/>
      <style:paragraph-properties fo:margin-left="0cm" fo:margin-right="0cm" fo:line-height="115%" fo:text-align="justify" style:justify-single-word="false" fo:text-indent="0cm" style:auto-text-indent="false" style:page-number="auto" fo:background-color="transparent"/>
      <style:text-properties style:font-name="Noto Sans1" officeooo:paragraph-rsid="00137b5a"/>
    </style:style>
    <style:style style:name="P1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officeooo:paragraph-rsid="00137b5a"/>
    </style:style>
    <style:style style:name="P12"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officeooo:paragraph-rsid="00137b5a"/>
    </style:style>
    <style:style style:name="P13" style:family="paragraph" style:parent-style-name="Footnote">
      <style:paragraph-properties fo:text-align="justify" style:justify-single-word="false"/>
    </style:style>
    <style:style style:name="P14" style:family="paragraph" style:parent-style-name="Quotations">
      <style:paragraph-properties fo:margin-top="0.3cm" fo:margin-bottom="0.199cm" style:contextual-spacing="false" fo:line-height="115%" fo:text-align="center" style:justify-single-word="false"/>
      <style:text-properties officeooo:paragraph-rsid="00137b5a"/>
    </style:style>
    <style:style style:name="P15" style:family="paragraph" style:parent-style-name="Heading_20_3">
      <style:text-properties style:font-name="Noto Sans1" fo:font-size="12pt" officeooo:paragraph-rsid="00137b5a" style:font-size-asian="12pt" style:font-size-complex="12pt"/>
    </style:style>
    <style:style style:name="P16"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13e755" style:font-size-asian="12pt" style:font-size-complex="12pt"/>
    </style:style>
    <style:style style:name="P17"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3e755" style:font-size-asian="12pt" style:font-size-complex="12pt"/>
    </style:style>
    <style:style style:name="P18"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3e755" style:font-size-asian="12pt" style:font-size-complex="12pt"/>
    </style:style>
    <style:style style:name="P1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3e755" style:font-size-asian="12pt" style:font-size-complex="12pt"/>
    </style:style>
    <style:style style:name="P20"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reak-before="page" fo:background-color="transparent"/>
      <style:text-properties style:font-name="Noto Sans1" officeooo:paragraph-rsid="0013e755"/>
    </style:style>
    <style:style style:name="P21"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officeooo:paragraph-rsid="0013e755"/>
    </style:style>
    <style:style style:name="P22"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fo:font-size="12pt" officeooo:paragraph-rsid="0013e755" style:font-size-asian="12pt" style:font-size-complex="12pt"/>
    </style:style>
    <style:style style:name="T1" style:family="text">
      <style:text-properties style:font-name="Noto Sans1" fo:font-size="12pt" officeooo:rsid="00356da2" style:font-size-asian="12pt" style:font-size-complex="12pt"/>
    </style:style>
    <style:style style:name="T2" style:family="text">
      <style:text-properties fo:font-style="normal" style:font-style-asian="normal" style:font-style-complex="normal"/>
    </style:style>
    <style:style style:name="T3" style:family="text">
      <style:text-properties fo:font-style="normal" officeooo:rsid="001c02ae" style:font-style-asian="normal" style:font-style-complex="normal"/>
    </style:style>
    <style:style style:name="T4" style:family="text">
      <style:text-properties fo:font-style="normal" officeooo:rsid="02ac4301" style:font-style-asian="normal" style:font-style-complex="normal"/>
    </style:style>
    <style:style style:name="T5" style:family="text">
      <style:text-properties fo:font-style="normal" officeooo:rsid="002bb611" style:font-size-asian="12pt" style:font-style-asian="normal" style:font-style-complex="normal"/>
    </style:style>
    <style:style style:name="T6" style:family="text">
      <style:text-properties fo:font-style="normal" officeooo:rsid="02ac4301" style:font-size-asian="12pt" style:font-style-asian="normal" style:font-style-complex="normal"/>
    </style:style>
    <style:style style:name="T7" style:family="text">
      <style:text-properties fo:font-style="normal" officeooo:rsid="02a83cbc" style:font-size-asian="12pt" style:font-style-asian="normal" style:font-style-complex="normal"/>
    </style:style>
    <style:style style:name="T8" style:family="text">
      <style:text-properties fo:font-style="italic" style:font-style-asian="italic" style:font-style-complex="italic"/>
    </style:style>
    <style:style style:name="T9" style:family="text">
      <style:text-properties fo:font-style="italic" officeooo:rsid="029d9fa9" style:font-style-asian="italic" style:font-style-complex="italic"/>
    </style:style>
    <style:style style:name="T10" style:family="text">
      <style:text-properties fo:font-style="italic" officeooo:rsid="0021a3d3" style:font-style-asian="italic" style:font-style-complex="italic"/>
    </style:style>
    <style:style style:name="T11" style:family="text">
      <style:text-properties fo:font-style="italic" officeooo:rsid="02a93f2f" style:font-style-asian="italic" style:font-style-complex="italic"/>
    </style:style>
    <style:style style:name="T12" style:family="text">
      <style:text-properties fo:font-style="italic" officeooo:rsid="0217c10f" style:font-style-asian="italic" style:font-style-complex="italic"/>
    </style:style>
    <style:style style:name="T13" style:family="text">
      <style:text-properties officeooo:rsid="00356da2"/>
    </style:style>
    <style:style style:name="T1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fo:font-size="12pt" fo:font-style="normal" fo:font-weight="normal" officeooo:rsid="002bb611" style:font-size-asian="12pt" style:font-style-asian="normal" style:font-weight-asian="normal" style:font-size-complex="12pt" style:font-style-complex="normal" style:font-weight-complex="normal"/>
    </style:style>
    <style:style style:name="T16" style:family="text">
      <style:text-properties fo:font-size="12pt" fo:font-style="normal" fo:font-weight="normal" officeooo:rsid="00186b32" style:font-size-asian="12pt" style:font-style-asian="normal" style:font-weight-asian="normal" style:font-size-complex="12pt" style:font-style-complex="normal" style:font-weight-complex="normal"/>
    </style:style>
    <style:style style:name="T17" style:family="text">
      <style:text-properties fo:font-size="12pt" fo:font-style="normal" fo:font-weight="normal" officeooo:rsid="00df46ad" style:font-size-asian="12pt" style:font-style-asian="normal" style:font-weight-asian="normal" style:font-size-complex="12pt" style:font-style-complex="normal" style:font-weight-complex="normal"/>
    </style:style>
    <style:style style:name="T18" style:family="text">
      <style:text-properties fo:font-size="12pt" fo:font-style="normal" fo:font-weight="normal" officeooo:rsid="00e0caf7" style:font-size-asian="12pt" style:font-style-asian="normal" style:font-weight-asian="normal" style:font-size-complex="12pt" style:font-style-complex="normal" style:font-weight-complex="normal"/>
    </style:style>
    <style:style style:name="T19" style:family="text">
      <style:text-properties fo:font-size="12pt" fo:font-style="normal" fo:font-weight="normal" officeooo:rsid="0036f345" style:font-size-asian="12pt" style:font-style-asian="normal" style:font-weight-asian="normal" style:font-size-complex="12pt" style:font-style-complex="normal" style:font-weight-complex="normal"/>
    </style:style>
    <style:style style:name="T20" style:family="text">
      <style:text-properties fo:font-size="12pt" fo:font-style="normal" fo:font-weight="normal" officeooo:rsid="00356da2" style:font-size-asian="12pt" style:font-style-asian="normal" style:font-weight-asian="normal" style:font-size-complex="12pt" style:font-style-complex="normal" style:font-weight-complex="normal"/>
    </style:style>
    <style:style style:name="T21" style:family="text">
      <style:text-properties fo:font-size="12pt" fo:font-style="normal" fo:font-weight="normal" officeooo:rsid="0030c1a7" style:font-size-asian="12pt" style:font-style-asian="normal" style:font-weight-asian="normal" style:font-size-complex="12pt" style:font-style-complex="normal" style:font-weight-complex="normal"/>
    </style:style>
    <style:style style:name="T22" style:family="text">
      <style:text-properties fo:font-size="12pt" fo:font-style="normal" fo:font-weight="normal" officeooo:rsid="0157589f" style:font-size-asian="12pt" style:font-style-asian="normal" style:font-weight-asian="normal" style:font-size-complex="12pt" style:font-style-complex="normal" style:font-weight-complex="normal"/>
    </style:style>
    <style:style style:name="T23" style:family="text">
      <style:text-properties fo:font-size="12pt" fo:font-style="normal" fo:font-weight="normal" officeooo:rsid="00ddc89a" style:font-size-asian="12pt" style:font-style-asian="normal" style:font-weight-asian="normal" style:font-size-complex="12pt" style:font-style-complex="normal" style:font-weight-complex="normal"/>
    </style:style>
    <style:style style:name="T24" style:family="text">
      <style:text-properties fo:font-size="12pt" fo:font-style="normal" fo:font-weight="normal" officeooo:rsid="00137b5a" style:font-size-asian="12pt" style:font-style-asian="normal" style:font-weight-asian="normal" style:font-size-complex="12pt" style:font-style-complex="normal" style:font-weight-complex="normal"/>
    </style:style>
    <style:style style:name="T25" style:family="text">
      <style:text-properties fo:font-size="12pt" style:font-size-asian="12pt" style:font-size-complex="12pt"/>
    </style:style>
    <style:style style:name="T26" style:family="text">
      <style:text-properties fo:font-size="12pt" officeooo:rsid="001d59fb" style:font-size-asian="12pt" style:font-size-complex="12pt"/>
    </style:style>
    <style:style style:name="T2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8" style:family="text">
      <style:text-properties fo:font-size="12pt" fo:font-style="italic" fo:font-weight="normal" officeooo:rsid="002bb611" style:font-size-asian="12pt" style:font-style-asian="italic" style:font-weight-asian="normal" style:font-size-complex="12pt" style:font-style-complex="italic" style:font-weight-complex="normal"/>
    </style:style>
    <style:style style:name="T29" style:family="text">
      <style:text-properties fo:font-size="12pt" fo:font-style="italic" fo:font-weight="bold" style:font-size-asian="12pt" style:font-style-asian="italic" style:font-weight-asian="bold" style:font-size-complex="12pt" style:font-style-complex="italic" style:font-weight-complex="bold"/>
    </style:style>
    <style:style style:name="T30" style:family="text">
      <style:text-properties fo:font-size="12pt" fo:font-style="italic" fo:font-weight="bold" officeooo:rsid="002bb611" style:font-size-asian="12pt" style:font-style-asian="italic" style:font-weight-asian="bold" style:font-size-complex="12pt" style:font-style-complex="italic" style:font-weight-complex="bold"/>
    </style:style>
    <style:style style:name="T31" style:family="text">
      <style:text-properties fo:font-size="12pt" fo:font-style="italic" style:font-size-asian="12pt" style:font-style-asian="italic" style:font-size-complex="12pt" style:font-style-complex="italic"/>
    </style:style>
    <style:style style:name="T32" style:family="text">
      <style:text-properties fo:font-size="12pt" fo:font-style="italic" officeooo:rsid="001d59fb" style:font-size-asian="12pt" style:font-style-asian="italic" style:font-size-complex="12pt" style:font-style-complex="italic"/>
    </style:style>
    <style:style style:name="T33" style:family="text">
      <style:text-properties officeooo:rsid="00df46ad"/>
    </style:style>
    <style:style style:name="T34" style:family="text">
      <style:text-properties officeooo:rsid="0030c1a7"/>
    </style:style>
    <style:style style:name="T35" style:family="text">
      <style:text-properties officeooo:rsid="001d59fb"/>
    </style:style>
    <style:style style:name="T36" style:family="text">
      <style:text-properties officeooo:rsid="00665429"/>
    </style:style>
    <style:style style:name="T37" style:family="text">
      <style:text-properties officeooo:rsid="0028f48b"/>
    </style:style>
    <style:style style:name="T38" style:family="text">
      <style:text-properties officeooo:rsid="001f0cbe"/>
    </style:style>
    <style:style style:name="T39" style:family="text">
      <style:text-properties officeooo:rsid="002381eb"/>
    </style:style>
    <style:style style:name="T40" style:family="text">
      <style:text-properties officeooo:rsid="029d9fa9"/>
    </style:style>
    <style:style style:name="T41" style:family="text">
      <style:text-properties officeooo:rsid="0021a3d3"/>
    </style:style>
    <style:style style:name="T42" style:family="text">
      <style:text-properties officeooo:rsid="029fcdaa"/>
    </style:style>
    <style:style style:name="T43" style:family="text">
      <style:text-properties officeooo:rsid="029ed9c8"/>
    </style:style>
    <style:style style:name="T44" style:family="text">
      <style:text-properties officeooo:rsid="02a93f2f"/>
    </style:style>
    <style:style style:name="T45" style:family="text">
      <style:text-properties officeooo:rsid="02a0b3ca"/>
    </style:style>
    <style:style style:name="T46" style:family="text">
      <style:text-properties officeooo:rsid="02a99dd6"/>
    </style:style>
    <style:style style:name="T47" style:family="text">
      <style:text-properties officeooo:rsid="02a23e20"/>
    </style:style>
    <style:style style:name="T48" style:family="text">
      <style:text-properties officeooo:rsid="02a37928"/>
    </style:style>
    <style:style style:name="T49" style:family="text">
      <style:text-properties officeooo:rsid="02aac0d2"/>
    </style:style>
    <style:style style:name="T50" style:family="text">
      <style:text-properties officeooo:rsid="0219769b"/>
    </style:style>
    <style:style style:name="T51" style:family="text">
      <style:text-properties officeooo:rsid="02afd127"/>
    </style:style>
    <style:style style:name="T52" style:family="text">
      <style:text-properties officeooo:rsid="02a6f0dc"/>
    </style:style>
    <style:style style:name="T53" style:family="text">
      <style:text-properties officeooo:rsid="0217c10f"/>
    </style:style>
    <style:style style:name="T54" style:family="text">
      <style:text-properties officeooo:rsid="02a83cbc"/>
    </style:style>
    <style:style style:name="T55" style:family="text">
      <style:text-properties fo:font-size="14pt" officeooo:rsid="0013e755" style:font-size-asian="14pt" style:font-size-complex="14pt"/>
    </style:style>
    <style:style style:name="T56" style:family="text">
      <style:text-properties style:font-name="Noto Sans1" fo:font-style="normal" officeooo:rsid="002bb611" style:font-style-asian="normal" style:font-style-complex="normal"/>
    </style:style>
    <style:style style:name="T57" style:family="text">
      <style:text-properties style:font-name="Noto Sans1" fo:font-style="normal" officeooo:rsid="02ac4301" style:font-style-asian="normal" style:font-style-complex="normal"/>
    </style:style>
    <style:style style:name="T58" style:family="text">
      <style:text-properties style:font-name="Noto Sans1" fo:font-style="normal" officeooo:rsid="02a83cbc"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55">La metafisica di Aristotele</text:span></text:p>
      <text:p text:style-name="P21"><text:span text:style-name="T25">Non è facile dire cosa sia la metafisica, </text:span><text:span text:style-name="T26">la citazione di Hegel sull’argomento è molto eloquente: “</text:span><text:span text:style-name="T32">Metafisica, la parola davanti alla quale ognuno, più o meno si affretta a fuggire come davanti ad un appestato”</text:span></text:p>
      <text:p text:style-name="P17">La parola "metafisica" deriva da un titolo collettivo dei quattordici libri di Aristotele che <text:span text:style-name="T35">probabilmente</text:span> <text:span text:style-name="T36">ne </text:span>costituisc<text:span text:style-name="T35">ono</text:span> la Metafisica, <text:span text:style-name="T37">essendo</text:span> Aristotele stesso <text:span text:style-name="T37">a </text:span>non conosce<text:span text:style-name="T37">re questa </text:span>parola.</text:p>
      <text:p text:style-name="P17">Almeno cento anni dopo la morte di Aristotele, un curatore delle sue opere (con ogni probabilità, Andronico di Rodi) intitolò quei quattordici libri " <text:span text:style-name="T8">Ta meta ta phusika</text:span> " "quelli dopo i fisici", i fisici erano i libri contenuti in quella che oggi chiamiamo la Fisica di Aristotele. Il titolo probabilmente intendeva mettere in guardia gli studenti della filosofia di Aristotele dal tentare <text:span text:style-name="T38">l’approccio con</text:span> la Metafisica solo dopo aver padroneggiato "quelli fisici", i libri sulla natura o sul mondo naturale, vale a dire, sul cambiamento, perché il cambiamento è la caratteristica distintiva del mondo naturale.</text:p>
      <text:p text:style-name="P16"><text:span text:style-name="T37">Aristotele, a</text:span>veva <text:span text:style-name="T39">dato </text:span>quattro nomi <text:span text:style-name="T39">alla</text:span> branca della <text:span text:style-name="T35">sua </text:span>filosofia: “<text:span text:style-name="T8">prima filosofia</text:span>”, “<text:span text:style-name="T8">prima scienza”</text:span>, “<text:span text:style-name="T8">saggezza”</text:span> e “<text:span text:style-name="T8">teologia”</text:span> <text:span text:style-name="T35">che erano modi diversi per indicare la stessa disciplina: la metafisica. Questa disciplina aveva come obiettivo la comprensione profonda e completa della </text:span><text:soft-page-break/><text:span text:style-name="T35">realtà, indagando i principi e le cause più generali di tutte le cose.</text:span></text:p>
      <text:p text:style-name="P16"><text:span text:style-name="T40">Con il termine </text:span><text:span text:style-name="T9">p</text:span><text:span text:style-name="T8">rima filosofia</text:span>,<text:span text:style-name="T41"> non si deve </text:span><text:span text:style-name="T42">fraintendere</text:span><text:span text:style-name="T41"> </text:span><text:span text:style-name="T39">quel </text:span>ramo della filosofia che dovrebbe essere studiato per primo; <text:span text:style-name="T41">p</text:span>iuttosto, riguarda questioni che sono in un certo senso le più fondamentali o al più alto livello di generalità, <text:span text:style-name="T42">distinguendo</text:span> tra cose che sono "<text:span text:style-name="T8">meglio note a noi</text:span>" e cose che sono "<text:span text:style-name="T8">meglio note in se stesse</text:span>". <text:span text:style-name="T43">Questa distinzione, è centrale nel suo metodo in quanto </text:span><text:span text:style-name="T42">fa iniziare </text:span><text:span text:style-name="T43">l’indagine con le cose che ci sono più familiari o accessibili attraverso i sensi, per poi arrivare gradualmente alla conoscenza di principi e cause che sono ontologicamente più fondamentali, anche se inizialmente meno evidenti. Il suo approccio è </text:span><text:span text:style-name="T42">quindi </text:span><text:span text:style-name="T43">sia empirico che razionale: </text:span><text:span text:style-name="T44">si </text:span><text:span text:style-name="T43">parte dall'osservazione e dall'esperienza per poi elevarsi a una comprensione teorica e universale. </text:span>La descrizione di Aristotele <text:span text:style-name="T44">dello studio </text:span><text:span text:style-name="T2">dell'essere in quanto essere, </text:span><text:span text:style-name="T41">presuppone, come necessaria conseguenza logica, uno </text:span><text:span text:style-name="T10">studio</text:span><text:span text:style-name="T41">, un </text:span><text:span text:style-name="T10">argomento</text:span><text:span text:style-name="T41"> (l'essere) e un </text:span><text:span text:style-name="T10">modo</text:span><text:span text:style-name="T41"> in cui l'argomento è studiato (in quanto essere), </text:span>fornendo così il fondamento epistemologico per tutte le altre discipline. <text:span text:style-name="T45">In altri termini, l</text:span>a prima filosofia si dedica a indagare ciò che è assolutamente più generale, come l'esistenza stessa e il concetto di sostanza.</text:p>
      <text:p text:style-name="P16"><text:soft-page-break/><text:span text:style-name="T45">Altro concetto è la </text:span><text:span text:style-name="T11">p</text:span><text:span text:style-name="T8">rima </text:span><text:span text:style-name="T11">s</text:span><text:span text:style-name="T8">cienza,</text:span> <text:span text:style-name="T45">termine differente ma strettamente legato alla </text:span><text:span text:style-name="T44">p</text:span><text:span text:style-name="T45">rima filosofia. </text:span>Cosa intende<text:span text:style-name="T46">va</text:span> Aristotele con <text:span text:style-name="T44">p</text:span>rima <text:span text:style-name="T44">s</text:span>cienza? <text:span text:style-name="T37">Il f</text:span>ondamento di tutte le altre scienze considerat<text:span text:style-name="T47">e</text:span> <text:span text:style-name="T47">al</text:span>la base di altre discipline conoscitive <text:span text:style-name="T47">come </text:span><text:span text:style-name="T46">la </text:span>fisica <text:span text:style-name="T48">che studia i corpi naturali o la</text:span> biologia <text:span text:style-name="T48">che studia gli esseri viventi,</text:span> fornendo così il fondamento teorico su cui poggiano scienze più specifiche. <text:span text:style-name="T48"><text:s/></text:span><text:s/><text:span text:style-name="T48">L</text:span>a <text:span text:style-name="T46">p</text:span>rima <text:span text:style-name="T46">s</text:span>cienza <text:s/>aveva come oggetto di studio l'essere in quanto tale, <text:span text:style-name="T39">(ontologia) </text:span>ovvero ciò che è comune a tutte le cose esistenti.</text:p>
      <text:p text:style-name="P16"><text:span text:style-name="T49">Nella spiegazione sul perché delle cose, </text:span>Aristotele distingue quattro tipi di cause, <text:span text:style-name="T48">quella</text:span> <text:span text:style-name="T8">Formale</text:span>: la forma della cosa (lo stato di essere della cosa), <text:span text:style-name="T8">Materiale</text:span> o Sostrato: la materia di cui la cosa è fatta, <text:span text:style-name="T8">Motrice</text:span> o Efficiente: ciò che provoca il divenire (ciò che produce il cambiamento dello stato della cosa) <text:span text:style-name="T8">Finale</text:span>: lo scopo a cui tende la cosa (il punto finale verso cui la cosa è destinata). La metafisica, in quanto <text:span text:style-name="T49">p</text:span>rima <text:span text:style-name="T49">sc</text:span>ienza, si occupa in particolare delle cause formal<text:span text:style-name="T37">i</text:span> e final<text:span text:style-name="T37">i</text:span>, ovvero dell'essenza e dello scopo delle cose, <text:span text:style-name="T49">cause che sono legate alla comprensione della realtà come un tutto organizzato. </text:span><text:span text:style-name="T39">Per chiarire questo concetto, prendiamo </text:span><text:span text:style-name="T37">a prestito</text:span><text:span text:style-name="T39"> l’esempio offerto da Wikipedia: </text:span><text:span text:style-name="T50">i</text:span><text:span text:style-name="T39">mmaginiamo di voler fare in casa dei liquori. Utilizzeremo l'alcol in cui metteremo in infusione le bucce del frutto dal quale vorremo ricavare il liquore </text:span><text:span text:style-name="T48">di mandarino ad esempio</text:span><text:span text:style-name="T39">. </text:span></text:p>
      <text:p text:style-name="P16"><text:soft-page-break/><text:span text:style-name="T48">D</text:span><text:span text:style-name="T39">o</text:span><text:span text:style-name="T48">po</text:span><text:span text:style-name="T39"> un periodo di infusione nell'alcol, le bucce del nostro frutto avranno completamente perso il loro sapore che verificheremo essersi "trasferito" in quello che originariamente era solo alcol. Cosa è passato dalla buccia al liquido? Proprio l'essenza, la parte sostanziale </text:span><text:span text:style-name="T48">(</text:span><text:span text:style-name="T39">termine quanto mai aristotelico</text:span><text:span text:style-name="T48">) </text:span><text:span text:style-name="T39">della buccia del mandarino. L'essenza dell'essere, quella che Aristotele dice essere la parte fondamentale del sinolo, la forma che avrebbe potuto accogliere in sé ogni possibile essenza, rappresenta l'essere dell'essenza, o materia, il "supporto" che consente all'essenza dell'essere di esplicitarsi.</text:span></text:p>
      <text:p text:style-name="P17">Il liquore risulterà dunque costituito da un'essenza dell'essere, parte costitutiva primaria della sostanza, e dall'essere dell'essenza, il supporto di cui si è detto. La sostanza sarà <text:span text:style-name="T8">sinolo, </text:span><text:span text:style-name="T4">l’unione di materia e forma </text:span>che <text:span text:style-name="T51">costituisce il liquore di mandarino</text:span>. </text:p>
      <text:p text:style-name="P16"><text:span text:style-name="T52">Come si collegano </text:span>Saggezza <text:span text:style-name="T52">e Teologia con gli altri due rami della metafisica di Aristotele?</text:span></text:p>
      <text:p text:style-name="P16"><text:span text:style-name="T53">Aristotele definisce la saggezza come la forma più elevata di conoscenza, che combina l'intelletto teorico (la comprensione delle cause e dei principi primi) con una visione generale del mondo. Essa non si limita solo a conoscere fatti o dettagli specifici (che Aristotele chiamerebbe "</text:span><text:span text:style-name="T12">intelletto teorico</text:span><text:span text:style-name="T53">" o "</text:span><text:span text:style-name="T12">episteme</text:span><text:span text:style-name="T53">"), ma include anche una comprensione profonda delle cause e dei </text:span><text:soft-page-break/><text:span text:style-name="T53">principi fondamentali che governano la realtà. </text:span><text:span text:style-name="T51">Q</text:span><text:span text:style-name="T53">uesta conoscenza deve essere accompagnata da una visione generale del mondo, cioè, la capacità di vedere come tutte le diverse parti del sapere si collegano tra loro. In altre parole, un saggio è qualcuno che non solo sa tante cose, ma che comprende anche le connessioni tra queste conoscenze e le applica per ottenere una visione coerente e completa del mondo. In questo senso, la saggezza non è solo un obiettivo della metafisica, ma è anche il fondamento delle altre scienze teoriche, come la fisica e la matematica. </text:span></text:p>
      <text:p text:style-name="P16"><text:span text:style-name="T52">La </text:span>Teologia <text:span text:style-name="T54">rappresenta</text:span> lo studio dell'essere eterno e immutabile, cioè dell'Essere Supremo, identificato come il "Motore Immobile". Questo ramo della metafisica ha un carattere unico, poiché si occupa dell'aspetto più elevato della realtà, al di sopra delle cose materiali. La teologia si connette alla fisica, poiché il Motore Immobile è per Aristotele la causa prima del movimento nell'universo, e quindi offre una base ultima per comprendere la realtà fisica.</text:p>
      <text:p text:style-name="P16">Perché le cose si muovono e cambiano?</text:p>
      <text:p text:style-name="P22"><text:span text:style-name="Citation"><text:span text:style-name="T56">Egli osserva che tutto ciò che si muove è messo in moto da qualcos'altro. Questo principio, chiamato causalità del movimento, implica che ci sia sempre una causa dietro ogni movimento. Tuttavia, questa catena di movimenti e cause non può andare all'infinito (regressione infinita), </text:span></text:span><text:soft-page-break/><text:span text:style-name="Citation"><text:span text:style-name="T56">poiché ci deve essere una causa prima </text:span></text:span><text:span text:style-name="Citation"><text:span text:style-name="T57">e</text:span></text:span><text:span text:style-name="Citation"><text:span text:style-name="T56"> una spiegazione ultima che non dipenda da nient'altro.</text:span></text:span><text:span text:style-name="Citation"><text:span text:style-name="T5"> </text:span></text:span><text:span text:style-name="Citation"><text:span text:style-name="T56">Questo è ciò che Aristotele chiama il Motore Immobile </text:span></text:span><text:span text:style-name="Citation"><text:span text:style-name="T58">come la causa finale di tutto ciò che accade nell'universo. L</text:span></text:span><text:span text:style-name="Citation"><text:span text:style-name="T56">a teologia </text:span></text:span><text:span text:style-name="Citation"><text:span text:style-name="T58">in questo senso </text:span></text:span><text:span text:style-name="Citation"><text:span text:style-name="T56">funge anche da culmine della "prima scienza", poiché studia ciò che è più nobile e divino, andando oltre le scienze empiriche verso una conoscenza perfetta e assoluta.</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adornments="Normale"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erif" fo:font-family="'Noto Serif'" style:font-style-name="Normale" style:font-family-generic="roman" style:font-pitch="variable" fo:font-size="13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oto Serif" fo:font-family="'Noto Serif'" style:font-style-name="Normale" style:font-family-generic="roman" style:font-pitch="variable" fo:font-size="12pt" fo:font-weight="normal" style:font-size-asian="14pt" style:font-weight-asian="bold" style:font-size-complex="14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499cm" fo:margin-bottom="1.499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8T11:35:03.377970742</meta:creation-date>
    <dc:date>2026-01-31T16:40:37.811071965</dc:date>
    <dc:creator>corrado tafaro</dc:creator>
    <meta:editing-duration>PT38M6S</meta:editing-duration>
    <meta:editing-cycles>4</meta:editing-cycles>
    <meta:generator>LibreOffice/24.2.7.2$Linux_X86_64 LibreOffice_project/420$Build-2</meta:generator>
    <meta:document-statistic meta:table-count="0" meta:image-count="0" meta:object-count="0" meta:page-count="6" meta:paragraph-count="15" meta:word-count="1104" meta:character-count="7147" meta:non-whitespace-character-count="6052"/>
  </office:meta>
</office:document-meta>
</file>