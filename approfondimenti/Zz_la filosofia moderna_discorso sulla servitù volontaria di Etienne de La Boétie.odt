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99cm" fo:margin-bottom="0cm" style:contextual-spacing="false" fo:line-height="100%" fo:text-align="justify" style:justify-single-word="false"/>
      <style:text-properties style:font-name="Liberation Serif" fo:font-size="14pt" style:font-size-asian="14pt" style:font-size-complex="14pt"/>
    </style:style>
    <style:style style:name="P2" style:family="paragraph" style:parent-style-name="Standard">
      <style:paragraph-properties fo:line-height="115%" fo:text-align="justify" style:justify-single-word="false"/>
      <style:text-properties style:font-name="Liberation Serif" fo:font-size="14pt" style:font-size-asian="14pt" style:font-size-complex="14pt"/>
    </style:style>
    <style:style style:name="P3" style:family="paragraph" style:parent-style-name="Standard">
      <style:paragraph-properties fo:margin-top="0.199cm" fo:margin-bottom="0cm" style:contextual-spacing="false" fo:line-height="115%" fo:text-align="justify" style:justify-single-word="false"/>
      <style:text-properties style:font-name="Liberation Serif" fo:font-size="14pt" style:font-size-asian="14pt" style:font-size-complex="14pt"/>
    </style:style>
    <style:style style:name="P4" style:family="paragraph" style:parent-style-name="Standard">
      <style:paragraph-properties fo:margin-top="0.101cm" fo:margin-bottom="0cm" style:contextual-spacing="false" fo:line-height="115%" fo:text-align="justify" style:justify-single-word="false"/>
      <style:text-properties style:font-name="Liberation Serif" fo:font-size="14pt" style:font-size-asian="14pt" style:font-size-complex="14pt"/>
    </style:style>
    <style:style style:name="P5"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77336" style:font-size-asian="14pt" style:font-size-complex="14pt"/>
    </style:style>
    <style:style style:name="P6"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77336" style:font-size-asian="14pt" style:font-size-complex="14pt"/>
    </style:style>
    <style:style style:name="P7" style:family="paragraph" style:parent-style-name="Standard">
      <style:paragraph-properties fo:line-height="115%" fo:text-align="justify" style:justify-single-word="false"/>
      <style:text-properties style:font-name="Liberation Serif" fo:font-size="14pt" officeooo:paragraph-rsid="001db648" style:font-size-asian="14pt" style:font-size-complex="14pt"/>
    </style:style>
    <style:style style:name="P8" style:family="paragraph" style:parent-style-name="Standard">
      <style:paragraph-properties fo:line-height="115%" fo:text-align="justify" style:justify-single-word="false"/>
      <style:text-properties style:font-name="Liberation Serif" fo:font-size="14pt" officeooo:paragraph-rsid="00183fd7"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83fd7" style:font-size-asian="14pt" style:font-size-complex="14pt"/>
    </style:style>
    <style:style style:name="P10"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83fd7" style:font-size-asian="14pt" style:font-size-complex="14pt"/>
    </style:style>
    <style:style style:name="P11"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9d5d4" style:font-size-asian="14pt" style:font-size-complex="14pt"/>
    </style:style>
    <style:style style:name="P12"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9d5d4" style:font-size-asian="14pt" style:font-size-complex="14pt"/>
    </style:style>
    <style:style style:name="P13" style:family="paragraph" style:parent-style-name="Standard">
      <style:paragraph-properties fo:line-height="115%" fo:text-align="justify" style:justify-single-word="false"/>
      <style:text-properties style:font-name="Liberation Serif" fo:font-size="14pt" officeooo:paragraph-rsid="001baa7c" style:font-size-asian="14pt" style:font-size-complex="14pt"/>
    </style:style>
    <style:style style:name="P14"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baa7c" style:font-size-asian="14pt" style:font-size-complex="14pt"/>
    </style:style>
    <style:style style:name="P15"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baa7c" style:font-size-asian="14pt" style:font-size-complex="14pt"/>
    </style:style>
    <style:style style:name="P16"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83fd7" officeooo:paragraph-rsid="00183fd7" style:font-size-asian="14pt" style:font-size-complex="14pt"/>
    </style:style>
    <style:style style:name="P17"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e1879" style:font-size-asian="14pt" style:font-size-complex="14pt"/>
    </style:style>
    <style:style style:name="P18" style:family="paragraph" style:parent-style-name="Standard">
      <style:paragraph-properties fo:margin-top="0.101cm" fo:margin-bottom="0cm" style:contextual-spacing="false" fo:line-height="115%" fo:text-align="justify" style:justify-single-word="false"/>
      <style:text-properties style:font-name="Liberation Serif" fo:font-size="14pt" style:font-size-asian="14pt" style:font-size-complex="14pt"/>
    </style:style>
    <style:style style:name="P19" style:family="paragraph" style:parent-style-name="Standard">
      <style:paragraph-properties fo:line-height="115%" fo:text-align="justify" style:justify-single-word="false"/>
      <style:text-properties style:font-name="Liberation Serif" fo:font-size="14pt" officeooo:rsid="001e1879" officeooo:paragraph-rsid="001e1879" style:font-size-asian="14pt" style:font-size-complex="14pt"/>
    </style:style>
    <style:style style:name="P20" style:family="paragraph" style:parent-style-name="Standard">
      <style:paragraph-properties fo:margin-top="0.101cm" fo:margin-bottom="0cm" style:contextual-spacing="false" fo:line-height="115%" fo:text-align="justify" style:justify-single-word="false"/>
      <style:text-properties style:font-name="Liberation Serif" fo:font-size="14pt" officeooo:rsid="001e1879" officeooo:paragraph-rsid="001e1879" style:font-size-asian="14pt" style:font-size-complex="14pt"/>
    </style:style>
    <style:style style:name="P21" style:family="paragraph" style:parent-style-name="Standard">
      <style:paragraph-properties fo:margin-top="0.199cm" fo:margin-bottom="0cm" style:contextual-spacing="false" fo:line-height="115%" fo:text-align="justify" style:justify-single-word="false"/>
      <style:text-properties style:font-name="Liberation Serif" fo:font-size="14pt" officeooo:rsid="001e1879" officeooo:paragraph-rsid="001e1879" style:font-size-asian="14pt" style:font-size-complex="14pt"/>
    </style:style>
    <style:style style:name="P22" style:family="paragraph" style:parent-style-name="Standard">
      <style:paragraph-properties fo:margin-top="0.199cm" fo:margin-bottom="0cm" style:contextual-spacing="false" fo:line-height="115%" fo:text-align="center" style:justify-single-word="false"/>
      <style:text-properties style:font-name="Liberation Serif" fo:font-size="14pt" officeooo:rsid="001e1879" officeooo:paragraph-rsid="001e1879" style:font-size-asian="14pt" style:font-size-complex="14pt"/>
    </style:style>
    <style:style style:name="P23" style:family="paragraph" style:parent-style-name="Standard">
      <style:paragraph-properties fo:line-height="115%" fo:text-align="justify" style:justify-single-word="false"/>
      <style:text-properties style:font-name="Liberation Serif" fo:font-size="14pt" officeooo:rsid="00202c59" officeooo:paragraph-rsid="00202c59" style:font-size-asian="14pt" style:font-size-complex="14pt"/>
    </style:style>
    <style:style style:name="P24" style:family="paragraph" style:parent-style-name="Standard">
      <style:paragraph-properties fo:margin-top="0.101cm" fo:margin-bottom="0cm" style:contextual-spacing="false" fo:line-height="100%" fo:text-align="center" style:justify-single-word="false"/>
      <style:text-properties style:font-name="Liberation Serif" fo:font-size="12pt" style:font-size-asian="12pt" style:font-size-complex="12pt"/>
    </style:style>
    <style:style style:name="P25" style:family="paragraph" style:parent-style-name="Standard">
      <style:paragraph-properties fo:line-height="115%" fo:text-align="center" style:justify-single-word="false"/>
      <style:text-properties style:font-name="Liberation Serif" fo:font-size="16pt" officeooo:paragraph-rsid="001f14ca" style:font-size-asian="16pt" style:font-size-complex="16pt"/>
    </style:style>
    <style:style style:name="P26" style:family="paragraph" style:parent-style-name="Standard">
      <style:paragraph-properties fo:line-height="100%" fo:text-align="center" style:justify-single-word="false"/>
      <style:text-properties style:font-name="Liberation Serif" fo:font-size="16pt" officeooo:paragraph-rsid="001f14ca" style:font-size-asian="16pt" style:font-size-complex="16pt"/>
    </style:style>
    <style:style style:name="T1" style:family="text">
      <style:text-properties officeooo:rsid="001e1879"/>
    </style:style>
    <style:style style:name="T2" style:family="text">
      <style:text-properties fo:font-size="13pt" officeooo:rsid="001db648" style:font-size-asian="13pt" style:font-size-complex="13pt"/>
    </style:style>
    <style:style style:name="T3" style:family="text">
      <style:text-properties fo:font-style="italic" style:font-style-asian="italic" style:font-style-complex="italic"/>
    </style:style>
    <style:style style:name="T4" style:family="text">
      <style:text-properties officeooo:rsid="001f14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Étienne de La Boétie </text:p>
      <text:p text:style-name="P26"><text:span text:style-name="T2">(filosofo, scrittore, politico e giurista francese 1530-1563)</text:span></text:p>
      <text:p text:style-name="P24">Discorso sulla servitù volontaria (Discours de la servitude volontaire) </text:p>
      <text:p text:style-name="P17"><text:span text:style-name="T1">Introduzione</text:span></text:p>
      <text:p text:style-name="P20">Étienne de La Boétie scrisse il suo Discorso a metà del XVI secolo, ma la sua analisi del potere sembra quasi un commento in tempo reale alla politica contemporanea.</text:p>
      <text:p text:style-name="P20">Il punto centrale di La Boétie non è tanto la cattiveria del tiranno, quanto la complicità degli oppressi. Lui si chiede: perché milioni di persone obbediscono a uno solo, quando basterebbe smettere di sostenerlo perché lui crolli?</text:p>
      <text:p text:style-name="P19">Ecco alcuni punti di contatto tra il pensiero di La Boétie e il fenomeno politico <text:span text:style-name="T4">di oggi: Donald </text:span>Trump.</text:p>
      <text:p text:style-name="P21">1. Il fascino dell'uomo forte</text:p>
      <text:p text:style-name="P20">La Boétie nota che il popolo spesso si innamora di una figura che incarna forza e decisione. Non è una sottomissione forzata con le armi, ma un'identificazione psicologica.</text:p>
      <text:p text:style-name="P19">Nel pensiero di La Boétie: Il tiranno è spesso un uomo solo, spesso "il più codardo e femmineo della nazione", che trae forza solo da quella che il popolo gli delega.</text:p>
      <text:p text:style-name="P20">Oggi: Molti elettori percepiscono il leader come un "campione" che combatte per loro contro le élite, finendo <text:soft-page-break/>per concedergli una fiducia che scavalca le istituzioni democratiche tradizionali.</text:p>
      <text:p text:style-name="P21">2. "Panem et Circenses" (Divertimenti e distrazioni)</text:p>
      <text:p text:style-name="P20">L'autore francese spiega che i tiranni usano "teatri, giochi, farse, spettacoli" per addormentare i sudditi.</text:p>
      <text:p text:style-name="P20">L'analogia: Oggi la politica è diventata intrattenimento puro. I social media, i comizi-spettacolo e il linguaggio iperbolico fungono da moderni "giochi gladiatorii" che mantengono il pubblico in uno stato di eccitazione costante, distogliendo l'attenzione dalla perdita di diritti o dalle complessità della gestione del potere.</text:p>
      <text:p text:style-name="P21">3. La piramide della servitù</text:p>
      <text:p text:style-name="P20">Forse l'intuizione più brillante di La Boétie è che il potere non si regge sulla forza, ma su una catena di interessi.</text:p>
      <text:p text:style-name="P20">La teoria: Il tiranno ha cinque o sei complici; questi ne hanno seicento sotto di loro, che a loro volta ne controllano seimila. Ognuno accetta di servire per poter, a sua volta, dominare qualcun altro o trarre un profitto economico.</text:p>
      <text:p text:style-name="P20">L'applicazione: Questo spiega come si crei una base elettorale e una classe dirigente (anche economica) che vede nel leader un mezzo per mantenere i propri privilegi o per sentirsi parte di una gerarchia di potere.</text:p>
      <text:p text:style-name="P19"/>
      <text:p text:style-name="P19"/>
      <text:p text:style-name="P19"><text:soft-page-break/>Una riflessione sulla "Volontarietà"</text:p>
      <text:p text:style-name="P20">La Boétie conclude che la libertà non va conquistata con la violenza, ma semplicemente desiderata.</text:p>
      <text:p text:style-name="P22">"<text:span text:style-name="T3">Siate risoluti a non servire più, ed eccovi liberi</text:span>."</text:p>
      <text:p text:style-name="P21">Il paradosso del voto democratico è che, in questo caso, la "servitù" (se così vogliamo chiamare la delega di potere a un leader populista) non è imposta da un colpo di stato, ma è espressamente scelta. Questo rende l'opera di La Boétie ancora più attuale: ci ricorda che la democrazia può essere il luogo in cui un popolo decide, consapevolmente, di rinunciare a parte della propria complessità critica in favore di una narrazione semplificata e autoritaria.</text:p>
      <text:p text:style-name="P20">È affascinante come un testo di quasi 500 anni fa riesca a descrivere così bene la "stanchezza" delle democrazie moderne.</text:p>
      <text:p text:style-name="P19"/>
      <text:p text:style-name="P23">Étienne de La Boétie:</text:p>
      <text:p text:style-name="P4"><text:span text:style-name="T3">«Vorrei solo riuscire a comprendere come mai tanti uomini, tanti villaggi e città, tante nazioni a volte, sopportano un tiranno che non ha alcuna forza se non quella che gli viene data, non ha potere di nuocere se non in quanto viene tollerato. Da dove ha potuto prendere tanti occhi per spiarvi se non glieli avete prestati voi? come può avere tante mani per prendervi se </text:span><text:soft-page-break/><text:span text:style-name="T3">non è da voi che le ha ricevute? Siate dunque decisi a non servire più e sarete liberi!»</text:span></text:p>
      <text:p text:style-name="P3">Questo testo esplora il paradosso della servitù volontaria, interrogandosi sul motivo per cui intere nazioni scelgano di sottomettersi a un singolo oppressore privo di un reale potere intrinseco. L'autore argomenta che l'autorità di un tiranno non è assoluta, ma deriva interamente dalla complicità e dal consenso di coloro che subiscono il suo dominio. Attraverso una serie di domande retoriche, viene evidenziato come il popolo fornisca al despota gli strumenti stessi della propria oppressione, agendo come i suoi occhi e le sue mani. Il messaggio centrale è un invito all'emancipazione: la vera libertà non richiede violenza, ma la semplice e ferma scelta di non servire più il potere.</text:p>
      <text:p text:style-name="P4">Il concetto di “servitù volontaria” rappresenta uno dei paradossi più profondi della filosofia politica e antropologica, centrato sulla domanda: perché i popoli acconsentono alla propria oppressione?</text:p>
      <text:p text:style-name="P4">Basandosi sui testi forniti e sulla nostra conversazione, la servitù volontaria può essere analizzata attraverso tre direttrici fondamentali:</text:p>
      <text:p text:style-name="P3">1. Il potere del Tiranno come "prestito" collettivo</text:p>
      <text:p text:style-name="P4">Il nucleo del problema risiede nel fatto che il tiranno, pur essendo un singolo individuo, esercita un potere immenso solo perché gli è stato concesso dai sudditi <text:soft-page-break/>stessi. Come evidenziato dalle fonti, un tiranno "non ha alcuna forza se non quella che gli viene data" e non ha potere di nuocere se non perché viene tollerato dalle nazioni che sopportano il suo dominio. </text:p>
      <text:p text:style-name="P5">La delega degli strumenti di oppressione:</text:p>
      <text:p text:style-name="P5">Il potere del despota è fatto degli occhi e delle mani dei cittadini: "Da dove ha potuto prendere tanti occhi per spiarvi se non glieli avete prestati voi? come può avere tante mani per prendervi se non è da voi che le ha ricevute?".</text:p>
      <text:p text:style-name="P6">La chiave della liberazione:</text:p>
      <text:p text:style-name="P5">La soluzione proposta è di una semplicità radicale: non è necessario combattere il tiranno con la forza, ma è sufficiente smettere di sostenerlo. "Siate dunque decisi a non servire più e sarete liberi!".</text:p>
      <text:p text:style-name="P3">2. La conoscenza come via verso l'indipendenza</text:p>
      <text:p text:style-name="P4">La servitù volontaria è spesso alimentata dalla dipendenza dagli eventi esterni e dalle percezioni sensibili. In questo senso, la filosofia di Spinoza offre una via d'uscita intellettuale.</text:p>
      <text:p text:style-name="P7">Libertà come autonomia della mente: </text:p>
      <text:p text:style-name="P7">Si è liberi quando non si dipende da ciò che accade fuori di noi e quando la mente "governa pienamente la propria conoscenza". </text:p>
      <text:p text:style-name="P6">L'uso della ragione: </text:p>
      <text:p text:style-name="P5"><text:soft-page-break/>Chi vive solo di percezioni sensibili rimane prigioniero del mutare degli eventi; al contrario, chi esercita la ragione partecipa a una dimensione di stabilità e di "eternità" già in questa vita. La conoscenza adeguata rompe le catene della servitù perché permette al soggetto di non essere più manipolato attraverso le passioni o la paura.</text:p>
      <text:p text:style-name="P3">3. La decostruzione delle "strutture invarianti"</text:p>
      <text:p text:style-name="P4">Il legame tra servitù e potere può essere compreso anche attraverso l'intuizione dei sofisti.</text:p>
      <text:p text:style-name="P6">La frattura tra soggetto e oggetto:</text:p>
      <text:p text:style-name="P5">I sofisti mettono in discussione l'idea che la realtà (e quindi le strutture di potere) possieda delle "strutture invarianti" che l'uomo deve passivamente accettare. </text:p>
      <text:p text:style-name="P8">Potere come costruzione:</text:p>
      <text:p text:style-name="P9">Se la realtà non ha strutture fisse, allora anche la gerarchia sociale che vede un popolo sottomesso a un tiranno non è un dato di natura, ma una costruzione che può essere discernuta, criticata e infine abbattuta.</text:p>
      <text:p text:style-name="P3">Collegamenti con la nostra conversazione.</text:p>
      <text:p text:style-name="P2">Questa analisi si integra perfettamente con i temi nietzschiani discussi in precedenza.</text:p>
      <text:p text:style-name="P9">La Morale degli schiavi:</text:p>
      <text:p text:style-name="P9">La servitù volontaria è la base della "morale del gregge". Nietzsche svelava come i deboli avessero trasformato la <text:soft-page-break/>loro sottomissione in una "scelta morale" virtuosa, nascondendo la necessità dietro il paravento della "bontà".</text:p>
      <text:p text:style-name="P10">Appartenere a se stessi:</text:p>
      <text:p text:style-name="P9">Come abbiamo visto, "saper appartenere a se stessi" è la prova più dura di indipendenza. La servitù volontaria finisce nel momento in cui l'individuo smette di essere un "anello passivo" di una catena e diventa un “creatore di valori”, capace di dire "no" a ciò che è "altro" da sé.</text:p>
      <text:p text:style-name="P3">In sintesi, la servitù volontaria è una condizione psicologica prima che politica: il popolo è complice del proprio oppressore finché non riconosce che il potere di quest'ultimo è un'illusione alimentata dal proprio consenso e dalla propria ignoranza.</text:p>
      <text:p text:style-name="P16">Riflessione:</text:p>
      <text:p text:style-name="P9">Possiamo immaginare il tiranno come un gigante di cartapesta che torreggia sulla folla: sembra invincibile e spaventoso, ma solo perché migliaia di persone sono inginocchiate a sostenerne le gambe. Non appena la folla decide di alzarsi in piedi, il gigante non cade perché è stato abbattuto, ma semplicemente perché ha smesso di essere sorretto.</text:p>
      <text:p text:style-name="P4">Il tema del “consenso popolare” emerge non come un semplice atto politico, ma come un complesso fenomeno psicologico e conoscitivo. Esso rappresenta la base su cui si regge ogni potere, ma anche il terreno su cui si gioca la <text:soft-page-break/>sfida tra l'autonomia del singolo e l'asservimento al "gregge".</text:p>
      <text:p text:style-name="P3">1. Il Consenso come fondamento della Tirannia</text:p>
      <text:p text:style-name="P4">Il consenso popolare è il motore paradossale che permette a un singolo individuo di dominare intere nazioni. Come evidenziato dalle fonti, un tiranno non possiede alcuna forza intrinseca, se non quella che gli viene "prestata" dai cittadini stessi.</text:p>
      <text:p text:style-name="P11">La delega del potere:</text:p>
      <text:p text:style-name="P12">Gli strumenti di oppressione del tiranno — gli "occhi" per spiare, le "mani" per colpire — sono ricevuti direttamente dal popolo che accetta di servirlo.</text:p>
      <text:p text:style-name="P11">La revoca del consenso:</text:p>
      <text:p text:style-name="P12">Il potere del despota non crolla necessariamente attraverso una lotta violenta, ma può dissolversi semplicemente smettendo di sostenerlo: "Siate dunque decisi a non servire più e sarete liberi!". In questo senso, il consenso è una forma di "servitù volontaria" che può essere interrotta con un atto di volontà collettiva.</text:p>
      <text:p text:style-name="P4">2. Consenso e Costruzione della Realtà</text:p>
      <text:p text:style-name="P4">Da una prospettiva filosofica più ampia, il consenso può essere visto come lo strumento che stabilizza le strutture sociali.</text:p>
      <text:p text:style-name="P11">La frattura tra soggetto e oggetto:</text:p>
      <text:p text:style-name="P12"><text:soft-page-break/>I sofisti suggeriscono che la realtà non possieda "strutture invarianti" che l'uomo possa discernere oggettivamente. </text:p>
      <text:p text:style-name="P11">La realtà come accordo:</text:p>
      <text:p text:style-name="P12">Se non esistono verità assolute, l'ordine politico e sociale (e quindi il potere) non è un dato di natura, ma il risultato di una convenzione o di un consenso. Mettere in discussione questo consenso significa incrinare la pretesa di oggettività di chi governa.</text:p>
      <text:p text:style-name="P1">3. Conoscenza Adeguata vs. Reattività del Gregge</text:p>
      <text:p text:style-name="P4">Il consenso può nascere da due fonti molto diverse, che riflettono la distinzione tra l'uomo autonomo e l'uomo asservito:</text:p>
      <text:p text:style-name="P4">Consenso basato sulle percezioni sensibili: Spesso il consenso popolare è manipolato attraverso le emozioni, la paura o il mutare degli eventi esterni. Chi vive solo di queste percezioni rimane prigioniero e non lascia "nulla di sé". Questo si ricollega a quella che Nietzsche chiama "morale dei servi", dove il consenso è un atto reattivo nato dal risentimento e dal bisogno di protezione del gregge.</text:p>
      <text:p text:style-name="P11">Consenso basato sulla Ragione:</text:p>
      <text:p text:style-name="P12">La vera libertà, come suggerito da Spinoza, risiede nel raggiungimento di una "conoscenza adeguata". Un consenso che nasca dalla ragione e dalla stabilità del pensiero è un atto di libertà perché non dipende da ciò che accade fuori di noi. In questo caso, il legame sociale <text:soft-page-break/>non è una sottomissione, ma una partecipazione consapevole a una dimensione di "eternità" e verità.</text:p>
      <text:p text:style-name="P3">4. Il rischio del livellamento.</text:p>
      <text:p text:style-name="P4">Come abbiamo discusso analizzando Nietzsche e Seneca, il consenso popolare porta con sé un rischio intrinseco.</text:p>
      <text:p text:style-name="P13">La "Volta di Pietre":</text:p>
      <text:p text:style-name="P14">Se il consenso è inteso come sostegno reciproco (Seneca), esso tiene insieme la società. Tuttavia, se questo consenso diventa la "menzogna dell'uguaglianza", esso agisce come un veleno che livella l'umanità, abbattendo il pathos della distanza necessario per la crescita di individui superiori.</text:p>
      <text:p text:style-name="P15">Appartenere a se stessi:</text:p>
      <text:p text:style-name="P14">Il consenso popolare diventa patologico quando impedisce all'individuo di "appartenere a se stesso". La prova più dura di indipendenza consiste nel saper dire di "no" al consenso della massa quando questo nasce da un impulso di negazione della vita.</text:p>
      <text:p text:style-name="P3">In sintesi, il consenso popolare è la forza che “edifica e mantiene” le cattedrali del potere, ma è anche il velo che può essere squarciato attraverso la conoscenza e la riappropriazione della propria volontà.</text:p>
      <text:p text:style-name="P3">La resistenza non violenta, emerge non come una forma di passività, ma come un atto di estrema potenza intellettuale e volontà creativa. Essa si fonda sulla <text:soft-page-break/>consapevolezza che il potere oppressivo non è una realtà oggettiva e immutabile, ma una costruzione che dipende interamente dal consenso e dalla cooperazione di chi lo subisce.</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2-14T17:12:20.016594454</meta:creation-date>
    <dc:date>2026-04-05T16:39:06.401077692</dc:date>
    <dc:creator>corrado tafaro</dc:creator>
    <meta:editing-duration>PT1H4M32S</meta:editing-duration>
    <meta:editing-cycles>8</meta:editing-cycles>
    <meta:generator>LibreOffice/24.2.7.2$Linux_X86_64 LibreOffice_project/420$Build-2</meta:generator>
    <meta:document-statistic meta:table-count="0" meta:image-count="0" meta:object-count="0" meta:page-count="11" meta:paragraph-count="81" meta:word-count="1914" meta:character-count="12079" meta:non-whitespace-character-count="10236"/>
  </office:meta>
</office:document-meta>
</file>