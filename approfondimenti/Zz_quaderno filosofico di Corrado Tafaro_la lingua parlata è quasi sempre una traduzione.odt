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Heading_20_4" style:master-page-name="Standard">
      <style:paragraph-properties fo:text-align="center" style:justify-single-word="false" style:page-number="105" fo:break-before="page"/>
      <style:text-properties style:font-name="Liberation Serif" fo:font-size="16pt" fo:font-style="normal" fo:font-weight="normal" officeooo:paragraph-rsid="001637f1" style:font-size-asian="16pt" style:font-style-asian="normal" style:font-weight-asian="normal" style:font-size-complex="16pt" style:font-style-complex="normal" style:font-weight-complex="normal"/>
    </style:style>
    <style:style style:name="P2"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72b754" officeooo:paragraph-rsid="001637f1" style:font-size-asian="14pt" style:font-size-complex="14pt"/>
    </style:style>
    <style:style style:name="P3" style:family="paragraph" style:parent-style-name="Standard">
      <style:paragraph-properties fo:line-height="115%" fo:text-align="justify" style:justify-single-word="false"/>
      <style:text-properties style:font-name="Liberation Serif" fo:font-size="14pt" officeooo:rsid="001a31d5" officeooo:paragraph-rsid="001637f1" style:font-size-asian="14pt" style:font-size-complex="14pt"/>
    </style:style>
    <style:style style:name="P4"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a31d5" officeooo:paragraph-rsid="001637f1" style:font-size-asian="14pt" style:font-size-complex="14pt"/>
    </style:style>
    <style:style style:name="P5"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1a31d5" officeooo:paragraph-rsid="001637f1" style:font-size-asian="14pt" style:font-size-complex="14pt"/>
    </style:style>
    <style:style style:name="P6"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1a31d5" officeooo:paragraph-rsid="001637f1" style:font-size-asian="14pt" style:font-size-complex="14pt"/>
    </style:style>
    <style:style style:name="P7" style:family="paragraph" style:parent-style-name="Standard">
      <style:paragraph-properties fo:line-height="115%" fo:text-align="justify" style:justify-single-word="false"/>
      <style:text-properties style:font-name="Liberation Serif" fo:font-size="14pt" officeooo:rsid="0074e75b" officeooo:paragraph-rsid="001637f1" style:font-size-asian="14pt" style:font-size-complex="14pt"/>
    </style:style>
    <style:style style:name="P8"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74f65b" officeooo:paragraph-rsid="001637f1" style:font-size-asian="14pt" style:font-size-complex="14pt"/>
    </style:style>
    <style:style style:name="P9"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7a59b5" officeooo:paragraph-rsid="001637f1" style:font-size-asian="14pt" style:font-size-complex="14pt"/>
    </style:style>
    <style:style style:name="P10" style:family="paragraph" style:parent-style-name="Standard">
      <style:paragraph-properties fo:line-height="115%" fo:text-align="justify" style:justify-single-word="false"/>
      <style:text-properties style:font-name="Liberation Serif" fo:font-size="14pt" officeooo:rsid="007f3d0b" officeooo:paragraph-rsid="001637f1" style:font-size-asian="14pt" style:font-size-complex="14pt"/>
    </style:style>
    <style:style style:name="P11" style:family="paragraph" style:parent-style-name="Standard">
      <style:paragraph-properties fo:margin-top="0cm" fo:margin-bottom="0cm" style:contextual-spacing="false" fo:line-height="115%" fo:text-align="justify" style:justify-single-word="false"/>
      <style:text-properties style:font-name="Liberation Serif" fo:font-size="14pt" officeooo:paragraph-rsid="001637f1" style:font-size-asian="14pt" style:font-size-complex="14pt"/>
    </style:style>
    <style:style style:name="P12"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637f1" style:font-size-asian="14pt" style:font-size-complex="14pt"/>
    </style:style>
    <style:style style:name="P13"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1637f1" style:font-size-asian="14pt" style:font-size-complex="14pt"/>
    </style:style>
    <style:style style:name="P14"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85c76e" officeooo:paragraph-rsid="001637f1" style:font-size-asian="14pt" style:font-size-complex="14pt"/>
    </style:style>
    <style:style style:name="P15"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85c76e" officeooo:paragraph-rsid="001637f1" style:font-size-asian="14pt" style:font-size-complex="14pt"/>
    </style:style>
    <style:style style:name="P16"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8b333a" officeooo:paragraph-rsid="001637f1" style:font-size-asian="14pt" style:font-size-complex="14pt"/>
    </style:style>
    <style:style style:name="P17"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8b333a" officeooo:paragraph-rsid="001637f1" style:font-size-asian="14pt" style:font-size-complex="14pt"/>
    </style:style>
    <style:style style:name="P18"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8b333a" officeooo:paragraph-rsid="001637f1" style:font-size-asian="14pt" style:font-size-complex="14pt"/>
    </style:style>
    <style:style style:name="P19" style:family="paragraph" style:parent-style-name="Standard">
      <style:paragraph-properties fo:margin-top="0.199cm" fo:margin-bottom="0cm" style:contextual-spacing="false" fo:line-height="115%" fo:text-align="center" style:justify-single-word="false"/>
      <style:text-properties style:font-name="Liberation Serif" fo:font-size="16pt" officeooo:rsid="007a59b5" officeooo:paragraph-rsid="001637f1" style:font-size-asian="16pt" style:font-size-complex="16pt"/>
    </style:style>
    <style:style style:name="P20" style:family="paragraph" style:parent-style-name="Standard">
      <style:paragraph-properties fo:margin-top="0.101cm" fo:margin-bottom="0cm" style:contextual-spacing="false" fo:line-height="115%" fo:text-align="center" style:justify-single-word="false"/>
      <style:text-properties style:font-name="Liberation Serif" fo:font-size="16pt" officeooo:rsid="008297f5" officeooo:paragraph-rsid="001637f1" style:font-size-asian="16pt" style:font-size-complex="16pt"/>
    </style:style>
    <style:style style:name="P21" style:family="paragraph" style:parent-style-name="Standard">
      <style:paragraph-properties fo:margin-top="0.101cm" fo:margin-bottom="0cm" style:contextual-spacing="false" fo:line-height="115%" fo:text-align="center" style:justify-single-word="false"/>
      <style:text-properties style:font-name="Liberation Serif" fo:font-size="16pt" officeooo:paragraph-rsid="001637f1" style:font-size-asian="16pt" style:font-size-complex="16pt"/>
    </style:style>
    <style:style style:name="P22" style:family="paragraph" style:parent-style-name="Standard">
      <style:paragraph-properties fo:margin-top="0.3cm" fo:margin-bottom="0cm" style:contextual-spacing="false" fo:line-height="90%" fo:text-align="center" style:justify-single-word="false"/>
      <style:text-properties style:font-name="Liberation Serif" fo:font-size="16pt" officeooo:paragraph-rsid="001637f1" style:font-size-asian="16pt" style:font-size-complex="16pt"/>
    </style:style>
    <style:style style:name="P23" style:family="paragraph" style:parent-style-name="Standard">
      <style:paragraph-properties fo:margin-top="0.101cm" fo:margin-bottom="0cm" style:contextual-spacing="false" fo:line-height="90%" fo:text-align="center" style:justify-single-word="false"/>
      <style:text-properties style:font-name="Liberation Serif" fo:font-size="16pt" officeooo:paragraph-rsid="001637f1" style:font-size-asian="16pt" style:font-size-complex="16pt"/>
    </style:style>
    <style:style style:name="P24" style:family="paragraph" style:parent-style-name="Standard">
      <style:paragraph-properties fo:margin-top="0.101cm" fo:margin-bottom="0cm" style:contextual-spacing="false" fo:line-height="115%" fo:text-align="center" style:justify-single-word="false"/>
      <style:text-properties style:font-name="Liberation Serif" fo:font-size="16pt" officeooo:rsid="008b333a" officeooo:paragraph-rsid="001637f1" style:font-size-asian="16pt" style:font-size-complex="16pt"/>
    </style:style>
    <style:style style:name="T1" style:family="text">
      <style:text-properties officeooo:rsid="0073c916"/>
    </style:style>
    <style:style style:name="T2" style:family="text">
      <style:text-properties officeooo:rsid="0074d26f"/>
    </style:style>
    <style:style style:name="T3" style:family="text">
      <style:text-properties fo:font-style="italic" style:font-style-asian="italic" style:font-style-complex="italic"/>
    </style:style>
    <style:style style:name="T4" style:family="text">
      <style:text-properties fo:font-style="italic" officeooo:rsid="001a31d5" style:font-style-asian="italic" style:font-style-complex="italic"/>
    </style:style>
    <style:style style:name="T5" style:family="text">
      <style:text-properties fo:font-style="italic" officeooo:rsid="008297f5" style:font-style-asian="italic" style:font-style-complex="italic"/>
    </style:style>
    <style:style style:name="T6" style:family="text">
      <style:text-properties officeooo:rsid="0074f65b"/>
    </style:style>
    <style:style style:name="T7" style:family="text">
      <style:text-properties officeooo:rsid="0074e75b"/>
    </style:style>
    <style:style style:name="T8" style:family="text">
      <style:text-properties officeooo:rsid="001a31d5"/>
    </style:style>
    <style:style style:name="T9" style:family="text">
      <style:text-properties style:font-name="Noto Sans1"/>
    </style:style>
    <style:style style:name="T10" style:family="text">
      <style:text-properties style:font-name="Noto Sans1" officeooo:rsid="001a31d5"/>
    </style:style>
    <style:style style:name="T11" style:family="text">
      <style:text-properties style:font-name="Noto Sans1" fo:font-style="italic" style:font-style-asian="italic" style:font-style-complex="italic"/>
    </style:style>
    <style:style style:name="T12" style:family="text">
      <style:text-properties style:font-name="Noto Sans1" fo:font-style="italic" officeooo:rsid="001a31d5" style:font-style-asian="italic" style:font-style-complex="italic"/>
    </style:style>
    <style:style style:name="T13" style:family="text">
      <style:text-properties style:font-name="Noto Sans1" officeooo:rsid="00759f14"/>
    </style:style>
    <style:style style:name="T14" style:family="text">
      <style:text-properties style:font-name="Noto Sans1" fo:font-style="normal" fo:font-weight="normal" officeooo:rsid="00eeb86b" style:font-style-asian="normal" style:font-weight-asian="normal" style:font-style-complex="normal" style:font-weight-complex="normal"/>
    </style:style>
    <style:style style:name="T15" style:family="text">
      <style:text-properties officeooo:rsid="00781515"/>
    </style:style>
    <style:style style:name="T16" style:family="text">
      <style:text-properties officeooo:rsid="001ca4c1"/>
    </style:style>
    <style:style style:name="T17" style:family="text">
      <style:text-properties officeooo:rsid="007ae0ee"/>
    </style:style>
    <style:style style:name="T18" style:family="text">
      <style:text-properties officeooo:rsid="007c250b"/>
    </style:style>
    <style:style style:name="T19" style:family="text">
      <style:text-properties officeooo:rsid="007e1eeb"/>
    </style:style>
    <style:style style:name="T20" style:family="text">
      <style:text-properties officeooo:rsid="008297f5"/>
    </style:style>
    <style:style style:name="T21" style:family="text">
      <style:text-properties officeooo:rsid="0083c38f"/>
    </style:style>
    <style:style style:name="T22" style:family="text">
      <style:text-properties fo:font-size="14pt" style:font-size-asian="14pt" style:font-size-complex="14pt"/>
    </style:style>
    <style:style style:name="T23" style:family="text">
      <style:text-properties fo:font-size="14pt" officeooo:rsid="0085c76e" style:font-size-asian="14pt" style:font-size-complex="14pt"/>
    </style:style>
    <style:style style:name="T24" style:family="text">
      <style:text-properties officeooo:rsid="008764c3"/>
    </style:style>
    <style:style style:name="T25" style:family="text">
      <style:text-properties fo:font-style="normal" style:font-style-asian="normal" style:font-style-complex="normal"/>
    </style:style>
    <style:style style:name="T26" style:family="text">
      <style:text-properties fo:font-style="normal" fo:font-weight="normal" officeooo:rsid="00eeb86b" style:font-style-asian="normal" style:font-weight-asian="normal" style:font-style-complex="normal" style:font-weight-complex="normal"/>
    </style:style>
    <style:style style:name="T27" style:family="text">
      <style:text-properties officeooo:rsid="00881b83"/>
    </style:style>
    <style:style style:name="T28" style:family="text">
      <style:text-properties officeooo:rsid="008bf0a6"/>
    </style:style>
    <style:style style:name="T29" style:family="text">
      <style:text-properties officeooo:rsid="00931acc"/>
    </style:style>
    <style:style style:name="T30" style:family="text">
      <style:text-properties officeooo:rsid="008ded6c"/>
    </style:style>
    <style:style style:name="T31" style:family="text">
      <style:text-properties officeooo:rsid="008e4157"/>
    </style:style>
    <style:style style:name="T32" style:family="text">
      <style:text-properties officeooo:rsid="00900639"/>
    </style:style>
    <style:style style:name="T33" style:family="text">
      <style:text-properties officeooo:rsid="0085c76e"/>
    </style:style>
    <style:style style:name="T34" style:family="text">
      <style:text-properties officeooo:rsid="00759f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text:bookmark-start text:name="__RefHeading___Toc4103_3560524389"/>La lingua parlata è quasi sempre una traduzione.<text:bookmark-end text:name="__RefHeading___Toc4103_3560524389"/></text:h>
      <text:p text:style-name="P2">Noi sentiamo in un certo modo, che è il nostro proprio e che vale solo per noi stessi che sentiamo; <text:span text:style-name="T1">a noi, nel nostro interno, basta quel sentire come qualcosa di intrinseco e personale, che ci basta a noi stessi per avere coscienza di ciò che proviamo. In effetti, c'è una dimensione dell'esperienza che è puramente interna, un'immediata consapevolezza delle nostre emozioni, pensieri e sensazioni </text:span><text:span text:style-name="T2">che esprimiamo a noi stessi.</text:span></text:p>
      <text:p text:style-name="P3">Benedetto Croce, con la sua filosofia dell' “<text:span text:style-name="T3">estetica come scienza dell'espressione e linguistica generale</text:span>” sosteneva che l'intuizione (il nostro "sentire" primario) e l'espressione sono due momenti inseparabili dello stesso atto conoscitivo. Per lui, non possiamo avere una vera e propria coscienza di uno stato d'animo se non lo abbiamo già, in qualche modo, formato ed espresso dentro di noi, anche se non ancora esplicita­mente in parole o gesti esterni. L'espressione, in que­sto senso, non è un'aggiunta successiva al sentire, ma è il modo stesso in cui il sentire prende forma e diven­ta consapevole.</text:p>
      <text:p text:style-name="P7">L’espressione quindi, <text:span text:style-name="T6">attraverso la </text:span>lingua parlata <text:span text:style-name="T6">che è plasmata dalla nostra coscienza, segue </text:span>questi passaggi:</text:p>
      <text:p text:style-name="P4">- <text:span text:style-name="T3">La lingua interna o pre-verbale</text:span> <text:span text:style-name="T7">con la quale </text:span>"esprimia­mo a noi stessi quello che sentiamo" che forse non è ancora la lingua parlata nel senso comune, ma una <text:soft-page-break/>forma di elaborazione interna, quasi una "lingua del pensiero" o del sentire.</text:p>
      <text:p text:style-name="P3">- <text:span text:style-name="T3">Il passaggio all'espressione esterna</text:span> <text:span text:style-name="T7">q</text:span>uando il nostro sentire viene espresso verbalmente; a volte sembra che la lingua parlata non riesca a catturare pienamen­te la ricchezza e la complessità di ciò che proviamo in­ternamente. Ci sono sfumature che sembrano perder­si nella traduzione dal mondo interiore a quello esterno.</text:p>
      <text:p text:style-name="P7">- <text:span text:style-name="T4">La funzione della lingua nel rendere condivisibile il sen­tire</text:span><text:span text:style-name="T8"> è proprio attraverso la lingua che possiamo comu­nicare il nostro mondo interiore agli altri, rendendo il sentire qualcosa di potenzialmente condivisibile, an­che se mai perfettamente identico.</text:span> </text:p>
      <text:p text:style-name="P8"><text:span text:style-name="T8">Quando non intui</text:span>amo<text:span text:style-name="T8"> quello che ascoltiamo e di con­seguenza non abbiamo coscienza del nostro stato d'animo, </text:span>Benedetto <text:span text:style-name="T8">Croce </text:span>ci spiega che <text:span text:style-name="T3">l</text:span><text:span text:style-name="T4">'intuizione</text:span><text:span text:style-name="T8"> e </text:span><text:span text:style-name="T4">l'espressione</text:span><text:span text:style-name="T8"> sono un tutt'uno, inseparabili. </text:span><text:span text:style-name="T34">A</text:span><text:span text:style-name="T8">fferma chiaramente che </text:span><text:span text:style-name="T4">ogni vera intuizione o rappresentazio­ne è, insieme, espressione. Ciò che non si oggettiva in un'espressione non è intuizione o rappresentazione, ma sensazione e naturalità. Lo spirito non intuisce se non fa­cendo, formando, esprimendo</text:span><text:span text:style-name="T8">." Quindi, se non </text:span><text:span text:style-name="T4">intuia­mo</text:span><text:span text:style-name="T8"> ciò che ascoltiamo, se non riusciamo a dargli una forma interna, un'immagine, un'espressione nel no­stro spirito, allora, per Croce, non abbiamo avuto una vera e propria intuizione, non c'è ancora un pensiero, o una coscienza formata, da esprimere.</text:span></text:p>
      <text:p text:style-name="P3"><text:soft-page-break/>Ciò che non si è intuito, cioè non si è organizzato e formato dentro di noi, rimane a un livello di <text:span text:style-name="T3">sensazio­ne bruta, di materia amorfa</text:span>, non ancora spiritualizzata. Solo quando questa sensazione prende forma, quan­do la <text:span text:style-name="T3">intuiamo</text:span> (che per Croce significa già esprimerla internamente), allora abbiamo una vera e propria co­scienza di quello stato d'animo o di quel contenuto, e solo allora questo può diventare oggetto di un'ulterio­re espressione, magari anche esterna, come la lingua parlata.</text:p>
      <text:p text:style-name="P4"><text:span text:style-name="T15">P</text:span>er illustrare l'idea crociana di intuizione che diventa espressione, <text:s/><text:span text:style-name="T15">c</text:span><text:span text:style-name="T16">’è </text:span>un esempio perfetto, <text:span text:style-name="T16">un aneddoto o meglio una metafora </text:span>usata spesso nel contesto filoso­fico e artistico per illustrare concetti simili: </text:p>
      <text:p text:style-name="P5"><text:span text:style-name="T26">“C’era una volta uno scultore che stava lavorando a un enorme blocco di granito. Un giorno mentre stava scolpendo quella pietra informe, un bambino, passan­do di lì, <text:s/>si fermò <text:s/>e <text:s/>chiese allo scultore: “Che stai cer­cando?” “Aspetta e vedrai” fu la risposta. Alcuni giorni dopo il bambino ritornò e vide che lo scultore aveva fi­nito di scolpire nel granito un magnifico cavallo. Il bambino rimase a bocca aperta a fissare il cavallo, poi si girò verso lo scultore e gli chiese: ”Come facevi a sa­pere che era lì dentro?”</text:span> </text:p>
      <text:p text:style-name="P5">Lo scultore, di fronte al blocco di marmo, non vede semplicemente una massa informe di pietra. La sua mente, la sua sensibilità, il suo spirito intuiscono una <text:soft-page-break/>forma che è già latente lì dentro. Non è un atto mera­mente intellettuale o razionale in senso stretto, ma una sorta di pre-visione estetica. Egli "vede" il cavallo prima che sia materialmente scolpito. Questo "vede­re" non è solo un'immagine mentale confusa; è già un atto di formazione interna, un'organizzazione delle li­nee, dei volumi, della dinamica che diventeranno il cavallo.</text:p>
      <text:p text:style-name="P3">Per Croce, questa pre-visione, questa intuizione della forma del cavallo nel marmo, è già l'espressione in sé. Lo scultore ha già espresso a sé stesso, nel suo spi­rito, la forma del cavallo. La scultura materiale che ne deriva è la realizzazione pratica di quell'espressione interna, la sua concretizzazione nel mondo fisico. L'atto di scolpire è il mezzo attraverso cui l'espressione interna viene manifestata esternamente, rendendola percepibile anche agli altri.</text:p>
      <text:p text:style-name="P3">Quindi, alla domanda del ragazzo: "Come facevi a sa­pere che dentro c'era un cavallo?", la risposta, nella prospettiva crociana, sarebbe che lo scultore lo ha in­tuito, e questo intuire è stato già un atto di espressio­ne interna. Non è che lui "sapeva" in modo razionale e discorsivo, ma ha "visto" la forma emergere nel suo spirito prima ancora che il martello e lo scalpello toccassero la pietra.</text:p>
      <text:p text:style-name="P19"/>
      <text:p text:style-name="P19"/>
      <text:p text:style-name="P19"><text:soft-page-break/>Il non sentirsi proprio nella Lingua Altrui</text:p>
      <text:p text:style-name="P9">Ipotizziamo una situazione in cui c’<text:span text:style-name="T8">è una percezione iniziale, </text:span>si intuiscono<text:span text:style-name="T8"> "alcuni passaggi" di ciò che la persona sta dicendo. Non è rumore informe, ma qual­cosa comincia a prendere forma nella tua mente. Il tuo pensiero non è "abbastanza formato" per cogliere il significato profondo, la sfumatura, l'intento comple­to dell'altro. Puoi "tradurre il linguaggio" (ripetere le parole, magari capirne il senso letterale), ma non rie­sci a "sentirlo tuo" perché non appartiene al tuo modo di esprimerti, non appartiene alla </text:span><text:span text:style-name="T17">tua </text:span><text:span text:style-name="T8">sensibilità originaria.</text:span></text:p>
      <text:p text:style-name="P3">Croce concepisce l’intuizione non come una semplice ricezione di un dato esterno, non è un'assimilazione passiva, <text:s/>ma come un atto attivo e creativo dello spi­rito. L’intuizione è il momento in cui la mente non solo percepisce, ma organizza e interpreta un contenuto, rendendolo pienamente proprio.</text:p>
      <text:p text:style-name="P3">Se l’intuizione è incompleta, significa che lo spirito non ha ancora assorbito e rielaborato in maniera pro­fonda quel pensiero. È un po’ come quando si cerca di tradurre un sentimento in parole: se la formulazione risulta vaga o imprecisa, è segno che il pensiero non è ancora stato pienamente espresso internamente. Solo quando l’intuizione si compie, il contenuto diventa autentico e parte integrante dell’esperienza individua­le. Questo si collega perfettamente al tema della lin­gua altrui: se una <text:soft-page-break/>lingua non è intuita completamente, rimane sempre in qualche modo distante, quasi un mezzo tecnico e non una vera espressione dello spi­rito.</text:p>
      <text:p text:style-name="P3"><text:span text:style-name="T18">L</text:span>a lingua è intrinsecamente legata all'individuo. Non esiste una "<text:span text:style-name="T3">lingua universale</text:span>" preesistente alle singole espressioni. Ogni espressione è unica e irripetibile. Se il linguaggio di quella persona non "appartiene al <text:span text:style-name="T18">no­stro</text:span> modo di esprimer<text:span text:style-name="T18">ci,</text:span> significa che non <text:span text:style-name="T18">si è </text:span>ancora trovat<text:span text:style-name="T18">a</text:span> la <text:span text:style-name="T18">propria</text:span> espressione interna di quel concet­to. <text:span text:style-name="T19">E’ qui che entra in gioco la natura trasformativa del linguaggio come espressione dell’intuizione. Se una frase o un concetto non ci appartiene ancora del tut­to, vuol dire che non abbiamo completato il processo di riformulazione interiore. Non è semplicemente una traduzione, ma un vero e proprio atto di assimilazione e ricreazione.</text:span></text:p>
      <text:p text:style-name="P3"><text:span text:style-name="T19">Questo richiama molto il pensiero di Croce sulla di­stinzione tra semplice apprendimento e autentica espressione. Finché un concetto resta esterno, non è vissuto, e quindi non può essere davvero nostro. È come quando leggiamo un testo complesso e, anziché ripeterlo meccanicamente, cerchiamo di riscriverlo con le nostre parole: solo allora diventa parte del no­stro spirito, perché lo abbiamo rivissuto e fatto no­stro. </text:span>Finché non accade questo, l'idea rimane esterna, come un abito che provi ma che non ti calza.</text:p>
      <text:p text:style-name="P10"><text:soft-page-break/>Nei dibattiti politici, l’intuizione e l’elaborazione del lin­guaggio non mirano necessariamente a una com­prensione autentica, ma piuttosto a una rappresenta­zione strategica della realtà, spesso modellata dalle convenienze di parte. Ogni discorso politico è una co­struzione: i fatti vengono interpretati, selezionati e persino trasformati per servire una narrazione. Que­sto crea un linguaggio in cui la verità non è un dato oggettivo, ma piuttosto un prodotto della volontà co­municativa di chi parla. E proprio perché il linguaggio in politica è così malleabile, la comunicazione diventa un gioco di potere. Ecco perché la comprensione tra <text:s/>diverse posizioni politiche spesso non avviene: non si tratta solo di idee divergenti, ma di vere e proprie costruzioni linguistiche che filtrano il mondo in modi incompatibili.</text:p>
      <text:p text:style-name="P20">La traduzione come espressione</text:p>
      <text:p text:style-name="P6">Ogni uomo ha i propri sentimenti, i propri stati d'ani­mo e per fare in modo che non siano soltanto suoi, ma che siano invece qualcosa di riconoscibile da parte di tutti e per renderli comunicabili, deve tradurli affin­ché questi sentimenti non rimangano confinati nel no­stro privato, ma diventino qualcosa di riconoscibile e comunicabile a tutti.</text:p>
      <text:p text:style-name="P11">In questa prospettiva, la <text:span text:style-name="T3">traduzione</text:span> non è solo un pas­saggio da una lingua all'altra, <text:span text:style-name="T5">es</text:span><text:span text:style-name="T20">. dall’italiano all’ingle­</text:span><text:soft-page-break/><text:span text:style-name="T20">se, è</text:span> un processo molto più profondo e complesso <text:span text:style-name="T20">che si sviluppa attraverso queste fasi:</text:span></text:p>
      <text:p text:style-name="P12">- <text:span text:style-name="T3">Dalla Sfera Interna all'Espressione Formata</text:span>: <text:span text:style-name="T21">i</text:span>nnanzitut­to, si tratta di <text:span text:style-name="T3">tradurre</text:span> quel flusso informe di sensazio­ni e sentimenti grezzi in una forma definita. Questo, per Croce, è l'atto stesso dell'intuizione e dell'espres­sione. Lo stato d'animo confuso viene <text:span text:style-name="T3">tradotto</text:span> in un'immagine, un suono, un'idea chiara e distinta nella nostra mente. Senza questo passaggio interno, il sen­timento rimane amorfo e inconoscibile perfino a noi stessi in modo cosciente.</text:p>
      <text:p text:style-name="P12">- <text:span text:style-name="T3">Dalla Forma Interna all'Espressione Esterna</text:span>: <text:span text:style-name="T21">s</text:span>uccessi­vamente, questa forma interiore, già <text:span text:style-name="T3">espressa</text:span> nel no­stro spirito, deve essere <text:span text:style-name="T3">tradotta</text:span> in un linguaggio esterno (parole, gesti, musica, arte figurativa) che sia comprensibile ad altri. È qui che entra in gioco la lin­gua parlata, la scrittura, la pittura, la musica, <text:span text:style-name="T21">il lin­guaggio del corpo </text:span>ecc. Questi sono i mezzi attraverso cui la nostra espressione interna viene oggettivata e resa accessibile.</text:p>
      <text:p text:style-name="P21">Il Paradosso della Comunicazione</text:p>
      <text:p text:style-name="P13">Per comunicare, siamo costretti a usare forme e sim­boli condivisi. Senza di essi, il nostro mondo interiore rimarrebbe muto e isolato.</text:p>
      <text:p text:style-name="P11">Nel processo di <text:span text:style-name="T3">traduzione</text:span> (specialmente quello dal sentire all'espressione esterna), c'è sempre una poten­<text:soft-page-break/>ziale perdita di sfumature, di quella ricchezza ineffabi­le del sentire originario. Nessuna parola può catturare esattamente la complessità di un'emozione. Tuttavia, c'è anche un guadagno immenso: il sentimento, una volta espresso, diventa condivisibile, può risuonare nell'altro,creare connessioni e comprensione.</text:p>
      <text:p text:style-name="P22"><text:span text:style-name="T33">Traduzione dei sentimenti. P</text:span>ercezione di falsificazione o disparità tra il sentire interiore e l’ espressione verbale.</text:p>
      <text:p text:style-name="P14"><text:span text:style-name="T24">Il sentire interiore e la sua espressione verbale, a</text:span> for­za di tradurre per gli altri, specialmente quando si tratta di emozioni complesse come l'amore, quei sen­timenti <text:span text:style-name="T24">possono diventare </text:span>falsi. <text:span text:style-name="T24">I</text:span>n altre parole è come se traduzione dopo traduzione si finisse col tradurre per se stesso. Così, quando si prova un sentimento e diciamo <text:span text:style-name="T3">ti amo </text:span>ci si convince che si è <text:span text:style-name="T24">detto </text:span>ciò che si sente, <text:span text:style-name="T24">m</text:span>a più delle volte, non corrisponde al vero per­ché se ognuno di noi confrontasse veramente o rien­trasse in se stesso, sentirebbe una certa disparità fra il suo stato d'animo e quell'espressione generica.</text:p>
      <text:p text:style-name="P15">Le parole che usiamo quotidianamente, come <text:span text:style-name="T25">ti amo</text:span>, sono per loro natura generiche. Sono simboli conven­zionali che cercano di racchiudere un'infinità di sfuma­ture emotive. Il tuo <text:span text:style-name="T25">ti amo</text:span> può significare una cosa, il mio un'altra, e il <text:span text:style-name="T25">ti amo</text:span> di ieri potrebbe non essere lo stesso di oggi.</text:p>
      <text:p text:style-name="P15"><text:soft-page-break/>Il nostro <text:span text:style-name="T3">stato d'animo interiore</text:span>, invece, è sempre <text:span text:style-name="T3">spe­cifico, unico e irripetibile</text:span> in quel preciso istante. È un complesso intreccio di sensazioni, ricordi, desideri, paure, e proiezioni. Quando tentiamo di incapsularlo in una frase fatta, c'è quasi inevitabilmente una di­sparità, una traduzione che non è mai del tutto fedele all'originale.</text:p>
      <text:p text:style-name="P15">Se ci abituiamo a usare espressioni standardizzate per descrivere il nostro sentire, rischiamo di <text:span text:style-name="T27">ridurlo </text:span>a cate­gorie predefinite, <text:span text:style-name="T27">i</text:span>nvece di esplorare la ricchezza e la complessità del nostro stato d'animo. Crediamo che, pronunciando la formula “ti amo”, abbiamo effettiva­mente espresso e compreso tutto ciò che proviamo. Ma più delle volte, non corrisponde al vero. La parola diventa una scorciatoia mentale che ci impedisce di confrontarci con la piena, e a volte scomoda, realtà del nostro sentire.</text:p>
      <text:p text:style-name="P15">Il rischio è di allontanarci dall'intuizione pura e imme­diata (la nostra "espressione" crociana interna) a favo­re di un'espressione esterna convenzionale che non ri­suona più con la profondità originale. Se rientriamo in noi stessi e percepiamo questa disparità, significa che la nostra <text:span text:style-name="T3">coscienza</text:span> sta operando un confronto critico tra l'espressione adottata e il sentire profondo. </text:p>
      <text:p text:style-name="P16">Chi potrebbe sfuggire alla falsificazione tra il sentire e l’espressione? Probabilmente l’artista. L'artista parla il suo proprio linguaggio, parla come sente nel suo inti­mo <text:soft-page-break/>e questo suo linguaggio è un linguaggio che tutti (o quasi tutti) comprendono. </text:p>
      <text:p text:style-name="P17">Per Croce, l'intuizione è già espressione, e l’artista è colui che, più di ogni altro, è in grado di attuare que­sta fusione in modo puro e non adulterato. Quando l'artista prova un sentimento, un'emozione, una visio­ne, la sua capacità non è quella di tradurla in un lin­guaggio convenzionale dopo ave<text:span text:style-name="T28">rl</text:span>a sentita, piuttosto, l'atto stesso del sentire per l'artista è già un atto di formazione espressiva.</text:p>
      <text:p text:style-name="P17">L'artista non usa il linguaggio nel senso comune di un sistema di segni preesistenti per comunicare un con­tenuto. Al contrario, l'artista <text:span text:style-name="T3">crea il proprio linguaggio</text:span> nel momento stesso in cui esprime. La sua opera (una poesia, un quadro, una sinfonia) non è una traduzione di un sentimento già formato e poi confezionato in parole o colori; è la materializzazione diretta di quel sentimento-espressione. Il <text:span text:style-name="T3">linguaggio proprio</text:span> dell'arti­sta è l'opera stessa, unica e irripetibile, che emerge di­rettamente dalla sua intuizione.</text:p>
      <text:p text:style-name="P17">Quando guardiamo un quadro, ascoltiamo una musi­ca o leggiamo una poesia, se l'opera è autentica, essa ci consente di <text:span text:style-name="T3">rivivere intuitivamente</text:span> qualcosa di simile all'intuizione originaria dell'artista. L'arte <text:span text:style-name="T28">oltrepassa</text:span> le convenzioni del linguaggio ordinario e parla diretta­mente al nostro spirito, alla nostra capacità di sentire ed esprimere. È un l<text:span text:style-name="T3">inguaggio del sentimento</text:span> che, pur <text:soft-page-break/>partendo dall'intimo dell'artista, riesce a risuonare con l'intimo dell'osservatore, del lettore,<text:span text:style-name="T29"> </text:span><text:s/>dell'ascoltatore.</text:p>
      <text:p text:style-name="P24">La Natura "Vuota" delle Parole</text:p>
      <text:p text:style-name="P18"><text:span text:style-name="T30">P</text:span>er esplorare i temi dell'identità, della comunicazione e dell'incomunicabilità, <text:span text:style-name="T30">ho scelto di riproporre il dia­logo potentissimo tratto dal romanzo di Luigi Piran­dello “Uno Nessuno Centomila”.</text:span></text:p>
      <text:p text:style-name="P16">“….<text:span text:style-name="T30">m</text:span>a il guaio è che voi, caro mio, non saprete mai come si traduca in me quello che voi mi dite. Non ave­te parlato turco, no. Abbiamo usato, io e voi, la stessa lingua, le stesse parole. Ma che colpa abbiamo, io e voi, se le parole, per sé, sono vuote? Vuote, caro mio. E voi le riempite del senso vostro, nel dirmele; e io, nell’accoglierle, inevitabilmente, le riempio del senso mio. Abbiamo creduto d’intenderci; non ci siamo intesi affatto”.</text:p>
      <text:p text:style-name="P17">Pirandello sta esprimendo un concetto fondamentale: le parole non sono contenitori di significato immutabi­le e universale. Sono simboli astratti, gusci vuoti, che ciascuno di noi riempie con il <text:span text:style-name="T3">proprio senso</text:span>, la propria esperienza, le proprie intuizioni e stati d'animo. Il dramma pirandelliano qui non è la volontà di frainten­dersi, ma <text:span text:style-name="T3">l'impossibilità di una perfetta comunione di si­gnificati</text:span> attraverso le parole. Questa <text:span text:style-name="T3">traduzione differente</text:span> non è un atto di malizia o una scelta consapevole di non capire. È la tragica condizione <text:soft-page-break/>umana di fronte al linguaggio. I personaggi "hanno creduto d'intendersi", il che suggerisce che la loro intenzione era quella di comunicare, di capirsi. Il disinganno arriva dopo: "non ci siamo intesi affatto".</text:p>
      <text:p text:style-name="P17">Ognuno vive nella pro­pria realtà soggettiva, e il linguaggio, pur essendo il ponte più potente che abbiamo per connetterci, è allo stesso tempo un confine invalicabile perché ogni mente lo plasma a modo suo.</text:p>
      <text:p text:style-name="P11"><text:span text:style-name="T31">L</text:span>a visione di Pirandello si collega e, per certi versi, si scontra con quella di Croce. Mentre Croce enfatizza l'atto creatore dell'intuizione-espressione e la capacità dell'arte di raggiungere una comprensione quasi uni­versale, Pirandello mette in luce la <text:span text:style-name="T3">solitudine intrinseca dell'individuo</text:span> e l'inevitabile distorsione del significato quando le parole passano da una mente all'altra. Per Pirandello, la lingua parlata è più un velo che una fine­stra trasparente sul pensiero altrui.</text:p>
      <text:p text:style-name="P11"/>
      <text:p text:style-name="P23">L'Incomunicabilità Politica: Voluta o Inevitabile?</text:p>
      <text:p text:style-name="P13"><text:span text:style-name="T32">L</text:span>'incomunicabilità descritta da Pirandello non è solo un concetto filosofico o letterario, ma una realtà pro­fondamente attualissima, e i dibattiti politici ne sono un esempio lampante.</text:p>
      <text:p text:style-name="P11"><text:span text:style-name="T32">C</text:span>ome chiunque altro, <text:span text:style-name="T32">anche i politici</text:span> riempiono le pa­role del proprio senso. Un termine come <text:span text:style-name="T3">libertà</text:span>, <text:span text:style-name="T3">giu­stizia</text:span>, <text:span text:style-name="T32">o</text:span> <text:span text:style-name="T3">sicurezza</text:span> avrà sfumature e implicazioni diverse <text:soft-page-break/>per un politico di destra rispetto a uno di sinistra, o per chi ha un background sociale ed economico diffe­rente. Quando parlano, ognuno proietta la propria vi­sione e i propri valori su quelle parole, e l'ascoltatore (sia l'altro politico che l'elettore) fa altrettanto. Questo crea inevitabilmente una disparità di significato che rende la vera comprensione difficile. Le parole, pur es­sendo le stesse, veicolano realtà interiori diverse.</text:p>
      <text:p text:style-name="P12">Nei dibattiti politici, l'incomprensione può diventare uno strumento retorico e strategico <text:span text:style-name="T29">e s</text:span>pesso, non si tratta solo di una difficoltà oggettiva nel capirsi, ma di una scelta consapevole di <text:span text:style-name="T29">d</text:span>istorcere il messaggio altrui <text:span text:style-name="T29">p</text:span>er attaccare l'avversario, si può scegliere di interpretare le sue parole nel modo più sfavorevole, anche se si è capito il senso originale. Riconoscere la validità di un punto dell'avversario potrebbe indebolire la propria posizione, quindi si preferisce non "intendere" o minimizzare. A volte i politici non cercano di convincere l'avversario, ma di rafforzare la propria base, usando un linguaggio che risuona solo con quella specifica parte di elettorato, rendendo inutile (e quasi dannoso) un tentativo di intesa più ampia. Invece di dialogare, si cerca di imporre la propria versione della realtà, anche a costo di non ascoltare o travisare l'altro.</text:p>
      <text:p text:style-name="P12">Questa combinazione di intrinseca incomunicabilità e strategie deliberatamente tese a non intendersi genera la <text:soft-page-break/><text:span text:style-name="T3">frustrazione</text:span> che molti cittadini provano di fronte al dibattito pubblico. Si ha la sensazione di assistere a monologhi paralleli, dove le parole non costruiscono ponti, ma alzano muri, e dove la ricerca di un terreno comune di comprensione è spesso assente. In questo senso, Pirandello ci offre una lente preziosa per analizzare non solo le relazioni interpersonali, ma anche le dinamiche sociali e politiche contemporanee. Il vuoto delle parole e il riempimento soggettivo del loro significato diventano armi o barriere, a seconda del contesto e delle intenzioni.</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4-04T15:42:15.206804761</meta:creation-date>
    <dc:date>2026-04-04T15:48:37.258380583</dc:date>
    <dc:creator>corrado tafaro</dc:creator>
    <meta:editing-duration>PT6M23S</meta:editing-duration>
    <meta:editing-cycles>1</meta:editing-cycles>
    <meta:document-statistic meta:table-count="0" meta:image-count="0" meta:object-count="0" meta:page-count="15" meta:paragraph-count="50" meta:word-count="2935" meta:character-count="19436" meta:non-whitespace-character-count="16539"/>
    <meta:generator>LibreOffice/24.2.7.2$Linux_X86_64 LibreOffice_project/420$Build-2</meta:generator>
  </office:meta>
</office:document-meta>
</file>