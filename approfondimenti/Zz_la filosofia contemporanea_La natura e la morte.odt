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0aa57c" style:font-size-asian="14pt" style:font-size-complex="14pt"/>
    </style:style>
    <style:style style:name="P2" style:family="paragraph" style:parent-style-name="Standard">
      <style:paragraph-properties fo:line-height="115%" fo:text-align="center" style:justify-single-word="false"/>
      <style:text-properties style:font-name="Liberation Serif" fo:font-size="16pt" officeooo:rsid="000c3fed" officeooo:paragraph-rsid="000c3fed"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 natura e la morte</text:p>
      <text:p text:style-name="P1">Goethe scrisse che la Natura ha inventato la morte per avere molta vita, Schopenhauer vede questa energia metafisica che tende a vivificare sempre la materia, quasi una demonia. Sebbene entrambi vedano la Natura come una forza incessante, la loro "colorazione" emotiva e filosofica è opposta: Goethe è il poeta della forma e del rinnovamento, Schopenhauer è il filosofo del dolore e dell'illusione.</text:p>
      <text:p text:style-name="P1">Entrambi i pensatori tedeschi, pur con sfumature differenti, colgono una profonda connessione tra la forza vitale e il processo di disgregazione.</text:p>
      <text:p text:style-name="P1">Goethe, nella sua opera "Faust", afferma che la Natura ha escogitato la morte come meccanismo necessario per generare vita in abbondanza. La morte, secondo questa visione, non rappresenta una fine assoluta, ma piuttosto un passaggio obbligato in un ciclo continuo di trasformazione e rinnovamento. In questo senso, la morte diviene strumento per la Natura di preservare la vitalità e la diversità del mondo organico.</text:p>
      <text:p text:style-name="P1">Schopenhauer, invece, nella sua opera principale "Il mondo come volontà e rappresentazione", assume una prospettiva più cupa e pessimistica. Egli vede nella realtà una "volontà di vivere" cieca e irrazionale che spinge la materia a perpetuarsi in un ciclo incessante di <text:soft-page-break/>nascita, dolore e morte. La morte, in questa visione, non è solo un passaggio necessario, ma la manifestazione ultima del carattere effimero e illusorio dell'esistenza. La "demonìa" a cui Schopenhauer fa riferimento è proprio questa cieca forza vitale che, pur animando l'universo, lo condanna a un'eterna sofferenza.</text:p>
      <text:p text:style-name="P1">Nonostante le differenze di approccio, entrambi i filosofi tedeschi sottolineano l'intrinseca connessione tra la vita e la morte. La morte non è un evento esterno alla vita, ma ne costituisce un aspetto fondamentale, un elemento imprescindibile per la sua stessa persistenza. In questa prospettiva, la riflessione sulla morte assume un valore profondo, invitandoci a comprendere meglio la natura della realtà e il nostro posto all'interno di ess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be1bb"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fbe1bb"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4-06-10T18:31:42.783000000</meta:creation-date>
    <dc:date>2026-03-30T19:04:57.703775636</dc:date>
    <meta:editing-duration>PT23M14S</meta:editing-duration>
    <meta:editing-cycles>3</meta:editing-cycles>
    <meta:generator>LibreOffice/24.2.7.2$Linux_X86_64 LibreOffice_project/420$Build-2</meta:generator>
    <dc:creator>corrado tafaro</dc:creator>
    <meta:document-statistic meta:table-count="0" meta:image-count="0" meta:object-count="0" meta:page-count="2" meta:paragraph-count="6" meta:word-count="307" meta:character-count="2013" meta:non-whitespace-character-count="1712"/>
  </office:meta>
</office:document-meta>
</file>