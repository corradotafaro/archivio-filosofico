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officeooo:paragraph-rsid="0010c507" style:font-size-asian="12pt" style:font-size-complex="12pt"/>
    </style:style>
    <style:style style:name="P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0c507" style:font-size-asian="12pt" style:font-size-complex="12pt"/>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0c507" style:font-size-asian="12pt" style:font-size-complex="12pt"/>
    </style:style>
    <style:style style:name="P6" style:family="paragraph" style:parent-style-name="Standard">
      <style:paragraph-properties fo:margin-top="0.101cm" fo:margin-bottom="0cm" style:contextual-spacing="false" fo:line-height="115%" fo:text-align="center" style:justify-single-word="false"/>
      <style:text-properties style:font-name="Noto Sans1" fo:font-size="12pt" officeooo:paragraph-rsid="0010c507" style:font-size-asian="12pt" style:font-size-complex="12pt"/>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1b5411" officeooo:paragraph-rsid="0010c507" style:font-size-asian="12pt" style:font-weight-asian="normal" style:font-size-complex="12pt" style:font-weight-complex="normal"/>
    </style:style>
    <style:style style:name="P8" style:family="paragraph" style:parent-style-name="Standard">
      <style:paragraph-properties fo:margin-top="0.101cm" fo:margin-bottom="0cm" style:contextual-spacing="false" fo:line-height="115%" fo:text-align="center" style:justify-single-word="false"/>
      <style:text-properties style:font-name="Noto Sans1" fo:font-size="12pt" fo:font-style="italic" officeooo:paragraph-rsid="0010c507" style:font-size-asian="12pt" style:font-style-asian="italic" style:font-size-complex="12pt" style:font-style-complex="italic"/>
    </style:style>
    <style:style style:name="P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499cm" style:auto-text-indent="false" style:page-number="auto" fo:background-color="transparent"/>
      <style:text-properties style:font-name="Noto Sans1" fo:font-size="12pt" fo:font-style="normal" officeooo:rsid="001c02ae" officeooo:paragraph-rsid="0010c507" style:font-size-asian="12pt" style:font-style-asian="normal" style:font-size-complex="12pt" style:font-style-complex="normal"/>
    </style:style>
    <style:style style:name="P10" style:family="paragraph" style:parent-style-name="Footnote">
      <style:text-properties style:font-name="Noto Sans1"/>
    </style:style>
    <style:style style:name="P11" style:family="paragraph" style:parent-style-name="Footnote">
      <style:paragraph-properties fo:text-align="justify" style:justify-single-word="false"/>
      <style:text-properties style:font-name="Noto Sans1"/>
    </style:style>
    <style:style style:name="P12" style:family="paragraph" style:parent-style-name="Footnote">
      <style:paragraph-properties fo:line-height="100%" fo:text-align="justify" style:justify-single-word="false"/>
      <style:text-properties style:font-name="Noto Sans1"/>
    </style:style>
    <style:style style:name="P13" style:family="paragraph" style:parent-style-name="Footnote">
      <style:text-properties style:font-name="Noto Sans1" fo:font-size="9pt" style:font-size-asian="9pt" style:font-size-complex="9pt"/>
    </style:style>
    <style:style style:name="P14" style:family="paragraph" style:parent-style-name="Footnote">
      <style:paragraph-properties fo:text-align="justify" style:justify-single-word="false"/>
      <style:text-properties style:font-name="Noto Sans1" fo:font-size="9pt" style:font-size-asian="9pt" style:font-size-complex="9pt"/>
    </style:style>
    <style:style style:name="P15" style:family="paragraph" style:parent-style-name="Heading_20_2">
      <style:text-properties officeooo:paragraph-rsid="0010c507"/>
    </style:style>
    <style:style style:name="P16" style:family="paragraph" style:parent-style-name="Heading_20_2">
      <style:text-properties style:font-name="Noto Sans1" fo:font-size="12pt" officeooo:paragraph-rsid="0011b85e" style:font-size-asian="12pt" style:font-size-complex="12pt"/>
    </style:style>
    <style:style style:name="P17" style:family="paragraph" style:parent-style-name="Heading_20_3">
      <style:text-properties officeooo:paragraph-rsid="0010c507"/>
    </style:style>
    <style:style style:name="P18" style:family="paragraph" style:parent-style-name="Heading_20_3">
      <style:text-properties fo:font-weight="normal" officeooo:paragraph-rsid="0010c507" style:font-weight-asian="normal" style:font-weight-complex="normal"/>
    </style:style>
    <style:style style:name="P19" style:family="paragraph" style:parent-style-name="Heading_20_3">
      <style:text-properties style:font-name="Noto Sans1" fo:font-size="12pt" officeooo:paragraph-rsid="0011126a" style:font-size-asian="12pt" style:font-size-complex="12pt"/>
    </style:style>
    <style:style style:name="P20" style:family="paragraph" style:parent-style-name="Heading_20_3">
      <style:paragraph-properties fo:margin-top="0.3cm" fo:margin-bottom="0.21cm" style:contextual-spacing="false"/>
      <style:text-properties style:font-name="Noto Sans1" fo:font-size="12pt" officeooo:paragraph-rsid="0011126a" style:font-size-asian="12pt" style:font-size-complex="12pt"/>
    </style:style>
    <style:style style:name="P21" style:family="paragraph" style:parent-style-name="Heading_20_3">
      <style:text-properties style:font-name="Noto Sans1" fo:font-size="12pt" officeooo:paragraph-rsid="0011b85e" style:font-size-asian="12pt" style:font-size-complex="12pt"/>
    </style:style>
    <style:style style:name="P22" style:family="paragraph" style:parent-style-name="Heading_20_3">
      <style:paragraph-properties fo:margin-top="0.3cm" fo:margin-bottom="0.21cm" style:contextual-spacing="false"/>
      <style:text-properties style:font-name="Noto Sans1" fo:font-size="12pt" officeooo:paragraph-rsid="0011b85e" style:font-size-asian="12pt" style:font-size-complex="12pt"/>
    </style:style>
    <style:style style:name="P23" style:family="paragraph" style:parent-style-name="Heading_20_3">
      <style:paragraph-properties fo:margin-top="0.199cm" fo:margin-bottom="0cm" style:contextual-spacing="false"/>
      <style:text-properties style:font-name="Noto Sans1" fo:font-size="12pt" officeooo:paragraph-rsid="0011b85e" style:font-size-asian="12pt" style:font-size-complex="12pt"/>
    </style:style>
    <style:style style:name="P24"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02bb611" officeooo:paragraph-rsid="0011126a" style:font-size-asian="12pt" style:font-weight-asian="normal" style:font-size-complex="12pt" style:font-weight-complex="normal"/>
    </style:style>
    <style:style style:name="P25"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612c6b" officeooo:paragraph-rsid="0011126a"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612c6b" officeooo:paragraph-rsid="0011126a"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12c6b" officeooo:paragraph-rsid="0011126a" style:font-size-asian="12pt" style:font-weight-asian="normal" style:font-size-complex="12pt" style:font-weight-complex="normal"/>
    </style:style>
    <style:style style:name="P28" style:family="paragraph" style:parent-style-name="Standard">
      <style:paragraph-properties fo:margin-top="0.101cm" fo:margin-bottom="0cm" style:contextual-spacing="false" fo:line-height="115%" fo:text-align="justify" style:justify-single-word="false"/>
      <style:text-properties style:font-name="Noto Sans1" fo:font-size="12pt" fo:font-weight="normal" officeooo:rsid="00612c6b" officeooo:paragraph-rsid="0011b85e"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6bd803" officeooo:paragraph-rsid="0011b85e"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bd803" officeooo:paragraph-rsid="0011b85e"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bd803" officeooo:paragraph-rsid="0011b85e"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fo:font-weight="normal" officeooo:rsid="006bd803" officeooo:paragraph-rsid="0011b85e"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bd803" officeooo:paragraph-rsid="0011b85e"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f751f" officeooo:paragraph-rsid="0011b85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normal" officeooo:rsid="006f751f" officeooo:paragraph-rsid="0011b85e"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normal" officeooo:rsid="006f751f" officeooo:paragraph-rsid="0011b85e" style:font-size-asian="12pt" style:font-weight-asian="normal" style:font-size-complex="12pt" style:font-weight-complex="normal"/>
    </style:style>
    <style:style style:name="P37"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1126a" style:font-size-asian="12pt" style:font-size-complex="12pt"/>
    </style:style>
    <style:style style:name="P3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1126a" style:font-size-asian="12pt" style:font-size-complex="12pt"/>
    </style:style>
    <style:style style:name="P39" style:family="paragraph" style:parent-style-name="Standard">
      <style:paragraph-properties fo:line-height="115%" fo:text-align="justify" style:justify-single-word="false"/>
      <style:text-properties style:font-name="Noto Sans1" fo:font-size="12pt" officeooo:paragraph-rsid="0011126a" style:font-size-asian="12pt" style:font-size-complex="12pt"/>
    </style:style>
    <style:style style:name="P4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499cm" style:auto-text-indent="false" fo:background-color="transparent"/>
      <style:text-properties style:font-name="Noto Sans1" fo:font-size="12pt" officeooo:paragraph-rsid="0011b85e" style:font-size-asian="12pt" style:font-size-complex="12pt"/>
    </style:style>
    <style:style style:name="P4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1b85e" style:font-size-asian="12pt" style:font-size-complex="12pt"/>
    </style:style>
    <style:style style:name="P4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1b85e" style:font-size-asian="12pt" style:font-size-complex="12pt"/>
    </style:style>
    <style:style style:name="P43" style:family="paragraph" style:parent-style-name="Standard">
      <style:paragraph-properties fo:margin-top="0.101cm" fo:margin-bottom="0cm" style:contextual-spacing="false" fo:line-height="115%" fo:text-align="center" style:justify-single-word="false"/>
      <style:text-properties style:font-name="Noto Sans1" fo:font-size="12pt" officeooo:paragraph-rsid="0011126a" style:font-size-asian="12pt" style:font-size-complex="12pt"/>
    </style:style>
    <style:style style:name="P4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officeooo:paragraph-rsid="0011126a" style:font-size-asian="12pt" style:font-style-asian="italic" style:font-size-complex="12pt" style:font-style-complex="italic"/>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bold" officeooo:rsid="00612c6b" officeooo:paragraph-rsid="0011126a" style:font-size-asian="12pt" style:font-weight-asian="bold" style:font-size-complex="12pt" style:font-weight-complex="bold"/>
    </style:style>
    <style:style style:name="P4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rsid="00612c6b" officeooo:paragraph-rsid="0011126a" style:font-size-asian="12pt" style:font-weight-asian="bold" style:font-size-complex="12pt" style:font-weight-complex="bold"/>
    </style:style>
    <style:style style:name="P4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weight="bold" officeooo:rsid="006bd803" officeooo:paragraph-rsid="0011b85e" style:font-size-asian="12pt" style:font-weight-asian="bold" style:font-size-complex="12pt" style:font-weight-complex="bold"/>
    </style:style>
    <style:style style:name="P48"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fo:font-weight="bold" officeooo:rsid="006bd803" officeooo:paragraph-rsid="0011b85e"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rsid="001c02ae" officeooo:paragraph-rsid="0011b85e" style:font-size-asian="12pt" style:font-style-asian="normal" style:font-size-complex="12pt" style:font-style-complex="normal"/>
    </style:style>
    <style:style style:name="P5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1b85e"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19981" style:font-style-asian="italic" style:font-style-complex="italic"/>
    </style:style>
    <style:style style:name="T3" style:family="text">
      <style:text-properties fo:font-style="italic" officeooo:rsid="001c02ae" style:font-style-asian="italic" style:font-style-complex="italic"/>
    </style:style>
    <style:style style:name="T4" style:family="text">
      <style:text-properties fo:font-style="italic" officeooo:rsid="0060410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1c02ae" style:font-size-asian="12pt" style:font-style-asian="normal" style:font-size-complex="12pt" style:font-style-complex="normal"/>
    </style:style>
    <style:style style:name="T9" style:family="text">
      <style:text-properties fo:font-size="12pt" fo:font-style="normal" officeooo:rsid="020d9129" style:font-size-asian="12pt" style:font-style-asian="normal" style:font-size-complex="12pt" style:font-style-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b5411" style:font-size-asian="12pt" style:font-weight-asian="normal" style:font-size-complex="12pt" style:font-weight-complex="normal"/>
    </style:style>
    <style:style style:name="T12" style:family="text">
      <style:text-properties style:font-name="Noto Sans1" fo:font-size="12pt" fo:font-style="normal" fo:font-weight="normal" officeooo:rsid="001c02ae" style:font-size-asian="10.5pt" style:font-style-asian="normal" style:font-weight-asian="normal" style:font-size-complex="12pt" style:font-style-complex="normal" style:font-weight-complex="normal"/>
    </style:style>
    <style:style style:name="T13" style:family="text">
      <style:text-properties style:font-name="Noto Sans1" fo:font-size="12pt" fo:font-weight="normal" style:font-size-asian="12pt" style:font-weight-asian="normal" style:font-size-complex="12pt" style:font-weight-complex="normal"/>
    </style:style>
    <style:style style:name="T14" style:family="text">
      <style:text-properties style:font-name="Noto Sans1" fo:font-size="12pt" fo:font-weight="normal" officeooo:rsid="0062c30a" style:font-size-asian="12pt" style:font-weight-asian="normal" style:font-size-complex="12pt" style:font-weight-complex="normal"/>
    </style:style>
    <style:style style:name="T15" style:family="text">
      <style:text-properties style:font-name="Noto Sans1" fo:font-weight="normal" style:font-weight-asian="normal" style:font-weight-complex="normal"/>
    </style:style>
    <style:style style:name="T16" style:family="text">
      <style:text-properties style:font-name="Noto Sans1" fo:font-weight="normal" officeooo:rsid="0062c30a" style:font-weight-asian="normal" style:font-weight-complex="normal"/>
    </style:style>
    <style:style style:name="T17" style:family="text">
      <style:text-properties style:font-name="Noto Sans1" fo:font-style="normal" fo:font-weight="normal" officeooo:rsid="001c02ae"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1c02ae" style:font-style-asian="normal" style:font-style-complex="normal"/>
    </style:style>
    <style:style style:name="T20" style:family="text">
      <style:text-properties fo:font-style="normal" officeooo:rsid="020d9129" style:font-style-asian="normal" style:font-style-complex="normal"/>
    </style:style>
    <style:style style:name="T21" style:family="text">
      <style:text-properties fo:font-style="normal" fo:font-weight="normal" officeooo:rsid="001c02ae" style:font-style-asian="normal" style:font-weight-asian="normal" style:font-style-complex="normal" style:font-weight-complex="normal"/>
    </style:style>
    <style:style style:name="T22" style:family="text">
      <style:text-properties fo:font-style="normal" fo:font-weight="normal" officeooo:rsid="0021b0eb" style:font-style-asian="normal" style:font-weight-asian="normal" style:font-style-complex="normal" style:font-weight-complex="normal"/>
    </style:style>
    <style:style style:name="T23" style:family="text">
      <style:text-properties fo:font-style="normal" fo:font-weight="normal" officeooo:rsid="006f751f"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62c30a" style:font-weight-asian="normal" style:font-weight-complex="normal"/>
    </style:style>
    <style:style style:name="T26" style:family="text">
      <style:text-properties officeooo:rsid="001b5411"/>
    </style:style>
    <style:style style:name="T27" style:family="text">
      <style:text-properties officeooo:rsid="00161fce"/>
    </style:style>
    <style:style style:name="T28" style:family="text">
      <style:text-properties officeooo:rsid="001f4b8f"/>
    </style:style>
    <style:style style:name="T29" style:family="text">
      <style:text-properties officeooo:rsid="00219981"/>
    </style:style>
    <style:style style:name="T30" style:family="text">
      <style:text-properties officeooo:rsid="00612c6b"/>
    </style:style>
    <style:style style:name="T31" style:family="text">
      <style:text-properties officeooo:rsid="0062c30a"/>
    </style:style>
    <style:style style:name="T32" style:family="text">
      <style:text-properties officeooo:rsid="00661b73"/>
    </style:style>
    <style:style style:name="T33" style:family="text">
      <style:text-properties officeooo:rsid="00669f44"/>
    </style:style>
    <style:style style:name="T34" style:family="text">
      <style:text-properties officeooo:rsid="0067fe02"/>
    </style:style>
    <style:style style:name="T35" style:family="text">
      <style:text-properties officeooo:rsid="006e2e9f"/>
    </style:style>
    <style:style style:name="T36" style:family="text">
      <style:text-properties officeooo:rsid="007253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bookmark-start text:name="__RefHeading___Toc18204_3602757520"/>La filosofia come guida per la vita<text:bookmark-end text:name="__RefHeading___Toc18204_3602757520"/></text:h>
      <text:p text:style-name="P28"><text:span text:style-name="T19">Per Seneca, la filosofia non è solo una teoria astratta, ma una guida pratica per vivere una vita buona e virtuosa. </text:span><text:span text:style-name="T20">La </text:span><text:span text:style-name="T18">filosofia </text:span><text:span text:style-name="T20">intesa </text:span><text:span text:style-name="T18">come rifugio contro le tempeste della vita e discute l'importanza della tranquillità dell'animo.</text:span><text:span text:style-name="T19"> </text:span></text:p>
      <text:h text:style-name="P21" text:outline-level="3"><text:bookmark-start text:name="__RefHeading___Toc18206_3602757520"/>Lettera 15<text:bookmark-end text:name="__RefHeading___Toc18206_3602757520"/></text:h>
      <text:p text:style-name="P41">Era abitudine degli antichi, in uso fino ai miei tempi, scrivere all'inizio delle lettere "<text:span text:style-name="T1">Se tu stai bene, ne sono contento, io sto bene</text:span>". Giustamente noi diciamo: "<text:span text:style-name="T1">Se ti dedichi alla filosofia, ne sono contento</text:span>", poiché alla fin fine questo significa stare bene. Senza la filosofia l'anima è malata; e anche il corpo, se pure è in forze, è sano come può esserlo quello di un pazzo o di un forsennato.Se vuoi star bene, dunque, cura soprattutto la salute dello spirito, e poi quella del corpo, che non ti costerà molto. È sciocco, mio caro Lucilio, e sconveniente per uno studioso esercitare i muscoli, sviluppare il collo e irrobustire i fianchi; quand'anche ti sarai ingrossato e avrai rinforzato i muscoli, non uguaglierai né il vigore, né il peso di un bue ben nutrito. Inoltre, se il peso del corpo è eccessivo, lo spirito ne è schiacciato ed è meno agile. Perciò riduci quanto più puoi la cura del corpo e lascia spazio allo spirito.</text:p>
      <text:p text:style-name="P40">Se uno si occupa troppo del fisico, ha molti fastidi: per prima cosa la fatica degli esercizi ginnici estenua lo <text:soft-page-break/>spirito e lo rende incapace di concentrarsi e di dedicarsi agli studi più impegnativi; poi l'abbondanza di cibo ottunde l'acume. A questo aggiungi che come allenatori si prendono schiavi della peggior specie, uomini occupati a ungersi d'olio e a bere, che giudicano soddisfacente una giornata se hanno sudato abbondantemente e se al posto del sudore versato hanno ingerito molto vino che a digiuno fa più effetto. Bere e sudare è la vita dell'ammalato di stomaco.</text:p>
      <text:p text:style-name="P42">Ci sono, invece, esercizi facili e brevi che spossano s<text:span text:style-name="T32">u</text:span>bito il corpo e fanno risparmiare quel tempo che va tenuto in gran conto: la corsa, il sollevamento pesi, il salto in alto, in lungo e quello, per così dire, tipico dei Salii<text:note text:id="ftn32" text:note-class="footnote"><text:note-citation>1</text:note-citation><text:note-body><text:p text:style-name="P14">Il nome dei Salii <text:span text:style-name="T33">(antichissimo collegio sacerdotale romano) </text:span>deriva dal verbo latino salire, cioè saltare, per via della particolare andatura saltellante che tenevano durante le processioni sacre.</text:p></text:note-body></text:note> <text:s/>o, per usare una definizione più volgare, del "<text:span text:style-name="T1">lavandaio</text:span>": scegli uno qualsiasi di questi semplici e facili esercizi.</text:p>
      <text:p text:style-name="P42">Ma qualunque cosa tu faccia, ritorna s<text:span text:style-name="T33">u</text:span>bito dal corpo allo spirito ed esercitalo notte e giorno. L'animo si rafforza con poca fatica; né il freddo, né il caldo e neppure la vecchiaia ne impediscono l'allenamento. Cura quel bene che migliora col tempo. Non ti dico di stare sempre sui libri o sulle carte: bisogna concedere un po' di riposo allo spirito, quanto basta per distenderlo senza svigorirlo. Una passeggiata in vettura, ad esempio, stimola il corpo e non impedisce lo studio: puoi leggere, <text:soft-page-break/>dettare, parlare, ascoltare, tutte attività che nemmeno il camminare preclude. Non trascurare poi il timbro di voce: io ti consiglio di non alzarla per gradi e a intervalli regolari e quindi abbassarla. E se poi volessi imparare come si deve passeggiare? Chiama uno di quelli cui la fame ha insegnato nuovi mestieri: ci sarà chi regolerà i tuoi passi e sorveglierà la bocca mentre mangi: si spingerà tanto avanti quanto tu concederai alla sua audacia con la tua tolleranza e credulità. E allora? Comincerai a parlare gridando e alzando al massimo il tono della voce? È naturale, invece, farla crescere a poco a poco: tanto è vero che anche le parti in causa in tribunale cominciano con calma e finiscono col gridare; nessuno implora subito la protezione dei Quiriti<text:note text:id="ftn33" text:note-class="footnote"><text:note-citation>2</text:note-citation><text:note-body><text:p text:style-name="P14">Secondo Plutarco, il termine Quiriti deriverebbe dal termine sabino che indica la spada o la lancia, <text:span text:style-name="T34">quindi portatori di lancia, termine utilizzato per indicare il cittadino-soldato, che come individuo, contrapposto al Populus, aveva il diritto di partecipare alle assemblee cittadine, le curie per l'appunto. Accogliendo questa ipotesi, SPQR andrebbe letto quindi come Senatus Populusque Quiritium Romanus. </text:span></text:p></text:note-body></text:note>.</text:p>
      <text:p text:style-name="P42">Quindi, seguendo il tuo impulso, scagliati contro i vizi, ora con più veemenza, ora con più calma, regolandoti come ti suggerisce la voce. E quando la fai ridiscendere e la abbassi, deve calare, non precipitare; deve fuoriuscire in tono misurato, e non violento alla maniera degli zotici ignoranti. Noi non vogliamo che la voce venga educata, ma che educhi. Ti ho evitato un grosso fastidio: a questo favore aggiungerò un solo piccolo compenso, anch'esso <text:soft-page-break/>di provenienza greca. Ecco un precetto straordinario: "<text:span text:style-name="T1">La vita degli sciocchi è spiacevole, inquieta, tutta proiettata al futuro.</text:span>" "<text:span text:style-name="T1">Chi lo dice?</text:span>" mi chiedi. Quello stesso di prima. Che vita a tuo parere si può definire da sciocchi? Quella di Baba o di Issione<text:note text:id="ftn34" text:note-class="footnote"><text:note-citation>3</text:note-citation><text:note-body><text:p text:style-name="P14">Issione fu condannato da Zeus a ruotare eternamente su una ruota infuocata nel Tartaro per aver tentato di sedurre Era. Seneca usa questo esempio per illustrare come gli sciocchi siano intrappolati in un ciclo infinito di sofferenza e insoddisfazione.</text:p></text:note-body></text:note>? No, è la nostra: una cieca avidità ci spinge a ricercare beni che nuoceranno e che certo non ci sazieranno mai; proprio noi che, se qualcosa potesse bastarci, l'avremmo già ottenuta; noi che non pensiamo quale gioia possa dare non chiedere nulla, come sia meraviglioso essere soddisfatti e non dipendere dalla sorte.</text:p>
      <text:p text:style-name="P49">Perciò caro Lucilio, ricorda sempre quanti vantaggi hai conseguito; e quando guarderai quante persone ti stanno davanti, pensa a quante ti sono dietro. Se vuoi essere grato agli dèi e alla tua vita, pensa al numero degli uomini che hai superato. Ma che hai a che fare tu con gli altri? Hai superato te stesso. Proponiti una meta da non oltrepassare neppure volendo; allontana finalmente questi beni pieni di insidie; sembrano migliori quando si spera di ottenerli che una volta ottenuti. Se in essi vi fosse sostanza, finirebbero per soddisfare: invece eccitano la sete di chi beve. Lascia da parte le belle apparenze; e il futuro, dominio dell'incerto destino, perché implorarlo dalla fortuna? Meglio convincersi a <text:soft-page-break/>non chiederlo. Perché, poi, chiedere? Perché ammucchiare, dimenticando la fragilità umana? Perché affannarsi? Ecco, questo giorno è l'ultimo; se non lo è, è vicino all'ultimo. Stammi bene.</text:p>
      <text:h text:style-name="P23" text:outline-level="3"><text:bookmark-start text:name="__RefHeading___Toc18208_3602757520"/>Lettera <text:span text:style-name="T35">5</text:span>3<text:bookmark-end text:name="__RefHeading___Toc18208_3602757520"/></text:h>
      <text:p text:style-name="P33">Sono pronto a tutto, ora che mi sono lasciato convincere a mettermi in mare. Salpai col mare calmo; veramente il cielo era carico di quei nuvoloni neri che, di solito, portano acqua o vento, ma pensai di farcela a percorrere le poche miglia tra la tua Napoli e Pozzuoli, anche se il tempo era incerto e minacciava tempesta. Perciò per uscirne prima, mi diressi subito al largo verso Nisida tagliando via tutte le insenature. Quando già mi trovavo a mezza strada, quella calma che mi aveva lusingato, finì; ancora non era scoppiata la burrasca, ma il mare era mosso e andava agitandosi sempre più. Cominciai a chiedere al timoniere di sbarcarmi in qualche punto della costa: mi disse che il litorale era dovunque a picco e privo di approdi e che in mezzo alla tempesta la cosa che temeva di più era la terra. Io intanto stavo così male da non curarmi più del pericolo; mi tormentava una nausea spossante, ma senza vomito; quella che smuove la bile e non la caccia fuori. Insistetti, perciò con il timoniere e lo costrinsi, volente o nolente, a dirigersi verso terra. Quando ne siamo in prossimità, non aspetto che venga eseguita nessuna delle manovre descritte da <text:soft-page-break/>Virgilio:Volgono le prore al mare o Si getta l'ancora dalla prora</text:p>
      <text:p text:style-name="P29">memore della mia maestria di vecchio amante dell'acqua gelida, mi getto in mare vestito di panno come è bene per chi fa bagni freddi.</text:p>
      <text:p text:style-name="P30">Sapessi che cosa ho passato arrampicandomi su per gli scogli, cercando una via, anzi creandomela! Ho capito che i marinai non hanno torto a temere la terra. Sono incredibili le sofferenze che ho sostenuto, mentre quasi non potevo sostenere me stesso: Ulisse, sappilo, non era destinato dalla nascita a trovar mari così agitati da fare sempre naufragio: soffriva di mal di mare. Anch'io, dovunque dovrò recarmi per mare, ci arriverò dopo vent'anni.</text:p>
      <text:p text:style-name="P30">Non appena rimisi in sesto lo stomaco - il senso di nausea, lo sai, non finisce venendo via dal mare - non appena rinfrancai il corpo ungendolo, cominciai a riflettere tra me e me, come ci dimentichiamo dei nostri difetti anche fisici, che pure si fanno sentire spesso, nonché di quelli spirituali, che più sono grandi più restano nascosti. Una leggera febbriciattola può sfuggire; ma quando aumenta e divampa una vera febbre, anche un uomo forte e abituato a soffrire deve confessare la sua malattia. I piedi ci dolgono, avvertiamo leggere fitte alle articolazioni: ma noi ancora dissimuliamo e diciamo o che ci siamo slogati una <text:soft-page-break/>caviglia o che ci siamo stancati facendo ginnastica. All'inizio si cerca di dare un nome alla malattia ancora incerta; ma quando comincia a interessare le caviglie e a deformare i piedi, bisogna ammettere che si tratta di podagra.</text:p>
      <text:p text:style-name="P29">Il contrario accade nelle malattie dello spirito: più uno sta male, meno se ne rende conto. Non c'è da stupirsene, carissimo; chi dorme un sonno leggero, durante il sonno percepisce delle immagini e dormendo a volte si accorge di dormire: un sonno profondo, invece, cancella anche i sogni e fa sprofondare la mente tanto che perdiamo coscienza di noi stessi.</text:p>
      <text:p text:style-name="P29">Perché nessuno ammette i propri difetti? Perché vi è ancora immerso: i sogni li racconta chi è sveglio e così i propri vizi li ammette solo chi è guarito. Destiamoci, dunque, e rendiamoci conto dei nostri errori. Ma solo la filosofia può destarci, può scuoterci dal nostro sonno profondo: dedicati a lei completamente, tu ne sei degno ed essa è degna di te: stringetevi l'uno all'altra. Respingi tutto il resto con forza, apertamente; non ci si può dedicare alla filosofia di tanto in tanto. Se tu fossi malato, avresti tralasciato la cura del patrimonio e dimenticato le attività forensi e non stimeresti nessuno tanto da acconsentire ad assumerti la sua difesa durante gli intervalli della malattia; cercheresti in ogni modo di liberarti quanto prima del tuo male. E allora? Non farai lo <text:soft-page-break/>stesso anche adesso? Metti da parte ogni impedimento e dedicati alla saggezza: nessuno può arrivarvi se ha mille impegni. La filosofia esercita il suo potere; il tempo lo accorda lei, non lo riceve da noi; non è un'attività accessoria, ma fondamentale; è padrona, ci sta dappresso e ci comanda.</text:p>
      <text:p text:style-name="P47"><text:span text:style-name="T24">Alessandro, a una città che gli prometteva una parte delle terre e metà di tutti i beni, rispose: "</text:span><text:span text:style-name="T5">Non sono venuto in Asia per accettare quello che mi avreste dato, ma perché voi aveste quello che io vi avrei lasciato</text:span><text:span text:style-name="T24">." Lo stesso dice la filosofia per ogni cosa: "</text:span><text:span text:style-name="T5">Non ho intenzione di accettare il tempo che vi avanza: voi avrete quello che io stessa rifiuterò</text:span><text:span text:style-name="T24">."</text:span></text:p>
      <text:p text:style-name="P29">Rivolgile tutta la tua attenzione, stalle vicino, venerala: ci sarà un grande divario tra te e gli altri; sarai superiore di molto a tutti gli uomini e gli dèi non saranno di molto superiori a te. Chiedi quale differenza ci sarà tra te e loro? Vivranno più a lungo. Ma, perbacco, ci vuole una grande abilità a racchiudere tutto in poco spazio; per il saggio la propria vita si estende quanto per dio l'eternità.</text:p>
      <text:p text:style-name="P32">Ma c'è qualcosa in cui il saggio può essere superiore a dio: quegli non teme nulla per merito della sua natura, il saggio per merito suo.</text:p>
      <text:p text:style-name="P48"><text:span text:style-name="T21">Ecco una gran cosa, avere la debolezza di un uomo e la tranquillità di un dio. È incredibile la forza della filosofia nel respingere ogni attacco della sorte. Nessun</text:span><text:span text:style-name="T23">a </text:span><text:span text:style-name="T21">arma si </text:span><text:soft-page-break/><text:span text:style-name="T21">conficca nel suo corpo; è ben difesa e salda; certi dardi li neutralizza e, come se fossero colpi leggeri, li para con le pieghe dell'ampia veste, altri li rende vani e li respinge contro chi li aveva scagliati. Stammi bene.</text:span></text:p>
      <text:h text:style-name="P22" text:outline-level="3"><text:bookmark-start text:name="__RefHeading___Toc18210_3602757520"/>Lettera 65<text:bookmark-end text:name="__RefHeading___Toc18210_3602757520"/></text:h>
      <text:p text:style-name="P34">Ieri la giornata l'ho divisa con la malattia: il mattino se l'è preso lei, nel pomeriggio ho avuto la meglio io. E così , dapprima ho messo alla prova il mio spirito con la lettura, poi, visto che l'aveva accolta bene, ho osato imporgli, anzi, permettergli di più: ho scritto qualcosa e con più zelo del solito, alle prese con un argomento difficile senza volermi arrendere; ma poi sono arrivati degli amici e con la forza mi hanno costretto a smettere come se fossi un malato recalcitrante. Allo scrivere è subentrata la conversazione: te ne riferirò la parte controversa. Come arbitro abbiamo designato te. Hai più daffare di quanto immagini: la controversia è triplice.</text:p>
      <text:p text:style-name="P34">I nostri Stoici, ti è ben noto, sostengono che in natura ci sono due elementi da cui deriva tutto, la causa e la materia. La materia giace inerte, una cosa pronta a ogni trasformazione, ma destinata alla stasi se nessuno la muove; la causa, invece, cioè la ragione, plasma la materia, la modifica come vuole e ne ricava opere diverse. Deve esserci quindi un elemento di cui una cosa è fatta e uno da cui è fatta: materia e causa. Ogni arte è imitazione della natura; perciò quello che dicevo <text:soft-page-break/>dell'universo trasferiscilo al campo operativo umano. Una statua ha avuto e la materia a disposizione dell'artista e l'artista che ha dato una forma alla materia; dunque nella statua la materia è stata il bronzo, la causa lo scultore. Identico è il modo di essere di tutte le cose: risultano dalla somma di ciò che subisce l'azione e di ciò che agisce.</text:p>
      <text:p text:style-name="P36">Per gli Stoici la causa è una sola, precisamente ciò che agisce. Aristotele ritiene che la causa si articoli in tre modi: "La prima causa," dice, "è proprio la materia, senza la quale non può essere creato nulla; la seconda l'artefice; la terza è la forma, che viene imposta alle singole opere come alla statua." Aristotele la chiama idos. "<text:span text:style-name="T1">A queste se ne aggiunge una quarta, il fine dell'intera opera.</text:span>" Mi spiego meglio. La prima causa della statua è il bronzo; poiché la statua non avrebbe mai potuto venire alla luce se non fosse esistita la materia da cui essere fusa o ricavata. La seconda causa è l'artefice: il bronzo non avrebbe potuto configurarsi in una statua, se non fossero intervenute mani esperte. La terza causa è la forma: la statua non si chiamerebbe "<text:span text:style-name="T1">Doriforo</text:span>" o "<text:span text:style-name="T1">Diadumeno</text:span>" se non le fosse stato conferito quell'aspetto. La quarta causa è il fine, senza il quale la statua non sarebbe stata plasmata. Cos'è il fine? La spinta che ha sollecitato l'artefice e a cui egli ha obbedito per creare la sua opera: può essere il denaro, se ha lavorato per vendere; o la gloria, se ha faticato per farsi un nome; o la <text:soft-page-break/>devozione religiosa, se ha preparato un dono per un tempio. Quindi c'è anche questa tra le cause motivanti: o ti rifiuti di includere tra le cause di una opera anche quell'elemento senza il quale non sarebbe stata fatta?</text:p>
      <text:p text:style-name="P36">A queste Platone ne aggiunge una quinta, il modello, che egli chiama idea; guardando a esso l'artista ha realizzato quanto si proponeva. È assolutamente secondario se tale modello sia esterno, visivo, o se sia interno, concettuale e precostituito. Dio ha dentro di sé i modelli di tutti gli esseri e ha abbracciato con la mente le misure e i modi di tutto il creabile; egli è pieno di questi modelli che Platone chiama idee immortali, immutabili, instancabili. Gli uomini muoiono, ma l'umanità su cui l'uomo è modellato, continua a esistere; e mentre gli uomini si affannano e scompaiono, essa non subisce nessuna perdita. Cinque sono, dunque, le cause, come dice Platone: ciò da cui <text:span text:style-name="T1">materia</text:span>, ciò dal quale <text:span text:style-name="T1">agente</text:span>, ciò in cui <text:span text:style-name="T1">forma</text:span>, ciò a cui <text:span text:style-name="T1">idea</text:span>, ciò per cui <text:span text:style-name="T1">fine</text:span>. In ultimo c'è il risultato che ne scaturisce. Nella statua, visto che siamo partiti da questo esempio, la materia è il bronzo, l'agente è lo scultore, la forma è la figura che le viene data, l'idea è il modello imitato dallo scultore, il fine è la ragione di chi agisce, il risultato è la statua stessa.</text:p>
      <text:p text:style-name="P36">Anche l'universo, secondo Platone, presenta tutte queste componenti: l'artefice, cioè dio; il sostrato, cioè la materia; la forma, cioè l'aspetto e l'ordine del mondo che <text:soft-page-break/>abbiamo sotto gli occhi; il modello, su cui dio ha creato un'opera tanto bella e grandiosa; il fine per cui l'ha creata.</text:p>
      <text:p text:style-name="P36">Mi chiedi che cosa ha mosso dio? La bontà. Dice Platone: "<text:span text:style-name="T1">Per quale motivo dio ha creato il mondo? Egli è buono e se uno è buono non è geloso di nessun bene; di conseguenza l'ha creato nel miglior modo possibile</text:span>."</text:p>
      <text:p text:style-name="P36">Pronuncia nella tua veste di giudice la sentenza e dichiara chi secondo te sostiene la tesi più verisimile, non quella vera in assoluto; ciò è al di sopra di noi quanto la verità stessa.</text:p>
      <text:p text:style-name="P36">Questa massa di cause enunciate da Platone e Aristotele pecca per eccesso o per difetto. Per difetto, se essi ritengono causa efficiente qualunque elemento senza il quale non può farsi niente. Tra le cause devono mettere il tempo: niente può farsi senza il tempo. Lo spazio: se manca il luogo dove una cosa può avvenire, non avverrà neppure. Il moto: senza di esso niente nasce o muore; senza il moto non c'è nessuna attività, nessun mutamento.</text:p>
      <text:p text:style-name="P36">Ma noi ora cerchiamo la causa prima e universale. Deve essere semplice, poiché anche la materia è semplice. La domanda è: qual è la causa? Ovviamente la ragione creatrice, cioè dio; tutte quelle che hai riferito non sono molteplici e singole cause, ma dipendono tutte da una sola, da quella efficiente. Dici che la forma è una causa? È <text:soft-page-break/>l'artista che la imprime all'opera: dunque, è una parte della causa, non la causa. Anche il modello non è una causa, ma un mezzo indispensabile alla causa. Il modello è indispensabile all'artista come lo scalpello, come la lima: senza di essi l'arte non può procedere e tuttavia non sono parti o cause dell'arte. "<text:span text:style-name="T1">Il fine</text:span>," si dice, "<text:span text:style-name="T1">per cui l'artista si accinge a fare qualcosa è una causa</text:span>." Sarà una causa, ma accessoria, non efficiente. Le cause accessorie sono innumerevoli: noi cerchiamo la causa universale.</text:p>
      <text:p text:style-name="P36">Platone e Aristotele venendo meno al loro consueto acume hanno affermato che l'intero universo, in quanto opera perfetta, è una causa; ma c'è una grande differenza fra l'opera e la causa dell'opera.</text:p>
      <text:p text:style-name="P36">A questo punto pronunciati, oppure - in casi simili è più facile - di' che la faccenda non è chiara e aggiorna la discussione. "<text:span text:style-name="T1">Che gusto ci provi</text:span>," potresti dire, "<text:span text:style-name="T1">a passare il tempo in codeste dispute che non ti liberano di nessuna passione, non allontanano nessun desiderio?</text:span>"</text:p>
      <text:p text:style-name="P36">Generalmente mi occupo di quegli argomenti più degni che acquietano l'anima, e prima studio me stesso, poi questo mondo. Ma nemmeno ora perdo tempo, come pensi tu; tutte queste discussioni, se non si spezzettano e non si disperdono in inutili sottigliezze, sollevano e alleviano l'anima che, oppressa da un grave fardello, desidera liberarsene e ritornare alle sue origini. Il corpo è il fardello e la pena dell'anima: sotto il suo peso l'anima è <text:soft-page-break/>oppressa, in catene, se non interviene la filosofia e non la induce a riprendere fiato di fronte allo spettacolo della natura e la allontana dalle cose terrene verso quelle divine. Questa è la sua libertà, questa la sua evasione; si sottrae al carcere in cui è prigioniera e si rigenera nel cielo. Come gli artigiani, quando fanno un lavoro di precisione e di attenzione che stanca la vista, se hanno un lume debole e incerto, escono tra la gente e ristorano gli occhi in piena luce in qualche luogo destinato al pubblico svago; così l'anima chiusa in questa triste e buia dimora, tutte le volte che può esce all'aperto e si riposa nella contemplazione della natura. Il saggio e chi coltiva la saggezza sono vincolati strettamente al proprio corpo, ma la parte migliore di se stessi è lontana e rivolge i propri pensieri a cose elevate.</text:p>
      <text:p text:style-name="P36">Come un soldato che ha prestato giuramento, egli considera la vita un servizio militare; e la sua formazione è tale che non ama la vita e non la odia, e si adatta al suo destino mortale pur sapendo che lo aspetta un destino migliore. Mi proibisci l'osservazione della natura e mi allontani dal tutto, limitandomi alla parte? Non cercherò quali siano i princip<text:span text:style-name="T36">i</text:span> dell'universo? Chi ha dato forma alle cose? Chi ha separato l'insieme degli elementi immersi in un tutt'uno e avviluppati in una materia inerte? Non cercherò chi è l'artefice di questo mondo? Per quale disegno tanta grandezza è arrivata a una legge e a un ordine? Chi ha raccolto gli elementi sparsi, ha distinto <text:soft-page-break/>quelli confusi, ha dato un'identità a ciò che giaceva in un'unica massa informe? Da dove si diffonde tanto fulgore di luce? Se è fuoco o qualcosa più splendente del fuoco? Non ricercherò tutto questo? Non conoscerò la mia origine? Se è destino che io veda una sola volta questo mondo o che rinasca più volte? Dove andrò allontanandomi da qui? Quale sede attende l'anima libera dalle leggi dell'umana schiavitù? Mi proibisci di essere partecipe del cielo, ossia mi imponi di vivere a testa bassa? Sono troppo grande e nato per un destino troppo alto per essere schiavo del mio corpo: lo vedo unicamente come una catena che limita la mia libertà; lo oppongo alla sorte, perché vi si arresti contro e non permetto che nessun colpo, trapassandolo, arrivi a me. Il corpo è la sola parte di me che può subire danno: in questa fragile dimora risiede un'anima libera. Mai questa carne mi indurrà alla paura, mai alla simulazione, indegna di un uomo onesto; non mentirò mai per riguardo a questo corpiciattolo. Quando mi sembrerà opportuno, romperò ogni rapporto con esso; ma anche ora, finché siamo uniti, non saremo soci alla pari: l'anima reclamerà per sé ogni diritto. Il disprezzo del proprio corpo è garanzia di libertà.</text:p>
      <text:p text:style-name="P50"><text:span text:style-name="T21">Per ritornare al nostro tema, a questa libertà servirà molto anche quella osservazione della natura di cui parlavamo or ora; tutto è formato appunto di materia e di dio. Dio regola gli esseri che, sparsi tutt'intorno, </text:span><text:soft-page-break/><text:span text:style-name="T21">seguono colui che li governa e li guida. Chi agisce, cioè dio, è più potente e prezioso della materia, la quale subisce l'azione di dio. La posizione che dio occupa nell'universo, l'anima la occupa nell'uomo; in noi il corpo rappresenta quello che là rappresenta la materia. Le cose inferiori siano sottomesse a quelle superiori; siamo forti contro la sorte; non temiamo le offese, le ferite, il carcere, la povertà. Cos'è la morte? O la fine o un passaggio. E io non temo di finire è lo stesso che non aver cominciato e nemmeno di passare; in nessun luogo avrò confini tanto ristretti.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7T16:53:27.808056207</meta:creation-date>
    <dc:date>2026-01-29T17:04:46.706533889</dc:date>
    <dc:creator>corrado tafaro</dc:creator>
    <meta:editing-duration>PT36M46S</meta:editing-duration>
    <meta:editing-cycles>9</meta:editing-cycles>
    <meta:generator>LibreOffice/24.2.7.2$Linux_X86_64 LibreOffice_project/420$Build-2</meta:generator>
    <meta:document-statistic meta:table-count="0" meta:image-count="0" meta:object-count="0" meta:page-count="16" meta:paragraph-count="38" meta:word-count="3740" meta:character-count="22027" meta:non-whitespace-character-count="18322"/>
  </office:meta>
</office:document-meta>
</file>