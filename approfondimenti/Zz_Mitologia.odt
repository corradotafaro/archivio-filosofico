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style:contextual-spacing="false" fo:line-height="115%" fo:text-align="justify" style:justify-single-word="false"/>
      <style:text-properties style:font-name="Noto Sans1" fo:font-size="12pt" fo:font-style="normal" fo:font-weight="bold" officeooo:rsid="00394a50" officeooo:paragraph-rsid="000c04dc" style:font-size-asian="12pt" style:font-style-asian="normal" style:font-weight-asian="bold" style:font-size-complex="12pt" style:font-style-complex="normal" style:font-weight-complex="bold"/>
    </style:style>
    <style:style style:name="P2"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3e897d" officeooo:paragraph-rsid="000c04dc"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3e897d" officeooo:paragraph-rsid="000c04dc"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2b633f" officeooo:paragraph-rsid="000c04dc"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394a50" officeooo:paragraph-rsid="000c04dc"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cm" fo:margin-bottom="0cm" style:contextual-spacing="false" fo:line-height="115%" fo:text-align="center" style:justify-single-word="false" fo:break-before="page"/>
      <style:text-properties style:font-name="Noto Sans1" fo:font-size="11pt" fo:font-style="normal" fo:font-weight="bold" officeooo:rsid="003e897d" officeooo:paragraph-rsid="000c04dc" style:font-size-asian="11pt" style:font-style-asian="normal" style:font-weight-asian="bold" style:font-size-complex="11pt" style:font-style-complex="normal" style:font-weight-complex="bold"/>
    </style:style>
    <style:style style:name="T1" style:family="text">
      <style:text-properties officeooo:rsid="004f4021"/>
    </style:style>
    <style:style style:name="T2" style:family="text">
      <style:text-properties officeooo:rsid="00446aa3"/>
    </style:style>
    <style:style style:name="T3" style:family="text">
      <style:text-properties fo:font-style="italic" style:font-style-asian="italic" style:font-style-complex="italic"/>
    </style:style>
    <style:style style:name="T4" style:family="text">
      <style:text-properties fo:font-style="italic" officeooo:rsid="004f4021" style:font-style-asian="italic" style:font-style-complex="italic"/>
    </style:style>
    <style:style style:name="T5" style:family="text">
      <style:text-properties officeooo:rsid="00538b7a"/>
    </style:style>
    <style:style style:name="T6" style:family="text">
      <style:text-properties officeooo:rsid="003f6927"/>
    </style:style>
    <style:style style:name="T7" style:family="text">
      <style:text-properties officeooo:rsid="00394a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l destino, il fato, la fortuna e la provvidenza</text:p>
      <text:p text:style-name="P2">Nella mitologia classica greca il destino umano era determinato dalle Moire, in greco "parte assegnata, destino". Le Moire, secondo Esiodo, distribuivano agli uomini, sin dall’istante della loro nascita, la buona o la cattiva sorte che la vita riservava loro. Nel poema mitologico di Esi<text:span text:style-name="T1">o</text:span>do “ Teogonia”, <text:span text:style-name="T2">le Moire </text:span>compaiono due volte: come figlie della Notte e come figlie di Zeus e Temi, <text:span text:style-name="T2">e</text:span>rano la personificazione del destino ineluttabile. Le Moire erano tre: Cloto, la più giovane, che tesseva il filo di ogni uomo; Lachesi stabiliva quanto filo spettasse a ogni uomo e decideva le sorti della vita che stava filando; Atropo, la più vecchia, che recideva il filo che rappresenta la vita, decretando il momento della morte. Tutto era deciso “a<text:span text:style-name="T3">priori”.</text:span></text:p>
      <text:p text:style-name="P3">Nei poemi omerici la realtà è rappresentata dal parallelismo fra mondo umano e mondo divino: gli <text:span text:style-name="T5">d</text:span><text:span text:style-name="T1">e</text:span>i sono ovunque, instaurano con i mortali un rapporto di favore o avversione, ostilità o aiuto. Gli <text:span text:style-name="T5">dei</text:span> sono immortali, potenti e vivono in un mondo di grazia e bellezza. Gli uomini, invece, sono mortali, fragili e soggetti a sofferenze e affanni. Zeus, il re degli dei, è spesso rappresentato come un essere capriccioso e vendicativo che si diverte a tormentare gli uomini. In altri casi, gli affanni sono causati dal destino, che è visto come una forza superiore che governa le vite degli <text:soft-page-break/>uomini. Lo stesso Achille nel libro XXIV dell’Iliade afferma: <text:span text:style-name="T3">“questo destino stabilirono gli D</text:span><text:span text:style-name="T4">e</text:span><text:span text:style-name="T3">i per gli infelici mortali, vivere nel dolore: essi invece sono senza affanni.” </text:span>All’uomo non è dato conoscere il proprio destino: esso è l’ignoto, l’imprevedibile, una volontà superiore ne muove le fila.</text:p>
      <text:p text:style-name="P4">Tuttavia, i Greci non trascorrevano un’esistenza tormentata dal timore del compiersi del destino; vivevano con la consapevolezza della fugacità. Così Mimnermo <text:span text:style-name="T2">(poeta elegiaco vissuto nel VII sec. a.C., la recitazione dei suoi componimenti lirici erano accompagnati dal suono del flauto) </text:span>nei suoi versi affronta il tema della condizione umana destinata alla vecchiaia, alla sofferenza e alla morte, manifestando nel suo lamento la fuggevolezza dell’amore <text:s/>per il destino umano. <text:span text:style-name="T1">C</text:span>antò i piaceri della vita con un senso di malinconia per il rimpianto della giovinezza che fugge, per la consapevolezza della caducità di tutte le cose, per la tristezza della "turpe vecchiaia".</text:p>
      <text:p text:style-name="P4">Rifugiarsi nel carpe diem significava accettare una visione disincantata del destino, che non può garantire una felicità a lungo termine. Da qui, la convinzione di “cogliere l’attimo” per esercitare la libertà nei confronti dell’ignoto, dell’incontrollabile destino. La libertà umana si manifesta nella scelta di vivere delle piccole cose, brevi istanti assaporati in un tempo dilatato e governato <text:soft-page-break/>da forze insuperabili. Esercitare la libertà significava accettare il proprio destino con orgoglio: gli eroi dei poemi muoiono in battaglia, consapevoli di far parte di un grande disegno divino.</text:p>
      <text:p text:style-name="P4"><text:span text:style-name="T5">N</text:span>ella religione greca antica, <text:span text:style-name="T5">Ananke, </text:span>è la dea del destino, della necessità inalterabile e del fato. Il suo nome significa "necessità" o "costrizione". È spesso rappresentata come una donna severa e dai capelli neri, che tiene in mano una clessidra o una ruota del destino. <text:span text:style-name="T5">E’</text:span> la forza che governa tutte le cose, dal moto degli astri ai fatti particolari dei singoli uomini. Essa è inalterabile e inevitabile, e non può essere piegata alla volontà degli uomini o degli dei. In Omero, Ananke è la forza che guida le vicende della guerra di Troia. È lei che decide il destino dei guerrieri e delle città. In Platone, Ananke è una delle tre Moire, le dee del destino. Essa è responsabile del passato, mentre le altre due Moire, Cloto e Lachesi, sono responsabili del presente e del futuro. <text:span text:style-name="T6">S</text:span><text:span text:style-name="T7">econdo questa chiave di lettura, il destino rappresenta </text:span><text:span text:style-name="T5">una</text:span><text:span text:style-name="T7"> forza ineluttabile che è al di là del controllo degli uomini. Tuttavia, la sorte per i greci è comunemente indicata con </text:span><text:span text:style-name="T1">il culto di </text:span><text:span text:style-name="T7">Tyche, la dea bendata, personificazione della </text:span><text:span text:style-name="T1">f</text:span><text:span text:style-name="T7">ortuna. </text:span><text:span text:style-name="T5">E’</text:span><text:span text:style-name="T7"> una figura importante nella religione e nella filosofia greca, </text:span><text:span text:style-name="T5">poiché </text:span><text:span text:style-name="T7">rappresenta la forza imprevedibile della fortuna, che può portare a eventi positivi o negativi.</text:span></text:p>
      <text:p text:style-name="P5"><text:soft-page-break/>La contrapposizione tra Tyche e Ananke è una contrapposizione tra due visioni del destino. Ananke rappresenta la visione deterministica, secondo cui il destino è inalterabile e inevitabile. Tyche, invece, rappresenta la visione probabilistica, secondo cui il destino è soggetto al caso e alla fortuna.</text:p>
      <text:p text:style-name="P5">La cultura moderna ha trasformato le Moire in figure del folklore greco; esse abitano un antro remoto e vanno a fissare il destino del neonato tre giorni dopo la nascita. È usanza, quindi, preparare loro del cibo nel giorno della visita delle Moir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6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4T16:32:29.992294674</meta:creation-date>
    <dc:date>2026-01-24T16:39:38.988966576</dc:date>
    <dc:creator>corrado tafaro</dc:creator>
    <meta:editing-duration>PT7M10S</meta:editing-duration>
    <meta:editing-cycles>1</meta:editing-cycles>
    <meta:document-statistic meta:table-count="0" meta:image-count="0" meta:object-count="0" meta:page-count="4" meta:paragraph-count="8" meta:word-count="750" meta:character-count="4704" meta:non-whitespace-character-count="3961"/>
    <meta:generator>LibreOffice/24.2.7.2$Linux_X86_64 LibreOffice_project/420$Build-2</meta:generator>
  </office:meta>
</office:document-meta>
</file>