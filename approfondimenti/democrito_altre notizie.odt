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  <style:text-properties officeooo:paragraph-rsid="00002711"/>
    </style:style>
    <style:style style:name="P3" style:family="paragraph" style:parent-style-name="Text_20_body">
      <style:paragraph-properties fo:text-align="justify" style:justify-single-word="false"/>
      <style:text-properties officeooo:paragraph-rsid="00002711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Heading_20_2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</style:style>
    <style:style style:name="T1" style:family="text">
      <style:text-properties officeooo:rsid="00002f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Democrito: «Gli uomini avidi hanno lo stesso zelo dell'ape: sono operosi, come se vivessero in eterno»</text:h>
      <text:p text:style-name="P6"/>
      <text:p text:style-name="P4">Il pensatore presocratico, che immaginò gli atomi senza microscopi, rifletté anche sulla fugacità della vita umana.</text:p>
      <text:p text:style-name="P4">In un’epoca in cui non esistevano orologi, calendari digitali né promemoria su telefono o computer, un uomo osò parlare del tempo in un modo che, sorprendentemente, conserva intatta la sua attualità ancora oggi, a distanza di 2.400 anni. Parliamo di<text:span text:style-name="Strong_20_Emphasis"> Democrito di Abdera, noto come «il filosofo che ride»</text:span>, perché trovava sempre un motivo per essere lieto o per sorridere. Democrito non fu soltanto il <text:span text:style-name="Strong_20_Emphasis">padre dell’atomismo</text:span>, ma anche un acuto osservatore della natura umana. Tra le molte frasi a lui attribuite, ce n’è una che recita: «Gli uomini avidi hanno lo stesso zelo dell'ape: sono operosi, come se vivessero in eterno». Che cosa voleva dire, esattamente?</text:p>
      <text:h text:style-name="P1" text:outline-level="2">Chi fu Democrito?</text:h>
      <text:p text:style-name="P4">Cominciamo dall’autore di questa celebre citazione. Nato intorno al 460 a.C. ad Abdera, una <text:span text:style-name="Emphasis">polis</text:span> greca della regione della Tracia, Democrito fu un<text:span text:style-name="Strong_20_Emphasis"> pensatore </text:span><text:soft-page-break/><text:span text:style-name="Strong_20_Emphasis">presocratico</text:span> che, pur vivendo lontano dal centro filosofico di Atene (dove si sviluppava l’ambiente intellettuale più vivace), elaborò una delle teorie più influenti di tutti i tempi: <text:span text:style-name="Strong_20_Emphasis">l’atomismo</text:span>.</text:p>
      <text:p text:style-name="P4">Secondo questa teoria, tutta la realtà è composta da minuscole particelle indivisibili chiamate atomi (dal greco <text:span text:style-name="Emphasis">ἄτομος</text:span>, «indivisibile»), che si muovono nel vuoto. <text:span text:style-name="Strong_20_Emphasis">L’idea che la materia fosse discontinua e costituita da unità minime fu rivoluzionaria e trasgressiva per il suo tempo</text:span>. Sarebbero dovuti passare più di due millenni prima che la scienza moderna, con nomi come Dalton, Thomson o  Rutherford, gli desse ragione.</text:p>
      <text:p text:style-name="P4">Ma ciò che molti ignorano è che Democrito non fu soltanto un fisico — per quanto privo di laboratorio — ma fu anche un filosofo morale, un pensatore esistenziale e un profondo osservatore dell’animo umano.</text:p>
      <text:h text:style-name="P1" text:outline-level="2">Il tempo come bene non rinnovabile</text:h>
      <text:p text:style-name="P4">A differenza di altri filosofi inclini a ragionare in termini di eternità, Democrito guardava all’essere umano con i piedi ben piantati a terra. Per lui il<text:span text:style-name="Strong_20_Emphasis"> tempo non era un cammino senza fine per noi mortali</text:span>; eppure si rendeva conto che la <text:span text:style-name="Strong_20_Emphasis">maggior parte delle persone viveva come se lo fosse</text:span>. La sua frase è dunque un misto di ironia e <text:soft-page-break/>compassione, una critica severa a chi sacrifica il presente in nome di un futuro che forse non arriverà mai. Proprio per questo viene da chiedersi: <text:span text:style-name="Strong_20_Emphasis">siamo davvero consapevoli di quanto tempo dedichiamo a vivere, a vivere davvero?</text:span></text:p>
      <text:h text:style-name="P1" text:outline-level="2">Un’etica fondata sulla misura</text:h>
      <text:p text:style-name="P3">Democrito riteneva che la felicità — la vera <text:span text:style-name="Strong_20_Emphasis"><text:span text:style-name="Emphasis">eudaimonia</text:span></text:span> — non risiedesse nelle ricchezze né nei piaceri smodati, ma in una vita equilibrata, guidata dalla ragione e dalla moderazione. Il suo concetto chiave era <text:span text:style-name="Strong_20_Emphasis">l’</text:span><text:span text:style-name="Strong_20_Emphasis"><text:span text:style-name="Emphasis">eutimia</text:span></text:span>, che potremmo tradurre come «serenità dell’animo», lontana da ansia, stress o depressione.</text:p>
      <text:p text:style-name="P3">Per raggiungere questo stato, il filosofo raccomandava <text:span text:style-name="Strong_20_Emphasis">l’aut</text:span><text:span text:style-name="Strong_20_Emphasis"><text:span text:style-name="T1">o-</text:span></text:span><text:span text:style-name="Strong_20_Emphasis">osservazione, la conoscenza di sé e il distacco da ogni passione eccessiva</text:span>. La chiave era vivere bene; e per vivere bene e felicemente occorre farlo con consapevolezza del tempo, senza sprecarlo in preoccupazioni inutili o ambizioni smisurate. In fondo, ciò che facciamo con questo breve arco di esistenza che ci è dato è l’unica cosa che conta.</text:p>
      <text:h text:style-name="P2" text:outline-level="2">Il filosofo che ride</text:h>
      <text:p text:style-name="P4">Democrito fu soprannominato «il filosofo che ride» non perché si prendesse gioco del mondo, ma perché <text:soft-page-break/>credeva che la conoscenza dovesse condurre alla gioia.<text:span text:style-name="Strong_20_Emphasis"> L’ignoranza, sosteneva, è la radice della paura, della superstizione e della sofferenza</text:span>; comprendere il mondo, al contrario, è liberatorio.</text:p>
      <text:p text:style-name="P4"><text:span text:style-name="Strong_20_Emphasis">Per secoli le idee di Democrito furono ignorate o persino derise</text:span>. Basti pensare ad Aristotele, che preferiva il modello dei quattro elementi (acqua, aria, terra e fuoco) e guardava con disprezzo all’atomismo democriteo. Ma nel Rinascimento e nell’Illuminismo la sua figura tornò alla ribalta. Scienziati come<text:span text:style-name="Strong_20_Emphasis"> l’astronomo francese Pierre Gassendi </text:span>ne rivalutarono il pensiero, adattando l’atomismo a un quadro teista, cioè compatibile con l’idea di un Dio creatore e ordinatore dell’universo.</text:p>
      <text:p text:style-name="P3">Nel XIX secolo la chimica moderna confermò molte delle sue intuizioni e oggi, in piena era quantistica, il suo nome continua a comparire tanto nei laboratori quanto nelle aule di fisica teorica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2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99cm" fo:margin-bottom="1.7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rrado tafaro</meta:initial-creator>
    <meta:creation-date>2026-02-26T16:06:56.957821304</meta:creation-date>
    <dc:date>2026-02-27T16:38:16.938958913</dc:date>
    <dc:creator>corrado tafaro</dc:creator>
    <meta:editing-duration>PT13M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4" meta:paragraph-count="16" meta:word-count="658" meta:character-count="4217" meta:non-whitespace-character-count="3570"/>
  </office:meta>
</office:document-meta>
</file>