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text-properties style:font-name="Noto Sans1" officeooo:rsid="01fc8fbf" officeooo:paragraph-rsid="01fc8fbf"/>
    </style:style>
    <style:style style:name="P2" style:family="paragraph" style:parent-style-name="Footnote">
      <style:paragraph-properties fo:line-height="100%" fo:text-align="justify" style:justify-single-word="false"/>
      <style:text-properties style:font-name="Noto Sans1" fo:font-size="9pt" style:font-size-asian="9pt" style:font-size-complex="9pt"/>
    </style:style>
    <style:style style:name="P3" style:family="paragraph" style:parent-style-name="Footnote">
      <style:paragraph-properties fo:text-align="justify" style:justify-single-word="false"/>
      <style:text-properties style:font-name="Noto Sans1" fo:font-size="9pt" style:font-size-asian="9pt" style:font-size-complex="9pt"/>
    </style:style>
    <style:style style:name="P4" style:family="paragraph" style:parent-style-name="Footnote">
      <style:text-properties style:font-name="Noto Sans1" fo:font-size="9pt" style:font-size-asian="9pt" style:font-size-complex="9pt"/>
    </style:style>
    <style:style style:name="P5" style:family="paragraph" style:parent-style-name="Footnote">
      <style:paragraph-properties fo:text-align="justify" style:justify-single-word="false"/>
      <style:text-properties fo:font-size="9pt" style:font-size-asian="9pt" style:font-size-complex="9pt"/>
    </style:style>
    <style:style style:name="P6" style:family="paragraph" style:parent-style-name="Footnote">
      <style:paragraph-properties fo:text-align="justify" style:justify-single-word="false"/>
    </style:style>
    <style:style style:name="P7" style:family="paragraph" style:parent-style-name="Heading_20_2" style:master-page-name="">
      <style:paragraph-properties style:page-number="auto"/>
      <style:text-properties style:font-name="Noto Sans1" fo:font-size="12pt" officeooo:paragraph-rsid="0019597b" style:font-size-asian="12pt" style:font-size-complex="12pt"/>
    </style:style>
    <style:style style:name="P8" style:family="paragraph" style:parent-style-name="Heading_20_2">
      <style:text-properties style:font-name="Noto Sans1" fo:font-size="12pt" officeooo:paragraph-rsid="0019597b" style:font-size-asian="12pt" style:font-size-complex="12pt"/>
    </style:style>
    <style:style style:name="P9" style:family="paragraph" style:parent-style-name="Heading_20_3">
      <style:text-properties style:font-name="Noto Sans1" fo:font-size="12pt" officeooo:paragraph-rsid="001878db" style:font-size-asian="12pt" style:font-size-complex="12pt"/>
    </style:style>
    <style:style style:name="P10" style:family="paragraph" style:parent-style-name="Heading_20_3">
      <style:paragraph-properties fo:margin-top="0.199cm" fo:margin-bottom="0cm" style:contextual-spacing="false"/>
      <style:text-properties style:font-name="Noto Sans1" fo:font-size="12pt" officeooo:paragraph-rsid="001878db" style:font-size-asian="12pt" style:font-size-complex="12pt"/>
    </style:style>
    <style:style style:name="P11" style:family="paragraph" style:parent-style-name="Heading_20_3">
      <style:text-properties style:font-name="Noto Sans1" fo:font-size="12pt" officeooo:paragraph-rsid="0019597b" style:font-size-asian="12pt" style:font-size-complex="12pt"/>
    </style:style>
    <style:style style:name="P12" style:family="paragraph" style:parent-style-name="Heading_20_3">
      <style:paragraph-properties fo:margin-top="0.3cm" fo:margin-bottom="0.21cm" style:contextual-spacing="false"/>
      <style:text-properties style:font-name="Noto Sans1" fo:font-size="12pt" officeooo:paragraph-rsid="0019597b" style:font-size-asian="12pt" style:font-size-complex="12pt"/>
    </style:style>
    <style:style style:name="P13" style:family="paragraph" style:parent-style-name="Heading_20_3">
      <style:paragraph-properties fo:margin-top="0.199cm" fo:margin-bottom="0cm" style:contextual-spacing="false"/>
      <style:text-properties officeooo:paragraph-rsid="0015bede"/>
    </style:style>
    <style:style style:name="P1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1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17"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74f4cc" officeooo:paragraph-rsid="0015bede" style:font-size-asian="10.5pt" style:font-weight-asian="normal" style:font-size-complex="12pt" style:font-weight-complex="normal"/>
    </style:style>
    <style:style style:name="P18"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15bede"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878db" style:font-size-asian="12pt" style:font-size-complex="12pt"/>
    </style:style>
    <style:style style:name="P2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9597b" style:font-size-asian="12pt" style:font-size-complex="12pt"/>
    </style:style>
    <style:style style:name="P21"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9597b" style:font-size-asian="12pt" style:font-size-complex="12pt"/>
    </style:style>
    <style:style style:name="P22"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9597b" style:font-size-asian="12pt" style:font-size-complex="12pt"/>
    </style:style>
    <style:style style:name="P23" style:family="paragraph" style:parent-style-name="Standard">
      <style:paragraph-properties fo:line-height="115%" fo:text-align="justify" style:justify-single-word="false"/>
      <style:text-properties style:font-name="Noto Sans1" fo:font-size="12pt" officeooo:paragraph-rsid="0019597b" style:font-size-asian="12pt" style:font-size-complex="12pt"/>
    </style:style>
    <style:style style:name="P2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1c02ae" officeooo:paragraph-rsid="0019597b"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49932d" officeooo:paragraph-rsid="001878db"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9932d" officeooo:paragraph-rsid="001878db"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margin-top="0.101cm" fo:margin-bottom="0cm" style:contextual-spacing="false" fo:line-height="115%" fo:text-align="center" style:justify-single-word="false" fo:text-indent="0.499cm" style:auto-text-indent="false" fo:background-color="transparent"/>
      <style:text-properties style:font-name="Noto Sans1" fo:font-size="12pt" fo:font-weight="normal" officeooo:rsid="004b4b28" officeooo:paragraph-rsid="001878db" style:font-size-asian="12pt" style:font-weight-asian="normal" style:font-size-complex="12pt" style:font-weight-complex="normal"/>
    </style:style>
    <style:style style:name="P32"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50ced4" officeooo:paragraph-rsid="0019597b" style:font-size-asian="12pt" style:font-weight-asian="normal" style:font-size-complex="12pt" style:font-weight-complex="normal"/>
    </style:style>
    <style:style style:name="P3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50ced4" officeooo:paragraph-rsid="0019597b"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50ced4" officeooo:paragraph-rsid="0019597b"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50ced4" officeooo:paragraph-rsid="0019597b" style:font-size-asian="12pt" style:font-weight-asian="normal" style:font-size-complex="12pt" style:font-weight-complex="normal"/>
    </style:style>
    <style:style style:name="P36"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50ced4" officeooo:paragraph-rsid="0019597b" style:font-size-asian="12pt" style:font-weight-asian="normal" style:font-size-complex="12pt" style:font-weight-complex="normal"/>
    </style:style>
    <style:style style:name="P37" style:family="paragraph" style:parent-style-name="Standard">
      <style:paragraph-properties fo:margin-top="0.199cm" fo:margin-bottom="0cm" style:contextual-spacing="false" fo:line-height="115%" fo:text-align="justify" style:justify-single-word="false"/>
      <style:text-properties style:font-name="Noto Sans1" fo:font-size="12pt" fo:font-weight="normal" officeooo:rsid="002bb611" officeooo:paragraph-rsid="0019597b" style:font-size-asian="12pt" style:font-weight-asian="normal" style:font-size-complex="12pt" style:font-weight-complex="normal"/>
    </style:style>
    <style:style style:name="P38"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612c6b" officeooo:paragraph-rsid="0019597b"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612c6b" officeooo:paragraph-rsid="0019597b"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612c6b" officeooo:paragraph-rsid="0019597b" style:font-size-asian="12pt" style:font-weight-asian="normal" style:font-size-complex="12pt" style:font-weight-complex="normal"/>
    </style:style>
    <style:style style:name="P41" style:family="paragraph" style:parent-style-name="Standard">
      <style:paragraph-properties fo:line-height="115%" fo:text-align="justify" style:justify-single-word="false"/>
      <style:text-properties style:font-name="Noto Sans1" fo:font-size="12pt" fo:font-weight="normal" officeooo:rsid="00612c6b" officeooo:paragraph-rsid="0019597b" style:font-size-asian="12pt" style:font-weight-asian="normal" style:font-size-complex="12pt" style:font-weight-complex="normal"/>
    </style:style>
    <style:style style:name="P42"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5807bd" officeooo:paragraph-rsid="0019597b" style:font-size-asian="12pt" style:font-weight-asian="normal" style:font-size-complex="12pt" style:font-weight-complex="normal"/>
    </style:style>
    <style:style style:name="P43"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weight="normal" officeooo:rsid="005807bd" officeooo:paragraph-rsid="0019597b"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5807bd" officeooo:paragraph-rsid="0019597b" style:font-size-asian="12pt" style:font-weight-asian="normal" style:font-size-complex="12pt" style:font-weight-complex="normal"/>
    </style:style>
    <style:style style:name="P4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5807bd" officeooo:paragraph-rsid="0019597b"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5807bd" officeooo:paragraph-rsid="0019597b" style:font-size-asian="12pt" style:font-weight-asian="normal" style:font-size-complex="12pt" style:font-weight-complex="normal"/>
    </style:style>
    <style:style style:name="P4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language="it" fo:country="IT" fo:font-weight="normal" officeooo:rsid="0049932d" officeooo:paragraph-rsid="001878db" style:font-size-asian="12pt" style:font-weight-asian="normal" style:font-size-complex="12pt" style:font-weight-complex="normal"/>
    </style:style>
    <style:style style:name="P4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bold" officeooo:rsid="00612c6b" officeooo:paragraph-rsid="0019597b" style:font-size-asian="12pt" style:font-weight-asian="bold" style:font-size-complex="12pt" style:font-weight-complex="bold"/>
    </style:style>
    <style:style style:name="P4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bold" officeooo:rsid="00612c6b" officeooo:paragraph-rsid="0019597b" style:font-size-asian="12pt" style:font-weight-asian="bold" style:font-size-complex="12pt" style:font-weight-complex="bold"/>
    </style:style>
    <style:style style:name="P5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italic" officeooo:paragraph-rsid="0019597b" style:font-size-asian="12pt" style:font-style-asian="italic" style:font-size-complex="12pt" style:font-style-complex="italic"/>
    </style:style>
    <style:style style:name="T1" style:family="text">
      <style:text-properties style:font-name="Noto Sans1"/>
    </style:style>
    <style:style style:name="T2" style:family="text">
      <style:text-properties style:font-name="Noto Sans1" fo:font-style="normal" fo:font-weight="normal" officeooo:rsid="001c02ae" style:font-style-asian="normal" style:font-weight-asian="normal" style:font-style-complex="normal" style:font-weight-complex="normal"/>
    </style:style>
    <style:style style:name="T3" style:family="text">
      <style:text-properties style:font-name="Noto Sans1" fo:font-style="italic" fo:font-weight="normal" officeooo:rsid="001c02ae" style:font-style-asian="italic" style:font-weight-asian="normal" style:font-style-complex="italic" style:font-weight-complex="normal"/>
    </style:style>
    <style:style style:name="T4" style:family="text">
      <style:text-properties style:font-name="Noto Sans1" fo:font-size="12pt" fo:font-style="normal" fo:font-weight="normal" officeooo:rsid="001c02ae" style:font-size-asian="12pt" style:font-style-asian="normal" style:font-weight-asian="normal" style:font-size-complex="12pt" style:font-style-complex="normal" style:font-weight-complex="normal"/>
    </style:style>
    <style:style style:name="T5" style:family="text">
      <style:text-properties style:font-name="Noto Sans1" fo:font-size="12pt" fo:font-style="normal" fo:font-weight="normal" officeooo:rsid="001c02ae" style:font-size-asian="10.5pt" style:font-style-asian="normal" style:font-weight-asian="normal" style:font-size-complex="12pt" style:font-style-complex="normal" style:font-weight-complex="normal"/>
    </style:style>
    <style:style style:name="T6" style:family="text">
      <style:text-properties style:font-name="Noto Sans1" fo:font-size="12pt" fo:font-style="italic" fo:font-weight="normal" officeooo:rsid="001c02ae" style:font-size-asian="12pt" style:font-style-asian="italic" style:font-weight-asian="normal" style:font-size-complex="12pt" style:font-style-complex="italic" style:font-weight-complex="normal"/>
    </style:style>
    <style:style style:name="T7" style:family="text">
      <style:text-properties style:font-name="Noto Sans1" fo:font-size="12pt" fo:font-style="italic" fo:font-weight="normal" officeooo:rsid="001c02ae" style:font-size-asian="10.5pt" style:font-style-asian="italic" style:font-weight-asian="normal" style:font-size-complex="12pt" style:font-style-complex="italic" style:font-weight-complex="normal"/>
    </style:style>
    <style:style style:name="T8" style:family="text">
      <style:text-properties style:font-name="Noto Sans1" fo:font-size="12pt" fo:font-weight="normal" style:font-size-asian="12pt" style:font-weight-asian="normal" style:font-size-complex="12pt" style:font-weight-complex="normal"/>
    </style:style>
    <style:style style:name="T9" style:family="text">
      <style:text-properties style:font-name="Noto Sans1" fo:font-size="12pt" fo:font-weight="normal" officeooo:rsid="0062c30a" style:font-size-asian="12pt" style:font-weight-asian="normal" style:font-size-complex="12pt" style:font-weight-complex="normal"/>
    </style:style>
    <style:style style:name="T10" style:family="text">
      <style:text-properties fo:font-style="normal" officeooo:rsid="001c02ae" style:font-style-asian="normal" style:font-style-complex="normal"/>
    </style:style>
    <style:style style:name="T11" style:family="text">
      <style:text-properties fo:font-style="normal" fo:font-weight="normal" officeooo:rsid="001c02ae" style:font-style-asian="normal" style:font-weight-asian="normal"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5b0495" style:font-style-asian="italic" style:font-style-complex="italic"/>
    </style:style>
    <style:style style:name="T14" style:family="text">
      <style:text-properties fo:font-style="italic" officeooo:rsid="00604106"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c02ae" style:font-style-asian="italic" style:font-weight-asian="normal" style:font-style-complex="italic" style:font-weight-complex="normal"/>
    </style:style>
    <style:style style:name="T17" style:family="text">
      <style:text-properties fo:language="it" fo:country="IT"/>
    </style:style>
    <style:style style:name="T18" style:family="text">
      <style:text-properties fo:language="it" fo:country="IT" fo:font-style="normal" officeooo:rsid="001c02ae" style:font-style-asian="normal" style:font-style-complex="normal"/>
    </style:style>
    <style:style style:name="T19" style:family="text">
      <style:text-properties fo:language="it" fo:country="IT" fo:font-style="italic" style:font-style-asian="italic" style:font-style-complex="italic"/>
    </style:style>
    <style:style style:name="T20" style:family="text">
      <style:text-properties fo:font-size="12pt" fo:font-style="normal" fo:font-weight="normal" officeooo:rsid="001c02ae" style:font-size-asian="12pt" style:font-style-asian="normal" style:font-weight-asian="normal" style:font-size-complex="12pt" style:font-style-complex="normal" style:font-weight-complex="normal"/>
    </style:style>
    <style:style style:name="T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font-size="12pt" fo:font-style="italic" fo:font-weight="normal" officeooo:rsid="001c02ae" style:font-size-asian="12pt" style:font-style-asian="italic" style:font-weight-asian="normal" style:font-size-complex="12pt" style:font-style-complex="italic"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62c30a" style:font-size-asian="12pt" style:font-weight-asian="normal" style:font-size-complex="12pt" style:font-weight-complex="normal"/>
    </style:style>
    <style:style style:name="T25" style:family="text">
      <style:text-properties officeooo:rsid="00762f7f"/>
    </style:style>
    <style:style style:name="T26" style:family="text">
      <style:text-properties officeooo:rsid="0076667a"/>
    </style:style>
    <style:style style:name="T27" style:family="text">
      <style:text-properties fo:font-size="11pt" fo:font-weight="bold" officeooo:rsid="0049932d" style:font-size-asian="11pt" style:font-weight-asian="bold" style:font-size-complex="11pt" style:font-weight-complex="bold"/>
    </style:style>
    <style:style style:name="T28" style:family="text">
      <style:text-properties officeooo:rsid="0049e52c"/>
    </style:style>
    <style:style style:name="T29" style:family="text">
      <style:text-properties officeooo:rsid="00524e22"/>
    </style:style>
    <style:style style:name="T30" style:family="text">
      <style:text-properties officeooo:rsid="004b7642"/>
    </style:style>
    <style:style style:name="T31" style:family="text">
      <style:text-properties officeooo:rsid="0055b5d8"/>
    </style:style>
    <style:style style:name="T32" style:family="text">
      <style:text-properties officeooo:rsid="005b0495"/>
    </style:style>
    <style:style style:name="T33" style:family="text">
      <style:text-properties officeooo:rsid="00612c6b"/>
    </style:style>
    <style:style style:name="T34" style:family="text">
      <style:text-properties officeooo:rsid="0062c30a"/>
    </style:style>
    <style:style style:name="T35" style:family="text">
      <style:text-properties fo:font-weight="normal" style:font-weight-asian="normal" style:font-weight-complex="normal"/>
    </style:style>
    <style:style style:name="T36" style:family="text">
      <style:text-properties fo:font-weight="normal" officeooo:rsid="0062c30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bookmark-start text:name="__RefHeading___Toc18192_3602757520"/>Il disprezzo dei beni materiali<text:bookmark-end text:name="__RefHeading___Toc18192_3602757520"/></text:h>
      <text:p text:style-name="P21"><text:span text:style-name="T18">Secondo Seneca, i beni materiali sono futili e non contribuiscono alla vera felicità. Il disprezzo per le ricchezze mondane è una via verso una vita più autentica e serena.</text:span></text:p>
      <text:h text:style-name="P11" text:outline-level="3"><text:bookmark-start text:name="__RefHeading___Toc18194_3602757520"/>Lettera 14<text:bookmark-end text:name="__RefHeading___Toc18194_3602757520"/></text:h>
      <text:p text:style-name="P36">Riconosco che è innato in noi l'amore del nostro corpo e riconosco che ne abbiamo la tutela. Non dico che non bisogna averne riguardo, dico che non bisogna esserne schiavi: se uno è schiavo del proprio corpo e teme troppo per esso e fa tutto in sua funzione, sarà schiavo di molti. Comportiamoci non come se dovessimo vivere per il corpo, ma consci che non possiamo vivere senza. Se lo amiamo più del necessario, siamo tormentati dai timori, oppressi dalle preoccupazioni, esposti agli oltraggi. Colui al quale è troppo caro il proprio corpo, tiene in poco conto la virtù. Abbiamone, dunque, la massima cura, tanto, però da essere pronti a gettarlo nel fuoco quando lo richiedano la ragione, la dignità, la lealtà.</text:p>
      <text:p text:style-name="P33">Nondimeno, per quanto possibile, evitiamo anche i disagi, non solo i pericoli, e mettiamoci al sicuro, pensando di volta in volta come si possano allontanare i casi più temibili. Questi, se non sbaglio, sono di tre tipi: si teme la povertà, le malattie, la violenza dei più forti. Tra tutte queste ad atterrirci maggiormente è la minaccia del <text:soft-page-break/>potere altrui, poiché si presenta con grande strepito e fragore. I mali naturali cui ho accennato, la povertà e le malattie, si insinuano silenziosamente e non spaventano: non li vediamo, né li sentiamo giungere: il male che ci viene dagli altri, invece, arriva con un grande apparato: ferro, fuoco, catene, branchi di fiere per fare scempio delle vittime. Pensa ora al carcere, alla croce, al cavalletto, all'uncino, al palo ficcato nel corpo fino a uscire dalla bocca, alle membra lacerate dai carri lanciati in direzioni opposte, alla tunica intrisa e intessuta di materiale infiammabile e a tutte le torture che la ferocia umana ha escogitato. Non c'è, perciò, da stupirsi se un male che ha forme diverse e un apparato raccapricciante spaventa tanto. Infatti, come il carnefice ottiene di più se mette in mostra più strumenti di tortura - spesso, è cosa nota, soccombe alla vista uno che al dolore avrebbe resistito -, così , tra le sciagure che fiaccano e domano il nostro animo, hanno maggior forza quelle che si presentano con grande esteriorità. Ci sono disgrazie altrettanto gravi, la fame, intendo, la sete, le ulcere interne e la febbre che brucia le viscere, ma sono occulte e prive di minacce evidenti: le altre, invece, sono come le grandi guerre: si vincono con un vistoso spiegamento di forze.</text:p>
      <text:p text:style-name="P34">Cerchiamo, dunque, di tenerci lontani dai mali. A volte è il popolo che dobbiamo temere; a volte, se in una città vige la norma di prendere in senato la maggior parte <text:soft-page-break/>delle decisioni, dobbiamo temere i senatori influenti; a volte singoli individui, cui è concesso dal popolo il potere sul popolo. Avere amici tutti costoro sarebbe faticoso: è sufficiente non averli nemici. Perciò il saggio non provocherà mai l'ira dei potenti, anzi la eviterà, come in navigazione si evitano le tempeste.</text:p>
      <text:p text:style-name="P34">Diretto in Sicilia, hai attraversato lo stretto. Il pilota temerario sfida l'austro minaccioso che sconvolge il mare siciliano e crea pericolosi vortici; non tiene la rotta a sinistra, ma si dirige là dove Cariddi agita il mare. Il pilota più prudente, invece, chiede a chi conosce il posto la direzione delle correnti e quali indicazioni diano le nubi; tiene la rotta lontana da quella zona tristemente famosa per i suoi vortici. Così fa il saggio: evita i potenti che possono nuocergli, badando soprattutto a non darlo a vedere; parte della sicurezza risiede, infatti, nel non aspirarvi apertamente: se uno fugge una cosa, la condanna.</text:p>
      <text:p text:style-name="P34">Dobbiamo, dunque, vedere in che modo possiamo metterci al sicuro dalla massa. Per prima cosa cerchiamo di non avere i suoi stessi desideri: tra rivali c'è sempre lotta. Inoltre non dobbiamo possedere nulla che procuri un grande guadagno a chi voglia sottrarcelo: porta indosso il minimo indispensabile di beni soggetti a furto. Nessuno versa il sangue di un altro per il gusto di uccidere, o almeno pochi; la maggior parte agisce più <text:soft-page-break/>per calcolo che per odio. I banditi non assalgono uno che non ha niente con sé: anche in una strada insidiata da malviventi, chi è povero può camminare tranquillo.</text:p>
      <text:p text:style-name="P34">Inoltre, secondo un vecchio precetto, ci sono tre cose da evitare con cura: l'odio, l'invidia, il disprezzo. Solo la saggezza può mostrarci come realizzare questo intento; è difficile tenere una giusta via di mezzo ed evitare che la nostra paura dell'invidia ci porti a essere disprezzati, e mentre non vogliamo calpestare nessuno, gli altri abbiano l'impressione che possiamo essere calpestati. Per molti fu causa di timore l'essere temuti. Abbandoniamo tutte queste posizioni: il disprezzo altrui nuoce quanto la deferenza.</text:p>
      <text:p text:style-name="P34">Dobbiamo rifugiarci nella filosofia; questa disciplina ispira un sacro rispetto non solo alle persone oneste, ma anche agli uomini non del tutto malvagi. L'eloquenza forense e qualunque altra cosa possa avere influenza sul popolo, crea avversari: la filosofia, invece, pacifica e presa dalle sue occupazioni, non può essere oggetto di disprezzo, viene anzi tenuta in considerazione in tutte le professioni anche dagli uomini peggiori. Mai la perversità sarà tanto potente, mai si congiurerà a tal punto contro le virtù che il nome della filosofia non rimanga sacro e venerabile; bisogna però occuparsene con serietà e moderazione.</text:p>
      <text:p text:style-name="P34"><text:soft-page-break/>"<text:span text:style-name="T12">E allora?</text:span>" ribatti. "<text:span text:style-name="T12">Ti sembra che Catone abbia esercitato la filosofia con misura, quando respinse la guerra civile con la forza dei suoi discorsi? Quando intervenne nella lotta dei capi furenti? Quando, mentre alcuni si scagliavano contro Pompeo, altri contro Cesare, egli li attaccò entrambi?</text:span></text:p>
      <text:p text:style-name="P34">Qualcuno può mettere in discussione se a quel tempo il saggio avrebbe dovuto occuparsi di politica. Che vuoi, Marco Catone? Oramai non è più in gioco la libertà: già da tempo è andata in malora. Il problema è se avrà il potere Cesare o Pompeo: che hai a che fare con questa disputa? Niente. Si sceglie un padrone: che ti importa chi vince? Può anche vincere il migliore, ma chi vincerà non può non essere il peggiore. Ho accennato all'ultimo periodo dell'attività di Catone; ma neppure negli anni precedenti il saggio poteva intervenire in quello scempio dello stato. Che altro poteva fare Catone<text:note text:id="ftn29" text:note-class="footnote"><text:note-citation>1</text:note-citation><text:note-body><text:p text:style-name="P2">Seguace della filosofia stoica e celebre oratore, Catone Uticense viene ricordato, oltre che per la sua caparbietà e tenacia, per essersi ribellato alla presa di potere da parte del suo rivale Cesare, preferendo il suicidio all'umiliazione di farsi graziare da Cesare e assistere alla fine dei valori repubblicani di Roma, che aveva sempre difeso.</text:p></text:note-body></text:note> se non gridare e parlare invano, quando, sollevato di peso dal popolo e coperto di sputi, ora veniva trascinato via dal foro, ora veniva condotto dal senato al carcere?</text:p>
      <text:p text:style-name="P34">Vedremo in seguito se il saggio debba partecipare alla vita politica: richiamo intanto la tua attenzione su quegli Stoici che, esclusi dagli affari pubblici, si ritirarono a vivere in disparte e a dare agli uomini leggi al riparo dalla <text:soft-page-break/>violenza dei potenti. Il saggio non porterà scompiglio nella moralità pubblica, e non attirerà il popolo a sé vivendo in maniera singolare. "<text:span text:style-name="T12">E allora? Sarà completamente al sicuro chi seguirà questo modello di vita?</text:span>" Non posso garantirtelo, come a un uomo temperante non posso garantire la salute, pur essendo la temperanza una valida premessa al benessere fisico.</text:p>
      <text:p text:style-name="P34">Qualche nave naufraga addirittura in porto: pensa a che cosa può accadere in mezzo al mare! Quanto maggiore sarebbe il pericolo per chi ha molte attività e si dà da fare, se neppure vivendo appartati si è al sicuro? Talora vanno a morte gli innocenti - chi lo nega?, - <text:s/>ma più spesso i colpevoli. Se un soldato è stato colpito attraverso l'armatura non è detto che non sappia combattere.</text:p>
      <text:p text:style-name="P34">Il saggio infine, in ogni cosa guarda al proposito, non all'esito; cominciare dipende da noi, del risultato, invece, decide la sorte e io non le riconosco il diritto di giudicarmi. "<text:span text:style-name="T12">Ma farà nascere contrattempi, avversità</text:span>." Chi è colpevole non condanna.</text:p>
      <text:p text:style-name="P32">E ora tendi la mano per il dono giornaliero. Te la riempirò d'oro, e poiché si è fatto cenno all'oro, senti in che modo puoi usarlo e goderne con maggiore soddisfazione.</text:p>
      <text:p text:style-name="P33">"<text:span text:style-name="T12">Della ricchezza gode soprattutto l'uomo che non ne sente affatto il bisogno.</text:span>" "<text:span text:style-name="T12">Dimmene l'autore</text:span>" dici. Perché tu sappia quanto sono generoso, mi sono proposto di <text:soft-page-break/>lodare le sentenze altrui: si tratta di Epicuro o di Metrodoro o di qualche altro filosofo di quella scuola.</text:p>
      <text:p text:style-name="P34">E che importa chi l'ha detto? L'ha detto per tutti. Se uno sente il bisogno della ricchezza, teme di perderla; ma nessuno può godere di un bene che gli dà preoccupazione. Cerca il modo di accrescerla; e mentre pensa a incrementarla, dimentica di farne uso. Fa i conti, passa tutto il suo tempo nel foro, consulta il libro dei crediti: da padrone diventa amministratore. Stammi bene.</text:p>
      <text:h text:style-name="P11" text:outline-level="3"><text:bookmark-start text:name="__RefHeading___Toc18196_3602757520"/>Lettera 20<text:bookmark-end text:name="__RefHeading___Toc18196_3602757520"/></text:h>
      <text:p text:style-name="P46">Se hai la forza e ti ritieni degno di avere un giorno pieno dominio su di te, ne sono contento; sarà per me motivo di gloria se riuscirò a tirarti fuori da questa situazione in cui ondeggi senza speranza di uscirne. Ti prego caldamente, Lucilio mio, scolpisci nel profondo del tuo animo i principi filosofici e constata i tuoi progressi non in base ai discorsi o agli scritti, ma alla fermezza d'animo e al controllo delle passioni: dimostra con i fatti la verità delle parole.</text:p>
      <text:p text:style-name="P43">Diverso proposito hanno gli oratori che cercano di ottenere il consenso del pubblico, oppure coloro che attirano l'attenzione dei giovani e degli oziosi dissertando con scioltezza su svariati argomenti: la filosofia insegna ad agire, non a parlare, ed esige che si viva secondo le sue leggi, perché la vita non sia in contrasto con le <text:soft-page-break/>parole, né con se stessa, e tutte le nostre azioni si uniformino a un unico principio. Questo è il compito principale della saggezza, e anche l'indizio più certo: che le azioni concordino con i discorsi, così che l'uomo sia sempre uguale e identico a se stesso.</text:p>
      <text:p text:style-name="P43">"<text:span text:style-name="T12">Chi si comporta così </text:span>?" Pochi, ma qualcuno c'è. Certo non è facile; io non sostengo che il saggio avanzerà sempre con lo stesso passo, ma per una stessa via.</text:p>
      <text:p text:style-name="P42">Perciò esaminati a fondo: se i tuoi abiti sono in contrasto con la tua casa, se sei generoso con te e avaro con i tuoi, se ceni frugalmente, ma hai dimore lussuose. Scegli un'unica regola di vita e conforma ad essa tutta la tua esistenza. Alcuni in casa si moderano, fuori, invece, conducono una vita sfarzosa e senza freni; questa disuguaglianza è un difetto ed è indizio di un animo volubile che non ha trovato anc<text:span text:style-name="T32">o</text:span>ra la sua strada.</text:p>
      <text:p text:style-name="P44">Ti spiegherò anche da dove nascano quest'incostanza e questa incoerenza di azione e di pensiero: nessuno ha chiari propositi e, se li ha, non persevera, ma li lascia da parte; e non si limita a cambiare idea: torna indietro e si volge nuovamente a quelli che aveva abbandonato e rinnegato.</text:p>
      <text:p text:style-name="P45">Perciò per lasciare da parte le vecchie definizioni di saggezza e abbracciare ogni espressione della vita umana, mi contento di questa: che cos'è la saggezza? Volere o non volere sempre la stessa cosa. Non occorre <text:soft-page-break/>aggiungere la condizione che bisogna volere il bene: nessuno può volere sempre la stessa cosa, se non è giusta.</text:p>
      <text:p text:style-name="P45">Gli uomini non sanno che cosa vogliono, se non nel momento in cui lo vogliono; nessuno ha deciso una volta per tutte ciò che vuole o non vuole; ogni giorno cambiano opinione e se ne formano una opposta, e i più prendono la vita come un gioco. Persegui, dunque, i tuoi propositi e forse arriverai alla vetta o a un punto dove tu solo puoi capire di non essere anc<text:span text:style-name="T32">o</text:span>ra in cima.</text:p>
      <text:p text:style-name="P45">"<text:span text:style-name="T12">Che cosa accadrà</text:span>," chiedi, "<text:span text:style-name="T12">a tutti i miei servi quando non avrò più il mio patrimonio?</text:span>" Quando cesserai di mantenerli, si manterranno da soli, oppure, quello che tu non puoi sapere dai tuoi favori, lo saprai dalla povertà: resteranno gli amici veri e sicuri, e se ne andrà chi non cercava te, ma altro. Non si deve, allora, amare la povertà anche solo perché ti mostra chi ti ama veramente? Quando verrà quel giorno in cui nessuno mentirà più per rispetto a te!</text:p>
      <text:p text:style-name="P45">I tuoi pensieri tendano a questo: ricerca e desidera solo, rimettendo a dio ogni altro desiderio, di essere pago di te stesso e dei beni che nascono da te. Quale felicità può essere più vicina? Riduciti a un modesto livello di vita, da cui non puoi precipitare; e perché tu lo faccia più volentieri, il tributo che ora ti darò in questa lettera verterà sull'argomento.</text:p>
      <text:p text:style-name="P45"><text:soft-page-break/>Se pure non sei d'accordo, anche questa volta Epicuro pagherà volentieri al mio posto. "<text:span text:style-name="T12">Se dormirai in un misero letto e vestirai umili panni, le tue parole, credimi, sembreranno anc</text:span><text:span text:style-name="T13">o</text:span><text:span text:style-name="T12">ra più nobili: non le pronuncerai soltanto, ma le proverai coi fatti.</text:span>" Io, certo, ascolto con spirito diverso gli insegnamenti del nostro Demetrio, da quando l'ho visto con la sola tunica, disteso su meno che un pagliericcio: non è maestro, ma testimone della verità. "<text:span text:style-name="T12">E allora? Non si può disprezzare la ricchezza, pur possedendola?</text:span>" Perché no? E dimostra una straordinaria grandezza morale chi se la ride delle ricchezze che lo circondano, molto stupito di possederle, e sente dire che sono sue, ma dentro di sé non le sente tali. È già molto non essere corrotti dal contatto con la ricchezza; è grande chi ci vive in mezzo da povero.</text:p>
      <text:p text:style-name="P45">"<text:span text:style-name="T12">Io non so</text:span>," dici, "<text:span text:style-name="T12">come costui sopporterà la povertà, se dovesse incapparvi.</text:span>" E io, da parte mia, o Epicuro, non potrei dire se questo povero disprezzerà la ricchezza nel caso dovesse capitargli; bisogna, perciò esaminare in entrambi i casi la disposizione di spirito e considerare se il ricco si adatterebbe alla povertà, e se il povero non si compiacerebbe della ricchezza. Il lettuccio o i vestiti miseri non bastano a provare la buona disposizione di spirito, a meno che non sia evidente che si sopportano non per necessità, ma per libera scelta.</text:p>
      <text:p text:style-name="P45"><text:soft-page-break/>E d'altra parte è segno di un animo grande non correre verso la povertà come se fosse la condizione migliore, ma esservi preparati come se fosse facile. E, in realtà, è facile, Lucilio; e anche piacevole, se ci accostiamo a essa dopo aver meditato a lungo; vi troveremo la serenità senza la quale non c'è nessuna gioia.</text:p>
      <text:p text:style-name="P24">Ritengo, dunque, necessario quello che, come ti ho scritto, hanno fatto spesso i grandi uomini: inframmezzare alcuni giorni in cui, vivendo una povertà immaginaria, ci prepariamo a quella vera; e tanto più dobbiamo farlo, in quanto viviamo immersi nei piaceri e giudichiamo tutto duro e difficile. Bisogna, invece, scuotere l'animo nostro dal sonno, stimolarlo e ricordargli che la natura ci ha dato esigenze minime. Nessuno nasce ricco; a tutti i neonati deve bastare del latte e un panno: ma, dopo questi inizi, non ci bastano i regni. Stammi bene.</text:p>
      <text:p text:style-name="P41"><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29T16:54:19.629366136</dc:date>
    <dc:creator>corrado tafaro</dc:creator>
    <meta:editing-duration>PT55M2S</meta:editing-duration>
    <meta:editing-cycles>7</meta:editing-cycles>
    <meta:generator>LibreOffice/24.2.7.2$Linux_X86_64 LibreOffice_project/420$Build-2</meta:generator>
    <meta:document-statistic meta:table-count="0" meta:image-count="0" meta:object-count="0" meta:page-count="11" meta:paragraph-count="33" meta:word-count="2471" meta:character-count="14661" meta:non-whitespace-character-count="12222"/>
  </office:meta>
</office:document-meta>
</file>