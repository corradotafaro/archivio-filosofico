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Microsoft YaHei" svg:font-family="'Microsoft YaHei'" style:font-family-generic="system" style:font-pitch="variable"/>
    <style:font-face style:name="Noto Sans" svg:font-family="'Noto Sans'"/>
    <style:font-face style:name="Noto Sans1" svg:font-family="'Noto Sans'"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0.716cm" fo:margin-left="0.09cm" table:align="left"/>
    </style:style>
    <style:style style:name="Tabella1.A" style:family="table-column">
      <style:table-column-properties style:column-width="3.466cm"/>
    </style:style>
    <style:style style:name="Tabella1.B" style:family="table-column">
      <style:table-column-properties style:column-width="3.651cm"/>
    </style:style>
    <style:style style:name="Tabella1.C" style:family="table-column">
      <style:table-column-properties style:column-width="3.598cm"/>
    </style:style>
    <style:style style:name="Tabella1.1" style:family="table-row">
      <style:table-row-properties style:min-row-height="0.794cm"/>
    </style:style>
    <style:style style:name="Tabella1.A1" style:family="table-cell">
      <style:table-cell-properties fo:padding="0.049cm" fo:border="none" style:writing-mode="page"/>
    </style:style>
    <style:style style:name="Tabella1.2" style:family="table-row">
      <style:table-row-properties style:min-row-height="1.071cm"/>
    </style:style>
    <style:style style:name="P1" style:family="paragraph" style:parent-style-name="Header">
      <style:paragraph-properties fo:margin-top="0cm" fo:margin-bottom="0cm" style:contextual-spacing="false" fo:text-align="center" style:justify-single-word="false"/>
    </style:style>
    <style:style style:name="P2" style:family="paragraph" style:parent-style-name="Contents_20_3">
      <style:paragraph-properties>
        <style:tab-stops>
          <style:tab-stop style:position="11.398cm" style:type="right" style:leader-style="dotted" style:leader-text="."/>
        </style:tab-stops>
      </style:paragraph-properties>
    </style:style>
    <style:style style:name="P3" style:family="paragraph" style:parent-style-name="Contents_20_3">
      <style:paragraph-properties fo:margin-top="0.101cm" fo:margin-bottom="0cm" style:contextual-spacing="false">
        <style:tab-stops>
          <style:tab-stop style:position="11.398cm" style:type="right" style:leader-style="dotted" style:leader-text="."/>
        </style:tab-stops>
      </style:paragraph-properties>
    </style:style>
    <style:style style:name="P4" style:family="paragraph" style:parent-style-name="Contents_20_3">
      <style:paragraph-properties fo:margin-top="0.101cm" fo:margin-bottom="0cm" style:contextual-spacing="false">
        <style:tab-stops>
          <style:tab-stop style:position="11.398cm" style:type="right" style:leader-style="dotted" style:leader-text="."/>
        </style:tab-stops>
      </style:paragraph-properties>
      <style:text-properties officeooo:paragraph-rsid="00da8b35"/>
    </style:style>
    <style:style style:name="P5" style:family="paragraph" style:parent-style-name="Contents_20_3">
      <style:paragraph-properties>
        <style:tab-stops>
          <style:tab-stop style:position="11.398cm" style:type="right" style:leader-style="dotted" style:leader-text="."/>
        </style:tab-stops>
      </style:paragraph-properties>
      <style:text-properties officeooo:paragraph-rsid="00da8b35"/>
    </style:style>
    <style:style style:name="P6" style:family="paragraph" style:parent-style-name="Contents_20_4">
      <style:paragraph-properties>
        <style:tab-stops>
          <style:tab-stop style:position="9.899cm" style:type="right" style:leader-style="dotted" style:leader-text="."/>
        </style:tab-stops>
      </style:paragraph-properties>
    </style:style>
    <style:style style:name="P7" style:family="paragraph" style:parent-style-name="Standard">
      <style:paragraph-properties fo:margin-top="0.4cm" fo:margin-bottom="0cm" style:contextual-spacing="false" fo:line-height="115%" fo:text-align="justify" style:justify-single-word="false"/>
      <style:text-properties style:use-window-font-color="true" loext:opacity="0%" style:font-name="Noto Sans" fo:font-size="12pt" fo:font-weight="normal" officeooo:rsid="0082a5a0" officeooo:paragraph-rsid="0082a5a0" fo:background-color="transparent" style:font-name-asian="Noto Sans" style:font-size-asian="12pt" style:font-weight-asian="normal" style:font-name-complex="Noto Sans" style:font-size-complex="12pt" style:font-weight-complex="normal"/>
    </style:style>
    <style:style style:name="P8" style:family="paragraph" style:parent-style-name="Standard">
      <style:paragraph-properties fo:margin-top="0.199cm" fo:margin-bottom="0cm" style:contextual-spacing="false" fo:line-height="115%" fo:text-align="justify" style:justify-single-word="false"/>
      <style:text-properties style:use-window-font-color="true" loext:opacity="0%" style:font-name="Noto Sans" fo:font-size="12pt" fo:font-weight="normal" officeooo:rsid="007c99f6" officeooo:paragraph-rsid="0082a5a0" fo:background-color="transparent" style:font-name-asian="Noto Sans" style:font-size-asian="12pt" style:font-weight-asian="normal" style:font-name-complex="Noto Sans" style:font-size-complex="12pt" style:font-weight-complex="normal"/>
    </style:style>
    <style:style style:name="P9"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rsid="007c99f6" officeooo:paragraph-rsid="007c99f6" fo:background-color="transparent" style:font-name-asian="Noto Sans" style:font-size-asian="12pt" style:font-weight-asian="normal" style:font-name-complex="Noto Sans" style:font-size-complex="12pt" style:font-weight-complex="normal"/>
    </style:style>
    <style:style style:name="P10"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82a5a0" fo:background-color="transparent" style:font-name-asian="Noto Sans" style:font-size-asian="12pt" style:font-weight-asian="normal" style:font-name-complex="Noto Sans" style:font-size-complex="12pt" style:font-weight-complex="normal"/>
    </style:style>
    <style:style style:name="P11"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7c99f6" fo:background-color="transparent" style:font-name-asian="Noto Sans" style:font-size-asian="12pt" style:font-weight-asian="normal" style:font-name-complex="Noto Sans" style:font-size-complex="12pt" style:font-weight-complex="normal"/>
    </style:style>
    <style:style style:name="P12"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fo:background-color="transparent" style:font-name-asian="Noto Sans" style:font-size-asian="12pt" style:font-weight-asian="normal" style:font-name-complex="Noto Sans" style:font-size-complex="12pt" style:font-weight-complex="normal"/>
    </style:style>
    <style:style style:name="P13" style:family="paragraph" style:parent-style-name="Standard">
      <loext:graphic-properties draw:fill="none"/>
      <style:paragraph-properties fo:margin-top="0.101cm" fo:margin-bottom="0cm" style:contextual-spacing="false" fo:line-height="115%" fo:text-align="justify" style:justify-single-word="false" fo:background-color="transparent"/>
      <style:text-properties style:use-window-font-color="true" loext:opacity="0%" style:font-name="Noto Sans" fo:font-size="12pt" fo:font-weight="normal" fo:background-color="transparent" style:font-name-asian="Noto Sans" style:font-size-asian="12pt" style:font-weight-asian="normal" style:font-name-complex="Noto Sans" style:font-size-complex="12pt" style:font-weight-complex="normal"/>
    </style:style>
    <style:style style:name="P14" style:family="paragraph" style:parent-style-name="Standard">
      <style:paragraph-properties fo:margin-top="0cm" fo:margin-bottom="0cm" style:contextual-spacing="false" fo:line-height="115%" fo:text-align="justify" style:justify-single-word="false"/>
      <style:text-properties style:use-window-font-color="true" loext:opacity="0%" style:font-name="Noto Sans" fo:font-size="12pt" fo:font-weight="normal" fo:background-color="transparent" style:font-name-asian="Noto Sans" style:font-size-asian="12pt" style:font-weight-asian="normal" style:font-name-complex="Noto Sans" style:font-size-complex="12pt" style:font-weight-complex="normal"/>
    </style:style>
    <style:style style:name="P15" style:family="paragraph" style:parent-style-name="Standard">
      <style:paragraph-properties fo:margin-top="0cm" fo:margin-bottom="0cm" style:contextual-spacing="false" fo:line-height="115%" fo:text-align="justify" style:justify-single-word="false"/>
      <style:text-properties style:use-window-font-color="true" loext:opacity="0%" style:font-name="Noto Sans" fo:font-size="12pt" fo:font-weight="normal" officeooo:paragraph-rsid="00b47a08" fo:background-color="transparent" style:font-name-asian="Noto Sans" style:font-size-asian="12pt" style:font-weight-asian="normal" style:font-name-complex="Noto Sans" style:font-size-complex="12pt" style:font-weight-complex="normal"/>
    </style:style>
    <style:style style:name="P16"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b47a08" fo:background-color="transparent" style:font-name-asian="Noto Sans" style:font-size-asian="12pt" style:font-weight-asian="normal" style:font-name-complex="Noto Sans" style:font-size-complex="12pt" style:font-weight-complex="normal"/>
    </style:style>
    <style:style style:name="P17"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b57ee2" fo:background-color="transparent" style:font-name-asian="Noto Sans" style:font-size-asian="12pt" style:font-weight-asian="normal" style:font-name-complex="Noto Sans" style:font-size-complex="12pt" style:font-weight-complex="normal"/>
    </style:style>
    <style:style style:name="P18" style:family="paragraph" style:parent-style-name="Standard">
      <style:paragraph-properties fo:margin-top="0cm" fo:margin-bottom="0cm" style:contextual-spacing="false" fo:line-height="115%" fo:text-align="justify" style:justify-single-word="false"/>
      <style:text-properties style:use-window-font-color="true" loext:opacity="0%" style:font-name="Noto Sans" fo:font-size="12pt" fo:font-weight="normal" officeooo:paragraph-rsid="004ea395" fo:background-color="transparent" style:font-name-asian="Noto Sans" style:font-size-asian="12pt" style:font-weight-asian="normal" style:font-name-complex="Noto Sans" style:font-size-complex="12pt" style:font-weight-complex="normal"/>
    </style:style>
    <style:style style:name="P19" style:family="paragraph" style:parent-style-name="Standard">
      <style:paragraph-properties fo:margin-top="0.199cm" fo:margin-bottom="0cm" style:contextual-spacing="false" fo:line-height="115%" fo:text-align="justify" style:justify-single-word="false"/>
      <style:text-properties style:use-window-font-color="true" loext:opacity="0%" style:font-name="Noto Sans" fo:font-size="12pt" fo:font-weight="normal" officeooo:paragraph-rsid="004ea395" fo:background-color="transparent" style:font-name-asian="Noto Sans" style:font-size-asian="12pt" style:font-weight-asian="normal" style:font-name-complex="Noto Sans" style:font-size-complex="12pt" style:font-weight-complex="normal"/>
    </style:style>
    <style:style style:name="P20"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4ea395" fo:background-color="transparent" style:font-name-asian="Noto Sans" style:font-size-asian="12pt" style:font-weight-asian="normal" style:font-name-complex="Noto Sans" style:font-size-complex="12pt" style:font-weight-complex="normal"/>
    </style:style>
    <style:style style:name="P21"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53a4f6" fo:background-color="transparent" style:font-name-asian="Noto Sans" style:font-size-asian="12pt" style:font-weight-asian="normal" style:font-name-complex="Noto Sans" style:font-size-complex="12pt" style:font-weight-complex="normal"/>
    </style:style>
    <style:style style:name="P22" style:family="paragraph" style:parent-style-name="Standard">
      <style:paragraph-properties fo:margin-top="0cm" fo:margin-bottom="0cm" style:contextual-spacing="false" fo:line-height="115%" fo:text-align="justify" style:justify-single-word="false"/>
      <style:text-properties style:use-window-font-color="true" loext:opacity="0%" style:font-name="Noto Sans" fo:font-size="12pt" fo:font-weight="normal" officeooo:paragraph-rsid="005f93f1" fo:background-color="transparent" style:font-name-asian="Noto Sans" style:font-size-asian="12pt" style:font-weight-asian="normal" style:font-name-complex="Noto Sans" style:font-size-complex="12pt" style:font-weight-complex="normal"/>
    </style:style>
    <style:style style:name="P23"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rsid="0057871c" officeooo:paragraph-rsid="00e2ecf9" fo:background-color="transparent" style:font-name-asian="Noto Sans" style:font-size-asian="12pt" style:font-weight-asian="normal" style:font-name-complex="Noto Sans" style:font-size-complex="12pt" style:font-weight-complex="normal"/>
    </style:style>
    <style:style style:name="P24" style:family="paragraph" style:parent-style-name="Standard">
      <style:paragraph-properties fo:margin-top="0.3cm" fo:margin-bottom="0cm" style:contextual-spacing="false" fo:line-height="115%" fo:text-align="justify" style:justify-single-word="false"/>
      <style:text-properties style:use-window-font-color="true" loext:opacity="0%" style:font-name="Noto Sans" fo:font-size="12pt" fo:font-weight="normal" officeooo:paragraph-rsid="004d2b17" fo:background-color="transparent" style:font-name-asian="Noto Sans" style:font-name-complex="Noto Sans"/>
    </style:style>
    <style:style style:name="P25"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4d2b17" fo:background-color="transparent" style:font-name-asian="Noto Sans" style:font-name-complex="Noto Sans"/>
    </style:style>
    <style:style style:name="P26" style:family="paragraph" style:parent-style-name="Standard">
      <style:paragraph-properties fo:margin-top="0cm" fo:margin-bottom="0cm" style:contextual-spacing="false" fo:line-height="115%" fo:text-align="justify" style:justify-single-word="false"/>
      <style:text-properties style:use-window-font-color="true" loext:opacity="0%" style:font-name="Noto Sans" fo:font-size="12pt" fo:font-weight="normal" officeooo:paragraph-rsid="005aa376" fo:background-color="transparent" style:font-name-asian="Noto Sans" style:font-name-complex="Noto Sans"/>
    </style:style>
    <style:style style:name="P27"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5944f5" fo:background-color="transparent" style:font-name-asian="Noto Sans" style:font-name-complex="Noto Sans"/>
    </style:style>
    <style:style style:name="P28"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7ba35a" fo:background-color="transparent" style:font-name-asian="Noto Sans" style:font-name-complex="Noto Sans"/>
    </style:style>
    <style:style style:name="P29" style:family="paragraph" style:parent-style-name="Standard">
      <style:paragraph-properties fo:margin-top="0cm" fo:margin-bottom="0cm" style:contextual-spacing="false" fo:line-height="115%" fo:text-align="justify" style:justify-single-word="false"/>
      <style:text-properties style:use-window-font-color="true" loext:opacity="0%" style:font-name="Noto Sans" fo:font-size="12pt" fo:font-weight="normal" officeooo:paragraph-rsid="007ba35a" fo:background-color="transparent" style:font-name-asian="Noto Sans" style:font-name-complex="Noto Sans"/>
    </style:style>
    <style:style style:name="P30"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053713" fo:background-color="transparent" style:font-name-asian="Noto Sans" style:font-name-complex="Noto Sans"/>
    </style:style>
    <style:style style:name="P31"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3c1c2b" fo:background-color="transparent" style:font-name-asian="Noto Sans" style:font-name-complex="Noto Sans"/>
    </style:style>
    <style:style style:name="P32"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0a43ff" fo:background-color="transparent" style:font-name-asian="Noto Sans" style:font-name-complex="Noto Sans"/>
    </style:style>
    <style:style style:name="P33" style:family="paragraph" style:parent-style-name="Standard">
      <style:paragraph-properties fo:margin-top="0cm" fo:margin-bottom="0cm" style:contextual-spacing="false" fo:line-height="115%" fo:text-align="justify" style:justify-single-word="false"/>
      <style:text-properties style:use-window-font-color="true" loext:opacity="0%" style:font-name="Noto Sans" fo:font-size="12pt" fo:font-weight="normal" officeooo:paragraph-rsid="000be5af" fo:background-color="transparent" style:font-name-asian="Noto Sans" style:font-name-complex="Noto Sans"/>
    </style:style>
    <style:style style:name="P34"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0be5af" fo:background-color="transparent" style:font-name-asian="Noto Sans" style:font-name-complex="Noto Sans"/>
    </style:style>
    <style:style style:name="P35" style:family="paragraph" style:parent-style-name="Standard">
      <style:paragraph-properties fo:margin-top="0cm" fo:margin-bottom="0cm" style:contextual-spacing="false" fo:line-height="115%" fo:text-align="justify" style:justify-single-word="false"/>
      <style:text-properties style:use-window-font-color="true" loext:opacity="0%" style:font-name="Noto Sans" fo:font-size="12pt" fo:font-weight="normal" officeooo:paragraph-rsid="000c1032" fo:background-color="transparent" style:font-name-asian="Noto Sans" style:font-name-complex="Noto Sans"/>
    </style:style>
    <style:style style:name="P36"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0c3150" fo:background-color="transparent" style:font-name-asian="Noto Sans" style:font-name-complex="Noto Sans"/>
    </style:style>
    <style:style style:name="P37"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fo:background-color="transparent" style:font-name-asian="Noto Sans" style:font-name-complex="Noto Sans"/>
    </style:style>
    <style:style style:name="P38" style:family="paragraph" style:parent-style-name="Standard">
      <style:paragraph-properties fo:margin-top="0cm" fo:margin-bottom="0.353cm" style:contextual-spacing="false" fo:line-height="115%" fo:text-align="justify" style:justify-single-word="false"/>
      <style:text-properties style:use-window-font-color="true" loext:opacity="0%" style:font-name="Noto Sans" fo:font-size="12pt" fo:font-weight="normal" fo:background-color="transparent" style:font-name-asian="Noto Sans" style:font-name-complex="Noto Sans"/>
    </style:style>
    <style:style style:name="P39" style:family="paragraph" style:parent-style-name="Standard">
      <style:paragraph-properties fo:margin-top="0cm" fo:margin-bottom="0.353cm" style:contextual-spacing="false" fo:line-height="115%" fo:text-align="justify" style:justify-single-word="false"/>
      <style:text-properties style:use-window-font-color="true" loext:opacity="0%" style:font-name="Noto Sans" fo:font-size="12pt" fo:font-weight="normal" officeooo:paragraph-rsid="001b412f" fo:background-color="transparent" style:font-name-asian="Noto Sans" style:font-name-complex="Noto Sans"/>
    </style:style>
    <style:style style:name="P40" style:family="paragraph" style:parent-style-name="Standard">
      <style:paragraph-properties fo:margin-top="0cm" fo:margin-bottom="0cm" style:contextual-spacing="false" fo:line-height="115%" fo:text-align="justify" style:justify-single-word="false"/>
      <style:text-properties style:use-window-font-color="true" loext:opacity="0%" style:font-name="Noto Sans" fo:font-size="12pt" fo:font-weight="normal" officeooo:paragraph-rsid="00a3fb50" fo:background-color="transparent" style:font-name-asian="Noto Sans" style:font-name-complex="Noto Sans"/>
    </style:style>
    <style:style style:name="P41"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a525b7" fo:background-color="transparent" style:font-name-asian="Noto Sans" style:font-name-complex="Noto Sans"/>
    </style:style>
    <style:style style:name="P42"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36a1f6" fo:background-color="transparent" style:font-name-asian="Noto Sans" style:font-name-complex="Noto Sans"/>
    </style:style>
    <style:style style:name="P43" style:family="paragraph" style:parent-style-name="Standard">
      <style:paragraph-properties fo:margin-top="0.101cm" fo:margin-bottom="0.349cm" style:contextual-spacing="false" fo:line-height="115%" fo:text-align="justify" style:justify-single-word="false"/>
      <style:text-properties style:use-window-font-color="true" loext:opacity="0%" style:font-name="Noto Sans" fo:font-size="12pt" fo:font-weight="normal" officeooo:paragraph-rsid="0036a1f6" fo:background-color="transparent" style:font-name-asian="Noto Sans" style:font-name-complex="Noto Sans"/>
    </style:style>
    <style:style style:name="P44"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ba852a" fo:background-color="transparent" style:font-name-asian="Noto Sans" style:font-name-complex="Noto Sans"/>
    </style:style>
    <style:style style:name="P45"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468005" fo:background-color="transparent" style:font-name-asian="Noto Sans" style:font-name-complex="Noto Sans"/>
    </style:style>
    <style:style style:name="P46"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470a6f" fo:background-color="transparent" style:font-name-asian="Noto Sans" style:font-name-complex="Noto Sans"/>
    </style:style>
    <style:style style:name="P47"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c10e13" fo:background-color="transparent" style:font-name-asian="Noto Sans" style:font-name-complex="Noto Sans"/>
    </style:style>
    <style:style style:name="P48"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4a1449" fo:background-color="transparent" style:font-name-asian="Noto Sans" style:font-name-complex="Noto Sans"/>
    </style:style>
    <style:style style:name="P49"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rsid="005944f5" officeooo:paragraph-rsid="005aa376" fo:background-color="transparent" style:font-name-asian="Noto Sans" style:font-name-complex="Noto Sans"/>
    </style:style>
    <style:style style:name="P50" style:family="paragraph" style:parent-style-name="Standard">
      <style:paragraph-properties fo:margin-top="0cm" fo:margin-bottom="0cm" style:contextual-spacing="false" fo:line-height="115%" fo:text-align="justify" style:justify-single-word="false"/>
      <style:text-properties style:use-window-font-color="true" loext:opacity="0%" style:font-name="Noto Sans" fo:font-size="12pt" fo:font-weight="normal" officeooo:rsid="005944f5" officeooo:paragraph-rsid="005aa376" fo:background-color="transparent" style:font-name-asian="Noto Sans" style:font-name-complex="Noto Sans"/>
    </style:style>
    <style:style style:name="P51" style:family="paragraph" style:parent-style-name="Standard">
      <style:paragraph-properties fo:margin-top="0cm" fo:margin-bottom="0.353cm" style:contextual-spacing="false" fo:line-height="115%" fo:text-align="justify" style:justify-single-word="false"/>
      <style:text-properties style:use-window-font-color="true" loext:opacity="0%" style:font-name="Noto Sans" fo:font-size="12pt" fo:font-weight="normal" officeooo:paragraph-rsid="004844d0" fo:background-color="transparent" style:font-name-asian="Noto Sans" style:font-weight-asian="normal" style:font-name-complex="Noto Sans" style:font-weight-complex="normal"/>
    </style:style>
    <style:style style:name="P52"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style="italic" fo:font-weight="normal" officeooo:paragraph-rsid="004ea395" fo:background-color="transparent" style:font-name-asian="Noto Sans" style:font-size-asian="12pt" style:font-style-asian="italic" style:font-weight-asian="normal" style:font-name-complex="Noto Sans" style:font-size-complex="12pt" style:font-style-complex="italic" style:font-weight-complex="normal"/>
    </style:style>
    <style:style style:name="P53" style:family="paragraph" style:parent-style-name="Standard">
      <style:paragraph-properties fo:margin-top="0.199cm" fo:margin-bottom="0cm" style:contextual-spacing="false" fo:line-height="115%" fo:text-align="justify" style:justify-single-word="false"/>
      <style:text-properties style:use-window-font-color="true" loext:opacity="0%" style:font-name="Noto Sans" fo:font-size="12pt" fo:font-style="italic" fo:font-weight="normal" officeooo:paragraph-rsid="004ea395" fo:background-color="transparent" style:font-name-asian="Noto Sans" style:font-size-asian="12pt" style:font-style-asian="italic" style:font-weight-asian="normal" style:font-name-complex="Noto Sans" style:font-size-complex="12pt" style:font-style-complex="italic" style:font-weight-complex="normal"/>
    </style:style>
    <style:style style:name="P54"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font-style="italic" fo:font-weight="normal" officeooo:paragraph-rsid="003c1c2b" fo:background-color="transparent" style:font-name-asian="Noto Sans" style:font-style-asian="italic" style:font-name-complex="Noto Sans" style:font-style-complex="italic"/>
    </style:style>
    <style:style style:name="P55" style:family="paragraph" style:parent-style-name="Standard">
      <style:paragraph-properties fo:margin-top="0.101cm" fo:margin-bottom="0cm" style:contextual-spacing="false" fo:line-height="115%" fo:text-align="justify" style:justify-single-word="false"/>
      <style:text-properties style:use-window-font-color="true" loext:opacity="0%" style:font-name="Noto Sans" fo:font-size="12pt" fo:language="it" fo:country="IT" fo:font-weight="normal" officeooo:paragraph-rsid="005c1692" fo:background-color="transparent" style:font-name-asian="Noto Sans" style:font-size-asian="12pt" style:font-name-complex="Noto Sans"/>
    </style:style>
    <style:style style:name="P56" style:family="paragraph" style:parent-style-name="Footnote">
      <style:paragraph-properties fo:text-align="justify" style:justify-single-word="false"/>
    </style:style>
    <style:style style:name="P57" style:family="paragraph" style:parent-style-name="Footnote">
      <style:paragraph-properties fo:margin-top="0cm" fo:margin-bottom="0cm" style:contextual-spacing="false" fo:text-align="justify" style:justify-single-word="false"/>
      <style:text-properties officeooo:paragraph-rsid="00053713"/>
    </style:style>
    <style:style style:name="P58" style:family="paragraph" style:parent-style-name="Footnote">
      <style:paragraph-properties fo:text-align="justify" style:justify-single-word="false"/>
      <style:text-properties officeooo:paragraph-rsid="00d2a72e"/>
    </style:style>
    <style:style style:name="P59" style:family="paragraph" style:parent-style-name="Footnote">
      <style:paragraph-properties fo:text-align="justify" style:justify-single-word="false"/>
      <style:text-properties officeooo:paragraph-rsid="0008685f"/>
    </style:style>
    <style:style style:name="P60" style:family="paragraph" style:parent-style-name="Footnote">
      <style:paragraph-properties fo:margin-top="0.101cm" fo:margin-bottom="0cm" style:contextual-spacing="false" fo:text-align="justify" style:justify-single-word="false"/>
      <style:text-properties officeooo:paragraph-rsid="0008685f"/>
    </style:style>
    <style:style style:name="P61" style:family="paragraph" style:parent-style-name="Footnote" style:master-page-name="">
      <loext:graphic-properties draw:fill="none"/>
      <style:paragraph-properties fo:margin-left="0.6cm" fo:margin-right="0cm" fo:margin-top="0.101cm" fo:margin-bottom="0cm" style:contextual-spacing="false" fo:text-align="justify" style:justify-single-word="false" fo:text-indent="-0.6cm" style:auto-text-indent="false" style:page-number="auto" fo:background-color="transparent" text:number-lines="false" text:line-number="0"/>
      <style:text-properties officeooo:paragraph-rsid="0008685f"/>
    </style:style>
    <style:style style:name="P62" style:family="paragraph" style:parent-style-name="Footnote">
      <style:paragraph-properties fo:text-align="justify" style:justify-single-word="false"/>
      <style:text-properties officeooo:paragraph-rsid="00d763b8"/>
    </style:style>
    <style:style style:name="P63" style:family="paragraph" style:parent-style-name="Footnote">
      <style:paragraph-properties fo:text-align="justify" style:justify-single-word="false"/>
      <style:text-properties officeooo:paragraph-rsid="0099db8d"/>
    </style:style>
    <style:style style:name="P64" style:family="paragraph" style:parent-style-name="Footnote">
      <style:paragraph-properties fo:text-align="justify" style:justify-single-word="false"/>
      <style:text-properties officeooo:paragraph-rsid="009bc330"/>
    </style:style>
    <style:style style:name="P65" style:family="paragraph" style:parent-style-name="Footnote">
      <style:paragraph-properties fo:text-align="justify" style:justify-single-word="false"/>
      <style:text-properties officeooo:paragraph-rsid="001551c4"/>
    </style:style>
    <style:style style:name="P66" style:family="paragraph" style:parent-style-name="Footnote">
      <style:paragraph-properties fo:text-align="justify" style:justify-single-word="false"/>
      <style:text-properties officeooo:paragraph-rsid="00164be1"/>
    </style:style>
    <style:style style:name="P67" style:family="paragraph" style:parent-style-name="Footnote">
      <style:paragraph-properties fo:text-align="justify" style:justify-single-word="false"/>
      <style:text-properties officeooo:paragraph-rsid="00a3fb50"/>
    </style:style>
    <style:style style:name="P68" style:family="paragraph" style:parent-style-name="Footnote">
      <style:paragraph-properties fo:text-align="justify" style:justify-single-word="false"/>
      <style:text-properties officeooo:paragraph-rsid="00202f99"/>
    </style:style>
    <style:style style:name="P69" style:family="paragraph" style:parent-style-name="Footnote">
      <style:paragraph-properties fo:text-align="justify" style:justify-single-word="false"/>
      <style:text-properties officeooo:paragraph-rsid="004847ee"/>
    </style:style>
    <style:style style:name="P70" style:family="paragraph" style:parent-style-name="Footnote">
      <style:paragraph-properties fo:text-align="justify" style:justify-single-word="false"/>
      <style:text-properties officeooo:paragraph-rsid="00488ddd"/>
    </style:style>
    <style:style style:name="P71" style:family="paragraph" style:parent-style-name="Table_20_Contents">
      <style:paragraph-properties fo:text-align="justify" style:justify-single-word="false"/>
      <style:text-properties officeooo:paragraph-rsid="00c8c360"/>
    </style:style>
    <style:style style:name="P72" style:family="paragraph" style:parent-style-name="Standard">
      <style:paragraph-properties fo:margin-top="0cm" fo:margin-bottom="0cm" style:contextual-spacing="false" fo:line-height="115%" fo:text-align="justify" style:justify-single-word="false"/>
      <style:text-properties officeooo:paragraph-rsid="0058990c"/>
    </style:style>
    <style:style style:name="P73" style:family="paragraph" style:parent-style-name="Standard">
      <style:paragraph-properties fo:margin-top="0cm" fo:margin-bottom="0cm" style:contextual-spacing="false" fo:line-height="115%" fo:text-align="justify" style:justify-single-word="false"/>
      <style:text-properties officeooo:paragraph-rsid="004fc022"/>
    </style:style>
    <style:style style:name="P74" style:family="paragraph" style:parent-style-name="Standard">
      <style:paragraph-properties fo:margin-top="0cm" fo:margin-bottom="0cm" style:contextual-spacing="false" fo:line-height="115%" fo:text-align="justify" style:justify-single-word="false"/>
      <style:text-properties officeooo:paragraph-rsid="00b57ee2"/>
    </style:style>
    <style:style style:name="P75" style:family="paragraph" style:parent-style-name="Standard">
      <style:paragraph-properties fo:margin-top="0.101cm" fo:margin-bottom="0cm" style:contextual-spacing="false" fo:line-height="115%" fo:text-align="justify" style:justify-single-word="false"/>
      <style:text-properties officeooo:paragraph-rsid="00b57ee2"/>
    </style:style>
    <style:style style:name="P76" style:family="paragraph" style:parent-style-name="Standard">
      <style:paragraph-properties fo:margin-top="0cm" fo:margin-bottom="0cm" style:contextual-spacing="false" fo:line-height="115%" fo:text-align="justify" style:justify-single-word="false"/>
      <style:text-properties officeooo:paragraph-rsid="00b47a08"/>
    </style:style>
    <style:style style:name="P77" style:family="paragraph" style:parent-style-name="Standard">
      <style:paragraph-properties fo:margin-top="0.101cm" fo:margin-bottom="0cm" style:contextual-spacing="false" fo:line-height="115%" fo:text-align="justify" style:justify-single-word="false"/>
      <style:text-properties officeooo:paragraph-rsid="005944f5"/>
    </style:style>
    <style:style style:name="P78" style:family="paragraph" style:parent-style-name="Standard">
      <style:paragraph-properties fo:margin-top="0.101cm" fo:margin-bottom="0cm" style:contextual-spacing="false" fo:line-height="115%" fo:text-align="justify" style:justify-single-word="false"/>
      <style:text-properties officeooo:paragraph-rsid="005c1692"/>
    </style:style>
    <style:style style:name="P79" style:family="paragraph" style:parent-style-name="Standard">
      <style:paragraph-properties fo:margin-top="0.199cm" fo:margin-bottom="0cm" style:contextual-spacing="false" fo:line-height="115%" fo:text-align="justify" style:justify-single-word="false"/>
      <style:text-properties officeooo:paragraph-rsid="00612681"/>
    </style:style>
    <style:style style:name="P80" style:family="paragraph" style:parent-style-name="Standard">
      <style:paragraph-properties fo:margin-top="0cm" fo:margin-bottom="0.353cm" style:contextual-spacing="false" fo:line-height="115%" fo:text-align="justify" style:justify-single-word="false"/>
    </style:style>
    <style:style style:name="P81" style:family="paragraph" style:parent-style-name="Standard">
      <style:paragraph-properties fo:margin-top="0cm" fo:margin-bottom="0cm" style:contextual-spacing="false" fo:line-height="115%" fo:text-align="justify" style:justify-single-word="false"/>
      <style:text-properties officeooo:paragraph-rsid="007ba35a"/>
    </style:style>
    <style:style style:name="P82" style:family="paragraph" style:parent-style-name="Standard">
      <style:paragraph-properties fo:margin-top="0.101cm" fo:margin-bottom="0cm" style:contextual-spacing="false" fo:line-height="115%" fo:text-align="justify" style:justify-single-word="false"/>
      <style:text-properties officeooo:paragraph-rsid="007ba35a"/>
    </style:style>
    <style:style style:name="P83" style:family="paragraph" style:parent-style-name="Standard">
      <style:paragraph-properties fo:margin-top="0.101cm" fo:margin-bottom="0cm" style:contextual-spacing="false" fo:line-height="115%" fo:text-align="justify" style:justify-single-word="false"/>
      <style:text-properties officeooo:paragraph-rsid="00053713"/>
    </style:style>
    <style:style style:name="P84" style:family="paragraph" style:parent-style-name="Standard">
      <style:paragraph-properties fo:margin-top="0.101cm" fo:margin-bottom="0cm" style:contextual-spacing="false" fo:line-height="115%" fo:text-align="justify" style:justify-single-word="false"/>
      <style:text-properties officeooo:paragraph-rsid="0008685f"/>
    </style:style>
    <style:style style:name="P85" style:family="paragraph" style:parent-style-name="Standard">
      <style:paragraph-properties fo:margin-top="0.101cm" fo:margin-bottom="0cm" style:contextual-spacing="false" fo:line-height="115%" fo:text-align="justify" style:justify-single-word="false"/>
      <style:text-properties officeooo:paragraph-rsid="000a43ff"/>
    </style:style>
    <style:style style:name="P86" style:family="paragraph" style:parent-style-name="Standard">
      <style:paragraph-properties fo:margin-top="0.101cm" fo:margin-bottom="0cm" style:contextual-spacing="false" fo:line-height="115%" fo:text-align="justify" style:justify-single-word="false"/>
      <style:text-properties officeooo:paragraph-rsid="000be5af"/>
    </style:style>
    <style:style style:name="P87" style:family="paragraph" style:parent-style-name="Standard">
      <style:paragraph-properties fo:margin-top="0.101cm" fo:margin-bottom="0cm" style:contextual-spacing="false" fo:line-height="115%" fo:text-align="justify" style:justify-single-word="false"/>
      <style:text-properties officeooo:paragraph-rsid="000c1032"/>
    </style:style>
    <style:style style:name="P88" style:family="paragraph" style:parent-style-name="Standard">
      <style:paragraph-properties fo:margin-top="0.101cm" fo:margin-bottom="0cm" style:contextual-spacing="false" fo:line-height="115%" fo:text-align="justify" style:justify-single-word="false"/>
      <style:text-properties officeooo:paragraph-rsid="000c3150"/>
    </style:style>
    <style:style style:name="P89" style:family="paragraph" style:parent-style-name="Standard">
      <style:paragraph-properties fo:margin-top="0cm" fo:margin-bottom="0cm" style:contextual-spacing="false" fo:line-height="115%" fo:text-align="justify" style:justify-single-word="false"/>
      <style:text-properties officeooo:paragraph-rsid="000e0483"/>
    </style:style>
    <style:style style:name="P90" style:family="paragraph" style:parent-style-name="Standard">
      <style:paragraph-properties fo:margin-top="0.101cm" fo:margin-bottom="0cm" style:contextual-spacing="false" fo:line-height="115%" fo:text-align="justify" style:justify-single-word="false"/>
    </style:style>
    <style:style style:name="P91" style:family="paragraph" style:parent-style-name="Standard">
      <style:paragraph-properties fo:margin-top="0.101cm" fo:margin-bottom="0cm" style:contextual-spacing="false" fo:line-height="115%" fo:text-align="justify" style:justify-single-word="false"/>
      <style:text-properties officeooo:paragraph-rsid="00104278"/>
    </style:style>
    <style:style style:name="P92" style:family="paragraph" style:parent-style-name="Standard">
      <style:paragraph-properties fo:margin-top="0cm" fo:margin-bottom="0cm" style:contextual-spacing="false" fo:line-height="115%" fo:text-align="justify" style:justify-single-word="false"/>
    </style:style>
    <style:style style:name="P93" style:family="paragraph" style:parent-style-name="Standard">
      <style:paragraph-properties fo:margin-top="0cm" fo:margin-bottom="0.101cm" style:contextual-spacing="false" fo:line-height="115%" fo:text-align="justify" style:justify-single-word="false"/>
      <style:text-properties officeooo:paragraph-rsid="00d9e613"/>
    </style:style>
    <style:style style:name="P94" style:family="paragraph" style:parent-style-name="Standard">
      <style:paragraph-properties fo:margin-top="0.101cm" fo:margin-bottom="0cm" style:contextual-spacing="false" fo:line-height="115%" fo:text-align="justify" style:justify-single-word="false"/>
      <style:text-properties officeooo:paragraph-rsid="0079d200"/>
    </style:style>
    <style:style style:name="P95" style:family="paragraph" style:parent-style-name="Standard">
      <style:paragraph-properties fo:margin-top="0.101cm" fo:margin-bottom="0cm" style:contextual-spacing="false" fo:line-height="115%" fo:text-align="justify" style:justify-single-word="false"/>
      <style:text-properties officeooo:paragraph-rsid="00133015"/>
    </style:style>
    <style:style style:name="P96" style:family="paragraph" style:parent-style-name="Standard">
      <style:paragraph-properties fo:margin-top="0.199cm" fo:margin-bottom="0cm" style:contextual-spacing="false" fo:line-height="115%" fo:text-align="justify" style:justify-single-word="false"/>
      <style:text-properties officeooo:paragraph-rsid="004c4906"/>
    </style:style>
    <style:style style:name="P97" style:family="paragraph" style:parent-style-name="Standard">
      <style:paragraph-properties fo:margin-top="0cm" fo:margin-bottom="0cm" style:contextual-spacing="false" fo:line-height="115%" fo:text-align="justify" style:justify-single-word="false"/>
      <style:text-properties officeooo:paragraph-rsid="001551c4"/>
    </style:style>
    <style:style style:name="P98" style:family="paragraph" style:parent-style-name="Standard">
      <style:paragraph-properties fo:margin-top="0cm" fo:margin-bottom="0cm" style:contextual-spacing="false" fo:line-height="115%" fo:text-align="justify" style:justify-single-word="false"/>
      <style:text-properties officeooo:paragraph-rsid="00a3fb50"/>
    </style:style>
    <style:style style:name="P99" style:family="paragraph" style:parent-style-name="Standard">
      <style:paragraph-properties fo:margin-top="0cm" fo:margin-bottom="0cm" style:contextual-spacing="false" fo:line-height="115%" fo:text-align="justify" style:justify-single-word="false"/>
      <style:text-properties officeooo:paragraph-rsid="00a525b7"/>
    </style:style>
    <style:style style:name="P100" style:family="paragraph" style:parent-style-name="Standard">
      <style:paragraph-properties fo:margin-top="0cm" fo:margin-bottom="0.101cm" style:contextual-spacing="false" fo:line-height="115%" fo:text-align="justify" style:justify-single-word="false"/>
    </style:style>
    <style:style style:name="P101" style:family="paragraph" style:parent-style-name="Standard">
      <style:paragraph-properties fo:margin-top="0cm" fo:margin-bottom="0.353cm" style:contextual-spacing="false" fo:line-height="115%" fo:text-align="justify" style:justify-single-word="false"/>
      <style:text-properties officeooo:paragraph-rsid="00260d5a"/>
    </style:style>
    <style:style style:name="P102" style:family="paragraph" style:parent-style-name="Standard">
      <style:paragraph-properties fo:margin-top="0cm" fo:margin-bottom="0.101cm" style:contextual-spacing="false" fo:line-height="115%" fo:text-align="justify" style:justify-single-word="false"/>
      <style:text-properties officeooo:paragraph-rsid="00260d5a"/>
    </style:style>
    <style:style style:name="P103" style:family="paragraph" style:parent-style-name="Standard">
      <style:paragraph-properties fo:margin-top="0cm" fo:margin-bottom="0cm" style:contextual-spacing="false" fo:line-height="115%" fo:text-align="justify" style:justify-single-word="false"/>
      <style:text-properties officeooo:paragraph-rsid="00aa8b91"/>
    </style:style>
    <style:style style:name="P104" style:family="paragraph" style:parent-style-name="Standard">
      <style:paragraph-properties fo:margin-top="0.101cm" fo:margin-bottom="0cm" style:contextual-spacing="false" fo:line-height="115%" fo:text-align="justify" style:justify-single-word="false"/>
      <style:text-properties officeooo:paragraph-rsid="00aa8b91"/>
    </style:style>
    <style:style style:name="P105" style:family="paragraph" style:parent-style-name="Standard">
      <style:paragraph-properties fo:margin-top="0.101cm" fo:margin-bottom="0cm" style:contextual-spacing="false" fo:line-height="115%" fo:text-align="justify" style:justify-single-word="false"/>
      <style:text-properties officeooo:paragraph-rsid="0038203c"/>
    </style:style>
    <style:style style:name="P106" style:family="paragraph" style:parent-style-name="Standard">
      <style:paragraph-properties fo:margin-top="0cm" fo:margin-bottom="0.353cm" style:contextual-spacing="false" fo:line-height="115%" fo:text-align="justify" style:justify-single-word="false"/>
      <style:text-properties officeooo:paragraph-rsid="0036a1f6"/>
    </style:style>
    <style:style style:name="P107" style:family="paragraph" style:parent-style-name="Standard">
      <style:paragraph-properties fo:margin-top="0cm" fo:margin-bottom="0cm" style:contextual-spacing="false" fo:line-height="115%" fo:text-align="justify" style:justify-single-word="false"/>
      <style:text-properties officeooo:paragraph-rsid="00ab75b0"/>
    </style:style>
    <style:style style:name="P108" style:family="paragraph" style:parent-style-name="Standard">
      <style:paragraph-properties fo:margin-top="0.101cm" fo:margin-bottom="0cm" style:contextual-spacing="false" fo:line-height="115%" fo:text-align="justify" style:justify-single-word="false"/>
      <style:text-properties officeooo:paragraph-rsid="00b1f2a5"/>
    </style:style>
    <style:style style:name="P109" style:family="paragraph" style:parent-style-name="Standard">
      <style:paragraph-properties fo:margin-top="0cm" fo:margin-bottom="0.353cm" style:contextual-spacing="false" fo:line-height="115%" fo:text-align="justify" style:justify-single-word="false"/>
      <style:text-properties officeooo:paragraph-rsid="003c0719"/>
    </style:style>
    <style:style style:name="P110" style:family="paragraph" style:parent-style-name="Standard">
      <style:paragraph-properties fo:margin-top="0.199cm" fo:margin-bottom="0cm" style:contextual-spacing="false" fo:line-height="115%" fo:text-align="justify" style:justify-single-word="false"/>
      <style:text-properties officeooo:paragraph-rsid="00425c57"/>
    </style:style>
    <style:style style:name="P111" style:family="paragraph" style:parent-style-name="Standard">
      <style:paragraph-properties fo:margin-top="0.101cm" fo:margin-bottom="0cm" style:contextual-spacing="false" fo:line-height="115%" fo:text-align="justify" style:justify-single-word="false"/>
      <style:text-properties officeooo:paragraph-rsid="00426ba5"/>
    </style:style>
    <style:style style:name="P112" style:family="paragraph" style:parent-style-name="Standard">
      <style:paragraph-properties fo:margin-top="0cm" fo:margin-bottom="0cm" style:contextual-spacing="false" fo:line-height="115%" fo:text-align="justify" style:justify-single-word="false"/>
      <style:text-properties officeooo:paragraph-rsid="00b99dbf"/>
    </style:style>
    <style:style style:name="P113" style:family="paragraph" style:parent-style-name="Standard">
      <style:paragraph-properties fo:margin-top="0.101cm" fo:margin-bottom="0cm" style:contextual-spacing="false" fo:line-height="115%" fo:text-align="justify" style:justify-single-word="false"/>
      <style:text-properties officeooo:paragraph-rsid="00b99dbf"/>
    </style:style>
    <style:style style:name="P114" style:family="paragraph" style:parent-style-name="Standard">
      <style:paragraph-properties fo:margin-top="0cm" fo:margin-bottom="0cm" style:contextual-spacing="false" fo:line-height="115%" fo:text-align="justify" style:justify-single-word="false"/>
      <style:text-properties officeooo:paragraph-rsid="00ba852a"/>
    </style:style>
    <style:style style:name="P115" style:family="paragraph" style:parent-style-name="Standard">
      <style:paragraph-properties fo:margin-top="0cm" fo:margin-bottom="0cm" style:contextual-spacing="false" fo:line-height="115%" fo:text-align="justify" style:justify-single-word="false"/>
      <style:text-properties officeooo:paragraph-rsid="00bd63f6"/>
    </style:style>
    <style:style style:name="P116" style:family="paragraph" style:parent-style-name="Standard">
      <style:paragraph-properties fo:margin-top="0.101cm" fo:margin-bottom="0cm" style:contextual-spacing="false" fo:line-height="115%" fo:text-align="justify" style:justify-single-word="false"/>
      <style:text-properties officeooo:paragraph-rsid="00bd63f6"/>
    </style:style>
    <style:style style:name="P117" style:family="paragraph" style:parent-style-name="Standard">
      <style:paragraph-properties fo:margin-top="0.101cm" fo:margin-bottom="0cm" style:contextual-spacing="false" fo:line-height="115%" fo:text-align="justify" style:justify-single-word="false"/>
      <style:text-properties officeooo:paragraph-rsid="00470a6f"/>
    </style:style>
    <style:style style:name="P118" style:family="paragraph" style:parent-style-name="Standard">
      <style:paragraph-properties fo:margin-top="0cm" fo:margin-bottom="0.353cm" style:contextual-spacing="false" fo:line-height="115%" fo:text-align="justify" style:justify-single-word="false"/>
      <style:text-properties officeooo:paragraph-rsid="00470a6f"/>
    </style:style>
    <style:style style:name="P119" style:family="paragraph" style:parent-style-name="Standard">
      <style:paragraph-properties fo:margin-top="0cm" fo:margin-bottom="0cm" style:contextual-spacing="false" fo:line-height="115%" fo:text-align="justify" style:justify-single-word="false"/>
      <style:text-properties officeooo:paragraph-rsid="00c10e13"/>
    </style:style>
    <style:style style:name="P120" style:family="paragraph" style:parent-style-name="Standard">
      <style:paragraph-properties fo:margin-top="0cm" fo:margin-bottom="0cm" style:contextual-spacing="false" fo:line-height="115%" fo:text-align="justify" style:justify-single-word="false"/>
      <style:text-properties officeooo:paragraph-rsid="004847ee"/>
    </style:style>
    <style:style style:name="P121" style:family="paragraph" style:parent-style-name="Standard">
      <style:paragraph-properties fo:margin-top="0cm" fo:margin-bottom="0cm" style:contextual-spacing="false" fo:line-height="115%" fo:text-align="justify" style:justify-single-word="false"/>
      <style:text-properties officeooo:paragraph-rsid="00c197d5"/>
    </style:style>
    <style:style style:name="P122" style:family="paragraph" style:parent-style-name="Standard">
      <style:paragraph-properties fo:margin-top="0.101cm" fo:margin-bottom="0cm" style:contextual-spacing="false" fo:line-height="115%" fo:text-align="justify" style:justify-single-word="false"/>
      <style:text-properties officeooo:paragraph-rsid="00c197d5"/>
    </style:style>
    <style:style style:name="P123" style:family="paragraph" style:parent-style-name="Standard">
      <style:paragraph-properties fo:margin-top="0.101cm" fo:margin-bottom="0cm" style:contextual-spacing="false" fo:line-height="115%" fo:text-align="justify" style:justify-single-word="false"/>
      <style:text-properties officeooo:paragraph-rsid="004b5983"/>
    </style:style>
    <style:style style:name="P124" style:family="paragraph" style:parent-style-name="Standard">
      <style:paragraph-properties fo:margin-top="0cm" fo:margin-bottom="0cm" style:contextual-spacing="false" fo:line-height="115%" fo:text-align="justify" style:justify-single-word="false"/>
      <style:text-properties officeooo:paragraph-rsid="00c8c360"/>
    </style:style>
    <style:style style:name="P125" style:family="paragraph" style:parent-style-name="Standard">
      <style:paragraph-properties fo:margin-top="0.101cm" fo:margin-bottom="0cm" style:contextual-spacing="false" fo:line-height="115%" fo:text-align="justify" style:justify-single-word="false"/>
      <style:text-properties officeooo:paragraph-rsid="00c8c360"/>
    </style:style>
    <style:style style:name="P126" style:family="paragraph" style:parent-style-name="Footnote">
      <style:text-properties officeooo:paragraph-rsid="00626a78"/>
    </style:style>
    <style:style style:name="P127" style:family="paragraph" style:parent-style-name="Footnote">
      <style:text-properties officeooo:paragraph-rsid="0008685f"/>
    </style:style>
    <style:style style:name="P128" style:family="paragraph" style:parent-style-name="Footnote">
      <style:paragraph-properties fo:text-align="justify" style:justify-single-word="false"/>
      <style:text-properties officeooo:rsid="00d38b4f" officeooo:paragraph-rsid="00d38b4f"/>
    </style:style>
    <style:style style:name="P129" style:family="paragraph" style:parent-style-name="Footnote">
      <style:paragraph-properties fo:text-align="justify" style:justify-single-word="false"/>
      <style:text-properties officeooo:rsid="00d43b95" officeooo:paragraph-rsid="00d43b95"/>
    </style:style>
    <style:style style:name="P130" style:family="paragraph" style:parent-style-name="Footnote">
      <style:text-properties officeooo:rsid="001215ee" officeooo:paragraph-rsid="001215ee"/>
    </style:style>
    <style:style style:name="P131" style:family="paragraph" style:parent-style-name="Contents_20_3">
      <style:text-properties style:font-name="Noto Sans1" officeooo:paragraph-rsid="008baae9"/>
    </style:style>
    <style:style style:name="P132"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cc76ab" style:font-size-asian="10.5pt" style:font-size-complex="12pt"/>
    </style:style>
    <style:style style:name="P133"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66ab72" style:font-size-asian="10.5pt" style:font-size-complex="12pt"/>
    </style:style>
    <style:style style:name="P134"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64e9f0" style:font-size-asian="10.5pt" style:font-size-complex="12pt"/>
    </style:style>
    <style:style style:name="P135"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6cc8b9" style:font-size-asian="10.5pt" style:font-size-complex="12pt"/>
    </style:style>
    <style:style style:name="P136"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79d200" style:font-size-asian="10.5pt" style:font-size-complex="12pt"/>
    </style:style>
    <style:style style:name="P137"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6ec8ab" style:font-size-asian="10.5pt" style:font-size-complex="12pt"/>
    </style:style>
    <style:style style:name="P138"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6ec8ab" style:font-size-asian="10.5pt" style:font-size-complex="12pt"/>
    </style:style>
    <style:style style:name="P139"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2b944" style:font-size-asian="10.5pt" style:font-size-complex="12pt"/>
    </style:style>
    <style:style style:name="P140"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02b944" style:font-size-asian="10.5pt" style:font-size-complex="12pt"/>
    </style:style>
    <style:style style:name="P141" style:family="paragraph" style:parent-style-name="Standard">
      <style:paragraph-properties fo:margin-top="0cm" fo:margin-bottom="0.353cm" style:contextual-spacing="false" fo:line-height="115%" fo:text-align="justify" style:justify-single-word="false"/>
      <style:text-properties style:font-name="Noto Sans1" fo:font-size="12pt" officeooo:paragraph-rsid="0002b944" style:font-size-asian="10.5pt" style:font-size-complex="12pt"/>
    </style:style>
    <style:style style:name="P142"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6f5289" style:font-size-asian="10.5pt" style:font-size-complex="12pt"/>
    </style:style>
    <style:style style:name="P143"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6f5289" style:font-size-asian="10.5pt" style:font-size-complex="12pt"/>
    </style:style>
    <style:style style:name="P144"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709eb7" style:font-size-asian="10.5pt" style:font-size-complex="12pt"/>
    </style:style>
    <style:style style:name="P145"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709eb7" style:font-size-asian="10.5pt" style:font-size-complex="12pt"/>
    </style:style>
    <style:style style:name="P146"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710534" style:font-size-asian="10.5pt" style:font-size-complex="12pt"/>
    </style:style>
    <style:style style:name="P147"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712e50" style:font-size-asian="10.5pt" style:font-size-complex="12pt"/>
    </style:style>
    <style:style style:name="P148"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712e50" style:font-size-asian="10.5pt" style:font-size-complex="12pt"/>
    </style:style>
    <style:style style:name="P149"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72b372" style:font-size-asian="10.5pt" style:font-size-complex="12pt"/>
    </style:style>
    <style:style style:name="P150"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72b372" style:font-size-asian="10.5pt" style:font-size-complex="12pt"/>
    </style:style>
    <style:style style:name="P151"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73c64d" style:font-size-asian="10.5pt" style:font-size-complex="12pt"/>
    </style:style>
    <style:style style:name="P152"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73c64d" style:font-size-asian="10.5pt" style:font-size-complex="12pt"/>
    </style:style>
    <style:style style:name="P153" style:family="paragraph" style:parent-style-name="Standard">
      <style:paragraph-properties fo:margin-top="0cm" fo:margin-bottom="0cm" style:contextual-spacing="false" fo:line-height="115%" fo:text-align="justify" style:justify-single-word="false"/>
      <style:text-properties style:font-name="Noto Sans1" fo:font-size="12pt" officeooo:rsid="00cc76ab" officeooo:paragraph-rsid="00cc76ab" style:font-size-asian="10.5pt" style:font-size-complex="12pt"/>
    </style:style>
    <style:style style:name="P154" style:family="paragraph" style:parent-style-name="Standard">
      <style:paragraph-properties fo:margin-top="0cm" fo:margin-bottom="0.353cm" style:contextual-spacing="false" fo:line-height="115%" fo:text-align="start" style:justify-single-word="false"/>
      <style:text-properties style:font-name="Noto Sans1" fo:font-size="12pt" officeooo:rsid="00cfe6dc" officeooo:paragraph-rsid="00cfe6dc" style:font-size-asian="10.5pt" style:font-size-complex="12pt"/>
    </style:style>
    <style:style style:name="P155" style:family="paragraph" style:parent-style-name="Standard">
      <style:paragraph-properties fo:margin-top="0.101cm" fo:margin-bottom="0cm" style:contextual-spacing="false" fo:line-height="115%" fo:text-align="justify" style:justify-single-word="false"/>
      <style:text-properties style:font-name="Noto Sans1" fo:font-size="12pt" officeooo:rsid="0066ab72" officeooo:paragraph-rsid="0075a865" style:font-size-asian="10.5pt" style:font-size-complex="12pt"/>
    </style:style>
    <style:style style:name="P156" style:family="paragraph" style:parent-style-name="Standard">
      <style:paragraph-properties fo:margin-top="0cm" fo:margin-bottom="0cm" style:contextual-spacing="false" fo:line-height="115%" fo:text-align="justify" style:justify-single-word="false"/>
      <style:text-properties style:font-name="Noto Sans1" fo:font-size="12pt" officeooo:rsid="0066ab72" officeooo:paragraph-rsid="0075a865" style:font-size-asian="10.5pt" style:font-size-complex="12pt"/>
    </style:style>
    <style:style style:name="P157" style:family="paragraph" style:parent-style-name="Standard">
      <style:paragraph-properties fo:margin-top="0cm" fo:margin-bottom="0cm" style:contextual-spacing="false" fo:line-height="115%" fo:text-align="justify" style:justify-single-word="false"/>
      <style:text-properties style:font-name="Noto Sans1" fo:font-size="12pt" officeooo:rsid="00673043" officeooo:paragraph-rsid="0075a865" style:font-size-asian="10.5pt" style:font-size-complex="12pt"/>
    </style:style>
    <style:style style:name="P158" style:family="paragraph" style:parent-style-name="Standard">
      <style:paragraph-properties fo:margin-top="0cm" fo:margin-bottom="0cm" style:contextual-spacing="false" fo:line-height="115%" fo:text-align="justify" style:justify-single-word="false"/>
      <style:text-properties style:font-name="Noto Sans1" fo:font-size="12pt" officeooo:rsid="00692287" officeooo:paragraph-rsid="0075a865" style:font-size-asian="10.5pt" style:font-size-complex="12pt"/>
    </style:style>
    <style:style style:name="P159" style:family="paragraph" style:parent-style-name="Standard">
      <style:paragraph-properties fo:margin-top="0.101cm" fo:margin-bottom="0cm" style:contextual-spacing="false" fo:line-height="115%" fo:text-align="justify" style:justify-single-word="false"/>
      <style:text-properties style:font-name="Noto Sans1" fo:font-size="12pt" officeooo:rsid="00692287" officeooo:paragraph-rsid="0075a865" style:font-size-asian="10.5pt" style:font-size-complex="12pt"/>
    </style:style>
    <style:style style:name="P160" style:family="paragraph" style:parent-style-name="Standard">
      <style:paragraph-properties fo:margin-top="0.101cm" fo:margin-bottom="0cm" style:contextual-spacing="false" fo:line-height="115%" fo:text-align="justify" style:justify-single-word="false"/>
      <style:text-properties style:font-name="Noto Sans1" fo:font-size="12pt" officeooo:rsid="006af8b2" officeooo:paragraph-rsid="0075a865" style:font-size-asian="10.5pt" style:font-size-complex="12pt"/>
    </style:style>
    <style:style style:name="P161"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c8c360" style:font-size-asian="12pt" style:font-size-complex="12pt"/>
    </style:style>
    <style:style style:name="P162"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c8c360" style:font-size-asian="12pt" style:font-size-complex="12pt"/>
    </style:style>
    <style:style style:name="P163"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c8c360" style:font-size-asian="12pt" style:font-size-complex="12pt"/>
    </style:style>
    <style:style style:name="P164" style:family="paragraph" style:parent-style-name="Standard">
      <style:paragraph-properties fo:margin-top="0.101cm" fo:margin-bottom="0cm" style:contextual-spacing="false" fo:line-height="115%" fo:text-align="justify" style:justify-single-word="false"/>
      <style:text-properties style:font-name="Noto Sans1" fo:font-size="12pt" officeooo:rsid="00094334" officeooo:paragraph-rsid="00da8b35" style:font-size-asian="12pt" style:font-size-complex="12pt"/>
    </style:style>
    <style:style style:name="P165" style:family="paragraph" style:parent-style-name="Standard">
      <style:paragraph-properties fo:margin-top="0.199cm" fo:margin-bottom="0cm" style:contextual-spacing="false" fo:line-height="115%" fo:text-align="justify" style:justify-single-word="false"/>
      <style:text-properties style:font-name="Noto Sans1" fo:font-size="12pt" officeooo:rsid="00094334" officeooo:paragraph-rsid="00da5b4e" style:font-size-asian="12pt" style:font-size-complex="12pt"/>
    </style:style>
    <style:style style:name="P166" style:family="paragraph" style:parent-style-name="Standard">
      <style:paragraph-properties fo:margin-top="0.101cm" fo:margin-bottom="0cm" style:contextual-spacing="false" fo:line-height="115%" fo:text-align="justify" style:justify-single-word="false"/>
      <style:text-properties style:font-name="Noto Sans1" fo:font-size="12pt" officeooo:rsid="00094334" officeooo:paragraph-rsid="00da5b4e" style:font-size-asian="12pt" style:font-size-complex="12pt"/>
    </style:style>
    <style:style style:name="P167" style:family="paragraph" style:parent-style-name="Standard">
      <style:paragraph-properties fo:margin-top="0.101cm" fo:margin-bottom="0cm" style:contextual-spacing="false" fo:line-height="115%" fo:text-align="justify" style:justify-single-word="false"/>
      <style:text-properties style:font-name="Noto Sans1" fo:font-size="10pt" officeooo:rsid="007827dd" officeooo:paragraph-rsid="007827dd" style:font-size-asian="10pt" style:font-size-complex="10pt"/>
    </style:style>
    <style:style style:name="P168" style:family="paragraph" style:parent-style-name="Standard">
      <style:paragraph-properties fo:margin-top="0.101cm" fo:margin-bottom="0cm" style:contextual-spacing="false" fo:line-height="115%" fo:text-align="justify" style:justify-single-word="false"/>
      <style:text-properties style:font-name="Noto Sans1" fo:font-size="9pt" officeooo:rsid="007827dd" officeooo:paragraph-rsid="007827dd" style:font-size-asian="9pt" style:font-size-complex="9pt"/>
    </style:style>
    <style:style style:name="P169" style:family="paragraph" style:parent-style-name="Footnote">
      <style:paragraph-properties fo:text-align="justify" style:justify-single-word="false"/>
      <style:text-properties officeooo:rsid="001ed0ca" officeooo:paragraph-rsid="001ed0ca"/>
    </style:style>
    <style:style style:name="P170" style:family="paragraph" style:parent-style-name="Footnote">
      <style:text-properties officeooo:rsid="00a8f211" officeooo:paragraph-rsid="00a8f211"/>
    </style:style>
    <style:style style:name="P171" style:family="paragraph" style:parent-style-name="Footnote">
      <style:paragraph-properties fo:text-align="justify" style:justify-single-word="false"/>
      <style:text-properties officeooo:rsid="00289761" officeooo:paragraph-rsid="00289761"/>
    </style:style>
    <style:style style:name="P172" style:family="paragraph" style:parent-style-name="Footnote">
      <style:text-properties officeooo:rsid="00bd63f6" officeooo:paragraph-rsid="00bd63f6"/>
    </style:style>
    <style:style style:name="P173" style:family="paragraph" style:parent-style-name="Table_20_Contents">
      <style:paragraph-properties fo:text-align="center" style:justify-single-word="false"/>
      <style:text-properties style:font-name="Calibri" fo:font-size="10pt" officeooo:rsid="001b9b43" officeooo:paragraph-rsid="00c8c360" style:font-size-asian="10pt" style:font-size-complex="10pt"/>
    </style:style>
    <style:style style:name="P174" style:family="paragraph" style:parent-style-name="Table_20_Contents">
      <style:paragraph-properties fo:text-align="justify" style:justify-single-word="false"/>
      <style:text-properties style:font-name="Calibri" fo:font-size="10pt" officeooo:paragraph-rsid="00c8c360" style:font-size-asian="10pt" style:font-size-complex="10pt"/>
    </style:style>
    <style:style style:name="P175"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Calibri" fo:font-size="10pt" officeooo:rsid="001c5e34" officeooo:paragraph-rsid="00c8c360" style:font-size-asian="10pt" style:font-size-complex="10pt"/>
    </style:style>
    <style:style style:name="P176" style:family="paragraph" style:parent-style-name="Table_20_Contents">
      <style:paragraph-properties fo:text-align="justify" style:justify-single-word="false"/>
      <style:text-properties style:font-name="Calibri" fo:font-size="10pt" officeooo:paragraph-rsid="00c8c360" style:font-size-asian="8.75pt" style:font-size-complex="10pt"/>
    </style:style>
    <style:style style:name="P177" style:family="paragraph" style:parent-style-name="Footnote">
      <style:paragraph-properties fo:text-align="justify" style:justify-single-word="false"/>
      <style:text-properties officeooo:rsid="003326c9" officeooo:paragraph-rsid="003326c9"/>
    </style:style>
    <style:style style:name="P178" style:family="paragraph" style:parent-style-name="Standard">
      <style:paragraph-properties fo:margin-top="0cm" fo:margin-bottom="0cm" style:contextual-spacing="false" fo:line-height="115%" fo:text-align="start" style:justify-single-word="false"/>
      <style:text-properties style:font-name="Liberation Sans" fo:font-size="13pt" officeooo:rsid="0066ab72" officeooo:paragraph-rsid="0066ab72" style:font-size-asian="13pt" style:font-size-complex="13pt"/>
    </style:style>
    <style:style style:name="P179" style:family="paragraph" style:parent-style-name="Heading_20_2">
      <style:paragraph-properties fo:text-align="center" style:justify-single-word="false"/>
      <style:text-properties fo:font-size="13pt" fo:font-weight="normal" officeooo:paragraph-rsid="00e00143" style:font-size-asian="13pt" style:font-weight-asian="normal" style:font-size-complex="13pt" style:font-weight-complex="normal"/>
    </style:style>
    <style:style style:name="P180" style:family="paragraph" style:parent-style-name="Heading_20_2">
      <style:paragraph-properties fo:text-align="center" style:justify-single-word="false"/>
      <style:text-properties style:font-name="Noto Sans1" fo:font-size="12pt" officeooo:rsid="00673043" officeooo:paragraph-rsid="00e00143" style:font-size-asian="10.5pt" style:font-size-complex="12pt"/>
    </style:style>
    <style:style style:name="P181" style:family="paragraph" style:parent-style-name="Heading_20_3">
      <style:text-properties fo:font-weight="normal" style:font-weight-asian="normal" style:font-weight-complex="normal"/>
    </style:style>
    <style:style style:name="P182" style:family="paragraph" style:parent-style-name="Heading_20_3">
      <style:paragraph-properties fo:text-align="justify" style:justify-single-word="false"/>
      <style:text-properties fo:font-weight="normal" style:font-weight-asian="normal" style:font-weight-complex="normal"/>
    </style:style>
    <style:style style:name="P183" style:family="paragraph" style:parent-style-name="Heading_20_3">
      <style:paragraph-properties fo:margin-top="0.199cm" fo:margin-bottom="0.21cm" style:contextual-spacing="false" fo:text-align="justify" style:justify-single-word="false"/>
      <style:text-properties fo:font-weight="normal" style:font-weight-asian="normal" style:font-weight-complex="normal"/>
    </style:style>
    <style:style style:name="P184" style:family="paragraph" style:parent-style-name="Heading_20_3">
      <style:paragraph-properties fo:margin-top="0cm" fo:margin-bottom="0cm" style:contextual-spacing="false"/>
      <style:text-properties fo:font-weight="normal"/>
    </style:style>
    <style:style style:name="P185" style:family="paragraph" style:parent-style-name="Heading_20_3">
      <style:paragraph-properties fo:margin-top="0cm" fo:margin-bottom="0cm" style:contextual-spacing="false" fo:text-align="justify" style:justify-single-word="false"/>
      <style:text-properties fo:font-weight="normal"/>
    </style:style>
    <style:style style:name="P186" style:family="paragraph" style:parent-style-name="Heading_20_3">
      <style:paragraph-properties fo:margin-top="0.3cm" fo:margin-bottom="0cm" style:contextual-spacing="false" fo:text-align="justify" style:justify-single-word="false"/>
      <style:text-properties fo:font-size="14pt" fo:font-weight="normal" style:font-size-asian="14pt" style:font-weight-asian="normal" style:font-size-complex="14pt" style:font-weight-complex="normal"/>
    </style:style>
    <style:style style:name="P187" style:family="paragraph" style:parent-style-name="Heading_20_3">
      <style:paragraph-properties fo:text-align="center" style:justify-single-word="false"/>
    </style:style>
    <style:style style:name="P188" style:family="paragraph" style:parent-style-name="Heading_20_3">
      <style:paragraph-properties fo:margin-top="0.349cm" fo:margin-bottom="0.21cm" style:contextual-spacing="false" fo:text-align="justify" style:justify-single-word="false"/>
    </style:style>
    <style:style style:name="P189" style:family="paragraph" style:parent-style-name="Heading_20_4">
      <style:paragraph-properties fo:margin-top="0.101cm" fo:margin-bottom="0.21cm" style:contextual-spacing="false"/>
      <style:text-properties fo:font-weight="normal" style:font-weight-asian="normal" style:font-weight-complex="normal"/>
    </style:style>
    <style:style style:name="P190" style:family="paragraph" style:parent-style-name="Heading_20_4">
      <style:text-properties fo:font-weight="normal" style:font-weight-asian="normal" style:font-weight-complex="normal"/>
    </style:style>
    <style:style style:name="P191" style:family="paragraph" style:parent-style-name="Heading_20_4">
      <style:text-properties fo:font-style="italic" fo:font-weight="normal" style:font-style-asian="italic" style:font-weight-asian="normal" style:font-style-complex="italic" style:font-weight-complex="normal"/>
    </style:style>
    <style:style style:name="P192" style:family="paragraph" style:parent-style-name="Standard" style:list-style-name="L1">
      <style:paragraph-properties fo:margin-top="0cm" fo:margin-bottom="0cm" style:contextual-spacing="false" fo:line-height="115%" fo:text-align="justify" style:justify-single-word="false"/>
      <style:text-properties style:use-window-font-color="true" loext:opacity="0%" style:font-name="Noto Sans" fo:font-size="12pt" fo:font-weight="normal" officeooo:paragraph-rsid="005aa376" fo:background-color="transparent" style:font-name-asian="Noto Sans" style:font-name-complex="Noto Sans"/>
    </style:style>
    <style:style style:name="P193" style:family="paragraph" style:parent-style-name="Standard" style:list-style-name="L1">
      <style:paragraph-properties fo:margin-top="0.101cm" fo:margin-bottom="0cm" style:contextual-spacing="false" fo:line-height="115%" fo:text-align="justify" style:justify-single-word="false"/>
      <style:text-properties style:use-window-font-color="true" loext:opacity="0%" style:font-name="Noto Sans" fo:font-size="12pt" fo:font-weight="normal" officeooo:paragraph-rsid="005944f5" fo:background-color="transparent" style:font-name-asian="Noto Sans" style:font-name-complex="Noto Sans"/>
    </style:style>
    <style:style style:name="P194" style:family="paragraph" style:parent-style-name="Standard">
      <style:paragraph-properties fo:margin-top="0cm" fo:margin-bottom="0cm" style:contextual-spacing="false" fo:line-height="115%" fo:text-align="justify" style:justify-single-word="false"/>
      <style:text-properties style:font-name="Noto Sans1" fo:font-size="12pt" officeooo:rsid="00094334" officeooo:paragraph-rsid="00da5b4e" style:font-size-asian="12pt" style:font-size-complex="12pt"/>
    </style:style>
    <style:style style:name="P195" style:family="paragraph" style:parent-style-name="Standard">
      <style:paragraph-properties fo:margin-top="0.101cm" fo:margin-bottom="0cm" style:contextual-spacing="false" fo:line-height="115%" fo:text-align="justify" style:justify-single-word="false"/>
      <style:text-properties style:font-name="Noto Sans1" fo:font-size="12pt" officeooo:rsid="00094334" officeooo:paragraph-rsid="00da5b4e" style:font-size-asian="12pt" style:font-size-complex="12pt"/>
    </style:style>
    <style:style style:name="P196"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c8c360" style:font-size-asian="10.5pt" style:font-size-complex="12pt"/>
    </style:style>
    <style:style style:name="P197" style:family="paragraph" style:parent-style-name="Standard">
      <style:paragraph-properties fo:margin-top="0.101cm" fo:margin-bottom="0cm" style:contextual-spacing="false" fo:line-height="115%" fo:text-align="justify" style:justify-single-word="false"/>
      <style:text-properties fo:font-weight="normal" officeooo:paragraph-rsid="00e58d26" style:font-weight-asian="normal" style:font-weight-complex="normal"/>
    </style:style>
    <style:style style:name="P198" style:family="paragraph" style:parent-style-name="Standard">
      <style:paragraph-properties fo:margin-top="0.199cm" fo:margin-bottom="0cm" style:contextual-spacing="false" fo:line-height="115%" fo:text-align="justify" style:justify-single-word="false"/>
      <style:text-properties style:font-name="Noto Sans1" fo:font-size="14pt" fo:font-weight="normal" officeooo:paragraph-rsid="00e58d26" style:font-size-asian="14pt" style:font-weight-asian="normal" style:font-size-complex="14pt" style:font-weight-complex="normal"/>
    </style:style>
    <style:style style:name="T1" style:family="text">
      <style:text-properties officeooo:rsid="0057871c"/>
    </style:style>
    <style:style style:name="T2" style:family="text">
      <style:text-properties officeooo:rsid="0082588e"/>
    </style:style>
    <style:style style:name="T3" style:family="text">
      <style:text-properties fo:font-size="14pt" style:font-size-asian="14pt" style:font-size-complex="14pt"/>
    </style:style>
    <style:style style:name="T4" style:family="text">
      <style:text-properties officeooo:rsid="0056e0ad"/>
    </style:style>
    <style:style style:name="T5" style:family="text">
      <style:text-properties style:use-window-font-color="true" loext:opacity="0%" style:font-name="Noto Sans" fo:font-size="12pt" fo:font-weight="normal" fo:background-color="transparent" loext:char-shading-value="0" style:font-name-asian="Noto Sans" style:font-size-asian="12pt" style:font-weight-asian="normal" style:font-name-complex="Noto Sans" style:font-size-complex="12pt" style:font-weight-complex="normal"/>
    </style:style>
    <style:style style:name="T6" style:family="text">
      <style:text-properties style:use-window-font-color="true" loext:opacity="0%" style:font-name="Noto Sans" fo:font-size="12pt" fo:font-weight="normal" officeooo:rsid="0058990c" fo:background-color="transparent" loext:char-shading-value="0" style:font-name-asian="Noto Sans" style:font-size-asian="12pt" style:font-weight-asian="normal" style:font-name-complex="Noto Sans" style:font-size-complex="12pt" style:font-weight-complex="normal"/>
    </style:style>
    <style:style style:name="T7" style:family="text">
      <style:text-properties style:use-window-font-color="true" loext:opacity="0%" style:font-name="Noto Sans" fo:font-size="12pt" fo:font-weight="normal" officeooo:rsid="004efcff" fo:background-color="transparent" loext:char-shading-value="0" style:font-name-asian="Noto Sans" style:font-size-asian="12pt" style:font-weight-asian="normal" style:font-name-complex="Noto Sans" style:font-size-complex="12pt" style:font-weight-complex="normal"/>
    </style:style>
    <style:style style:name="T8" style:family="text">
      <style:text-properties style:use-window-font-color="true" loext:opacity="0%" style:font-name="Noto Sans" fo:font-size="12pt" fo:font-weight="normal" officeooo:rsid="004fc022" fo:background-color="transparent" loext:char-shading-value="0" style:font-name-asian="Noto Sans" style:font-size-asian="12pt" style:font-weight-asian="normal" style:font-name-complex="Noto Sans" style:font-size-complex="12pt" style:font-weight-complex="normal"/>
    </style:style>
    <style:style style:name="T9" style:family="text">
      <style:text-properties style:use-window-font-color="true" loext:opacity="0%" style:font-name="Noto Sans" fo:font-size="12pt" fo:font-weight="normal" officeooo:rsid="00588d4c" fo:background-color="transparent" loext:char-shading-value="0" style:font-name-asian="Noto Sans" style:font-size-asian="12pt" style:font-weight-asian="normal" style:font-name-complex="Noto Sans" style:font-size-complex="12pt" style:font-weight-complex="normal"/>
    </style:style>
    <style:style style:name="T10" style:family="text">
      <style:text-properties style:use-window-font-color="true" loext:opacity="0%" style:font-name="Noto Sans" fo:font-size="12pt" fo:font-weight="normal" officeooo:rsid="00518c8a" fo:background-color="transparent" loext:char-shading-value="0" style:font-name-asian="Noto Sans" style:font-size-asian="12pt" style:font-weight-asian="normal" style:font-name-complex="Noto Sans" style:font-size-complex="12pt" style:font-weight-complex="normal"/>
    </style:style>
    <style:style style:name="T11" style:family="text">
      <style:text-properties style:use-window-font-color="true" loext:opacity="0%" style:font-name="Noto Sans" fo:font-size="12pt" fo:font-weight="normal" officeooo:rsid="00b57ee2" fo:background-color="transparent" loext:char-shading-value="0" style:font-name-asian="Noto Sans" style:font-size-asian="12pt" style:font-weight-asian="normal" style:font-name-complex="Noto Sans" style:font-size-complex="12pt" style:font-weight-complex="normal"/>
    </style:style>
    <style:style style:name="T12" style:family="text">
      <style:text-properties style:use-window-font-color="true" loext:opacity="0%" style:font-name="Noto Sans" fo:font-size="12pt" fo:font-weight="normal" officeooo:rsid="00b47a08" fo:background-color="transparent" loext:char-shading-value="0" style:font-name-asian="Noto Sans" style:font-size-asian="12pt" style:font-weight-asian="normal" style:font-name-complex="Noto Sans" style:font-size-complex="12pt" style:font-weight-complex="normal"/>
    </style:style>
    <style:style style:name="T13" style:family="text">
      <style:text-properties style:use-window-font-color="true" loext:opacity="0%" style:font-name="Noto Sans" fo:font-size="12pt" fo:font-weight="normal" officeooo:rsid="00b4bedb" fo:background-color="transparent" loext:char-shading-value="0" style:font-name-asian="Noto Sans" style:font-size-asian="12pt" style:font-weight-asian="normal" style:font-name-complex="Noto Sans" style:font-size-complex="12pt" style:font-weight-complex="normal"/>
    </style:style>
    <style:style style:name="T14" style:family="text">
      <style:text-properties style:use-window-font-color="true" loext:opacity="0%" style:font-name="Noto Sans" fo:font-size="12pt" fo:font-weight="normal" fo:background-color="transparent" loext:char-shading-value="0" style:font-name-asian="Noto Sans" style:font-name-complex="Noto Sans"/>
    </style:style>
    <style:style style:name="T15" style:family="text">
      <style:text-properties style:use-window-font-color="true" loext:opacity="0%" style:font-name="Noto Sans" fo:font-size="12pt" fo:font-weight="normal" officeooo:rsid="005aa376" fo:background-color="transparent" loext:char-shading-value="0" style:font-name-asian="Noto Sans" style:font-name-complex="Noto Sans"/>
    </style:style>
    <style:style style:name="T16" style:family="text">
      <style:text-properties style:use-window-font-color="true" loext:opacity="0%" style:font-name="Noto Sans" fo:font-size="12pt" fo:font-weight="normal" officeooo:rsid="005b697d" fo:background-color="transparent" loext:char-shading-value="0" style:font-name-asian="Noto Sans" style:font-name-complex="Noto Sans"/>
    </style:style>
    <style:style style:name="T17" style:family="text">
      <style:text-properties style:use-window-font-color="true" loext:opacity="0%" style:font-name="Noto Sans" fo:font-size="12pt" fo:font-weight="normal" officeooo:rsid="005c7353" fo:background-color="transparent" loext:char-shading-value="0" style:font-name-asian="Noto Sans" style:font-name-complex="Noto Sans"/>
    </style:style>
    <style:style style:name="T18" style:family="text">
      <style:text-properties style:use-window-font-color="true" loext:opacity="0%" style:font-name="Noto Sans" fo:font-size="12pt" fo:font-weight="normal" officeooo:rsid="00612681" fo:background-color="transparent" loext:char-shading-value="0" style:font-name-asian="Noto Sans" style:font-name-complex="Noto Sans"/>
    </style:style>
    <style:style style:name="T19" style:family="text">
      <style:text-properties style:use-window-font-color="true" loext:opacity="0%" style:font-name="Noto Sans" fo:font-size="12pt" fo:font-weight="normal" officeooo:rsid="0008685f" fo:background-color="transparent" loext:char-shading-value="0" style:font-name-asian="Noto Sans" style:font-name-complex="Noto Sans"/>
    </style:style>
    <style:style style:name="T20" style:family="text">
      <style:text-properties style:use-window-font-color="true" loext:opacity="0%" style:font-name="Noto Sans" fo:font-size="12pt" fo:font-weight="normal" officeooo:rsid="00d38b4f" fo:background-color="transparent" loext:char-shading-value="0" style:font-name-asian="Noto Sans" style:font-name-complex="Noto Sans"/>
    </style:style>
    <style:style style:name="T21" style:family="text">
      <style:text-properties style:use-window-font-color="true" loext:opacity="0%" style:font-name="Noto Sans" fo:font-size="12pt" fo:font-weight="normal" officeooo:rsid="00902636" fo:background-color="transparent" loext:char-shading-value="0" style:font-name-asian="Noto Sans" style:font-name-complex="Noto Sans"/>
    </style:style>
    <style:style style:name="T22" style:family="text">
      <style:text-properties style:use-window-font-color="true" loext:opacity="0%" style:font-name="Noto Sans" fo:font-size="12pt" fo:font-weight="normal" officeooo:rsid="00019817" fo:background-color="transparent" loext:char-shading-value="0" style:font-name-asian="Noto Sans" style:font-name-complex="Noto Sans"/>
    </style:style>
    <style:style style:name="T23" style:family="text">
      <style:text-properties style:use-window-font-color="true" loext:opacity="0%" style:font-name="Noto Sans" fo:font-size="12pt" fo:font-weight="normal" officeooo:rsid="0021f79d" fo:background-color="transparent" loext:char-shading-value="0" style:font-name-asian="Noto Sans" style:font-name-complex="Noto Sans"/>
    </style:style>
    <style:style style:name="T24" style:family="text">
      <style:text-properties style:use-window-font-color="true" loext:opacity="0%" style:font-name="Noto Sans" fo:font-size="12pt" fo:font-weight="normal" officeooo:rsid="001551c4" fo:background-color="transparent" loext:char-shading-value="0" style:font-name-asian="Noto Sans" style:font-name-complex="Noto Sans"/>
    </style:style>
    <style:style style:name="T25" style:family="text">
      <style:text-properties style:use-window-font-color="true" loext:opacity="0%" style:font-name="Noto Sans" fo:font-size="12pt" fo:font-weight="normal" officeooo:rsid="00a525b7" fo:background-color="transparent" loext:char-shading-value="0" style:font-name-asian="Noto Sans" style:font-name-complex="Noto Sans"/>
    </style:style>
    <style:style style:name="T26" style:family="text">
      <style:text-properties style:use-window-font-color="true" loext:opacity="0%" style:font-name="Noto Sans" fo:font-size="12pt" fo:font-weight="normal" officeooo:rsid="001c7a24" fo:background-color="transparent" loext:char-shading-value="0" style:font-name-asian="Noto Sans" style:font-name-complex="Noto Sans"/>
    </style:style>
    <style:style style:name="T27" style:family="text">
      <style:text-properties style:use-window-font-color="true" loext:opacity="0%" style:font-name="Noto Sans" fo:font-size="12pt" fo:font-weight="normal" officeooo:rsid="001f56a9" fo:background-color="transparent" loext:char-shading-value="0" style:font-name-asian="Noto Sans" style:font-name-complex="Noto Sans"/>
    </style:style>
    <style:style style:name="T28" style:family="text">
      <style:text-properties style:use-window-font-color="true" loext:opacity="0%" style:font-name="Noto Sans" fo:font-size="12pt" fo:font-weight="normal" officeooo:rsid="00202c59" fo:background-color="transparent" loext:char-shading-value="0" style:font-name-asian="Noto Sans" style:font-name-complex="Noto Sans"/>
    </style:style>
    <style:style style:name="T29" style:family="text">
      <style:text-properties style:use-window-font-color="true" loext:opacity="0%" style:font-name="Noto Sans" fo:font-size="12pt" fo:font-weight="normal" officeooo:rsid="002125b2" fo:background-color="transparent" loext:char-shading-value="0" style:font-name-asian="Noto Sans" style:font-name-complex="Noto Sans"/>
    </style:style>
    <style:style style:name="T30" style:family="text">
      <style:text-properties style:use-window-font-color="true" loext:opacity="0%" style:font-name="Noto Sans" fo:font-size="12pt" fo:font-weight="normal" officeooo:rsid="00284566" fo:background-color="transparent" loext:char-shading-value="0" style:font-name-asian="Noto Sans" style:font-name-complex="Noto Sans"/>
    </style:style>
    <style:style style:name="T31" style:family="text">
      <style:text-properties style:use-window-font-color="true" loext:opacity="0%" style:font-name="Noto Sans" fo:font-size="12pt" fo:font-weight="normal" officeooo:rsid="002f3122" fo:background-color="transparent" loext:char-shading-value="0" style:font-name-asian="Noto Sans" style:font-name-complex="Noto Sans"/>
    </style:style>
    <style:style style:name="T32" style:family="text">
      <style:text-properties style:use-window-font-color="true" loext:opacity="0%" style:font-name="Noto Sans" fo:font-size="12pt" fo:font-weight="normal" officeooo:rsid="004407c0" fo:background-color="transparent" loext:char-shading-value="0" style:font-name-asian="Noto Sans" style:font-name-complex="Noto Sans"/>
    </style:style>
    <style:style style:name="T33" style:family="text">
      <style:text-properties style:use-window-font-color="true" loext:opacity="0%" style:font-name="Noto Sans" fo:font-size="12pt" fo:font-weight="normal" officeooo:rsid="00b99dbf" fo:background-color="transparent" loext:char-shading-value="0" style:font-name-asian="Noto Sans" style:font-name-complex="Noto Sans"/>
    </style:style>
    <style:style style:name="T34" style:family="text">
      <style:text-properties style:use-window-font-color="true" loext:opacity="0%" style:font-name="Noto Sans" fo:font-size="12pt" fo:font-weight="normal" officeooo:rsid="00447814" fo:background-color="transparent" loext:char-shading-value="0" style:font-name-asian="Noto Sans" style:font-name-complex="Noto Sans"/>
    </style:style>
    <style:style style:name="T35" style:family="text">
      <style:text-properties style:use-window-font-color="true" loext:opacity="0%" style:font-name="Noto Sans" fo:font-size="12pt" fo:font-weight="normal" officeooo:rsid="00456269" fo:background-color="transparent" loext:char-shading-value="0" style:font-name-asian="Noto Sans" style:font-name-complex="Noto Sans"/>
    </style:style>
    <style:style style:name="T36" style:family="text">
      <style:text-properties style:use-window-font-color="true" loext:opacity="0%" style:font-name="Noto Sans" fo:font-size="12pt" fo:font-weight="normal" officeooo:rsid="00bd63f6" fo:background-color="transparent" loext:char-shading-value="0" style:font-name-asian="Noto Sans" style:font-name-complex="Noto Sans"/>
    </style:style>
    <style:style style:name="T37" style:family="text">
      <style:text-properties style:use-window-font-color="true" loext:opacity="0%" style:font-name="Noto Sans" fo:font-size="12pt" fo:font-weight="normal" officeooo:rsid="00470a6f" fo:background-color="transparent" loext:char-shading-value="0" style:font-name-asian="Noto Sans" style:font-name-complex="Noto Sans"/>
    </style:style>
    <style:style style:name="T38" style:family="text">
      <style:text-properties style:use-window-font-color="true" loext:opacity="0%" style:font-name="Noto Sans" fo:font-size="12pt" fo:font-weight="normal" officeooo:rsid="00c197d5" fo:background-color="transparent" loext:char-shading-value="0" style:font-name-asian="Noto Sans" style:font-name-complex="Noto Sans"/>
    </style:style>
    <style:style style:name="T39" style:family="text">
      <style:text-properties style:use-window-font-color="true" loext:opacity="0%" style:font-name="Noto Sans" fo:font-size="12pt" fo:font-weight="normal" officeooo:rsid="004a1449" fo:background-color="transparent" loext:char-shading-value="0" style:font-name-asian="Noto Sans" style:font-name-complex="Noto Sans"/>
    </style:style>
    <style:style style:name="T40" style:family="text">
      <style:text-properties style:use-window-font-color="true" loext:opacity="0%" style:font-name="Noto Sans" fo:font-size="12pt" fo:font-weight="normal" officeooo:rsid="00c30c71" fo:background-color="transparent" loext:char-shading-value="0" style:font-name-asian="Noto Sans" style:font-name-complex="Noto Sans"/>
    </style:style>
    <style:style style:name="T41" style:family="text">
      <style:text-properties style:use-window-font-color="true" loext:opacity="0%" style:font-name="Noto Sans" fo:font-size="12pt" fo:font-weight="normal" officeooo:rsid="00c46229" fo:background-color="transparent" loext:char-shading-value="0" style:font-name-asian="Noto Sans" style:font-name-complex="Noto Sans"/>
    </style:style>
    <style:style style:name="T42" style:family="text">
      <style:text-properties style:use-window-font-color="true" loext:opacity="0%" style:font-name="Noto Sans" fo:font-size="12pt" fo:font-weight="normal" officeooo:rsid="00c5e81f" fo:background-color="transparent" loext:char-shading-value="0" style:font-name-asian="Noto Sans" style:font-name-complex="Noto Sans"/>
    </style:style>
    <style:style style:name="T43" style:family="text">
      <style:text-properties style:use-window-font-color="true" loext:opacity="0%" style:font-name="Noto Sans" fo:font-size="12pt" fo:language="it" fo:country="IT" fo:font-weight="normal" fo:background-color="transparent" loext:char-shading-value="0" style:font-name-asian="Noto Sans" style:font-size-asian="12pt" style:font-name-complex="Noto Sans"/>
    </style:style>
    <style:style style:name="T44" style:family="text">
      <style:text-properties style:use-window-font-color="true" loext:opacity="0%" style:font-name="Noto Sans" fo:font-size="12pt" fo:language="it" fo:country="IT" fo:font-weight="normal" officeooo:rsid="005c5586" fo:background-color="transparent" loext:char-shading-value="0" style:font-name-asian="Noto Sans" style:font-size-asian="12pt" style:font-name-complex="Noto Sans"/>
    </style:style>
    <style:style style:name="T45" style:family="text">
      <style:text-properties style:use-window-font-color="true" loext:opacity="0%" style:font-name="Noto Sans" fo:font-size="12pt" fo:font-style="italic" fo:font-weight="normal" fo:background-color="transparent" loext:char-shading-value="0" style:font-name-asian="Noto Sans" style:font-style-asian="italic" style:font-name-complex="Noto Sans" style:font-style-complex="italic"/>
    </style:style>
    <style:style style:name="T46" style:family="text">
      <style:text-properties style:use-window-font-color="true" loext:opacity="0%" style:font-name="Noto Sans" fo:font-size="12pt" fo:font-style="italic" fo:font-weight="normal" officeooo:rsid="00284566" fo:background-color="transparent" loext:char-shading-value="0" style:font-name-asian="Noto Sans" style:font-style-asian="italic" style:font-name-complex="Noto Sans" style:font-style-complex="italic"/>
    </style:style>
    <style:style style:name="T47" style:family="text">
      <style:text-properties style:use-window-font-color="true" loext:opacity="0%" style:font-name="Noto Sans" fo:font-size="12pt" fo:font-style="italic" fo:font-weight="bold" fo:background-color="transparent" loext:char-shading-value="0" style:font-name-asian="Noto Sans" style:font-style-asian="italic" style:font-weight-asian="bold" style:font-name-complex="Noto Sans" style:font-style-complex="italic" style:font-weight-complex="bold"/>
    </style:style>
    <style:style style:name="T48" style:family="text">
      <style:text-properties style:use-window-font-color="true" loext:opacity="0%" style:font-name="Noto Sans" fo:font-size="12pt" style:text-underline-style="solid" style:text-underline-width="auto" style:text-underline-color="font-color" fo:font-weight="normal" fo:background-color="transparent" loext:char-shading-value="0" style:font-name-asian="Noto Sans" style:font-name-complex="Noto Sans"/>
    </style:style>
    <style:style style:name="T49" style:family="text">
      <style:text-properties style:use-window-font-color="true" loext:opacity="0%" style:font-name="Noto Sans" fo:font-size="12pt" style:text-underline-style="solid" style:text-underline-width="auto" style:text-underline-color="font-color" fo:font-weight="normal" officeooo:rsid="004c4906" fo:background-color="transparent" loext:char-shading-value="0" style:font-name-asian="Noto Sans" style:font-name-complex="Noto Sans"/>
    </style:style>
    <style:style style:name="T50" style:family="text">
      <style:text-properties style:use-window-font-color="true" loext:opacity="0%" style:font-name="Noto Sans" fo:font-size="12pt" style:text-underline-style="solid" style:text-underline-width="auto" style:text-underline-color="font-color" fo:font-weight="normal" officeooo:rsid="00a96702" fo:background-color="transparent" loext:char-shading-value="0" style:font-name-asian="Noto Sans" style:font-name-complex="Noto Sans"/>
    </style:style>
    <style:style style:name="T51" style:family="text">
      <style:text-properties style:use-window-font-color="true" loext:opacity="0%" style:font-name="Noto Sans" fo:font-size="12pt" style:text-underline-style="solid" style:text-underline-width="auto" style:text-underline-color="font-color" fo:font-weight="normal" officeooo:rsid="003d21fa" fo:background-color="transparent" loext:char-shading-value="0" style:font-name-asian="Noto Sans" style:font-name-complex="Noto Sans"/>
    </style:style>
    <style:style style:name="T52" style:family="text">
      <style:text-properties style:use-window-font-color="true" loext:opacity="0%" style:font-name="Noto Sans" fo:font-size="12pt" style:text-underline-style="none" fo:font-weight="normal" fo:background-color="transparent" loext:char-shading-value="0" style:font-name-asian="Noto Sans" style:font-name-complex="Noto Sans"/>
    </style:style>
    <style:style style:name="T53" style:family="text">
      <style:text-properties style:use-window-font-color="true" loext:opacity="0%" style:font-name="Noto Sans" fo:font-size="12pt" style:text-underline-style="none" fo:font-weight="normal" fo:background-color="#808080" loext:char-shading-value="0" style:font-name-asian="Noto Sans" style:font-name-complex="Noto Sans"/>
    </style:style>
    <style:style style:name="T54" style:family="text">
      <style:text-properties style:use-window-font-color="true" loext:opacity="0%" style:font-name="Noto Sans" fo:font-weight="normal" officeooo:rsid="00cc76ab" fo:background-color="transparent" loext:char-shading-value="0" style:font-name-asian="Noto Sans" style:font-name-complex="Noto Sans"/>
    </style:style>
    <style:style style:name="T55" style:family="text">
      <style:text-properties style:use-window-font-color="true" loext:opacity="0%" style:font-name="Liberation Serif" fo:font-size="12pt" fo:font-weight="normal" officeooo:rsid="000be5af" fo:background-color="transparent" loext:char-shading-value="0" style:font-name-asian="Noto Sans" style:font-name-complex="Noto Sans"/>
    </style:style>
    <style:style style:name="T56" style:family="text">
      <style:text-properties style:use-window-font-color="true" loext:opacity="0%" fo:font-weight="normal" fo:background-color="transparent" loext:char-shading-value="0" style:font-name-asian="Noto Sans" style:font-name-complex="Noto Sans"/>
    </style:style>
    <style:style style:name="T57" style:family="text">
      <style:text-properties style:use-window-font-color="true" loext:opacity="0%" fo:font-weight="normal" officeooo:rsid="003c1c2b" fo:background-color="transparent" loext:char-shading-value="0" style:font-name-asian="Noto Sans" style:font-name-complex="Noto Sans"/>
    </style:style>
    <style:style style:name="T58" style:family="text">
      <style:text-properties officeooo:rsid="00b47a08"/>
    </style:style>
    <style:style style:name="T59" style:family="text">
      <style:text-properties officeooo:rsid="00518c8a"/>
    </style:style>
    <style:style style:name="T60" style:family="text">
      <style:text-properties officeooo:rsid="0053a4f6"/>
    </style:style>
    <style:style style:name="T61" style:family="text">
      <style:text-properties officeooo:rsid="005f93f1"/>
    </style:style>
    <style:style style:name="T62" style:family="text">
      <style:text-properties officeooo:rsid="005aa376"/>
    </style:style>
    <style:style style:name="T63" style:family="text">
      <style:text-properties style:font-weight-asian="normal" style:font-weight-complex="normal"/>
    </style:style>
    <style:style style:name="T64" style:family="text">
      <style:text-properties officeooo:rsid="00612681" style:font-weight-asian="normal" style:font-weight-complex="normal"/>
    </style:style>
    <style:style style:name="T65" style:family="text">
      <style:text-properties officeooo:rsid="008852e5" style:font-weight-asian="normal" style:font-weight-complex="normal"/>
    </style:style>
    <style:style style:name="T66" style:family="text">
      <style:text-properties officeooo:rsid="00d2a72e"/>
    </style:style>
    <style:style style:name="T67" style:family="text">
      <style:text-properties officeooo:rsid="00626a78"/>
    </style:style>
    <style:style style:name="T68" style:family="text">
      <style:text-properties officeooo:rsid="00049984"/>
    </style:style>
    <style:style style:name="T69" style:family="text">
      <style:text-properties officeooo:rsid="00053713"/>
    </style:style>
    <style:style style:name="T70" style:family="text">
      <style:text-properties style:text-underline-style="solid" style:text-underline-width="auto" style:text-underline-color="font-color"/>
    </style:style>
    <style:style style:name="T71" style:family="text">
      <style:text-properties officeooo:rsid="0006a5ed"/>
    </style:style>
    <style:style style:name="T72" style:family="text">
      <style:text-properties officeooo:rsid="00d40aed"/>
    </style:style>
    <style:style style:name="T73" style:family="text">
      <style:text-properties style:text-position="super 58%"/>
    </style:style>
    <style:style style:name="T74" style:family="text">
      <style:text-properties officeooo:rsid="00d87994"/>
    </style:style>
    <style:style style:name="T75" style:family="text">
      <style:text-properties officeooo:rsid="0091673d"/>
    </style:style>
    <style:style style:name="T76" style:family="text">
      <style:text-properties fo:font-weight="bold" style:font-weight-asian="bold" style:font-weight-complex="bold"/>
    </style:style>
    <style:style style:name="T77" style:family="text">
      <style:text-properties fo:font-weight="bold" officeooo:rsid="00932b35" style:font-weight-asian="bold" style:font-weight-complex="bold"/>
    </style:style>
    <style:style style:name="T78" style:family="text">
      <style:text-properties officeooo:rsid="00932b35"/>
    </style:style>
    <style:style style:name="T79" style:family="text">
      <style:text-properties fo:font-weight="normal" style:font-weight-asian="normal" style:font-weight-complex="normal"/>
    </style:style>
    <style:style style:name="T80" style:family="text">
      <style:text-properties fo:font-weight="normal" officeooo:rsid="00932b35" style:font-weight-asian="normal" style:font-weight-complex="normal"/>
    </style:style>
    <style:style style:name="T81" style:family="text">
      <style:text-properties fo:font-weight="normal" officeooo:rsid="0011c338" style:font-weight-asian="normal" style:font-weight-complex="normal"/>
    </style:style>
    <style:style style:name="T82" style:family="text">
      <style:text-properties officeooo:rsid="00a00cb7"/>
    </style:style>
    <style:style style:name="T83" style:family="text">
      <style:text-properties officeooo:rsid="00164be1"/>
    </style:style>
    <style:style style:name="T84" style:family="text">
      <style:text-properties officeooo:rsid="00a22df0"/>
    </style:style>
    <style:style style:name="T85" style:family="text">
      <style:text-properties officeooo:rsid="00202f99"/>
    </style:style>
    <style:style style:name="T86" style:family="text">
      <style:text-properties officeooo:rsid="00a96702"/>
    </style:style>
    <style:style style:name="T87" style:family="text">
      <style:text-properties officeooo:rsid="003a3c2f"/>
    </style:style>
    <style:style style:name="T88" style:family="text">
      <style:text-properties officeooo:rsid="00b7e5f1"/>
    </style:style>
    <style:style style:name="T89" style:family="text">
      <style:text-properties fo:font-style="italic" style:font-style-asian="italic" style:font-style-complex="italic"/>
    </style:style>
    <style:style style:name="T90" style:family="text">
      <style:text-properties officeooo:rsid="00bd63f6"/>
    </style:style>
    <style:style style:name="T91" style:family="text">
      <style:text-properties officeooo:rsid="004847ee"/>
    </style:style>
    <style:style style:name="T92" style:family="text">
      <style:text-properties officeooo:rsid="00488ddd"/>
    </style:style>
    <style:style style:name="T93" style:family="text">
      <style:text-properties officeooo:rsid="00c197d5"/>
    </style:style>
    <style:style style:name="T94" style:family="text">
      <style:text-properties officeooo:rsid="00cc76ab"/>
    </style:style>
    <style:style style:name="T95" style:family="text">
      <style:text-properties officeooo:rsid="00ce27ef"/>
    </style:style>
    <style:style style:name="T96" style:family="text">
      <style:text-properties officeooo:rsid="00cf69cd"/>
    </style:style>
    <style:style style:name="T97" style:family="text">
      <style:text-properties officeooo:rsid="00dc662f"/>
    </style:style>
    <style:style style:name="T98" style:family="text">
      <style:text-properties officeooo:rsid="002931e8"/>
    </style:style>
    <style:style style:name="T99" style:family="text">
      <style:text-properties officeooo:rsid="002a3570"/>
    </style:style>
    <style:style style:name="T100" style:family="text">
      <style:text-properties style:text-underline-style="none"/>
    </style:style>
    <style:style style:name="T101" style:family="text">
      <style:text-properties officeooo:rsid="002c2c31"/>
    </style:style>
    <style:style style:name="T102" style:family="text">
      <style:text-properties officeooo:rsid="001c5e34"/>
    </style:style>
    <style:style style:name="T103" style:family="text">
      <style:text-properties officeooo:rsid="001da9a4"/>
    </style:style>
    <style:style style:name="T104" style:family="text">
      <style:text-properties style:font-name="Calibri" fo:font-size="10pt" style:font-size-asian="10pt" style:font-size-complex="10pt"/>
    </style:style>
    <style:style style:name="T105" style:family="text">
      <style:text-properties officeooo:rsid="001fa1eb"/>
    </style:style>
    <style:style style:name="T106" style:family="text">
      <style:text-properties style:font-name="Noto Sans1" fo:font-size="12pt" style:font-size-asian="12pt" style:font-size-complex="12pt"/>
    </style:style>
    <style:style style:name="T107" style:family="text">
      <style:text-properties style:font-name="Noto Sans1" fo:font-size="12pt" officeooo:rsid="002bdc53" style:font-size-asian="12pt" style:font-size-complex="12pt"/>
    </style:style>
    <style:style style:name="T108" style:family="text">
      <style:text-properties style:font-name="Noto Sans1" fo:font-size="12pt" officeooo:rsid="002c2c31" style:font-size-asian="12pt" style:font-size-complex="12pt"/>
    </style:style>
    <style:style style:name="T109" style:family="text">
      <style:text-properties style:font-name="Noto Sans1" fo:font-size="12pt" officeooo:rsid="00094334" style:font-size-asian="12pt" style:font-size-complex="12pt"/>
    </style:style>
    <style:style style:name="T110" style:family="text">
      <style:text-properties style:font-name="Noto Sans1" fo:font-weight="normal" style:font-weight-asian="normal" style:font-weight-complex="normal"/>
    </style:style>
    <style:style style:name="T111" style:family="text">
      <style:text-properties style:font-name="Noto Sans1" fo:font-weight="normal" officeooo:rsid="008f7c7f" style:font-weight-asian="normal" style:font-weight-complex="normal"/>
    </style:style>
    <style:style style:name="T112" style:family="text">
      <style:text-properties officeooo:rsid="002ee6f7"/>
    </style:style>
    <style:style style:name="T113" style:family="text">
      <style:text-properties officeooo:rsid="0032264f"/>
    </style:style>
    <style:style style:name="T114" style:family="text">
      <style:text-properties officeooo:rsid="003330d7"/>
    </style:style>
    <style:style style:name="T115" style:family="text">
      <style:text-properties officeooo:rsid="00345e75"/>
    </style:style>
    <style:style style:name="T116" style:family="text">
      <style:text-properties officeooo:rsid="0009ac20"/>
    </style:style>
    <style:style style:name="T117" style:family="text">
      <style:text-properties officeooo:rsid="000b9495"/>
    </style:style>
    <style:style style:name="T118" style:family="text">
      <style:text-properties officeooo:rsid="000c46b4"/>
    </style:style>
    <style:style style:name="T119" style:family="text">
      <style:text-properties officeooo:rsid="000c95ce"/>
    </style:style>
    <style:style style:name="T120" style:family="text">
      <style:text-properties officeooo:rsid="000e1e02"/>
    </style:style>
    <style:style style:name="T121" style:family="text">
      <style:text-properties officeooo:rsid="0011c338"/>
    </style:style>
    <style:style style:name="T122" style:family="text">
      <style:text-properties style:font-name="Liberation Serif" officeooo:rsid="006ec8ab"/>
    </style:style>
    <style:style style:name="T123" style:family="text">
      <style:text-properties style:font-name="Liberation Serif" officeooo:rsid="0079d200"/>
    </style:style>
    <style:style style:name="T124" style:family="text">
      <style:text-properties officeooo:rsid="00725e39"/>
    </style:style>
    <style:style style:name="T125" style:family="text">
      <style:text-properties officeooo:rsid="0073c64d"/>
    </style:style>
    <style:style style:name="T126" style:family="text">
      <style:text-properties officeooo:rsid="00e16668"/>
    </style:style>
    <style:style style:name="T127" style:family="text">
      <style:text-properties officeooo:rsid="006bd121"/>
    </style:style>
    <style:style style:name="T128" style:family="text">
      <style:text-properties officeooo:rsid="0075a865"/>
    </style:style>
    <style:style style:name="T129" style:family="text">
      <style:text-properties officeooo:rsid="00673043"/>
    </style:style>
    <style:style style:name="T130" style:family="text">
      <style:text-properties officeooo:rsid="006af8b2"/>
    </style:style>
    <style:style style:name="T131" style:family="text">
      <style:text-properties officeooo:rsid="006b1dc9"/>
    </style:style>
    <style:style style:name="T132" style:family="text">
      <style:text-properties officeooo:rsid="006b608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text:a xlink:type="simple" xlink:href="#__RefHeading___Toc5612_2708660065" text:style-name="Index_20_Link" text:visited-style-name="Index_20_Link">E’ Dio ad aver creato l’uomo a sua immagine e somiglianza o è stato l’uomo ad aver creato Dio a sua immagine e somiglianza?<text:tab/>4</text:a></text:p>
          <text:p text:style-name="P2"><text:a xlink:type="simple" xlink:href="#__RefHeading___Toc5614_2708660065" text:style-name="Index_20_Link" text:visited-style-name="Index_20_Link">Un cenno alle religioni abramitiche<text:tab/>5</text:a></text:p>
          <text:p text:style-name="P6"><text:a xlink:type="simple" xlink:href="#__RefHeading___Toc5616_2708660065" text:style-name="Index_20_Link" text:visited-style-name="Index_20_Link">Ebraismo<text:tab/>5</text:a></text:p>
          <text:p text:style-name="P6"><text:a xlink:type="simple" xlink:href="#__RefHeading___Toc5618_2708660065" text:style-name="Index_20_Link" text:visited-style-name="Index_20_Link">Cristianesimo<text:tab/>6</text:a></text:p>
          <text:p text:style-name="P6"><text:a xlink:type="simple" xlink:href="#__RefHeading___Toc5620_2708660065" text:style-name="Index_20_Link" text:visited-style-name="Index_20_Link">Islam<text:tab/>8</text:a></text:p>
          <text:p text:style-name="P6"><text:a xlink:type="simple" xlink:href="#__RefHeading___Toc5622_2708660065" text:style-name="Index_20_Link" text:visited-style-name="Index_20_Link">La Bibbia<text:tab/>9</text:a></text:p>
          <text:p text:style-name="P2"><text:a xlink:type="simple" xlink:href="#__RefHeading___Toc5624_2708660065" text:style-name="Index_20_Link" text:visited-style-name="Index_20_Link">Raffigurazioni antropomorfiche di Dio: Il concetto di Dio nelle tradizioni Ebraica, Cristiana &amp; Islamica: Rappresentare l’irrappresentabile<text:tab/>12</text:a></text:p>
          <text:p text:style-name="P2"><text:a xlink:type="simple" xlink:href="#__RefHeading___Toc6000_2708660065" text:style-name="Index_20_Link" text:visited-style-name="Index_20_Link">Introduzione al concetto di Dio nelle tradizioni Ebraica, Cristiana e Islamica.<text:tab/>18</text:a></text:p>
          <text:p text:style-name="P2"><text:a xlink:type="simple" xlink:href="#__RefHeading___Toc6002_2708660065" text:style-name="Index_20_Link" text:visited-style-name="Index_20_Link">Primo Capitolo<text:tab/>26</text:a></text:p>
          <text:p text:style-name="P6"><text:a xlink:type="simple" xlink:href="#__RefHeading___Toc6004_2708660065" text:style-name="Index_20_Link" text:visited-style-name="Index_20_Link">Antropomorfismo<text:tab/>40</text:a></text:p>
          <text:p text:style-name="P6"><text:a xlink:type="simple" xlink:href="#__RefHeading___Toc6006_2708660065" text:style-name="Index_20_Link" text:visited-style-name="Index_20_Link">Incarnazione<text:tab/>41</text:a></text:p>
          <text:p text:style-name="P6"><text:a xlink:type="simple" xlink:href="#__RefHeading___Toc6008_2708660065" text:style-name="Index_20_Link" text:visited-style-name="Index_20_Link">Trascendenza<text:tab/>44</text:a></text:p>
          <text:p text:style-name="P6"><text:a xlink:type="simple" xlink:href="#__RefHeading___Toc6010_2708660065" text:style-name="Index_20_Link" text:visited-style-name="Index_20_Link">Trascendenza: un’interpretazione filosofica<text:tab/>46</text:a></text:p>
          <text:p text:style-name="P6"><text:a xlink:type="simple" xlink:href="#__RefHeading___Toc6012_2708660065" text:style-name="Index_20_Link" text:visited-style-name="Index_20_Link">Immanenza<text:tab/>47</text:a></text:p>
          <text:p text:style-name="P2"><text:a xlink:type="simple" xlink:href="#__RefHeading___Toc6014_2708660065" text:style-name="Index_20_Link" text:visited-style-name="Index_20_Link">Secondo Capitolo<text:tab/>50</text:a></text:p>
          <text:p text:style-name="P6"><text:a xlink:type="simple" xlink:href="#__RefHeading___Toc8240_2708660065" text:style-name="Index_20_Link" text:visited-style-name="Index_20_Link">L'antropomorfismo e la Bibbia ebraica.<text:tab/>50</text:a></text:p>
          <text:p text:style-name="P2"><text:a xlink:type="simple" xlink:href="#__RefHeading___Toc9578_2708660065" text:style-name="Index_20_Link" text:visited-style-name="Index_20_Link">Terzo Capitolo<text:tab/>74</text:a></text:p>
          <text:p text:style-name="P6"><text:a xlink:type="simple" xlink:href="#__RefHeading___Toc9580_2708660065" text:style-name="Index_20_Link" text:visited-style-name="Index_20_Link">L'antropomorfismo e il Nuovo Testamento.<text:tab/>74</text:a></text:p>
          <text:p text:style-name="P2"><text:a xlink:type="simple" xlink:href="#__RefHeading___Toc9477_2708660065" text:style-name="Index_20_Link" text:visited-style-name="Index_20_Link">Quarto Capitolo<text:tab/>129</text:a></text:p>
          <text:p text:style-name="P6"><text:a xlink:type="simple" xlink:href="#__RefHeading___Toc9479_2708660065" text:style-name="Index_20_Link" text:visited-style-name="Index_20_Link">L'antropomorfismo e il Corano nell’Islam Dio è solo trascendente e maestoso.<text:tab/>129</text:a></text:p>
          <text:p text:style-name="P6"><text:a xlink:type="simple" xlink:href="#__RefHeading___Toc9949_2708660065" text:style-name="Index_20_Link" text:visited-style-name="Index_20_Link">Conclusioni<text:tab/>162</text:a></text:p>
          <text:p text:style-name="P2"><text:a xlink:type="simple" xlink:href="#__RefHeading___Toc6365_1157857660" text:style-name="Index_20_Link" text:visited-style-name="Index_20_Link">La Risposta delle Tradizioni Giudaico-Cristiane alla Tesi sull'Antropomorfismo e l'Ateismo Moderno<text:tab/>180</text:a></text:p>
          <text:p text:style-name="P3"><text:a xlink:type="simple" xlink:href="#__RefHeading___Toc6367_1157857660" text:style-name="Index_20_Link" text:visited-style-name="Index_20_Link">II. La Sfida dell'Antropomorfismo nelle Scritture Giudaico-Cristiane.<text:tab/>182</text:a></text:p>
          <text:p text:style-name="P3"><text:a xlink:type="simple" xlink:href="#__RefHeading___Toc6369_1157857660" text:style-name="Index_20_Link" text:visited-style-name="Index_20_Link">III. Prospettive Ebraiche sull'Incorporeità Divina: Il Contributo di Maimonide.<text:tab/>183</text:a></text:p>
          <text:p text:style-name="P3"><text:a xlink:type="simple" xlink:href="#__RefHeading___Toc6371_1157857660" text:style-name="Index_20_Link" text:visited-style-name="Index_20_Link"><text:soft-page-break/>IV. Prospettive Cristiane sulla Trascendenza e Immanenza Divina: Le Riflessioni di Tommaso d'Aquino.<text:tab/>186</text:a></text:p>
          <text:p text:style-name="P3"><text:a xlink:type="simple" xlink:href="#__RefHeading___Toc6373_1157857660" text:style-name="Index_20_Link" text:visited-style-name="Index_20_Link">V. Analisi Comparativa: Maimonide e Tommaso d'Aquino.<text:tab/>189</text:a></text:p>
          <text:p text:style-name="P3"><text:a xlink:type="simple" xlink:href="#__RefHeading___Toc6375_1157857660" text:style-name="Index_20_Link" text:visited-style-name="Index_20_Link">VI. Risposte Contemporanee all'Ateismo all'Interno delle Tradizioni Giudaico-Cristiane<text:tab/>193</text:a></text:p>
          <text:p text:style-name="P3"><text:a xlink:type="simple" xlink:href="#__RefHeading___Toc6377_1157857660" text:style-name="Index_20_Link" text:visited-style-name="Index_20_Link">VII. L'Enfasi su un "Dio Morale Trascendente"<text:tab/>195</text:a></text:p>
          <text:p text:style-name="P3"><text:a xlink:type="simple" xlink:href="#__RefHeading___Toc6379_1157857660" text:style-name="Index_20_Link" text:visited-style-name="Index_20_Link">VIII. Diverse Interpretazioni e Sfumature all'Interno delle Tradizioni Giudaico-Cristiane<text:tab/>197</text:a></text:p>
          <text:p text:style-name="P4"><text:a xlink:type="simple" xlink:href="#__RefHeading___Toc10415_625557246" text:style-name="Index_20_Link" text:visited-style-name="Index_20_Link">Gli inizi del cristianesimo ed il ruolo fondamentale </text:a></text:p>
          <text:p text:style-name="P5"><text:a xlink:type="simple" xlink:href="#__RefHeading___Toc10415_625557246" text:style-name="Index_20_Link" text:visited-style-name="Index_20_Link">dei concili ecumenici.<text:tab/>201</text:a></text:p>
          <text:p text:style-name="P3"><text:a xlink:type="simple" xlink:href="#__RefHeading___Toc10417_625557246" text:style-name="Index_20_Link" text:visited-style-name="Index_20_Link">Il cammino secolare della chiesa attraverso i concili ecumenici e la sistemazione delle questioni divine.<text:tab/>203</text:a></text:p>
          <text:p text:style-name="P3"><text:a xlink:type="simple" xlink:href="#__RefHeading___Toc6381_1157857660" text:style-name="Index_20_Link" text:visited-style-name="Index_20_Link">IX. Conclusione<text:tab/>204</text:a></text:p>
          <text:p text:style-name="P3"><text:a xlink:type="simple" xlink:href="#__RefHeading___Toc6383_1157857660" text:style-name="Index_20_Link" text:visited-style-name="Index_20_Link">Il Processo a Dio<text:tab/>205</text:a></text:p>
          <text:p text:style-name="P6"><text:a xlink:type="simple" xlink:href="#__RefHeading___Toc9953_2708660065" text:style-name="Index_20_Link" text:visited-style-name="Index_20_Link">Riflessioni<text:tab/>230</text:a></text:p>
        </text:index-body>
      </text:table-of-content>
      <text:h text:style-name="P181" text:outline-level="3"><text:soft-page-break/></text:h>
      <text:h text:style-name="P181" text:outline-level="3"/>
      <text:h text:style-name="P181" text:outline-level="3"/>
      <text:h text:style-name="P181" text:outline-level="3"/>
      <text:h text:style-name="P181" text:outline-level="3"/>
      <text:h text:style-name="P181" text:outline-level="3"/>
      <text:h text:style-name="P181" text:outline-level="3"/>
      <text:h text:style-name="P181" text:outline-level="3"/>
      <text:h text:style-name="P181" text:outline-level="3"/>
      <text:h text:style-name="P181" text:outline-level="3"/>
      <text:h text:style-name="P181" text:outline-level="3"/>
      <text:h text:style-name="P181" text:outline-level="3"/>
      <text:h text:style-name="P181" text:outline-level="3"/>
      <text:h text:style-name="P181" text:outline-level="3"/>
      <text:h text:style-name="P181" text:outline-level="3"/>
      <text:h text:style-name="P182" text:outline-level="3"><text:bookmark-start text:name="__RefHeading___Toc5612_2708660065"/><text:soft-page-break/>E’ Dio ad aver creato l’uomo a sua immagine e somiglianza o è stato l’uomo ad aver creato Dio a sua immagine e somiglianza?<text:bookmark-end text:name="__RefHeading___Toc5612_2708660065"/></text:h>
      <text:p text:style-name="P7">Premessa</text:p>
      <text:p text:style-name="P8">Secondo una prospettiva teologica, la tradizione giudaico-cristiana, in particolare il libro della Genesi, afferma che Dio ha creato l'uomo a sua immagine e somiglianza. Questa visione sottolinea la natura speciale dell'uomo come creatura con un legame unico con il divino.</text:p>
      <text:p text:style-name="P9">Questa 'immagine' viene spesso interpretata come la capacità umana di razionalità, moralità e spiritualità, che riflette in qualche modo la natura di Dio. </text:p>
      <text:p text:style-name="P23">Alcuni filosofi e antropologi sostengono che le religioni e le divinità siano creazioni umane, proiezioni dei nostri desideri, paure e bisogni.</text:p>
      <text:p text:style-name="P23">In questa visione, l'uomo avrebbe creato Dio a sua immagine e somiglianza, attribuendogli qualità umane come emozioni, intenzioni e persino caratteristiche fisiche.</text:p>
      <text:p text:style-name="P10"><text:span text:style-name="T1">Quando Ludwig Feuerbach </text:span><text:span text:style-name="T2">(1804-1872) </text:span><text:span text:style-name="T1">pubblicò </text:span><text:span text:style-name="T2">l</text:span><text:span text:style-name="T1">’essenza del cristianesimo nel 1841, <text:s/>il suo approccio </text:span><text:soft-page-break/><text:span text:style-name="T2">materialista</text:span><text:span text:style-name="T2"><text:note text:id="ftn1" text:note-class="footnote"><text:note-citation>1</text:note-citation><text:note-body><text:p text:style-name="P56"><text:span text:style-name="T2">L’</text:span>essere umano è situato all'interno della natura; e dovrebbe essere posto fuori di essa il nostro inizio, la nostra origine? Viviamo nella natura, con la natura, della natura e dovremmo tuttavia non essere derivati da essa? Quanta contraddizione!</text:p></text:note-body></text:note></text:span><text:span text:style-name="T2"> </text:span><text:span text:style-name="T1">cambia radicalmente: non è più la divinità a determinare l’uomo, ma è l’uomo stesso a creare l’idea di Dio proiettando i propri bisogni e desideri.</text:span></text:p>
      <text:h text:style-name="P181" text:outline-level="3"><text:bookmark-start text:name="__RefHeading___Toc5614_2708660065"/><text:span text:style-name="T3">Un cenno alle religioni abramitiche</text:span> <text:bookmark-end text:name="__RefHeading___Toc5614_2708660065"/></text:h>
      <text:p text:style-name="P11"><text:span text:style-name="T1">Le tre religioni definite abramitiche, traggono origine dalla figura di Abramo, padre del monoteismo. </text:span>L<text:span text:style-name="T4">a</text:span> religion<text:span text:style-name="T4">e</text:span> <text:span text:style-name="T4">E</text:span>braica, <text:span text:style-name="T4">C</text:span>ristiana e <text:span text:style-name="T4">M</text:span>usulmana, <text:span text:style-name="T4">hanno avuto origine in contesti storici, teologici e pratici diversi, </text:span><text:s/>ma <text:span text:style-name="T4">hanno avuto</text:span> influenze reciproche e radici comuni.</text:p>
      <text:h text:style-name="Heading_20_4" text:outline-level="4"><text:bookmark-start text:name="__RefHeading___Toc5616_2708660065"/>Ebraismo<text:bookmark-end text:name="__RefHeading___Toc5616_2708660065"/></text:h>
      <text:p text:style-name="P12">L'Ebraismo è la più antica delle tre religioni abramitiche, risalente a circa il XVI secolo a.C. La sua storia inizia con l'Alleanza tra Dio e Abramo, considerato il padre del popolo ebraico.</text:p>
      <text:p text:style-name="P14">Si consolida con Mosè e la consegna della Torah, che diventa il testo sacro centrale. Durante l'esilio babilonese e il ritorno a Gerusalemme, l'Ebraismo si struttura ulteriormente: Dio è unico e indivisibile, chiamato spesso (Yahweh). Non c'è una Trinità o incarnazione. </text:p>
      <text:p text:style-name="P72"><text:span text:style-name="T6">Il </text:span><text:span text:style-name="T7">testo sacro dell’ </text:span><text:span text:style-name="T5">Ebraismo </text:span><text:span text:style-name="T7">è il</text:span><text:span text:style-name="T5"> Torah (Pentateuco) e </text:span><text:soft-page-break/><text:span text:style-name="T5">altri libri della Bibbia ebraica (Tanakh).</text:span></text:p>
      <text:p text:style-name="P73"><text:span text:style-name="T8">L’</text:span><text:span text:style-name="T5">Ebraismo </text:span><text:span text:style-name="T8">a</text:span><text:span text:style-name="T5">spetta ancora l'arrivo del Messia, che porterà la redenzione </text:span><text:span text:style-name="T8">e</text:span><text:span text:style-name="T5"> </text:span><text:span text:style-name="T8">r</text:span><text:span text:style-name="T5">iconosce profet</text:span><text:span text:style-name="T8">a</text:span><text:span text:style-name="T5"> Mosè. <text:s/>Celebra feste come Shabbat, Pesach (Pasqua ebraica) e Yom Kippur. Segue le leggi alimentari (kasherut) e </text:span><text:span text:style-name="T9">la </text:span><text:span text:style-name="T5">circoncisione. </text:span></text:p>
      <text:p text:style-name="P72"><text:span text:style-name="T5">Dopo la </text:span><text:span text:style-name="T10">m</text:span><text:span text:style-name="T5">orte, </text:span><text:span text:style-name="T10">l</text:span><text:span text:style-name="T5">a vita ultraterrena </text:span><text:span text:style-name="T10">non </text:span><text:span text:style-name="T5">è </text:span><text:span text:style-name="T10">ben</text:span><text:span text:style-name="T5"> definita; </text:span><text:span text:style-name="T10">c’è grande </text:span><text:span text:style-name="T5">enfasi sul vivere secondo la legge di Dio.</text:span></text:p>
      <text:h text:style-name="Heading_20_4" text:outline-level="4"><text:bookmark-start text:name="__RefHeading___Toc5618_2708660065"/>Cristianesimo<text:bookmark-end text:name="__RefHeading___Toc5618_2708660065"/></text:h>
      <text:p text:style-name="P12">Emerge dall'ebraismo, riconosce Gesù Cristo come il Messia e il Figlio di Dio. Il Nuovo Testamento si aggiunge alla Bibbia ebraica come base scritturale. Nasce nel I secolo d.C. in Palestina, come movimento all'interno dell'Ebraismo, <text:span text:style-name="T58">s</text:span>i diffonde rapidamente nell'Impero Romano grazie agli apostoli, in particolare Paolo, e diventa religione ufficiale con l'Editto di Milano (313 d.C.).</text:p>
      <text:p text:style-name="P15">Durante il Medioevo, il Cristianesimo si radica in Europa e si espande attraverso missioni e colonizzazioni. La nozione di Dio include la Trinità Padre, Figlio e Spirito Santo. <text:span text:style-name="T58">Nella</text:span> fede cristiana l'incarnazione è un caso unico in cui Dio assume forma umana in Cristo.</text:p>
      <text:p text:style-name="P13">Egli è "l'irradiazione della gloria del Padre e l'impronta della Sua sostanza" (Lettera agli Ebrei 1,3): cioè in Cristo <text:soft-page-break/>Dio ha voluto farsi conoscere, e i Suoi gesti e le Sue parole ci svelano chi è Dio. "Chi ha visto me ha visto il Padre" (Giovanni 14,9), afferma Gesù stesso. Nella Bibbia Dio entra nella storia, libera il popolo ebraico dalla schiavitù in Egitto e lo conduce alla Terra promessa; si presenta all'uomo anche come Padre, a Lazzaro addirittura come amico; consegna all'uomo il comandamento dell'amore.</text:p>
      <text:p text:style-name="P74"><text:span text:style-name="T8">Oltre all'Antico Testamento, il Nuovo Testamento narra la vita, la morte e la resurrezione di Gesù e i primi insegnamenti cristiani. Il testo sacro del Cristianesimo è La Bibbia, </text:span><text:span text:style-name="T11">ed</text:span><text:span text:style-name="T8"> è considerata ispirata da Dio, ma scritta da autori umani sotto la guida dello Spirito Santo. Questo significa che, pur essendo considerata sacra, la Bibbia riflette anche lo stile, il contesto storico e la personalità degli autori. La rivelazione biblica è quindi vista come un'interazione tra il divino e l'umano.</text:span></text:p>
      <text:p text:style-name="P76"><text:span text:style-name="T8">Il </text:span><text:span text:style-name="T5">Cristianesimo </text:span><text:span text:style-name="T8">r</text:span><text:span text:style-name="T5">iconosce Gesù Cristo come il Messia e il Salvatore; </text:span><text:span text:style-name="T12">i</text:span><text:span text:style-name="T8"> rituali e le p</text:span><text:span text:style-name="T5">ratiche variano tra le denominazioni, includendo battesimo, comunione, e celebrazione di feste come Natale e Pasqua.</text:span></text:p>
      <text:p text:style-name="P76"><text:span text:style-name="T10">La s</text:span><text:span text:style-name="T5">alvezza e vita eterna sono centrali, con </text:span><text:span text:style-name="T10">la </text:span><text:span text:style-name="T5">visione d</text:span><text:span text:style-name="T10">el</text:span><text:span text:style-name="T5"> paradiso e </text:span><text:span text:style-name="T10">dell’</text:span><text:span text:style-name="T5">inferno.</text:span></text:p>
      <text:h text:style-name="Heading_20_4" text:outline-level="4"><text:bookmark-start text:name="__RefHeading___Toc5620_2708660065"/><text:soft-page-break/>Islam<text:bookmark-end text:name="__RefHeading___Toc5620_2708660065"/></text:h>
      <text:p text:style-name="P16">Nasce nel VII secolo d.C. nella penisola arabica con il profeta Maometto, che riceve la rivelazione del Corano. Si espande rapidamente attraverso conquiste militari e commerci, creando un vasto impero che abbraccia Medio Oriente, Nord Africa e Asia.</text:p>
      <text:p text:style-name="P16">L'Islam ha interagito con il Cristianesimo e l'Ebraismo, incorporando elementi delle loro tradizioni e sviluppando una cultura ricca e diversificata.</text:p>
      <text:p text:style-name="P17">Per l'islam, Dio è l'Entità Trascendente, eterno e assolutamente Uno. Incomparabile, non ha generato, né è stato generato ed esiste oltre lo spazio e il tempo. La concezione islamica di Dio è universale, non legata cioè a una tribù, un popolo o a una personalità, poiché "in verità Allah basta a Se stesso, non ha bisogno del creato". Per questo l'islam si considera come una fede annunciata, nel corso dell'esistenza umana, da numerosi profeti come Abramo, Mosè, Ismaele e Gesù, sebbene il loro messaggio sia stato distorto dal corso del tempo e dalla malizia degli uomini. Per i musulmani il ciclo profetico si chiude con Maometto, definito per questo Sigillo dei Profeti. </text:p>
      <text:p text:style-name="P75"><text:span text:style-name="T13">Il messaggio di Allah è veicolato attraverso il dettato del Corano, </text:span><text:span text:style-name="T5">visto dai musulmani come la parola letterale di </text:span><text:soft-page-break/><text:span text:style-name="T5">Allah, trasmessa direttamente al profeta Maometto attraverso l'arcangelo Gabriele. Ogni parola è considerata immutabile, perché è stata dettata esattamente come doveva essere scritta. Questo concetto implica che il Corano non è soggetto a interpretazioni umane nella sua formulazione originale. </text:span><text:span text:style-name="T11">Si articola </text:span><text:span text:style-name="T13">attraverso i suoi </text:span><text:span text:style-name="T5">Cinque Pilastri: testimonianza di fede (Shahada), preghiera (Salat), elemosina (Zakat), digiuno (Ramadan) e pellegrinaggio a La Mecca (Hajj).</text:span></text:p>
      <text:p text:style-name="P18"><text:span text:style-name="T59">L’</text:span>Islam <text:span text:style-name="T59">è for</text:span>temente focalizzato su paradiso e inferno, con <text:span text:style-name="T59">il </text:span>giudizio divino dopo la morte.</text:p>
      <text:h text:style-name="Heading_20_4" text:outline-level="4"><text:bookmark-start text:name="__RefHeading___Toc5622_2708660065"/>La Bibbia<text:bookmark-end text:name="__RefHeading___Toc5622_2708660065"/></text:h>
      <text:p text:style-name="P21">Il termine 'Bibbia ebraica' è solitamente usato dai cristiani per indicare i testi sacri della religione ebraica, ma l'etimologia di Bibbia è greca e significa semplicemente, 'libri'; tutti i libri della Bibbia ebraica sono considerati sacri anche dai cristiani che inizialmente erano ebrei che seguivano anche gli insegnamenti di Gesù.</text:p>
      <text:p text:style-name="P19">La Bibbia è una raccolta di testi sacri che raccontano la storia del rapporto tra Dio e l'umanità.</text:p>
      <text:p text:style-name="P20">Nel Vecchio Testamento, <text:span text:style-name="T60">si </text:span>trov<text:span text:style-name="T60">a</text:span> principalmente la narrazione della creazione del mondo, dell'origine del <text:soft-page-break/>popolo di Israele e delle alleanze di Dio con figure chiave come Abramo, Mosè e Davide. È composto da testi ebraici e include leggi, profezie, poesie e storie che preparano il terreno per gli eventi futuri.</text:p>
      <text:p text:style-name="P22">Nel cristianesimo, il Vecchio Testamento si suddivide generalmente in quattro sezioni principali: </text:p>
      <text:p text:style-name="P22">1. Pentateuco (i primi cinque libri, chiamati anche 'Torah' nella tradizione ebraica), </text:p>
      <text:p text:style-name="P22">2. Libri storici (come Giosuè, Giudici e Re),</text:p>
      <text:p text:style-name="P22">3. Libri poetici e sapienziali (ad esempio Salmi e Proverbi), </text:p>
      <text:p text:style-name="P22">4. Libri profetici (come Isaia e Geremia).</text:p>
      <text:p text:style-name="P22">Questi testi sono considerati di grande importanza perché pongono le basi teologiche e morali per la fede ebraica e cristiana, e prefigurano gli eventi che si sviluppano nel Nuovo Testamento. </text:p>
      <text:p text:style-name="P20">Nel Nuovo Testamento, il focus si sposta su Gesù Cristo: la sua vita, il suo insegnamento, la sua morte e resurrezione, che sono il cuore del messaggio cristiano. Questo insieme di libri si concentra sulla Nuova Alleanza e sulla salvezza universale.</text:p>
      <text:p text:style-name="P18">La Bibbia unisce questi testi in un unico volume per offrire una visione completa della fede ebraica e cristiana. </text:p>
      <text:p text:style-name="P20">Ci sono molte differenze fondamentali tra il Vecchio e il <text:soft-page-break/>Nuovo Testamento, sia in termini di contenuto che di messaggio. <text:span text:style-name="T61">Vediamone </text:span>alcune:</text:p>
      <text:p text:style-name="P52">Origine e Focalizzazione</text:p>
      <text:p text:style-name="P20"><text:span text:style-name="T61">Il </text:span>Vecchio Testamento <text:span text:style-name="T61">r</text:span>acconta la storia del popolo di Israele, le sue leggi, la creazione del mondo e l'alleanza tra Dio e Israele. È centrato sull'Antica Alleanza stabilita tramite figure come Abramo, Mosè e i profeti.</text:p>
      <text:p text:style-name="P18"><text:span text:style-name="T61">Il </text:span>Nuovo Testamento <text:span text:style-name="T61">s</text:span>i concentra sulla vita, morte e resurrezione di Gesù Cristo, che rappresenta la Nuova Alleanza, aperta a tutte le genti, non solo a Israele.</text:p>
      <text:p text:style-name="P53">Numero di Libri</text:p>
      <text:p text:style-name="P20">Il Vecchio Testamento ha molti più libri (39 nella tradizione protestante, 46 in quella cattolica).</text:p>
      <text:p text:style-name="P18">Il Nuovo Testamento è più breve, con 27 libri, tra cui i Vangeli, gli Atti degli Apostoli, le Lettere di Paolo e l'Apocalisse.</text:p>
      <text:p text:style-name="P52">Prospettiva Teologica</text:p>
      <text:p text:style-name="P20"><text:span text:style-name="T61">Nel </text:span>Vecchio Testamento <text:span text:style-name="T61">l</text:span>'accento è posto sulle leggi (come i Dieci Comandamenti) e sul rapporto tra Dio e Israele. È spesso visto come preparatorio per ciò che verrà.</text:p>
      <text:p text:style-name="P18"><text:span text:style-name="T61">Il </text:span>Nuovo Testamento <text:span text:style-name="T61">p</text:span>resenta un messaggio di amore, grazia e redenzione attraverso Gesù Cristo, che è considerato l'adempimento delle profezie del Vecchio <text:soft-page-break/>Testamento.</text:p>
      <text:p text:style-name="P52"/>
      <text:p text:style-name="P52">Stile Narrativo</text:p>
      <text:p text:style-name="P18"><text:span text:style-name="T61">Il </text:span>Vecchio Testamento <text:span text:style-name="T61">i</text:span>nclude molti generi, come narrazioni storiche, leggi, poesie e profezie.</text:p>
      <text:p text:style-name="P18"><text:span text:style-name="T61">Il </text:span>Nuovo Testamento <text:span text:style-name="T61">s</text:span>i concentra maggiormente su narrazioni biografiche (i Vangeli), lettere (epistole) e visioni apocalittiche (Apocalisse).</text:p>
      <text:p text:style-name="P52">Messaggio Universale</text:p>
      <text:p text:style-name="P18">Il Vecchio Testamento si rivolge principalmente al popolo ebraico.</text:p>
      <text:p text:style-name="P18">Il Nuovo Testamento, invece, enfatizza l'universalità del messaggio di salvezza, rivolto a tutta l'umanità.</text:p>
      <text:h text:style-name="P186" text:outline-level="3"><text:bookmark-start text:name="__RefHeading___Toc5624_2708660065"/>Raffigurazioni antropomorfiche di Dio: Il concetto di Dio nelle tradizioni Ebraica, Cristiana &amp; Islamica: Rappresentare l’irrappresentabile<text:bookmark-end text:name="__RefHeading___Toc5624_2708660065"/></text:h>
      <text:p text:style-name="P24">Il libro di Zulfiqar Ali Shah, è un'opera che esplora il tema dell'antropomorfismo nelle tre grandi tradizioni abramitiche. Shah analizza come l'ebraismo e il cristianesimo abbiano cercato di dare una forma comprensibile a Dio, confrontando queste prospettive con la visione islamica, che è profondamente anti-antropomorfica. </text:p>
      <text:p text:style-name="P25">L'autore esamina il concetto di Tawhid, ovvero l'assoluta <text:soft-page-break/>unicità di Dio nell'Islam, e il ruolo dei Novantanove Nomi di Dio, che aiutano i musulmani a comprendere i Suoi attributi senza ricorrere a rappresentazioni fisiche. Inoltre, Shah critica le interpretazioni teologiche che hanno attenuato il rigido monoteismo islamico, mettendo in discussione le influenze filosofiche e culturali che hanno modellato le concezioni di Dio nelle diverse fedi.</text:p>
      <text:p text:style-name="P25">Shah si attiene alla posizione tradizionale islamica, che rifiuta qualsiasi raffigurazione antropomorfica di Dio. Il suo approccio è rigoroso e basato su una lettura teologica approfondita, evitando interpretazioni che potrebbero deviare dal monoteismo puro. </text:p>
      <text:p text:style-name="P49">Come risponde la teologia cristiana che un essere umano (Gesù) che ha vissuto una vita umana vera, storica e piena, sia infatti la piena incarnazione di Dio senza negare l’accusa di corporeità e antropomorfismo?</text:p>
      <text:p text:style-name="P49">Secondo la fede cristiana, l'Incarnazione afferma che il Logos (la Parola di Dio) si è fatto carne, vivendo una vita umana storica e concreta, con tutte le sue limitazioni fisiche ed emozionali. Questo implica, però, un'apparente tensione tra la trascendenza divina e la corporeità umana:</text:p>
      <text:p text:style-name="P49">L'assunzione della carne da parte del Logos include la <text:soft-page-break/>partecipazione alle caratteristiche umane, come la sofferenza, le emozioni e la mortalità.</text:p>
      <text:p text:style-name="P50">Al contempo, si afferma che Gesù è Dio stesso, infinito, eterno e onnipotente. </text:p>
      <text:p text:style-name="P26"><text:span text:style-name="T62">L</text:span>a teologia cristiana classica cerca di rispondere a questa obiezione sottolineando alcuni punti:</text:p>
      <text:list text:style-name="L1">
        <text:list-item>
          <text:p text:style-name="P192">La dottrina della 'kenosi' (svuotamento) suggerisce che Dio, nel farsi uomo, abbia volontariamente accettato le limitazioni umane senza perdere la sua natura divina.</text:p>
        </text:list-item>
        <text:list-item>
          <text:p text:style-name="P193">I Concili ecumenici, come Calcedonia (451), hanno stabilito che in Cristo convivono due nature, divina e umana, 'senza confusione, senza cambiamento, senza divisione, senza separazione'.</text:p>
        </text:list-item>
        <text:list-item>
          <text:p text:style-name="P193">La corporeità di Cristo non è vista come una limitazione, ma come il mezzo attraverso il quale Dio si è reso accessibile agli uomini e ha offerto la redenzione.</text:p>
        </text:list-item>
      </text:list>
      <text:p text:style-name="P27">Questa tensione tra trascendenza e immanenza è ciò che rende l'Incarnazione un mistero centrale nella fede cristiana. </text:p>
      <text:p text:style-name="P27">La dottrina dell'Incarnazione, come molte questioni teologiche, è spesso percepita come un tentativo di <text:soft-page-break/>mantenere un equilibrio tra concetti apparentemente opposti. Questo approccio può sembrare un compromesso, ma per molti teologi rappresenta una necessità, dato che ci si confronta con un mistero che supera la piena comprensione umana.</text:p>
      <text:p text:style-name="P77"><text:span text:style-name="T15">I</text:span><text:span text:style-name="T14">l linguaggio stesso della teologia è limitato nel tentativo di descrivere ciò che, per definizione, trascende la logica umana. Può risultare frustrante per una mente curiosa, soprattutto </text:span><text:span text:style-name="T16">quando si</text:span><text:span text:style-name="T14"> cerc</text:span><text:span text:style-name="T16">a</text:span><text:span text:style-name="T14"> una spiegazione coerente e razionale.</text:span></text:p>
      <text:p text:style-name="P77"><text:span text:style-name="T16">N</text:span><text:span text:style-name="T14">el corso della storia </text:span><text:span text:style-name="T16">questo argomento è stato affrontato </text:span><text:span text:style-name="T14">anche da filosofi, pensatori e movimenti religiosi che hanno cercato di interpretare il rapporto tra il divino e l'umano in modi alternativi. </text:span><text:span text:style-name="T16">I</text:span><text:span text:style-name="T14">l docetismo affermava che Gesù avesse solo l'apparenza di un corpo umano, per evitare di attribuire al divino la corporeità, mentre altri hanno posto più enfasi sull'umanità di Cristo.</text:span></text:p>
      <text:p text:style-name="P27">Qual è, l'elemento più difficile da accettare o comprendere in questa dottrina?</text:p>
      <text:p text:style-name="P55">Molti pensatori ritengono che il cristianesimo sia nato per dare un senso alla vita dopo la morte, dare una speranza di una vita ultraterrena. La promessa cristiana di una vita ultraterrena, accompagnata dal concetto di <text:soft-page-break/>redenzione e dalla speranza nella resurrezione, offriva un conforto esistenziale che aveva un forte impatto sulle comunità dell'epoca. Per alcuni pensatori, questa risposta fu vista come una 'evoluzione' del pensiero tragico greco, un passaggio dal destino inevitabile alla possibilità di salvezza e liberazione.</text:p>
      <text:p text:style-name="P78"><text:span text:style-name="T43">I Padri platonici, influenzati dal pensiero filosofico neoplatonico, tendevano a concepire il divino in termini di assoluta trascendenza e immutabilità. La dottrina della consustanzialità tra Padre e Figlio, formulata a Nicea </text:span><text:span text:style-name="T44">(325)</text:span><text:span text:style-name="T43">, cercava di preservare l'unicità e la coerenza della divinità cristiana, ma non corrispondeva completamente alla nozione di 'divinità pura' così come interpretata dai platonici.</text:span></text:p>
      <text:p text:style-name="P55">Nel neoplatonismo, il principio primo ('Uno') era considerato indefinibile e assolutamente separato dal mondo materiale. La concettualizzazione cristiana della Trinità introduceva invece un'idea di partecipazione divina che sfidava questi paradigmi. Cristo veniva riconosciuto come divinità incarnata, una fusione di umano e divino, che poteva sembrare inconciliabile con la filosofia che esaltava la pura trascendenza.</text:p>
      <text:p text:style-name="P55">Questa tensione ha aperto un dibattito interessante, non solo teologico ma anche filosofico, nel cercare di <text:soft-page-break/>conciliare l'eredità platonica con la visione cristiana emergente.</text:p>
      <text:p text:style-name="P55">Sant'Agostino è spesso considerato un importante rappresentante del pensiero cristiano che ha integrato profondamente il platonismo nella sua teologia e filosofia. Pur non essendo un 'padre platonico' in senso stretto, come Plotino o Porfirio, Agostino ha attinto largamente alla tradizione neoplatonica, specialmente attraverso le opere di Plotino, che lo hanno influenzato nella comprensione della relazione tra Dio, l'anima e il mondo.</text:p>
      <text:p text:style-name="P78"><text:span text:style-name="T43">Agostino reinterpretò molte idee platoniche all'interno del quadro cristiano, </text:span><text:span text:style-name="T44">come</text:span><text:span text:style-name="T43">:</text:span></text:p>
      <text:p text:style-name="P55">- La concezione neoplatonica dell' 'Uno' influenzò la sua idea di Dio come suprema fonte di bontà e verità.</text:p>
      <text:p text:style-name="P55">- La dottrina della 'illuminazione divina' di Agostino mostra un chiaro debito verso il pensiero platonico, con l'idea che la conoscenza e la verità derivano dalla luce di Dio che illumina l'intelletto umano.</text:p>
      <text:p text:style-name="P78"><text:span text:style-name="T43">- </text:span><text:span text:style-name="T44">L</text:span><text:span text:style-name="T43">a sua visione dell'anima come più affine al mondo spirituale che a quello materiale riflette il dualismo platonico.</text:span></text:p>
      <text:p text:style-name="P55">Tuttavia, Agostino si differenziò dai platonici su punti chiave, come la centralità di Cristo, l'incarnazione e la <text:soft-page-break/>redenzione, elementi che sono peculiari del cristianesimo.</text:p>
      <text:p text:style-name="P55">L'evoluzione della scienza e le moderne teorie cosmologiche hanno aperto prospettive nuove e spesso provocatorie riguardo al nostro posto nell'universo. Osservazioni sul cosmo, come la teoria del Big Bang, la materia oscura o l'infinità del tempo e dello spazio, mettono in discussione concezioni tradizionali della vita e della morte. Alcuni vedono questo come una sfida alle spiegazioni religiose, mentre altri trovano nella scienza e nella religione una possibile complementarità: la religione risponde ai bisogni spirituali e esistenziali, mentre la scienza esplora la struttura fisica dell'universo. </text:p>
      <text:h text:style-name="P184" text:outline-level="3"><text:span text:style-name="T63"/></text:h>
      <text:h text:style-name="P185" text:outline-level="3"><text:bookmark-start text:name="__RefHeading___Toc6000_2708660065"/><text:span text:style-name="T63">Introduzione </text:span><text:span text:style-name="T64">al</text:span><text:span text:style-name="T63"> concetto di Dio nelle tradizioni Ebraica, Cristiana </text:span><text:span text:style-name="T65">e</text:span><text:span text:style-name="T63"> Islamica.</text:span><text:bookmark-end text:name="__RefHeading___Toc6000_2708660065"/></text:h>
      <text:p text:style-name="P79"><text:span text:style-name="T14">Nel corso della storia, il Cristianesimo e l’Ebraismo hanno cercato di conferire un senso a Dio. </text:span><text:span text:style-name="T17">Accostando</text:span><text:span text:style-name="T14"> la posizione islamica a questo, l’autore </text:span><text:span text:style-name="T18">(Zulfiqar Ali Shah) </text:span><text:span text:style-name="T14">affronta la visione del mondo giudaico-cristiano e come ognuno ha scelto di regolamentare il suo incontro con Dio, fino a che punto questo è stato l’effettivo risultato della Scrittura e in che misura il prodotto di dibattito teologico, o dei decreti della Chiesa nei secoli </text:span><text:soft-page-break/><text:span text:style-name="T14">successivi e l’assorbimento della filosofia ellenistica. Shah esamina anche la posizione dell’Islam profondamente anti-antropomorfa ed il discorso teologico islamico del Tawhid</text:span><text:span text:style-name="T14"><text:note text:id="ftn2" text:note-class="footnote"><text:note-citation>2</text:note-citation><text:note-body><text:p text:style-name="P56">Nella cultura islamica, il tawḥīd <text:s/><text:span text:style-name="T66">(</text:span>'unicità') è il principio alla base del concetto dell'unità e unicità di Dio (Allāh).</text:p></text:note-body></text:note></text:span><text:span text:style-name="T14"> così come i Novantanove Nomi di Dio ed il significato che questi hanno avuto in merito alla comprensione dei musulmani di Dio e dei Suoi attributi. Mentre descrive come questi divennero la pietra di paragone del dialogo musulmano con l’ebraismo ed il cristianesimo, egli critica le affermazioni teologiche e le prospettive che hanno smorzato, se non contrastato, il rigido monoteismo. Mentre il secolarismo discute se Dio è morto, la questione dell’antropomorfismo è diventata una questione di immensa importanza. La ricerca di Dio, specialmente in questi giorni ed in questa epoca, è in parte una ricerca di desiderio intellettuale. </text:span><text:span text:style-name="T45">Per Shah, i concetti antropomorfici e le raffigurazioni corporee del Divino sono forse tra i principali fattori dell’ateismo moderno.</text:span><text:span text:style-name="T14"> Come tale egli, in ultima analisi, trae la conclusione che il desiderio postmoderno di Dio non sarà annullato da antichi concetti antropomorfici e corporei del Divino, che hanno semplicemente portato Dio in questo universo, con una precisa funzione storica ed una </text:span><text:soft-page-break/><text:span text:style-name="T14">posizione specifica, riducendo la forza intellettuale e spirituale di ciò che Dio è e rappresenta, portando l’anima a sminuire il senso del sacro e, quindi, la fede in Lui.</text:span></text:p>
      <text:p text:style-name="P80"><text:span text:style-name="T18">Lo studio che ha portato a realizzare questa indagine,</text:span><text:span text:style-name="T14"> è un’esposizione dettagliata sulle questioni dell’antropomorfismo e corporeità (la descrizione di Dio in termini fisici umani, categorie o forme inappropriate per la Maestà di Dio) nell’Ebraismo, nel Cristianesimo e nell’Islam, e come queste vengono trattate nei testi della Bibbia ebraica, del Nuovo Testamento e del Corano. È inoltre, un esame dettagliato dei successivi sviluppi del pensiero teologico, dell’interpretazione scritturale e della critica esegetica per quanto riguarda l’antropomorfismo e di come questi elementi abbiano influenzato in modo significativo la percezione di Dio da parte dei seguaci di tutte e tre le tradizioni. </text:span><text:span text:style-name="T48">Dio ha creato l’uomo a Sua immagine morale</text:span><text:span text:style-name="T14">, il che significa che Egli ha voluto che l’umanità vivesse una vita contrassegnata da giustizia, uguaglianza, correttezza, reciproco rispetto, simpatia, amore, compassione, carità ecc. </text:span><text:span text:style-name="T48">D’altra parte l’umanità ha anche scelto di violare i più elementari comandamenti morali di Dio e di restituire il favore creando Dio secondo la propria immagine di uomo</text:span><text:span text:style-name="T14">, piuttosto severamente, portando </text:span><text:soft-page-break/><text:span text:style-name="T14">l’ineffabile trascendentale nei regni della struttura e dello spazio, solo per servire programmi nascosti e desideri egoistici. In effetti, i figli di Abramo (con ciò si intende la coscienza semitica) personalizzarono, nazionalizzarono e antropomorfizzarono la Divinità trascendentale così che Egli in realtà divenne solo una versione più grande, più potente e più letale di loro stessi. Come tale, l’umanità non ha esitato ad avocare a Dio le proprie variegate strategie individuali, comunali e nazionali, le pratiche, le idee, le simpatie e le antipatie ecc. per creare così un esterno assoluto di idee finite di nazionalità, etnia, razza, politica, ideologia e persino teologia. Innalzando ai più alti livelli di importanza dei fenomeni storici limitati come la terra, la razza, un personaggio storico o una particolare nozione della divinità o della legge, ciò che l’umanità in ultima analisi è riuscita a fare, è di sostituire l’Unico e Solo assoluto, avendo creato multipli assoluti infinitamente inferiori, di natura e valore intrinsecamente limitati in confronto a Lui. Era inevitabile che questa speculazione idolatra, </text:span><text:span text:style-name="T48">questa idea creata dall’uomo di un Dio nazionale o personalizzato, avrebbe portato ad una risposta scottante, ad una resistenza violenta ed alla fine sarebbe degenerata nell’inutilità.</text:span><text:span text:style-name="T14"> 'Deismo' illuminato, seguito da agnosticismo scientifico ed infine da </text:span><text:soft-page-break/><text:span text:style-name="T14">ateismo, sarebbero stati il fatale risultato. </text:span><text:span text:style-name="T48">Mentre la scienza si è inesorabilmente sviluppata ed una filosofia di umanesimo secolare e materialismo ha sostituito le idee di religione e Dio diventando il nuovo ethos culturale</text:span><text:span text:style-name="T48"><text:note text:id="ftn3" text:note-class="footnote"><text:note-citation>3</text:note-citation><text:note-body><text:p text:style-name="P126">Con il termine ethos si intende l’insieme delle cose che stanno a cuore ai membri di quella società. <text:span text:style-name="T67">I</text:span>l complesso dei valori e degli orientamenti di una società nei confronti del mondo.</text:p></text:note-body></text:note></text:span><text:span text:style-name="T48">, affermazioni ardite, come quelle di Karl Marx per cui la religione era l’oppio dei popoli, si sono impresse profondamente nell’immaginario comune.</text:span><text:span text:style-name="T14"> </text:span><text:span text:style-name="T48">La chiave per la felicità umana ora consisteva nell’aumentare al massimo i propri bisogni materiali in questa vita e a non rinviare la gratificazione a una sorta di paradiso dopo la morte.</text:span><text:span text:style-name="T14"> </text:span><text:span text:style-name="T48">Dimenticando naturalmente che la ragion d’essere della religione è quella di dare una risposta al significato dell’esistenza, fornire soluzioni spirituali ed etiche ai problemi materiali, preparare per la vita</text:span><text:span text:style-name="T14"> </text:span><text:span text:style-name="T48">dopo la morte e non quella di soddisfare l’ego dell’uomo, la sua avidità, il suo desiderio per la promiscuità e amore per la gratificazione istantanea.</text:span><text:span text:style-name="T14"> </text:span></text:p>
      <text:p text:style-name="P81"><text:span text:style-name="T14">Nel frattempo, ciò che non poteva essere misurato, quantificato, o semplicemente osservato, venne reso obsoleto. Quindi, il trascendentale Altro che si levò contro e al di là della sfera utilitaristica e che non Si </text:span><text:soft-page-break/><text:span text:style-name="T14">auto-ridusse ad un fatto scientifico empiricamente dimostrabile, fu a sua volta reso inutile, con la religione semplicemente eliminata come il prodotto di paure ed esperienze infantili. Il risultato fu un’enorme e tragica perdita di fede, tale che anche il teologo americano Harvey Cox può affermare nel suo bestseller, La città secolare</text:span><text:span text:style-name="T14"><text:note text:id="ftn4" text:note-class="footnote"><text:note-citation>4</text:note-citation><text:note-body><text:p text:style-name="P56">Harvey Cox, nel suo libro La <text:span text:style-name="T68">C</text:span>ittà <text:span text:style-name="T68">S</text:span>ecolare, esplora la trasformazione del ruolo della religione in una società moderna e urbanizzata. La 'morte di Dio' non è da intendersi letteralmente, ma piuttosto come un concetto che evidenzia un distacco dalla tradizionale autorità divina a favore di un'umanità più autonoma e centrata sulle proprie capacità. Questa deificazione dell'umanità potrebbe essere vista come una celebrazione del potenziale umano, ma anche come un rischio di perdere connessioni spirituali profonde.</text:p></text:note-body></text:note></text:span><text:span text:style-name="T14">, la morte di Dio e la deificazione dell’umanità, piuttosto che una divinità trascendente. Eppure, le statistiche parlano più delle dichiarazioni. Il coraggioso nuovo mondo dell’ortodossia Occidentale incarnata nel razionalismo scientifico e nell’umanesimo laico, può essere riuscito in qualche modo ad eliminare sia Dio che la religione dalla nostra coscienza immediata, ma non è riuscito ad eliminare la sofferenza umana, l’ingiustizia e la violenza. Infatti alcune delle peggiori guerre della storia umana sono state combattute sotto la bandiera di ideologie e dittatori secolari come Hitler e Mussolini. Alcuni sostengono che le speranze dell’Illuminismo morirono ad Auschwitz, il romanticismo del socialismo e </text:span><text:soft-page-break/><text:span text:style-name="T14">del comunismo morì durante la rivoluzione bolscevica del 1917, con la rivoluzione cinese e con l’occupazione russa dell’Afghanistan, mentre il fascino del capitalismo e della scienza morì nel corso delle due Guerre mondiali. Inoltre, le idee atee degli ultimi secoli hanno creato problemi più profondi e radicati, vale a dire il nichilismo e la mancanza di scopi, derubando l’uomo della grande forza e speranza che possono derivare da una visione religiosa. Queste questioni sono più illogiche e problematiche rispetto alla fede in Dio, nel disegno cosmico e in una vita ricca di scopi. </text:span><text:span text:style-name="T48">La ricerca di Dio è intrinseca alla natura umana, perché è la ricerca del senso, dei fini della nostra esistenza.</text:span><text:span text:style-name="T14"> Un’umanità divinizzata non rappresenta alcuna soluzione a questo anelito universale. La vera soluzione sta nel misterioso, ineffabile e trascendentale Altro che è la fonte di esistenza e la risposta definitiva al desiderio di significato dell’umanità. La vera soluzione alle sofferenze, all’ansia e al desiderio dell’umanità, si trova in una risposta adeguata a questa fonte trascendentale dell’essere, piuttosto che nel preoccuparsi della Sua essenza o semplicemente nel credere nella Sua esistenza</text:span><text:span text:style-name="T14"><text:note text:id="ftn5" text:note-class="footnote"><text:note-citation>5</text:note-citation><text:note-body><text:p text:style-name="P57">È interessante come questa prospettiva sottolinei l'importanza di una connessione autentica con la fonte trascendentale dell'essere, piuttosto che limitarsi a un approccio puramente teorico o dogmatico. Questo suggerisce che il significato e la pace possono essere trovati non tanto nella comprensione intellettuale o nella mera credenza, ma nel rispondere attivamente e personalmente a ciò che è divino, <text:span text:style-name="T69">con la:</text:span></text:p><text:p text:style-name="P57">Meditazione e Contemplazione: Praticare la meditazione profonda o la contemplazione, dedicando tempo a connettersi con la dimensione trascendentale. Questo potrebbe implicare un senso di apertura, silenzio interiore e ascolto di ciò che è oltre l’immediato.</text:p><text:p text:style-name="P57">Vita Etica: Vivere in armonia con valori come l’amore, la compassione, la giustizia e l’umiltà. Rispondere alla trascendenza può significare agire in modo che la propria vita sia un riflesso della bontà e della verità percepita.</text:p><text:p text:style-name="P57">Preghiera: Una preghiera sincera che non si limiti a richieste, ma che sia un riconoscimento e una lode di ciò che si considera divino o trascendente.</text:p><text:p text:style-name="P57">Servizio agli Altri: Aiutare gli altri, specialmente i più vulnerabili, come espressione concreta dell’amore e del rispetto per la sacralità della vita. Questo è spesso considerato una risposta potente e concreta alla trascendenza.</text:p><text:p text:style-name="P57">Ricerca della Bellezza e della Verità: Attraverso l'arte, la scienza o la filosofia, cercare di scoprire o creare qualcosa che rifletta un ordine trascendente o una bellezza superiore. </text:p></text:note-body></text:note></text:span><text:span text:style-name="T14">. La religione è un’esperienza profondamente </text:span><text:soft-page-break/><text:span text:style-name="T14">soggettiva, e così Dio viene conosciuto, non attraverso un calcolo, ma tramite sentimenti e comunicazione interiori.</text:span></text:p>
      <text:p text:style-name="P28">Questo tipo di risposta richiede il coinvolgimento della totalità del nostro essere, una serie di esercizi spirituali e uno stile di vita pio, dedicato, disciplinato e morale. Ed è proprio questo stile di vita compassionevole, che permetterà all’umanità di liberarsi delle catene dell’egoismo, dell’avidità, dell’ego e dell’identità ristretta, per riflettere la vera unità di Dio Onnipotente, promuovendo l’unità di umanità, esistenza e cosmo.</text:p>
      <text:p text:style-name="P30"><text:soft-page-break/><text:span text:style-name="T70">In un mondo di violenza e di ingiustizia, in gran parte perpetrati in nome di Dio, forse la via da seguire è quella di arrivare a riconoscere il livello in cui noi esseri umani abbiamo ricreato, per millenni, Dio nella nostra immagine e permettere che questo ci motivi a lavorare per riportare il rapporto umano/divino alla corretta collocazione.</text:span> Questo non accadrà senza prima capire come siamo arrivati <text:s text:c="2"/>al punto in cui siamo oggi. In sintesi, è l’opinione di questo autore che il desiderio postmoderno e post-secolare per Dio non potrà essere soddisfatto da antichi concetti antropomorfici e corporei del Divino, che hanno semplicemente abbassato Dio fino a questo cosmo, con una precisa funzione storica e una posizione specifica, riducendoLo a un dio minuscolo, e portando l’anima a sminuire il grande senso di stupore e riverenza che si dovrebbe provare e che dovremmo sentire alla menzione di Lui.</text:p>
      <text:h text:style-name="Heading_20_3" text:outline-level="3"><text:bookmark-start text:name="__RefHeading___Toc6002_2708660065"/>Primo Capitolo<text:bookmark-end text:name="__RefHeading___Toc6002_2708660065"/></text:h>
      <text:p text:style-name="P54">Il problema dell’antropomorfismo e la definizione delle categorie.</text:p>
      <text:p text:style-name="P31">Il secolarismo, il materialismo filosofico, l’agnosticismo e l’ateismo palese hanno confuso il paesaggio religioso del XXI secolo, al punto che i credenti devotamente religiosi sono divenuti una piccola minoranza. Il futuro <text:soft-page-break/>della fede occidentale è triste mentre le nazioni subiscono il processo di secolarizzazione. Questa morte di fede e di Dio è il culmine di un discorso vecchio di secoli del teismo in generale e del giudaismo e cristianesimo in particolare relativo al 'Dio trascendente.'</text:p>
      <text:p text:style-name="P83"><text:span text:style-name="T14">Per secoli, filosofi, intellettuali e scienziati hanno sostenuto che la concezione teistica di Dio</text:span><text:span text:style-name="T14"><text:note text:id="ftn6" text:note-class="footnote"><text:note-citation>6</text:note-citation><text:note-body><text:p text:style-name="P56"><text:span text:style-name="T71">I</text:span>l teismo concepisce Dio come personale, presente e attivo nel governo e nell'organizzazione del mondo e dell'universo; descrive così la concezione classica di Dio che si trova nel cristianesimo, nell'ebraismo, nell'islam, nel sikhismo e nell'induismo. </text:p></text:note-body></text:note></text:span><text:span text:style-name="T14"> è troppo antropomorfica, primitiva, confusa e complicata e che il Dio trascendentale e le sue istituzioni sono diventati irrilevanti per l’uomo e per ciò che lo circonda. L’appello alla 'morte di Dio' venne considerato necessario per liberare l’uomo dalle restrizioni imposte su di lui dalla religione e dalle cosiddette interpretazioni dell’uomo e dell’universo, imposte in nome di Dio sui prodotti scientifici e culturali degli uomini. Questo punto di vista considerava gli esseri umani come autonomi, creatori illimitati della loro cultura e destino. A sottolinearlo è il presupposto che Dio sia sorto nella coscienza primitiva attraverso le paure e le aspirazioni dell’uomo che vennero proiettate nel cosmo a modellare una divinità o delle divinità che lo avrebbero protetto. Costrittiva per </text:span><text:soft-page-break/><text:span text:style-name="T14">la sua semplicità, questa visione non può tuttavia spiegare come la fede in Dio sia cresciuta esponenzialmente con la crescita dell’uomo nella conoscenza ed intelligenza, da culture e civiltà primitive a culture e civiltà sofisticate, come tale la religione è tanto un esercizio intellettuale quanto si suppone che non lo sia. Tuttavia </text:span><text:span text:style-name="T48">viene ampiamente propagandato che scienza e filosofia hanno rimosso il bisogno di Dio nella cultura e nell’attività umana. In altre parole, oggi il Dio che veniva adorato come il Creatore dell’universo non è più accettato come il creatore dell’uomo e di ciò che lo circonda. Invece, è l’uomo che, ci viene costantemente detto, ha creato Dio a sua immagine. Teorie di proiezione o affermazioni circa le origini umane di nozioni relative al divino non sono recenti. </text:span><text:span text:style-name="T14">Possono essere fatte risalire al poeta filosofo greco Senofane</text:span><text:span text:style-name="T14"><text:note text:id="ftn7" text:note-class="footnote"><text:note-citation>7</text:note-citation><text:note-body><text:p text:style-name="P58">Senofane di Colofone, uno dei primi filosofi presocratici, è spesso citato come precursore delle teorie di proiezione. È noto per la sua critica delle concezioni antropomorfiche degli dèi nella religione greca antica. Egli affermava che gli uomini tendono a creare le proprie divinità a immagine e somiglianza di se stessi. Ad esempio, sottolineava ironicamente che se i cavalli e i buoi avessero mani per dipingere, raffigurerebbero i loro dèi simili a cavalli e buoi.</text:p><text:p text:style-name="P58"><text:tab/>Questa intuizione ha influenzato numerosi pensatori successivi, tra cui Feuerbach e Freud, che hanno sviluppato teorie più moderne sulla proiezione delle idee umane nel divino. Le osservazioni di Senofane, pur nella loro semplicità, sono estremamente profonde e continuano a stimolare riflessioni filosofiche e religiose.</text:p></text:note-body></text:note></text:span><text:span text:style-name="T14"> (570-470 a.C.), circa seicento anni prima di </text:span><text:soft-page-break/><text:span text:style-name="T14">Gesù Cristo. E’ anche stato a lungo sostenuto che religioni e divinità derivano da desideri e tentativi dell’uomo di spiegare e controllare l’ambiente naturale che lo circonda ed i suoi inquietanti e sconcertanti fenomeni. Nel XV secolo, Francis Bacon (1561-1626) osservò che la comprensione umana si basava su cause che riguardavano 'chiaramente la natura dell’uomo piuttosto che la natura dell’universo.' Queste significative osservazioni sono tratti distintivi di una nuova era: l’era della scienza. Bacone sosteneva che l’uomo antropomorfizza.</text:span></text:p>
      <text:p text:style-name="P29">1- La scienza e l’empirismo richiedevano la de-antropomorfizzazione dei processi del pensiero umano. Nel sedicesimo secolo, lo scrittore francese Bernard Fontenelle (1657-1757) propose un impianto evolutivo universale per lo sviluppo del pensiero e della cultura umana. Egli sosteneva che gli esseri umani hanno spiegato l’invisibile e l’ignoto con quello che avevano visto e conosciuto. Forze naturali che sfuggono al controllo umano hanno portato le persone a immaginare degli esseri che erano più potenti degli esseri umani e che avrebbero potuto influenzare significativamente la vita e il destino umano.</text:p>
      <text:p text:style-name="P82"><text:span text:style-name="T14">2- La diversità delle forze naturali spiega la moltitudine di divinità primitive. Questi dèi erano antropomorfi in </text:span><text:soft-page-break/><text:span text:style-name="T14">natura, essendo i prodotti di pensieri e circostanze umane. La natura, le qualità e gli attributi delle divinità cambiavano assieme ai modelli di pensiero e culture umane. I popoli primitivi ascrivevano attributi rudimentali alle loro divinità come corpi fisici, attributi corporei e grezze qualità antropomorfe. I gruppi istruiti e più sofisticati descrivevano gli dei in forme e categorie più sviluppate come l’amore, la compassione, l’esistenza spirituale e categorie trascendentali. La concezione di un dio o di più dei in una certa società, riflette la cultura e la raffinatezza della società stessa. David Hume (1711-1776), aprì la strada a questo tipo di approccio nei nostri tempi moderni. Dette un resoconto più dettagliato della natura antropomorfica del divino. Secondo Hume, le nozioni sul divino non nascevano dalla ragione, ma dalle incertezze naturali della vita e dalla paura del futuro. Guardando all’idea di Dio in termini evolutivi, Hume respinse la teoria di un monoteismo originale e ritenne che la prima forma di religione fosse stata l’idolatria o il politeismo. Per Hume, l’origine dell’idea di Dio si ebbe quando l’uomo personificò le sue speranze e paure nell’universo, per poi adorare degli dei creati a sua immagine</text:span><text:span text:style-name="T14"><text:note text:id="ftn8" text:note-class="footnote"><text:note-citation>8</text:note-citation><text:note-body><text:p text:style-name="P59">David Hume è un riferimento cruciale in questo contesto! Con il suo approccio empirico e la sua analisi critica delle idee religiose, Hume suggerì che le credenze in Dio sono spesso modellate dall'esperienza umana e dalla cultura. Nel suo Dialoghi sulla religione naturale, egli esplora come le nozioni di divinità siano influenzate dalle esigenze psicologiche e sociali delle persone. Inoltre, evidenzia il modo in cui le concezioni religiose possono variare significativamente tra le diverse culture, mostrando la loro natura legata al contesto storico e sociale.</text:p><text:p text:style-name="P59"><text:tab/>Il confronto tra le idee di David Hume e quelle di altri filosofi sulla religione mette in evidenza approcci molto diversi al tema, spesso dipendenti dalla loro visione del mondo e dai loro metodi filosofici. Ecco alcuni esempi significativi:</text:p><text:p text:style-name="P60"><text:span text:style-name="T66"><text:tab/>* </text:span>Hume vs. Agostino: Mentre Hume si concentra su un'analisi empirica e scettica delle credenze religiose, Sant'Agostino vede la fede come un atto essenziale per comprendere la verità divina. Per Agostino, la ragione e la fede si completano a vicenda, mentre Hume è profondamente scettico riguardo alla possibilità che la ragione possa dimostrare l'esistenza di Dio.</text:p><text:p text:style-name="P60"><text:tab/><text:span text:style-name="T66">*</text:span> Hume vs. Tommaso d'Aquino: Tommaso d'Aquino sviluppa le famose 'cinque vie' per dimostrare razionalmente l'esistenza di Dio. Hume, al contrario, critica severamente la validità di tali argomenti, in particolare del cosiddetto argomento cosmologico e teleologico, evidenziandone i limiti logici e dipendenti dalle esperienze umane.</text:p><text:p text:style-name="P60"><text:tab/><text:span text:style-name="T66">*</text:span> Hume vs. Pascal: Blaise Pascal, pur ammettendo che l'esistenza di Dio non possa essere dimostrata logicamente, sviluppa la celebre 'scommessa' come approccio pratico alla fede. Hume, invece, potrebbe trovare problematica questa strategia, poiché considera la fede basata su ragioni pragmatiche come una sorta di debolezza del pensiero critico.</text:p><text:p text:style-name="P60"><text:tab/><text:span text:style-name="T66">* </text:span>Hume vs. Kant: Immanuel Kant distingue tra il 'Dio dei filosofi' e il 'Dio della fede'. Come Hume, Kant critica l'idea che la ragione possa dimostrare l'esistenza di Dio, ma propone un approccio diverso: vede il concetto di Dio come un'esigenza morale piuttosto che metafisica, qualcosa che Hume non sviluppa nel suo pensiero.</text:p><text:p text:style-name="P61"><text:tab/><text:span text:style-name="T66">* </text:span>Hume vs. Feuerbach: Feuerbach, come Hume, ritiene che il concetto di Dio sia una proiezione dell'essere umano, ma lo interpreta in termini più sociologici e psicologici, come un riflesso delle aspirazioni e dei bisogni umani. Hume, invece, resta più ancorato all'analisi scettica e storica delle credenze.</text:p><text:p text:style-name="P127"><text:line-break/><text:line-break/><text:line-break/><text:line-break/><text:line-break/></text:p></text:note-body></text:note></text:span><text:span text:style-name="T14">.</text:span></text:p>
      <text:p text:style-name="P82"><text:soft-page-break/><text:span text:style-name="T14">3- Questa tendenza antropomorfica a modellare tutti i poteri sconosciuti nelle nostre categorie umane familiari è la fonte fondamentale della nostra fede nel divino. L’analisi di Humes guida e serve come punto di riferimento per molti studiosi moderni di filosofia </text:span><text:soft-page-break/><text:span text:style-name="T14">religiosa e sociologia che condividono le sue ipotesi: Auguste Comte, Ludwig Feuerbach, Edward Tylor, Sigmund Freud, Thomas De Quincy, Robert Browning, Matthew Arnold, Gerard Manley Hopkins, Emily Brontë, Jean-Paul Sartre, Maurice Merleau-Ponty, Albert Camus, A. J. Ayer, e E. D. Klemke.</text:span></text:p>
      <text:p text:style-name="P84"><text:span text:style-name="T14">Feuerbach per esempi</text:span><text:span text:style-name="T19">o</text:span><text:span text:style-name="T14"> sosteneva che, 'La teologia è l’antropologia ... l’oggetto della religione, che in greco si chiama theos e nella nostra lingua Dio, esprime null’altro che l’essenza divinizzata dell’uomo, in modo che la storia della religione ...non è altro che la storia dell’uomo.' </text:span></text:p>
      <text:p text:style-name="P32">4- La sua famosa affermazione che 'il Dio dell'uomo è l'Uomo' è il cuore della sua teoria secondo cui le religioni tradizionali sono una proiezione dei desideri e delle aspirazioni umane. Per Feuerbach, credere in Dio equivaleva a proiettare qualità umane come amore, <text:soft-page-break/>giustizia e saggezza in un essere esterno, dimenticando che queste qualità appartengono all'uomo stesso. La religione tradizionale non è altro che l’oppio dei popoli e deve essere distrutta per risvegliare il popolo dal suo sonno profondo. La scienza potrebbe farlo. Nel XIX secolo, Charles Darwin promosse la sua teoria della selezione naturale, rifiutando la visione tradizionale teistica di Dio come Creatore e Progettista e della natura come manifestazione di intenti, di progetto, e immutabilità.</text:p>
      <text:p text:style-name="P85"><text:span text:style-name="T14">5- La metafisica biblica era basata sul concetto di un Dio amorevole che aveva creato l’uomo nella sua unicità. La visione cristiana del mondo ruotava intorno al concetto di caduta della natura umana, dell’intervento divino attraverso un sacrificio espiatorio, e della redenzione derivante attraverso la crocifissione e la resurrezione di Gesù. La visione del mondo di Darwin e l’interpretazione della natura come autonoma, auto-governantesi ed evoluzionista, minò la visione del mondo cristiano tradizionale più delle rivoluzioni scientifiche di Copernico, Galileo e Newton. </text:span><text:span text:style-name="T48">Le teorie di Darwin sfidarono ed effettivamente scossero le fondamenta della metafisica cristiana.</text:span><text:span text:style-name="T14"> </text:span><text:span text:style-name="T48">Con l’evoluzionismo di Darwin, ogni esigenza di un Dio che fosse fonte originale della creazione e unico regolatore di questo universo cessò di </text:span><text:soft-page-break/><text:span text:style-name="T48">esistere.</text:span><text:span text:style-name="T14"> Se la creazione si era evoluta naturalmente dalle sue origini primitive ed è in continua evoluzione attraverso il processo di selezione naturale senza alcun intervento divino esterno, allora venne naturalmente dedotto che non ha bisogno di Dio per la sua esistenza, sostentamento e continuità. Nonostante l’opposizione delle istituzioni religiose, la teoria evoluzionistica diventò il principio guida in tutte le discipline più importanti del XIX secolo. Di conseguenza, </text:span><text:span text:style-name="T48">scienziati empirici, antropologi, filologi, psicologi, sociologi e naturalisti del XIX secolo non hanno cercato Dio nei cieli, né oltre questa sfera materialista. Lo hanno cercato qui nel loro mondo: nella natura, nell’anima umana, nella psiche, o nella società umana. Tutti loro, quasi all’unanimità, sono stati in grado di localizzarlo nell’esperienza umana: cioè, nel processo mentale con cui l’uomo acquisisce idee ed è influenzato dalle sue emozioni. </text:span><text:span text:style-name="T14">Supponendo che l’idea del divino abbia avuto origine nel mondo degli uomini, molti studiosi svolsero ricerche approfondite per individuare l’origine esatta dell’idea di Dio e della religione. </text:span><text:span text:style-name="T48">Anche se alcuni, come padre Wilhelm Schmidt usarono i risultati delle loro ricerche per dimostrare che la religione primitiva aveva avuto inizio ovunque con un concetto essenzialmente monoteistico di Dio, erano comunque in minoranza.</text:span><text:span text:style-name="T14"> </text:span><text:span text:style-name="T48">La </text:span><text:soft-page-break/><text:span text:style-name="T48">grande maggioranza degli antropologi, psicologi, sociologi, ed anche alcuni cosiddetti teologi sosteneva che le origini della religione risiedessero nelle forme semplici delle culture primitive, nell’animismo, nel feticismo, e nel totemismo, affermando che queste si sono sviluppate a loro volta in forme più elevate di religione, come il politeismo, la monolatria, il monoteismo, e infine il monoteismo etico delle religioni moderne come l’Ebraismo, il Cristianesimo e l’Islam che oggi comprendono la maggior parte dei fedeli.</text:span></text:p>
      <text:p text:style-name="P33">Nonostante le loro differenze, erano in gran parte d’accordo su un punto: Dio non ha una realtà oggettiva di per Sé. La Sua esistenza dipende da bisogni, aspirazioni e timori umani. Asserivano che la parola 'Dio' era soltanto una reificazione, personificazione o proiezione di forze presenti nel mondo esterno, interno e sociale dell’uomo.</text:p>
      <text:p text:style-name="P34">In altre parole il discorso su Dio è fondamentalmente un discorso sull’uomo o, nelle parole di Feuerbach, e come discusso in precedenza, 'Teologia è antropologia.' L’antropologo Claude Lévi-Strauss ha sostenuto che 'la religione consiste in una umanizzazione delle leggi naturali' e in un’ 'antropomorfizzazione della natura.'</text:p>
      <text:p text:style-name="P33">6- Secondo Stewart Guthrie, un’antropologo contemporaneo, ' la religione è antropomorfismo.'</text:p>
      <text:p text:style-name="P86"><text:soft-page-break/><text:span text:style-name="T14">7- Alla luce di queste osservazioni, e quando si esaminano le tradizioni di fede più note nel mondo, vediamo che l’antropomorfismo è presente nelle scritture di quasi tutte le tradizioni religiose con gradi che variano. I teologi della maggior parte di queste tradizioni cercano invano di eliminare l’antropomorfismo dalle loro scritture, ma molto spesso il testo scritturale rifiuta tale elaborazione. Dato che è impossibile discutere di tutte le tradizioni religiose nell’ambito di questo lavoro dalla portata limitata, limitiamo le nostre osservazioni alle tre religioni semitiche</text:span><text:span text:style-name="T14"><text:note text:id="ftn9" text:note-class="footnote"><text:note-citation>9</text:note-citation><text:note-body><text:p text:style-name="P56">Le religioni semitiche includono l'Ebraismo, il Cristianesimo e l'Islam. Queste religioni sono praticate dai popoli semitici del Vicino Oriente e del nord dell'Africa. Il termine 'semitico' deriva da Sem, un personaggio biblico figlio di Noè, e i suoi discendenti sono tutte le popolazioni semitiche.</text:p></text:note-body></text:note></text:span><text:span text:style-name="T14"> sviluppate che rimandano la loro origine alle fedi abramitiche: Ebraismo, Cristianesimo e Islam. Nella Bibbia ebraica o Vecchio Testamento, Dio è mostrato mentre manifesta qualità umane, sia mentali che fisiche, come si addice alla sua affermazione di fare 'l’uomo a nostra immagine e somiglianza.' Nel Nuovo Testamento Gli viene data una forma del tutto umana, l’incarnazione divina di Gesù. Nonostante i molti sforzi </text:span><text:span text:style-name="T20">attuati di comune intesa </text:span><text:span text:style-name="T14">di alcuni studiosi ebrei e Padri della Chiesa per arginare ciò, il concetto di un Dio </text:span><text:soft-page-break/><text:span text:style-name="T14">fisicamente simile all’uomo ha persistito in entrambe le tradizioni. Il Corano è l’unica Scrittura che ha costantemente e coerentemente scongiurato questa tendenza e salvaguardato la divinità da rozze categorie antropomorfe e corporee, ma la lotta è ormai cronica tra alcune sette musulmane, anche se non è così spietata come nell’ebraismo e nel cristianesimo. D’altra parte, la religione in quanto tale, con una comprensione antropomorfica di Dio, è stata criticata e confutata da molti studiosi, filosofi e scienziati dei tempi moderni. Oltre a sviluppi scientifici o a metafisiche scientifiche</text:span><text:span text:style-name="T14"><text:note text:id="ftn10" text:note-class="footnote"><text:note-citation>10</text:note-citation><text:note-body><text:p text:style-name="P128">Teorie filosofiche che si interrogano sulle questioni dell’esistenza, come l’origine dell’universo, la natura della coscienza e il significato della vita.</text:p></text:note-body></text:note></text:span><text:span text:style-name="T14">, e ad una interpretazione meccanica della natura, una tale apatia verso la religione, come accennato in precedenza, può in parte essere attribuita alla natura sovra-antropomorfica delle nozioni teistiche di Dio, soprattutto nel caso dell’Ebraismo e del Cristianesimo. L’uomo secolare non ha bisogno di un Dio antropomorfo e dall’aspetto umano limitato in ogni cosa, e vuole trovare le proprie soluzioni nel mondo. Egli è felice di vivere senza un Dio così limitato. Eppure, a causa di tutto questo, c’è un forte senso di alienazione, isolamento, soggettivismo, relativismo e nichilismo nell’uomo moderno. Ed anche, e più </text:span><text:soft-page-break/><text:span text:style-name="T14">inquietante, secondo le parole di Dostoievskij: « Se Dio non esiste, allora tutto è permesso</text:span><text:span text:style-name="T14"><text:note text:id="ftn11" text:note-class="footnote"><text:note-citation>11</text:note-citation><text:note-body><text:p text:style-name="P56">Ivan <text:span text:style-name="T72">(Fratelli Karamazov) </text:span><text:s/>il fratello intellettuale e scettico, sostiene che senza Dio e senza una vita ultraterrena, non esiste un fondamento assoluto per la morale, e quindi tutto diventa lecito. Il romanzo esplora profondamente il conflitto tra fede e razionalismo, tra libertà e responsabilità morale. Dostoevskij usa Ivan per rappresentare il nichilismo e il materialismo, contrapponendolo ad altri personaggi che incarnano la fede e la spiritualità. La frase è diventata un punto di riferimento per molte discussioni filosofiche e teologiche sulla morale e sull'esistenza di Dio.</text:p></text:note-body></text:note></text:span><text:span text:style-name="T14"> </text:span><text:span text:style-name="T55">»</text:span></text:p>
      <text:p text:style-name="P35">8- I valori religiosi attualmente non sono vincolanti, in generale. I valori morali non sono assoluti, ma piuttosto relativi. Essi stanno scomparendo, almeno negli Stati Uniti e in Europa, con una rapidità senza precedenti, mentre i valori della famiglia sono in diminuzione nella maggior parte del mondo evoluto. </text:p>
      <text:p text:style-name="P87"><text:span text:style-name="T14">9- Inoltre essere religiosi e morali nell’America o nell’Europa contemporanea è sostanzialmente diverso dalla consuetudine di circa vent’anni fa. Molti dogmi cristiani, come la Trinità, l’Incarnazione, e il peccato originale, così come i valori morali come la decenza sessuale, la protezione della vita e la dignità della famiglia sono spesso compromessi, o interpretati in modo tale da diventare qualcosa di completamente diverso. L’idea moderna di Dio non incute un timore simile a quello che incuteva nei secoli passati. L’uomo </text:span><text:soft-page-break/><text:span text:style-name="T14">moderno ha preso le distanze dal Dio trascendente del teismo. Persone consapevoli di Dio esistono nel mondo, ma la maggior parte del genere umano presenta il quadro esatto di ciò che dice il Corano: 'Non siate come quelli che dimenticano Dio; Dio fa sì che essi dimentichino le loro anime. Quelli sono i perversi' (Il Corano sura 59, versetto 19). Ciò che è stato discusso in precedenza allude a due accuse distinte contro la comprensione teistica di Dio. La prima è l’antropomorfismo. Queste accuse non significano la totale negazione dell’esistenza di Dio, ma che qualsiasi descrizione materiale di Dio, come i sostenitori di questa accusa contro la religione asserirebbero, è condizionata e derivata dalla comprensione che l’uomo ha della propria natura. Quelli che, da Senofane</text:span><text:span text:style-name="T14"><text:note text:id="ftn12" text:note-class="footnote"><text:note-citation>12</text:note-citation><text:note-body><text:p text:style-name="P129">Secondo Aristotele, Senofane (570 a.C.- 475<text:span text:style-name="T73">a</text:span>.C) affermò che Dio è ingenerato e incorruttibile, essendo impossibile il transito dal nulla all’essere e dall’essere al nulla. Per le stesse ragioni dell’essere parmenideo, Egli è indivisibile, identicamente e uniformemente uno, eterno, immobile e unico, essere perfetto e supremo.</text:p></text:note-body></text:note></text:span><text:span text:style-name="T14">, hanno insistito con questa accusa, hanno sostenuto che Dio trascende questo mondo materiale ed è l’unico diverso dagli esseri umani; di conseguenza, ogni descrizione di Dio in termini di natura umana, non importa quanto solidamente qualificata, altererà la Sua perfezione e sarà addirittura peggiore della mancanza </text:span><text:soft-page-break/><text:span text:style-name="T14">di una Sua descrizione. L’altra accusa è quella di ‘invenzione.’ I sostenitori di questa accusa sostengono che Dio è immaginario, senza esistenza reale. Egli dipende ontologicamente dagli esseri umani poiché sono loro ad idearlo tramite una proiezione cosmica della loro natura, caratteristiche e qualità. Stewart Guthrie osserva che le persone, che dicono che la religione antropomorfizza, di solito intendono dire che attribuisce caratteristiche umane a divinità, o che nel rivendicare che esistono gli dèi, attribuisce caratteristiche umane alla natura. Nel primo senso, la religione rende gli dèi simili agli esseri umani accreditandogli la capacità di agire simbolicamente. Nel secondo caso, la religione rende la natura simile agli uomini vedendo lì delle divinità. Per capire la profondità e la realtà della questione abbiamo bisogno di definire i termini chiave relativi come antropomorfismo e trascendenza.</text:span></text:p>
      <text:h text:style-name="Heading_20_4" text:outline-level="4"><text:bookmark-start text:name="__RefHeading___Toc6004_2708660065"/>Antropomorfismo<text:bookmark-end text:name="__RefHeading___Toc6004_2708660065"/></text:h>
      <text:p text:style-name="P88"><text:span text:style-name="T14">L’antropomorfismo deriva dal greco </text:span><text:span text:style-name="T47">anthropos</text:span><text:span text:style-name="T14"> (essere umano) e </text:span><text:span text:style-name="T47">morphe</text:span><text:span text:style-name="T14"> (forma). Come termine è relativamente moderno ed è stato sviluppato nel XVIII secolo. Una definizione generale di antropomorfismo potrebbe essere: una tendenza inveterata nel proiettare </text:span><text:soft-page-break/><text:span text:style-name="T14">qualità umane in fenomeni naturali, consapevolmente o meno, oppure la descrizione di entità ‘spirituali’ non materiali, in forme fisiche e specificamente forme umane. Utilizzato nel suo senso religioso, il termine indica una tendenza umana universale a sperimentare, esprimere e ricorrere al divino in forme o categorie umane. L’antropomorfismo può denotare l’attribuzione a Dio di una forma umana o di membro dell’umanità. Scienziati e studiosi empirici, nei loro sforzi per limitare l’area d’influenza di Dio e della religione, e di conseguenza l’influenza della Chiesa e delle sue interpretazioni dell’uomo e di ciò che lo circonda, promossero l’accusa di un eccessivo immaginario visivo o di antropomorfismo fisico, estendendola a tutti gli aspetti di Dio ritenuti assimilabili a quelli degli esseri umani. L’accusa di antropomorfismo fu ripetuta con tale forza che divenne una caccia alle streghe virtuale a qualsiasi qualità o attributo divino, non importava quanto fosse morale o spirituale, se legata al regno umano veniva definita come puro antropomorfismo. Spinta oltre ogni limite, l’accusa perse ogni significato credibile, privata del suo contesto reale finendo per diventare semplicemente un termine di rimprovero o un veicolo per l’espressione di avversione.</text:span></text:p>
      <text:h text:style-name="Heading_20_4" text:outline-level="4"><text:bookmark-start text:name="__RefHeading___Toc6006_2708660065"/><text:soft-page-break/>Incarnazione<text:bookmark-end text:name="__RefHeading___Toc6006_2708660065"/></text:h>
      <text:p text:style-name="P36">L’incarnazione è una specie di antropomorfismo, in cui Dio può essere descritto in categorie e forme umane senza risultare all’interno della rappresentazione di un essere umano 'a nostra immagine e somiglianza.' Ma il termine 'incarnazione' allude specificamente alla rappresentazione di un essere umano come vera immagine di Dio. Jacob Neusner definisce l’incarnazione come: 'La rappresentazione di Dio nella carne, come un essere corporeo, consustanziale in emozioni e virtù con gli esseri umani, condividendo i modi e i mezzi usati dai mortali.'</text:p>
      <text:p text:style-name="P88"><text:span text:style-name="T14">10- La dottrina cristiana di Gesù come Dio e uomo completo allo stesso tempo, rappresenta il culmine dell’incarnazione e di conseguenza della corporeità e dell’antropomorfismo, anche se molti teologi cristiani sostengono il contrario. Se Dio può pienamente incarnarsi in una persona storica e provare i limiti umani fino al punto estremo di una morte dolorosa, allora abbiamo di fronte a noi l’apice della corporeità. </text:span><text:span text:style-name="T48">Questa nozione di morte di Dio sofferente ha apparentemente contribuito alla teologia della morte di Dio e ha sottolineato la Sua irrilevanza nelle cultura e nelle società moderne. Il ragionamento è chiaro. Un Dio </text:span><text:soft-page-break/><text:span text:style-name="T48">che abbandona Gesù sulla croce è un Dio di cui l’uomo moderno non si fida più.</text:span><text:span text:style-name="T14"> </text:span><text:span text:style-name="T48">Quali garanzie ha l’uomo che questo stesso Dio non lo abbandonerà quando l’uomo avrà più bisogno di lui?</text:span></text:p>
      <text:p text:style-name="P89"><text:span text:style-name="T48">Un Dio che non riesce a perdonare il semplice errore di mangiare una mela proibita e per secoli tortura miliardi di uomini, donne e bambini innocenti nel fuoco dell’inferno fino a che non sia compiuta l’espiazione attraverso il violento spargimento di sangue di un uomo giusto innocente, Gesù, è un Dio verso cui l’uomo moderno nutre seri dubbi, soprattutto per quanto riguarda la Sua giustizia, misericordia, amore per la natura e fondatezza.</text:span><text:span text:style-name="T14"> </text:span><text:span text:style-name="T48">Un Dio che non è in grado di eliminare o anche di sottomettere il peccato, nonostante questa espiazione di sangue attraverso la croce, è un Dio che diventa irrilevante per la cultura moderna del pragmatismo, del relativismo e del positivismo logico</text:span><text:span text:style-name="T48"><text:note text:id="ftn13" text:note-class="footnote"><text:note-citation>13</text:note-citation><text:note-body><text:p text:style-name="P56">La cultura moderna è fortemente influenzata da tre correnti filosofiche: il pragmatismo, il relativismo e il positivismo. Ognuna di queste scuole di pensiero ha plasmato il modo in cui le società contemporanee affrontano la conoscenza, la morale e il progresso scientifico.</text:p><text:p text:style-name="P62">Pragmatismo: si concentra sull'utilità pratica delle idee e delle azioni. Secondo questa prospettiva, la verità non è assoluta, ma dipende dalla sua efficacia nel risolvere problemi concreti. Personaggi chiave del pragmatismo sono filosofi come William James e John Dewey, che hanno enfatizzato l'esperienza e la sperimentazione nel determinare ciò che è "vero".</text:p><text:p text:style-name="P62">Relativismo: sostiene che la verità e la moralità non siano universali, ma dipendano dal contesto culturale e dalle prospettive individuali. In un mondo globalizzato, il relativismo è spesso invocato per giustificare la diversità di valori e credenze. Tuttavia, critici sostengono che questa visione possa portare a una mancanza di punti fissi per giudicare le azioni e le norme sociali.</text:p><text:p text:style-name="P62">Positivismo: ha origine con Auguste Comte e pone l'accento sul metodo scientifico come unica fonte valida di conoscenza. Secondo il positivismo, le spiegazioni empiriche e razionali sono superiori alle credenze metafisiche o religiose. Questa prospettiva ha dominato la filosofia della scienza e ha contribuito allo sviluppo del metodo sperimentale nella ricerca moderna.<text:tab/></text:p></text:note-body></text:note></text:span><text:span text:style-name="T48">. Un tale Dio non ha senso ed è </text:span><text:soft-page-break/><text:span text:style-name="T48">troppo misterioso, paradossale e antropomorfo. In un certo senso la morte di Dio nelle menti era già inevitabile quando il tentativo fisico effettuato dai Romani di uccidere Gesù ebbe luogo, Gesù è visto come Dio incarnato.</text:span><text:span text:style-name="T14"> In breve, l’umanizzazione del divino ha ironicamente portato alla divinizzazione dell’umano. Avendo abbandonato le nozioni del Divino, l’uomo deve trovare le proprie soluzioni tramite la sua conoscenza e le sue istituzioni senza cercare assistenza o indicazioni in regni trascendentali. Il vecchio disorientamento cognitivo dell’implorare Dio nei momenti di necessità deve essere accantonato in favore di soluzioni fornite dalla scienza e dalla tecnologia.</text:span></text:p>
      <text:h text:style-name="Heading_20_4" text:outline-level="4"><text:bookmark-start text:name="__RefHeading___Toc6008_2708660065"/>Trascendenza<text:bookmark-end text:name="__RefHeading___Toc6008_2708660065"/></text:h>
      <text:p text:style-name="P89"><text:span text:style-name="T14">La trascendenza, è il termine più comunemente usato per intendere la continua guida provvidenziale di Dio e </text:span><text:soft-page-break/><text:span text:style-name="T14">l’indipendenza di questo mondo materiale, enfatizzando la Sua separazione da questo mondo e la Sua elevazione al di sopra di esso. La trascendenza è l’attributo più significativo tra tutti gli attributi divini, poiché lo stato ultraterreno e supernaturale della divinità poggiano su di esso. Dio è al di là di questa sfera utilitaristica del tempo e dello spazio, in quanto Egli è il Creatore di questo cosmo spazio-temporale. Inoltre, il termine trascendenza denota che Dio stesso e le nozioni sulla Sua esistenza, Assolutezza, Potenza, ed Autorità non sono concetti creati umanamente; pertanto, non possono essere presentati come termini insignificanti e vuoti, come veniva concepito dagli empiristi. Al contrario, Dio e la Sua rivelazione sono le fonti fondamentali e la base del significato di questo mondo. L’etimologia della parola ‘trascendenza’ dimostra la sua origine dalla radice latina </text:span><text:span text:style-name="T45">scando</text:span><text:span text:style-name="T14"> che significa ‘mi arrampico’; quando vengono aggiunte a questa radice delle preposizioni come </text:span><text:span text:style-name="T45">as</text:span><text:span text:style-name="T14">, </text:span><text:span text:style-name="T45">de</text:span><text:span text:style-name="T14"> e </text:span><text:span text:style-name="T45">trans</text:span><text:span text:style-name="T14"> otteniamo parole come ‘salire,’ ‘scendere’ e ‘trascendere.’ Così, la parola ‘trascendere’ letteralmente prenderebbe come significati 'qualcosa è venuto fuori da qualcosa,' o qualcosa è 'salito al di sopra' e 'è andato al di là di' qualcosa. Questa definizione presuppone due cose: una differenza tra quello che trascende e ciò che è </text:span><text:soft-page-break/><text:span text:style-name="T14">trasceso. Si presuppone anche una relazione o attinenza tra loro. Come metafora, il termine trascendenza è stato utilizzato per trasmettere un certo numero di significati diversi anche se correlati, quindi, il significato preciso del termine in qualsiasi opera particolare sarebbe stato determinato dal contesto in cui viene utilizzato. In questa opera, il termine sarà utilizzato per Dio, per la Sua unicità e diversità, e per indicare il Suo modo unico di rapportarsi con il mondo, con la esclusione della corporeità. Dio trascende il mondo, non nel senso che Egli è fuori dal mondo, ma nel senso che 'Egli si erge sopra tutti gli esseri finiti' e 'non è uguale al regno finito né la sua potenza si esaurisce con esso.' Non è mai il non-essere come gli esseri finiti. Dio 'trascende la struttura,' le necessità indistruttibili, sia nel tempo che nello spazio, ed è libero rispetto a tutti loro.</text:span></text:p>
      <text:h text:style-name="Heading_20_4" text:outline-level="4"><text:bookmark-start text:name="__RefHeading___Toc6010_2708660065"/>Trascendenza: un’interpretazione filosofica<text:bookmark-end text:name="__RefHeading___Toc6010_2708660065"/></text:h>
      <text:p text:style-name="P37">Il concetto religioso di 'trascendenza' discusso in precedenza è diverso dall’interpretazione che ne fecero i filosofi<text:note text:id="ftn14" text:note-class="footnote"><text:note-citation>14</text:note-citation><text:note-body><text:p text:style-name="P56">La distinzione principale tra la trascendenza religiosa e quella filosofica pitagorico-platonica sta nel modo in cui viene concepita la relazione tra l'uomo e ciò che è "oltre" la sua esperienza immediata. <text:span text:style-name="T74">P</text:span>er i pitagorici e Platone, la trascendenza riguarda il mondo delle idee e dei numeri perfetti, che esiste indipendentemente dal mondo sensibile. Per Platone, le Idee (o Forme) sono le realtà autentiche e trascendenti, mentre il mondo materiale è solo una loro imitazione imperfetta. La conoscenza delle realtà trascendenti può essere raggiunta tramite la filosofia, la razionalità e la contemplazione. Diversamente dalla trascendenza religiosa, qui non c'è un Dio separato e onnipotente, ma un principio ordinatore dell'universo accessibile attraverso l'intelletto.</text:p></text:note-body></text:note>. Il loro concetto di trascendenza contrasta <text:soft-page-break/>nettamente con il loro concetto di immanenza divina. Nei loro sforzi per sottolineare l’unità e l’unicità di Dio e per purificare il Suo essere da tutti gli attributi o caratteristiche umane, si spingono fino ad eliminare l’intero rapporto con Lui, e in alcuni casi, la Sua diretta autorità su questo mondo della percezione. Questo concetto estremo di trascendenza, a partire dai pitagorici e dai platonici e che permea attraverso Filone e i Neoplatonici un gran numero di filosofi e teologi provenienti da tutte e tre le tradizioni, identifica Dio con quella fonte di realtà divina da cui tutte le altre realtà sono emanate consapevolmente o inconsapevolmente come la luce viene emanata dal sole.</text:p>
      <text:h text:style-name="Heading_20_4" text:outline-level="4"><text:bookmark-start text:name="__RefHeading___Toc6012_2708660065"/>Immanenza<text:bookmark-end text:name="__RefHeading___Toc6012_2708660065"/></text:h>
      <text:p text:style-name="P90"><text:span text:style-name="T14">Il termine ‘immanenza’ denota la presenza di Dio in questo mondo e si ritiene che si opponga direttamente al termine ‘trascendenza.’ ‘Immanenza’ deriva dalla radice latina '</text:span><text:span text:style-name="T21">m</text:span><text:span text:style-name="T14">anere', che significa restare o rimanere. L’aggiunta della preposizione 'in' diede il significato di 'stare in' o 'rimanere all’interno'. Vale la pena di notare </text:span><text:soft-page-break/><text:span text:style-name="T14">che ciò che rimane in qualcosa o rimane all’interno di qualcosa si distingue ed è distinto da ciò in cui rimane; altrimenti, uno sarà semplicemente una parte dell’altro. Detto questo, si può sostenere che il termine 'immanenza' non è un opposto polare del termine 'trascendenza'. In un certo senso la trascendenza di Dio presuppone un rapporto di Dio con il mondo. Egli trascende, mentre richiede la Sua 'alterità' da esso</text:span><text:span text:style-name="T14"><text:note text:id="ftn15" text:note-class="footnote"><text:note-citation>15</text:note-citation><text:note-body><text:p text:style-name="P56"><text:span text:style-name="T75">L</text:span>a trascendenza di Dio presuppone una relazione con il mondo, perché se Dio fosse completamente estraneo alla realtà creata, non ci sarebbe alcun legame, nessuna comunicazione né intervento divino. Proprio nella Sua alterità—cioè nel Suo essere totalmente 'altro' rispetto al mondo—Dio si manifesta e interagisce con la creazione. È un paradosso teologico molto discusso: Dio è infinitamente lontano in quanto trascendente, ma anche vicino e presente nella realtà che ha creato. Questo concetto è centrale nel pensiero cristiano: Dio non è un’entità distante e irraggiungibile, ma un Essere che, pur essendo completamente altro, si è rivelato all’umanità e instaura con essa un rapporto personale. È qui che entrano in gioco l’idea dell’incarnazione nel cristianesimo e, in altre tradizioni religiose, l'azione divina nella storia.</text:p></text:note-body></text:note></text:span><text:span text:style-name="T14">. Pertanto, il Dio trascendente è collegato a questo mondo dei sensi come fonte originale e unica della sua creazione ed esistenza, come Creatore e Sostenitore. Rimane all’interno del mondo del materiale ed è sovrastante in ogni aspetto della sua esistenza per mezzo della Sua eterna potenza, conoscenza, autorità, protezione, amore, e molti altri attributi e qualità infinite ed assolute, ma ontologicamente è totalmente 'altro' rispetto al mondo. Pertanto, quando mettiamo in </text:span><text:soft-page-break/><text:span text:style-name="T14">contrasto la trascendenza, o superamento della natura, con l’immanenza e la presenza interiore di Dio, descriviamo solo con un linguaggio umano inadeguato, due aspetti dell’Essere stesso che differiscono l’uno dall’altro. Pertanto sia la trascendenza che l’immanenza non sono alternative ma correlative. Entrambe si integrano reciprocamente, mentre ognuna contiene alcuni elementi dell’altra. Tale comprensione teistica di 'trascendenza' è centrale per le religioni semitiche (Ebraismo, Cristianesimo e Islam).</text:span></text:p>
      <text:p text:style-name="P80"><text:span text:style-name="T14">La fede in un Dio così trascendente penetra in profondità nella personalità di coloro che credono in Lui e dà forma alla loro vita intera. Questa convinzione non è qualcosa che si possa tenere per sé; vi è una sorta di costrizione e urgenza dietro ad essa. Tutte le attività dei veri credenti sembrano essere modellate e dettate dal particolare tipo di fede che possiedono riguardo al ‘trascendente’ perché per loro Lui è l’unica fonte della loro stessa esistenza, l’Uno unificato, l’essere perfetto che, sebbene distinto dal Cosmo, ne è la fonte, e continua a sostenere e provvidenzialmente a guidarlo. Gli approcci adottati dai seguaci di queste tradizioni semitiche per quanto riguarda le raffigurazioni antropomorfe e corporee di questo Dio 'trascendente' sono diversi per certi aspetti. La Scrittura ebraica (la </text:span><text:soft-page-break/><text:span text:style-name="T14">Bibbia ebraica, l’Antico Testamento) sono pervasi da espressioni antropomorfe e rappresentazioni di Dio, anche se i teologi ebraici medievali e filosofi come Saadia ibn Joseph (Saadia Gaon) (882-942), Mosè Maimonide (1135-1204), e molti studiosi moderni della nostra epoca hanno cercato di eliminare o almeno ridurre al minimo questi antropomorfismi scritturali attraverso vari metodi di interpretazione. D’altra parte, l’antropomorfismo pervasivo della Bibbia ebraica rende superficiali tali tentativi intellettuali. Il dogma del Cristianesimo della persona di Cristo e l’ 'Incarnazione' sono anche antropomorfi. Nella tradizione cristiana a dispetto di una forte enfasi sulla trascendenza di Dio e sulla Sua unicità, la presenza di dogmi come l’ 'Incarnazione' e l’uso frequente di espressioni come il padre, il Figlio, Dio in forma umana, Dio in terra, Madre di Dio, e il viso e le mani di Dio lasciano riflessi di corporeità nella mente umana. L’Islam sottolinea la trascendenza di Dio e la sua Scrittura protegge intensamente il Dio trascendente da ogni ombra di corporeità e antropomorfismi fisici. I prossimi capitoli ricercheranno dettagliatamente le tendenze trascendentali e antropomorfe contenute nella Bibbia (sia nel Vecchio che nel Nuovo Testamento) e nel Corano.</text:span></text:p>
      <text:h text:style-name="Heading_20_3" text:outline-level="3"><text:bookmark-start text:name="__RefHeading___Toc6014_2708660065"/><text:soft-page-break/>Secondo Capitolo<text:bookmark-end text:name="__RefHeading___Toc6014_2708660065"/></text:h>
      <text:h text:style-name="P189" text:outline-level="4"><text:bookmark-start text:name="__RefHeading___Toc8240_2708660065"/>L'antropomorfismo e la Bibbia ebraica.<text:bookmark-end text:name="__RefHeading___Toc8240_2708660065"/></text:h>
      <text:p text:style-name="P91"><text:span text:style-name="T14">La concezione di Dio che contraddistingue la Bibbia ebraica e, quindi, la tradizione giudaica è un amalgama di tendenze antropomorfe e tendenze trascendentali. Dio, nel testo della Bibbia ebraica, è presentato come la realtà trascendente e allo stesso tempo Egli è spesso descritto in termini antropomorfi e corporei concreti</text:span><text:span text:style-name="T14"><text:note text:id="ftn16" text:note-class="footnote"><text:note-citation>16</text:note-citation><text:note-body><text:p text:style-name="P56">Nel libro della Genesi, Dio dialoga con Adamo ed Eva, con Noè e con Abramo. Il linguaggio umano è usato per descrivere la comunicazione divina. <text:span text:style-name="T77">Dio parla e ascolta</text:span><text:span text:style-name="T78">. Numerosi testi parlano di "la mano di Dio" (Esodo 7:5), del "volto di Dio" (Numeri 6:25) e degli "occhi di Dio" che osservano (Proverbi 15:3). </text:span><text:span text:style-name="T77">Dio ha mani, volto e occhi. </text:span><text:span text:style-name="T80">In Genesi 3:8, Dio viene descritto mentre "cammina nel giardino" dell'Eden. </text:span><text:span text:style-name="T77">Dio cammina. </text:span><text:span text:style-name="T80">Il Tanakh attribuisce a Dio emozioni umane, come la collera (Esodo 32:10), il pentimento (Genesi 6:6) e la compassione (Isaia 54:10). </text:span><text:span text:style-name="T77">Dio si arrabbia, si pente, si commuove. </text:span><text:span text:style-name="T80">In alcuni passaggi, come nella rivelazione sul Monte Sinai (Esodo 19:20), Dio viene descritto come "discendente" sulla montagna. </text:span><text:span text:style-name="T77">Dio "scende" sulla terra. </text:span><text:span text:style-name="T80">Nel pensiero ebraico, soprattutto a partire dalla filosofia medievale (come Maimonide), si tende a sottolineare la totale incorporeità di Dio, evitando interpretazioni letterali di questi passi.</text:span></text:p></text:note-body></text:note></text:span><text:span text:style-name="T14">. Queste due tendenze opposte si affiancano nell’intera Bibbia ebraica. Nonostante vengano compiuti sforzi visibili da parte dei profeti classici per ridurre l’uso di espressioni antropomorfe e di porre sempre più enfasi sugli elementi trascendentali nella divinità, non vi è quasi una pagina nell’Antico Testamento, in cui non si trovino l’antropomorfismo o le sue tracce. C’è un </text:span><text:soft-page-break/><text:span text:style-name="T14">evidente elemento di sviluppo nelle nozioni teistiche della Bibbia ebraica. Vari tipi di concetti possono essere riscontrati in relazione alla divinità in varie parti dell’Antico Testamento (Bibbia ebraica). Animismo, politeismo, enoteismo, monolatria, monoteismo nazionale e universale e monoteismo etico, viene riportato che tutti questi ‘ismi’ erano stati praticati dagli Israeliti durante le varie fasi e periodi della loro storia antica e trascurati nella maggior parte dei casi se non sanciti dagli scrittori biblici.</text:span></text:p>
      <text:p text:style-name="P92"><text:span text:style-name="T14">Alcuni studiosi moderni non riscontrano l’affermazione dell’unità di Dio, della Sua unicità e trascendenza persino nel Primo Comandamento (Shema). Affermano che questo può comprovare monolatria o mono Yahwismo piuttosto che rigido monoteismo. Essi sostengono che il monoteismo, la più forte convinzione che esista un solo Dio ovunque, non è stato rivelato sulla cima del Sinai in quanto lo Shema non nega l’esistenza di altri dèi oltre a Yahweh, né affermano la sola esistenza di Yahweh. E’ molto difficile trovare una sola affermazione trascendente monoteista in tutto il Pentateuco. Storicamente parlando, gli ebrei, dall’antichità ai tempi moderni, hanno usato il Primo Comandamento per sottolineare l’unità di Yahweh. Un lettore superficiale, d’altra parte, potrebbe facilmente </text:span><text:soft-page-break/><text:span text:style-name="T14">scoprire l’insolito conflitto esistente nel Pentateuco rispetto all’unità ed unicità di Dio. Da un lato, l’unità e l’unicità del Signore vengono enfatizzate, mentre dall’altro vengono seriamente compromesse, non solo mostrando l’esistenza di altri dèi, ma anche con il riconoscimento di Dio Onnipotente della loro esistenza destinandoli ad altre nazioni e mantenendo Israele per Se stesso. </text:span><text:span text:style-name="T48">Yahweh non è il Dio universale del genere umano, ma un Dio nazionale di Israele; un Dio tra tanti dèi differenti (attribuiti alle altre nazioni), ad eccezione del Suo essere l’unico per loro</text:span><text:span text:style-name="T14">. Evidentemente la maggior parte degli antropologi occidentali, psicologi, sociologi e scienziati che hanno interpretato la religione o come un’illusione psicologica o una necessità sociologica, interagivano chiaramente con il concetto locale, nazionale, antropomorfo ed avanzato di Dio come presentato dalla maggioranza dei redattori dell’Antico Testamento. Infatti tra le Scritture di tutte le religioni sviluppate come l’Ebraismo, il Cristianesimo e l’Islam, è proprio la Bibbia ebraica che raffigura Dio con i termini più tangibili, antropomorfi e corporei. Indubbiamente la teologia dell’incarnazione cristiana è il culmine e l’apice di un concetto di divinità antropomorfo, corporeo e politeista in certe sue interpretazioni, nonostante il Nuovo Testamento </text:span><text:soft-page-break/><text:span text:style-name="T14">cristiano non contenga molte espressioni antropomorfe. In realtà la teologia dell’incarnazione antropomorfa non è che una delle interpretazioni del materiale del Nuovo Testamento, sebbene sia la più popolare tra i credenti cristiani. La teologia coranica è molto trascendentale e non si presta ad uno schema evolutivo di sviluppo progressivo, da animismo a politeismo a monolatria e infine a monoteismo</text:span><text:span text:style-name="T14"><text:note text:id="ftn17" text:note-class="footnote"><text:note-citation>17</text:note-citation><text:note-body><text:p text:style-name="P56">A differenza di alcuni modelli storici che vedono le religioni svilupparsi progressivamente dal culto degli spiriti (animismo) al riconoscimento di molte divinità (politeismo), fino a forme di monolatria (in cui si venera un solo dio senza negare l'esistenza di altri) per poi arrivare al monoteismo puro, il Corano si presenta fin dall’inizio come un'affermazione radicale del monoteismo. Non segue un processo evolutivo, ma ribadisce il monoteismo come una verità originaria, rivelata sin dalle prime epoche dell’umanità e ripristinata dai profeti.</text:p></text:note-body></text:note></text:span><text:span text:style-name="T14">. E’ nella Bibbia ebraica che si arriva ad una profonda enfasi sulla divinità antropomorfa, e ad un livello tale che Dio nell’antico periodo biblico è presentato in evidenti termini antropomorfi, con una così chiara attribuzione di qualità e attributi umani, che perfino i dieci Comandamenti si dice che siano stati scritti dal 'dito di Dio.' Alcuni degli antropomorfismi impiegati sono grezzi e palesi, mentre ritraggono Dio che incarna caratteristiche fisiche e sentimenti umani, persino mentre agisce proprio come un essere umano (essendo i dettagli abbastanza grafici in certe parti), lasciandosi </text:span><text:soft-page-break/><text:span text:style-name="T14">dietro il problema teologico di come interpretarli, il loro impatto, e se considerarli come sgradevoli o meno. In questo capitolo sono esaminati questi ed altri elementi. Nella Bibbia Dio appare in forma umana, mangia, beve, riposa e si ristora. Per esempio, in un incontro biblico ben noto, Dio lotta con Giacobbe, fa slogare il femore di Giacobbe e viene anche fatto apparire debole, incapace di dominare fisicamente Giacobbe, al punto di chiedere alla fine a Giacobbe di lasciarlo andare al sorgere dell’alba. Come risultato di questo incontro di lotta, Dio cambia il nome di Giacobbe in Israele che significa 'che lotta con Dio.'</text:span></text:p>
      <text:p text:style-name="P90"><text:span text:style-name="T14">Le prime tradizioni israelitiche attribuiscono una forma umana a Dio, visibile. In effetti, una gran parte delle caratteristiche mortali, umane, fisiche e mentali sembrano essere presenti nel Dio ebraico. Dio ha un corpo; nelle pianure di Mamre, Egli appare ad Abramo in una forma mitico-antropomorfa; Abramo si inchina verso il suolo, offre acqua a Dio, Gli chiede di permettergli di lavarGli i piedi, recupera un pezzo di pane e Dio risponde alla richiesta di Abramo e lo mangia, (Genesi 18: 1-9). In questo testo Dio appare ad Abramo con tale realismo antropomorfo che Abramo non lo riconosce fino alla auto-rivelazione verbale di Yahweh. Nel libro dell’Esodo, 33:11, viene consentito a </text:span><text:soft-page-break/><text:span text:style-name="T14">Mosè di vedere la parte posteriore di Dio e di parlare faccia a faccia con Lui come una persona parla a un amico. Gli anziani d’Israele avevano anche visto Dio (Esodo 24:9-10). La teofania (che significa apparizione di Dio) è quindi un evento comune nella Bibbia ebraica. Molte teofanie bibliche sono, o concreti antropomorfismi, o sotto categorie di antropomorfismo fisico, come ad esempio l’antropomorfismo figurato. Molte di queste teofanie raffigurano una vicinanza assoluta di Dio agli esseri umani, per la maggior parte in termini di forma umana, ma con diversi gradi di esplicitazione e di incarnazione umana. Vale la pena notare anche che quando si ritrae Dio che appare tra i tuoni, fulmini o dietro le nuvole non significa che Egli non abbia una forma umana fisica o un corpo ma piuttosto che i peccaminosi Ebre</text:span><text:span text:style-name="T22">i</text:span><text:span text:style-name="T14"> non sono autorizzati a guardare la Sua radiante gloria con i loro occhi immorali, che è privilegio solo dei giusti tra loro, che possono fisicamente guardare la gloriosa forma maestosa di Dio. Così, sono attribuiti a Dio la maggior parte degli organi umani con l’eccezione della sessualità. Dio ha una testa (Isaia 59:17; Salmo 110:7) e i capelli del suo capo sono come pura lana (Daniele 7:9) Il suo volto è citato circa 236 volte. Gli occhi di Dio sono menzionati 200 volte. Ha un naso (Genesi 8:21) tale che </text:span><text:soft-page-break/><text:span text:style-name="T14">emette 'un fumo dalle narici' (Salmo 18:8), e ha un senso dell’olfatto (Esodo 25:6). Viene citato spesso l’orecchio di Dio (Numeri 11:1; II Samuele 22:7; Salmo 86:1). Si dice che Dio abbia una bocca, 'Con lui io parlo a bocca a bocca, e in modo chiaro' (Numeri 12:8); Ha le labbra, la lingua e il respiro. Piange, si dispera, si lamenta (Geremia 9:10), commette errori e cattiverie per poi pentirsi di quanto fatto (Esodo 32:11-14). Nessuno può leggere la Bibbia ebraica senza arrivare alla conclusione che gli autori supponessero che Dio somigliasse fisicamente all’uomo e che gli esseri umani fossero stati creati a somiglianza fisica della Divinità. Ci sono momenti in cui Dio è raffigurato in antropomorfismi trascendentali dove Egli è ritratto in forme umane e qualità, ma appunto, residente nei Paradisi. Egli troneggia su un trono speciale, cavalca un cherubino, coltiva un giardino, studia la Torah, presiede un consiglio divino e addirittura parla alle persone direttamente da questa sfera celeste. Alcune delle espressioni antropomorfe sono figurate o metaforiche in natura, poiché rendono le interpretazioni metaforiche linguisticamente accettate. Molte però non lo sono, essendo corporee e antropomorfiche fino in fondo. Purtroppo, numerosi biblisti confondono queste frasi concrete e letteralmente corporee, tentando di </text:span><text:soft-page-break/><text:span text:style-name="T14">dare loro interpretazioni figurative o rappresentative attraverso il ricorso ad alcuni mezzi molto arbitrari. Così, per esempio, abbiamo studiosi che tentano di imporre sinteticamente i propri sofisticati e sviluppati concetti di Dio e della Sua natura nel testo della Bibbia ebraica, un approccio che sfida completamente l’intento originale, nonché il contesto dello scritto.</text:span></text:p>
      <text:p text:style-name="P93"><text:span text:style-name="T48">Le origini dell’ antropomorfismo Biblico si trovano nel Libro della Genesi, il primo libro della Torah ebraica e della Bibbia cristiana. Nel versetto 1:26 Dio proclama 'na’aseh ‘adam beselmenu kidemutenu,' intendendo, 'Facciamo l’uomo a nostra immagine e a nostra somiglianza.'</text:span><text:span text:style-name="T14"> Molti esegeti ortodossi cercano di interpretare questo versetto spiritualmente, sostenendo che l’immagine e somiglianza menzionate nel verso non si riferiscono all’aspetto fisico, ma spirituale. Tuttavia, le parole originali ebraiche sfidano qualsiasi interpretazione. Le parole ebraiche Selem (immagine) e demute (somiglianza) denotano per lo più la forma esteriore e non gli attributi spirituali interiori. Quindi il Dio ebraico sembra un uomo e molto spesso si comporta come uomo. Questa idea di una somiglianza Dio-uomo abbonda nella Bibbia ebraica assieme a un immaginario antropomorfico. Così Dio, come l’uomo, è 'mutevole,' liberamente 'localizzato nello spazio e nel </text:span><text:soft-page-break/><text:span text:style-name="T14">tempo,' si muove, cambia e reagisce ai cambiamenti. Inoltre, il Dio della Bibbia ebraica cambia anche idea così come decisioni. Per esempio viene documentato che il profeta Mosè abbia fatto pentire Dio di talune decisioni maligne, facendo cambiare idea a Dio</text:span><text:span text:style-name="T14"><text:note text:id="ftn18" text:note-class="footnote"><text:note-citation>18</text:note-citation><text:note-body><text:p text:style-name="Footnote">Un esempio chiave è quello di Mosè in Esodo 32:9-14, quando, dopo il peccato del vitello d’oro, Dio è pronto a distruggere il popolo d’Israele, ma Mosè intercede e lo convince a ritirare la Sua ira. Questo episodio mostra un Dio che ascolta e che può essere influenzato dal dialogo con l’uomo.</text:p></text:note-body></text:note></text:span><text:span text:style-name="T14">. A volte Dio appare tribale con sfumature razziste, e altre volte un agente immobiliare più interessato ai diritti di proprietà che di culto. Stipula il patto con Abramo, promette la 'Terra Promessa' a lui e alla sua discendenza per sempre, come loro eredità, ma in qualche modo non è in grado o non vuole soddisfare tale promessa. Egli consiglia a Mosè e agli Israeliti di saccheggiare i vicini egiziani degli oggetti d’oro, d’argento e di abbigliamento. Molto spesso Egli rappresenta le aspirazioni ed il progetto nazionale degli Ebrei, proiettando in un certo senso i loro fallimenti, sogni e paure nell’universo. Così nel Dio ebraico ciò che abbiamo non è il Dio trascendente assoluto e perfetto del teismo, ma piuttosto un Dio imperfetto, corporeo e finito, un prodotto dei suoi altrettanto finiti creatori, coloro che hanno trascritto l’Antico Testamento. Il </text:span><text:soft-page-break/><text:span text:style-name="T14">monoteismo etico non era la preoccupazione predominante dei primi Ebrei. Henotheismo è forse il termine migliore per indicare un comprensione patriarcale di Dio. La monolatria o il mono-Yahwismo sostituisce l’henotheismo con l’arrivo di Mosè, che allo stesso tempo sembra spargere i semi del monoteismo biblico, anche se non nel senso stretto del termine. Il suo Signore è un Dio geloso nonostante che il Suo universo non sia privo dell’esistenza di altri dei. Inoltre, il suo Yahweh non è esente da attributi e qualità antropomorfe, apparendo coraggioso quando presentato in termini antropomorfi, nonché fisici. La tendenza antropomorfa è ben visibile anche nel caso dei successivi profeti, che sostennero un rigido monoteismo e offrirono un’opposizione veemente all’idolatria e alle immagini scolpite. Il loro Dio non viene presentato in termini materiali grezzi, ma è ancora visibilmente corporeo e antropomorfo, ossia è un riflesso dell’idea che Dio abbia creato l’uomo a Sua immagine e somiglianza. Ci sono molte affermazioni bibliche che se prese letteralmente presentano Dio in termini trascendentali. D’altra parte, la trascendenza di Dio non è accuratamente protetta dal rischio di sfruttamento e di compromesso. Così, la stessa Bibbia che differenzia categoricamente Dio dagli esseri </text:span><text:soft-page-break/><text:span text:style-name="T14">mortali, pure in molte occasioni Lo ritrae in modo molto simile agli esseri mortali, con qualità e attributi mortali. Sembra che ci sia un contrasto tra l’antropomorfismo e la trascendenza in tutta la Bibbia ebraica, ma quella tensione non è del tutto decisiva per eliminare le raffigurazioni antropomorfiche di Dio. Inoltre, la comunità ebraica in generale non sembrava turbata dalla presenza di queste espressioni antropomorfe nella loro scrittura, fino all’assalto impetuoso della filosofia greca, soprattutto nel primo secolo a.C. Anche il più tardo pensiero rabbinico incarnato nel Talmud, sebbene non senza eccezioni, sembra accettare gli antropomorfismi biblici. Oltre alla Torah scritta, la Torah orale o Talmud è molto importante per la tradizione giudaica, di cui rappresenta un testo centrale. Le autorità rabbiniche credevano che Dio avesse rivelato a Mosè la Torah orale o la Legge proprio come aveva rivelato la Torah scritta e questo è ciò che il termine Halakha LeMoshe MiSinai significa esattamente. Nel Talmud Dio è raffigurato mentre è seduto su un trono alto ed elevato nella parte più interna del Santuario. Egli dice a Rabbi Ishmael, 'Figlio mio, benedicimi.' Nel Midrash gli Ebrei vengono descritti come un popolo che vedeva Dio come un guerriero o uno scriba istruito. Gli Ebrei sul Mar Rosso erano in grado di indicare Dio con </text:span><text:soft-page-break/><text:span text:style-name="T14">le loro dita, contemplavano la Sua immagine come un uomo riesce a guardare il suo amico in faccia. Dio porta un Tefillin tradizionale, Egli prega per se stesso e studia la Torah. Ruggisce come un leone e dice: 'Guai ai miei figli, che hanno fatto sì che distruggessi il Mio Tempio a causa dei loro peccati, (il Bet Hamikdàsh n.d.t) e che li esiliassi tra gli altri popoli!' Dio segue un programma fisso giornaliero di lavoro e svago con il Leviatano. Secondo il Talmud 'Il giorno consiste in dodici ore'; durante le prime tre ore il Sacro Uno, benedetto Egli sia, si tiene occupato con la Torah, durante la seconde tre ore Egli Si siede per emettere il Suo giudizio sul mondo intero, e quando vede che il mondo è così colpevole da meritare la distruzione, Egli si trasferisce dalla sede della Giustizia alla sede della Misericordia; durante il terzo periodo, Egli alimenta il mondo intero, dal cornuto bufalo alla nidiata di parassiti; durante il quarto Egli si svaga con il Leviatano… .' Ha anche un programma per la notte ed ascolta la canzone di Hayyoth. Si lamenta ripetutamente e versa lacrime per la distruzione del Tempio di Gerusalemme e la dispersione degli Israeliti e si sente il Suo pianto da un’estremità all’altra del mondo. Piange ogni giorno per tre fallimenti: uno per il primo Tempio, e uno per il secondo Tempio, e uno per il </text:span><text:soft-page-break/><text:span text:style-name="T14">popolo di Israele, esiliato dalla sua terra</text:span><text:span text:style-name="T14"><text:note text:id="ftn19" text:note-class="footnote"><text:note-citation>19</text:note-citation><text:note-body><text:p text:style-name="P63">Due grandi esili sono centrali nella tradizione ebraica:</text:p><text:p text:style-name="P63"><text:s/><text:tab/>L'esilio babilonese (586 a.C.) – Dopo la distruzione del Primo Tempio di Gerusalemme da parte dei Babilonesi, molti israeliti furono deportati in Babilonia. Questo evento ebbe un impatto enorme sulla religione ebraica, spingendo la comunità a sviluppare la pratica della sinagoga e la centralità della Torah nello studio e nella preghiera.</text:p><text:p text:style-name="P63"><text:tab/>L'esilio romano (70 d.C.) – Dopo la distruzione del Secondo Tempio da parte dell'Impero Romano, molti ebrei furono dispersi in varie parti del mondo, segnando l'inizio della lunga Diaspora, durante la quale il popolo ebraico ha vissuto in molte nazioni, mantenendo la propria identità culturale e religiosa.<text:tab/></text:p></text:note-body></text:note></text:span><text:span text:style-name="T14">. I rabbini riconoscono la natura blasfema di queste audaci affermazioni riguardo a Dio. Questo è evidente dalle loro confessioni che 'se la Scrittura non ha parlato in tal modo, la lingua che dice ciò dovrebbe essere tagliata a fette.'</text:span></text:p>
      <text:p text:style-name="P93"><text:span text:style-name="T14">11 Tuttavia essi hanno continuato a ripetere il mito della sofferenza e del dolore e dei lamenti divini, come se fosse parte integrante della rappresentazione scritturale di Dio. Infine Dio stesso viene a placare Gerusalemme ed è giudicato con il fuoco. E’ difficile trovare un tale esempio di punizione e di purificazione di Dio in qualsiasi altra tradizione semitica. Dio è spesso raffigurato mentre piange. Egli ha chiesto a Geremia di convocare un’ambasciata dei Patriarchi come Abramo, Isacco e Giacobbe per consolarlo. Il potente sovrano dell’universo è raffigurato come un re impotente, che </text:span><text:soft-page-break/><text:span text:style-name="T14">non è in grado di proteggere i suoi figli, di difendere il suo santuario, stabilire le Sue funzioni ecc. mentre si lamenta apertamente per il suo orgoglio ferito. Piange in camere nascoste e gli occorre la consolazione dei Patriarchi dell’umanità in privato, per evitare la derisione delle altre nazioni. Oltretutto, il problema non riguarda in realtà gli antropomorfismi minori o lievi come il vedere, il guardare, l’amare, il prendersi cura, l’aiutare e così via, poiché questi sono attributi essenziali per la comunicazione necessaria tra Dio e l’uomo. La difficoltà si verifica quando si arriva a antropomorfismi concreti che vanno oltre lo scopo della modalità e raffigurano Dio come una figura umanoide. Nella Genesi Rabbah, ca. 400-450, si segnala che R. Hoshaiah disse: 'Quando il Santo Uno, benedetto Egli sia, è venuto a creare il primo uomo, gli angeli lo scambiarono per lui </text:span><text:span text:style-name="T23">(</text:span><text:span text:style-name="T14">per Dio, dal momento che l’uomo era a immagine di Dio</text:span><text:span text:style-name="T23">)</text:span><text:span text:style-name="T14"> e volevano dire di fronte a lui: ‘Santo,’ </text:span><text:span text:style-name="T23">(</text:span><text:span text:style-name="T14">santo è il Signore degli eserciti</text:span><text:span text:style-name="T23">)</text:span><text:span text:style-name="T14">.'</text:span></text:p>
      <text:p text:style-name="P94"><text:span text:style-name="T14">12 Nello spiegare l’Esodo 15:3, che afferma: 'Il Signore è un uomo di guerra; Il Signore è il suo nome,' il Talmud non esita a ritrarre Dio come un vero uomo. 'La parola ‘uomo’ non vuol dire altro che il Santo, benedetto Egli sia, in quanto è detto: Il Signore è un uomo di guerra.' Questo, per il rabbino Jacob Nuesner, è 'divinità nella </text:span><text:soft-page-break/><text:span text:style-name="T14">forma di umanità.' In breve, il Dio rabbinico è senza dubbio una divinità corporea con innumerevoli limiti umani. In nessun modo o forma la concezione teologica rabbinica di Dio assomiglia all’Onnipotente, Onnisciente, Onnipresente e Indipendente Dio della teologia trascendente monoteista. Piuttosto, sembrerebbe che il concetto rabbinico di Dio sia un riflesso delle aspirazioni religiose e politiche giudaiche. Il destino di Dio è abbinato al destino ebraico. Egli soffre con le loro sofferenze e si duole per i loro fallimenti. Questa divinità che si lamenta e che piange può essere definita a stento come il Dio Onnipotente dell’universo. Il pensiero ellenistico portò un certo numero di studiosi ebrei ad interpretare in modo figurato le espressioni antropomorfe. Per esempio, Aristobulo (150 a.C.) e Filone Giudeo (20 a.C.-40 d.C.) difesero l’interpretazione allegorica per eliminare i passaggi antropomorfi, tanto che Filone spogliò completamente il suo Dio di tutte le attribuzioni di attributi</text:span><text:span text:style-name="T14"><text:note text:id="ftn20" text:note-class="footnote"><text:note-citation>20</text:note-citation><text:note-body><text:p text:style-name="P56">La concezione di Dio come un essere che piange e si lamenta sembra lontana dall'idea di un Dio assolutamente trascendente e onnipotente, così come lo definirono i filosofi influenzati da Platone e Aristotele. Il processo di reinterpretazione figurata dei testi biblici ha avuto una spinta significativa con pensatori come Aristobulo di Alessandria e Filone di Alessandria. Entrambi cercarono di armonizzare la tradizione ebraica con la filosofia greca:</text:p><text:p text:style-name="P64"><text:tab/><text:span text:style-name="T76">Aristobulo</text:span> (circa 150 a.C.) sostenne che molte espressioni bibliche andavano interpretate simbolicamente e non letteralmente, per evitare qualunque antropomorfismo che potesse sminuire la trascendenza divina.</text:p><text:p text:style-name="P64"><text:tab/><text:span text:style-name="T76">Filone di Alessandria</text:span> (circa 20 a.C. – 40 d.C.) spinse questa interpretazione ancora più in là, sviluppando una teologia in cui Dio è completamente oltre ogni attributo umano. Secondo Filone, la Bibbia deve essere letta in chiave allegorica: quando parla delle "mani" di Dio, si riferisce alla Sua potenza, quando menziona il "volto", significa la Sua presenza, e così via. La sua visione di Dio si avvicina molto al concetto neoplatonico di un Essere supremo assoluto e indefinibile.<text:tab/></text:p></text:note-body></text:note></text:span><text:span text:style-name="T14">. Più tardi, in epoca medievale </text:span><text:soft-page-break/><text:span text:style-name="T14">Saadia Gaon (882-942), Bahya ibn Paquda (1040), e Giuda ha-Levi (1075-1141) si opposero con veemenza agli antropomorfismi biblici. Infine arriviamo a Mosè Maimonide (1135-1204) che propose il dogma della incorporeità di Dio e dichiarò idolatri ed eretici coloro che lo negavano. </text:span><text:span text:style-name="T48">I filosofi ebrei medievali sembrano essere stati davvero disturbati da queste formulazioni antropomorfe, e questo era dovuto principalmente all’offensiva polemica avanzata contro di loro dai teologi speculativi musulmani</text:span><text:span text:style-name="T14">. Nonostante l’autorevole stima di cui godeva e gode Maimonide tra molti ebrei, la sua intellettualizzazione del Dio ebraico non ebbe una buona accoglienza tra i suoi correligionari, che respingevano la sua divinità incorporea. Essi consideravano la sua dottrina ellenistica come antitetica alla tradizione antropomorfica dell’ebraismo in generale, storicamente autenticata e trasmessa tramite la scrittura. Di conseguenza, la stessa tendenza antropomorfica proseguì nelle generazioni successive. </text:span><text:soft-page-break/><text:span text:style-name="T14">Una forma più esecrabile di antropomorfismo si incontra nel periodo del Gaonim. Il libro più mostruoso di questo periodo è stato il Shi`ur Koma, ‘Stima di altezza,’ di Dio. In esso la Divinità viene descritta come un enorme essere dalla forma umana e del tutto sproporzionato. La misurazione di ciascun elemento, come il collo, la barba, gli occhi destro e sinistro, le labbra superiori e inferiori, le caviglie, ecc. è fornita in parasanghe (antica unità di distanza pari a quattro miglia o sei chilometri). Solo 'quei parasanghi non sono come i nostri, poiché un parasango celeste misura un milione di cubiti, ogni cubito quattro campate, e ogni campata copre tutto il mondo da un capo all’altro.' <text:s/>'E,' dice il libro di Raziel, 'Benedetto colui che conosce queste misurazioni, perché ha una sua parte nel mondo a venire.'</text:span></text:p>
      <text:p text:style-name="P94"><text:span text:style-name="T14">13 </text:span><text:span text:style-name="T48">Studiosi e teologi biblici, senza negare la presenza di rozze forme di antropomorfismo nella Bibbia, cercano di spiegare alcune delle ragioni per le quali ritengono che sia necessario. La prima ipotesi e la causa più comunemente citata è che la mente umana non sia in grado di rappresentare Dio come Egli è in Se stesso. La seconda causa si dice che sia la</text:span><text:span text:style-name="T14"> </text:span><text:span text:style-name="T48">mancanza di uno spirito filosofico nei popoli antichi, che non avevano altra scelta se non quella di percepire la Divinità come un essere </text:span><text:soft-page-break/><text:span text:style-name="T48">vivente, un Dio attivo, personale e individuale, poiché la percezione richiedeva una rappresentazione antropomorfa. Il terzo motivo si dice che sia la natura pratica del popolo ebraico, la sua audacia e la struttura linguistica della sua lingua.</text:span><text:span text:style-name="T14"> </text:span><text:span text:style-name="T48">Se, come viene creduto tradizionalmente, la Bibbia ebraica è la vera rivelazione o ispirazione di Dio, allora come mai, ci si può chiedere, Dio Creatore della natura umana e Rivelatore della Sua volontà, non è capace di informare le persone in termini ed argomenti appropriati su cosa Egli sia e come debba essere rappresentato?</text:span><text:span text:style-name="T14"> Perché avrebbe dovuto ricorrere a grezze e ingenue espressioni antropomorfe? Dopo tutto Egli ha dotato gli esseri umani della capacità e dell’abilità di riconoscere i fatti e le verità fondamentali su Sé stesso come Realtà Ultima e Verità. In realtà, è l’esistenza di tale terminologia corporea che indica la Scrittura biblica come il risultato dell’agire umano. La stessa ipotesi della rivelazione progressiva o evolutiva e </text:span><text:span text:style-name="T48">le grezze espressioni antropomorfe come risultato dell’incapacità dell’uomo di conoscere Dio</text:span><text:span text:style-name="T14"> o il rappresentarLo in termini non antropomorfi e adeguati, </text:span><text:span text:style-name="T48">deriva da un altro presupposto, ossia che queste parti della Bibbia consistono in parole e rappresentazioni di origine umana e non vengono dalla rivelazione divina</text:span><text:span text:style-name="T14">. Il limite e l’incapacità umana di cogliere l’essenza di Dio </text:span><text:soft-page-break/><text:span text:style-name="T14">non dovrebbe essere una scusa per rappresentare Dio in forme e figure umane concrete; forme e qualità che tutti concordano non siano in Lui. E’ sempre possibile sottolineare l’amore di Dio, la Sua misericordia e la Sua preoccupazione senza farLo piangere o gridare. L’importanza della Torah può essere sottolineata in molti modi diversi invece di sostenere che Dio legge i Suoi 24 libri durante la giornata e la Mishna durante la notte. Ci si trova disorientati nel comprendere che rapporto ci sia tra la programmazione delle tre ore quotidiane di svago di Dio con il Leviatano e le giustificazioni sul fatto che gli esseri umani non sono in grado di capire Dio! Stranamente, la situazione sembra essere completamente ribaltata. In questa situazione sono gli esseri umani che sembrano comprendere Dio e conoscere fin troppi dettagli su di Lui, perfino il suo programma personale fino ai dettagli più minuti. Una comunicazione corretta e anche il mistero di Dio, forse non ha bisogno o non consente tutta quella familiarità. Il Dio trascendente è ben al di sopra di tali limitazioni. Inoltre, la natura non-filosofica di una persona o di una nazione non necessita che Dio venga rappresentato in termini, categorie e caratteristiche che sono del tutto inadeguate e dannose proprio per la definizione e il concetto della Sua trascendenza e unicità. Inoltre, e </text:span><text:soft-page-break/><text:span text:style-name="T14">come già discusso, tutto ciò è rafforzato dal fatto che utilizzando la stessa lingua ebraica, individui della stessa nazione e cultura hanno percepito e rappresentato Dio in termini trascendentali, incorporei, non antropomorfi. Il che significa che se l’antropomorfismo fosse stato intrinseco alla natura del linguaggio, o una esigenza pratica degli Ebrei oppure parte della fierezza della nazione ebraica, allora sarebbe stato un fenomeno complessivo universale. Ma non è così. Allora perché farlo? Ironicamente gli stessi studiosi che, da un lato sostengono che i patriarchi, o Mosè, o almeno i grandi profeti, fossero monoteisti nel senso stretto del termine, dall’altro lato sembrano giustificare l’uso di espressioni primitive e crude per visualizzare e comprendere Dio e forniscono spiegazioni per darne un senso. Ma per essere precisi non possiamo avere entrambe le cose. Se, come questi studiosi sostengono, la natura o l’audacia di una figura antica come Mosè o altri profeti non impedisce loro di avere un alto concetto di Dio, non dovrebbe e non potrebbe essere un fattore determinante dietro i grezzi antropomorfismi della narrativa biblica. Si può dire lo stesso riguardo alla natura delle società primitive circa il loro concetto di Dio.</text:span></text:p>
      <text:p text:style-name="P94"><text:span text:style-name="T48">Il problema è che la Bibbia è considerata essere </text:span><text:soft-page-break/><text:span text:style-name="T48">letteralmente la parola di Dio, e non l’opera di popoli primitivi ebraici o della nazione ebraica</text:span><text:span text:style-name="T14">. Eppure, la lontananza delle società, i limiti della struttura e della costruzione del linguaggio, o qualsiasi altro fattore, possono avere un impatto solo quando è coinvolto l’uomo, perché Dio non può travisare i fatti o nascondere la verità. Inoltre, realisticamente queste cause non possono essere citate come le uniche ragioni per spiegare gli antropomorfismi biblici. Si dovrebbe lasciare spazio ad ulteriori proposte razionali, ragioni, fondamenta teoriche per spiegare la presenza e la vivacità di antropomorfismi umani crudamente realistici, nonché discordanze e discrepanze bibliche. In effetti la principale ragione e spiegazione per l’esistenza di queste ultime sarebbe evidente se si accetta di considerare il ruolo svolto dagli uomini, nella compilazione e trasmissione della Bibbia ebraica, e questo in effetti viene ampiamente riconosciuto ai nostri tempi. Gli ebrei per secoli avevano considerato Mosè come il compilatore, o più correttamente, come il mediatore delle leggi del Pentateuco</text:span><text:span text:style-name="T14"><text:note text:id="ftn21" text:note-class="footnote"><text:note-citation>21</text:note-citation><text:note-body><text:p text:style-name="P130">I primi cinque libri della Bibbia: Genesi, Esodo, Levitico, Numeri e Deuteronomio.</text:p></text:note-body></text:note></text:span><text:span text:style-name="T14"> che furono emesse da Dio stesso. Tale tradizione prese il sopravvento tra i cristiani. L’ ottavo principio </text:span><text:soft-page-break/><text:span text:style-name="T14">fondamentale di Mosè Maimonide comprende le seguenti parole: 'che la Torah è venuta da Dio. Noi crediamo che l’intera Torah ci è stata data per mezzo di Mosè, il nostro Maestro, interamente da Dio.…' 14 Quindi era la Parola infallibile di Dio. Queste parole sono così cristalline e forti che parlano da sole. Gli ebrei fino all’inizio della nostra era hanno avuto una forte fede nell’origine divina e nella paternità Mosaica di tutta la Torah, come pure nella sua infallibilità, immutabilità ed eternità. Anche se voci contro una visione così letterale della Torah hanno incluso studiosi cristiani come Clementina Omelie, San Girolamo e Teodoro di Mopsuestia (d.C. 428) e alcuni studiosi ebrei come Isaac ibn Yashush, Rashi, David Kimhi e Abraham Ibn Ezra (d.C. 1167) nel XII secolo, continuando con Carlstadt, Andreas Masius (1574) nel XVI e Isaac de la Peyrere (1655) e Richard Simon, Thomas Hobbes e poi Spinoza nel diciassettesimo secolo, </text:span><text:span text:style-name="T48">fu solo nell’età della ragione nel diciottesimo secolo, che lo scenario fu pronto per la perdita dell’autorità biblica come Scrittura ispirata.</text:span><text:span text:style-name="T14"> </text:span><text:span text:style-name="T48">Infine è stato nel XIX e all’inizio del XX secolo che gli studiosi biblici come Julius Wellhausen (1844-1918) furono in grado di analizzare, opporsi e infine mandare in frantumi l’idea di origine divina e soprannaturale della Torah e della sua paternità Mosaica.</text:span><text:span text:style-name="T14"> Allo stato </text:span><text:soft-page-break/><text:span text:style-name="T14">attuale, afferma R. E. Friedman, 'non vi è praticamente alcun biblista al mondo che stia lavorando attivamente sul tema, che possa affermare che i cinque libri di Mosè sono stati scritti da Mosè o da una persona sola. 15 </text:span><text:span text:style-name="T48">'Documentary Hypothesis' di J. Wellhausen aveva portato ad una rivoluzione nel campo della ricerca biblica in generale e negli studi del Pentateuco in particolare</text:span><text:span text:style-name="T14">. </text:span><text:span text:style-name="T48">Da allora la maggior parte dei critici del Pentateuco sostengono che si tratta di un lavoro composito prodotto a intervalli diversi, con contraddizioni, incoerenze e stili letterari diversi, quindi non può essere opera di un individuo (Mosè), come era stato sostenuto per secoli.</text:span><text:span text:style-name="T14"> L’opposizione alla studio critico o all’esame della Bibbia viene dalla Chiesa così come dagli Ebrei, ma la nuova dottrina ha avuto un impatto sui seguaci di entrambe le religioni con conseguente scisma rispetto all’autorità della Torah. Inoltre è diventato evidente che scrittori, redattori e compilatori della Bibbia ebraica hanno creato un Dio biblico a loro immagine e somiglianza. In sintesi, e proiettando queste conclusioni e ragionamenti ai nostri tempi, </text:span><text:span text:style-name="T48">si può tranquillamente affermare che la concezione della Bibbia ebraica di Dio e la natura progressiva o evolutiva del suo concetto di Dio potrebbero essere fattori che contribuiscono ad un </text:span><text:soft-page-break/><text:span text:style-name="T48">atteggiamento imprudente e incurante dell’uomo moderno verso il Dio trascendente della religione tradizionale.</text:span></text:p>
      <text:p text:style-name="P95"><text:span text:style-name="T14">Inoltre, i dati biblici non sembrano smentire in termini categorici la teoria proiettata, ma piuttosto la sottolineano, perché l’ elemento umano è così dominante in varie parti della Bibbia che sembra chiaro che la paternità sia ascritta solo agli esseri umani, che hanno imposto a Dio le proprie immagini, qualità e categorie su Dio e concependoLo proprio come loro. </text:span><text:span text:style-name="T48">Lasciamo l’ultima parola a Robin Lane Fox che si esprime piuttosto succintamente 'nella Scrittura questo Dio non rivela Sé stesso: autori umani Lo creano, come si suppone che Lui abbia creato loro: ‘a loro immagine.’</text:span></text:p>
      <text:p text:style-name="P131"><text:span text:style-name="T76"/></text:p>
      <text:p text:style-name="P131"><text:span text:style-name="T76"/></text:p>
      <text:h text:style-name="Heading_20_3" text:outline-level="3"><text:bookmark-start text:name="__RefHeading___Toc9578_2708660065"/>Terzo Capitolo<text:bookmark-end text:name="__RefHeading___Toc9578_2708660065"/></text:h>
      <text:h text:style-name="P191" text:outline-level="4"><text:bookmark-start text:name="__RefHeading___Toc9580_2708660065"/>L'antropomorfismo e il Nuovo Testamento.<text:bookmark-end text:name="__RefHeading___Toc9580_2708660065"/></text:h>
      <text:p text:style-name="P96"><text:span text:style-name="T49">16 </text:span><text:span text:style-name="T48">La concezione tipicamente cristiana di Dio è basata sull’affermazione che Dio è più ampiamente rivelato attraverso quella che i Cristiani sostengono sia la sua auto-rivelazione nella vita, nell’insegnamento, nella morte e nella risurrezione di Gesù Cristo.</text:span><text:span text:style-name="T14"> </text:span><text:span text:style-name="T48">La rivelazione finale del cristianesimo non è che Gesù è Dio, ma che </text:span><text:soft-page-break/><text:span text:style-name="T48">Dio è Gesù.</text:span><text:span text:style-name="T14"> Se l’essenza del cristianesimo è che Dio si è rivelato più pienamente nel linguaggio e nella realtà di una vita umana, inevitabilmente ne consegue che la comprensione cristiana di Dio è essenzialmente e letteralmente corporea e antropomorfa. Sostenere che la persona umana storica, Gesù di Nazareth, era allo stesso tempo Dio e uomo richiedeva come condizione necessaria che la divinità fosse in grado di auto esprimersi ed auto esporsi attraverso la 'forma di un uomo,' che è ciò che traducono le due parole greche 'morphe' e 'anthropos.' Per dimostrare che è effettivamente incluso nelle rivendicazioni del Cristianesimo storico, è necessario sottolineare due cose: in primo luogo, che i documenti del Nuovo Testamento sono essenzialmente focalizzati sulla vita e sulle opere di Gesù Cristo come centro della religione cristiana; e in secondo luogo, che le formulazioni storiche della dottrina cristiana - come stabilito dai primi Padri cristiani, e riconosciute come normative dalle successive generazioni di cristiani, insegnano una dottrina di salvezza che rende necessario che Cristo sia veramente Dio e veramente uomo e veramente uno. Questa teologia popolare dell’incarnazione è corporea in tutto e per tutto e in realtà è l’apice del pensiero corporeo nella coscienza semitica. Gesù è storicamente </text:span><text:soft-page-break/><text:span text:style-name="T14">esistito fra gli Ebrei, rispettava la loro Scrittura, pensava sé stesso come compimento della loro legge, lottava con la gerarchia religiosa ebraica ed affermava di essere stato inviato alle pecore perdute della casa di Israele. Ci possono essere stati alcuni tratti distintivi nella concezione che ha Gesù di Dio e della Sua trascendenza, ma il concetto nel suo complesso non sarebbe probabilmente in contrasto con la concezione ebraica della Divinità. I primi cristiani devono per forza e logicamente aver ereditato i temi della trascendenza divina e del monoteismo dall’ebraismo sviluppato intorno a loro, il che significa che l’unità, l’unicità e la sublimità del Dio creatore, con un po’ di sfide antropomorfe come discusso nel capitolo precedente, devono aver formato la premessa indiscutibile della tradizione di fede della Chiesa originale. Si può dedurre dai dati storici disponibili, che la Chiesa ha utilizzato la stessa premessa monoteista trascendente contro i politeisti, emanazionisti Gnostici e dualisti Marcioniti per confutare le loro violazioni monoteistiche. Come Clemente di Alessandria, molti dei padri della Chiesa hanno insistito sul fatto che le espressioni antropomorfe della Bibbia ebraica dovessero essere comprese ed interpretate metaforicamente. Così, per esempio, San Basilio di Cesarea (330-379) interpretò </text:span><text:soft-page-break/><text:span text:style-name="T14">l’espressione di Dio che gira 'il Suo volto' come Dio che lascia una persona da sola nelle difficoltà, Gregorio Nazianzeno interpretò l’espressione del 'volto' di Dio come la Sua sorveglianza, Teodoreto come la Sua benevolenza e il ripristino della libertà, e Giovanni di Damasco come il Suo mostrarsi e la Sua auto-rivelazione attraverso innumerevoli opere.</text:span></text:p>
      <text:p text:style-name="P97"><text:span text:style-name="T14">D’altra parte, il Nuovo Testamento contiene pochissime espressioni antropomorfe: il dito di Dio (Lc 11,20), la bocca di Dio (Matteo 4:4), la vista di Dio (Lc 16,15), la terra come sgabello di Dio (Matteo 05:35), ecc. e quasi tutte queste espressioni possono essere interpretate metaforicamente. Nonostante ciò, molti Padri della Chiesa, come i Valentiniani, Melito e Tertulliano hanno mantenuto un concetto corporeo e antropomorfico della divinità. Anche Ireneo ha riscontrato l’immagine di Dio nel corpo dell’uomo. Due secoli dopo Clemente, S. Agostino ancora lottava contro la forte tendenza antropomorfica e corporea che sembrava radicata tanto tra i cristiani quanto nella Chiesa stessa. Questo si aggiunge al fatto che il Nuovo Testamento non è incentrato su Dio Onnipotente. E’ ‘Cristocentrico.’ Dio, l’Onnipotente / Padre occupa una parte totale di appena il 2,5% dei Vangeli mentre per il resto, i Vangeli si occupano di Gesù a vario titolo, ossia la sua persona, i </text:span><text:soft-page-break/><text:span text:style-name="T14">suoi insegnamenti, i suoi discepoli, i suoi destinatari, il suo dialogo con i leader ebrei, ecc. (Marco dà solo lo 0,2% dello spazio ai verbi il cui soggetto è Dio / Padre, nel suo Vangelo, mentre Matteo lo 0,6%, Luca l’1,1% e Giovanni lo 0,6%). Qui vi è, poi, un enorme concentrazione su un solo uomo, Gesù di Nazareth. Egli è descritto in termini, concetti e modi diversi. Viene chiamato il Figlio dell’uomo, Figlio di Dio, il Verbo, il Profeta, il Messia, il Kyrios o Signore, e forse anche come Dio. Se non ci fosse stata questa focalizzazione sulla persona di Gesù, o se il Nuovo Testamento fosse stato sistematico o uniforme per quanto riguarda la natura delle suddette descrizioni, forse non ci sarebbe stato alcun bisogno di studi critici o discussioni di antropomorfismo nel Nuovo Testamento. Ma così com’è, gli scrittori del Nuovo Testamento sono così ossessionati dalla manifestazione di Cristo che sembrano riflettere su tutto eccetto che su Dio, attraverso questo specchio. Vi è una fusione di divinità e umanità nella persona del Gesù storico, tanto che per i cristiani tradizionali Gesù è al tempo stesso un Dio completo e un essere umano completo. Questa incarnazione, la diffusione di divinità e umanità in un debole essere umano è il culmine della corporeità divina e del realismo antropomorfo. Inoltre, ne esce una tale </text:span><text:soft-page-break/><text:span text:style-name="T14">diversità di descrizioni riguardo a Gesù, che diventa estremamente difficile presentarlo in un’immagine o in un concetto uniforme e universalmente concordato. Pertanto, la Cristologia, o il significato di Gesù e del suo rapporto con Dio Onnipotente, formeranno la base di partenza del nostro studio di antropomorfismo nel Nuovo Testamento. Ci sono molte Cristologie nel Nuovo Testamento. Il punto fondamentale in relazione alla trascendenza di Dio e all’antropomorfismo è la Cristologia della persona, ossia la dottrina di Cristo persona e divinità. Gli studiosi moderni sono più divisi dei cristiani delle generazioni passate sulla questione della divinità di Cristo così come sulle interpretazioni della persona di Gesù. Quasi tutte le vecchie questioni e le tendenze cristologiche, spesso dichiarate eresie dagli insegnamenti della Chiesa, potrebbero virtualmente essere rintracciate trovando vivide espressioni in molte discussioni cristologiche e dibattiti moderni. Molte delle vecchie eresie cristologiche sono praticamente incorporate nel pensiero cristiano contemporaneo senza molta esitazione o biasimo. Credere nella divinità di Gesù Cristo fu d’uso comune per i cristiani fino alla fine del XIX secolo. La Chiesa, ed i cristiani in generale, hanno sempre sostenuto che Gesù stesso aveva proclamato di essere il Figlio di Dio, la seconda persona </text:span><text:soft-page-break/><text:span text:style-name="T14">della Trinità divina, che ha vissuto una vita completamente mortale (sebbene senza peccato) tra l’umanità. In questo Dio in Cristo, teologia tradizionale dell’incarnazione, si raggiunge l’apice di una concezione antropomorfica e corporea della divinità. Se Dio si incarna nella persona di Cristo, mangia, beve, dorme, si sente afflitto e, infine viene crocifisso, allora in questo corpo fisico abbiamo il caso più accentuato di realizzazione della corporeità divina nel suo senso più puro. </text:span><text:span text:style-name="T48">Il problema principale del cristianesimo tradizionale nel corso dei secoli è stato di come mantenere la trascendenza di Dio e allo stesso tempo raggiungere la salvezza attraverso l’incarnazione e la crocifissione di Cristo come Dio. Questo è un paradosso scomodo da cui non c’è scampo. La ragione lo sfida</text:span><text:span text:style-name="T48"><text:note text:id="ftn22" text:note-class="footnote"><text:note-citation>22</text:note-citation><text:note-body><text:p text:style-name="P65"><text:span text:style-name="T82">I</text:span>l tentativo di bilanciare la trascendenza divina con l'immanenza resa possibile attraverso l'incarnazione di Gesù Cristo. Questo tema è stato affrontato con grande intensità nei secoli, sia dai padri della Chiesa che dai teologi successivi. Ecco alcune riflessioni chiave:</text:p><text:p text:style-name="P65"><text:tab/>1. Trascendenza di Dio <text:s text:c="2"/>- La trascendenza di Dio sottolinea il fatto che Egli è completamente al di sopra e al di fuori della creazione, infinitamente santo, onnipotente e incomprensibile per la mente umana. Questa idea è centrale per mantenere l'unicità e la sacralità di Dio.</text:p><text:p text:style-name="P65"><text:tab/>2. Incarnazione di Cristo <text:s text:c="2"/>- L'incarnazione rappresenta una sfida concettuale: il Dio trascendente si fa uomo in Gesù, assumendo la natura umana. L'incarnazione è vista come un atto supremo di amore e di avvicinamento a un'umanità peccatrice, senza perdere la divinità di Cristo. Gesù è così percepito come pienamente Dio e pienamente uomo, una dottrina fondamentale affermata nel Concilio di Calcedonia (451 d.C.).</text:p><text:p text:style-name="P65"><text:tab/>3. Crocefissione e Salvezza <text:s text:c="2"/>- La crocifissione di Cristo è interpretata come un paradosso teologico: il Dio eterno soffre e muore per redimere l'umanità. Per molti cristiani, questo è un atto supremo di immanenza, in cui Dio si abbassa per rialzare l'umanità.</text:p><text:p text:style-name="P65"><text:tab/>4. Sfide Teologiche <text:s/>- Nel corso dei secoli, teologi e filosofi hanno cercato di spiegare come la trascendenza di Dio possa coesistere con la sua immanenza. Alcuni hanno sottolineato l'importanza del mistero e della fede, evitando di razionalizzare troppo ciò che è considerato soprannaturale. Altri, come Tommaso d'Aquino, hanno cercato di integrare ragione e fede per articolare questa tensione.<text:tab/></text:p><text:p text:style-name="P66"><text:tab/>5.Conseguenze Pratiche - Questa tensione ha influenzato la liturgia, <text:span text:style-name="T83">a</text:span>ttraverso i sacramenti ,i cristiani <text:span text:style-name="T83">percepiscono </text:span>la presenza tangibile di Dio nella loro vita.</text:p></text:note-body></text:note></text:span><text:span text:style-name="T14">. </text:span><text:soft-page-break/><text:span text:style-name="T24">S</text:span><text:span text:style-name="T14">orprendentemente, perfino in questi tempi, esistono studiosi che sostengono che anche se Gesù era di natura divina e di fatto consapevole della sua identità, tuttavia questa incarnazione in qualche modo non comporta alcuna constatazione di politeismo o di corporalità divina. Questo sembrerebbe essere in contrasto con la ragione umana. Il nocciolo della questione è che la tradizionale teologia Trinitaria Cristiana ha fatto fatica a risolvere in modo soddisfacente il problema centrale, ovvero il rapporto della persona di Gesù Cristo con Dio trascendente, indivisibile, invalicabile, unico, eterno e Unico Dio. Ci sono molte opere speculative e congetture riguardo a questa spinosa questione, ma non sono assolutamente soddisfacenti per la logica umana. Anche accettando le tesi del movimento sociale della Trinità ultra-</text:span><text:soft-page-break/><text:span text:style-name="T14">Cappadociano o dell’unione di Trinità di Barth non si riesce ancora a staccare la Trinità dalla corporeità e da un tangibile antropomorfismo. L’incarnazione di Dio nella figura umana di Cristo, sia in una modalità della Sua esistenza o tramite una persona della Sua divinità, sono casi lampanti di corporeità. La difficoltà sta nell’insistenza che il Cristianesimo tradizionale pone quasi sempre sulla persona di Cristo come essere divino, seconda Persona della Trinità, e uguale in tutto e per tutto a Dio, sostenendo al tempo stesso l’umanità di Gesù come essere uguale in quasi tutti gli aspetti all’umanità (ad eccezione del peccato). Questa posizione è paradossale, contraddittoria, sfida la logica e pur essendo un principio fondamentale del Cristianesimo suscita comunque poca o nessuna attrazione nel pensiero razionale moderno e come tale è incomprensibile per l’uomo moderno, abituato a valutare gli argomenti con estremo rigore. Molti studiosi e teologi cristiani moderni non sembrano pronti a negare o denunciare le argomentazioni tradizionali, ma fanno ancora fatica a dimostrare la loro validità o persino ragionevolezza alla mente contemporanea. Costretti a ricorrere alle medesime tesi, essi fanno affermazioni senza corroborarle logicamente e in tal modo ripetendo, in molti casi, </text:span><text:soft-page-break/><text:span text:style-name="T14">opinioni che erano già state discusse nei primi secoli oppure scartate come eretiche. In nessun caso possono essere negate le accuse di antropomorfismo, corporeità e in alcuni casi di triteismo. La fonte di questo paradosso, forse è il Nuovo Testamento. Non una sola parola del Nuovo Testamento è stata scritta o autorizzata dallo stesso Gesù. </text:span><text:span text:style-name="T48">Gli scritti del Nuovo Testamento furono il prodotto di generazioni successive, scritti da differenti autori, in vari luoghi, comunità ed epoche. Il Nuovo Testamento nella sua forma, numero e ordine attuali, non era a disposizione dei primi cristiani e non lo fu per secoli dopo la partenza di Gesù e dei suoi discepoli</text:span><text:span text:style-name="T14">. Questi libri furono scritti per le esigenze speciali di particolari gruppi di persone, e l’idea di riunirli in un unico autorevole volume arrivò tardi e non era nelle intenzioni degli autori. Uno dei fattori principali può essere stato l’esistenza di una Bibbia ebraica già compilata. La compilazione, la raccolta e l’identificazione di questo particolare gruppo di scritti (il processo di canonizzazione) come entità distinta e autorevole fu il risultato di uno sviluppo complesso all’interno della Chiesa cristiana. Ci sono voluti 367 anni alla Chiesa per produrre un elenco di scritti e un corpus che contenesse tutti gli scritti canonici del giorno d’oggi (Nuovo Testamento). Gli </text:span><text:soft-page-break/><text:span text:style-name="T14">studiosi del Nuovo Testamento differiscono ampiamente sul processo di compilazione e la storia del corpus del Nuovo Testamento autori, luoghi, fonti e date. Gli studiosi tradizionali o ortodossi dichiarano che il Nuovo Testamento è assolutamente l’opera autentica e ispirata dei discepoli, e attribuiscono quasi tutti gli scritti del Nuovo Testamento sia ai discepoli che agli apostoli diretti. Gli studiosi critici contemporanei, a seguito di una critica formale, redazionale e letteraria, e di un approccio storico al Nuovo Testamento, non sono d’accordo con la visione tradizionale di autenticità e di natura divina degli scritti del Nuovo Testamento. Essi sostengono che i libri del Nuovo Testamento non sono le opere dei discepoli diretti di Gesù, ma piuttosto sono degli scritti compilati molto tempo dopo la loro morte da autori per lo più a noi sconosciuti. Essi sostengono che le circostanze di composizione (autore, tempo, luogo, occasione, e qualsiasi delle circostanze più specifiche) non sono conosciute in alcuno degli scritti del Nuovo Testamento, eccetto che per le lettere di Paolo. Essi affermano, inoltre, che Gesù non ha mai chiesto ai suoi discepoli di mettere alcunché per iscritto. Dopo la sua resurrezione i discepoli erano occupati a predicare la fine del mondo e la venuta del Regno di Dio e, quindi, erano meno interessati a scrivere le parole di </text:span><text:soft-page-break/><text:span text:style-name="T14">Gesù. Inoltre, la convinzione che lo Spirito escatologico e profetico di Dio fosse in opera tra loro, ha portato i primi cristiani a concentrarsi maggiormente sulla trasmissione e predicazione orale piuttosto che sulla scrittura del messaggio. Di conseguenza, la parola o la tradizione furono trasmesse oralmente fino alla seconda generazione, quando con il passare del tempo l’entusiasmo attorno al ritorno di Gesù sembrò raffreddarsi. Quando il ritardo del suo ritorno cominciò a causare una serie di problemi, iniziò la scrittura dei testi. Durante questo intervallo nacquero nuovi detti e furono aggiunti al vecchio corpus. I Vangeli emersero durante un processo lungo dai cinquanta ai sessanta anni. Inoltre, i redattori del Nuovo Testamento non erano semplici biografiche, segnalavano degli eventi storici nella loro forma originale. Essi rispondevano ad una particolare 'situazione di vita' (Sitz im Leben) che significa che avevano un’opinione preconcetta. Erano teologi del loro tempo e avevano un messaggio da condividere. Pertanto, il tentativo di formare un quadro della vita che si faceva quaranta o sessanta o settanta anni prima che i Vangeli fossero scritti, non può produrre molto nella ricerca di risultati completamente garantiti. C’era un abisso tra come Gesù si è considerato e si è presentato ed il modo in cui la Chiesa primitiva lo </text:span><text:soft-page-break/><text:span text:style-name="T14">ha interpretato come Cristo, Signore o Figlio di Dio. E’ possibile quindi percepire come questi libri siano solo interpretazioni della manifestazione di Cristo e non ci forniscano informazioni esatte e corrette riguardo a ciò che Gesù ha detto di sé stesso e ciò che era. Il processo di canonizzazione si è anche esteso nel corso dei secoli. Il processo di canonizzazione in Occidente venne chiuso nel V secolo sotto l’influenza di S. Agostino e Girolamo. Per la Chiesa greca in Oriente la questione venne risolta dall’Imperatore Costantino. Ordinò a Eusebio di preparare 50 copie delle Scritture da utilizzare nella nuova capitale. In questo modo i 27 libri del Nuovo Testamento inclusi in queste copie ottennero un riconoscimento semiufficiale. Ora, quando prendiamo in mano il Nuovo Testamento, quello che vi leggiamo in realtà è un elenco di libri che alcuni dei vescovi cristiani approvarono e confermarono più di trecento anni dopo la morte di Gesù e oltretutto sotto pressione imperiale. Tre secoli sono un tempo molto lungo. Ovviamente, sarebbe poco plausibile citare la protezione, l’orientamento e l’opera di conforto dello Spirito Santo con l’esclusione però degli esseri umani, con tutti i loro limiti terreni che ritroviamo dietro le lettere stesse dei libri del Nuovo Testamento. L’unica conclusione concreta che si può raggiungere è che gli autori, i </text:span><text:soft-page-break/><text:span text:style-name="T14">compilatori ed i canonizzatori del Nuovo Testamento non erano dopo tutto che semplici esseri umani. La questione centrale, consistente nella domanda 'che cosa pensate di Cristo,' è stata risolta in un certo numero di modi diversi dai redattori del Nuovo Testamento. Egli è un profeta, un principe angelico, è il Cristo, il Messia, il Figlio dell’uomo, il Figlio di Dio, il Kyrios intendendo ‘Signore,’ e secondo il Vangelo di Giovanni è Logos o Theos tradizionalmente tradotto come 'Dio.' Questa designazione è estremamente importante per il nostro studio di antropomorfismo, perché se Gesù è adornato con tutti i maestosi attributi di Dio (divinità, eternità, Signoria cosmica assoluta), ed è considerato uguale a Dio, adorato e, infine, designato con il titolo effettivo di ‘Dio,’ allora diventa impossibile sostenere che il concetto neotestamentario di divinità/Gesù non sia antropomorfo o corporeo. Sembra che una volta che la Chiesa avesse deciso di preferire la cristologia di Logos o Theos agli altri concetti cristologici ed avesse convenuto che Gesù era Dio, soprattutto alla luce della esperienza pasquale, il theos di Giovanni, che potrebbe essere stato usato da Giovanni solo come strumento di comunicazione, fosse stato caricato con i toni assoluti di ho theos (il Dio). Il passaggio mette in evidenza il fatto storico che l’alta Cristologia e la forte </text:span><text:soft-page-break/><text:span text:style-name="T14">divinità di Gesù non era l’idea originale di Gesù o dei suoi diretti discepoli. Essa deve la sua origine e sostanza alle concezioni cristiane successive di Gesù alla luce dell’esperienza pasquale. Le sue successive vere aperture e strategie sono motivate solo teologicamente. Il processo di divinizzazione di Gesù è stato graduale, si è esteso nel corso dei secoli, come il processo di canonizzazione del Nuovo Testamento. Prima la Chiesa decise che Gesù era divino alla luce dell’esperienza della Pasqua celestiale di Gesù, poi selezionò accuratamente quei Vangeli e altro materiale che si pensava potessero sostenere le posizioni della Chiesa. Le Cristologie di Gesù come profeta, angelo, Messia e Signore, che altrimenti si escluderebbero a vicenda, sono state metamorfizzate per descrivere un essere umano con attributi e qualità divine e in ultima analisi, una divinità. Quindi l’umanità e la divinità divennero in qualche modo fuse nell’uomo storico, </text:span><text:span text:style-name="T48">Gesù di Nazareth; un esempio supremo e apice di antropomorfismo e di corporeità</text:span><text:span text:style-name="T14">. Il corpus degli scritti di Paolo e Giovanni ha dimostrato di essere utile per fornire un contesto, una terminologia e un quadro concettuale affinché i successivi cristiani potessero fare il passo azzardato. Ovvero era probabilmente dovuto all’influenza della Cristologia di Paolo e Giovanni che i Padri Apostolici non </text:span><text:soft-page-break/><text:span text:style-name="T14">ebbero alcuna esitazione a professare la divinità di Gesù e il suo essere Dio. Per esempio Ignazio non esitò a riferirsi a Gesù chiamandolo 'Dio.' Sembra che alcuni dei libri del Nuovo Testamento, soprattutto se compresi alla luce degli sviluppi teologici successivi, abbiano probabilmente esaltato Gesù Cristo al rango di autentica divinità e l’abbiano reso, in certi passaggi, pari a Dio. Anche se esistono diverse interpretazioni per questi passaggi, la possibilità di ricavare le affermazioni successive di divinità assoluta di Gesù Cristo (sotto tutti gli aspetti come quella del Padre) è discutibile, soprattutto alla luce dei passaggi monoteisti nei libri del Nuovo Testamento. Inoltre, ci sono diversi passaggi, in particolare nei Vangeli sinottici, che sottolineano l’assoluta unità e unicità di Dio Onnipotente. (Marco 12:29-32). I passaggi di Paolo e Giovanni possono essere considerati come quelli che hanno condotto ad alcune delle affermazioni successive riguardanti l’autentica divinità di Cristo, con alcuni artifizi da parte dell’interprete. D’altra parte, ci sono altri passaggi che portano alla subordinazione di Gesù al Dio Padre e la sua accettazione al battesimo (Luca 6:12, 10:22; Matteo 19:17, 11:27; Giovanni 7:29-33; Matteo 3:16-17; Luca 3:22). Si deve aggiungere che tutti i passaggi di cui sopra non dimostrano la divinità forte e assoluta di </text:span><text:soft-page-break/><text:span text:style-name="T14">Gesù a cui hanno creduto un gran numero di cristiani tradizionali. Una divinità derivata, finita o subordinata non è uguale ad una divinità assoluta. Inoltre, mentre questi passaggi potrebbero essere interpretati come conferenti uno status divino a Gesù, tuttavia lasciano una serie di importanti questioni irrisolte relative alla relazione di Gesù con Dio e con gli esseri umani, la vera natura e l’essenza di Dio, il monoteismo, il triteismo, l’antropomorfismo, la corporeità e la trascendenza. La Chiesa primitiva non ha avuto alcuna esitazione nell’attribuire completa divinità a Gesù, compresa la designazione di titoli divini, azioni, attributi e funzioni divine assolute. Questa attribuzione di divinità non ha provocato molti problemi fino a quando la fede è rimasta confinata ai cristiani interessati esclusivamente alla salvezza. Era Dio e Dio solo e nessuno altro se non Dio che avrebbe potuto portare la salvezza a un’umanità sprofondata nel peccato. </text:span><text:span text:style-name="T48">Il problema emerse quando la Chiesa dovette affrontare il mondo esterno e dimostrare la valenza e la saggezza degli insegnamenti cristiani.</text:span><text:span text:style-name="T14"> </text:span><text:span text:style-name="T48">Perché colui che i cristiani avevano chiamato Dio era anche colui che era nato, aveva vissuto un’ordinaria vita naturale per trenta anni circa, aveva mangiato, aveva bevuto, e sofferto e fu implacabilmente crocifisso.</text:span><text:span text:style-name="T14"> </text:span><text:span text:style-name="T48">Queste erano le realtà che </text:span><text:soft-page-break/><text:span text:style-name="T48">la Chiesa stessa testimoniava</text:span><text:span text:style-name="T14">. </text:span><text:span text:style-name="T48">Le osservazioni del filosofo pagano alessandrino Celso</text:span><text:span text:style-name="T48"><text:note text:id="ftn23" text:note-class="footnote"><text:note-citation>23</text:note-citation><text:note-body><text:p text:style-name="P56">Celso fu un filosofo neoplatonico del II secolo, noto per la sua critica verso il cristianesimo, raccolta nell'opera 'Discorso Vero' (Logos Alēthēs*). In questo scritto, egli contestava l'idea cristiana dell'incarnazione di Dio, considerandola illogica e incompatibile con la nozione di un essere divino immutabile e perfetto. </text:p><text:p text:style-name="P56"><text:tab/>Secondo la sua prospettiva, la discesa di Dio sulla Terra attraverso Gesù rappresentava una contraddizione: come può un Dio perfetto e onnipotente cambiare o 'abbassarsi' al livello umano senza compromettere la sua natura divina? Inoltre, Celso sosteneva che un Dio trascendente non avrebbe bisogno di intervenire direttamente nel mondo per giustificarlo o redimerlo.</text:p><text:p text:style-name="P56"><text:tab/>Le critiche di Celso stimolarono diverse risposte, in particolare quelle del teologo cristiano Origene, che scrisse l'opera 'Contra Celsum' per confutare punto per punto gli attacchi del filosofo. Origene difese la teologia cristiana, argomentando che l'incarnazione non muta l'essenza divina di Dio, ma rappresenta un atto di amore e volontà per la salvezza dell'umanità.</text:p><text:p text:style-name="Footnote"/></text:note-body></text:note></text:span><text:span text:style-name="T48"> individuarono il problema con precisione:</text:span><text:span text:style-name="T14"> '</text:span><text:span text:style-name="T48">I suoi seguaci poi lo resero un Dio... L’idea della discesa di Dio è priva di senso. Perché Dio è venuto giù per giustificare tutto? Questo non rende Dio mutabile?'</text:span><text:span text:style-name="T14"> Celso attaccò con veemenza il Cristianesimo e la sua teologia dell’incarnazione e la stigmatizzò come 'ostile a tutti i valori umani positivi.'</text:span></text:p>
      <text:p text:style-name="P38">C’era anche pressione dall’interno. In primo luogo questa confusione suscitò alcune delle prime controversie dottrinali della Chiesa stessa e di conseguenza costrinse la Chiesa a diventare più precisa. La pressione interna richiedeva una difesa logica e <text:soft-page-break/>spiegazioni comprensibili delle posizioni contraddittorie, soprattutto per scongiurare i feroci attacchi dei giudei e dei pagani. All’interno del Cristianesimo primitivo, voci come 'la sua sofferenza era solo finta' sono state sollevate da Marcione, Tolomeo e dagli gnostici. Marcione, per esempio, negava assolutamente l’umanità di Gesù. Il suo Gesù era troppo elevato per essere confinato all’interno della prigione della carne. Questo era chiaro 'Docetismo' (una convinzione che afferma che Gesù sembrava soltanto avere un corpo fisico e che morisse fisicamente, ma in realtà era incorporeo, uno spirito puro, e quindi non poteva morire fisicamente).</text:p>
      <text:p text:style-name="P80"><text:span text:style-name="T14">La Chiesa nel tentativo di difendere l’umanità di Cristo, non poteva sfuggire allo stesso problema che stava cercando di risolvere, il problema del ‘Docetismo.’ La Chiesa stessa aveva enfatizzato la divinità di Gesù ad un livello tale che la linea di demarcazione tra la sua umanità e divinità divenne confusa prematuramente. Il Padre della Chiesa Clemente di Alessandria fu 'ai limiti del docetismo</text:span><text:span text:style-name="T14"><text:note text:id="ftn24" text:note-class="footnote"><text:note-citation>24</text:note-citation><text:note-body><text:p text:style-name="P56">Il docetismo è una dottrina cristologica che sostiene che l'umanità e le sofferenze di Gesù Cristo fossero solo apparenti e non reali. Il termine deriva dal verbo greco dokéin, che significa 'sembrare' o 'apparire'. Questa concezione, considerata eretica dalle principali chiese cristiane, si sviluppò principalmente nelle comunità gnostiche dei primi secoli del cristianesimo.<text:line-break/>Secondo i docetisti, era inconcepibile che in Cristo potessero coesistere pienamente natura divina e umana, poiché la materia era vista come intrinsecamente malvagia. Di conseguenza, essi ritenevano che Cristo avesse un corpo solo etereo o illusorio, e che la sua crocifissione fosse un'illusione o un evento simbolico.<text:line-break/>Questa dottrina fu fortemente contrastata dai Padri della Chiesa, come Ireneo e Tertulliano, che sottolinearono la realtà dell'incarnazione e della passione di Cristo, elementi fondamentali per la redenzione dell'umanità.</text:p></text:note-body></text:note></text:span><text:span text:style-name="T14">.'</text:span></text:p>
      <text:p text:style-name="P39"><text:soft-page-break/>17 Quanto più la Chiesa aveva sottolineato l’irriducibile divinità di Gesù, utilizzando il concetto di Dio, tanto più era diventato difficile arrivare a provare che Gesù di Nazaret fosse anche il Figlio di Dio e della stessa sostanza di Dio. La Chiesa non ebbe scampo dal leggero docetismo che attraversa la Cristologia della antica Chiesa.</text:p>
      <text:p text:style-name="P40">18 Il Cristianesimo, per dimostrare il suo valore intellettuale e scongiurare gli attacchi ideologici del paganesimo, della filosofia greca e dell’Ebraismo, non aveva altra scelta se non quella di essere un po’ più preciso nei suoi insegnamenti riguardo alla relazione tra Dio Padre e Gesù il Cristo. Per i non cristiani, per i giudei e per i pagani era molto difficile comprendere le affermazioni di rigido monoteismo da una parte, e la divinità di Gesù Cristo, tra cui la sua sofferenza e crocifissione come Dio, dall’altra. Gli apologeti cristiani, come Giustino Martire, Teofilo, Taziano, Aristide e <text:soft-page-break/>Atenagora reagirono a questa situazione piuttosto imbarazzante con supposizioni filosofiche per rivendicare la verità del Cristianesimo. Cercarono di tracciare una linea piuttosto chiara tra Dio e Gesù utilizzando i concetti filosofici allora disponibili. Justin, il più rinomato di loro, per esempio, insistette che sebbene Gesù avesse origine da Dio, egli non era identico a Dio. Gesù è Dio nato da Dio. Egli era divino, ma non nel senso originario. La sua divinità era derivata.</text:p>
      <text:p text:style-name="P40">19 Era un Logos pre-esistente, l’agente di Dio nella creazione, per mezzo del quale sono state create tutte le creature. Pertanto, può essere chiamato Signore e adorato come Dio, ma in termini di un essere di secondo rango.</text:p>
      <text:p text:style-name="P98"><text:span text:style-name="T14">20 Altri Apologeti, come Taziano e Ippolito seguirono Justin nelle sue idee di trascendenza, ineffabilità, immutabilità e alterità di Dio, pur mantenendo il suo Logos Cristologico. Gli apologeti ritrassero chiaramente il Logos come richiesto per l’opera della creazione in subordinazione a Dio Padre. Inoltre limitarono palesemente il Logos rispetto a Dio stesso per salvaguardare l’imprescindibile idea del monoteismo. </text:span><text:span text:style-name="T48">C’erano residui di medio-platonismo</text:span><text:span text:style-name="T48"><text:note text:id="ftn25" text:note-class="footnote"><text:note-citation>25</text:note-citation><text:note-body><text:p text:style-name="P67">Il medio-platonismo, è una <text:span text:style-name="T84">categoria storiografica</text:span> che si sviluppò tra il I secolo a.C. e il III secolo d.C., rappresentando una fase di transizione tra il platonismo scettico dell'epoca ellenistica e il neoplatonismo. Durante questo periodo, i filosofi si concentrarono sull'interpretazione delle opere di Platone, spesso attraverso commentari e manuali sintetici, reinterpretarono il pensiero di Platone in chiave dogmatica, cercando di integrare elementi di altre scuole filosofiche, come il pitagorismo e l'aristotelismo.</text:p></text:note-body></text:note></text:span><text:span text:style-name="T48"> in questa </text:span><text:soft-page-break/><text:span text:style-name="T48">interpretazione del Logos degli apologeti. Il Logos veniva inteso in relazione al cosmo e al mondo per sottolineare l’assoluta trascendenza, invisibilità e inconoscibilità di Dio</text:span><text:span text:style-name="T14">. Dio l’Onnipotente era troppo trascendente per trattare direttamente con gli uomini e il mondo. Il Logos, un prodotto della volontà creatrice di Dio, era un mediatore subordinato, un dio derivato. I Padri della Chiesa, come Tertulliano (160-220) e Origene (185-254) mantennero chiaramente la posizione degli apologisti riguardo al rapporto secondario, subordinativo e derivato di Dio con Cristo. La trascendenza e monarchia di Dio sono preservate poiché il Figlio utilizza i poteri e l’autorità conferitegli dal Padre.</text:span></text:p>
      <text:p text:style-name="P99"><text:span text:style-name="T14">21 Il Figlio restituirà tutto ciò al Padre quando finirà il mondo. Il padre è la garanzia della monarchia, il Figlio è al secondo posto, mentre allo Spirito viene assegnato il terzo posto. La trinità di Tertulliano non è metafisica, ma di natura economica o dinamica</text:span><text:span text:style-name="T14"><text:note text:id="ftn26" text:note-class="footnote"><text:note-citation>26</text:note-citation><text:note-body><text:p text:style-name="P56">La Trinità di Tertulliano è definita "economica" o "dinamica" perché si concentra sull'azione e sulla gestione di Dio nel mondo, piuttosto che sulla sua natura metafisica. In particolare, il termine "economica" si riferisce al modo in cui le tre persone della Trinità—Padre, Figlio e Spirito Santo—operano insieme nel piano della salvezza. Tertulliano sottolinea il ruolo distinto di ciascuna persona divina: il Padre manda il Figlio, il Figlio si incarna e si sacrifica, e lo Spirito Santo agisce come forza vivificante e guida per i credenti.</text:p></text:note-body></text:note></text:span><text:span text:style-name="T14">. Solo il Padre </text:span><text:soft-page-break/><text:span text:style-name="T14">rimane il Dio trascendente ed eterno, mentre le altre due entità provengono dall’unitas substantiae perché hanno un compito da svolgere. Anche il suo concetto di unità non è matematico. Non vi è alcuna suddivisione all’interno della divinità. E’ più filosofica, più organica in quanto vi è un’ integrazione costruttiva all’interno della divinità tra la volontà e le persone. E’ stato Tertulliano a introdurre il concetto di ‘persona’ nella Cristologia.</text:span></text:p>
      <text:p text:style-name="P41">22 Origene ha anche sottolineato il ruolo derivato, intermediario e secondario di Gesù. Egli ha equiparato l’emanazione del Logos dal Padre con l’emanazione della volontà dalla mente. L’atto della volontà non elimina alcunché dalla mente, né causa alcuna divisione al suo interno. Il Logos allora è di rango secondario e quindi merita onore secondario. Stando così le cose, Origene non permette il culto di alcun essere generato come Cristo, ma ammette solo il culto di Dio Padre, che anche Cristo ha pregato. Le preghiere offerte a Cristo sono destinate ad essere trasmesse al Padre attraverso il mandato intermediario di Cristo. Dio trascende sia <text:soft-page-break/>Cristo che lo Spirito, mentre questi trascendono il regno degli esseri inferiori.</text:p>
      <text:p text:style-name="P37">23 Ireneo (202) e Clemente di Alessandria (150-215) sono stati forse più tradizionalisti rispetto ai filosofi. Non cercano interpretazioni intellettuali per indicare il rapporto tra il Padre, il Figlio e lo Spirito Santo, preferendo invece fare affidamento sulla terminologia tradizionale dei concetti filosofici. In più occasioni differivano ampiamente dagli apologeti per quanto riguarda la loro comprensione della Cristologia del Logos e per entrambi, il Logos che si era incarnato in Gesù Cristo, non era altro che Dio stesso. Per Ireneo invece pensare il Logos in termini derivativi e subordinarlo a Dio o pensare a lui come a un altro essere, proprio come avevano fatto gli apologisti, era dannoso per la sua opera salvifica e quindi impossibile. Egli identificò completamente il Logos o il Figlio con il Padre. In breve, il Logos è Dio, ma è il Dio rivelato e non è il Dio irraggiungibile, inaccessibile e separato dal mondo.</text:p>
      <text:p text:style-name="P100"><text:span text:style-name="T14">24 Possiamo concludere questa parte della discussione facendo notare che fino al secondo secolo d.C. il paradigma del Dio cristiano, in generale, e la dottrina della persona di Cristo non erano fissi ma erano anzi flessibili, fluidi e confusi. Le idee di subordinazione e del </text:span><text:soft-page-break/><text:span text:style-name="T14">rango derivativo e secondario di Cristo erano comuni tra i cristiani consapevoli come </text:span><text:span text:style-name="T25">Giustino</text:span><text:span text:style-name="T14"> e Orig</text:span><text:span text:style-name="T25">ene</text:span><text:span text:style-name="T14">. Dall’altra parte i tradizionalisti, così come la Chiesa ortodossa, se possiamo usare questo termine per scopi di convenienza, erano più propensi all’Unità, all’Uguaglianza e all’Eternità di Cristo, che ponevano allo stesso livello di Dio Padre. Quest’ultimo </text:span><text:span text:style-name="T26">(</text:span><text:span text:style-name="T14">approccio</text:span><text:span text:style-name="T26">)</text:span><text:span text:style-name="T14"> non era privo dei suoi problemi intrinseci e malintesi ed era inoltre una forma di possibile Docetismo. In quanto tali, vennero accusati di corporeità, antropomorfismo, politeismo e irrazionalismo anche dai loro avversari pagani, come Celso. Il vago Docetismo della Chiesa trovò la sua massima espressione nei monarchiani modalisti</text:span><text:span text:style-name="T14"><text:note text:id="ftn27" text:note-class="footnote"><text:note-citation>27</text:note-citation><text:note-body><text:p text:style-name="P56">I monarchiani modalisti, invece, cercavano di preservare l'unità di Dio (monarchia) affermando che Padre, Figlio e Spirito Santo non fossero persone distinte, ma semplicemente modalità diverse di manifestazione di un unico Dio. Questa posizione, nota anche come Patripassianismo, implicava che il Padre stesso avesse sofferto sulla croce, un'idea che la Chiesa rigettò come eretica.</text:p></text:note-body></text:note></text:span><text:span text:style-name="T14">, che mantennero rigorosamente l’unità divina identificando Gesù con Dio, Padre Creatore dell’universo. Ogni suggerimento che indicasse che Gesù il Verbo o Figlio fosse diverso o una Persona distinta dal Padre, ai Modalisti sembrava che portasse inevitabilmente alla bestemmia della doppia divinità. Fu prima Praxeas (210 d.C) e poi Noetus, entrambi dell’Asia Minore, a dare a questa credenza un tocco teologico </text:span><text:soft-page-break/><text:span text:style-name="T14">regolare, intorno 200 d.C. Essi sostenevano che Dio nella Sua totalità era presente in Gesù. Sabellio (215 d.C) divenne il teologo più fervente e importante del movimento. La loro posizione era abbastanza semplice. Non c’è Dio eccetto l’unico Creatore e Sostenitore del mondo come comprovato nelle Scritture. Cristo era Dio. Perciò egli è il Creatore che la gente chiama Padre. Fecero uso di passaggi di identità, come 'Io e il Padre siamo una cosa sola,' e sottolinearono la somiglianza assoluta e l’identità di Gesù con Dio. Accusarono gli ortodossi cristiani di triteismo. Questa posizione estrema e la precisione per quanto riguarda la relazione tra Gesù con Dio potrebbe essere stata una propaggine di insegnamenti ortodossi e di ambiguità di fondo. Adorare Gesù con titoli assoluti come Signore e chiamarlo in modo esplicito Dio può aver portato qualcuno a cancellare la distinzione tra Gesù e Dio. Ci viene raccontato che frasi come 'Dio è nato,' 'il Dio che soffre,' o 'il Dio defunto' erano così diffuse tra i cristiani che, persino Tertulliano, con tutta la sua ostilità verso i monarchiani modalisti, non poteva evitare di usarle.</text:span><text:span text:style-name="T14"><text:note text:id="ftn28" text:note-class="footnote"><text:note-citation>28</text:note-citation><text:note-body><text:p text:style-name="P169">Nella teologia cristiana primitiva, si avverte la tensione e il mistero dell’incarnazione e della sofferenza Divina. Per i cristiani, affermare che 'Dio è nato' o che 'Dio ha sofferto' incarnava il paradosso centrale del Cristianesimo: un Dio che, pur essendo onnipotente, sceglie di incarnarsi e condividere la condizione umana, compresa la sofferenza e la morte. Anche Tertulliano, noto per la sua grande ostilità verso i monarchiani modalisti (negavano la distinzione tra le persone della Trinità), si trovava immerso in un contesto teologico in cui queste espressioni erano comuni. Pur opponendosi alle loro implicazioni teologiche, non poteva evitare di confrontarsi con il linguaggio e il pensiero del suo tempo, probabilmente perché queste frasi, cariche di significato, esprimevano potenti verità sentite dai credenti.</text:p></text:note-body></text:note></text:span><text:span text:style-name="T14"> La </text:span><text:soft-page-break/><text:span text:style-name="T14">differenza principale tra le due parti sta nella precisione e sistematizzazione. I monarchiani modalisti sistematizzarono la credenza popolare cristiana in Cristo in una modalità chiara e precisa. Fu un passo coraggioso per conferire un colore teologico preciso al linguaggio devozionale cristiano sempre piuttosto ambiguo. La Chiesa non poteva accettarlo a causa delle sue implicazioni pericolose. Non era altro che ingenua corporeità e patripassianismo</text:span><text:span text:style-name="T14"><text:note text:id="ftn29" text:note-class="footnote"><text:note-citation>29</text:note-citation><text:note-body><text:p text:style-name="P170">Passione del Padre. Ritiene sia stato il Padre, di cui il Figlio è solo una proiezione, a subire la passione sulla croce. </text:p></text:note-body></text:note></text:span><text:span text:style-name="T14">. Anche se salvaguardava la divinità di Gesù così come il monoteismo, l’obiettivo al quale la Chiesa aspirava, questa non poteva approvare tutto ciò, in termini così avventati, a causa delle sue sottili implicazioni. </text:span><text:span text:style-name="T48">Se Dio nella Sua totalità è presente nel Gesù storico allora la trascendenza di Dio viene annullata.</text:span><text:span text:style-name="T14"> La Chiesa pre-Nicene era intenzionata ad affermare che in qualche modo esisteva una parte di Dio, che non si è incarnata, e così permise a Dio di trascendere la Sua presenza assoluta in Gesù. Ma questa posizione confusa non era </text:span><text:soft-page-break/><text:span text:style-name="T14">accettabile per i credenti in cerca della salvezza. </text:span><text:span text:style-name="T48">I passaggi antropomorfi e corporei del Vecchio Testamento avevano svolto un ruolo importante verso l’interpretazione trina della divinità.</text:span><text:span text:style-name="T14"> Dio era noto anche per essere trascendente perché la filosofia greca si sarebbe fatta beffe di una concezione di Dio antropomorfica come di qualsiasi altra concezione rudimentale o pagana. </text:span><text:span text:style-name="T48">L’essere divino derivato</text:span><text:span text:style-name="T14"> e secondario </text:span><text:span text:style-name="T48">del sistema del Platonismo fu inizialmente utile a preservare la trascendenza assoluta di Dio e per evitare accuse di paganità</text:span><text:span text:style-name="T14">. </text:span><text:span text:style-name="T48">D’altro canto, questo tipo di nozione di divinità non era adeguata ai fini della salvezza.</text:span><text:span text:style-name="T14"> I</text:span><text:span text:style-name="T48"> credenti comuni che preferiscono la loro salvezza al di là e oltre la trascendenza di Dio, Lo hanno sacrificato sull’altare dei loro peccati. Questa tensione è rimasta intrinseca per l’intera storia della Cristologia.</text:span><text:span text:style-name="T14"> Dato che erano in gioco la trascendenza e l’ineffabilità di Dio, i difensori dell’ortodossia tranne Zefirino, il vescovo di Roma, condannarono come eretici i monarchiani modalisti. Anche se la posizione antropomorfa monarchiana continuò ad affiorare persino dopo la sua condanna, per tutta la storia della Cristianità degli uomini vennero frequentemente condannati per aver negato la divinità di Cristo, ma raramente per aver negato la distinzione tra il Padre e il Figlio. Negare la </text:span><text:soft-page-break/><text:span text:style-name="T14">prima sembrava generalmente non cristiano; mentre negare la seconda solo poco intelligente. Nonostante una forte opposizione, il Modalismo, o il palese concetto antropomorfico di Dio, restò molto diffuso, soprattutto tra i cristiani più ingenui e mediocri. Veniva condiviso dalla maggioranza della gente comune ed era in armonia con la religiosità dominante dell’epoca. Nel frattempo, un altro tipo di Monarchianismo divenne d’uso corrente sia in Oriente che in Occidente, e esaminò la questione della relazione tra Gesù e Dio dall’altro estremo. </text:span><text:span text:style-name="T48">In Occidente, Teodoto (190 d.C.) insegnava che Gesù era un uomo</text:span><text:span text:style-name="T14">. </text:span><text:span text:style-name="T48">Gesù nacque da una vergine a seguito di un’apposita disposizione di Dio per la mediazione dello Spirito Santo. La sua nascita da una vergine non fece di lui un dio o un essere divino. Dio mise alla prova la sua devozione per un periodo della vita terrena di Gesù e poi lasciò che lo Spirito Santo scendesse su di lui al momento del battesimo. Dio aveva uno scopo per lui e gli diede i mezzi per quella vocazione. Gesù divenne il Cristo al momento del suo battesimo e come risultato della sua vocazione, non a causa della sua natura celeste o divinità. Inoltre, Gesù eccelleva su tutta l’umanità in virtù e diventò un’autorità su di essa.</text:span><text:span text:style-name="T14"> La sua emanazione in nessun modo o forma smorzò la sua umanità o lo rese Dio. Egli rimase sempre </text:span><text:soft-page-break/><text:span text:style-name="T14">un servo obbediente di Dio. Teodoto si è successivamente caratterizzato per essere il fondatore della rivolta che negava Dio: l’adozionismo. </text:span><text:span text:style-name="T27">I</text:span><text:span text:style-name="T14"> nozionisti fecero uso dei passaggi biblici monoteisti, dei passaggi del Vangelo di distinzione e di subordinazione ed infine, degli evidenti passaggi evangelici che sottolineano la debole umanità e la natura terrena di Gesù. Essi furono anche in grado di trovare un equilibrio tra la trascendenza di Dio e la salvezza dell’uomo attraverso la morte redentrice di Cristo. La loro soluzione non era però adeguata per l’Ortodossia. In Oriente questo movimento fu significativamente ravvivato sotto la guida di </text:span><text:span text:style-name="T48">Paolo di Ammorsata</text:span><text:span text:style-name="T14"> </text:span><text:span text:style-name="T28">(Samosata)</text:span><text:span text:style-name="T14">, vescovo di Antiochia, la capitale della regina Zenobia del Regno di Palmira. Egli </text:span><text:span text:style-name="T48">osservò che Gesù non aveva una essenziale natura divina</text:span><text:span text:style-name="T14">. </text:span><text:span text:style-name="T48">La sua natura era puramente umana, in quanto era un uomo che veniva dalla terra e non dal cielo dotato di sostanza divina. Gesù ebbe una normale nascita umana e crebbe nella conoscenza e nella saggezza. Il Logos di Dio lo ispirò dall’alto ed entrò in lui e nella sua interiorità. Gesù non perse la sua umanità, né la sua natura umana, che rimasero sempre la natura dominante di Gesù. Era raffinato, educato e guidato dal Logos.</text:span><text:span text:style-name="T14"> L’unione fra il Logos e Gesù non era un’unione di sostanze o una fusione o una diffusione di </text:span><text:soft-page-break/><text:span text:style-name="T14">nature ma piuttosto un’unione fra volontà e qualità. </text:span><text:span text:style-name="T48">Maria non portò né consegnò il Logos divino, ma il Gesù umano, proprio come gli altri esseri umani. Inoltre, Gesù l’uomo fu consacrato nel battesimo con lo Spirito dall’alto e non il Logos.</text:span><text:span text:style-name="T14"> Gesù era speciale, nel senso che visse sotto la costante grazia divina ad un livello molto speciale. La sua unicità risiede nella sua unione fra predisposizione e volontà e non nell’unità della sua sostanza o natura con Dio. Allo stesso modo, ci è permesso di parlare di preesistenza di Gesù in relazione alla sua bontà e nel senso del grado di priorità di Dio. </text:span><text:span text:style-name="T48">E’ chiaro che Paolo non credeva nella natura divina di Gesù. D’altra parte, oltre alla sua adozione, ha cercato di dimostrare che l’ipotesi che Gesù avesse natura divina, o fosse per natura il Figlio di Dio, era dannosa per il monoteismo, in quanto portava alla dualità nella divinità. Paolo bandì dalle funzioni religio</text:span><text:span text:style-name="T50">s</text:span><text:span text:style-name="T48">e tutti i salmi della Chiesa, che esprimevano in qualche modo la divinità essenziale di Cristo. Di conseguenza, Paolo venne condannato durante un Sinodo di Antiochia tenutosi nel 268</text:span><text:span text:style-name="T14">, avendo mancato di intervenire in materia due sinodi precedenti. </text:span><text:span text:style-name="T48">Fu dichiarato eretico perché negò la preesistenza di Gesù’ e la sua unità di sostanza con Dio</text:span><text:span text:style-name="T14"> o, in altre parole, la sua reale divinità. Anche se entrambi i tipi di Monarchianismo furono </text:span><text:soft-page-break/><text:span text:style-name="T14">condannati come eretici, sfidarono e spinsero in modi diversi l’ortodossia ad esaminare le immense difficoltà che comportava la loro concezione della trascendenza e dell’unità di Dio e anche perché tentasse di chiarirla in termini comprensibili. I Padri ortodossi insistettero sul loro concetto della relativa unità di Dio attenendosi alla loro Cristologia del Logos. Entro la fine del terzo secolo, il Logos Cristologico divenne generalmente accettato da tutti i componenti della Chiesa e trovò la propria collocazione nella maggior parte delle teorie formulate in quel periodo, soprattutto in Oriente.</text:span></text:p>
      <text:p text:style-name="P80"><text:span text:style-name="T14">Anche se il Logos Cristologico, o il credo nella natura divina di Gesù, si liberò della dottrina divino-umana del Monarchianismo dinamico, la loro dottrina non passò senza lasciare traccia. Luciano di Antiochia e Ario</text:span><text:span text:style-name="T14"><text:note text:id="ftn30" text:note-class="footnote"><text:note-citation>30</text:note-citation><text:note-body><text:p text:style-name="P68">Ario (256-336), originario della Libia, studiò teologia presso la scuola di Luciano di Antiochia e divenne presbitero ad Alessandria d’Egitto. Il fulcro della dottrina di Ario è l’affermazione che Dio è unico, eterno e indivisibile, mentre Gesù Cristo, il Figlio di Dio, è stato creato. Tale posizione comporta degli sviluppi importantissimi: <text:span text:style-name="T85">1) </text:span>La natura divina è assegnata a Dio Padre e non al Figlio; <text:span text:style-name="T85">2) </text:span>Il Figlio è creato in un momento successivo da Dio Padre e quindi non è eterno. <text:span text:style-name="T85">3) </text:span>Il Figlio ha una f<text:span text:style-name="T86">u</text:span>nzione di mediatore tra Dio Padre e gli uomini: è l’unico che può permettere agli uomini di accedere al Padre. <text:span text:style-name="T85">4) </text:span>Dai punti precedenti si consegue che il Figlio è Subordinato a Dio Padre.</text:p><text:p text:style-name="P68"><text:s/></text:p></text:note-body></text:note></text:span><text:span text:style-name="T14"> furono ispirati dalle interpretazioni e dalla logica del vescovo Paolo di Samosata. Ario portò il dibattito sulla </text:span><text:soft-page-break/><text:span text:style-name="T14">natura di Cristo e la sua relazione con Dio al pubblico e provocò veemente entusiasmo. Ario sosteneva che Dio fosse uno, sia nella sostanza che nella persona. Egli è l’unico essere eterno e non-originato. Il Logos, l’essere pre-esistente, è solamente una creatura. Ci fu un tempo in cui non esisteva e quindi il Padre lo creò dal nulla. Ciò che è vero per la relazione filiale è vero per Gesù, il Figlio e Dio Padre. Il Padre esisteva prima del Figlio. Il figlio Gesù è stato creato dal Padre da una sostanza che era inesistente prima della creazione di Gesù. Ario utilizzò prove delle Sacre Scritture come Giovanni 14:28, dove Gesù aveva affermato categoricamente che il Padre è 'più grande di me' e Giovanni 17:20-26, dove Gesù aveva incoraggiato i discepoli 'perché siano una sola cosa come noi siamo una sola cosa.' Ario sosteneva che i discepoli non potevano essere un uno con Dio o Gesù in termini di incarnazione della natura o della sostanza divina, ma potevano esserlo nella volontà. Allo stesso modo, l’unità del Figlio con il Padre era quella della volontà e non della divinità o della sostanza. Inoltre veniva citato il '1 Corinzi 8:5-6' per distinguere tra Dio e Cristo. Dio è perfetto, ma il Figlio di Dio progredisce in saggezza e conoscenza e, quindi, è mutevole. Il Figlio può essere chiamato Logos, ma deve essere nettamente distinto dai logos impersonali eterni </text:span><text:soft-page-break/><text:span text:style-name="T14">o dalla ragione di Dio. L’essenza del Figlio non è identica né a quella di Dio né a quella degli esseri umani. Il Figlio, che si è incarnato in Gesù, è la prima di tutte le creature e, quindi, superiore rispetto a qualsiasi altro essere, siano angeli o uomini. A causa di ciò che ha fatto durante la sua vita terrena, mantenendo una incrollabile devozione verso la volontà divina, al Figlio vennero conferite gloria e potenza e poteva anche essere chiamato 'Dio' e adorato. Ma identificarlo con l’essenza di Dio è commettere blasfemia. La Chiesa ritenne che Ario avesse prima affermato e poi negato sia la divinità che l’umanità di Cristo. Questa teologia del 'semidio' di Ario venne respinta dai sostenitori dell’ortodossa Cristologia del Logos e infine fu sconfitta in quanto eresia. Questa alternanza tra la visione trascendentale della divinità e la redenzione attraverso la morte sacrificale di Dio era la fonte delle preoccupazioni di entrambe le parti. Gli ariani in qualche modo preferirono la trascendenza di Dio alla propria divinizzazione e presunta redenzione. Il partito ufficiale poté convivere con questa tensione e darne un senso con argomenti artificiali e presupposti irrazionali. Questo è ciò che fu raggiunto da Atanasio nel Concilio di Nicea argomentando contro Ario e la sua dottrina del Cristo definito - e il Logos Cristologico fu reso vittorioso </text:span><text:soft-page-break/><text:span text:style-name="T14">sui suoi avversari una volta per tutte. </text:span><text:span text:style-name="T48">Nel 325 d.C. l’Imperatore Costantino convocò e presiedette il Consiglio di Nicea, al fine di sviluppare una dichiarazione di fede per unificare la chiesa. Il Credo di Nicea venne scritto, dichiarando che 'il Padre e il Figlio sono della stessa sostanza '(homoousios).</text:span><text:span text:style-name="T14"> </text:span><text:span text:style-name="T48">E quando la Cristologia del Logos ottenne una vittoria completa, nella Chiesa furono condannate come inaccettabili la visione tradizionale della Divinità Suprema come una sola persona, e insieme a questa, ogni pensiero di reale e completa personalità umana del Redentore.</text:span><text:span text:style-name="T14"> Anche se Ario fu condannato come acerrimo eretico e trattato come tale per secoli, non possono essere negate la sua sincera preoccupazione per il Cristianesimo e le sue genuine intuizioni di brani delle Scritture e della storia trascendentale monoteista. </text:span></text:p>
      <text:p text:style-name="P92"><text:span text:style-name="T14">In realtà, Ario non aveva fatto nulla di nuovo a parte aver sincronizzato e sistematizzato in una forma aperta e coerente le precedenti preoccupazioni trascendentali. Inoltre, egli aveva costretto gli esponenti dell’ortodossia ad abbandonare il proprio pensiero confortante e fece loro affrontare realtà che non gradivano né erano pronti ad incontrare. La reazione degli esponenti dell’ortodossia fu proporzionalmente nociva. </text:span><text:soft-page-break/><text:span text:style-name="T14">Accusarono Ario di violare le Scritture, non accorgendosi di aver fatto lo stesso. Inoltre, furono costretti ad adottare il termine scritturale e del tutto filosofico, oltre che paradossale, di homoousios </text:span><text:span text:style-name="T29">(</text:span><text:span text:style-name="T14">della stessa sostanza, cioè consustanziale</text:span><text:span text:style-name="T29">)</text:span><text:span text:style-name="T14"> per respingere le opinioni di Ario. </text:span><text:span text:style-name="T48">Il Cristianesimo tradizionale ha evitato a lungo di porsi interrogativi reali e cruciali riguardo le sue nozioni di monoteismo trascendentale e alla sua concezione della persona di Cristo. In nome di misteri e paradossi, ha confuso a lungo molti credenti orientati razionalmente. Ario portò queste genuine perplessità nella sfera pubblica e in tal modo fece eco ai timori delle masse.</text:span><text:span text:style-name="T14"> Questa fu la vera fonte della sua popolarità. Egli potrebbe avere molti seguaci ancora oggi, persino tra i credenti contemporanei cristiani, tra i laici e allo stesso modo tra il clero. In breve, Ario era una di quelle anime avventurose ma istruite, che avevano cercato di individuare e trovare una soluzione all’irrisolto problema del rapporto di Cristo con Dio Onnipotente, tramite un’esposizione precisa e chiarezza di pensiero; fattori che avrebbero distrutto il ‘mistero’ dell’incarnazione della Chiesa. Questo mistero venne confermato dal Concilio di Nicea.</text:span></text:p>
      <text:p text:style-name="P101"><text:span text:style-name="T14">La formula di Nicea è Docetica, contraddittoria e </text:span><text:soft-page-break/><text:span text:style-name="T14">corporea. Per A. Harnack è 'assurda.</text:span><text:span text:style-name="T14"><text:note text:id="ftn31" text:note-class="footnote"><text:note-citation>31</text:note-citation><text:note-body><text:p text:style-name="P56">Adolf von Harnack, uno dei più influenti storici del Cristianesimo, considerava la dottrina della Trinità, formulata durante il Concilio di Nicea (325 d.C.), problematica da diverse prospettive. Egli sosteneva che la formula nicena, con la sua enfasi sulla consustanzialità del Padre e del Figlio, fosse in contrasto con il cristianesimo originario, che, secondo lui, era più semplice e meno dottrinale. Definire la formula di Nicea 'docetica', 'contraddittoria' e 'corporea' rappresenta una lettura critica e indica la complessità di questa definizione nel cercare di affermare sia la piena divinità che la piena umanità di Cristo. Per Harnack, la dottrina poteva sembrare un compromesso teologico che aveva perso la semplicità del messaggio cristiano originale. </text:p></text:note-body></text:note></text:span><text:span text:style-name="T14">'</text:span></text:p>
      <text:p text:style-name="P102"><text:span text:style-name="T14">25 Viene chiaramente compromessa la vera umanità di Gesù, nel tentativo di difendere rigidamente la divinità di Gesù. In effetti la storia del dogma cristiano dopo il Concilio Nicea è la storia del suo concetto di fede in un Dio-uomo. I posteri lo seguirono nel definire il Cristianesimo come una fede incentrata attorno all’opera redentrice di Gesù, il Dio-uomo, e sia il Cristianesimo orientale che quello occidentale si attennero fedelmente all’impianto più ampio della Cristologia Nicena, anche se piccole differenze vennero introdotte qua e là. </text:span><text:span text:style-name="T48">Purtroppo, non fu né lo Spirito Santo, né il Sinodo ecumenico di circa tre</text:span><text:span text:style-name="T14"> </text:span><text:span text:style-name="T48">centinaia di vescovi a guidare i lavori del Concilio. Fu l’imperatore e il suo governo dal pugno di ferro. Questo fu il fattore decisivo, anche se vennero loro manifestate delle belle parole e una sporadica deferenza. Sfortunatamente, in </text:span><text:soft-page-break/><text:span text:style-name="T48">seguito, il Cristianesimo dette grande rilevanza ed autorità alle decisioni ed ai punti di vista del Concilio, il cui carattere religioso sembrava più propenso al fervore politico e a combattere l’Arianesimo più di ogni altra cosa</text:span><text:span text:style-name="T48"><text:note text:id="ftn32" text:note-class="footnote"><text:note-citation>32</text:note-citation><text:note-body><text:p text:style-name="P171">Un aspetto cruciale del Concilio di Nicea fu il suo impatto profondamente religioso, ma anche politico. L'obiettivo principale era risolvere la controversia causata dall'Arianesimo, una dottrina proposta da Ario, che negava la consustanzialità tra il Padre e il Figlio, sostenendo che il Figlio fosse subordinato al Padre e creato nel tempo. Questa visione minava l'unità teologica e, indirettamente, la coesione dell'impero cristiano. Costantino, l'imperatore romano, aveva un chiaro interesse politico nel convocare il concilio: una Chiesa unificata significava un impero stabile. Il fervore politico si rifletteva nella determinazione con cui le autorità ecclesiastiche e imperiali cercarono di sopprimere l'Arianesimo e di consolidare la formula nicena della consustanzialità.<text:line-break/>Il Concilio di Nicea fu quindi un momento di svolta, dove la dottrina religiosa e l'autorità politica lavorarono insieme per definire la fede cristiana ortodossa e stabilire un modello di gestione delle controversie teologiche. Questa sinergia tra religione e politica è rimasta una caratteristica della storia cristiana nei secoli successivi.</text:p></text:note-body></text:note></text:span><text:span text:style-name="T48">.</text:span><text:span text:style-name="T14"> L’espressione centrale di questa confessione cristiana fondamentale è homoousios intendendo della stessa sostanza del Padre. Sebbene fosse, ovviamente, un termine teologico, non era esattamente una soluzione teologica adeguata. Era una soluzione laica, quella di definire, senza molta precisione, spiegazioni e razionalità, una divinità pura e forte in Cristo. Essa non preservava infatti né i confini tra il Dio trascendente e Cristo attraverso uno schema emanativo di un gerarchica Trinità emanativa, sotto l’influenza dei primi </text:span><text:soft-page-break/><text:span text:style-name="T14">Padri platonici, né mantenne il mistero del suo segreto chiuso nel suo scrigno. Piuttosto, portò lo schema Monarchiano nella sfera pubblica e con fiducia lo propagandò in termini chiari. Di conseguenza, venne accusato di Sabellianismo insieme ai suoi difensori, Atanasio e Marcello. Contestandolo energicamente, gli ariani sostenevano che una tale analogia e identità erano assolutamente inadeguate nella relazione tra Dio e il Logos, adducendo tre motivi a sostegno della loro posizione:</text:span></text:p>
      <text:p text:style-name="P100"><text:span text:style-name="T46">Primo</text:span><text:span text:style-name="T30"> -</text:span><text:span text:style-name="T14"> Dio Padre era auto-esistente, non-originato, eterno mentre il Figlio era prodotto dal Padre. Perciò il Padre e il Figlio non potevano essere completamente uguali. </text:span></text:p>
      <text:p text:style-name="P100"><text:span text:style-name="T46">Secondo</text:span><text:span text:style-name="T30"> - </text:span><text:span text:style-name="T14">Il Padre non era né generato né era generabile mentre il Figlio è stato generato ed è generabile.</text:span></text:p>
      <text:p text:style-name="P80"><text:span text:style-name="T46">Terzo</text:span><text:span text:style-name="T30"> - </text:span><text:span text:style-name="T14"><text:s/></text:span><text:span text:style-name="T48">Il Padre ha generato il Figlio, il Dio, mentre il Figlio non ha generato un altro Figlio. Come potrebbero essere uguali il Padre non originato e il Figlio originato? Il ragionamento degli ariani era logico, razionale e sistematico. Quello dei Padri Apostolici tradizionali, come Atanasio, d’altra parte era illogico e confuso, e le loro risposte, inoltre, auto-contraddittorie.</text:span><text:span text:style-name="T14"> La loro </text:span><text:soft-page-break/><text:span text:style-name="T14">dottrina rese il Figlio sia non generato che generato; non generato come parte di tutta la Divinità, ma generato dal Padre come una relazione all’interno della Trinità. Harnack sostiene giustamente che non vi è 'in realtà, nessuna filosofia esistente che possieda delle formule che avrebbero potuto esporre in una forma intellegibile le proposizioni di Atanasio.'</text:span></text:p>
      <text:p text:style-name="P103"><text:span text:style-name="T14">26 Lo stesso si può dire del successivo pensiero Trinitario Cristiano in generale. Il Cristianesimo era entrato nelle stanze del potere, ma l’autorità politica non era la vera soluzione per le complessità teologiche irrisolte. Queste profonde circonvoluzioni teologiche continuarono ad ossessionare le alte sfere della Chiesa, così come i credenti comuni. E’ evidente che una chiara dottrina della 'Trinità' era stata incorporata nel Credo di Nicea, nonostante una sola dichiarazione indefinita fosse stata fatta per quanto riguardava lo Spirito Santo, la terza Persona della Santissima Trinità. La divinità di Cristo (il problema centrale per il nostro studio di antropomorfismo nel cristianesimo) fu pienamente conservata e resa immune alla critica teologica, così come alla critica filosofica che aveva in precedenza screditato il Modalismo. Venne data via libera a tutti i percorsi che portavano alla divinità di Cristo, il </text:span><text:soft-page-break/><text:span text:style-name="T14">Salvatore, e a tutti gli impulsi che sfociavano nella sua esaltazione al vertice più elevato nonché alla sua venerazione, quella di Dio stesso, senza che i suoi adoratori fossero condannati per politeismo, oscurantismo o antropomorfismo. Tale enfasi non venne posta sulla parità di divinità dello Spirito Santo. La clausola dello Spirito Santo recentemente aggiunta dal Credo Niceno, fu lasciata vaga e ambigua. D’altra parte, poiché il Credo venne sostenuto al Consiglio sotto la pressione di Costantino contro le tendenze di una grande maggioranza dei vescovi presenti, non risolse la disputa teologica riguardante la divinità dello Spirito Santo. La natura di Gesù era stata decisa, ma il Concilio non riuscì ad approfondire il ruolo o la natura dello Spirito Santo, il presunto eguale e membro eterno della Trinità divina. Il Consiglio, in realtà, fornì soluzioni politiche o diplomatiche ai problemi teologici. Le decisioni arbitrarie del Consiglio riuscirono temporaneamente a pacificare le emozioni e interpretazioni contrastanti, senza grande impatto teologico o soddisfazione nel lungo termine. Le affermazioni iniziali che le decisioni del Consiglio erano dirette dalla Provvidenza dello Spirito Santo furono presto evidenziate e smentite. Occorreva solo che Costantino stesso cambiasse idea (nel 336), in </text:span><text:soft-page-break/><text:span text:style-name="T14">particolare alla sua morte, nel 337, per cambiare le cosiddette decisioni emanate dallo Spirito Santo del Concilio e le dimostrazioni della volontà divina. Tutto si ribaltò. I santi del Consiglio furono trasformati in colpevoli dal decreto imperiale e i colpevoli furono resi santi. Ario insieme alle sue cosiddette idee eretiche venne onorato e Atanasio esiliato. Le parole di Jerome sono non del tutto esagerate quando scrive, 'tutto il mondo gemette di stupore nel ritrovarsi ariano.'</text:span></text:p>
      <text:p text:style-name="P104"><text:span text:style-name="T14">27 Fu ancora una volta il potere imperiale, prima nella figura di Valentiniano (364) e poi Teodosio (380), che venne in soccorso del Credo di Nicea con alcune modifiche e integrazioni al Consiglio di Costantinopoli del 381. Vale la pena ricordare, a questo punto, i Padri della Cappadocia, Basilio Magno (330-379), Gregorio di Nazianzuz (329-389) e il fratello di Basilio, Gregorio di Nissa (329-394), tutti noti per la loro soluzione trinitaria. Sebbene fossero completamente d’accordo con Atanasio nell’attribuire una vera e propria divinità a Gesù Cristo, accettandolo come della stessa sostanza e natura del Padre, non erano però d’accordo con lui riguardo alla questione delle persone. </text:span><text:span text:style-name="T48">Secondo Atanasio, il Padre, il Figlio e lo Spirito Santo sono lo stesso essere che vive una triplice situazione.</text:span><text:span text:style-name="T14"> </text:span><text:span text:style-name="T48">Come uomo può essere un padre, un figlio e un fratello,</text:span><text:span text:style-name="T14"> </text:span><text:soft-page-break/><text:span text:style-name="T48">l’essere di Dio può essere il Padre, il Figlio e lo Spirito Santo.</text:span><text:span text:style-name="T14"> I Padri Cappadoci</text:span><text:span text:style-name="T14"><text:note text:id="ftn33" text:note-class="footnote"><text:note-citation>33</text:note-citation><text:note-body><text:p text:style-name="P56">I Padri Cappadoci, Basilio di Cesarea, Gregorio di Nissa e Gregorio Nazianzeno, giocarono un ruolo cruciale nel definire la dottrina della Trinità. Essi enfatizzavano l'idea di una ousia (essenza o sostanza) condivisa e di tre hypostaseis (persone) distinte ma in perfetta unità. Questa loro visione cercava di bilanciare l'uguaglianza divina con la distinzione personale tra il Padre, il Figlio e lo Spirito Santo.<text:line-break/>Atanasio, d'altro canto, fu un pilastro nella difesa contro l'arianesimo. Egli insistette sull'uguaglianza sostanziale tra il Padre e il Figlio, definendo il Figlio come della stessa sostanza (homoousios) del Padre. La sua interpretazione si focalizzava sull'unità della sostanza divina e considerava la Trinità come un unico Dio che vive in tre modalità o relazioni divine.</text:p></text:note-body></text:note></text:span><text:span text:style-name="T14"> non furono d’accordo. Essi sostenevano che il Padre, il Figlio e lo Spirito erano tre esseri uguali allo stesso modo, insistendo sulla loro unità, ma erano anche personalità indipendenti. Questa analogia trinitaria dei Padri Cappadoci, è uno dei due principali tipi di analogia che furono utilizzati in tutto il corso della storia cristiana per spiegare il concetto di Trinità. I Padri Cappadoci iniziarono considerando tre persone, come abbiamo appena visto, mentre </text:span><text:span text:style-name="T52">l’analogia Agostiniana enfatizzava una Trinità co-eguale, distinguendo le persone nei termini delle relazioni interiori all’interno di una persona (ad esempio memoria, volontà e intelligenza o amore, l’amante - Amans- e l’oggetto amato, quod amatur).</text:span><text:span text:style-name="T14"> Entrambe le analogie sono insoddisfacenti e contengono parecchi difetti. La prima, per esempio, potrebbe portare ad un </text:span><text:soft-page-break/><text:span text:style-name="T14">rozzo triteismo mentre la seconda potrebbe portare a Sabellianismo o Unitarianesimo. Per quanto ci si sforzi ad affermare l’eternità comune, l’attività comune e la volontà comune delle tre persone, è difficile chiamare una teologia basata su una tale definizione della comune natura </text:span><text:span text:style-name="T31">(</text:span><text:span text:style-name="T14">delle tre persone</text:span><text:span text:style-name="T31">)</text:span><text:span text:style-name="T14"> come monoteista. Anche </text:span><text:span text:style-name="T48">se la formula trinitaria della divinità dei Padri Cappadoci - una sostanza in tre persone (personae), o tre realtà indipendenti - è stata definita la formula 'scientifica,' non è riuscita a fornire alcuna soluzione intelligibile al problema che avrebbe dovuto risolvere, vale a dire la natura del Gesù storico e la sua relazione con Dio. Le parole usate per distinguere le persone nella trinità eterna erano, come ha osservato Paul Tillich, 'vuote.'</text:span></text:p>
      <text:p text:style-name="P105"><text:span text:style-name="T14">28 La formula potrebbe non condurre a Docetismo, al Sabelllianismo, o al Modalismo di Atanasio, ma potrebbe portare a qualcosa di più disastroso, vale a dire, al 'triteismo.' Sarà evidente ormai che </text:span><text:span text:style-name="T48">i Padri ortodossi</text:span><text:span text:style-name="T14"> insistettero sulla vera, perfetta, piena divinità e deità di Gesù Cristo. Essi </text:span><text:span text:style-name="T48">aspiravano a mantenere due principi reciprocamente contraddittori, vale a dire la trascendenza e l’ineffabilità di Dio nella figura di Dio Padre, e la piena incarnazione di Dio nella figura umana di Cristo.</text:span><text:span text:style-name="T14"> </text:span><text:span text:style-name="T48">Tutte le spiegazioni fornite per chiarire ciò, sia </text:span><text:soft-page-break/><text:span text:style-name="T48">come modalità, o persone, o qualsiasi altra interpretazione, tradiscono una indiscutibile corporeità e antropomorfismo.</text:span><text:span text:style-name="T14"> </text:span><text:span text:style-name="T48">E’ impossibile sostenere che un essere umano che ha vissuto una vita umana vera, storica e piena, sia infatti la piena incarnazione di Dio e quindi aspirare ad evitare o negare l’accusa di corporeità e antropomorfismo.</text:span><text:span text:style-name="T14"> Tutto ciò diventa ancora più evidente quando passiamo a discussioni riguardanti la volontà e la natura della persona di Gesù Cristo, che furono al centro delle polemiche successive. </text:span><text:span text:style-name="T48">Fu ed è sempre stato il desiderio cristiano di raggiungere la redenzione per portare i cristiani a proclamare e sostenere la divinità di Gesù Cristo.</text:span><text:span text:style-name="T14"> Dai primi Padri al Concilio di Costantinopoli un filo o un interesse comune ha intrecciato la </text:span><text:span text:style-name="T48">dottrina cristiana</text:span><text:span text:style-name="T14"> insieme, ed era la </text:span><text:span text:style-name="T48">necessità di salvaguardare l’autentica divinità di Cristo assieme a tentativi di mantenere la trascendenza di Dio.</text:span><text:span text:style-name="T14"> </text:span><text:span text:style-name="T48">Allo stesso tempo, è sempre rimasta la domanda dell’umanità di Cristo. Era impossibile negare questa umanità perché secondo i Vangeli, Gesù era stato una realtà storica. Una volta che la Chiesa, durante vari tentativi graduali, era finalmente arrivata alla conclusione che Gesù fosse Dio e pienamente divino, aveva di fronte la questione di come conciliare in qualche modo questa unità divina/ umana, di trovare un </text:span><text:soft-page-break/><text:span text:style-name="T48">equilibrio tra</text:span><text:span text:style-name="T14"> </text:span><text:span text:style-name="T48">queste e interpretarne la relazione.</text:span><text:span text:style-name="T14"> La difficoltà di considerare Cristo come divino e allo stesso tempo umano ha portato alcuni al Docetismo e gli altri all’Adozionismo. Il riconoscimento di una pura divinità assoluta di Gesù, rese il problema più acuto e insistente. Solo pochi decenni dopo il Concilio di Nicea, il pendolo oscillò completamente nella direzione opposta. Il focus ora non era più sulla preesistenza del Figlio o sulla relazione tra Dio Figlio e il Padre, ma piuttosto sulla relazione tra Dio e l’uomo nella persona del Gesù storico. La formulazione del Dio incarnato del Consiglio, venne considerata troppo metafisica per essere una parte intelligibile della vera storia umana. Se Gesù era veramente Dio incarnato allora qual era la sua reale natura, umana o divina? La storia umana non aveva alcun parallelo per spiegare questo paradigma dell’incarnazione così come comprenderlo in termini logici umani? Fu Apollinare (morto nel 390 d.C.), vescovo di Laodicea e caro amico di Atanasio, a proporre una soluzione a questo complesso problema, che fosse in qualche modo razionale. Portò la Cristologia Alessandrina del Verbo che si fa carne che era stata lungamente accettata, ai suoi limiti logici. Come accennato in precedenza, per Atanasio e il Credo di Nicea, la divinità assoluta di Cristo era da considerarsi </text:span><text:soft-page-break/><text:span text:style-name="T14">essenziale per garantire la redenzione ed era ritenuto con fermezza che solo il vero Figlio di Dio potesse rivelare Dio all’uomo. Aderendo a questa Cristologia del Verbo che si fa carne, Apollinare sosteneva che questo atto di redenzione non potrebbe essere possibile senza la deificazione dell’uomo Gesù Cristo. Pertanto, sosteneva che Gesù aveva una sola natura teantropica o divino-umana. Egli asseriva che il Verbo divino veniva sostituito dalla normale anima umana in Cristo. Egli affermò che la carne di Cristo era 'carne divina' o 'la carne di Dio' ed era il vero e proprio oggetto di culto. Era praticamente una chiara tendenza Docetica e sottintendeva che Cristo non fu veramente un uomo, ma che apparve solamente come uomo. Questo fu il culmine della massima tendenza non-corporea che era fin da principio una parte del pensiero della Chiesa, ma spesso celata. Ciò significava che Cristo nella sua incarnazione aveva mantenuto la sua anima divina, la natura o ousia e non aveva adottato un’anima o natura razionale umana. Questo 'Monofisismo,' come fu poi chiamato, fu un’altra espressione di Monarchianismo. D’altra parte, i rappresentanti della scuola di Antiochia sfidarono il ‘Monofisismo’ o Apollinarianismo con il loro dogma Cristologico scientifico. In generale, l’interesse degli Antiochiani per Gesù era più etico che redentivo. </text:span><text:soft-page-break/><text:span text:style-name="T48">Gesù non avrebbe potuto essere un modello etico perfetto se non fosse stato un essere umano completo con libero arbitrio e una vera e propria personalità umana.</text:span><text:span text:style-name="T14"> La loro Cristologia corrispondeva più allo schema del 'Verbo che si fa uomo' che allo schema di Alessandria del 'Verbo che si fa carne,' Enfatizzarono la perfetta umanità di Cristo. Per conformare il loro parere alla Cristologia del Logos e alla dottrina Nicena dell’autentica divinità di Cristo, non avevano altra scelta se non rivendicare due nature di Cristo: una completa umana e l’altra completa divina, ognuna con una piena personalità completa e tutte le qualità e le facoltà che la accompagnano. Nessuna di queste persone o nature si mescola con l’altra. Essi negarono enfaticamente la trasformazione o la trasmutazione del Logos nella carne. Ritenevano che la natura divina non avesse modificato la natura umana. </text:span><text:span text:style-name="T48">Gesù, avendo natura umana, per grazia ricevuta e libero arbitrio</text:span><text:span text:style-name="T14"> poteva seguire la natura divina. Pertanto, </text:span><text:span text:style-name="T48">si potrebbe dire che Maria aveva dato alla luce un Dio</text:span><text:span text:style-name="T14">. Questa era una affermazione chiaramente metaforica piuttosto che di sostanza. </text:span><text:span text:style-name="T48">La scuola di Antiochia è un altro riflesso della natura contraddittoria degli scritti del Nuovo Testamento. Da un lato sottolineano il monoteismo trascendentale, e l’umanità fragile di Gesù e la sua </text:span><text:soft-page-break/><text:span text:style-name="T48">subordinazione al Dio Onnipotente, mentre in altre occasioni sembrano attribuire una sorta di qualifica divina a Gesù</text:span><text:span text:style-name="T14">, soprattutto negli scritti Paolini e Giovannei. I tradizionalisti tendenti al raggiungimento della salvezza attraverso la morte redentrice di Gesù e la loro unione con la divinità si protesero verso le interpretazioni giovannee e le spinsero ai loro limiti. </text:span><text:span text:style-name="T48">I credenti razionali sono sempre stati preoccupati dal pericolo che pone questo approccio per il monoteismo trascendentale e per la religiosità etica.</text:span><text:span text:style-name="T14"> </text:span><text:span text:style-name="T48">Cristianesimo è il nome e il prodotto di queste tendenze e preoccupazioni antitetiche e diametralmente opposte. Molti credenti innocenti e sinceri hanno dovuto pagare per la natura contraddittoria dei loro scritti biblici. Nestorio è un buon esempio di questo incubo teologico.</text:span><text:span text:style-name="T14"> La controversia circa la persona di Cristo giunse al culmine dello scontro nel V secolo, quando Nestorio</text:span><text:span text:style-name="T14"><text:note text:id="ftn34" text:note-class="footnote"><text:note-citation>34</text:note-citation><text:note-body><text:p text:style-name="P56">La questione sollevata da Nestorio è una delle più affascinanti e complesse nella storia del Cristianesimo. Il suo rifiuto di attribuire a Maria il titolo di 'Madre di Dio' (Theotokos) rifletteva la sua concezione della duplice natura di Cristo: umana e divina, distinte ma armonizzate. Questa posizione lo portò a uno scontro con le autorità ecclesiastiche del tempo e culminò nel Concilio di Efeso del 431, dove fu condannato per eresia e la sua dottrina venne dichiarata incompatibile con l'ortodossia cristiana. La sua prospettiva metteva in luce una tensione teologica tutt'oggi dibattuta: come si può conciliare l'unità di Cristo senza confondere o separare le sue nature?</text:p></text:note-body></text:note></text:span><text:span text:style-name="T14">, un membro più giovane della scuola antiochena, </text:span><text:soft-page-break/><text:span text:style-name="T14">divenne vescovo di Costantinopoli (428). Protestò contro la tendenza molto comune tra le masse, soprattutto tra i monaci nel quartiere della capitale, di esaltare la Vergine Maria come 'Madre di Dio' o 'Theotokos.' Egli rimarcò che ‘Dio non è un bambino di due o tre mesi.’</text:span></text:p>
      <text:p text:style-name="P42">29 Nestorio credeva che Gesù avesse due nature. Egli sosteneva che prima dell’unione dell’uomo e del Logos in Gesù, l’uomo era una persona distinta da Logos.</text:p>
      <text:p text:style-name="P43">30 Per Nestorio era un’unione 'perfetta,' 'esatta' e 'continua.'</text:p>
      <text:p text:style-name="P106"><text:span text:style-name="T14">31 A differenza della visione Cristologica Alessandrina che confermava l’unione 'ipostatica o naturale,' la sua visione di unione era 'volontaria.' Nestorio subì un’ anatema di scomunica dal V Concilio ecumenico a Costantinopoli (533) per la sua presunta eresia di due nature e due persone. </text:span><text:span text:style-name="T48">Se lo osserviamo dal punto di vista del nostro studio, diventa evidente che il Cristianesimo tradizionale, per il bene della salvezza e della redenzione, ha sempre avuto l’intenzione di crocifiggere Dio e ha rifiutato tutti gli sforzi volti a far sì che la crocifissione fosse la sofferenza di un semplice essere umano.</text:span><text:span text:style-name="T14"> Questa è evidente corporeità, e non poteva essere sostenuta in base a teologia speculativa o a qualsiasi sforzo logico da solo. Viene richiesto il </text:span><text:soft-page-break/><text:span text:style-name="T14">supporto dello Stato, e del potere politico e di sfruttamento messi a disposizione di numerosi teologi tradizionali del 'Logos che si fa carne' per sopprimere tutte le richieste razionali e stimolanti. Inoltre, questo atto di bestemmiare Dio, per usare le parole di Nestorio, non avrebbe potuto essere compiuto dallo Spirito Santo, come ha sempre sostenuto la cosiddetta Ortodossia, ma piuttosto dai poteri politici di imperatori pagani</text:span><text:span text:style-name="T14"><text:note text:id="ftn35" text:note-class="footnote"><text:note-citation>35</text:note-citation><text:note-body><text:p text:style-name="P56"><text:span text:style-name="T87">Lo scetticismo di Nestorio</text:span> nei confronti dell'incarnazione non era soltanto una questione teologica, ma anche una critica alla crescente influenza politica e ideologica che il Cristianesimo aveva assunto sotto gli imperatori romani. Nestorio vedeva nel dogma dell'Incarnazione non solo una distorsione teologica, ma anche un prodotto del potere imperiale, che voleva unificare la fede sotto un'unica dottrina funzionale al controllo dello Stato. </text:p></text:note-body></text:note></text:span><text:span text:style-name="T14"> e a volte laici. </text:span></text:p>
      <text:p text:style-name="P107"><text:span text:style-name="T14">In conclusione vale la pena citare il celebre passo di Nestorio, che ha scritto: </text:span><text:span text:style-name="T45">E’ mio più vivo desiderio che, anche se lanciano anatemi su di me, possano evitare di bestemmiare Dio e che coloro che si sottraggono a ciò, possano ammettere Dio, il santo, l’onnipotente e l’immortale, e non cambino l’immagine del Dio incorruttibile con l’immagine dell’uomo <text:s text:c="17"/>corruttibile mescolando il paganesimo al cristianesimo ... ma che Cristo possa essere dichiarato in verità e in natura sia Dio che uomo, essendo per natura immortale e </text:span><text:soft-page-break/><text:span text:style-name="T45">insuperabile in quanto Dio, e invece mortale e superabile in natura in quanto uomo - non Dio in entrambe le nature, né un’altra volta uomo in entrambe le nature. L’obiettivo del mio più sincero desiderio è che Dio sia benedetto in terra come in cielo; ma per Nestorio lasciate che sia anatema; lascia che gli uomini parlino di Dio mentre io prego per loro che possano parlare. Poiché io sono con coloro che sono per Dio, e non con quelli che sono contro Dio, che con una dimostrazione esteriore</text:span><text:span text:style-name="T14"> </text:span><text:span text:style-name="T45">di religione rimproverano Dio e Lo inducono a cessare di essere Dio.</text:span></text:p>
      <text:p text:style-name="P108"><text:span text:style-name="T14">32 </text:span><text:span text:style-name="T48">Le parole di Nestorio parlano da sole. Chiunque consideri Maria come la madre di Dio come diamine può accettare che il Logos Dio abbia trascorso nove mesi nel grembo di una donna, sia cresciuto come un bambino, abbia nutrito tutti i bisogni umani, chiamato Dio con suppliche di abbandono 'O Dio mio, O, Dio mio, perché mi hai abbandonato?' e sia poi morto sulla croce, negando le accuse di paganesimo? </text:span><text:span text:style-name="T45">Questa è stata ed è ancora la vera sfida e battaglia del cristianesimo popolare.</text:span><text:span text:style-name="T14"> </text:span><text:span text:style-name="T48">La Chiesa cercò di risolvere questo mistero con la Definizione di Calcedonia per cui Gesù aveva due nature, una divina e una umana, entrambe complete</text:span><text:span text:style-name="T14">. Era solo un tentativo di risolvere un problema Cristologico di lunga data, ma non fornì categorie logiche o intelligibili in alcun modo, aspetto, forma, per </text:span><text:soft-page-break/><text:span text:style-name="T14">rispondere in modo soddisfacente alle domande sulla persona di Gesù o sulle difficoltà relazionali interne. In realtà che Cristo fosse al tempo stesso un Dio e un uomo completo veniva più presunto che spiegato. Che tipo di uomo fosse quando non aveva la natura peccaminosa era una questione né affrontata né risolta. La sua umanità non era né una umanità completa come quella degli esseri umani ordinari, né la sua divinità era come quella del Padre. Il tutto era in realtà un miscuglio di presuntuosa confusione, piuttosto che teologia razionale. La figura di Gesù con due teste (una umana e una divina) è una strana figura mostro. E’ più inintelligibile ed esposta a domande più sottili e curiose perfino delle posizioni del Docetismo o del Monarchianesimo. </text:span><text:span text:style-name="T48">E’ impossibile determinare secondo logica la linea di demarcazione tra Dio e uomo, pur insistendo sulla loro unità, come asserisce il dogma tradizionale. Per esempio, chi determina quando Dio agisce in Gesù e quando l’uomo in Gesù sta governando le sue azioni?</text:span><text:span text:style-name="T14"> Non c’è né una guida adeguata né alcuna formula specifica proposta dalle Scritture. Lo Spirito Santo è stato così spesso soppresso o eluso allo stesso modo da imperatori e politici della Chiesa, che le affermazioni sulla sua astratta provvidenza non hanno alcun vero significato reale a tale riguardo. </text:span><text:span text:style-name="T53">La figura che </text:span><text:soft-page-break/><text:span text:style-name="T53">muore sulla croce è il Gesù umano oppure è Gesù come Dio? Se è Dio, allora a quale Dio diverso da sé si stava rivolgendo? Se la figura morta era l’uomo Gesù, allora la salvezza non è completa.</text:span><text:span text:style-name="T14"> </text:span></text:p>
      <text:p text:style-name="P108"><text:span text:style-name="T14">La formula di Calcedonia</text:span><text:span text:style-name="T14"><text:note text:id="ftn36" text:note-class="footnote"><text:note-citation>36</text:note-citation><text:note-body><text:p text:style-name="P56">La Formula di Calcedonia, adottata nel Concilio di Calcedonia nel 451 d.C., è una dichiarazione fondamentale della teologia cristiana sulla natura di Cristo. Essa afferma che Gesù Cristo è riconosciuto in due nature, senza confusione, senza cambiamento, senza divisione, senza separazione.</text:p></text:note-body></text:note></text:span><text:span text:style-name="T14"> era teologicamente problematica quanto le precedenti soluzioni Cristologiche, se non di più. L’uomo storico Gesù, fu dichiarato possedere due distinte nature, entrambe perfette, sia quella umana che quella divina, unificate in una sola persona teantropica il Logos, il Figlio di Dio. Inoltre egli era differente dagli esseri umani ordinari perché era senza peccato. La contraddizione è da capogiro! Gesù è un uomo, ma non come gli uomini. Se la persona di Cristo si compone di due nature, due volontà, ma in realtà è identica alla natura e alla conoscenza divina piuttosto che alla natura umana, allora si può pienamente giustificare chi chiede, come fa Maurice Wiles</text:span><text:span text:style-name="T14"><text:note text:id="ftn37" text:note-class="footnote"><text:note-citation>37</text:note-citation><text:note-body><text:p text:style-name="P56">Maurice Wiles, noto teologo anglicano, ha sollevato interrogativi profondi sulla “autenticità dell'umanità di Cristo”, mettendo in discussione quanto la sua volontà umana possa essere veramente umana se è sempre in perfetta armonia con la volontà divina. Secondo Wiles, la tradizionale dottrina cristologica potrebbe ridurre l'umanità di Cristo a una sorta di apparenza, piuttosto che a una realtà pienamente vissuta. Questa prospettiva si inserisce in un dibattito più ampio sulla “teologia della comunicazione delle nature”, ovvero su come la natura divina e quella umana interagiscano nella persona di Cristo. Alcuni teologi sostengono che, se Cristo possiede una volontà umana distinta, allora deve aver sperimentato anche il conflitto e la tensione tipici della condizione umana. Altri, invece, affermano che la sua volontà umana, pur essendo autentica, era sempre perfettamente orientata alla volontà divina, evitando così ogni dissonanza. La domanda di Wiles è provocatoria perché sfida la comprensione tradizionale della “unicità di Cristo” e invita a riflettere su cosa significhi essere veramente umano. Se l'umanità di Cristo è priva di errori, dubbi o tensioni interiori, può essere considerata autentica? Oppure la sua esperienza umana è qualitativamente diversa da quella di ogni altro essere umano?</text:p><text:p text:style-name="Footnote"/><text:p text:style-name="Footnote"/></text:note-body></text:note></text:span><text:span text:style-name="T14">, quanto possa essere autentica questa </text:span><text:soft-page-break/><text:span text:style-name="T14">umanità e 'quanto autenticamente umana viene così qualificata una volontà umana?'</text:span></text:p>
      <text:p text:style-name="P109"><text:span text:style-name="T14">33 </text:span><text:span text:style-name="T53">Tuttavia, nonostante le sue debolezze insite, la definizione di Calcedonia di un unico essere con due teste o nature (umana e divina) è rimasta la dottrina ufficiale dell’ortodossia Cristiana ai tempi attuali.</text:span><text:span text:style-name="T14"> Deve ancora apparire al mondo un teologo o un filosofo che possa risolvere queste contraddizioni e spiegare in termini comprensibili la dottrina di Calcedonia della persona di Cristo. </text:span><text:span text:style-name="T48">Se non si può risolvere il problema, bisogna semplicemente accettarlo per buono. Questa è fede a scapito della logica umana e della precisione intellettuale.</text:span><text:span text:style-name="T52"> Quanto è illogico, impossibile, contraddittorio non può essere giustificato in nome del paradosso, questo è un insulto all’intelligenza umana</text:span><text:span text:style-name="T48">;</text:span><text:span text:style-name="T14"> </text:span><text:soft-page-break/><text:span text:style-name="T14">La Fede è l’esposizione della Verità, e deve essere documentata dai fatti, non è possibile crearli. </text:span><text:span text:style-name="T48">Nascondere dietro cortine fumogene di mistero, fede cieca, misticismo, spiritualità e/o la provvidenza dello Spirito ecc. è fare della Scrittura un non senso e semplicemente creare soggezione verso ciò che rende omaggio ad una mentalità primitiva e superstiziosa.</text:span><text:span text:style-name="T14"> Inoltre, è una prerogativa delle fede quella di essere resa accessibile a tutti, e non solo a pochi eletti in grado di comprendere le tortuosità intellettuali di dottrine basate sul mistero. </text:span><text:span text:style-name="T48">In realtà, la storia del dogma trinitario è così satura di intrighi politici, di necessità assolute dello Stato, fattori di sfruttamento che si muovono attraverso i corridoi del potere e così via, che la Scrittura esistente sembra avere un ruolo di secondo piano rispetto all’opportunità politica.</text:span><text:span text:style-name="T14"> E l’impronta monolitica della dottrina esisteva da così tanto tempo che il tutto è ormai dato per scontato. Il punto della questione è che nella Trinità abbiamo sia l’esposizione di una verità illogica, o ciò che rischia di non essere compreso, eresia e scandalo teologico di grandi dimensioni. Non c’è via di mezzo. </text:span><text:span text:style-name="T48">Nel corso della loro storia, i cristiani hanno cercato di salvare dalla corporeità e dagli antropomorfismi il Dio trascendente, ma il loro desiderio di salvezza ha molto spesso portato </text:span><text:soft-page-break/><text:span text:style-name="T48">al contrario.</text:span><text:span text:style-name="T14"> </text:span><text:span text:style-name="T52">Questo probabilmente fu tra i fattori che hanno guidato la versione islamica di trascendenza e monoteismo, osserva K. Armstrong, a diffondersi con stupefacente rapidità in tutto il Medio Oriente e Nord Africa. Molti dei suoi entusiasti convertiti in queste terre (in cui l’ellenismo non era di casa) si allontanarono con sollievo dal Trinitarismo greco, che esprimeva il mistero di Dio in un linguaggio che era loro estraneo e adottarono una nozione più semitica della realtà divina.</text:span></text:p>
      <text:h text:style-name="Heading_20_3" text:outline-level="3"><text:bookmark-start text:name="__RefHeading___Toc9477_2708660065"/>Quarto Capitolo<text:bookmark-end text:name="__RefHeading___Toc9477_2708660065"/></text:h>
      <text:h text:style-name="Heading_20_4" text:outline-level="4"><text:bookmark-start text:name="__RefHeading___Toc9479_2708660065"/><text:span text:style-name="T56">L'antropomorfismo e il Corano </text:span><text:span text:style-name="T57">n</text:span><text:span text:style-name="T56">ell’Islam Dio è solo trascendente e maestoso.</text:span><text:bookmark-end text:name="__RefHeading___Toc9479_2708660065"/></text:h>
      <text:p text:style-name="P110"><text:span text:style-name="T14">La fede è contrassegnata da un rigoroso monoteismo etico senza compromessi, a significare l’assoluta Unicità, Unità, Singolarità e Trascendenza di Dio, nel suo senso più alto e più puro, e che elimina formalmente e in modo inequivocabile tutte le nozioni di politeismo, panteismo, dualismo, monolatria, enoteismo, triteismo, trinitarismo, e senza dubbio ogni postulato o concezione di presenza di persone nella divinità di Dio. Perciò è una verità universale che l’Islam tradizionale abbia sempre sottolineato l’assoluta trascendenza e l’unità di Dio, evitando nozioni corporee e immagini </text:span><text:soft-page-break/><text:span text:style-name="T14">antropomorfe del Suo essere. Tuttavia, questa comprensione della trascendenza non è astratta nel senso filosofico del termine, in quanto molte espressioni poetiche vengono utilizzate nel Corano per definire un tipo di modalità divina ancora vaga per quanto concerne Dio, in modo da rendere la divinità trascendente immanente e viva, e per fornire ampie possibilità di sviluppo di una relazione significativa con Lui. Questa vaga modalità è sufficiente per soddisfare le esigenze comunicative umane. Ci sono alcune espressioni del Corano, che se prese in modo assolutamente letterale, potrebbero portare a percezioni leggermente antropomorfe della Divinità, e queste espressioni apparentemente antropomorfe sono state al centro del dibattito dei teologi musulmani per secoli. Quindi, espressioni, che si riferiscono alla ‘mano,’ alla ‘faccia,’ agli ‘occhi’ di Dio, anche se poco numerose, sono considerate come un mistero dalla maggior parte degli studiosi musulmani e vengono spesso accettate così come sono con la dichiarazione del bilā kayfa</text:span><text:span text:style-name="T14"><text:note text:id="ftn38" text:note-class="footnote"><text:note-citation>38</text:note-citation><text:note-body><text:p text:style-name="P56">Il termine 'bilā kayfa' è un'espressione teologica araba utilizzata nella tradizione islamica, in particolare nell'ambito della dottrina dell'Ash'arismo. Significa letteralmente 'senza sapere come' e viene impiegato per accettare determinati attributi di Dio senza indagarne la modalità. Nel contesto della teologia islamica, questa espressione è strettamente legata alla negazione dell'antropomorfismo, cioè alla rappresentazione di Dio con caratteristiche umane. I teologi ash'ariti accettavano i versetti del Corano che descrivono Dio con attributi apparentemente umani (ad esempio, 'la mano di Dio'), ma lo facevano 'bilā kayfa', ovvero senza domandarsi come questi attributi esistano nella realtà divina, riconoscendo la trascendenza assoluta di Dio.</text:p></text:note-body></text:note></text:span><text:span text:style-name="T14"> </text:span><text:soft-page-break/><text:span text:style-name="T14">(letteralmente: 'senza un come,' ma in senso figurato: 'in un modo che si adatta alla Sua maestosità e trascendenza') oppure interpretate metaforicamente. L’accettazione di bilā kayfa per queste frasi è sempre accompagnata dalla negazione assoluta di qualsiasi somiglianza tra Dio e le Sue creature (antropomorfismo) e con reiterata enfasi sulla alterità divina e sulla trascendenza di Dio. </text:span><text:span text:style-name="T48">La totale sottomissione alla volontà morale di questo Dio trascendente e unico, è l’Islam</text:span><text:span text:style-name="T14">. La trascendenza divina è l’essenza del messaggio coranico. </text:span><text:span text:style-name="T48">La visione</text:span><text:span text:style-name="T14"> </text:span><text:span text:style-name="T51">coranica </text:span><text:span text:style-name="T48">del mondo divide la realtà in due mondi</text:span><text:span text:style-name="T14"> generali, </text:span><text:span text:style-name="T48">Dio e non Dio</text:span><text:span text:style-name="T14">. </text:span><text:span text:style-name="T48">Dio è il Creatore Eterno e non c’è nulla di simile a Lui</text:span><text:span text:style-name="T14">. Egli rimane per sempre l’Altro trascendente privo di qualsiasi somiglianza, similitudine e associazione. Egli è quell’essere unico che solo può essere chiamato la Realtà e l’Essere, poiché tutto ciò che è altro da Lui deriva la sua realtà, la sua esistenza ed il suo essere da Lui. Allah, la parola araba per Dio, è semanticamente la parola su cui più è incentrato il Corano. </text:span><text:span text:style-name="T48">La visione del mondo coranica è teocentrica fino al midollo</text:span><text:span text:style-name="T14">. Ontologicamente nulla può essere uguale o contrario a Lui. Egli rimane sempre </text:span><text:soft-page-break/><text:span text:style-name="T14">l’Altro trascendentale che presiede l’intero sistema dell’esistenza come suo Maestro e Creatore. Ogni cosa diversa da Lui è una Sua creatura ed è inferiore a Lui nella gerarchia degli esseri. </text:span><text:span text:style-name="T48">Il secondo mondo è costituito da ogni cosa eccetto Dio</text:span><text:span text:style-name="T14">. </text:span><text:span text:style-name="T48">È l’ordine dello spazio-tempo, della creazione e dell’esperienza.</text:span><text:span text:style-name="T14"> Ontologicamente questi due ordini rimangono sempre separati. </text:span><text:span text:style-name="T48">Il Creatore non scende nel regno dello spazio-tempo e dell’esperienza per unirsi, incarnarsi, diffondersi o confondersi con le creature, né le creature possono ascendere per unirsi ontologicamente o per disperdersi nel Creatore</text:span><text:span text:style-name="T14">. </text:span><text:span text:style-name="T48">Egli rimane sempre il totalmente Sublime Altro trascendente.</text:span><text:span text:style-name="T14"> Questo è il concetto coranico dell’Unità divina. Questo è il filo che attraversa l’intero corpus del Corano come nucleo del suo messaggio. Tutti i concetti, idee e ideologie coraniche si intrecciano per individuare, elaborare e descrivere questa reale dottrina dell’Unicità, Unità, e Trascendenza di Dio, e per incoraggiare l’umanità a stabilire una relazione significativa e vera con Lui. </text:span><text:span text:style-name="T48">C’è così tanta enfasi nel Corano sull’Unicità, Unità e Singolarità di Dio Onnipotente, che nessun tentativo sembra essere lasciato intentato per rendere evidente tutto ciò anche ad un lettore superficiale</text:span><text:span text:style-name="T14">. Inoltre, </text:span><text:span text:style-name="T48">il concetto coranico di 'Monoteismo' non è né graduale né </text:span><text:soft-page-break/><text:span text:style-name="T48">ambiguo. Non è né confuso né contraddittorio. E’ monoteista e teocentrico per definizione stessa.</text:span><text:span text:style-name="T14"> E’ negativo, affermativo, razionale, normativo e auto-esplicativo. </text:span><text:span text:style-name="T48">Il monoteismo coranico non inizia con la monolatria o con affermazioni dell’esistenza o dell’Unicità della Divinità. Comincia negando decisamente tutti i concetti, generi, idee, comprensioni e illusioni che ci possa essere un Dio o una divinità diversa dal Solo ed Unico Dio.</text:span><text:span text:style-name="T14"> Si inizia con il Credo dell’Islam 'Lā ilāha illā Allāh, Muhammadun rasūl Allāh', che significa 'Non c'è altro dio all'infuori di Allah, e Muhammad è il Suo Profeta.' </text:span><text:span text:style-name="T48">L¥ il¥ha illa All¥h, la sh¥hadah</text:span><text:span text:style-name="T48"><text:note text:id="ftn39" text:note-class="footnote"><text:note-citation>39</text:note-citation><text:note-body><text:p text:style-name="P56">Questa dichiarazione è il primo dei Cinque Pilastri dell'Islam e segna l'ingresso formale nella fede islamica. È recitata quotidianamente nelle preghiere e viene pronunciata con sincerità da chi desidera diventare musulmano. La Shahādah deriva direttamente dal Corano e sintetizza l'essenza del monoteismo islamico, escludendo qualsiasi forma di politeismo o associazione di altri esseri con Dio.</text:p></text:note-body></text:note></text:span><text:span text:style-name="T14">, o professione di fede, che deriva dal Corano stesso. L’intero Corano è un commentario di queste quattro parole, o una loro amplificazione. La prima parte di questa dichiarazione, L¥ il¥ha, nega l’esistenza di qualsiasi altro falso dio, e condanna la falsa devozione, il culto, e le idee di dipendenza da tali dèi. La professione di fede (Shah¥dah) è un impegno verso un radicale monoteismo trascendentale. Mediante la prima parte della Shah¥dah, viene </text:span><text:soft-page-break/><text:span text:style-name="T14">assolutamente negata l’esistenza di un dio qualsiasi e oggetto di culto, così come la sua realtà. Con un imperioso 'No' tutte le allusioni di molteplicità, autosufficienza, deità e divinità vengono in un solo colpo mandate in frantumi. La terza parola della professione di fede illa è il legame e l’istmo tra ciò che viene negato e ciò che si afferma. Tutto ciò che è negato è finalmente stabilito dalla quarta parola Allah. Significa che non c’è realtà, non c’è dio, né essere autosufficiente eccetto Allah, la vera Realtà. La seconda parte della Shah¥dah contiene un corollario immediato sulla missione e la Profezia di Muhammad. E dice, 'Muhammadun rasūl Allāh,' e Muhammad è il messaggero di Dio.' La vera Realtà è storicamente rivelata attraverso la missione e la profezia di Muhammad. Il Profeta Muhammad è l’incarnazione del messaggio divino e non un riflesso della Persona divina. Nel Corano, la formulazione unitaria islamica con la sua forma L¥ il¥ha, si riscontra 41 volte. Questo in aggiunta alle numerose altre forme che il Corano utilizza per negare la deità o la divinità in qualsiasi forma o modo. Il pronunciamento di questa professione di fede è la dichiarazione dell’Unità, Unicità e Trascendenza di Dio. Forse questa è la ragione per cui è stata menzionata nel Corano e nelle tradizioni profetiche (Sunnah) più </text:span><text:soft-page-break/><text:span text:style-name="T14">frequentemente di qualsiasi altra frase. </text:span><text:span text:style-name="T48">Il Corano rifiuta categoricamente il concetto cristiano della Trinità o la divisione in persone della Divinità.</text:span><text:span text:style-name="T14"> </text:span><text:span text:style-name="T48">Il Corano afferma di essere stato rivelato per correggere gli eccessi degli ebrei e dei cristiani contro Dio.</text:span><text:span text:style-name="T14"> La tradizione cristiana ha affermato di aver creduto nel monoteismo, ma, per il Corano, il dogma cristiano della Trinità e dell’incarnazione era una chiara violazione dell’unità e della trascendenza divina. Vale la pena notare che queste affermazioni del Corano rifiutano fortemente sia le interpretazioni della Trinità agostiniane che quelle della Cappadocia</text:span><text:span text:style-name="T14"><text:note text:id="ftn40" text:note-class="footnote"><text:note-citation>40</text:note-citation><text:note-body><text:p text:style-name="P56"><text:span text:style-name="T88">I</text:span>l Corano respinge con forza la dottrina cristiana della Trinità, inclusa sia l'interpretazione agostiniana che quella dei Padri Cappadoci. Questo rifiuto è espresso chiaramente in diversi versetti, come nella Sura 4:171, dove si afferma: "<text:span text:style-name="T89">Non dite</text:span> <text:span text:style-name="T89">'Tre': smettete, sarà meglio per voi. Allah è un Dio unico."</text:span></text:p></text:note-body></text:note></text:span><text:span text:style-name="T14">. </text:span><text:span text:style-name="T48">Il Corano rimprovera al dogma cristiano di confondere il regno trascendente con la sfera funzionale del bisogno e della necessità.</text:span><text:span text:style-name="T14"> La Bibbia, così come la visione di Dio giudaico/cristiana avevano lasciato molti problemi irrisolti; </text:span><text:span text:style-name="T48">la narrazione coranica è giunta a purificare la concezione confusa, contraffatta e a tratti mistica del Divino che era venuta a prevalere, espressa ad esempio in idee, come l’incarnazione, la corporeità e l’antropomorfismo corporeo di Dio.</text:span><text:span text:style-name="T14"> La teologia monoteista non è una novità nella storia delle </text:span><text:soft-page-break/><text:span text:style-name="T14">tradizioni religiose occidentali. Tuttavia, il monoteismo radicale dell’Islam offre soluzioni particolari alle difficili e spinose questioni sulla natura di Dio, sul libero arbitrio e sulla predestinazione, sulla relazione tra il bene e il male (la teodicea), e sui motivi della rivelazione. </text:span><text:span text:style-name="T48">L’insistenza islamica sulla trascendenza assoluta e sulla perfetta unità Dio è piuttosto caratteristica tra le tradizioni semitiche.</text:span><text:span text:style-name="T14"> Oltre a insistere sulla unità, unicità e trascendenza di Dio, affermando ciò ripetutamente, il Corano attacca violentemente ogni forma di idolatria, monolatria e politeismo. Shirk, l’atto di associare ßall¥ All¥hu ¢alayhi wa sallam: ‘La pace e le benedizioni di Dio siano su di lui.’ Viene detto ogni volta che il nome del Profeta Muhammad è menzionato, qualcosa o qualcuno a Dio, è secondo il Corano, l’unico peccato imperdonabile. Oltre agli avvertimenti terribili contro lo Shirk</text:span><text:span text:style-name="T14"><text:note text:id="ftn41" text:note-class="footnote"><text:note-citation>41</text:note-citation><text:note-body><text:p text:style-name="P56">In Islam, Shirk è considerato il peccato più grave e consiste nell'associare qualcuno o qualcosa ad Allah, il Dio unico e indivisibile. È un atto che contraddice il principio fondamentale del Tawhid, l'unicità di Allah, che è il cardine della fede islamica.</text:p></text:note-body></text:note></text:span><text:span text:style-name="T14">, </text:span><text:span text:style-name="T48">il Corano ha negato con veemenza l’esistenza di dei come di ogni divinità ad eccezione di Dio l’Onnipotente. Pertanto le divinità adorate all’infuori di Allah non sono altro che invenzioni umane senza una propria realtà indipendente.</text:span><text:span text:style-name="T14"> Deve essere sottolineato che il Corano non si limita solamente ad attaccare tutti i </text:span><text:soft-page-break/><text:span text:style-name="T14">tipi di politeismo, ma sottolinea più volte il concetto che i falsi dei non hanno alcuna esistenza propria, non essendo altro che un prodotto della fantasia dei loro fedeli. Non esiste nessuno che possa possedere un minimo di potere o capacità per beneficiare o danneggiare gli esseri umani se non con il permesso di Dio. Il Corano ha categoricamente smentito tutti i tipi di politeismo, enoteismo e associazionismo, oltre ad affermare con forza l’alterità trascendente e la divinità del Dio Unico. Nel Corano così come il concetto di Tawhid è presentato con argomenti forti e convincenti, allo stesso modo il politeismo, l’enoteismo e l’associazionismo sono respinti con prove forti e inconfutabili. Il Corano non si limita a semplici affermazioni sull’Unicità, sull’Unità e sulla assoluta Sovranità di Dio. Esso utilizza vari argomenti sia logici che cosmologici a sostegno di tali affermazioni. Il Corano coinvolge una varietà di metodi, processi, tecniche, processi di pensiero e categorie cognitive per ribadire il concetto della Unicità trascendente di Dio Onnipotente. Il Corano preserva un concetto già auto-esplicativo e convincente, con misure e parametri aggiuntivi, così da non consentire alcun dubbio o confusione riguardo al contenuto. Poiché il credo in un rigido monoteismo è l’atto primordiale necessario per la </text:span><text:soft-page-break/><text:span text:style-name="T14">salvezza dell’umanità nella sua totalità, il Corano presenta un tale credo in un modo molto semplice, lineare e logico. Gli innumerevoli passaggi coranici che delineano questa convinzione sono così semplici e chiari che non serve nessun aiuto esterno per approfondire la ragione della loro enfasi. A questo riguardo sono autoesplicativi e autosufficienti. Essi sono anche coerenti, sistematici e metodici. A differenza del Vecchio Testamento, nel Corano non esistono livelli di rivelazione progressiva o evolutiva o tendenze conflittuali. Il monoteismo coranico è completo, trascendentale, unico e sistematico fino alla radice. Questa unità tanto esterna quanto interna di Dio è descritta nell’Islam dalla parola al-Tawhid.</text:span></text:p>
      <text:p text:style-name="P111"><text:span text:style-name="T14">Quando il termine Tawhid viene utilizzato in riferimento a Dio Onnipotente significa la realizzazione dell’unità divina e della trascendenza in tutte le azioni dell’uomo direttamente o indirettamente collegate a Dio. E’ il credo che Allah è Uno e Unico, senza partner nel Suo regno e nelle Sue azioni, Egli è l’Uno senza simili nella Sua essenza e nei Suoi attributi, e l’Uno senza rivali nella Sua divinità e nel Suo culto. La scienza del Tawhid ruota attorno a questi tre elementi costitutivi, tanto che l’omissione di ognuna di queste categorie, che a volte si sovrappongono, vanificherà l’essenza e la missione </text:span><text:soft-page-break/><text:span text:style-name="T14">della scienza stessa come della fede. Queste tre categorie di Tawhid, vengono a volte indicate come Unità dell’Essere, Unità degli Attributi e Unità delle Azioni. L’unità di Dio, secondo il Corano, implica che Dio sia l’Uno Assoluto nella Sua persona stessa, l’Uno Assoluto nei Suoi attributi e l’Uno Assoluto nelle Sue opere. L’Unicità della Sua persona significa che in Dio non vi è né pluralità di dèi né pluralità di persone; l’Unità degli attributi implica che nessun altro essere possiede uno o più degli attributi divini in senso assoluto. La sua Unicità delle azioni implica che nessuno può compiere le azioni che Dio ha compiuto, o che Dio può fare. Si può qui aggiungere che questa divisione tripartita del Tawhid deve la sua origine al Corano, come il suo materiale è del tutto coranico, anche se i nomi specifici di cui sopra sono il risultato di esposizioni teologiche successive. </text:span><text:span text:style-name="T48">Nell’Ebraismo e nel Cristianesimo, la concezione di Dio è, in misura maggiore o minore legata alle limitazioni delle Sue creature come si è visto nei capitoli precedenti.</text:span><text:span text:style-name="T14"> L’Islam proclama con forza che Dio Onnipotente, il Trascendente e il Signore Eccelso e Sostenitore di tutto ciò che esiste, è molto più elevato degli attributi creaturali che Gli sono stati attribuiti da parte dell’uomo. Egli non è limitato da nessuna delle limitazioni degli </text:span><text:soft-page-break/><text:span text:style-name="T14">esseri umani o di qualsiasi altra delle creature da Lui create. Egli non ha né forma né corpo, né attributi corporali, forme o caratteristiche fisiche. Piuttosto </text:span><text:span text:style-name="T48">i Suoi attributi sono infiniti e assoluti. Essi sono di gran lunga al di sopra di qualsiasi tipo di limitazioni, difetti, e carenze, come ad esempio avere un inizio o una fine, generare o essere generato, avere dimensioni fisiche, o avere bisogni come richiedere cibo riposare, o procreare ecc.</text:span><text:span text:style-name="T14"> Egli è il Colui che dà tali dimensioni e caratteristiche alle Sue creazioni, pur non avendo assolutamente niente in comune. Questa terza dimensione di al-Tawhid è specificamente diretta contro i compromessi ebraici e cristiani sulla trascendenza divina. Ebraismo, Cristianesimo e Islam costituiscono successivi momenti della coscienza semitica nella sua lunga marcia attraverso la storia, come portatori di una missione divina sulla terra. Identificandosi con il messaggio incontaminato originale inviato da Dio all’umanità, l’Islam si pone come un elemento correttivo, che cerca di trovare </text:span><text:span text:style-name="T48">i difetti della concezione ebraica e di quella cristiana e della loro rappresentazione di Dio</text:span><text:span text:style-name="T14">, come </text:span><text:span text:style-name="T48">delineate nei documenti storici accettati dalle due fedi come loro Scritture.</text:span><text:span text:style-name="T14"> </text:span><text:span text:style-name="T48">L’Islam ritiene questi documenti responsabili per aver compromesso la trascendenza divina e quindi per aver </text:span><text:soft-page-break/><text:span text:style-name="T48">commesso l’errore più grave contro la coscienza semitica. </text:span></text:p>
      <text:p text:style-name="P112"><text:span text:style-name="T48">L’Islam contesta che la relazione che l’Ebraismo affermava legasse Dio al 'Suo popolo eletto,' Lo spingesse a concedere loro favori, nonostante la loro immoralità, il loro disagio e ostinazione (Deuteronomio 9:5-6)</text:span><text:span text:style-name="T48"><text:note text:id="ftn42" text:note-class="footnote"><text:note-citation>42</text:note-citation><text:note-body><text:p text:style-name="Footnote">https://www.laparola.net/bibbia/libro.php?n=5</text:p></text:note-body></text:note></text:span><text:span text:style-name="T14">. </text:span><text:span text:style-name="T48">Un dio 'vincolato,' legato in qualsiasi senso o grado, non è il Dio trascendente di Abramo e di Mosè</text:span><text:span text:style-name="T14">. </text:span><text:span text:style-name="T48">Allo stesso modo, l’Islam accusa il Cristianesimo di fraintendere l’unità divina riformulandola come fosse una divinità trina, utilizzando lo stratagemma dell’incarnazione come giustificazione per commettere eccessi contro Dio e porre innumerevoli limitazioni su di Lui.</text:span><text:span text:style-name="T14"> In sintesi, esiste un abisso di differenze concettuali riguardo alla dottrina della trascendenza divina che separa l’Islam sia dall’Ebraismo che dal Cristianesimo.</text:span></text:p>
      <text:p text:style-name="P113"><text:span text:style-name="T48">L’Islam sottolinea che Dio, per definizione stessa della Sua realtà, non può essere semplicemente una sorta di essere soprannaturale o di essere super umano, che dirige gli affari del mondo dai cieli pur condividendo contemporaneamente gli attributi, i bisogni e le qualità creaturali.</text:span><text:span text:style-name="T14"> Poiché Dio è niente di meno che il Creatore, l’Originatore e l’Artefice di questo vasto universo, Colui che ne mantiene il funzionamento in conformità alla </text:span><text:soft-page-break/><text:span text:style-name="T14">Sua saggezza e conoscenza infinite e disegni superiori. Dio trascende infinitamente tutto ciò che la mente umana può percepire o comprendere in alcun modo, o che i sensi possono cogliere, immaginare, o spiegare. Dio è molto, molto al di sopra di qualsiasi somiglianza o comparabilità con una qualsiasi delle Sue creature. Questa particolare enfasi sulla trascendenza divina è ciò per cui è designata la terza categoria di al-</text:span><text:span text:style-name="T32">Tawhid</text:span><text:span text:style-name="T14">. Dio è Uno nei Suoi Nomi e Attributi. I Suoi Nomi, Azioni e attributi superano i nomi, le azioni e gli attributi umani tanto quanto il Suo Essere sovrasta i loro esseri. Il Creatore Assoluto trascende completamente le azioni relative e gli attributi delle Sue creature. Ciò è implicito nella prima affermazione del credo islamico che 'Non vi è altra divinità al di fuori di Dio.' Oltre ad essere una negazione di qualunque essere associato a Dio nella Sua adorazione, nel Suo governo dell’universo e del Suo esserne Giudice, contiene anche una negazione della possibilità che qualsiasi creatura possa rappresentare, o personificare, o in qualsiasi modo o forma, esprimere l’Essere divino. Il Corano prescrive il criterio trascendente fondamentale nei seguenti versi: 'Nulla è simile a Lui' (42:11). 'E nessuno è simile a Lui' (112:4). Mentre stabilisce il principio fondamentale della alterità divina tramite le parole 'Nulla è simile a Lui,' il </text:span><text:soft-page-break/><text:span text:style-name="T14">passaggio istituisce anche la base di una possibile modalità divina. L’Uno e Unico Dio è il più Misericordioso, il Compassionevole. La Sua conoscenza si estende a ogni cosa visibile e invisibile, presente e futura, vicina e lontana, in essere e non in essere: in realtà questi contrasti relativi non si applicano nemmeno al Dio Assoluto. Egli è inconoscibile nel Suo essere, però conoscibile attraverso i Suoi Nomi e Attributi. Questi bei Nomi e Attributi sono l’unica fonte e base di una possibile modalità divina. Questo è forse il motivo per cui il Corano e gli Hadith hanno assunto la funzione di fissare i confini di questa modalità (i Bei Nomi di Allah), per evitare confusione ed eccessi. E’ questa nozione della trascendenza assoluta di Dio che si è riflessa nell’arte islamica, nella lingua, e in effetti in tanti altri aspetti della civiltà e della cultura islamica. L’Islam è, ed è sempre stato, incessantemente in guardia, costantemente in allerta contro ogni forma di corporeità, antropomorfismo o confronto, di infusione del divino nel non-divino. </text:span><text:span text:style-name="T48">A differenza dell’arte cristiana e, in alcuni rari casi dell’arte ebraica, l’arte islamica ha sempre evitato immagini sensoriali, raffigurazioni antropomorfe o rappresentazioni corporee di Dio in ogni tempo e luogo</text:span><text:span text:style-name="T14">. Nessuna moschea ha mai contenuto alcun oggetto, rappresentazione o statua </text:span><text:soft-page-break/><text:span text:style-name="T14">anche lontanamente collegati con la divinità. Le stesse rigide precauzioni sono state adottate per quanto riguarda il linguaggio islamico. Il discorso teologico islamico, Dio che si fa verbo, ruota rigorosamente intorno alla terminologia coranica, nonostante l’esistenza di diversità geografiche, linguistiche, culturali ed etniche enormi che abbracciano il mondo musulmano, e nei fatti servendo da interfaccia tra esse. Al-Taw</text:span><text:span text:style-name="T32">hi</text:span><text:span text:style-name="T14">d, con tutt</text:span><text:span text:style-name="T33">e</text:span><text:span text:style-name="T14"> le sue molteplici enfasi, non ha il solo significato di esaltare Dio e cantare le Sue glorie. Ha anche il significato di rivendicare un rapporto speciale con Dio, di godere di privilegi speciali nel Suo nome o affermare superiorità sulle Sue creature. Nessuno di questi elementi è implicito nella concezione coranica del monoteismo. Si tratta di una responsabilità piuttosto che di un privilegio. E’ pensato per creare la giusta risposta nell’uomo, la risposta che diventa essenziale per incoraggiare l’uomo a lavorare per trasformare la società umana del tempo e dello spazio in conformità con le regole morali divine. L’unità di Dio conduce all’unità della Sua creazione. Non è riconosciuta alcuna superiorità basata sull’origine, etnia, colore, credo o status finanziario o sociale. I diritti umani fondamentali di dignità, libertà, uguaglianza e giustizia sono universalmente riconosciuti a tutti gli </text:span><text:soft-page-break/><text:span text:style-name="T14">esseri umani in virtù della loro umanità. Una giusta relazione con Dio è l’unica garanzia di una relazione propria e retta fra gli uomini. Una connessione d’amore tra l’uomo e il suo Dio assicurerà una società solidale umana moralmente attrezzata. D’altra parte, qualsiasi altra interpretazione sbagliata di chi è Dio o un rapporto sbagliato con Lui provocherà uno squilibrio nelle relazioni fra uomo e uomo. Il monoteismo trascendentale islamico, se compreso correttamente, e applicato nello spirito può garantire una società umana eticamente equilibrata e attenta. Essa si fonda sulla responsabilità umana, sulla responsabilità politica e socio-economica e sulla giustizia universale. Inoltre, il concetto coranico del monoteismo trascendentale non è evolutivo. È originale e universale. Il Corano conferisce a questa comprensione moralistica del monoteismo una dimensione universale, sostenendo che questo era lo stesso messaggio rivelato a tutti i profeti e nazioni dall’inizio dei tempi. 'Ad ogni comunità abbiamo inviato un messaggero </text:span><text:span text:style-name="T34">(</text:span><text:span text:style-name="T14">con il comando</text:span><text:span text:style-name="T34">)</text:span><text:span text:style-name="T14">: 'Adorate Allah e evitate il male' (16:36). Il messaggio è senza tempo, invariato e universale. Così Noè, per esempio, uno dei più antichi tra i profeti, fu inviato al suo popolo con il messaggio: 'Adorate Allah! Per voi non c’è altro dio all’infuori di Lui' (7:59). Tutti i successivi profeti e </text:span><text:soft-page-break/><text:span text:style-name="T14">messaggeri di Dio ricevettero e comunicarono lo stesso messaggio (7: 65-93). Questo tema ritorna molto frequentemente nel Corano. I dieci comandamenti dati a Mosè sono stati recitati da Gesù sul monte e ribaditi (la maggior parte almeno) da Muhammad nel Corano. Il Shalome degli Ebrei originari è il Sal¥m e l’Islam del Corano. Il messaggio originale di salvezza di Gesù consisteva solo nel 'seguire i comandamenti.' Possiamo pertanto affermare che ‘Ama il tuo Dio e ama il tuo prossimo’ sia l’essenza di questa coscienza monoteista universale. </text:span><text:span text:style-name="T48">La parola 'Islam' significa sottomissione e pace: sottomissione alla volontà morale del Dio Unico e Trascendente, e pace con il Creatore e le Sue creature.</text:span><text:span text:style-name="T14"> L’Islam sostiene di essere in sintonia con i messaggi originali dei profeti Mosè e Gesù, ma critica le nozioni storiche ebraiche e cristiane della divinità. </text:span><text:span text:style-name="T48">Le concezioni antropomorfe nella Bibbia ebraica di Yahweh (Dio) e la fede del Cristianesimo in un Dio trino sono entrambe inaccettabili per l’Islam, perché sono considerate teorie che hanno compromesso la trascendenza e l’unità di Dio.</text:span><text:span text:style-name="T14"> La Scrittura islamica, </text:span><text:span text:style-name="T48">il Corano,</text:span><text:span text:style-name="T14"> da una parte, </text:span><text:span text:style-name="T48">si crede sia stato rivelato come misura correttiva, per correggere non solo le concezioni politeiste di Dio, ma anche per chiarire e modificare i compromessi di ebrei e cristiani riguardo alla trascendenza di Dio.</text:span><text:span text:style-name="T14"> L’Islam </text:span><text:soft-page-break/><text:span text:style-name="T14">identifica l’origine di questo compromesso nelle falsificazioni storiche delle rivelazioni precedenti (sia volontarie e involontarie) e sostiene di aver risolto il problema attraverso la rivelazione del Corano, ritornando alla purezza originale del messaggio che era stato minato e corrotto. L’Islam sostiene anche di aver evitato gli errori storici che hanno portato alla mescolanza o all’interiezione di parole umane con la parola di Dio. In effetti, la fede ritiene l’autenticità storica, la purezza testuale e la preservazione solenne della Scrittura originale, come le garanzie fondamentali per garantire e preservare la trascendenza di Dio e la corretta percezione dell’umanità di Lui.</text:span></text:p>
      <text:p text:style-name="P114"><text:span text:style-name="T14">Nonostante la sua forte enfasi sulla trascendenza, unicità, e inaccessibilità di Dio, a volte fino al punto della gelosia, il Corano contiene solo pochi versetti il cui stile un po’ pittoresco, se preso assolutamente alla lettera, potrebbe sembrare attribuire certe caratteristiche o atti umani a Dio. Questo gruppo di versetti è spesso definito mutashbih, intendendo i versetti 'ambigui,' in contrasto con i versetti definiti mukam i cui significati sono fermamente e chiaramente stabiliti. Questo insieme di versetti ambigui è stata oggetto di molte dispute sia teologiche che esegetiche nel successivo pensiero teologico islamico. Sebbene i musulmani convenzionali </text:span><text:soft-page-break/><text:span text:style-name="T14">abbiano sempre negato e smentito qualsiasi concezione antropomorfica di Dio, alcuni individui e sette sono stati preda di una concezione lievemente antropomorfica della divinità. Si deve notare qui che la tendenza antropomorfa in discussione non è né cruda né rozza; né esiste un problema, in aggiunta, di corporeità assoluta o antropomorfismo fisico. Quello che abbiamo è piuttosto una sorta di antropomorfismo relativamente raffinato, che si insinuò nei pensieri di alcuni tradizionalisti, come Muqatil ibn Sulayman e alcune delle prime figure sciite, come Hisham ibn al-Hakam. Nonostante la sua indole letterale, Muqatil interpretò metaforicamente molte frasi del Corano che potrebbero avere portato a raffigurazioni corporee di Dio, se prese alla lettera. Pertanto, anche il caso di presunta corporeità di Muqatil necessita di un ulteriore esame, in quanto la natura polemica delle fonti da cui apprendiamo delle sue presunte opinioni corporee è alla base della loro inaffidabilità. La sua esegesi del Corano, che è ora disponibile, lo presenta in un modo diverso. Secondo Hisham, Dio aveva un corpo, ma differente dagli altri, il che significa che non esiste alcuna somiglianza o similitudine tra il corpo divino e i corpi non divini. I fautori di questo presunto antropomorfismo razionalizzarono le loro ricerche con </text:span><text:soft-page-break/><text:span text:style-name="T14">l’ipotesi che, poiché tutte le cose esistenti hanno un corpo, una prova che Dio esiste può essere data assegnandoGli un corpo, ma naturalmente un corpo diverso dagli altri corpi.</text:span></text:p>
      <text:p text:style-name="P44">35 Qui siamo a malapena nel regno di uno spiccato antropomorfismo, perché in nessun modo o forma questi teorizzatori hanno confrontato Dio con le Sue creature, né hanno completamente offuscato il confine tra il regno divino e quello non divino. L’unica cosa di cui sono colpevoli è di avere apparentemente un po’ confuso le severe linee di demarcazione che dividono i due regni, e questo in gran parte a causa della loro prona disposizione al letteralismo e ad un senso di necessità di dover provare l’esistenza di Dio. Il risultato di questa congettura difettosa fu un severo castigo da parte dei musulmani tradizionali che li soprannominarono corporeisti, difendendo e sottolineando con grande fervore la ben descritta, ben custodita e inflessibilmente trascendente natura del messaggio coranico.</text:p>
      <text:p text:style-name="P90"><text:span text:style-name="T14">E’ significativo e degno di nota che il termine 'antropomorfismo' viene qui utilizzato come un equivalente di massima per l’uso musulmano dei termini tashbÏh e tajsÏm. I due termini eventualmente intercambiabili assumono percezioni materiali o dei </text:span><text:soft-page-break/><text:span text:style-name="T14">sensi come loro punto di riferimento, e possono anche essere differenziati ad un livello superiore più raffinato. Il termine tashbÏh indica l’atto di paragonare Dio con gli esseri non-divini, mentre tajsÏm si concentra principalmente sull’oggetto del confronto. Il concetto islamico di tashbÏh e tajsÏm differisce anche dall’uso contemporaneo occidentale del termine 'antropomorfismo.' L’uso occidentale si estende in generale a tutti i tentativi di concepire Dio in categorie umane, che siano corporee, emotive o razionali. I termini islamici si concentrano maggiormente sugli aspetti sensoriali, materiali e corporei del termine, anche se non ignorano completamente le somiglianze razionali o emotive. Gli attributi emotivi o razionali di Dio sono assoluti mentre gli stessi attributi negli esseri umani sono relativi e finiti. Essi sono utilizzati riguardo a Dio ai soli fini di conferme e modalità esistenziali e per una relazione significativa tra uomo e Dio. Essi sono necessità linguistiche, il risultato dei limiti umani, e devono essere presi come espressioni metaforiche o figure retoriche piuttosto che riflessioni sulla natura o essenza divina. Un esempio di questa categoria di passaggi coranici e frasi è l’utilizzo coranico della parola Wajh, che letteralmente significa 'volto,' riguardo a Dio, che si presenta in un totale di 11 versi (5 volte come 'il </text:span><text:soft-page-break/><text:span text:style-name="T14">volto di Allah' 2:115; 2:272; 30:38; 30:39; 76:9; una volta come 'il volto del loro Signore' 13:22; una volta come 'il volto del tuo Signore' 55:27; una volta come 'il volto del suo Signore' 92:20, e 3 volte come 'il Suo volto' 06:52; 18:28; 28:88). È interessante notare il contesto in cui la frase si presenta in diversi versetti coranici. Per esempio, in 2:272 dice: 'E tutto quello che darete nel bene sarà a vostro vantaggio, se darete solo per tendere al volto di Allah (li wajhill¥h).' Al 13:22 dice: 'Coloro che perseverano (Li wajhi rabbihim) nella ricerca del volto del Signore.' Da tutti questi versetti e da altri, come 30:30, 30:43, ecc. sembra chiaro che l’uso della parola 'volto' per quanto riguarda Dio è più simbolico che letterale, portando di conseguenza molti esegeti e studiosi musulmani a interpretarlo come il dh¥till¥h, vale a dire, l’essere di Allah, o 'per amor Suo.' Questa interpretazione è suffragata da altri versetti del Corano dove si dice: 'Non invocare nessun altro Dio insieme ad Allah. Non c’è altro dio all’infuori di Lui. Tutto (ciò che esiste) perirà eccetto il Suo volto. A Lui appartiene il giudizio, e a Lui (tutti) sarete ricondotti' (28:88). Al 55:26-27 si legge: 'Tutto quel che è sulla terra è destinato a perire: (solo) rimarrà il Volto del tuo Signore, pieno di Maestà e Magnificenza.' E’ impossibile interpretare questo versetto letteralmente, e non avrebbe senso </text:span><text:soft-page-break/><text:span text:style-name="T14">affermare che tutto perirà eccetto il volto di Dio. Gli esegeti del Corano concordano sul fatto che la parola ‘Wajh’ (volto), qui menzionata si riferisce a Dio onnipotente stesso e non a qualsiasi organo o corpo di alcun genere. Questo dimostra che il Corano contiene alcune frasi alle quali non possono essere dati significati evidentemente letterali. La Scrittura pone chiaramente una sfida ermeneutica. Pertanto le facoltà razionali e la comprensione del sistema scritturale generale e del contesto specifico e dell’intenzione che sottendono queste espressioni, devono essere adoperate correttamente per decifrare il vero significato di queste espressioni poetiche. Le espressioni apparentemente antropomorfe sono utilizzate solo per sottolineare la realtà e l’esistenza di Dio, in particolare ad individui come i politeisti della Mecca che erano stati compenetrati nel culto degli idoli e delle concezioni corporee della divinità. Una vuota concezione trascendente della divinità sarebbe stata irrilevante e per loro incomprensibile. Queste espressioni forniscono un vago punto di partenza e una modalità divina con i sensi a cui vengono bruscamente ricordate le limitazioni assolute della percezione e della comprensione umana attraverso l’affermazione </text:span><text:span text:style-name="T48">'non c’è nulla di simile a Lui.'</text:span><text:span text:style-name="T14"> Un approccio letterale metterà l’accento sugli aspetti </text:span><text:soft-page-break/><text:span text:style-name="T14">corporei di queste frasi scritturali, poiché il letteralismo è solitamente incline a prendere l’esperienza sensibile come proprio quadro di riferimento. Di conseguenza, </text:span><text:span text:style-name="T48">qualsiasi interpretazione letterale di queste espressioni antropomorfe serve solo a ridurre il Dio del Corano al rango di un idolo, annullando l’intento coranico di epurare la fede dall’idolatria.</text:span><text:span text:style-name="T14"> Frasi come queste devono essere interpretate in senso figurato, alla luce degli altri versetti del Corano, e in conformità con le regole stabilite della lingua araba. La mancanza di ciò porterebbe a una impasse logico e teologico. La definizione metaforica è la modalità di esegesi che trascende il significato elementare, letterale e superficiale del testo, per sostituirlo con un senso secondario e metaforico. I linguaggi umani ammettono frequentemente almeno due livelli di significato, cioè quello letterale e quello metaforico. La lingua araba è ricchissima di questi due livelli di significati, vale a dire, il palese e il metaforico. Il bisogno di un significato metaforico sorge quando si verifica un’ impasse logica o teologica, ad esempio quando alcuni individui decidono di interpretare come corporei certi versetti riguardanti il Dio trascendente. Come ribadito in precedenza questo fatto era ignoto ai primi musulmani perché era chiaramente palese ciò a cui si faceva riferimento nei </text:span><text:soft-page-break/><text:span text:style-name="T14">versetti, vale a dire non letteralmente il volto di Dio, ma il Suo essere, e non fu mai un problema per la prima generazione di musulmani. Piuttosto, la Rivelazione di Allah era inequivocabile con il Taw</text:span><text:span text:style-name="T35">hi</text:span><text:span text:style-name="T14">d così chiaramente spiegato, che non poteva essere sfidato ad alcun livello. Le categorie sorsero a seguito di alcuni che tendevano, senza prova alcuna, ad adottare un punto di vista letterale, nonostante il contesto dei versetti e le sfumature della lingua araba domandino categoricamente altrimenti. </text:span></text:p>
      <text:p text:style-name="P115"><text:span text:style-name="T48">Sorge la questione del perché il Corano o gli Hadith avrebbero impiegato frasi che possono creare tensioni inutili in materia di significato.</text:span><text:span text:style-name="T14"> </text:span><text:span text:style-name="T48">La risposta semplice e diretta è che le limitazioni linguistiche ed umane richiedono ciò. Il Corano è un libro per guidare gli uomini e non un libro di isolata metafisica.</text:span><text:span text:style-name="T14"> Per garantire la pertinenza umana deve impiegare frasi adatte alla comprensione umana e al suo immaginario. Questa è forse una opzione migliore di una semplice unità trascendentale priva di immaginazione, pertinenza e interazione umana. Va tenuto presente che la Scrittura non ha sempre molteplici significati. E' il contesto e l’intenzione del linguaggio che determineranno, fornendo gli indizi, se va data una interpretazione metaforica o meno. Nessuna violenza è consentita alla </text:span><text:soft-page-break/><text:span text:style-name="T14">natura stabilita semantica, grammaticale e filologica del testo nel processo di interpretazioni metaforiche, deve essere seguito un noioso processo di analisi linguistica e testuale, in conformità con i suggerimenti di lessicografi, grammatici, filologi, esegeti letterari, poeti e critici letterari. Assolutamente vietate sono le arbitrarie interpretazioni allegoriche che non seguono una attenta e approfondita analisi, che mancano di strumenti accademici o che abbandonano il testo ad arbitrarie interpretazioni fantasiose, senza grande supporto linguistico o testuale. La ragione umana e la logica dovrebbero seguire la rivelazione e non sostituirla, soppiantarla o annullarla. </text:span><text:span text:style-name="T48">In conclusione, il paradigma del Creatore del Corano mantiene una linea di demarcazione meravigliosa tra Dio e tutto ciò che è non-Dio, tenendo fede al concetto della Sua trascendenza, unicità, e alterità.</text:span><text:span text:style-name="T14"> Questo concetto non è semplice unità o astrazione, ma un concetto fervido, vivo ed esigente che rende Dio rilevante per il ‘qui e ora,’ enfatizzando la Sua immanenza attraverso la modalità che fornisce con innumerevoli versetti coranici. La modalità e la lingua sono essenzialmente strutturati in modo tale da consentire molte possibilità di comunicazione, senza fare assomigliare Dio o farLo scomparire nel mondo che Egli ha creato. Questo tipo di </text:span><text:soft-page-break/><text:span text:style-name="T14">concetto trascendentale è pervasivo in tutto il Corano, nell’autentica letteratura Hadith, e anche in tutta la storia della civiltà islamica. Tutti i pensatori musulmani tradizionali, anche i filosofi e i letteralisti in una certa misura, sembrano aver seguito la stessa linea: il senso di e la fede in una Divinità trascendente che è misteriosa, ineffabile e inconoscibile nella Sua essenza, ma allo stesso tempo molto vicina alle Sue creature grazie alla Sua conoscenza, potere, misericordia e amore. C’è comunque una rottura del linguaggio in alcuni termini coranici. E’ pensata per ammettere l’inadeguatezza e l’imperfezione del linguaggio umano, il mistero di Dio, e la dipendenza assoluta dell’umanità da Dio e dalla Sua rivelazione per raggiungere una conoscenza autentica del Suo essere. Il sistematico paradigma del Dio coranico è una prova dell’autenticità del Corano. In termini di compilazione, il Corano è molto diverso dalla Bibbia dei giorni nostri. Per prima cosa il Corano è stato consacrato, messo per iscritto, conservato con cura, e canonizzato fin dal momento della sua rivelazione, ossia dal suo inizio. Il concetto cristiano ed ebreo di canonizzazione scritturale</text:span><text:span text:style-name="T14"><text:note text:id="ftn43" text:note-class="footnote"><text:note-citation>43</text:note-citation><text:note-body><text:p text:style-name="P56">Nel cristianesimo e nell'ebraismo, il processo di canonizzazione <text:span text:style-name="T90">scritturale </text:span>ha coinvolto la selezione e la definizione di un corpus di testi considerati sacri e normativi, spesso attraverso dibattiti teologici e storici. Nell'islam, invece, il Corano è considerato la parola di Dio rivelata direttamente al profeta Maometto, e non ha subito un processo di canonizzazione simile. La sua integrità e autenticità sono state preservate fin dall'inizio, e il testo è stato memorizzato e trascritto dai seguaci del profeta durante la sua vita. Questo ha portato a una percezione diversa della sacralità e dell'autorità del testo rispetto alle tradizioni cristiana ed ebraica. </text:p></text:note-body></text:note></text:span><text:span text:style-name="T14"> nel </text:span><text:soft-page-break/><text:span text:style-name="T14">corso del tempo è estraneo ai musulmani. I musulmani considerano il Corano come l’ultima e definitiva rivelazione di Dio all’umanità. Fonti musulmane concordano sul fatto che il testo coranico fosse stato pienamente memorizzato e messo in alcune forme scritte durante la vita del Profeta. Alla fine della sua vita, scrive al-Faruqi: 'Muhammad aveva circa 30.000 coetanei che avevano udito e memorizzato il Corano in tutto o in parte. Molti di loro potevano leggerlo e scriverlo e si erano impegnati a scrivere il Corano in parte o in toto.'</text:span></text:p>
      <text:p text:style-name="P116"><text:span text:style-name="T14">36 Il fatto che il Profeta Muhammad fosse consapevole della natura divina e alterità del Corano fin dall’inizio della sua missione, è qualcosa di ben attestato da fatti storici e riconosciuto dagli studiosi occidentali. Muhammad sembra aver cominciato molto presto la pratica di recitare brani del Corano ai suoi seguaci per tutto il tempo necessario fino a quando non li conoscevano a memoria. Questa pratica di memorizzare il testo del Corano è stata seguita universalmente da milioni di musulmani di ogni generazione fin dai tempi </text:span><text:soft-page-break/><text:span text:style-name="T14">del Profeta. Viene anche riconosciuto dagli orientalisti che la capacità di scrivere era comune nella città metropolitana di Mecca, grazie alla sua atmosfera mercantile. </text:span><text:span text:style-name="T36">C</text:span><text:span text:style-name="T14">he il Profeta Muhammad utilizzasse segretari per scrivere la Rivelazione è un dato di fatto ampiamente confermato storicamente e riconosciuto dagli studiosi occidentali. Dopo essere andato a Medina il suo impiego di segretari è ben attestato. Da questi fatti e da altre tradizione autentiche connesse, gli studiosi musulmani concludono che l’intero testo del Corano sia stato messo per iscritto in qualche forma durante la vita del Profeta. Essi hanno inoltre sostenuto unanimemente che il Profeta Muhammad stesso fu il responsabile per la suddivisione dei versetti in sura</text:span><text:span text:style-name="T14"><text:note text:id="ftn44" text:note-class="footnote"><text:note-citation>44</text:note-citation><text:note-body><text:p text:style-name="P172">Nome arabo di ognuno dei 114 capitoli in cui è diviso il Corano.</text:p></text:note-body></text:note></text:span><text:span text:style-name="T14">. Molti studiosi occidentali, come Muir, Burton e Smith sono d’accordo con queste conclusioni. Per esempio il vescovo K. Cragg osserva che 'non vi è spazio per gravi perplessità, che ciò che è qui sia sostanzialmente ciò che il Profeta ha detto, o che ciò che ha detto in condizioni di ispirazione coranica non sia qui.'</text:span></text:p>
      <text:p text:style-name="P45">37 Altri orientalisti, come Watt, Tritton, Gibb, sostengono che il Corano è stato parzialmente messo per iscritto nel corso della vita del Profeta. Watt dice che 'gran parte del Corano è stato messo per iscritto in <text:soft-page-break/>qualche forma durante la vita di Muhammad.'</text:p>
      <text:p text:style-name="P117"><text:span text:style-name="T14">38 È il caso di ricordare qui che Abu Bakr (califfo dal 632 al 634), succeduto al Profeta Muhammad (morto nel 632), ordinò la raccolta in un volume del materiale scritto, dopo che ‘Umar lo aveva spinto a farlo. Fu Zayd Ibn Thabit, il segretario del Profeta, che guidò la Commissione e fece il lavoro per Abu Bakr. Raccolse i testi scritti del Corano, li verificò sulla base della sua memoria, utilizzò altre misure di salvaguardia, e produsse il singolo volume. ‘Uthman (califfo dal 644 al 656), succeduto a ‘Umar, ordinò allo stesso Zayd di produrre in forma scritta un’unica trascrizione, ovvero il testo, in accordo con i criteri del dialetto della Mecca. Pertanto, entro un breve lasso di 12 anni dopo la morte del Profeta, come sostiene al-Faruqi, o circa 18 anni come sostiene Watt, un codice standard, completo e scritto del Corano venne ufficialmente pubblicato e reso disponibile assieme a insegnanti esperti per le città metropolitane dell’impero. Il testo coranico è rimast</text:span><text:span text:style-name="T37">o</text:span><text:span text:style-name="T14"> intatto da allora. John Burton conclude il suo libro con le seguenti parole: 'solo un testo del Corano è mai esistito. Questo è il testo universalmente riconosciuto, la sola base su cui la preghiera del musulmano può essere valida. Un testo unico ha perciò sempre unito i musulmani. ... Quello che abbiamo oggi nelle nostre </text:span><text:soft-page-break/><text:span text:style-name="T14">mani è il Mushaf di Muhammad.'</text:span></text:p>
      <text:p text:style-name="P117"><text:span text:style-name="T14">39 C’è un solo testo a disposizione di tutti i musulmani, senza alcuna eccezione. Secondo i musulmani ortodossi, la conservazione del testo coranico in tale maniera non è altro che un miracolo di Allah, un miracolo prolungato in realtà. In effetti, lo stesso Corano, nello suo periodo iniziale a La Mecca, cita la promessa di Allah per proteggerlo: 'Noi abbiamo fatto discendere il Messaggio e Noi ne siamo i custodi' </text:span><text:span text:style-name="T37">(</text:span><text:span text:style-name="T14">dalla corruzione</text:span><text:span text:style-name="T37">)</text:span><text:span text:style-name="T14"> (15:9). Ed è proprio a causa di questa promessa divina e della natura meravigliosa del Corano e della sua inimitabilità, che nessuno ha potuto introdurre alcunché nel suo testo. Di conseguenza, c’è sempre solo un testo del Corano nelle mani di tutti i musulmani, questo testo universalmente riconosciuto gode di autorità normativa per tutti. Il Corano è ritenuto essere rivelato con sette varianti di recitazione. Queste varianti della recitazione sono state approvate e ammesse dal Profeta stesso perché erano congeniali alle tradizioni linguistiche tribali o locali dei recitatori, in altre parole, lo scopo era quello di facilitare la recitazione ai musulmani. Queste varianti non causano molti cambiamenti sia nel significato che nella struttura o nel formato dei versetti. A. S. Tritton osserva: Ci sono sette o dieci diverse 'letture' del Corano; queste </text:span><text:soft-page-break/><text:span text:style-name="T14">consistono per la maggior parte in ciò che implica la parola inglese (‘readings’ n.d.t), modi diversi di pronunciare il testo, </text:span><text:span text:style-name="T37">(</text:span><text:span text:style-name="T14">con</text:span><text:span text:style-name="T37">)</text:span><text:span text:style-name="T14"> l’elisione o l’assimilazione di certe lettere. Sono rilevate molte varianti di vocalizzazione, ma </text:span><text:span text:style-name="T37">(</text:span><text:span text:style-name="T14">le differenze</text:span><text:span text:style-name="T37">)</text:span><text:span text:style-name="T14"> sono così leggere da essere trascurabili, tranne che per gli specialisti: non rendono al senso alcuna differenza decisiva.</text:span></text:p>
      <text:p text:style-name="P37">40 Inoltre l’arabo, la lingua originale del Corano e del Profeta, è una delle lingue più parlate nel mondo di oggi, attivamente utilizzata da milioni di persone come prima lingua. In realtà, è l’unica lingua semitica che è rimasta ininterrottamente in vita per migliaia di anni, e per di più è l’unica lingua viva che è rimasta sostanzialmente invariata negli ultimi quattordici secoli. P. Hitti ha sostenuto che fu il Corano che 'mantenne uniforme la lingua. In modo che sebbene oggi un marocchino usa un dialetto diverso da quello utilizzato da un arabo del Golfo o da un iracheno, tutti però scrivono nello stesso stile.'</text:p>
      <text:p text:style-name="P37">41 In realtà fu il Corano, che secondo Esposito si trovò 'al centro dello sviluppo della linguistica araba e fornì la base per lo sviluppo della grammatica, del vocabolario e della sintassi araba.'</text:p>
      <text:p text:style-name="P46">42 Inoltre, a differenza della Bibbia, i seguaci del Corano <text:soft-page-break/>credono che esso sia la parola divina di Dio, la rivelazione parola per parola. E’ autorevole e normativo per la definizione della parola stessa, e anche se i musulmani possono discordare, e hanno discordato, sulle interpretazioni e significati delle parole del Corano, non hanno mai messo in discussione l’autenticità, la veridicità e la natura autorevole del suo testo. È interessante notare che i musulmani in tutta la loro storia, e senza eccezioni, hanno accettato all’unanimità ogni parte del Corano- l’intero testo del Corano - come la parola testuale di Dio. Lo hanno venerato come il primo principio determinante delle loro credenze religiose, la fonte fondamentale della loro legge, e l’autorità inequivocabile in merito alle questioni di fede e di religione, non sostituibile in alcun modo da qualsiasi altra autorità. In conclusione, la semplicità, la schiettezza, la coerenza e la costanza del paradigma del Dio islamico possono facilmente essere viste come derivate dalla purezza storica, autenticità e carattere normativo della propria scrittura, il Corano. </text:p>
      <text:p text:style-name="P118"><text:span text:style-name="T14"/></text:p>
      <text:h text:style-name="Heading_20_4" text:outline-level="4"><text:bookmark-start text:name="__RefHeading___Toc9949_2708660065"/>Conclusioni<text:bookmark-end text:name="__RefHeading___Toc9949_2708660065"/></text:h>
      <text:p text:style-name="P51">Le asserzioni più importanti, i risultati e le conclusioni di questo studio sono riassunti qui di seguito:</text:p>
      <text:p text:style-name="P119"><text:soft-page-break/><text:span text:style-name="T14">1. Il paradigma di Dio presentato dai dati della Bibbia ebraica è incoerente. Tendenze polari sono ben visibili. Il monoteismo trascendentale è lì, ma non è presentato in modo sistematico, elaborato chiaramente e salvaguardato completamente da possibili malintesi, da strumentalizzazioni e violenza. E’ decisamente distribuito tra i libri della Bibbia ebraica. Si deve vagliare fra un gran numero di dichiarazioni contraddittorie e asserzioni, procedere a fatica tra una quantità disordinata di informazioni, e affrontare alcuni problemi spinosi per ricavare un concetto di alterità assoluta e trascendenza di Dio dal testo stesso della Bibbia ebraica. E questo non può essere fatto in modo soddisfacente senza un aiuto esterno. D’altro canto una concezione antropomorfica della divinità è straordinariamente evidente. Descrizioni, attributi, qualità e ritratti antropomorfici, rozzi e palesi abbondano e sono così pervasivi in tutto il testo che anche una lettura sommaria lascerà l’impronta di un Dio della Bibbia ebraica indubbiamente antropomorfico. Molti degli antropomorfismi biblici sono ingenui, a volte concreti e corporei. Tali rappresentazioni grafiche non sono sostanzialmente necessarie per il tipo di modalità intrinseca della corretta comunicazione religiosa, tranne che per quel tipo di concezione religiosa che ritiene Dio </text:span><text:soft-page-break/><text:span text:style-name="T14">come assolutamente corporeo. Dio è presentato come un corpo, che cammina, parla, che va in cerca di qualcuno, che piange e grida, che riposa, che lotta, che si pente, che si lamenta ecc. In alcuni casi Egli viene mostrato ulteriormente come privo di potere, di conoscenza, di misericordia, di giustizia, d’imparzialità, d’universalità e così via, in altre parole dei tratti fondamentali di un Dio trascendente. D’altra parte, molti limiti, qualità e categorie umane sono attribuite a Lui in modo da farlo sembrare spesso proprio come un essere umano, ma di un rango più elevato o di proporzioni gigantesche. Molti di questi passaggi possono essere interpretati in senso metaforico, ma una grande maggioranza di essi non renderebbe a una tale interpretazione senza fare violenza al testo. </text:span><text:span text:style-name="T52">A volte, sembrerebbe ironicamente, che ciò che abbiamo di fronte a noi sia l’uomo che crea Dio a sua immagine, somiglianza e forma, piuttosto che il contrario. Di conseguenza, quell’immagine molto spesso soffre della finitezza del suo creatore. In sintesi il Dio della Bibbia ebraica, come dipinto dalla Scrittura, non è un essere che si possa ritenere essere la Divinità 'Trascendente perfetta,' ma piuttosto una Divinità che è debole, che subisce le molte imperfezioni degli esseri umani ed è realmente il loro specchio soprannaturale.</text:span></text:p>
      <text:p text:style-name="P47"><text:soft-page-break/>2. Il paradigma di Dio della Bibbia ebraica sembra essere progressivo ed evolutivo. La concezione di Dio degli ultimi profeti, in particolare quelli dopo l’VIII secolo a.C. è più elaborata, sistematica e unitaria rispetto ai primi scritti anche se non necessariamente non corporea o non antropomorfica. Questa concezione profetica, come viene delineata nella Scrittura, è almeno tanto antropomorfa quanto i primi scritti, ma in un modo diverso. Le espressioni antropomorfiche usate sono, in un certo modo, anche raffinate e a volte trasmettono un senso di esperienza mistica o di riflessione spirituale. Molte di queste si offrono a interpretazioni metaforiche più facilmente delle loro controparti nei cosiddetti libri di Mosè ed altri scritti precedenti. Tuttavia, in ultima analisi, esprimono nient’altro che il concetto e l’immagine di una divinità antropomorfica e imperfetta. </text:p>
      <text:p text:style-name="P90"><text:span text:style-name="T14">3. Il pensiero tradizionale rabbinico è molto vicino al paradigma di Dio della Bibbia ebraica. Infatti, ci sono momenti in cui il Dio rabbinico sembra più antropomorfico, corporeo, familiare e limitato che il Dio della Bibbia ebraica</text:span><text:span text:style-name="T14"><text:note text:id="ftn45" text:note-class="footnote"><text:note-citation>45</text:note-citation><text:note-body><text:p text:style-name="P69">La distinzione tra il pensiero del Dio rabbinico e quello del Dio della Bibbia ebraica deriva principalmente dall'evoluzione teologica, culturale e linguistica del giudaismo nel corso dei secoli. Il pensiero rabbinico si è formato nei secoli successivi alla compilazione della Bibbia ebraica. Mentre il testo biblico presenta descrizioni dirette e spesso antropomorfiche di Dio (come nel caso di Dio che 'cammina' nel giardino di Eden o 'si pente' in alcuni passaggi), i rabbini hanno reinterpretato questi concetti alla luce di una crescente consapevolezza filosofica e teologica. Essi hanno cercato di spiegare e adattare l'immagine di Dio per rispondere alle esigenze intellettuali e spirituali delle loro comunità.</text:p><text:p text:style-name="P69"><text:tab/>Con l'interazione con altre culture, <text:span text:style-name="T91">(</text:span>il pensiero greco e romano<text:span text:style-name="T91">)</text:span>, il giudaismo rabbinico ha progressivamente adottato un linguaggio più astratto e simbolico. La filosofia greca, ad esempio, ha introdotto idee di trascendenza assoluta che hanno influenzato la rappresentazione di Dio come infinito e non corporeo. La Bibbia ebraica utilizza spesso un linguaggio concreto e immagini facilmente comprensibili per trasmettere la natura di Dio ai suoi lettori. Nel pensiero rabbinico, invece, il linguaggio si evolve per includere concetti più metaforici, con un'enfasi su Dio come trascendente e ineffabile, pur mantenendo un senso di vicinanza attraverso la Shekhinah (presenza divina).</text:p><text:p text:style-name="P69"><text:tab/>La Bibbia ebraica doveva rispondere a un pubblico più variegato e quindi rappresentava Dio in modi accessibili a tutti. I rabbini, invece, svilupparono un pensiero più sofisticato, destinato a guidare gli studiosi e a fornire strumenti interpretativi per comprendere la complessità del divino. La Bibbia spesso bilancia l'immanenza di Dio (la sua presenza nel mondo) con la trascendenza. Il pensiero rabbinico, attraverso opere come il Talmud e il Midrash, approfondisce queste idee, creando un'immagine di Dio che appare più vicina e familiare in alcuni contesti, ma anche assolutamente trascendente in altri. Questa evoluzione riflette il desiderio di rendere la comprensione di Dio adatta alle esigenze di epoche e contesti diversi, preservando però i principi fondamentali del monoteismo ebraico.<text:tab/></text:p></text:note-body></text:note></text:span><text:span text:style-name="T14">.</text:span></text:p>
      <text:p text:style-name="P120"><text:soft-page-break/><text:span text:style-name="T38">4</text:span><text:span text:style-name="T14">. Il pensiero filosofico e trascendentale, nel senso di non-corporeità, non-antropomorfismo, fu considerato (dall’ebraismo religioso in generale) come non-biblico. Una tale concezione di Dio non era stata molto popolare nella tradizione giudaica nel corso dei secoli che seguirono il periodo rabbinico. Le poche anime </text:span><text:soft-page-break/><text:span text:style-name="T14">razionali, come Filone</text:span><text:span text:style-name="T14"><text:note text:id="ftn46" text:note-class="footnote"><text:note-citation>46</text:note-citation><text:note-body><text:p text:style-name="P70">Filone (20 a.C. - 50 d.C.), vissuto ad Alessandria d'Egitto, cercò di armonizzare la tradizione ebraica con la filosofia greca, in particolare con il platonismo e lo stoicismo. Egli interpretava la Bibbia ebraica attraverso una lente allegorica, attribuendo a Dio una trascendenza assoluta e utilizzando concetti filosofici greci per descrivere il divino. Ad esempio:<text:tab/><text:span text:style-name="T92">a) </text:span>Dio è completamente trascendente e al di sopra della comprensione umana; <text:span text:style-name="T92">b) </text:span>Gli intermediari, come il Logos (Parola), fungono da ponte tra Dio e il mondo materiale.</text:p></text:note-body></text:note></text:span><text:span text:style-name="T14"> e Maimonide</text:span><text:span text:style-name="T14"><text:note text:id="ftn47" text:note-class="footnote"><text:note-citation>47</text:note-citation><text:note-body><text:p text:style-name="P56">Maimonide (1138-1204), noto anche come Rambam, fu un filosofo, medico e giurista ebreo medievale. Nel suo capolavoro, Guida dei Perplessi, cercò di conciliare la filosofia aristotelica con il monoteismo ebraico. Egli enfatizzava: <text:span text:style-name="T92">a) </text:span>La trascendenza assoluta di Dio, negando qualsiasi attributo positivo che potesse limitare la Sua essenza.<text:line-break/><text:span text:style-name="T92">b) </text:span>L'uso di attributi negativi (ad esempio, 'Dio non è corporeo') per descrivere il divino.</text:p></text:note-body></text:note></text:span><text:span text:style-name="T14">, che cercarono di assorbire la trascendenza filosofica nella concezione ebraica del divino (per lo più sotto influenza straniera) non riuscirono purtroppo a convincere l’ortodossia delle loro idee trascendentali. Le loro opinioni furono considerate non conformi ai testi scritti e all’eredità ebraica. </text:span><text:span text:style-name="T48">Non è molto difficile immaginare la natura umana e l’origine dei passaggi biblici antropomorfi. La creatività umana sembra aver giocato un ruolo fondamentale nella creazione di questi passaggi della Bibbia ebraica orientati antropomorficamente, costruiti corporalmente ed a volte accordati immoralmente</text:span><text:span text:style-name="T14">. Questo elemento umano, origine e natura della Bibbia ebraica, ignorato nel corso dei secoli, è stato evidenziato da molti studiosi biblici fin dal XIX secolo. E’ </text:span><text:soft-page-break/><text:span text:style-name="T14">quasi diventato una spiegazione standard, soprattutto nei circoli accademici, delle molte difficoltà teologiche, morali e religiose presentate dal testo della Bibbia ebraica. E’ diventato impossibile dimostrare logicamente o giustificare razionalmente le affermazioni tradizionali della Bibbia ebraica di essere la parola infallibile di Dio nella sua interezza. Gli studiosi critici moderni la considerano come la parola dell’uomo o, al massimo, un’ispirazione indiretta, con la parola di Dio confusa alle parole dell’uomo. La presenza di un reticolo labirintico di vecchie interpretazioni allegoriche e tendenze polari e contraddittorie per quanto riguarda la Divinità non sono prova delle profondità e dei misteri infiniti di questi passaggi problematici, ma piuttosto, al contrario, la prova dei limiti assoluti e delle imperfezioni dei loro scrittori umani e una prosecuzione di pensiero </text:span><text:span text:style-name="T39">(</text:span><text:span text:style-name="T14">umano</text:span><text:span text:style-name="T39">)</text:span><text:span text:style-name="T14">. L’esistenza di tutti questi problemi, consapevolmente o meno, confessata da quasi tutti gli studiosi biblici, dimostra il punto che la Bibbia ebraica, nel suo aspetto e forma attuale, non può essere presa come la parola infallibile di Dio.</text:span></text:p>
      <text:p text:style-name="P48"><text:span text:style-name="T93">5</text:span>. Il Nuovo Testamento sembra essere lontano dall’universo del discorso ebraico e molto vicino ai modelli di pensiero e visione del mondo ellenistici. Inoltre, non è Teocentrico, ma Cristocentrico. Una <text:soft-page-break/>maggiore varietà di teologie (Cristologie) è presente nel Nuovo Testamento rispetto alla varietà che si nota nel Vecchio Testamento e non tutte sono reciprocamente congruenti. Questi modelli teologici sono più problematici, divergenti e reciprocamente dissonanti.</text:p>
      <text:p text:style-name="P121"><text:span text:style-name="T38">6</text:span><text:span text:style-name="T14">. </text:span><text:span text:style-name="T48">Il Nuovo Testamento non è ciò che Gesù ha detto</text:span><text:span text:style-name="T14"> e scritto su se stesso, e probabilmente nemmeno quello che capì di se stesso. </text:span><text:span text:style-name="T48">E’ quello che la Chiesa e più tardi, i cristiani compresero e interpretarono che era o che avrebbe dovuto essere</text:span><text:span text:style-name="T14">. La tradizionale teologia cristiana dell’Incarnazione è il risultato di secoli di riflessioni, controversie e sviluppi successivi. Non è né una conseguenza necessaria di ciò che presenta il testo del Nuovo Testamento, né un prodotto esclusivo di pura stranezza teologica. Infatti realtà culturali, motivazioni politiche, programmi e vendette personali hanno svolto un ruolo significativo nel definire la sua forma ed il suo contenuto. Né la teologia dell’incarnazione è chiaramente delineata nel Nuovo Testamento nel suo senso definito, tradizionale e letterale. Nessuno può dimostrare che essa costituisca in toto l’essenza degli scritti del Nuovo Testamento, senza intrusioni esterne e interpretazioni arbitrarie. Potrebbe essere interpretata da alcuni scritti del Nuovo Testamento, ma non senza tentativi superficiali e violenza al testo da parte di chi </text:span><text:soft-page-break/><text:span text:style-name="T14">intende farlo.</text:span></text:p>
      <text:p text:style-name="P122"><text:span text:style-name="T38">7</text:span><text:span text:style-name="T14">. La teologia cristiana dell’Incarnazione, soprattutto nel suo senso letterale, è assolutamente corporale e antropomorfica e implica la venerazione fervente di un Dio uno e trino. Di fatto configura la personificazione del pensiero corporeo nella coscienza religiosa di alcuni semiti. Nell’Incarnazione, la separazione effettiva tra il divino e l’umano diventa impossibile. In realtà è il divino, il Logos, che è dominante, visibile e venerato, mentre l’uomo Gesù è riconosciuto e nascosto da qualche parte tra le ombre. Dio è spesso rivendicato ma raramente Gli viene conferita una Sua esistenza vera e naturale. In realtà </text:span><text:span text:style-name="T48">Dio Padre</text:span><text:span text:style-name="T14">, la presunta prima persona della Santissima Trinità e la </text:span><text:span text:style-name="T48">fonte originale di tutto</text:span><text:span text:style-name="T14">, </text:span><text:span text:style-name="T48">sembra essere in secondo piano rispetto a Gesù Cristo</text:span><text:span text:style-name="T14">, la seconda presunta persona della Trinità, </text:span><text:span text:style-name="T48">che spesso viene mostrato prendere il sopravvento in modo tale che Dio Padre diventa spesso invisibile</text:span><text:span text:style-name="T14">. </text:span><text:span text:style-name="T48">Il Cristianesimo, nel suo senso tradizionale popolare, è davvero quello che significa letteralmente la parola 'Cristianesimo.' Si tratta di una fede in Gesù Cristo e di una divinizzazione della sua persona.</text:span><text:span text:style-name="T14"> L’esaltazione di questa figura umana storica alla condizione di totale divinità rappresenta una degenerazione nello sviluppo cristiano. </text:span><text:span text:style-name="T48">L’incarnazione è veramente antropomorfica e completamente corporale</text:span><text:span text:style-name="T14"> </text:span><text:soft-page-break/><text:span text:style-name="T14">e ciò che </text:span><text:span text:style-name="T48">il Cristianesimo ha infine fatto</text:span><text:span text:style-name="T14"> è </text:span><text:span text:style-name="T48">eliminare il 'Sacro Trascendente perfetto,'</text:span><text:span text:style-name="T14"> </text:span><text:span text:style-name="T48">il santo Altro, Dio dell’universo fino ai regni dell’imperfezione e della profanazione.</text:span><text:span text:style-name="T14"> </text:span><text:span text:style-name="T48">Lo ha legato alle catene dell’imperfezione ed in effetti crocifisso due volte, una volta fisicamente ed una concettualmente, svilendo il messaggio di Gesù e rimodellandolo. Questa è la massima violenza contro Dio che sia mai stata concepita e contro la coscienza monoteista Semitica.</text:span></text:p>
      <text:p text:style-name="P90"><text:span text:style-name="T40">8</text:span><text:span text:style-name="T14">. La teologia dell’incarnazione non è paradossale. E’ completamente e assolutamente contraddittoria. </text:span><text:span text:style-name="T48">Secoli di dibattito teologico, difficoltà, sviluppi, controversie e interferenze politiche che tentano di definire con precisione la vera natura di Cristo e la sua relazione con Dio, sono segnali chiari e prove evidenti della natura contraddittoria di questa dottrina cristiana</text:span><text:span text:style-name="T14">, tutte inevitabili e ineluttabili dato che la teologia dell’incarnazione pone serie sfide all’intelletto umano e al pensiero razionale. Si devono violare tutte le categorie logiche e gli assiomi razionali per tenere conto delle argomentazioni dell’incarnazione e presentarle in forme e categorie intelligibili. </text:span><text:span text:style-name="T48">Queste incertezze logiche possono essere evitate solo se si accetta l’asserzione che il Vangelo di Gesù si occupa di più del Dio Padre e dei nostri rapporti con il prossimo </text:span><text:soft-page-break/><text:span text:style-name="T48">che della persona di Gesù stesso.</text:span><text:span text:style-name="T14"> </text:span><text:span text:style-name="T48">Il detto evangelico dell’ama il tuo Dio ed ama il tuo prossimo, è l’unica via di uscita da questi incubi teologici. Senza una tale sincera e onesta confessione, anche le interpretazioni metaforiche dell’Incarnazione nella sua forma tradizionale sarebbero fuorvianti e incomprensibili. </text:span></text:p>
      <text:p text:style-name="P90"><text:span text:style-name="T40">9</text:span><text:span text:style-name="T14">. Il processo di compilazione e canonizzazione del Nuovo Testamento fu un’operazione lunga e contorta. Ripartita nei secoli, incluse molte regioni, persone, intenti ecc. lasciò naturalmente un gran numero di domande e di impossibilità irrisolte, chiamando in causa il testo del Nuovo Testamento essendo la parola infallibile di Dio. </text:span><text:span text:style-name="T48">Aggiunte, inserimenti, forzature testuali e molti altri fattori</text:span><text:span text:style-name="T14"> (come delineato in questo studio) </text:span><text:span text:style-name="T48">sollevano serie questioni riguardo alla purezza testuale ed all’autenticità storica del Nuovo Testamento</text:span><text:span text:style-name="T14">. </text:span><text:span text:style-name="T48">Tutte queste difficoltà sono</text:span><text:span text:style-name="T14"> </text:span><text:span text:style-name="T48">attualmente ben riconosciute dalla maggioranza degli studiosi del Nuovo Testamento</text:span><text:span text:style-name="T14">. </text:span><text:span text:style-name="T48">Stabilito questo, così come il lungo processo di canonizzazione</text:span><text:span text:style-name="T14">, (di per sé un’importante prova di intervento umano, manipolazione e sfruttamento del testo del Nuovo Testamento) </text:span><text:span text:style-name="T48">è il momento di accettare e mettere in evidenza le origini e la natura umana degli scritti del Nuovo Testamento</text:span><text:span text:style-name="T14">.</text:span></text:p>
      <text:p text:style-name="P80"><text:span text:style-name="T14">1</text:span><text:span text:style-name="T40">0</text:span><text:span text:style-name="T14">. A differenza della Bibbia, il Corano è stato </text:span><text:soft-page-break/><text:span text:style-name="T14">canonizzato sin dal suo inizio. Il suo processo di compilazione non fu ripartito nel corso dei secoli, ma nel breve arco di pochi anni e nel corso della vita dei suoi destinatari originali. L’autenticità, la purezza e l’universalità del suo testo è un fatto storico ammesso sia dai musulmani che dagli studiosi e dalle fonti non musulmane. Molte domande e obiezioni riguardanti vari aspetti del Corano sono state sollevate da numerosi studiosi non musulmani nel corso dei secoli. Attualmente, sembra che ci sia una sorta di consenso tra coloro che sono attivamente impegnati nel campo degli studi coranici riguardo l’indiscutibilità dell’unità, dell’universalità e della purezza del testo coranico - un fatto storico - senza dubbio. Inoltre, la sfida coranica, che invita a produrre un versetto che possa rivaleggiare con uno qualsiasi del Corano, dopo quattordici secoli non è ancora stata colta, anche se furono fatti dei tentativi. D’altra parte, la sua asserzione di protezione divina, di preservazione e purezza del testo, anche fatta quattordici secoli fa, non è stata violata. La purezza, l’unità, l’integrità e l’universalità del suo testo nel corso di questi lunghi secoli è testimonianza del suo status divino come parola di Dio. </text:span></text:p>
      <text:p text:style-name="P92"><text:span text:style-name="T14">1</text:span><text:span text:style-name="T41">1</text:span><text:span text:style-name="T14">. Il paradigma del Dio del Corano è trascendentale. Il </text:span><text:soft-page-break/><text:span text:style-name="T14">suo monoteismo è puro, rigoroso e assoluto. Il Corano ha una concezione della trascendenza, alterità, unicità e perfezione di Dio sistematicamente ben spiegata. E’ supportata da innumerevoli versetti coranici e motivata da una varietà di metodi e argomentazioni. A differenza della Bibbia, è salvaguardata da possibili variazioni (come l’esistenza di altri dei ritenuti veri dei, la loro capacità di fare del male o del bene senza il permesso di Dio, divisione dei poteri, conoscenza, o persona o qualsiasi altra divisione all’interno della divinità, ecc). Inoltre, non è una nozione nuda e astratta di trascendenza ma una concezione equilibrata, vivida e viva di Dio. Il Dio trascendente è immanente in virtù della sua infinita conoscenza, potere, amore, misericordia e altri attributi positivi enunciati nel testo del Corano. A differenza della Bibbia, il paradigma del Corano è coerente. C’è solo un Dio trascendente, che è assolutamente perfetto nei Suoi Nomi e Attributi. Anche se ignoto nella sua essenza, Egli è conosciuto attraverso i Suoi segni, attributi, qualità e azioni. L’idea di un tale Dio trascendente viene espressa in modo coerente in tutto il testo del Corano. La sua forte natura etica e il tono egualitario sono anche evidenti dal testo coranico stesso. Il monoteismo etico trascendentale del Corano è sistematico e autosufficiente. Il Corano non ha bisogno </text:span><text:soft-page-break/><text:span text:style-name="T14">d’aiuto esterno o spiegazioni arbitrarie per presentare, spiegare e salvaguardare il proprio Paradigma di Dio da eventuali violazioni.</text:span></text:p>
      <text:p text:style-name="P90"><text:span text:style-name="T41">12</text:span><text:span text:style-name="T14">. Il paradigma del Dio del Corano non è né corporeo né antropomorfico. Le poche espressioni apparentemente antropomorfiche del Corano si prestano facilmente ad interpretazioni metaforiche, senza inventare fatti o metafore non esistenti nel testo stesso. Tali spiegazioni non antropomorfiche possono essere derivate sia dal contesto (o dall’interno del testo coranico) che attraverso metafore di uso comune nel linguaggio. Questo fatto è stato provato da un gran numero di sapienti e teologi musulmani nel corso dei secoli. Inoltre, queste frasi apparentemente antropomorfiche, se mantenute entro i parametri coranici, aiutano a creare una modalità indispensabile nel processo di comunicazione tra Dio e l’uomo. Il paradigma del Corano è in grado di creare questa modalità senza ricorrere all’antropomorfismo grafico o alla corporeità. Di conseguenza, l’Islam è sempre stato conosciuto per la sua forte posizione anti-antropomorfica, e fatta eccezione per i letteralisti assoluti, le correnti principali del pensiero islamico hanno sempre evitato e criticato le raffigurazioni antropomorfiche e corporee di Dio. Questo delicato </text:span><text:soft-page-break/><text:span text:style-name="T14">equilibrio è mantenuto dal testo ben preservato del Corano stesso. E’ mia opinione che in un’epoca di razionalità e ricerca scientifica, un Dio antropomorfico significa, infatti, la morte di Dio. Anche se formulata in termini drammatici questa affermazione è piuttosto un dato di fatto, e per fortuna non del tutto vero. Perché è il Dio antropomorfico che è morto, ma certamente non quello monoteista. A mio parere il successo della visione del mondo secolare risiede in gran parte nel suo apparente fascino intellettuale quando contrapposto a una versione non-intellettuale di Dio, un Dio controllato dai nostri cinque sensi, una divinità che nelle parole di Nietzsche merita costantemente la nostra 'pietà.' Per qualsiasi soluzione del problema dobbiamo ammettere che la laicità non è il trionfo dell’intelletto sulla superstizione, ma piuttosto un indice dell’alienazione globale dell’umanità, della sua perdita del fine e del significato della vita, e della sua necessità di un Dio trascendente, di qualcosa di più grande dell’uomo e del cosmo in cui vive. Alla fine del Medioevo, il Vecchio Mondo comprendeva quattro grandi civiltà. Di queste, tre ora sono, in una misura o nell’altra, secolarizzate. Ma in una delle quattro civiltà, quella islamica, la situazione è del tutto diversa. Con le parole di E. Gellner, 'Affermare che la secolarizzazione prevalga nell’Islam </text:span><text:soft-page-break/><text:span text:style-name="T14">non è controverso, è semplicemente falso. L’Islam è forte oggi come lo era un secolo fa. In un certo senso, è probabilmente molto più forte.</text:span></text:p>
      <text:p text:style-name="P123"><text:span text:style-name="T14">43 Egli attribuisce questa stabilità e autorità resistente al suo 'monoteismo enfatico e rigoroso.' Di conseguenza, si può facilmente sostenere che il paradigma del Dio coranico ha il potenziale per affrontare le moderne sfide degli atei e scongiurare i pericoli che hanno scosso altre civiltà fino al nucleo stesso della loro essenza. Il paradigma del Dio del Corano è sistematico, morale e trascendentale. È tanto logico quanto semplice nell’essenza. Si concentra di più sulla salvezza degli uomini, pietà, e riforma socio, politica ed economica che sulla persona di Muhammad, il Profeta dell’Islam o addirittura che su Dio stesso. È omocentrico piuttosto che essere teo-centrico. E’ anche veramente universale nella sua natura e implicazioni morali ed elimina ogni possibilità di pregiudizi razziali, nozioni di razza eletta, terre promesse e altre possibili rigide identità. La sua unità Divina intrinseca garantisce una unità umana universale. Tale nozione di Dio è stata ambita da tutte e tre le tradizioni semitiche anche se il testo della Bibbia non è coerente a questo riguardo. Enfatizzando gli elementi non-corporei e non-antropomorfi nella Divinità non si farebbe una terribile </text:span><text:soft-page-break/><text:span text:style-name="T14">ingiustizia a queste tradizioni. Piuttosto, al contrario, si rimarrebbe proprio negli obiettivi desiderati da queste tradizioni di fede. Con l’aiuto di questa semplice ma magnifica concezione della Divinità, l’ampio divario tra l’uomo alienato e Dio può essere diminuito e la scienza e la fede possono essere riavvicinate, se non messe assieme. Tutto ciò non è affatto fantasioso, poiché la scienza moderna e la filosofia sembrano aprire alla fede in Dio. Per esempio Paul Charles William Davies (nato nel 1946), fisico, cosmologo e astrobiologo che lavora alla Arizona State University, obietta con forza contro le nozioni di mancanza di significato e di senso dell’universo. Davies osserva ulteriormente che, 'Sebbene molte teorie metafisiche e teistiche sembrino artificiose e infantili, non sono però ovviamente più assurde della convinzione che l’universo esiste, e che esiste nella forma in cui esiste senza una ragione. Siamo veramente fatti per stare qui.'</text:span></text:p>
      <text:p text:style-name="P123"><text:span text:style-name="T14">44. Davies sottolinea il bisogno di pensare a Dio in modi meno antropomorfici e di non avere un’immagine ingenua di Dio, ma forse, di pensare a Dio come trascendente 'Mente universale,' 'supremo concetto olistico' 'Essere sé stesso' o di una 'Forza Creativa' o un 'matematico.' Egli sostiene che solo un Dio, che trascende lo spazio-tempo ed è al di sopra delle </text:span><text:soft-page-break/><text:span text:style-name="T14">manipolazioni umane, può avere un reale significato e rilevanza per le attività naturali che si svolgono intorno a noi. Non sto dicendo che la religione dovrebbe seguire un concetto scientifico di Dio o che la rivelazione dovrebbe essere subordinata alla scienza. Piuttosto, ciò che voglio sottolineare è che un concetto grezzo, antropomorfico o corporale di Dio, sia un grosso ostacolo, in posizione inamovibile tra il pensiero intellettuale moderno e la fede in Dio. Esso, nella migliore delle ipotesi, ha indebolito l’autorità della religione e di Dio e nella peggiore, l’ha annientata. L’intelletto umano non è in grado di assimilare o conciliare l’idea di un uomo Dio o un essere umano somigliante a Dio che adoriamo, non possa essere alla nostra portata, ma sia più grande dell’universo stesso. </text:span><text:span text:style-name="T48">Le concezioni antropomorficamente corporee del Divino sono forse tra le cause principali dell’ateismo moderno</text:span><text:span text:style-name="T14">. </text:span><text:span text:style-name="T48">Questo divario tra coscienza religiosa e pensiero intellettuale può essere ridotto notevolmente sottolineando e insistendo sul Dio morale trascendente.</text:span><text:span text:style-name="T14"> La difficoltà nel credere oggi non è dovuta al credo come tale, ma piuttosto a un concetto di Dio che è antropomorfico e corporeo, che non si rivolge all’intelletto e che appare al tempo debole, senza forza, vigore e trascendenza. Eppure, c’è una soluzione. E </text:span><text:soft-page-break/><text:span text:style-name="T14">questa è il Dio del Corano. Il Corano fornisce l’autorità, Dio, di cui le persone sono alla ricerca e che possono accettare, formulata in un linguaggio ed evidenziata da una logica che permette una comprensione immediata, completa e intelligente del Divino </text:span><text:span text:style-name="T42">i</text:span><text:span text:style-name="T14">n quanto tale, è il Corano, che può contribuire più della Bibbia ad una rinascita della fede globale in una divinità trascendente e nella religione stessa. Il suo sforzo focalizzato sulla Unità assoluta di Dio, Singolarità, Unicità e Trascendenza, nel loro senso più alto e più puro, e il suo rifiuto inequivocabile di immagini antropomorfiche e raffigurazioni di Dio per scongiurare i pericoli di concetti corporei, è impareggiabile, e si rivolge ai più alti intelletti così come alle mentalità più medie. E’ anche testimonianza del vigore della fede islamica che ha indiscutibilmente resistito al duplice assalto della complessa filosofia atea e dell’incredulità diffusa nei fondamenti della religione.</text:span></text:p>
      <text:p text:style-name="P38">Non realizzerà nulla di meno che il ripristino di Dio come Maestoso, Unico, Solo, e Uno, il Creatore e Sovrano del cosmo e di tutto ciò che esso contiene.</text:p>
      <text:p text:style-name="P38">L’autore Zulfiqar Ali Shah </text:p>
      <text:p text:style-name="P132"><text:span text:style-name="T94">Lo studio condotto dall’autore </text:span><text:span text:style-name="T54">Zulfiqar Ali Shah</text:span><text:span text:style-name="T94">, è </text:span><text:span text:style-name="T95">corredato da note</text:span><text:span text:style-name="T94"> poste a piè di pagina </text:span><text:span text:style-name="T96">per </text:span><text:span text:style-name="T95">facilita</text:span><text:span text:style-name="T96">re</text:span><text:span text:style-name="T95"> la </text:span><text:soft-page-break/><text:span text:style-name="T95">comprensione di un tema affascinante e complesso. </text:span></text:p>
      <text:p text:style-name="P153">L’argomento, intriso di mistero e legami profondi con la storia umana, trova nei millenni tracce di una continua evoluzione dei sistemi religiosi, adattati per rispondere ai bisogni spirituali e culturali dei popoli. Questa dinamica, unica e universale, riflette la ricerca dell’uomo di spiegare il proprio posto nell’universo e il rapporto con il divino. L’antropomorfismo, intrecciato alla storia religiosa dell’umanità, rappresenta una continua evoluzione in cui l’uomo ha modellato le proprie credenze per rispondere alle esigenze spirituali, sociali e culturali del proprio popolo. Questo processo, misterioso e straordinario, riflette la capacità dell’essere umano di interpretare il divino e di adattare il sacro alle sfide del proprio tempo.</text:p>
      <text:p text:style-name="P154">C. Tafaro</text:p>
      <text:h text:style-name="P182" text:outline-level="3"><text:bookmark-start text:name="__RefHeading___Toc6365_1157857660"/>La Risposta delle Tradizioni Giudaico-Cristiane alla Tesi sull'Antropomorfismo e l'Ateismo Moderno<text:bookmark-end text:name="__RefHeading___Toc6365_1157857660"/></text:h>
      <text:p text:style-name="P161">I. Introduzione</text:p>
      <text:p text:style-name="P161">Zulfiqar Ali Shah sostiene che le concezioni antropomorficamente corporee del Divino rappresentano una delle cause principali dell’ateismo moderno. Questa prospettiva evidenzia un potenziale <text:soft-page-break/>divario tra la coscienza religiosa, che spesso impiega un linguaggio e immagini familiari per descrivere Dio, e il pensiero intellettuale, che ricerca coerenza logica e concettualizzazioni sofisticate. La tesi di Shah suggerisce che questo scollamento possa essere significativamente ridotto enfatizzando e insistendo su un Dio morale trascendente, una nozione che si allontana dalle limitazioni delle rappresentazioni corporee. Il presente rapporto si propone di indagare come le tradizioni giudaico-cristiane abbiano sviluppato nel corso della storia interpretazioni teologiche che trascendono tali rappresentazioni corporee, concentrandosi in particolare sui contributi di pensatori di spicco come Maimonide nell'ebraismo e Tommaso d'Aquino nel cristianesimo. L'obiettivo è analizzare la risposta intrinseca di queste tradizioni alla sfida posta da una comprensione troppo letterale e antropomorfica del Divino, esaminando come esse presentano la natura di Dio in relazione al pensiero intellettuale e alla potenziale causa dell'ateismo moderno.</text:p>
      <text:p text:style-name="P162">Seguendo i sette punti sollevati dall'interazione con l'intelligenza artificiale, questo rapporto guiderà il lettore attraverso un'analisi approfondita e ben documentata che esplora il modo in cui le tradizioni giudaico-cristiane interpretano e rispondono a questa <text:soft-page-break/>complessa questione.</text:p>
      <text:h text:style-name="P182" text:outline-level="3"><text:bookmark-start text:name="__RefHeading___Toc6367_1157857660"/>II. La Sfida dell'Antropomorfismo nelle Scritture Giudaico-Cristiane.<text:bookmark-end text:name="__RefHeading___Toc6367_1157857660"/></text:h>
      <text:p text:style-name="P162">È innegabile che sia la Bibbia ebraica (Antico Testamento) sia il Nuovo Testamento contengano un linguaggio antropomorfico nel descrivere Dio. Le Scritture sono ricche di esempi in cui a Dio vengono attribuiti attributi fisici simili a quelli umani, come mani, braccia, bocca, volto, orecchie e occhi. Si parla anche di Dio che compie azioni umane come parlare, camminare, ridere e creare. Inoltre, le Scritture ascrivono a Dio emozioni umane come tristezza, gelosia, pietà, ira, amore e odio. La funzione principale dell'antropomorfismo in questi testi è quella di rendere l'incomprensibile natura di Dio più accessibile e relazionabile agli esseri umani. Utilizzando termini umani, le Scritture permettono ai lettori di afferrare alcuni aspetti della natura e delle azioni di Dio in modi che sarebbero altrimenti difficili da comprendere. Questo linguaggio rende il divino più "personale" e favorisce un senso di connessione tra Dio e l'umanità. Tuttavia, le tradizioni giudaico-cristiane hanno sempre riconosciuto i limiti e i potenziali pericoli di interpretare queste descrizioni antropomorfiche in modo letterale.</text:p>
      <text:p text:style-name="P162"><text:soft-page-break/>Un'interpretazione troppo letterale rischia di limitare la nostra comprensione della potenza e della trascendenza infinite di Dio, riducendo il divino a un essere umano ingigantito. Inoltre, un'eccessiva enfasi sugli attributi umani di Dio può potenzialmente portare all'idolatria, creando un'immagine limitata o distorta del vero Dio. La diffusa presenza di antropomorfismo nei primi testi giudaico-cristiani, pur avendo uno scopo pedagogico iniziale nel rendere il divino accessibile, comporta intrinsecamente il rischio di essere frainteso in senso letterale, portando potenzialmente a una comprensione semplicistica e limitata di Dio. Questo potrebbe effettivamente contribuire allo scetticismo intellettuale evidenziato da Zulfiqar Ali Shah. Inoltre, l'atto stesso di descrivere Dio in termini umani, nonostante la sua utilità iniziale, crea una tensione con l'affermazione teologica centrale della trascendenza e dell'alterità di Dio, aprendo la strada a una riflessione teologica volta a superare queste rappresentazioni ingenue.</text:p>
      <text:h text:style-name="P182" text:outline-level="3"><text:bookmark-start text:name="__RefHeading___Toc6369_1157857660"/>III. Prospettive Ebraiche sull'Incorporeità Divina: Il Contributo di Maimonide.<text:bookmark-end text:name="__RefHeading___Toc6369_1157857660"/></text:h>
      <text:p text:style-name="P162">La concezione dell'incorporeità di Dio si è sviluppata all'interno del giudaismo come una credenza <text:soft-page-break/>fondamentale.</text:p>
      <text:p text:style-name="P163">Fin dal periodo biblico, è stato un assioma che nessuna rappresentazione materiale della Divinità fosse possibile o ammissibile. La stessa Bibbia contiene avvertimenti contro l'interpretazione letterale delle immagini antropomorfiche. La tradizione ebraica ha mostrato una preferenza per un linguaggio concreto e vitale riguardo a Dio, pur riconoscendo i pericoli dell'antropomorfismo apparente. I Giudei di lingua greca, hanno contribuito a spiritualizzare le frasi antropomorfiche della Bibbia. Tuttavia, fu con la teologia normativa articolata da Maimonide che l'enfasi sull'incorporeità di Dio divenne un pilastro del pensiero ebraico. Maimonide, nella sua opera fondamentale "Guida dei Perplessi", presenta una difesa intransigente dell'incorporeità di Dio. Egli afferma che credere che Dio abbia un corpo è una forma di idolatria. Per Maimonide, Dio non ha corpo, non è influenzato da fenomeni fisici ed è incomparabile alle cose create. I termini corporei usati nelle Scritture sono da intendersi metaforicamente, poiché "la Torah parla il linguaggio degli uomini". Maimonide concepisce Dio come una perfetta unità, che non ammette alcuna pluralità, né letteralmente né figurativamente. La sua teologia è spesso descritta come <text:span text:style-name="T70">teologia negativa</text:span>, che descrive <text:soft-page-break/>Dio attraverso ciò che Egli non è (non corporeo, non occupa spazio, ecc.). Egli rifiuta l'attribuzione di attributi positivi a Dio, poiché ciò implicherebbe una pluralità nella Sua essenza. Maimonide interpreta i passaggi antropomorfici come allegorici, progettati per facilitare la transizione del popolo ebraico dall'idolatria al monoteismo. Egli descrive Dio come l'"Essere Primario che ha portato all'esistenza tutto ciò che esiste". L'incorporeità di Dio è per Maimonide un principio fondamentale della fede ebraica. Egli stabilisce una connessione logica tra l'unicità di Dio e la Sua incorporeità, sostenendo che un corpo implica limitazione e divisione, contraddicendo così la Sua assoluta unità. Lo scopo della "Guida dei Perplessi" era proprio quello di riconciliare la credenza religiosa con il pensiero filosofico, rivolgendosi agli studiosi disorientati dal conflitto tra fede e ragione. Gli argomenti di Maimonide hanno avuto un'influenza profonda sulla comprensione ebraica del Divino. La sua teologia razionalistica ha dominato gran parte del pensiero ebraico ufficiale e tradizionale , e la credenza nell'incorporeità di Dio è diventata un cardine del giudaismo. L'approccio sistematico e filosofico di Maimonide all'incorporeità divina ha rappresentato una svolta cruciale nella teologia ebraica, fornendo un <text:soft-page-break/>quadro intellettuale per comprendere e interpretare le descrizioni bibliche antropomorfiche in modo coerente con una sofisticata comprensione monoteistica di Dio. Questo risponde direttamente alla domanda sulla possibilità di superare le rappresentazioni corporee. Inoltre, la teologia negativa di Maimonide, pur sottolineando i limiti della comprensione umana dell'essenza di Dio, paradossalmente serve a elevare il divino allontanandolo dalle limitazioni e dalle imperfezioni inerenti agli attributi umani e alle forme fisiche.</text:p>
      <text:h text:style-name="P182" text:outline-level="3"><text:bookmark-start text:name="__RefHeading___Toc6371_1157857660"/>IV. Prospettive Cristiane sulla Trascendenza e Immanenza Divina: Le Riflessioni di Tommaso d'Aquino.<text:bookmark-end text:name="__RefHeading___Toc6371_1157857660"/></text:h>
      <text:p text:style-name="P162">La teologia cristiana affronta la natura di Dio al di là delle descrizioni corporee affermando che Dio è l'essere eterno e supremo che ha creato e conserva tutte le cose. La concezione cristiana di Dio è monoteistica, caratterizzata sia dalla trascendenza (totalmente indipendente e separato dall'universo materiale) sia dall'immanenza (attivamente coinvolto nell'universo materiale). Dio è concepito come Spirito, infinito, eterno e immutabile, dotato di numerosi attributi come aseità, eternità, grazia, santità, immutabilità, impassibilità, <text:soft-page-break/>incorporeità, amore, onnipotenza, onnipresenza, onniscienza, unità, provvidenza, giustizia, trascendenza, trinità, veridicità e sapienza. La teologia cristiana respinge il panteismo, affermando che Dio non è della stessa sostanza dell'universo creato. Tommaso d'Aquino, figura centrale della teologia cristiana, ha ampiamente riflettuto sulla natura di Dio. Egli sosteneva che Dio non è un composto materiale, ma un essere semplice, né un composto metafisico di attributi distinti dalla Sua essenza. Secondo Aquino, la conoscenza di Dio si acquisisce in due modi: attraverso la ragione e l'insegnamento sacro. La ragione può dimostrare l'esistenza di Dio e alcuni Suoi attributi, come l'unità, l'immaterialità e l'eternità. Nella sua "Summa Theologica", Aquino presenta le famose "Cinque Vie" per dimostrare l'esistenza di Dio, basate sull'osservazione del mondo naturale. Aquino desume alcune di queste vie dalla tradizione filosofica a lui precedente, platonica e aristotelica, rileggendola in chiave cristiana. La lettura del testo richiede alcuni chiarimenti. Il primo è che non si tratta di “dimostrazioni” in senso formale, bensì di vie, cioè di itinerari concettuali che la mente umana può seguire facendo leva anche sull’intuizione e sul senso comune. Il secondo è che, in senso stretto, ciò la cui esistenza si <text:soft-page-break/>mostra al termine di ciascuna via non è l’immagine teologica o biblica di un Dio personale, ma l’immagine di un Ente filosofico: un primo motore, una causa prima, un fondamento necessario, un’intelligenza ordinatrice concepisce Dio come "actus essendi", l'atto stesso di essere, <text:span text:style-name="T97">è</text:span> per questo motivo che <text:span text:style-name="T97">Aquino</text:span> conclude ogni via con la frase “… e questo tutti chiamano Dio”, in cui esistenza ed essenza sono identiche. Egli sviluppa anche la dottrina dell'analogia dell'essere, secondo cui il linguaggio su Dio è analogico, né univoco né equivoco. La semplicità divina implica l'assenza di parti e composizione in Dio. Aquino sottolinea anche che la trascendenza e l'immanenza di Dio sono complementari: Dio è totalmente Altro, eppure intimamente attivo nella creazione. Il pensiero di Aquino rappresenta una sintesi tra la rivelazione biblica e la filosofia greca, in particolare quella di Aristotele. Egli utilizzò il pensiero scientifico aristotelico come metodo per la comprensione teologica e filosofica , pur distinguendo tra la filosofia basata sulla ragione e la religione basata sulla rivelazione divina fornita dalla fede. La filosofia, secondo Tommaso, si basa sull'uso della ragione naturale per indagare il mondo e i principi fondamentali dell'esistenza. Essa non richiede la fede per funzionare e si occupa di ciò che è accessibile a tutti, <text:soft-page-break/>indipendentemente dalla religione o dalla rivelazione divina. La teologia, fondata sulla rivelazione divina si avvale <text:span text:style-name="T98">invece </text:span>della fede come suo principio guida. Pur utilizzando la ragione, la teologia si occupa di questioni che superano le capacità della ragione umana da sola, come i misteri della Trinità o dell'Incarnazione. È quindi complementare alla filosofia, in quanto fornisce risposte a domande che la ragione, da sola, non potrebbe mai risolvere.</text:p>
      <text:p text:style-name="P162">Come Maimonide, Tommaso d'Aquino superò l'antropomorfismo semplicistico impiegando il ragionamento filosofico per articolare una sofisticata comprensione della natura di Dio. Il suo concetto di semplicità divina<text:note text:id="ftn48" text:note-class="footnote"><text:note-citation>48</text:note-citation><text:note-body><text:p text:style-name="P56">Dio è assolutamente semplice, ossia privo di composizione. Questo significa che in Dio non esistono parti, accidenti o potenzialità da realizzare. La Sua essenza coincide perfettamente con la Sua esistenza: Dio è esse ipsum subsistens, "l'Essere stesso sussistente". Questo elimina qualsiasi possibilità di attribuire a Dio caratteristiche limitate o mutabili, come quelle umane.</text:p></text:note-body></text:note> e l'analogia dell'essere<text:note text:id="ftn49" text:note-class="footnote"><text:note-citation>49</text:note-citation><text:note-body><text:p text:style-name="P56">Tommaso introdusse l'idea che il linguaggio umano può descrivere Dio solo in modo analogico, non univoco (come per gli oggetti materiali) né equivoco (completamente diverso). <text:span text:style-name="T99">E</text:span>sempio, quando diciamo che Dio è "buono", intendiamo qualcosa di simile alla bontà umana, ma in un modo infinitamente più perfetto e trascendente. Questa analogia permette di parlare di Dio senza ridurlo a categorie umane.</text:p></text:note-body></text:note> fornirono un quadro per comprendere un Dio trascendente ma personale, capace di rispondere alle sfide intellettuali alla fede. L'integrazione di ragione e fede da parte di <text:soft-page-break/>Aquino suggerisce che l'indagine intellettuale non è antitetica alla credenza cristiana, ma può servire a illuminare le verità rivelate nella Scrittura. Questo approccio contrasta direttamente con l'idea che la fede religiosa richieda un rifiuto del pensiero intellettuale, che potrebbe essere un fattore che contribuisce all'ateismo per alcuni.</text:p>
      <text:h text:style-name="P183" text:outline-level="3"><text:bookmark-start text:name="__RefHeading___Toc6373_1157857660"/>V. Analisi Comparativa: Maimonide e Tommaso d'Aquino.<text:bookmark-end text:name="__RefHeading___Toc6373_1157857660"/></text:h>
      <text:p text:style-name="P162">Maimonide e Tommaso d'Aquino, pur operando in contesti intellettuali e religiosi diversi, condivisero l'obiettivo di fornire una comprensione intellettualmente coerente di Dio che superasse l'antropomorfismo semplicistico. Entrambi enfatizzarono l'incorporeità e la trascendenza di Dio come principi essenziali delle loro rispettive teologie e interpretarono le espressioni antropomorfiche nelle Scritture in modo metaforico o allegorico. Entrambi furono influenzati dalla filosofia aristotelica, sebbene con diverse sfumature e integrazioni nei loro sistemi di pensiero. Un obiettivo comune era quello di riconciliare la fede con la ragione, cercando di fornire resoconti intellettualmente soddisfacenti delle loro rispettive fedi. Tuttavia, differirono significativamente nei loro approcci <text:soft-page-break/>e negli strumenti filosofici specifici che impiegarono. <text:span text:style-name="T100">Maimonide pose una forte enfasi sulla teologia negativa, descrivendo Dio principalmente attraverso ciò che Egli non è, mentre Tommaso d'Aquino sviluppò la dottrina dell'analogia dell'essere per consentire una predicazione positiva</text:span> (sebbene analogica) di Dio. <text:span text:style-name="T101">Grazie a questi concetti Tommaso </text:span>riuscì a<text:span text:style-name="T101">d</text:span> articolare una visione di Dio che è al tempo stesso trascendente, totalmente "altro" rispetto al mondo creato, e personale, ossia in relazione con le sue creature. Questo approccio ha risposto efficacemente alle critiche filosofiche e alle sfide intellettuali del suo tempo, mostrando che la fede cristiana poteva essere difesa e compresa attraverso un pensiero razionale.</text:p>
      <text:p text:style-name="P162">La preoccupazione di Maimonide di salvaguardare l'unità e la semplicità di Dio lo portò a negare attributi distinti in modo più radicale rispetto ad Aquino, che trovò un modo per conciliare la semplicità divina con l'attribuzione analogica di attributi. Maimonide scrisse all'interno di una forte tradizione filosofica islamica, spesso impegnandosi con le interpretazioni islamiche, mentre Aquino contribuì alla nascente scolastica occidentale.</text:p>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73">Caratteristica</text:p>
          </table:table-cell>
          <table:table-cell table:style-name="Tabella1.A1" office:value-type="string">
            <text:p text:style-name="P173">M<text:span text:style-name="T102">a</text:span>imonide</text:p>
          </table:table-cell>
          <table:table-cell table:style-name="Tabella1.A1" office:value-type="string">
            <text:p text:style-name="P173">Tommaso d’Aquino</text:p>
          </table:table-cell>
        </table:table-row>
        <table:table-row table:style-name="Tabella1.2">
          <table:table-cell table:style-name="Tabella1.A1" office:value-type="string">
            <text:p text:style-name="P174">Principale Influenza <text:soft-page-break/>Filosofica</text:p>
          </table:table-cell>
          <table:table-cell table:style-name="Tabella1.A1" office:value-type="string">
            <text:p text:style-name="P175">Neoplatonismo islamico,</text:p>
            <text:p text:style-name="P175"><text:soft-page-break/>Aristotele</text:p>
          </table:table-cell>
          <table:table-cell table:style-name="Tabella1.A1" office:value-type="string">
            <text:p text:style-name="P174">Aristotele, <text:soft-page-break/>Neoplatonismo</text:p>
          </table:table-cell>
        </table:table-row>
        <table:table-row>
          <table:table-cell table:style-name="Tabella1.A1" office:value-type="string">
            <text:p text:style-name="P174">Approccio <text:span text:style-name="T103">agli</text:span></text:p>
            <text:p text:style-name="P174">Attributi Divini</text:p>
          </table:table-cell>
          <table:table-cell table:style-name="Tabella1.A1" office:value-type="string">
            <text:p text:style-name="P174">Teologia negativa</text:p>
            <text:p text:style-name="P174">(descrizione di ciò che Dio non è<text:span text:style-name="T103">)</text:span></text:p>
          </table:table-cell>
          <table:table-cell table:style-name="Tabella1.A1" office:value-type="string">
            <text:p text:style-name="P174">Analogia dell'essere (predicazione analogica)</text:p>
          </table:table-cell>
        </table:table-row>
        <table:table-row>
          <table:table-cell table:style-name="Tabella1.A1" office:value-type="string">
            <text:p text:style-name="P71">I<text:span text:style-name="T104">nterpretazione dell'Antropomorfismo</text:span></text:p>
          </table:table-cell>
          <table:table-cell table:style-name="Tabella1.A1" office:value-type="string">
            <text:p text:style-name="P176">Metaforica, allegorica; progettata per</text:p>
            <text:p text:style-name="P176">allontanare dall'idolatria </text:p>
          </table:table-cell>
          <table:table-cell table:style-name="Tabella1.A1" office:value-type="string">
            <text:p text:style-name="P176">Metaforica, analogica; riconciliazione con la comprensione razionale </text:p>
          </table:table-cell>
        </table:table-row>
        <table:table-row>
          <table:table-cell table:style-name="Tabella1.A1" office:value-type="string">
            <text:p text:style-name="P176">Enfasi su Ragione vs. Rivelazione </text:p>
          </table:table-cell>
          <table:table-cell table:style-name="Tabella1.A1" office:value-type="string">
            <text:p text:style-name="P176">Ragione come <text:span text:style-name="T105">strumen-</text:span></text:p>
            <text:p text:style-name="P176">to per comprendere la</text:p>
            <text:p text:style-name="P176">rivelazione,ma con limiti </text:p>
          </table:table-cell>
          <table:table-cell table:style-name="Tabella1.A1" office:value-type="string">
            <text:p text:style-name="P176">Armonia tra ragione e rivelazione; la ragione può preparare alla fed<text:span text:style-name="T105">e</text:span></text:p>
          </table:table-cell>
        </table:table-row>
        <table:table-row>
          <table:table-cell table:style-name="Tabella1.A1" office:value-type="string">
            <text:p text:style-name="P176">Opere Chiave </text:p>
          </table:table-cell>
          <table:table-cell table:style-name="Tabella1.A1" office:value-type="string">
            <text:p text:style-name="P176">Guida dei Perplessi, Mishneh Torah </text:p>
          </table:table-cell>
          <table:table-cell table:style-name="Tabella1.A1" office:value-type="string">
            <text:p text:style-name="P176">Summa Theologica, Summa Contra Gentiles </text:p>
          </table:table-cell>
        </table:table-row>
        <table:table-row>
          <table:table-cell table:style-name="Tabella1.A1" office:value-type="string">
            <text:p text:style-name="P176">Concetto di Semplicità Divina </text:p>
          </table:table-cell>
          <table:table-cell table:style-name="Tabella1.A1" office:value-type="string">
            <text:p text:style-name="P176">Radicale; nega la pluralità degli attributi </text:p>
          </table:table-cell>
          <table:table-cell table:style-name="Tabella1.A1" office:value-type="string">
            <text:p text:style-name="P176">Permette l'attribuzione analogica senza compromettere la semplicità </text:p>
          </table:table-cell>
        </table:table-row>
        <table:table-row>
          <table:table-cell table:style-name="Tabella1.A1" office:value-type="string">
            <text:p text:style-name="P176">Rapporto di Dio con il Mondo </text:p>
          </table:table-cell>
          <table:table-cell table:style-name="Tabella1.A1" office:value-type="string">
            <text:p text:style-name="P176">Creatore trascendente; emanazione (interpretata in vari modi) </text:p>
          </table:table-cell>
          <table:table-cell table:style-name="Tabella1.A1" office:value-type="string">
            <text:p text:style-name="P176">Creatore trascendente e immanente; partecipazione dell'essere creato in Dio </text:p>
          </table:table-cell>
        </table:table-row>
      </table:table>
      <text:p text:style-name="P124"><text:span text:style-name="T106"/></text:p>
      <text:p text:style-name="P124"><text:span text:style-name="T106">Mentre entrambi Maimonide e Tommaso d'Aquino cercarono di fornire comprensioni intellettualmente coerenti di Dio che andassero oltre il semplice antropomorfismo, </text:span><text:span text:style-name="T107">la loro </text:span><text:span text:style-name="T106">distint</text:span><text:span text:style-name="T107">a formazione culturale </text:span><text:span text:style-name="T106">filosofic</text:span><text:span text:style-name="T107">a</text:span><text:span text:style-name="T106"> port</text:span><text:span text:style-name="T107">ò</text:span><text:span text:style-name="T106"> a metodologie ed enfasi diverse. Per il filosofo e teologo ebraico Mosè Maimonide, era impossibile descrivere Dio positivamente, perché ogni attributo umano applicato a Dio lo limiterebbe e tradirebbe la sua natura infinita. La teologia negativa, dunque, sostiene che possiamo solo dire cosa Dio non </text:span><text:soft-page-break/><text:span text:style-name="T106">è. Ad esempio, Dio non è corporeo, non è limitato, non è mutevole. Questo approccio preserva la trascendenza divina ma rende difficile un'immagine personale di Dio. Aquino propose un approccio più bilanciato, </text:span><text:span text:style-name="T108">attraverso</text:span><text:span text:style-name="T106"> la dottrina dell'analogia. </text:span><text:span text:style-name="T108">S</text:span><text:span text:style-name="T106">osteneva che possiamo parlare di Dio utilizzando termini umani, purché si comprenda che si tratta di descrizioni analogiche e non letterali. Quando diciamo che Dio è "buono" o "sapiente," intendiamo che Dio possiede bontà e sapienza in un modo infinitamente superiore e trascendente rispetto agli esseri umani. Questo permette di conciliare la trascendenza di Dio con la possibilità di relazionarci a Lui in modo significativo. <text:s/>Comprendere queste differenze fornisce un apprezzamento più ricco dei diversi modi in cui queste tradizioni si sono confrontate con le sfide intellettuali alla fede.</text:span></text:p>
      <text:h text:style-name="P182" text:outline-level="3"><text:bookmark-start text:name="__RefHeading___Toc6375_1157857660"/>VI. Risposte Contemporanee all'Ateismo all'Interno delle Tradizioni Giudaico-Cristiane<text:bookmark-end text:name="__RefHeading___Toc6375_1157857660"/></text:h>
      <text:p text:style-name="P162">Il pensiero giudaico-cristiano contemporaneo presenta una vasta gamma di risposte all'ateismo moderno. L'ateismo è riconosciuto come una sfida significativa, spesso radicata nello scetticismo e nella mancanza di prove empiriche per le affermazioni soprannaturali. Nel <text:soft-page-break/>giudaismo contemporaneo, si assiste a un'enfasi sull'etica monoteistica e sull'imperativo morale come elementi centrali dell'identità ebraica, a volte persino al di sopra della credenza in Dio. </text:p>
      <text:p text:style-name="P162">Alcuni pensatori hanno suggerito che l'ateismo, sfidando concezioni religiose antropomorfiche, dogmatiche o limitanti, costringa le religioni a riconsiderare e riformulare la loro comprensione del Divino. </text:p>
      <text:p text:style-name="P163">Se prendiamo questa prospettiva, l'ateismo potrebbe agire come un catalizzatore per <text:span text:style-name="T112">s</text:span>timolare una riflessione più profonda e una fede più autentica, libera dalle costruzioni umane troppo semplificate o comode. Sfida<text:span text:style-name="T112">re</text:span> le interpretazioni letterali o assolutiste che possono rendere la religione meno accessibile e meno universale. Portare una maggiore enfasi sull'essenza trascendente di Dio, al di là delle rappresentazioni umane.</text:p>
      <text:p text:style-name="P162">Questa dinamica potrebbe ricordare il concetto teologico secondo cui l'esistenza del "dubbio" o del "vuoto" è necessaria per una fede più robusta e maturata. </text:p>
      <text:p text:style-name="P162">Nel cristianesimo contemporaneo, il confronto con il "Nuovo Ateismo" ha assunto una rilevanza significativa. <text:soft-page-break/>Il "Nuovo Ateismo," rappresentato da pensatori come Richard Dawkins, Christopher Hitchens e Sam Harris, propone una critica aggressiva alla religione, spesso basata su argomenti scientifici e morali. I cristiani, in risposta, hanno sviluppato strategie per affrontare tali sfide e difendere la credibilità intellettuale della loro fede. Le principali argomentazioni del cristianesimo contro il Nuovo Ateismo includono <text:span text:style-name="T112">l</text:span>'apertura alla scienza. Molti pensatori cristiani, come John Lennox o William Lane Craig, sostengono che la scienza e la fede non siano in conflitto, ma piuttosto complementari. Ad esempio, l'ordine e la complessità dell'universo possono essere interpretati come segni di un'intelligenza superiore. Argomentano che il cristianesimo offre una base morale universale, mentre il Nuovo Ateismo spesso lotta per spiegare l'origine della moralità senza un riferimento trascendente. Oltre agli argomenti razionali, si sottolinea l'importanza della relazione personale con Dio, difficile da ridurre a una spiegazione puramente intellettuale. Accusano il Nuovo Ateismo di presentare caricature semplificate delle religioni, senza considerare le loro ricchezze filosofiche, storiche e spirituali. Il pensiero giudaico-cristiano contemporaneo mostra una vasta gamma di risposte all'ateismo, da dirette confutazioni intellettuali e reinterpretazioni di <text:soft-page-break/>dottrine tradizionali a un'attenzione all'etica vissuta e all'esperienza personale del divino. Questa diversità riflette il continuo impegno di queste tradizioni con le sfide intellettuali moderne.</text:p>
      <text:h text:style-name="P182" text:outline-level="3"><text:bookmark-start text:name="__RefHeading___Toc6377_1157857660"/>VII. L'Enfasi su un "Dio Morale Trascendente"<text:bookmark-end text:name="__RefHeading___Toc6377_1157857660"/></text:h>
      <text:p text:style-name="P162">Entrambe le tradizioni giudaico-cristiane, nelle loro risposte all'ateismo, enfatizzano frequentemente la natura morale e trascendente di Dio. Il giudaismo presenta un concetto di Dio come trascendente (al di là dell'universo materiale) e fonte di moralità (monoteismo etico). Il cristianesimo sottolinea la trascendenza di Dio (natura suprema e infinita) e l'immanenza (presenza intima), con gli attributi morali di Dio (santità, amore, giustizia) che plasmano l'etica cristiana. L'"Argomento Morale" è un argomento chiave contemporaneo per l'esistenza di Dio in entrambe le tradizioni, postulando che la moralità oggettiva richiede un Dio trascendente e morale. L'enfasi su un Dio morale trascendente è collegata alla comprensione dell'ateismo come derivante da un rifiuto di tale essere divino o da un'insoddisfazione per le rappresentazioni antropomorfiche. </text:p>
      <text:p text:style-name="P162">L'idea di un Dio morale trascendente non è solo un pilastro del pensiero teistico, ma anche un elemento <text:soft-page-break/>che, quando mal interpretato o rappresentato in modo insoddisfacente, può diventare un punto di tensione che alimenta l'ateismo. Alcuni atei, come Friedrich Nietzsche o Jean-Paul Sartre, hanno visto il concetto di un Dio trascendente e legislatore morale come una limitazione della libertà umana. Da questa prospettiva, il rifiuto di Dio è anche un rifiuto di un'autorità esterna che definisce ciò che è giusto o sbagliato, spesso percepita come restrittiva o arbitraria.</text:p>
      <text:p text:style-name="P162">Quando le rappresentazioni di Dio sono troppo legate a immagini umane o caratteristiche limitate, possono apparire intellettualmente insoddisfacenti o incoerenti con la realtà di un essere infinito. Per esempio, un Dio rappresentato come un "vecchio saggio nei cieli" potrebbe risultare inaccettabile per chi cerca una concezione più elevata e filosoficamente rigorosa di una realtà trascendente.</text:p>
      <text:p text:style-name="P162">Queste tensioni hanno spinto la teologia contemporanea a riconsiderare il modo in cui Dio viene presentato. Concetti come quello della "semplicità divina" (Tommaso d'Aquino) o l'enfasi sulla trascendenza e l'alterità divina (Karl Barth, Paul Tillich) mirano a presentare un Dio che sfida le rappresentazioni riduttive, mantenendo al contempo una relazione personale con l'umanità. Questa dinamica <text:soft-page-break/>tra rifiuto e insoddisfazione sottolinea l'importanza di una teologia che sappia parlare sia alla ragione che al cuore, offrendo una visione di Dio che sia al tempo stesso comprensibile e infinitamente trascendente. </text:p>
      <text:p text:style-name="P162">Sia il giudaismo che il cristianesimo, nelle loro risposte all'ateismo, enfatizzano frequentemente la natura morale e trascendente di Dio. Ciò suggerisce un riconoscimento del fatto che una divinità puramente immanente o antropomorfica potrebbe essere più suscettibile allo scetticismo intellettuale, mentre un Dio trascendente e moralmente fondato offre un'alternativa più convincente.</text:p>
      <text:h text:style-name="P182" text:outline-level="3"><text:bookmark-start text:name="__RefHeading___Toc6379_1157857660"/>VIII. Diverse Interpretazioni e Sfumature all'Interno delle Tradizioni Giudaico-Cristiane<text:bookmark-end text:name="__RefHeading___Toc6379_1157857660"/></text:h>
      <text:p text:style-name="P162">Né il giudaismo né il cristianesimo presentano una visione monolitica di Dio. Entrambe le tradizioni comprendono uno spettro di interpretazioni e approcci teologici, riflettendo un continuo processo di confronto con la natura del divino in diversi contesti storici e intellettuali. Nel giudaismo, si osservano visioni tradizionali di un Dio personale ma trascendente contrapposte a interpretazioni moderne che enfatizzano una forza o un ideale impersonale. Dio è visto come personale e trascendente. È il Dio <text:soft-page-break/>dell'Alleanza, che si relaziona direttamente con il popolo di Israele, ascolta le preghiere e agisce nella storia umana. Questa concezione si basa fortemente sulla narrazione biblica, dove Dio è descritto come vicino e coinvolto, ma al tempo stesso assolutamente al di sopra della creazione, unico e indivisibile. Con l'emergere della filosofia moderna e delle correnti come il razionalismo, alcune interpretazioni del giudaismo si sono orientate verso una visione di Dio più astratta e impersonale.</text:p>
      <text:p text:style-name="P162">Spinoza <text:span text:style-name="T113">ha</text:span> identificato Dio con la Natura, vedendolo come la sostanza unica da cui tutto deriva, piuttosto che un essere personale che interviene nel mondo.<text:line-break/>Alcuni pensatori moderni e movimenti all'interno del giudaismo (come il giudaismo riformato) tendono a enfatizzare Dio come un principio morale, un ideale di giustizia, o una forza universale, piuttosto che un'entità personale. Questa dualità riflette il dibattito su come relazionarsi con il divino in un'epoca caratterizzata da scienza, filosofia e pluralismo religioso. Nonostante le differenze, molti nel giudaismo contemporaneo cercano di mantenere un equilibrio, onorando la ricca tradizione biblica e rabbinica, pur dialogando con il pensiero moderno.</text:p>
      <text:p text:style-name="P162">La cabala<text:note text:id="ftn50" text:note-class="footnote"><text:note-citation>50</text:note-citation><text:note-body><text:p text:style-name="P177">Dottrina ebraica diretta all’interpretazione simbolica del senso intimo e segreto della Bibbia.</text:p></text:note-body></text:note> con la sua ricca tradizione mistica all'interno <text:soft-page-break/>del giudaismo, propone una visione unica di Dio come un'entità dinamica, non statica, e coinvolta nel processo della creazione in maniera continua. Questa prospettiva introduce l'idea che l'essere umano abbia un ruolo attivo e indispensabile nell'interazione con il divino. Nella Cabala, soprattutto attraverso la dottrina delle Sefirot, Dio è rappresentato come una realtà in movimento. Le Sefirot sono dieci emanazioni divine che descrivono aspetti della presenza e dell'attività di Dio nel mondo. Queste manifestazioni dimostrano una concezione di Dio come energia creativa e relazionale, che interagisce costantemente con il mondo e con l'umanità. La Cabala sottolinea che l'essere umano non è semplicemente un osservatore passivo del divino, ma un partner attivo. Questo concetto suggerisce che Dio abbia bisogno della partecipazione umana per realizzare la perfezione e l'equilibrio universale. Nel cristianesimo, esistono <text:span text:style-name="T114">complessità teologiche </text:span>trinitarie e non trinitarie di Dio, diversi approcci teologici alla comprensione degli attributi di Dio e del Suo coinvolgimento nel mondo attraverso Gesù Cristo e l'interpretazione teologica della Scrittura come mezzo per comprendere Dio.</text:p>
      <text:p text:style-name="P162">La maggior parte delle denominazioni cristiane <text:soft-page-break/>(cattolica, ortodossa e protestante) aderisce alla dottrina della Trinità, secondo cui Dio è uno nella sostanza ma distinto in tre persone: Padre, Figlio (Gesù Cristo) e Spirito Santo. Questo approccio sostiene un Dio relazionale, che opera sia dentro la creazione che al di sopra di essa. <text:span text:style-name="T114">Altri </text:span>gruppi cristiani, come i Testimoni di Geova e i Cristadelfiani<text:note text:id="ftn51" text:note-class="footnote"><text:note-citation>51</text:note-citation><text:note-body><text:p text:style-name="P56">Questo movimento religioso, nato nel XIX secolo, si basa su una fede strettamente monoteista e interpreta la Bibbia in modo letterale. Essi vedono Dio come un'entità unica e indivisibile, e considerano Gesù Cristo il Figlio di Dio, ma non Dio stesso. Inoltre, lo Spirito Santo è inteso come la forza o il potere di Dio, piuttosto che una persona distinta.</text:p></text:note-body></text:note>, rigettano la Trinità, preferendo una concezione di Dio come un'unica entità indivisibile. Altri, come i Modalisti, vedono le manifestazioni di Padre, Figlio e Spirito Santo come ruoli o aspetti di un unico Dio.</text:p>
      <text:p text:style-name="P162">La cristologia è centrale nel cristianesimo, con Gesù Cristo visto come l'incarnazione di Dio. Attraverso Gesù, Dio entra nel mondo, si relaziona direttamente con l'umanità e offre salvezza. Questo è visto sia nella sua opera redentrice sulla croce che nella sua risurrezione, a<text:span text:style-name="T115">ltri</text:span> lo vedono come un mediatore tra Dio e gli uomini, altri come il pieno e completo rivelatore di Dio.</text:p>
      <text:p text:style-name="P162">È fondamentale evitare generalizzazioni eccessive quando si discute della risposta giudaico-cristiana all'antropomorfismo e all'ateismo, data la diversità <text:soft-page-break/>interna di ciascuna tradizione. Né il giudaismo né il cristianesimo presentano una visione monolitica di Dio. Entrambe le tradizioni comprendono uno spettro di interpretazioni e approcci teologici, riflettendo un continuo processo di confronto con la natura del divino in diversi contesti storici e intellettuali. Questa diversità interna è cruciale da riconoscere quando si considerano le loro risposte alle sfide dell'antropomorfismo e dell'ateismo.</text:p>
      <text:h text:style-name="P181" text:outline-level="3"><text:bookmark-start text:name="__RefHeading___Toc10415_625557246"/>Gli inizi del cristianesimo ed il ruolo fondamentale dei concili ecumenici.<text:bookmark-end text:name="__RefHeading___Toc10415_625557246"/></text:h>
      <text:p text:style-name="P164"><text:span text:style-name="T116">L</text:span>e sfide che il cristianesimo ha affrontato nei primi secoli <text:span text:style-name="T116">t</text:span>ra il I ed il IV (periodo delle eresie e delle persecuzioni dei cristiani) <text:span text:style-name="T116">furono determinanti <text:s/></text:span><text:span text:style-name="T117">ed ebbero </text:span><text:span text:style-name="T118">paradossalmente l’e</text:span><text:span text:style-name="T117">ffetto di</text:span><text:span text:style-name="T116"> rafforzare </text:span><text:span text:style-name="T118">l’identità cristiana</text:span>. <text:span text:style-name="T117">D</text:span>ue grandi pericoli <text:span text:style-name="T117">minacciarono la sopravvivenza del cristianesimo, d</text:span>a un lato le eresie come il gnosticismo e l'arianesimo <text:span text:style-name="T117">che </text:span>cercavano di reinterpretare il messaggio cristiano attraverso influenze filosofiche e religiose esterne distorce<text:span text:style-name="T117">ndo</text:span> la figura di Cristo <text:span text:style-name="T117">e </text:span>generando controversie teologiche profonde all'interno della comunità cristiana. Dall'altro lato, la persecuzione da parte dell'Impero Romano fu una prova durissima. I cristiani erano visti come una <text:soft-page-break/>minaccia alla stabilità dell’impero perché rifiutavano il culto imperiale e non partecipavano ai riti pagani considerati essenziali per la coesione sociale. Ci furono ondate di persecuzioni sotto imperatori come Nerone, Decio e Diocleziano, ma paradossalmente, queste difficoltà rafforzarono il senso di appartenenza dei cristiani e prepararono il terreno per la loro definitiva affermazione, culminata con l’Editto di Costantino nel 313 d.C., che garantì libertà di culto.</text:p>
      <text:p text:style-name="P165">Nel periodo tra il II e il VIII secolo, i Padri della Chiesa, filosofi, teologi e pastori, non solo risposero alle accuse di ignoranza e superstizione mosse dagli intellettuali pagani, ma svilupparono un sistema filosofico e teologico coerente, cerca<text:span text:style-name="T119">ndo di approfondire e spiegare </text:span><text:span text:style-name="T120">il </text:span>messaggio di Cristo con l’ausilio della cultura dei pagani, dimostrando che, laddove la cultura pagana aveva colto importanti verità circa l’uomo e il mondo, queste erano del tutto compatibili con il cristianesimo; la cultura classica poteva essere utile a chiarire alcuni tra i più difficili concetti cristiani come quello di Trinità capace di dialogare con la tradizione greco-romana. </text:p>
      <text:p text:style-name="P166"><text:span text:style-name="T120">N</text:span>ella parte orientale dell’impero, <text:span text:style-name="T120">i primi Padri parlano e scrivono in greco (</text:span>Atanasio di Alessandria, Gregorio di Nazianzio, Gregorio di Nissa, Basilio di Cesarea, <text:soft-page-break/>Giovanni Crisostomo); nella parte occidentale in latino (Agostino, Ambrogio, Gerolamo, Gregorio Magno), <text:span text:style-name="T120">ch</text:span>e <text:span text:style-name="T120">rappresentano le basi </text:span>della cultura cristiana che si svilupperà nel Medioevo. </text:p>
      <text:h text:style-name="P188" text:outline-level="3"><text:bookmark-start text:name="__RefHeading___Toc10417_625557246"/><text:span text:style-name="T79">Il cammino secolare della chiesa attraverso i concili ecumenici </text:span><text:span text:style-name="T81">e la sistemazione delle questioni divine.</text:span><text:bookmark-end text:name="__RefHeading___Toc10417_625557246"/></text:h>
      <text:p text:style-name="P194">I primi quattro concili ecumenici — Nicea (325), Costantinopoli (381), Efeso (431) e Calcedonia (451) —sono considerati fondamentali per la definizione della dottrina cristologica. Furono decisivi per chiarire la natura di Dio e di Cristo, risolvendo dispute teologiche che minacciavano l'unità della Chiesa.</text:p>
      <text:p text:style-name="P166">Possiamo certamente dire che gli uomini, attraverso i concili ecumenici e la riflessione teologica, hanno articolato e sistematizzato una comprensione della natura di Dio e di Cristo. Tuttavia, dal punto di vista della fede cristiana, i concili non hanno "creato" una verità, ma hanno cercato di interpretare e trasmettere correttamente la rivelazione divina contenuta nelle Scritture e nella tradizione apostolica.</text:p>
      <text:p text:style-name="P194">I cristiani credono che la natura di Dio sia eterna e immutabile, e che le definizioni dogmatiche siano un tentativo umano di spiegare questa realtà con un <text:soft-page-break/>linguaggio comprensibile, soprattutto di fronte alle controversie e agli interrogativi teologici. In questo senso, si può dire che è stato l’uomo a descrivere, più che definire, ciò che già esisteva.</text:p>
      <text:p text:style-name="P197"><text:span text:style-name="T109">Questi concili formarono la base della cristologia ortodossa e ancora oggi le loro definizioni sono essenziali per la teologia cristiana.</text:span></text:p>
      <text:p text:style-name="P198">IX. Conclusione</text:p>
      <text:p text:style-name="P196">Le tradizioni giudaico-cristiane hanno affrontato la questione dell'antropomorfismo nella loro comprensione di Dio sviluppando quadri teologici sofisticati che trascendono le rappresentazioni corporee, come illustrato in particolare dai contributi di Maimonide nell'ebraismo e di Tommaso d'Aquino nel cristianesimo. Questi pensatori, insieme a molti altri nel corso della storia, hanno impiegato il ragionamento filosofico, la teologia negativa e il concetto di analogia per articolare una comprensione di Dio che è sia trascendente che, in vari modi, relazionabile all'umanità. L'enfasi su un Dio trascendente e spesso morale, serve come risposta alle sfide poste dall'ateismo moderno, che spesso deriva da una reazione a concezioni troppo semplicistiche o letterali del divino. Tuttavia, è essenziale riconoscere la continua <text:soft-page-break/>diversità di interpretazioni e sfumature all'interno di entrambe le tradizioni, che continuano a impegnarsi con queste questioni complesse in modi dinamici e in evoluzione.</text:p>
      <text:p text:style-name="P125"/>
      <text:h text:style-name="P187" text:outline-level="3"><text:bookmark-start text:name="__RefHeading___Toc6383_1157857660"/><text:span text:style-name="T110">I</text:span><text:span text:style-name="T111">l</text:span><text:span text:style-name="T110"> </text:span><text:span text:style-name="T111">Processo a Dio</text:span><text:bookmark-end text:name="__RefHeading___Toc6383_1157857660"/></text:h>
      <text:p text:style-name="P178">Narrazione dei fatti</text:p>
      <text:p text:style-name="P133">Un giorno gli uomini decisero di mettere sotto processo Dio, imputato di tutto il male che c'è nel mondo. Il processo venne celebrato in contumacia perché Dio, per quanto ripetutamente citato, non si presentò al banco degli imputati. Il pubblico ministero presentava tutti i testimoni a carico che erano stati citati espressamente; a questi se ne aggiunsero altri che si presentavano spontaneamente con propri atti di accusa contro Dio; alcuni, che si ritenevano maggiormente o più ingiustamente danneggiati, si costituirono addirittura parte civile.</text:p>
      <text:p text:style-name="P134">Il problema era quello della difesa, poiché Dio né si era presentato né si era preoccupato di mandare qualcuno che parlasse per lui; d'altra parte si sa bene che gli avvocati designali di ufficio non danno mai molto affidamento; cosicché il presidente della corte giudicante, per voler (are le cose in regola, stabili di <text:soft-page-break/>affidare la difesa a delle persone che nella vita non <text:s/>avevano visto altro che bene c avevano perciò tutte le ragioni per parlare a favore di Dio e per difendere il suo operato contro quelli che lo accusavano.</text:p>
      <text:p text:style-name="P135">Passarono prima lutti i testi a carico citati dalla pubblica accusa.</text:p>
      <text:p text:style-name="P135">C'era, fra questi, una ragazza di diciotto anni, pallida e bella, con due occhi neri e dei capelli, neri anch'essi, <text:s/>che le scendevano lentamente e con leggera ondulazione fin sulle spalle. Ma non erano state le sue mani che li avevano pettinati e modellali con tanta cura: erano state quelle della madre; le sue mani non erano passate mai sopra quei morbidi capelli: la ragazza era paralitica di braccia e di gambe fin dalla nascita. Essa rimaneva li in silenzio, e rivolgeva continuamente lo sguardo alla madre come per rimettersi a quello che avrebbe detto lei. Ma la madre, citata anch'essa come testimone a carico, non era venuta per accusare Dio. «Anzi — diceva dinanzi ai giudici che l'ascoltavano impassibili — io non mi stancherò mai di pregarlo; alla fine dovrà pure ascoltarmi ». <text:s/>La maggiore accusa contro Dio — diceva poi il pubblico ministero nella sua requisitoria — <text:span text:style-name="T122">« </text:span>è questa madre che prega ancora ».</text:p>
      <text:p text:style-name="P136">Poi fu presentato ai giudici un demente; un essere umano governato da una intelligenza stravolta.</text:p>
      <text:p text:style-name="P136"><text:soft-page-break/><text:span text:style-name="T123">«</text:span>Dove sono qui i fini di Dio? — chiedeva il pubblico ministero — E che valore hanno l'intelligenza, la volontà, la libertà anche per colui che le possiede intatte quando sa che un fatto da nulla può ridurre, improvvisamente, anche lui in quello stato? Come potrò io dire ancora: io, quando so che da un momento all'altro per un cambiamento avvenuto in me chissà come, io continuerò ad esistere e ad essere io per gli altri e non sarò più io per me stesso?</text:p>
      <text:p text:style-name="P137">E cosi, ad uno ad uno sfilavano davanti alla corte tutti i testimoni della colpa di Dio. Chi lo accusava di questa, chi di quella sventura; alcuni del dolore che c'è, dappertutto, nel mondo, altri della ingiustizia che sembra la legge naturale delle cose.</text:p>
      <text:p text:style-name="P139">Poi cominciarono quelli che, senza essere stati citati, si presentavano spontaneamente. E ognuno aveva la sua lamentela da fare. Uno di questi venne a raccontare la storia di un cane che si era ostinato a voler morire accanto al suo padrone dopo avere tentato, disperatamente, di portargli aiuto. Il suo padrone era andato per una difficile escursione in montagna, in mezzo alla neve; e il cane lo aveva accompagnato. Ma l'uomo prese una mala caduta e si ferì gravemente. Il cane come lo vide a terra, sanguinante e incapace di muoversi, cominciò ad abbaiare disperatamente; <text:soft-page-break/>correva di qua e di là sempre abbaiando e poi tornava dal suo padrone che giaceva a terra e continuava a perdere sangue. Alla fine, stanco e forse anche sfiduciato, cessò di abbaiare e di correre in giro; si accovacciò accanto al suo padrone, posò il lungo muso sul petto di lui e rimase li a guardarlo negli occhi che si andavano spegnendo. Dopo alcuni giorni fu trovato il cadavere dell'uomo e accanto, quello del suo cane. II cadavere dell'uomo fu raccolto e portato via con tutte le cautele; del cane non si curò nessuno. Potevano almeno seppellirlo accanto al suo padrone!</text:p>
      <text:p text:style-name="P139">Però questa accusa fatta a Dio per un cane sembrò a molti una cosa esagerata. Se Dio dovesse occuparsi anche delle bestie!</text:p>
      <text:p text:style-name="P138">Del resto se ne sentirono, accuse, anche più strane di questa. Ci fu uno, per esempio, che si venne a lamentare perché Dio ha stabilito che ci sia prima la giovinezza e poi la vecchiaia. Avviene a questo modo che il giovane, non conoscendo ancora per esperienza che cosa orribile e triste sia la vecchiaia, non gode di sentirsi giovane e non apprezza la fortuna che egli in quel momento ha; e se i più vecchi sospirando gli dicono: eh, beato tu che sei giovane! <text:s/>lui si urta e si infastidisce di essere invidiato per quella felicità che gli viene attribuita e che invece sa di non possedere.</text:p>
      <text:p text:style-name="P137"><text:soft-page-break/>Poi viene la vecchiaia, e al peso di questa si aggiunge il rammarico inconsolabile della giovinezza perduta. Se invece venisse prima la vecchiaia e poi la gioventù, il vecchio troverebbe alle sue sofferenze un grande conforto, una vera gioia anzi nell'attesa della gioventù che di giorno in giorno si va facendo sempre più vicina, e d'altra parte il giovane sapendo da quale peso è stato liberato apprezzerebbe di più il suo nuovo stato e non trascurerebbe di godere anche i piaceri più minuscoli che questo gli può dare.</text:p>
      <text:p text:style-name="P137">Poi fece la sua apparizione nell'aula un uomo anziano, dai lunghi capelli bianchi; vestito con gusto ed eleganza si mostrava tuttavia trascurato in certi particolari che contrastavano fortemente con l'aspetto dell'insieme. Si diresse verso la corte e fermatosi di fronte al presidente, senza aspettare che gliene dessero l'autorizzazione, cominciò a parlare, — Io — disse — accuso Dio di una sola cosa: di avere creato la speranza. È questo il demonio che egli ha messo nell'animo di ognuno di noi perché non avessimo mai un momento di pace. Se noi, delusi ormai tante volte, desideriamo alla fine una sola cosa, poterci accomodare alla nostra sorte, e non cercare più di cambiarla, e quando già cominciamo a sentire quella tranquillità che dà la rinunzia e la rassegnazione, ecco che la speranza viene <text:soft-page-break/>come a svegliarci, a mettere in noi un turbamento, una inquietudine. « Ma io ho sperato già mille volte e mille volte ho provato tutta l'amarezza della delusione ». </text:p>
      <text:p text:style-name="P137">« Si è vero », ci dice la speranza, « ma questa volta sarà diverso ». E cosi una nuova speranza e una nuova delusione, ancora più triste delle precedenti. Io lo so: i miei capelli sono bianchi e il mio viso è, ormai, pieno di rughe; ma se camminando per le strade io vedo all'improvviso di fronte a me il viso di una giovane donna e i nostri sguardi, casualmente, si incontrano, allora ritorna in me qualche cosa che sembrava per sempre dimenticato, e credo, in quel momento, di essere ancora io, quello di una volta. Ma poi mi guardo nello specchio, vedo la mia pelle aggrinzita e, accanto, la fresca e limpida carnagione di lei, e allora soltanto sento tutta la tristezza della mia condizione presente.</text:p>
      <text:p text:style-name="P142">« Chi ha detto che la speranza è stata inventata per dare un conforto agli uomini? Senza la speranza l'uomo troverebbe alla fine il modo di adattarsi alla propria condizione e vivrebbe così, se non felice, almeno tranquillo e rassegnato. Senza la speranza egli finirebbe forse col dimenticare che esistono altri modi di vivere, diversi dal suo, e il suo gli sembrerebbe cosi l'unico possibile. La speranza invece, sollevandolo fuori dal suo stato, gli fa sentire questo, quando egli alla fine ci è <text:soft-page-break/>ripiombato dentro, come qualche cosa di assurdo e di intollerabile ».</text:p>
      <text:p text:style-name="P143">Finalmente la sfilata dei <text:s/>testimoni a carico ebbe termine. A questo punto il pubblico ministero chiese che si desse lettura di uno scritto che rappresentava, diceva lui, uno dei principali capi d'accusa contro Dio. Era un diario che un prete spretato aveva scritto ma non aveva pubblicato. In che modo il pubblico ministero ne fosse venuto in possesso e quali prove si avessero della sua autenticità non fu detto, ma doveva certo risultare dagli atti del processo, altrimenti la difesa lo avrebbe impugnato di falso.</text:p>
      <text:p text:style-name="P140">In questo diario il prete spretato raccontava tutta la sua storia. Si era fatto sacerdote spinto dal bisogno di dare alla sua vita uno scopo per il quale valesse la pena di viverla. Guardava nel mondo attorno a sé e pensava che in esso, chi lo voglia e sia disposto per ciò a sopportare ogni sacrificio, può sempre trovare il modo di fare del bene; e lui si sentiva disposto e deciso a sopportare ogni cosa, a compiere qualsiasi sacrificio per alleviare almeno il dolore dei suoi simili. E cosi si era dato alla sua missione con entusiasmo e con gioia. Dolori e amarezze ne aveva avuti si, ma le soddisfazioni erano state sempre più grandi di quelli; e lui non si era mai scoraggiato nemmeno di fronte alle più forti delusioni. <text:soft-page-break/>Conobbe poi una donna; era, questa donna, tutta dedita a Dio e alla religione. Ma per lei la religione non consisteva nel frequentare assiduamente la chiesa e nell'entrare in comunione con Dio mediante l'ostia consacrata; in lei la religione era qualche cosa di più intimo, qualche cosa di veramente vissuto. Essa, in ogni caso, in ogni fatto, anche il più stupido all'apparenza, vedeva sempre un significato, uno scopo; in ogni cosa vedeva la presenza di Dio come noi vediamo la presenza della luce in ogni oggetto che senza di essa non potrebbe cadere nemmeno sotto il nostro sguardo. Questa donna si sposò. Ebbe due bambine, e il marito voleva bene a lei e alle due figlie e viveva solo per loro. E la donna si chiedeva, certe volte con terrore, certe volte con una gioia infinita: come si fa ad essere cosi felici? E che merito ho io per godere di tanta felicità?</text:p>
      <text:p text:style-name="P139">E non sapeva come esprimere la sua immensa gratitudine al creatore di tutte le cose che le aveva concesso una cosi immeritata felicità. Poi le veniva, d'improvviso, un rimorso di fronte a tanta gente nel mondo che soffriva, mentre lei era così felice! Un rimorso come se quella sua felicità lei la usurpasse, la sottraesse agli altri che cosi soffrivano per sua colpa; e allora si prodigava a fare del bene, comunque le fosse possibile, e le pareva, ogni volta che compiva un <text:soft-page-break/>sacrificio per alleviare il dolore degli altri, di restituire soltanto quello che aveva tolto.</text:p>
      <text:p text:style-name="P139">Ma poi le cose cambiarono. Il marito si ammalò di una lunga malattia che lo fece soffrire tanto e morì poi lasciando la moglie senza un soldo e con un cumulo dì</text:p>
      <text:p text:style-name="P142">debiti. La donna soffri terribilmente, ma non si scoraggiò né si avvilì. Anche qui vedeva, come sempre, la mano di Dio. Era stata tanto felice mentre molta gente intorno a lei soffriva e si disperava: era giusto che anche lei provasse dolore e sofferenza. E si mise a lavorare per portare avanti le due figlie che il marito prima di morire le aveva raccomandato, e per liberarsi, a poco per volta, di tutti i debiti che aveva contratto durante quella lunga malattia.</text:p>
      <text:p text:style-name="P143">Erano passati cosi due anni e la donna con un lavoro continuo e umiliante era riuscita a liberarsi di tutti i debiti e cominciava ora a sentirsi più tranquilla.</text:p>
      <text:p text:style-name="P143">Da un po' di tempo però sentiva in tutto il corpo una spossatezza continua, una stanchezza come di una fatica che avesse sopportata; e questa stanchezza non la lasciava mai, nemmeno un momento. Sarà il troppo lavoro pensava al quale non ero abituata. Dovrò lavorare un po' di meno; del resto ora, grazie a Dio, lo posso fare. Ma nemmeno quando era stata un'intera <text:soft-page-break/>giornata senza fare niente si sentiva riposata. Ma che cosa poteva essere questa stanchezza continua che nemmeno un'intera giornata di riposo riusciva a fare passare? Alla fine decise di farsi visitare da un medico. E seppe così la verità: una tubercolosi che si trascinava ormai da parecchio tempo e che, cosi trascurata, aveva fatto già dei notevoli progressi. Non era ancora in una fase di incurabilità; occorreva però un riposo assoluto, un regime dì vita tutto speciale, in <text:s/>un ambiente sano e igienico, e un insieme di cure di ogni genere. Ma come fare tutto questo? I medici non</text:p>
      <text:p text:style-name="P142">dovrebbero consigliare soltanto le cure necessarie, ma indicare i mezzi per poterle fare. Ma poi lo stesso medico che l'aveva visitata, quando senti che la povera donna viveva in un'unica stanza con le due bambine e che dormiva nello stesso letto con loro, ebbe un sospetto, un timore, che il male non si fosse contagiato alle figlie, e volle visitarle.</text:p>
      <text:p text:style-name="P144">'È sempre bene avere di queste preoccupazioni, perché un male del genere, se scoperto in tempo, diventa una cosa da nulla, mentre se lo si lascia andare avanti, poi sono guai'. Così diceva. E infatti aveva ragione: il male c'era, ma era appena agli inizi; se ne erano accorti in tempo: curandolo come si deve sarebbe stato stroncato senz'altro.</text:p>
      <text:p text:style-name="P145"><text:soft-page-break/>Si, tutto vero, dal punto di vista clinico; ma come, in che modo? La donna non doveva lavorare; e chi le avrebbe dato i soldi per curare sé e le sue due figlie e per assicurare a tutte e tre quella vita sana e igienica prescritta dal medico? E allora? Continuare a lavorare fino alla morte? E poi? Chi avrebbe pensato alle sue figlie? Del resto quello che lei poteva ricavare dal suo lavoro non sarebbe stato mai sufficiente per le loro cure. A questo punto — continuava il diario del prete spretato — la donna cominciò a non capire più nulla.</text:p>
      <text:p text:style-name="P145">Tutto quello che prima le era sembrato chiaro e semplice ora le appariva oscuro e incomprensibile. Ma forse anche questo faceva parte dei piani della divina Provvidenza: che ella soffrisse senza capirne il perché. Ma che cosa doveva fare? Almeno questo voleva sapere. E lo chiedeva a me. Io, per la prima volta da quando mi ero dato, e con tanto entusiasmo, alla mia missione, non seppi rispondere, e rimasi li fermo a guardarla, più smarrito ancora di lei. Non ero in condizione, con le mie misere entrate, di venirle in aiuto. Agli istituti di beneficenza non credevamo né io né lei.</text:p>
      <text:p text:style-name="P141">« Io non chiedo — lei diceva — che Dio mi spieghi il perché e lo scopo di tutto questo: sarebbe troppa pretesa da parte mia volere entrare nei segreti della Divina Provvidenza. Ma che io sappia quello che debbo <text:soft-page-break/>fare, quale decisione debbo prendere. Perché Dio non mi viene in aiuto in questo? Io non chiedo di più. Ma io debbo sapere se questa o quella decisione è la migliore nell'interesse delle mie povere bambine. Perché qui la voce di Dio non mi viene in aiuto come ha fatto tante altre volte?</text:p>
      <text:p text:style-name="P144">Com'è che io ora non ti sento più? Sento mille voci, e ognuna mi sembra, per un momento, quella di Dio; ma poi mi accorgo che non è possibile, che quella voce non viene da Dio, che Dio non può volere questo da me. E allora perché tace? ».</text:p>
      <text:p text:style-name="P145">E si rivolgeva a me come a uno che ne sapesse più di lei. Un giorno venne da me pallida in viso, ma non per la malattia; più pallida ancora; si diresse verso di me e senza volersi sedere, sebbene sembrava che ne avesse bisogno: « Padre, — mi disse — una cosa terribile; più terribile della morte e di tutte le sofferenze che ora sopporto; una cosa che mi toglie il sonno più di quanto la mia malattia e lo stato di disperazione in cui vivo non siano capaci di fare; un terribile sospetto... ».</text:p>
      <text:p text:style-name="P144">Io la guardavo in viso e non parlavo. A mano a mano che lei parlava a quel modo lo stesso sospetto si andava impadronendo di me. Lei stette a guardarmi a lungo.</text:p>
      <text:p text:style-name="P144">« E se Dio...? ». Si interruppe come se avesse paura a <text:soft-page-break/>pronunziare le altre due parole. Mi guardò a lungo.</text:p>
      <text:p text:style-name="P145">« E se Dio... » — riprese, e s'interruppe di nuovo — « ... non esistesse? », si decise finalmente a dire. Io non risposi; mi misi a guardare a terra, ai miei piedi, mentre sentivo lo sguardo di lei fisso sui miei occhi.</text:p>
      <text:p text:style-name="P145">Guardavo il pavimento di un rosso pallido e smorto, e mi pareva che tutto il mondo fosse ora chiuso lì in quei mattoni, tutti uguali, tutti uniformi, messi uno accanto all'altro senza sapere nemmeno l'uno dell'altro e lo scopo e la ragione per la quale stavano li appiccicati e la gente li calpestava sempre coi propri piedi. Rimanemmo cosi a lungo in silenzio: oramai non avevamo più niente da dire. Poi la donna se ne andò, e io non la trattenni. Si fermò davanti alla porta: « Padre, — disse — questa notte pregherò ancora Dio, ma sarà l'ultima volta; poi, qualunque cosa accada, almeno voi, non pensate male di me ».Io la lasciai andare cosi, senza dire nulla.</text:p>
      <text:p text:style-name="P145">La sera però volli andare da lei. Con quale scopo, non lo sapevo nemmeno io; certo non avrei fatto e non avrei detto nulla, ormai, lo sapevo; ma andai cosi, senza una ragione, come era senza ragione tutto quello che avveniva nel mondo. Erano le undici quando mi decisi ad uscire di casa. A quell'ora, nel paese, tutti dormivano, e nessuno, certo, mi vide passare. Quando fui di fronte <text:soft-page-break/>alla casa di quella donna mi fermai. Come sarei andato da lei? Che cosa le avrei detto? Ero sul punto di tornarmene indietro.</text:p>
      <text:p text:style-name="P146">Ma rimasi li fermo a guardare. Si apri la porta e la donna venne fuori con le due bambine; la piccola aveva circa sei anni, tutta insonnolita, piagnucolava e si faceva trascinare dalla madre; l'altra invece di otto anni camminava risoluta senza dire una parola e senza chiedere dove si andasse a quell'ora. Io mi nascosi dietro un muro e poi, non visto, seguii la donna che camminava decisa verso non so quale meta. Camminò, camminò, e arrivò fino al mare; li si fermò. In quel punto la roccia scendeva a picco sul mare da un'altezza di oltre cinquanta metri. La donna si fermò con le due bambine, si inginocchiò, fece inginocchiare anche loro e poi disse: 'Ora preghiamo, e non ci stanchiamo di pregare; preghiamo con tutto il cuore e chiediamo a Dio che ci insegni che cosa dobbiamo fare; il Signore certo ci ascolterà'. E rimasero cosi per ore ed ore, in attesa che Dio le ascoltasse.</text:p>
      <text:p text:style-name="P146">Alla fine le bambine, stanche di pregare e di stare in quella incomoda posizione, prima smisero, poi a poco a poco si addormentarono. La madre rimase sola a pregare come Gesù nell'orto degli ulivi e come lui abbandonata da Dio. Pregò, pregò a lungo. Alla fine <text:soft-page-break/>cessò di pregare e rimase ferma in silenzio.</text:p>
      <text:p text:style-name="P146">Cominciava lentamente ad albeggiare. Fra poco sarebbe spuntato il sole. La donna si avvicinò alle sue bambine; baciò prima l'una, poi l'altra. Rimase a guardarle a lungo mentre così tranquille dormivano. Poi le prese tutte e due, se le strinse forte forte, si avvicinò al limite della roccia, e stette a guardare per un po' il vuoto che stava sotto i suoi piedi; fece un passo avanti e, insieme con le sue creature che dormivano ancora, si lasciò cadere in esso. Sembrava tranquilla, fredda, indifferente. Forse lo era veramente. Io, nascosto dietro un masso, avevo assistito a tutta la scena. Non avevo mosso un dito per evitarla; non ero stato nemmeno tentato di farlo.</text:p>
      <text:p text:style-name="P146">Tornai a casa; mi tolsi l'abito sacerdotale che un giorno avevo indossato con tanta commozione, indossai un abito borghese che mi era ancora rimasto, e la mattina stessa lasciai il paese.</text:p>
      <text:p text:style-name="P146">Nella casa di quella donna, che era in tutto una stanza, fu trovato un biglietto nel quale era scritto: « Vado insieme con le mie bambine; se non ci vedrete tornare e ci troverete morte significherà che Dio ha voluto questo da noi ».</text:p>
      <text:p text:style-name="P146">In paese si parlò molto della cosa e se ne diedero le più diverse spiegazioni. Alcuni cretini andarono dicendo che <text:soft-page-break/>forse c'era stata qualche cosa fra me e quella donna; e questo spiegava, a modo loro, la concomitanza dei due fatti. Per fortuna il medico, che era informato di tutto, diede la versione esatta degli avvenimenti, e fu questa ad essere accolta dall'autorità giudiziaria. Cosicché io non fui infastidito tranne che per dare qualche chiarimento sulla cosa.</text:p>
      <text:p text:style-name="P146">Terminata che fu la lettura del Diario di un Prete Spretato, ebbe inizio la lunga requisitoria del pubblico ministero, che verso la conclusione diceva con tono oratorio: 'Un celebre <text:span text:style-name="T100">filosofo tedesco</text:span><text:span text:style-name="T100"><text:note text:id="ftn52" text:note-class="footnote"><text:note-citation>52</text:note-citation><text:note-body><text:p text:style-name="P56">Il filosofo tedesco <text:span text:style-name="T124">di cui al riferimento </text:span>è Gottfried Wilhelm Leibniz. Leibniz è noto per la sua teoria del 'migliore dei mondi possibili', secondo cui Dio, nella sua infinita saggezza e bontà, ha creato questo mondo come il migliore possibile, nonostante la presenza del male. Secondo lui, il male esiste per permettere al bene di essere riconosciuto e apprezzato, e ogni evento ha una ragione sufficiente che contribuisce all'ordine universal<text:span text:style-name="T124">e.</text:span></text:p></text:note-body></text:note></text:span> ha detto che questo mondo nel quale esiste accanto al bene il male è il migliore dei mondi possibili, migliore di un mondo in cui ci fosse soltanto il bene perché il bene è veramente tale solo in quanto c'è il male come suo contrapposto: naturalmente lui che aveva avuto dalla vita tutto il bene possibile lodava Dio per avergli messo accanto tanti infelici: cosi, vedendo la sorte degli altri e confrontando con essa la propria, egli apprezzava di più e si sentiva più felice della sua condizione così privilegiata.</text:p>
      <text:p text:style-name="P147"><text:soft-page-break/>Ma sarebbe più giusto dire che questo mondo, appunto perché c'è, accanto a tanto male e a tanto dolore, qualche poco di bene, è il peggiore dei mondi possibili; in un mondo infatti nel quale ci fosse soltanto il male, forse gli uomini si rassegnerebbero più facilmente alla loro sorte e l'accetterebbero come essa è; ma poiché essi si accorgono che c'è, accanto a loro, qualche essere felice e che la felicità è una cosa possibile, più difficilmente riescono a rassegnarsi al loro destino.</text:p>
      <text:p text:style-name="P147">La condanna però che il pubblico ministero, al termine della sua lunga requisitoria, chiedeva per Dio non era certo proporzionata alle gravi colpe delle quali questo era imputato. Si trattava in sostanza di una condanna morale: doveva essere proibito il culto di Dio, sia in pubblico che in privato; di Dio non si doveva parlare se non per dirne male; tutte le feste religiose dovevano essere sostituite con delle solennità nelle quali sarebbe stato ricordato tutto il male che Dio aveva fatto agli uomini. D'altra parte una condanna diversa, e più grave di questa, sarebbe rimasta solo sulla carta data l'impossibilità poi di eseguirla: per questo, diceva il pubblico ministero, è inutile chiederla.</text:p>
      <text:p text:style-name="P147">Poi fu la volta della difesa. La difesa però non sembrava organizzata bene perché un avvocato sosteneva certe volte delle tesi in contrasto con quelle di un altro. Può <text:soft-page-break/>anche darsi però che questo fosse un accorgimento: presentare diverse tesi in modo che l'una potesse convincere un giudice l'altra un altro giudice. Parlarono cosi, uno alla volta, cinque avvocati.</text:p>
      <text:p text:style-name="P141"><text:s/>« Non bisogna guardare soltanto il male che c'è nel mondo »;— diceva uno di questi — « bisogna guardare anche il bene. Il male anzi, a ben considerare, costituisce l'eccezione, mentre il bene è la regola ». E via su questo tono, a mostrare tutto il bene che c'è nel mondo, e come lo stesso male sia spesso, almeno sotto certi aspetti, un bene. Un altro avvocato, invece, ammetteva, mettendosi apertamente in polemica col primo, che il male c'è nel mondo, e forse supera il bene; ma questo non importa, perché Dio non interviene mai nelle cose di questo mondo: egli si occupa solo di ciò che ha relazione con l'altra vita.</text:p>
      <text:p text:style-name="P140">— E quella donna che viene spinta al suicidio? — ribatté intervenendo il pubblico ministero — Perché Dio non interviene nemmeno in favore di una creatura che sta per perdere la fede in lui e lascia che essa, che ha sempre e con certezza creduto, ora non creda più? Tutto questo non riguarda forse l'altra vita, anzi quella più di questa?</text:p>
      <text:p text:style-name="P148">— I segreti di Dio noi non possiamo conoscerli. — <text:soft-page-break/>rispondeva pronto l'avvocato difensore — E forse quella donna, che si è tolta la vita rinnegando Dio, Dio ora l'ha accolta, insieme con le sue bambine, fra le anime destinate a vivere sempre con lui.</text:p>
      <text:p text:style-name="P148">Prese poi la parola il terzo difensore. « Da molti secoli — diceva l'oratore — l'uomo è stato come perseguitato da un pensiero fisso: quello di liberarsi nella sua concezione di Dio da ogni residuo di antropomorfismo. Si può dire che la parola d'ordine delle religioni più evolute è stata questa. E siccome l'uomo è limitato e, quasi impotente, allora Dio per essere diverso dall'uomo, è stato concepito come infinito e onnipotente. L'uomo ha creduto a questo modo di evolversi e di progredire rispetto alle antiche religioni che vedevano negli dei degli esseri anch'essi limitati nelle loro possibilità, ma non ha fatto invece che obbedire a una sua tendenza istintiva e primitiva.</text:p>
      <text:p text:style-name="P149">Il bambino infatti che sente la propria limitatezza e vede quanto possono più di lui i suoi genitori è portato senz'altro a credere che essi siano perciò onnipotenti e che niente ci sia che essi non siano in grado di fare. Il bambino si sente sicuro vicino alla madre e sotto la sua protezione si crede in grado di sfidare anche i leoni. Cosi facciamo noi con Dio: come i bambini e come gli esseri primitivi; i greci che riconoscevano i limiti anche <text:soft-page-break/>delle stesse divinità erano a questo riguardo più evoluti di noi che ci consideriamo più progrediti di loro. Il bambino chiede al padre che gli faccia passare subito la malattia; perché crede che il padre possa tutto. Il padre invece non è in condizione di farlo; il bambino allora si indispettisce e se la prende col padre. Cosi facciamo noi con Dio. Siamo convinti che Dio possa tutto, e perciò quando gli chiediamo una cosa e non la otteniamo, imprechiamo contro di lui, gli chiediamo, piangendo, perché ci ha abbandonati. Ma perché Dio dovrebbe essere onnipotente? E perché deve esistere per forza un essere onnipotente? Forse Dio, invece, anche se molto più potente di noi, non è per questo onnipotente. Egli ci assiste, ci aiuta fin dove giungono le sue possibilità, e dove non può si rammarica, si addolora insieme con noi che pure ci rivolgiamo cosi ingrati verso di lui. È questo concetto dell'onnipotenza di Dio, cosi arbitrariamente assunto, che ci fa protestare contro di lui che forse invece ha fatto tutto ciò che era nei limiti delle sue possibilità e ora si rammarica più di noi di vederci soffrire e di non potere fare niente per noi.</text:p>
      <text:p text:style-name="P149">Ma il quarto oratore, che si era assunto il compito di difendere Dio dall'accusa di ingiustizia, reagì vivacemente contro questa tesi sostenuta dal suo collega, e affermò che, al contrario, la concezione che di <text:soft-page-break/>Dio si fa l'uomo è sempre viziata di antropomorfismo, ora come in tutti i tempi. « Che differenza c'è — diceva — fra i greci antichi che attribuivano a Venere un corpo simile a quello di una qualsiasi donna mortale e di questo corpo si compiacevano a disegnare, con linee armoniose, anche le parti più recondite, e noi moderni che attribuiamo a Dio la giustizia, l'intelligenza, la sapienza e altre cose del genere? Siamo sempre nell'antropomorfismo. La verità è che noi, per quanti sforzi facciamo, non sappiamo concepire un essere veramente illimitato nella sua potenza.</text:p>
      <text:p text:style-name="P150">Noi pensiamo infatti che Dio debba operare in modo intelligente, in modo giusto, in modo saggio. Ma perché?</text:p>
      <text:p text:style-name="P149">Appunto perché lo consideriamo limitato: perché pensiamo, cioè, che egli non possa ottenere ciò che vuole se non seguendo certe vie, facendo cioè le cose in modo intelligente, o giusto, o saggio. Ma tutto questo può valere per un essere limitato, non per Dio.</text:p>
      <text:p text:style-name="P149">Se io voglio andare in America, debbo prima sapere qual è la via da seguire, e debbo fare le cose con intelligenza e saggezza, perché se sbaglio strada o se commetto qualche imprudenza, in America non ci arrivo più. Ma tutto questo perché il mio potere è limitato; se invece il mio potere fosse illimitato, io direi: voglio <text:soft-page-break/>essere in America, e subito ci sarei, e non avrei bisogno di impiegare né intelligenza, né sapienza, né saggezza.</text:p>
      <text:p text:style-name="P150">« Ma forse sarà meglio — continuava l'avvocato — che io illustri con un altro esempio, più appropriato, il mio pensiero per quanto, si tratta sempre di modi molto grossolani di raffigurare concetti troppo lontani dai nostri abituali. </text:p>
      <text:p text:style-name="P151">Noi diciamo che è saggio e ragionevole un uomo il quale avendo bisogno di un vestito compera quello che a parità di condizioni, costa meno degli altri; che prima di acquistare una villa in campagna si domanda se non gli convenga di comperare una casa in città dove egli passa la maggior parte dell'anno; che se deve fare un viaggio sceglie il mezzo più comodo si ma che non gli costi però il quadruplo di un altro mezzo appena appena meno comodo di quello. E chi non fa cosi diciamo che agisce con poca intelligenza, o con poca assennatezza, o come altrimenti piaccia di dire. Ma immaginate un uomo le cui ricchezze non abbiano praticamente alcun limite: pensate che questi, quando ha bisogno di un vestito debba prima ragionare per vedere come può acquistarlo nel modo più economico o quando fa un viaggio debba fare il calcolo se questo mezzo è più costoso di quello? Intelligente e avveduto nello spendere <text:span text:style-name="T125">deve </text:span>essere colui le cui ricchezza sono <text:soft-page-break/>limitale: ma un uomo le cui ricchezze non avessero veramente alcun limite non avrebbe bisogno di intelligenza né di oculatezza nel fare le sue spese. Cosi è Dio. Consideriamo prima l'intelligenza. A <text:span text:style-name="T125">che</text:span> cosa serve? Per conoscere. Ma chi può conoscere solo che lo voglia, già conosce appena vuole e non ha bisogno di una intelligenza per comprendere, come chi può vedere solo che lo voglia non ha bisogno, come noi, degli occhi. E la giustizia? Dio per essere giusto deve operare in un certo modo, cioè secondo giustizia. Ma se Dio è veramente onnipotente egli può essere giusto anche senza operare in quel dato modo, anche operando in modo diverso, oppure non operando affatto, allo stesso modo come un essere onnipotente può vedere anche senza la luce; può vedere nella piena oscurità. Se Dio per essere giusto deve operare necessariamente in un dato modo e se operando in un modo diverso non è più giusto, egli non è più onnipotente come non è onnipotente un essere che per mantenersi in salute e in vita deve evitare certi cibi e certe bevande.</text:p>
      <text:p text:style-name="P152">« Dobbiamo liberarci dell'antropomorfismo nel concepire Dio — ripeteva insistentemente l'oratore — Come se ne sono liberati Bruno e Spinoza? —domandò il pubblico ministero con un tono che non si</text:p>
      <text:p text:style-name="P151">« capiva se fosse serio o di ironia — Vogliamo ritornare <text:soft-page-break/>al loro Dio?- II Dio di Spinoza? Peggio che mai! <text:s/>Esclamò l'avvocato — Il Dio più antropomorfico che ci sia mai stato!</text:p>
      <text:p text:style-name="P151">Povero Dio fatto simile a un misero mortale il quale, limitato nelle sue possibilità, se vuole andare da Roma a Parigi in un determinato tempo deve ideare un apparecchio capace di trasportarlo, apparecchio che è lui si ad inventare ma alla cui tecnica egli stesso deve poi obbedire se vuole raggiungere i suoi scopi, e non sottrarvisi mai, anzi ne rimane molte volte lo schiavo o addirittura la vittima! Cosi il Dio di Bruno e di Spinoza per raggiungere certi scopi, poco onnipotente com'è, ha bisogno di produrre prima i mezzi adeguati, e anche se questi sono una sua invenzione egli poi rimane schiavo e legato alla tecnica da lui ideata e deve sottostarvi e rispettarla, e non può, nemmeno lui, liberarsene.</text:p>
      <text:p text:style-name="P152">Parlò finalmente l'ultimo oratore il quale in modo breve e semplice disse che nessuna corte può condannare un imputato senza che siano state provate le sue colpe; ora nel caso in questione prima che la colpa di Dio bisognava dimostrare la sua esistenza, cosa che nessuno degli accusatori aveva fatto. E come si fa a condannare un imputato senza prima avere provato che egli esiste? Infatti se non esiste l'imputato non esiste nemmeno la sua colpa e se non esiste la sua colpa egli <text:soft-page-break/>non può essere condannato. Poi, ad abbondare, egli mostrò come nessuna delle prove che si danno dell'esistenza di Dio sia veramente perentoria e per ogni argomento in favore se ne può portare un altro in contrario. E fu questa la tesi accolta dalla corte la quale assolse Dio da tutte le imputazioni « per insufficienza di prove sulla sua esistenza ».</text:p>
      <text:p text:style-name="P139">E fu una vittoria per la difesa; perché, dopo tutto quello che si era detto, non si poteva sperare certo una assoluzione con formula piena. La gente però, che da un processo messo su con tanto rumore si aspettava una conclusione più sensazionale, rimase delusa. </text:p>
      <text:p text:style-name="P167"/>
      <text:p text:style-name="P168">Testo tratto da: Discussioni sull’arte e sulla condizione dell’uomo. <text:span text:style-name="T126">(</text:span>Giovanni A. Bianca<text:span text:style-name="T126">)</text:span></text:p>
      <text:p text:style-name="P139"/>
      <text:h text:style-name="P190" text:outline-level="4"><text:bookmark-start text:name="__RefHeading___Toc9953_2708660065"/>Riflessioni<text:bookmark-end text:name="__RefHeading___Toc9953_2708660065"/></text:h>
      <text:p text:style-name="P155">Il titolo di questo racconto è una premessa incredibilmente provocatoria e piena di implicazioni filosofiche. Il 'processo a Dio' può essere interpretato come un esercizio di riflessione su temi universali: responsabilità, giustizia, male, libero arbitrio e la relazione tra umano e divino. La contumacia di Dio in questa narrazione potrebbe simboleggiare la <text:soft-page-break/>percezione dell'inaccessibilità o dell'indifferenza divina agli occhi dell'umanità.</text:p>
      <text:p text:style-name="P155"><text:span text:style-name="T127">C</text:span>ome si può giudicare ciò che è forse al di là della comprensione umana? Gli esseri umani sono davvero in grado di comprendere appieno il concetto di divinità e attribuirle colpe o meriti?</text:p>
      <text:p text:style-name="P155">L'idea di una difesa frammentata, con argomentazioni che talvolta si contraddicono, è affascinante perché riflette la complessità di conciliare una questione così monumentale. Forse <text:span text:style-name="T128">la </text:span>strategia della difesa rispecchia anche la pluralità di prospettive e credenze umane: ogni avvocato rappresenta una voce diversa, una giustificazione distinta per ciò che si potrebbe definire la 'presenza di Dio'.</text:p>
      <text:p text:style-name="P156">« <text:span text:style-name="T89">Non bisogna guardare soltanto il male che c'è nel mondo, bisogna guardare anche il bene. Il male anzi, a ben considerare, costituisce l'eccezione, mentre il bene è la regola</text:span> »</text:p>
      <text:p text:style-name="P156">L'affermazione sull'importanza di osservare il bene del mondo, considerando il male come eccezione, <text:span text:style-name="T129">sembra essere un</text:span> punto cruciale. Potrebbe simboleggiare l'idea che il male sia percepito più intensamente perché ci turba, mentre il bene può essere dato per scontato. È una riflessione che ci invita a bilanciare la nostra prospettiva e analizzare l'equilibrio tra luce e ombra.</text:p>
      <text:p text:style-name="P157"><text:soft-page-break/>La tesi del secondo avvocato della difesa porta ad una visione teologica e filosofica profonda e controversa. Egli sembra abbracciare la concezione di un Dio trascendente che, per sua natura, si distacca dalle vicende mondane, concentrandosi esclusivamente sulla dimensione spirituale e sull'aldilà. Questo punto di vista potrebbe sollevare delle implicazioni:</text:p>
      <text:p text:style-name="P157"><text:span text:style-name="T128">a) s</text:span>e Dio non interviene nelle cose del mondo, allora forse la responsabilità degli eventi terreni ricade esclusivamente sull'uomo. Siamo, dunque, liberi ma anche pienamente responsabili delle nostre scelte e delle conseguenze.</text:p>
      <text:p text:style-name="P157"><text:span text:style-name="T128">b) i</text:span>l male terreno è una realtà temporanea, un banco di prova o un percorso necessario verso una maggiore comprensione spirituale che si realizza solo nell'altra vita?</text:p>
      <text:p text:style-name="P158">Il terzo avvocato, avanza una tesi ancora più radicale che lo mette in contrasto con il primo avvocato, ma forse anche con le aspettative del pubblico quando afferma che l'idea di un Dio che pur esistendo, sceglie deliberatamente di non interferire con il mondo terreno.</text:p>
      <text:p text:style-name="P158">Tale argomentazione potrebbe essere vista come una visione liberatoria, dove Dio lascia spazio completo al libero arbitrio umano, o come una visione inquietante, <text:soft-page-break/>perché implica che le sofferenze e le ingiustizie della vita non abbiano una risposta o un conforto divino diretto.</text:p>
      <text:p text:style-name="P158">Sembra quasi che questo avvocato cerchi di 'assolvere' Dio affermando che la giustizia divina si manifesterà pienamente solo oltre il confine della vita terrena. È una giustificazione che inevitabilmente solleva domande sul senso e sul valore delle vite che si vivono qui e ora.</text:p>
      <text:p text:style-name="P158">Il pubblico ministero, sentite le arringhe degli avvocati difensori, prende la parola per illustrare il caso di <text:span text:style-name="T130">quella donna che, in preda alla disperazione si getta insieme ai suoi due figli da una rupe, </text:span><text:span text:style-name="T128">e</text:span><text:span text:style-name="T130"> si chiede perché Dio non l’ha fermata? Tutto questo forse non ha a che fare con l’altra vita?</text:span></text:p>
      <text:p text:style-name="P160">La tragedia della donna sembra richiedere una risposta nel 'qui e ora', non in un aldilà che per chi rimane, potrebbe sembrare troppo distante. L'accusa sottolinea così una dimensione dolorosa della sofferenza umana, l'assenza percepita di Dio nei momenti di maggior bisogno. </text:p>
      <text:p text:style-name="P159"><text:span text:style-name="T130">Interv</text:span><text:span text:style-name="T131">enne</text:span><text:span text:style-name="T130"> un altro difensore </text:span><text:span text:style-name="T131">che avanzò l’ipotesi di abbandonare definitivamente l’antropomorfismo nel concepire Dio, al quale fece subito seguito la risposta irretita del pubblico ministero che disse: 'Liberarci così come hanno fatto Bruno e Spinoza'?</text:span></text:p>
      <text:p text:style-name="P159"><text:soft-page-break/>Giordano Bruno e Baruch Spinoza sono figure emblematiche che in modi diversi, hanno cercato di liberare la concezione di Dio dagli schemi tradizionali e antropomorfi.</text:p>
      <text:p text:style-name="P158">Bruno, con le sue idee cosmologiche rivoluzionarie, immaginava un universo infinito in cui Dio era immanente, presente ovunque come principio creativo. La sua visione sfidava le concezioni religiose istituzionali del suo tempo, portandolo a subire accuse di eresia. Spinoza, invece, formulava una visione filosofica che identificava Dio con la Natura, una forza unica e indivisibile che permea ogni cosa, rimuovendo ogni immagine antropomorfa e dando origine a un pensiero profondamente razionale e<text:span text:style-name="T131">d</text:span> etico.</text:p>
      <text:p text:style-name="P158"><text:span text:style-name="T132">L’</text:span>ultimo intervento è un colpo di scena magistrale, basato su una logica stringente e inappuntabile. L'oratore pone la questione su un piano essenziale e ineludibile: la necessità di provare l'esistenza dell'imputato, prima ancora di attribuirgli delle colpe. In assenza di tale prova, il processo stesso perde la sua validità, poiché manca il presupposto fondamentale per poter procedere.</text:p>
      <text:p text:style-name="P158">Questa linea di difesa richiama inevitabilmente i grandi dibattiti filosofici sull'esistenza di Dio, da Anselmo d'Aosta a Kant, e porta la discussione su un terreno <text:soft-page-break/>ancora più astratto e complesso. Ma al tempo stesso, disarma immediatamente l'accusa: come si può procedere contro un'entità la cui esistenza non è stata dimostrata?</text:p>
      <text:p text:style-name="P158">La forza di questa argomentazione sta nella sua semplicità e nel suo rigore logico, ma potrebbe anche lasciare una sensazione di vuoto, quasi di resa: se non possiamo nemmeno dimostrare che Dio esiste, cosa rimane delle domande fondamentali che l'accusa e il processo cercavano di affrontare?</text:p>
      <text:p text:style-name="P159">La difesa, con argomentazioni stratificate e talvolta ambigue, sembra aver raggiunto un risultato pragmatico: una vittoria, sì, ma non trionfale. L'assoluzione, condizionata dall'incapacità di dimostrare l'esistenza dell'imputato, lascia un senso di incompletezza e sottolinea quanto fosse impossibile arrivare a una chiusura netta su un tema tanto trascendentale.</text:p>
      <text:p text:style-name="P157">La delusione del pubblico, invece, è una nota quasi ironica e profondamente umana. Questi spettatori, attratti dal clamore di un processo senza precedenti, forse speravano in un momento catartico, una risposta definitiva. Eppure, come spesso accade con le questioni filosofiche e spirituali, ciò che rimane è più un terreno di riflessione che una verità assoluta.</text:p>
      <text:p text:style-name="P157"><text:soft-page-break/>Nonostante la delusione per la mancata sensazione drammatica che il pubblico si aspettava, rimane qualcosa di più essenziale e universale: il desiderio umano di un contatto con il divino, di una risposta personale e trascendente al dolore, alle domande e ai <text:s/>misteri della vita.</text:p>
      <text:h text:style-name="P179" text:outline-level="2"/>
      <text:h text:style-name="P179" text:outline-level="2"/>
      <text:h text:style-name="P180"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Microsoft YaHei" svg:font-family="'Microsoft YaHei'" style:font-family-generic="system" style:font-pitch="variable"/>
    <style:font-face style:name="Noto Sans" svg:font-family="'Noto Sans'"/>
    <style:font-face style:name="Noto Sans1" svg:font-family="'Noto Sans'"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lr-tb"/>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3" style:display-name="Contents 3" style:family="paragraph" style:parent-style-name="Index" style:class="index">
      <style:paragraph-properties fo:margin-left="0cm" fo:text-indent="0cm" style:auto-text-indent="false">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9.3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cm" fo:margin-bottom="0cm" style:contextual-spacing="false" fo:text-align="center" style:justify-single-word="false"/>
    </style:style>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38</text:page-number></text:p>
      </style:header>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31T17:00:58.628386978</dc:date>
    <dc:creator>corrado tafaro</dc:creator>
    <meta:editing-duration>PT12H44M51S</meta:editing-duration>
    <meta:editing-cycles>63</meta:editing-cycles>
    <meta:generator>LibreOffice/24.2.7.2$Linux_X86_64 LibreOffice_project/420$Build-2</meta:generator>
    <meta:document-statistic meta:table-count="1" meta:image-count="0" meta:object-count="0" meta:page-count="238" meta:paragraph-count="480" meta:word-count="48783" meta:character-count="318924" meta:non-whitespace-character-count="270448"/>
  </office:meta>
</office:document-meta>
</file>