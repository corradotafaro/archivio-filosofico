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199cm" fo:margin-bottom="0cm" style:contextual-spacing="false" fo:line-height="115%" fo:text-align="justify" style:justify-single-word="false"/>
      <style:text-properties style:font-name="Noto Sans1" fo:font-size="13pt" fo:font-weight="normal" style:font-size-asian="13pt" style:font-weight-asian="normal" style:font-size-complex="13pt" style:font-weight-complex="normal"/>
    </style:style>
    <style:style style:name="P2" style:family="paragraph" style:parent-style-name="Heading_20_1">
      <style:paragraph-properties fo:margin-top="0cm" fo:margin-bottom="0cm" style:contextual-spacing="false" fo:text-align="start" style:justify-single-word="false"/>
      <style:text-properties style:font-name="Noto Sans1" fo:font-size="16pt" fo:font-weight="normal" style:font-size-asian="16pt" style:font-weight-asian="normal" style:font-size-complex="16pt" style:font-weight-complex="normal"/>
    </style:style>
    <style:style style:name="P3" style:family="paragraph" style:parent-style-name="Heading_20_3">
      <style:paragraph-properties fo:line-height="115%" fo:text-align="justify" style:justify-single-word="false"/>
      <style:text-properties style:font-name="Noto Sans1" fo:font-size="13pt" fo:font-weight="normal" style:font-size-asian="13pt" style:font-weight-asian="normal" style:font-size-complex="13pt" style:font-weight-complex="normal"/>
    </style:style>
    <style:style style:name="P4" style:family="paragraph" style:parent-style-name="Heading_20_3">
      <style:paragraph-properties fo:margin-top="0cm" fo:margin-bottom="0cm" style:contextual-spacing="false" fo:line-height="115%" fo:text-align="justify" style:justify-single-word="false"/>
    </style:style>
    <style:style style:name="P5" style:family="paragraph" style:parent-style-name="Standard">
      <style:paragraph-properties fo:margin-top="0.101cm" fo:margin-bottom="0cm" style:contextual-spacing="false" fo:line-height="115%" fo:text-align="justify" style:justify-single-word="false"/>
      <style:text-properties fo:font-weight="normal" style:font-weight-asian="normal" style:font-weight-complex="normal"/>
    </style:style>
    <style:style style:name="P6" style:family="paragraph" style:parent-style-name="Text_20_body">
      <style:paragraph-properties fo:line-height="115%" fo:text-align="justify" style:justify-single-word="false"/>
      <style:text-properties style:font-name="Noto Sans1" fo:font-size="13pt" fo:font-weight="normal" style:font-size-asian="13pt" style:font-weight-asian="normal" style:font-size-complex="13pt" style:font-weight-complex="normal"/>
    </style:style>
    <style:style style:name="P7" style:family="paragraph" style:parent-style-name="Text_20_body">
      <style:paragraph-properties fo:line-height="115%"/>
      <style:text-properties style:font-name="Noto Sans1" fo:font-size="13pt" fo:font-weight="normal" style:font-size-asian="13pt" style:font-weight-asian="normal" style:font-size-complex="13pt" style:font-weight-complex="normal"/>
    </style:style>
    <style:style style:name="P8" style:family="paragraph" style:parent-style-name="Text_20_body">
      <style:paragraph-properties fo:line-height="115%" fo:text-align="justify" style:justify-single-word="false"/>
      <style:text-properties fo:font-weight="normal" officeooo:paragraph-rsid="000abc62" style:font-weight-asian="normal" style:font-weight-complex="normal"/>
    </style:style>
    <style:style style:name="P9" style:family="paragraph" style:parent-style-name="Text_20_body">
      <style:paragraph-properties fo:margin-top="0cm" fo:margin-bottom="0cm" style:contextual-spacing="false" fo:line-height="115%" fo:text-align="justify" style:justify-single-word="false"/>
      <style:text-properties fo:font-weight="normal" officeooo:paragraph-rsid="000abc62" style:font-weight-asian="normal" style:font-weight-complex="normal"/>
    </style:style>
    <style:style style:name="P10" style:family="paragraph" style:parent-style-name="Text_20_body">
      <style:paragraph-properties fo:line-height="115%" fo:text-align="justify" style:justify-single-word="false"/>
    </style:style>
    <style:style style:name="P11" style:family="paragraph" style:parent-style-name="Text_20_body">
      <style:paragraph-properties fo:margin-top="0cm" fo:margin-bottom="0cm" style:contextual-spacing="false" fo:line-height="115%" fo:text-align="justify" style:justify-single-word="false"/>
    </style:style>
    <style:style style:name="P12" style:family="paragraph" style:parent-style-name="Text_20_body">
      <style:paragraph-properties fo:margin-top="0.101cm" fo:margin-bottom="0cm" style:contextual-spacing="false" fo:line-height="115%" fo:text-align="justify" style:justify-single-word="false"/>
    </style:style>
    <style:style style:name="T1" style:family="text">
      <style:text-properties officeooo:rsid="000a7f7c"/>
    </style:style>
    <style:style style:name="T2" style:family="text">
      <style:text-properties style:font-name="Noto Sans1"/>
    </style:style>
    <style:style style:name="T3" style:family="text">
      <style:text-properties style:font-name="Noto Sans1" officeooo:rsid="000a7f7c"/>
    </style:style>
    <style:style style:name="T4" style:family="text">
      <style:text-properties style:font-name="Noto Sans1" fo:font-size="13pt" style:font-size-asian="13pt" style:font-size-complex="13pt"/>
    </style:style>
    <style:style style:name="T5" style:family="text">
      <style:text-properties style:font-name="Noto Sans1" fo:font-size="13pt" officeooo:rsid="000a7f7c" style:font-size-asian="13pt" style:font-size-complex="13pt"/>
    </style:style>
    <style:style style:name="T6" style:family="text">
      <style:text-properties style:font-name="Noto Sans1" fo:font-size="13pt" fo:font-weight="bold" style:font-size-asian="13pt" style:font-weight-asian="bold" style:font-size-complex="13pt" style:font-weight-complex="bold"/>
    </style:style>
    <style:style style:name="T7" style:family="text">
      <style:text-properties style:font-name="Noto Sans1" fo:font-size="13pt" fo:font-weight="bold" officeooo:rsid="000a7f7c" style:font-size-asian="13pt" style:font-weight-asian="bold" style:font-size-complex="13pt" style:font-weight-complex="bold"/>
    </style:style>
    <style:style style:name="T8" style:family="text">
      <style:text-properties style:font-name="Noto Sans1"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emostene, il difensore del mondo greco</text:h>
      <text:h text:style-name="P1" text:outline-level="2">Negli anni in cui Filippo II di Macedonia e suo figlio Alessandro Magno si apprestavano a sottomettere la penisola ellenica, un ateniese levò la sua voce per esortare i greci a difendere l’ideale di libertà, democrazia e autonomia delle città greche</text:h>
      <text:p text:style-name="P5"><text:span text:style-name="T4">Fuggito da Atene, Demostene si rifugiò nel tempio di Poseidone, nella piccola isola di Calauria (oggi Poros), poco al largo delle coste del Peloponneso. Quando il politico e oratore ateniese, che </text:span><text:span text:style-name="Strong_20_Emphasis"><text:span text:style-name="T8">per anni si era battuto contro i nuovi padroni della Grecia, i macedoni</text:span></text:span><text:span text:style-name="T4">, si rese conto che non avrebbe ricevuto pietà né perdono dal generale macedone Antipatro che </text:span><text:span text:style-name="Strong_20_Emphasis"><text:span text:style-name="T8">lo aveva condannato a morte dopo la battaglia di Crannone e l’occupazione di Atene nel 322 a.C.</text:span></text:span><text:span text:style-name="T4">, si uccise con il veleno. Alcuni mesi prima era deceduto nella lontana Babilonia anche </text:span><text:a xlink:type="simple" xlink:href="https://www.storicang.it/p/Alessandro%20Magno" office:target-frame-name="_blank" xlink:show="new" text:style-name="Internet_20_link" text:visited-style-name="Visited_20_Internet_20_Link"><text:span text:style-name="T4">Alessandro Magno</text:span></text:a><text:span text:style-name="T4"> e l’anno successivo sarebbe morto in esilio colui che tra il 343 e il 342 si era occupato dell’istruzione del condottiero macedone, </text:span><text:a xlink:type="simple" xlink:href="https://www.storicang.it/a/aristotele-pensatore-poliedrico_15483" office:target-frame-name="_blank" xlink:show="new" text:style-name="Internet_20_link" text:visited-style-name="Visited_20_Internet_20_Link"><text:span text:style-name="T4">Aristotele</text:span></text:a><text:span text:style-name="T4">. Con la scomparsa di queste grandi personalità, </text:span><text:span text:style-name="Strong_20_Emphasis"><text:span text:style-name="T8">finì l’età classica della Grecia ed ebbe inizio la fase dei regni ellenistici fondati dai successori di Alessandro Magno</text:span></text:span><text:span text:style-name="T4">.</text:span></text:p>
      <text:p text:style-name="P8"><text:soft-page-break/><text:span text:style-name="T5">I</text:span><text:span text:style-name="T4">n questo contesto storico la morte di Demostene acquisisce un significato considerevole: </text:span><text:span text:style-name="Strong_20_Emphasis"><text:span text:style-name="T8">mette in evidenza il fallimento dell’ideale patriottico e il declino definitivo della democrazia di </text:span></text:span><text:a xlink:type="simple" xlink:href="https://www.storicang.it/t/atene" office:target-frame-name="_blank" xlink:show="new" text:style-name="Internet_20_link" text:visited-style-name="Visited_20_Internet_20_Link"><text:span text:style-name="Strong_20_Emphasis"><text:span text:style-name="T8">Atene</text:span></text:span></text:a><text:span text:style-name="T4">, che era stata una polis indipendente e che ora, sottomessa al dominio macedone, perdeva definitivamente la sua autonomia. Per la prima volta nella sua storia, </text:span><text:span text:style-name="Strong_20_Emphasis"><text:span text:style-name="T8">la città che per tanto tempo fu la culla della libertà era assoggettata a un governo oligarchico</text:span></text:span><text:span text:style-name="T4"> imposto da una potenza straniera.</text:span></text:p>
      <text:p text:style-name="P9"><text:span text:style-name="T4">Il potere della parola</text:span></text:p>
      <text:p text:style-name="P12"><text:span text:style-name="Strong_20_Emphasis"><text:span text:style-name="T8">Demostene si era dedicato fin da giovane all’arte oratoria</text:span></text:span><text:span text:style-name="T8">, che nella democratica Atene aveva una consolidata e illustre tradizione. </text:span><text:span text:style-name="Strong_20_Emphasis"><text:span text:style-name="T8">L’oratore impiegò la sua eloquenza sia in ambito forense sia in dibattiti pubblici</text:span></text:span><text:span text:style-name="T8"> che ebbero nel tempo una crescente risonanza, fino a diventare un’aperta esortazione ai concittadini a opporsi al declino della politica ateniese.</text:span></text:p>
      <text:p text:style-name="P11"><text:span text:style-name="T8">I discorsi che si tenevano davanti ai tribunali o nell’ecclesia, l’Assemblea ateniese, </text:span><text:span text:style-name="Strong_20_Emphasis"><text:span text:style-name="T8">erano il mezzo per ottenere giustizia e mettere in atto le decisioni del popolo</text:span></text:span><text:span text:style-name="T8">, in un tempo in cui la persuasione per mezzo della parola guidava </text:span><text:span text:style-name="Strong_20_Emphasis"><text:span text:style-name="T8">la politica, che era </text:span></text:span><text:soft-page-break/><text:span text:style-name="Strong_20_Emphasis"><text:span text:style-name="T8">espressione del voto e dell’opinione della maggioranza dei cittadini</text:span></text:span><text:span text:style-name="T8">.</text:span></text:p>
      <text:p text:style-name="P11"><text:span text:style-name="Strong_20_Emphasis"><text:span text:style-name="T8">Ad Atene non c’erano autorità superiori al voto dell’ecclesia</text:span></text:span><text:span text:style-name="T8">: al suo interno ci si confrontava anche duramente su diversi argomenti della vita civile, quali la guerra e la pace, i tributi e le spese, le pene e gli oneri. </text:span><text:span text:style-name="Strong_20_Emphasis"><text:span text:style-name="T8">Ciascuno cercava con la retorica di commuovere e persuadere i cittadini</text:span></text:span><text:span text:style-name="T8">, avvezzi a dibattiti spesso appassionati come gli agoni tra due attori che si potevano ascoltare nel teatro greco o la disputa tra gli avversari nella commedia attica antica. Nell’epoca più gloriosa di Atene </text:span><text:a xlink:type="simple" xlink:href="https://www.storicang.it/a/pericle-stratego-che-spinse-atene-alla-guerra_15956" office:target-frame-name="_blank" xlink:show="new" text:style-name="Internet_20_link" text:visited-style-name="Visited_20_Internet_20_Link"><text:span text:style-name="Strong_20_Emphasis"><text:span text:style-name="T8">Pericle</text:span></text:span></text:a><text:span text:style-name="Strong_20_Emphasis"><text:span text:style-name="T8"> era stato il miglior esempio di grande oratore nell’ecclesia</text:span></text:span><text:span text:style-name="T8"> e infatti guidò la vita politica di Atene per oltre trent’anni in qualità di stratego. Demostene non assunse nessuna carica simile, tuttavia </text:span><text:span text:style-name="Strong_20_Emphasis"><text:span text:style-name="T8">con i suoi discorsi seppe smuovere gli animi di molti</text:span></text:span><text:span text:style-name="T8"> grazie alla sua coscienza libertaria e al suo patriottismo: </text:span><text:span text:style-name="Strong_20_Emphasis"><text:span text:style-name="T8">era intenzionato a preservare l’antica grandezza e l’autonomia della polis contro la minaccia di un dominio straniero</text:span></text:span><text:span text:style-name="T8">. Dopo la sua morte nessun’altra voce si levò in difesa della libertà e la democrazia s'indebolì sotto il governo dei vincitori.</text:span></text:p>
      <text:h text:style-name="P3" text:outline-level="3"><text:soft-page-break/>Difensore della libertà</text:h>
      <text:p text:style-name="P10"><text:span text:style-name="T8">Ancora adolescente, Demostene, accortosi che i suoi tre tutori Afobo e Demofonte, cugini paterni, e Terippide, un amico di famiglia, stavano dilapidando il suo patrimonio, </text:span><text:span text:style-name="Strong_20_Emphasis"><text:span text:style-name="T8">decise di studiare oratoria per reclamare davanti ai tribunali l’eredità di suo padre</text:span></text:span><text:span text:style-name="T8">, morto quando egli aveva solo sei anni. Non riuscì a recuperare che una piccola parte dei suoi beni, ma </text:span><text:span text:style-name="Strong_20_Emphasis"><text:span text:style-name="T8">la formazione di oratoria e diritto ricevuta da Iseo, allievo del grande oratore Isocrate, gli permise di lavorare come logografo</text:span></text:span><text:span text:style-name="T8">, ovvero scrivendo le orazioni giudiziarie su richiesta.</text:span></text:p>
      <text:p text:style-name="P10"><text:span text:style-name="T8">Intorno al 355-54 a.C., </text:span><text:span text:style-name="Strong_20_Emphasis"><text:span text:style-name="T8">all’età di trent’anni, Demostene pronunciò il suo primo discorso davanti all’ecclesia</text:span></text:span><text:span text:style-name="T8">, ma solo a partire dal 350-51 egli raggiunse l’apice della fama come retore con i suoi discorsi </text:span><text:span text:style-name="Strong_20_Emphasis"><text:span text:style-name="T8">in seguito alla minaccia militare di Filippo II di Macedonia</text:span></text:span><text:span text:style-name="T8">.</text:span></text:p>
      <text:p text:style-name="P10"><text:span text:style-name="T8">Di fatto, </text:span><text:span text:style-name="Strong_20_Emphasis"><text:span text:style-name="T8">negli otto anni precedenti il re macedone aveva esteso il proprio dominio sui territori confinanti con il suo regno</text:span></text:span><text:span text:style-name="T8">, tra Calcidia e Chersoneso, un territorio particolarmente legato agli interessi di Atene. In seguito a un’attenta </text:span><text:soft-page-break/><text:span text:style-name="T8">pianificazione e a una crescente forza militare, </text:span><text:span text:style-name="Strong_20_Emphasis"><text:span text:style-name="T8">Filippo fu l’arbitro dei conflitti nel mondo greco con diverse campagne tra Tessaglia e Tracia</text:span></text:span><text:span text:style-name="T8">. Per più di dieci anni Demostene mise in guardia i suoi concittadini e </text:span><text:span text:style-name="Strong_20_Emphasis"><text:span text:style-name="T8">li esortò, per mezzo dei suoi accesi discorsi, chiamati </text:span></text:span><text:span text:style-name="Strong_20_Emphasis"><text:span text:style-name="Emphasis"><text:span text:style-name="T8">Filippiche</text:span></text:span></text:span><text:span text:style-name="Strong_20_Emphasis"><text:span text:style-name="T8">, a contrapporsi al crescente potere del macedone</text:span></text:span><text:span text:style-name="T8">.</text:span></text:p>
      <text:p text:style-name="P10"><text:span text:style-name="Strong_20_Emphasis"><text:span text:style-name="T8">Quest’ultimo, tuttavia, poteva contare su numerosi sostenitori nella classe dirigente di Atene</text:span></text:span><text:span text:style-name="T8">, come il brillante oratore Eschine, in seguito rivale di Demostene, e lo stesso Isocrate, che acclamò Filippo II come </text:span><text:span text:style-name="Strong_20_Emphasis"><text:span text:style-name="T8">il grande monarca che avrebbe potuto unire tutti i greci sotto il suo comando</text:span></text:span><text:span text:style-name="T8"> e intraprendere una guerra contro la Persia, unico vero nemico.</text:span></text:p>
      <text:p text:style-name="P10"><text:span text:style-name="T8">Quando, nel 339 a.C., il re macedone attraversò il passo delle Termopili nella sua marcia verso sud, </text:span><text:span text:style-name="Strong_20_Emphasis"><text:span text:style-name="T8">Demostene convinse gli ateniesi ad allearsi con i tebani per frenare l’avanzata del potente esercito straniero</text:span></text:span><text:span text:style-name="T8">. Entrambi gli schieramenti si affrontarono in un violento scontro sulla pianura di Cheronea (odierna Caprena), nella Beozia, e </text:span><text:span text:style-name="Strong_20_Emphasis"><text:span text:style-name="T8">nell’autunno del 338 a.C. Filippo ottenne una decisiva vittoria sui greci</text:span></text:span><text:span text:style-name="T8">; in questa campagna lo accompagnò il suo giovane figlio, il principe Alessandro, al comando </text:span><text:soft-page-break/><text:span text:style-name="T8">della sua potente cavalleria. Nel luogo dello scontro è stato eretto un monumento, conosciuto come il Leone di Cheronea, per immortalare il trionfo o in memoria dei caduti, poiché </text:span><text:span text:style-name="Strong_20_Emphasis"><text:span text:style-name="T8">sotto di esso sono stati rinvenuti i resti di duecentocinquanta soldati della Beozia morti nello scontro.</text:span></text:span></text:p>
      <text:h text:style-name="P4" text:outline-level="3"><text:span text:style-name="Strong_20_Emphasis"><text:span text:style-name="T8">In onore del vinto</text:span></text:span></text:h>
      <text:p text:style-name="P12"><text:span text:style-name="Strong_20_Emphasis"><text:span text:style-name="T8">Demostene fuggì ingloriosamente dalla dura battaglia</text:span></text:span><text:span text:style-name="T8">, nonostante ciò gli ateniesi lo scelsero per pronunciare il discorso funebre in onore dei caduti a Cheronea. Il testo di questo epitaffio è andato perduto, ma si è conservato un distico che lascia trasparire dalle parole un’amara rassegnazione. Nonostante la sconfitta, </text:span><text:span text:style-name="Strong_20_Emphasis"><text:span text:style-name="T8">Ctesifonte, un oratore di Atene, propose nel 377 che la città onorasse Demostene con una corona d’oro per i suoi meriti</text:span></text:span><text:span text:style-name="T8"> alle Grandi Dionisiache, le feste durante le quali si tenevano gare di retorica. Ma Eschine, rivale di Demostene, si oppose alla proposta, scrivendo il discorso </text:span><text:span text:style-name="Emphasis"><text:span text:style-name="T8">Contro Ctesifonte</text:span></text:span><text:span text:style-name="T8">, nel quale argomentava l’illegalità del gesto </text:span><text:span text:style-name="Strong_20_Emphasis"><text:span text:style-name="T8">in virtù del fatto che Demostene fosse ancora un magistrato e l’incoronazione non potesse avvenire in teatro</text:span></text:span><text:span text:style-name="T8">; in realtà egli colse </text:span><text:soft-page-break/><text:span text:style-name="T8">l’occasione per un’ampia requisitoria sull’attività politica del rivale.</text:span></text:p>
      <text:p text:style-name="P10"><text:span text:style-name="Strong_20_Emphasis"><text:span text:style-name="T8">Demostene replicò alle accuse nel 330 con una delle sue più memorabili orazioni, </text:span></text:span><text:span text:style-name="Strong_20_Emphasis"><text:span text:style-name="Emphasis"><text:span text:style-name="T8">Sulla Corona</text:span></text:span></text:span><text:span text:style-name="T8">, nella quale tessé l’apologia della sua lunga carriera politica a favore di Atene e dei suoi ideali democratici, </text:span><text:span text:style-name="Strong_20_Emphasis"><text:span text:style-name="T8">ricordando di non essersi mai sottratto all’impegno di difendere i valori in cui credeva</text:span></text:span><text:span text:style-name="T8">. Le parole di questa orazione commossero la giuria, così </text:span><text:span text:style-name="Strong_20_Emphasis"><text:span text:style-name="T8">Eschine ottenne solo un quinto dei voti, fu condannato e andò in esilio a Rodi, dove morì poco dopo</text:span></text:span><text:span text:style-name="T8">.</text:span></text:p>
      <text:p text:style-name="P11"><text:span text:style-name="T8">Quando, nel 336 a.C., Filippo II fu assassinato, </text:span><text:span text:style-name="Strong_20_Emphasis"><text:span text:style-name="T8">Demostene con la sua oratoria riuscì a impedire che gli ateniesi si lanciassero subito, senza l’adeguata preparazione, nella rivolta</text:span></text:span><text:span text:style-name="T8">. Ma quando Alessandro salì al trono, Demostene preparò i suoi concittadini alla ribellione per reclamare la propria indipendenza e chiedere l’alleanza di Tebe. </text:span><text:span text:style-name="Strong_20_Emphasis"><text:span text:style-name="T8">Alessandro, al comando del suo potente esercito, sconfisse tebani e ateniesi in una rapida battaglia</text:span></text:span><text:span text:style-name="T8">. La sorte della città beota fu durissima: il macedone la rase al suolo a eccezione di un tempio, della casa del poeta Pindaro e del cinico Cratete. </text:span><text:span text:style-name="Strong_20_Emphasis"><text:span text:style-name="T8">Il giovane re fu tuttavia più clemente </text:span></text:span><text:soft-page-break/><text:span text:style-name="Strong_20_Emphasis"><text:span text:style-name="T8">con Atene, limitandosi a esigere la sottomissione della città</text:span></text:span><text:span text:style-name="T8">, poiché questa non solo era il simbolo della gloria ellenica, ma possedeva anche una grande flotta di cui Alessandro avrebbe avuto bisogno nella guerra contro i persiani.</text:span></text:p>
      <text:h text:style-name="P3" text:outline-level="3">L’ultima battaglia</text:h>
      <text:p text:style-name="P10"><text:span text:style-name="Strong_20_Emphasis"><text:span text:style-name="T8">Alcuni anni più tardi Demostene fu coinvolto in uno scandalo: il caso Arpalo</text:span></text:span><text:span text:style-name="T8">. Questi era un tesoriere di Alessandro fuggito dalla corte del re con una grande somma di denaro, soldati e navi, e aveva chiesto asilo ad Atene. Demostene decise di offrire ospitalità al ministro macedone e </text:span><text:span text:style-name="Strong_20_Emphasis"><text:span text:style-name="T8">lasciò che il fuggitivo depositasse il proprio denaro in città</text:span></text:span><text:span text:style-name="T8">. Nel 324, quando Alessandro chiese l’estradizione di Arpalo, questi fuggì a Creta, dove fu assassinato poco dopo, e </text:span><text:span text:style-name="Strong_20_Emphasis"><text:span text:style-name="T8">Demostene fu accusato di aver sottratto parte del denaro nascosto, che nel frattempo era scomparso</text:span></text:span><text:span text:style-name="T8">.</text:span></text:p>
      <text:p text:style-name="P11"><text:span text:style-name="Strong_20_Emphasis"><text:span text:style-name="T8">L’oratore fu processato e condannato al pagamento di una multa</text:span></text:span><text:span text:style-name="T8">, un debito che non poté estinguere, pertanto fu imprigionato. Evaso senza difficoltà, Demostene fuggì prima a Egina e poi a Trezene. </text:span><text:span text:style-name="Strong_20_Emphasis"><text:span text:style-name="T8">Il retore tornò ad Atene alla morte di Alessandro, nel 323 a.C.</text:span></text:span><text:span text:style-name="T8">, e poté pagare il suo debito grazie a una </text:span><text:soft-page-break/><text:span text:style-name="T8">donazione da parte del popolo. Nonostante l’accoglienza favorevole della città, egli non ebbe più un ruolo di prestigio nella lotta per la libertà contro la potenza macedone, che ora era guidata dal generale Antipatro. Ancora una volta gli ateniesi si sollevarono contro l’invasore straniero, </text:span><text:span text:style-name="Strong_20_Emphasis"><text:span text:style-name="T8">subendo però una schiacciante sconfitta nella battaglia di Crannone, in Tessaglia, nel 322</text:span></text:span><text:span text:style-name="T8">, e l’occupazione della città. Condannato a morte, come Iperide, con il quale si era nel frattempo riconciliato, Demostene fuggì nuovamente, ma </text:span><text:span text:style-name="Strong_20_Emphasis"><text:span text:style-name="T8">i macedoni lo raggiunsero a Calauria e qui l’oratore si suicidò</text:span></text:span><text:span text:style-name="T8">.</text:span></text:p>
      <text:p text:style-name="P10"><text:span text:style-name="T8">In onore dell’instancabile sostenitore della libertà e della democrazia della polis, </text:span><text:span text:style-name="Strong_20_Emphasis"><text:span text:style-name="T8">nel 280 circa gli ateniesi gli eressero una statua</text:span></text:span><text:span text:style-name="T8"> su cui si legge: «Se tu avessi avuto, o Demostene, forza uguale all’ingegno, </text:span><text:span text:style-name="Strong_20_Emphasis"><text:span text:style-name="T8">il Marte macedone non avrebbe mai signoreggiato sui greci</text:span></text:span><text:span text:style-name="T8">».</text:span></text:p>
      <text:p text:style-name="P6"/>
      <text:p text:style-name="P10"><text:span text:style-name="Strong_20_Emphasis"><text:span text:style-name="T8"/></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2-02T16:00:19.292459343</meta:creation-date>
    <dc:date>2026-02-15T19:01:16.341221716</dc:date>
    <dc:creator>corrado tafaro</dc:creator>
    <meta:editing-duration>PT28M12S</meta:editing-duration>
    <meta:editing-cycles>4</meta:editing-cycles>
    <meta:generator>LibreOffice/24.2.7.2$Linux_X86_64 LibreOffice_project/420$Build-2</meta:generator>
    <meta:document-statistic meta:table-count="0" meta:image-count="0" meta:object-count="0" meta:page-count="9" meta:paragraph-count="22" meta:word-count="1556" meta:character-count="9927" meta:non-whitespace-character-count="8393"/>
  </office:meta>
</office:document-meta>
</file>