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Quotations"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3pt" fo:font-style="normal" officeooo:paragraph-rsid="0004dae0" style:font-size-asian="13pt" style:font-style-asian="normal" style:font-size-complex="13pt" style:font-style-complex="normal"/>
    </style:style>
    <style:style style:name="P2"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4dae0" style:font-size-asian="13pt" style:font-style-asian="normal" style:font-size-complex="13pt" style:font-style-complex="normal"/>
    </style:style>
    <style:style style:name="P3"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officeooo:paragraph-rsid="0004dae0" style:font-size-asian="13pt" style:font-style-asian="normal" style:font-size-complex="13pt" style:font-style-complex="normal"/>
    </style:style>
    <style:style style:name="P4"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4dae0" style:font-size-asian="13pt" style:font-style-asian="normal" style:font-size-complex="13pt" style:font-style-complex="normal"/>
    </style:style>
    <style:style style:name="P5"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4dae0" style:font-size-asian="13pt" style:font-style-asian="normal" style:font-size-complex="13pt" style:font-style-complex="normal"/>
    </style:style>
    <style:style style:name="P6"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9fb25" style:font-size-asian="13pt" style:font-style-asian="normal" style:font-size-complex="13pt" style:font-style-complex="normal"/>
    </style:style>
    <style:style style:name="P7"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bf3a8" style:font-size-asian="13pt" style:font-style-asian="normal" style:font-size-complex="13pt" style:font-style-complex="normal"/>
    </style:style>
    <style:style style:name="P8"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0e3a8a" style:font-size-asian="13pt" style:font-style-asian="normal" style:font-size-complex="13pt" style:font-style-complex="normal"/>
    </style:style>
    <style:style style:name="P9"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15a1fe" style:font-size-asian="13pt" style:font-style-asian="normal" style:font-size-complex="13pt" style:font-style-complex="normal"/>
    </style:style>
    <style:style style:name="P10"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15a1fe" style:font-size-asian="13pt" style:font-style-asian="normal" style:font-size-complex="13pt" style:font-style-complex="normal"/>
    </style:style>
    <style:style style:name="P11"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15a1fe" style:font-size-asian="13pt" style:font-style-asian="normal" style:font-size-complex="13pt" style:font-style-complex="normal"/>
    </style:style>
    <style:style style:name="P12"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16ad30" style:font-size-asian="13pt" style:font-style-asian="normal" style:font-size-complex="13pt" style:font-style-complex="normal"/>
    </style:style>
    <style:style style:name="P13"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rsid="001830ee" officeooo:paragraph-rsid="001830ee" style:font-size-asian="13pt" style:font-style-asian="normal" style:font-size-complex="13pt" style:font-style-complex="normal"/>
    </style:style>
    <style:style style:name="P14" style:family="paragraph" style:parent-style-name="Standard">
      <style:paragraph-properties fo:margin-top="0.101cm" fo:margin-bottom="0cm" style:contextual-spacing="false" fo:line-height="115%" fo:text-align="justify" style:justify-single-word="false"/>
      <style:text-properties style:font-name="Noto Sans1" fo:font-size="13pt" officeooo:paragraph-rsid="00067a77" style:font-size-asian="13pt" style:font-size-complex="13pt"/>
    </style:style>
    <style:style style:name="P15" style:family="paragraph" style:parent-style-name="Standard">
      <style:paragraph-properties fo:margin-top="0cm" fo:margin-bottom="0cm" style:contextual-spacing="false" fo:line-height="115%" fo:text-align="justify" style:justify-single-word="false"/>
      <style:text-properties style:font-name="Noto Sans1" fo:font-size="13pt" officeooo:paragraph-rsid="00067a77" style:font-size-asian="13pt" style:font-size-complex="13pt"/>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fo:font-size="13pt" officeooo:paragraph-rsid="0004dae0" style:font-size-asian="13pt" style:font-size-complex="13pt"/>
    </style:style>
    <style:style style:name="P17" style:family="paragraph" style:parent-style-name="Text_20_body">
      <style:paragraph-properties fo:margin-top="0.101cm" fo:margin-bottom="0cm" style:contextual-spacing="false" fo:line-height="115%" fo:text-align="justify" style:justify-single-word="false"/>
      <style:text-properties style:font-name="Noto Sans1" fo:font-size="13pt" officeooo:paragraph-rsid="0004dae0" style:font-size-asian="13pt" style:font-size-complex="13pt"/>
    </style:style>
    <style:style style:name="P18" style:family="paragraph" style:parent-style-name="Standard">
      <style:paragraph-properties fo:line-height="115%" fo:text-align="justify" style:justify-single-word="false"/>
      <style:text-properties style:font-name="Noto Sans1" fo:font-size="13pt" officeooo:paragraph-rsid="0004dae0" style:font-size-asian="13pt" style:font-size-complex="13pt"/>
    </style:style>
    <style:style style:name="P19" style:family="paragraph" style:parent-style-name="Text_20_body">
      <style:paragraph-properties fo:text-align="justify" style:justify-single-word="false"/>
      <style:text-properties style:font-name="Noto Sans1" fo:font-size="13pt" style:font-size-asian="13pt" style:font-size-complex="13pt"/>
    </style:style>
    <style:style style:name="P20" style:family="paragraph" style:parent-style-name="Quotations">
      <loext:graphic-properties draw:fill="none"/>
      <style:paragraph-properties fo:margin-left="0cm" fo:margin-right="0cm" fo:margin-top="0cm" fo:margin-bottom="0.499cm" style:contextual-spacing="false" fo:line-height="115%" fo:text-align="start" style:justify-single-word="false" fo:text-indent="0cm" style:auto-text-indent="false" fo:background-color="transparent"/>
      <style:text-properties style:font-name="Noto Sans1" fo:font-size="18pt" fo:font-style="normal" officeooo:paragraph-rsid="0004dae0" style:font-size-asian="18pt" style:font-style-asian="normal" style:font-size-complex="18pt" style:font-style-complex="normal"/>
    </style:style>
    <style:style style:name="P21"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e3a8a"/>
    </style:style>
    <style:style style:name="P22"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119725"/>
    </style:style>
    <style:style style:name="P23"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119725"/>
    </style:style>
    <style:style style:name="P24" style:family="paragraph" style:parent-style-name="Standard">
      <style:paragraph-properties fo:margin-top="0.101cm" fo:margin-bottom="0cm" style:contextual-spacing="false" fo:line-height="115%" fo:text-align="justify" style:justify-single-word="false"/>
      <style:text-properties officeooo:paragraph-rsid="00067a77"/>
    </style:style>
    <style:style style:name="P25" style:family="paragraph" style:parent-style-name="Standard">
      <style:paragraph-properties fo:margin-top="0.101cm" fo:margin-bottom="0cm" style:contextual-spacing="false" fo:line-height="115%" fo:text-align="justify" style:justify-single-word="false"/>
      <style:text-properties officeooo:paragraph-rsid="00083484"/>
    </style:style>
    <style:style style:name="P26" style:family="paragraph" style:parent-style-name="Footnote">
      <style:paragraph-properties fo:text-align="justify" style:justify-single-word="false"/>
    </style:style>
    <style:style style:name="P27"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paragraph-rsid="00119725" style:font-size-asian="13pt" style:font-style-asian="normal" style:font-size-complex="13pt" style:font-style-complex="normal"/>
    </style:style>
    <style:style style:name="P28"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officeooo:rsid="0014c72d" officeooo:paragraph-rsid="0014c72d" style:font-size-asian="13pt" style:font-style-asian="normal" style:font-size-complex="13pt" style:font-style-complex="normal"/>
    </style:style>
    <style:style style:name="P29"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officeooo:rsid="0016ad30" officeooo:paragraph-rsid="0016ad30" style:font-size-asian="13pt" style:font-style-asian="normal" style:font-size-complex="13pt" style:font-style-complex="normal"/>
    </style:style>
    <style:style style:name="P30" style:family="paragraph" style:parent-style-name="Quotations">
      <style:paragraph-properties fo:margin-top="0cm" fo:margin-bottom="0cm" style:contextual-spacing="false" fo:text-align="center" style:justify-single-word="false"/>
      <style:text-properties fo:font-style="italic" officeooo:paragraph-rsid="0018e765" style:font-style-asian="italic" style:font-style-complex="italic"/>
    </style:style>
    <style:style style:name="P31" style:family="paragraph" style:parent-style-name="Text_20_body">
      <style:paragraph-properties fo:margin-top="0.101cm" fo:margin-bottom="0cm" style:contextual-spacing="false" fo:line-height="115%" fo:text-align="justify" style:justify-single-word="false"/>
      <style:text-properties style:font-name="Noto Sans1" fo:font-size="13pt" officeooo:paragraph-rsid="0018e765" style:font-size-asian="13pt" style:font-size-complex="13pt"/>
    </style:style>
    <style:style style:name="P32" style:family="paragraph" style:parent-style-name="Text_20_body">
      <style:paragraph-properties fo:margin-top="0.199cm" fo:margin-bottom="0cm" style:contextual-spacing="false" fo:line-height="115%" fo:text-align="justify" style:justify-single-word="false"/>
      <style:text-properties style:font-name="Noto Sans1" fo:font-size="13pt" officeooo:paragraph-rsid="0018e765" style:font-size-asian="13pt" style:font-size-complex="13pt"/>
    </style:style>
    <style:style style:name="T1" style:family="text">
      <style:text-properties officeooo:rsid="0014fba9"/>
    </style:style>
    <style:style style:name="T2" style:family="text">
      <style:text-properties fo:font-weight="bold" style:font-weight-asian="bold" style:font-weight-complex="bold"/>
    </style:style>
    <style:style style:name="T3" style:family="text">
      <style:text-properties officeooo:rsid="0004dae0"/>
    </style:style>
    <style:style style:name="T4" style:family="text">
      <style:text-properties fo:font-style="italic" style:font-style-asian="italic" style:font-style-complex="italic"/>
    </style:style>
    <style:style style:name="T5" style:family="text">
      <style:text-properties style:font-name="Noto Sans1" fo:font-size="13pt" style:font-size-asian="13pt" style:font-size-complex="13pt"/>
    </style:style>
    <style:style style:name="T6" style:family="text">
      <style:text-properties style:font-name="Noto Sans1" fo:font-size="13pt" officeooo:rsid="0015d724" style:font-size-asian="13pt" style:font-size-complex="13pt"/>
    </style:style>
    <style:style style:name="T7" style:family="text">
      <style:text-properties style:font-name="Noto Sans1" fo:font-size="13pt" officeooo:rsid="0014fba9" style:font-size-asian="13pt" style:font-size-complex="13pt"/>
    </style:style>
    <style:style style:name="T8" style:family="text">
      <style:text-properties style:font-name="Noto Sans1" fo:font-size="13pt" officeooo:rsid="00083484" style:font-size-asian="13pt" style:font-size-complex="13pt"/>
    </style:style>
    <style:style style:name="T9" style:family="text">
      <style:text-properties style:font-name="Noto Sans1" fo:font-size="13pt" officeooo:rsid="000bf3a8" style:font-size-asian="13pt" style:font-size-complex="13pt"/>
    </style:style>
    <style:style style:name="T10" style:family="text">
      <style:text-properties style:font-name="Noto Sans1" fo:font-size="13pt" fo:font-style="normal" style:font-size-asian="13pt" style:font-style-asian="normal" style:font-size-complex="13pt" style:font-style-complex="normal"/>
    </style:style>
    <style:style style:name="T11" style:family="text">
      <style:text-properties style:font-name="Noto Sans1" fo:font-size="13pt" fo:font-style="normal" officeooo:rsid="000e3a8a" style:font-size-asian="13pt" style:font-style-asian="normal" style:font-size-complex="13pt" style:font-style-complex="normal"/>
    </style:style>
    <style:style style:name="T12" style:family="text">
      <style:text-properties style:font-name="Noto Sans1" fo:font-size="13pt" fo:font-style="normal" officeooo:rsid="00119725" style:font-size-asian="13pt" style:font-style-asian="normal" style:font-size-complex="13pt" style:font-style-complex="normal"/>
    </style:style>
    <style:style style:name="T13" style:family="text">
      <style:text-properties style:font-name="Noto Sans1" fo:font-size="13pt" fo:font-style="normal" officeooo:rsid="0011fb0e" style:font-size-asian="13pt" style:font-style-asian="normal" style:font-size-complex="13pt" style:font-style-complex="normal"/>
    </style:style>
    <style:style style:name="T14" style:family="text">
      <style:text-properties style:font-name="Noto Sans1" fo:font-size="13pt" fo:font-style="normal" officeooo:rsid="00129c82" style:font-size-asian="13pt" style:font-style-asian="normal" style:font-size-complex="13pt" style:font-style-complex="normal"/>
    </style:style>
    <style:style style:name="T15" style:family="text">
      <style:text-properties style:font-name="Noto Sans1" fo:font-size="13pt" fo:font-style="italic" style:font-size-asian="13pt" style:font-style-asian="italic" style:font-size-complex="13pt" style:font-style-complex="italic"/>
    </style:style>
    <style:style style:name="T16" style:family="text">
      <style:text-properties style:font-name="Noto Sans1" fo:font-size="13pt" fo:font-style="italic" officeooo:rsid="000e3a8a" style:font-size-asian="13pt" style:font-style-asian="italic" style:font-size-complex="13pt" style:font-style-complex="italic"/>
    </style:style>
    <style:style style:name="T17" style:family="text">
      <style:text-properties officeooo:rsid="00067a77"/>
    </style:style>
    <style:style style:name="T18" style:family="text">
      <style:text-properties officeooo:rsid="0009fb25"/>
    </style:style>
    <style:style style:name="T19" style:family="text">
      <style:text-properties officeooo:rsid="000ff816"/>
    </style:style>
    <style:style style:name="T20" style:family="text">
      <style:text-properties officeooo:rsid="00129c82"/>
    </style:style>
    <style:style style:name="T21" style:family="text">
      <style:text-properties officeooo:rsid="0013c4b4"/>
    </style:style>
    <style:style style:name="T22" style:family="text">
      <style:text-properties officeooo:rsid="0014c72d"/>
    </style:style>
    <style:style style:name="T23" style:family="text">
      <style:text-properties officeooo:rsid="0015a1fe"/>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officeooo:rsid="0016ad30"/>
    </style:style>
    <style:style style:name="T27" style:family="text">
      <style:text-properties fo:font-style="normal" style:font-style-asian="normal" style:font-style-complex="normal"/>
    </style:style>
    <style:style style:name="T28" style:family="text">
      <style:text-properties fo:font-style="normal" officeooo:rsid="0014c72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ofisti <text:span text:style-name="T22">e Retori</text:span></text:p>
      <text:p text:style-name="P1">«Impostori» e «cattivi maestri»: così i sofisti sono stati considerati nel corso dei secoli. I sofisti sono degli impostori perché fingono di cercare la verità, ma in realtà si occupano solo di prevalere (e di insegnare a prevalere) nelle discussioni, costi quel che costi. I sofisti fingono di essere sapienti o filosofi, ma non lo sono, insomma: si attaccano alle parole, e non s’interessano delle cose. Quello dei sofisti è un «sapere delle apparenze», scrive Aristotele in modo sarcastico, e dunque un’apparenza di sapere. Inevitabile dunque che seguisse la seconda accusa, quella di essere cattivi maestri, i responsabili della crisi morale che ha investito Atene alla fine del V secolo.</text:p>
      <text:p text:style-name="P3">Ora, i sofisti sono certamente spregiudicati. E di sicuro non condividono molte delle tesi dei filosofi tradizionali che li hanno preceduti, (i cosiddetti presocratici) e che li seguiranno (Platone e Aristotele). Ma non è detto che non avessero qualcosa di interessante da insegnare, anzi.</text:p>
      <text:p text:style-name="P31">A differenza dei filosofi greci precedenti, i sofisti non si interessavano alla cosmologia e alla ricerca <text:soft-page-break/>dell'archè originario, ma si concentravano sulla vita umana, diventando così i primi filosofi morali. </text:p>
      <text:p text:style-name="P30">"Io non vado intorno facendo nient'altro se non cercare di persuadere voi, e più giovani e più vecchi, che non dei corpi, dovete prendervi cura, né delle ricchezze né di nessuna altra cosa prima e con maggiore impegno che non dell'anima in modo che diventi buona il più possibile, sostenendo che la virtù non nasce dalle ricchezze, ma che dalla virtù stessa nascono le ricchezze e tutti gli altri beni per gli uomini, e in privato e in pubblico”. </text:p>
      <text:p text:style-name="P32">Inoltre, il loro approccio orientato all'individualismo e al relativismo ha influenzato il pensiero filosofico successivo.</text:p>
      <text:p text:style-name="P31">Tuttavia, a causa della grande influenza di Platone e Aristotele sulla filosofia successiva, i sofisti vennero considerati degli pseudo-filosofi per molti secoli. </text:p>
      <text:p text:style-name="P17">La netta antitesi tra Socrate ed i sofisti viene descritta da Platone nel Protagora (481-415), opera che prende il nome di uno dei più grandi sofisti. Protagora ha coniato l’espressione “L’uomo è la misura di tutte le cose“, che racchiude il suo pensiero. Egli e i sofisti in generale, sono scettici sul piano della conoscenza etica, <text:span text:style-name="T3">n</text:span>on esiste una verità che l’uomo può scoprire, ma ognuno ha la propria <text:soft-page-break/>verità e tutte hanno lo stesso valore. Concezione filosofica che viene definita relativismo.</text:p>
      <text:p text:style-name="P17">Una famosa <text:span text:style-name="T2">antilogia</text:span> di Protagora è: <text:span text:style-name="T4">“la malattia è un bene, la malattia è un male”</text:span>; infatti la malattia è un bene per il medico perché gli permette di guadagnare, ma è un male <text:span text:style-name="T1">p</text:span>er il malato. In questo senso la verità diventa pragmatica: l’utile è l’unica possibilità che permette la scelta. Mentre per Socrate è possibile, attraverso il ragionamento, arrivare ad una verità. Tutte le scelte non sono equivalenti, ma ci sono ragionamenti più giusti di altri, e quindi più veri.</text:p>
      <text:p text:style-name="P14">L’antitesi Socrate-Protagora è tra scrittura e oralità, tra monologhi e confronti con domande e risposte; tra persuasione e ricerca, tra amore per i beni materiali e cura dell’anima.</text:p>
      <text:p text:style-name="P24"><text:span text:style-name="T5">Ma </text:span><text:span text:style-name="T6">il</text:span><text:span text:style-name="T5"> conflitto è anche tra un sapere che si basa sull’ostentazione della sicurezza, ed uno che pone al centro la vera comprensione e l’umiltà .</text:span></text:p>
      <text:p text:style-name="P15"><text:span text:style-name="T17">Quali sono le d</text:span>ifferenze e similitudini tra Socrate e i Sofisti? </text:p>
      <text:p text:style-name="P15">Caratteristico del metodo maieutico è la brachilogia (discorso breve), in opposizione ai lunghi discorsi dei <text:soft-page-break/>sofisti, <text:span text:style-name="T17">e</text:span> fondamentale è la famosa ironia socratica<text:note text:id="ftn1" text:note-class="footnote"><text:note-citation>1</text:note-citation><text:note-body><text:p text:style-name="P26"><text:span text:style-name="T19">T</text:span>ecnica dialettica basata sulla dissimulazione, in cui Socrate finge ignoranza (“so di non sapere”) per elogiare l'interlocutore, per poi demolirne le certezze prefabbricate attraverso domande serrate. È la fase distruttiva (pars destruens) del suo metodo, volta a ripulire la mente dai pregiudizi prima della ricerca della verità. </text:p></text:note-body></text:note>. Essa è costituita da battute brevi e taglienti che mettono in mostra la superbia e l’ignoranza degli avversari, la fallacia dei loro argomenti e delle loro convinzioni. Oppure, usata in maniera più benevola era un mezzo usato da Socrate per stimolare i suoi “allievi”. </text:p>
      <text:p text:style-name="P16">Nonostante la sua importanza, la ricostruzione del pensiero e della vita di Socrate ha creato non pochi problemi agli storici della filosofia. In primis, perché Socrate non ha lasciato nulla di scritto, <text:span text:style-name="T17">i</text:span>l suo insegnamento è stato orale <text:span text:style-name="T17">e</text:span> <text:span text:style-name="T17">n</text:span>onostante ciò, è riuscito a lasciare un’impronta indelebile nel pensiero, nella cultura e nella storia dell’Occidente. <text:s/></text:p>
      <text:p text:style-name="P16">Socrate e i sofisti erano pensatori filosofici dell'antica Grecia che avevano in comune l'interesse per l'uomo e la sua condizione. Tuttavia, si distinguevano per i loro modi di pensare e di insegnare riguardo alla conoscenza, all'etica e alla politica. </text:p>
      <text:p text:style-name="P16">Il metodo socratico, a differenza di quello dei sofisti, si basava sul confronto dialettico. La verità non può <text:soft-page-break/>essere esposta, come in un trattato, ma nasce da un confronto. Nessuno possiede la verità ma, collaboran<text:span text:style-name="T17">d</text:span>o <text:span text:style-name="T17">e </text:span>dialogando, possiamo inseguirla. Coloro che scrivono, sicuri delle proprie idee, discorsi persuasivi e ripetitivi, lo fanno per convincere e non per amore del vero.</text:p>
      <text:p text:style-name="P18"/>
      <text:p text:style-name="P25"><text:span text:style-name="T7">Socrate contrappone alla retorica (l’arte della persuasione) dei sofisti, il dialogo maieutico e dialettico (sviluppato successivamente da Platone, che ne farà uno dei punti cardine della sua filosofia). Egli critica la fissità della scrittura, quell’immagin</text:span><text:span text:style-name="T8">e</text:span><text:span text:style-name="T7"> che sembra viva, ma che in realtà non può parlare. Una volta scritto, il discorso ha sempre bisogno del supporto dell'autore per essere compreso e difeso. </text:span><text:span text:style-name="T5">Come potrebbero i defunti proteggere le loro idee dalle cattive interpretazioni dei dotti?</text:span></text:p>
      <text:p text:style-name="P25"><text:span text:style-name="T7">Come potrebbero difenderli da quelli che hanno bisogn</text:span><text:span text:style-name="T8">o</text:span><text:span text:style-name="T7"> della carta scarabocchiata da altri per dare vita al loro pensiero così poco originale? La scrittura rischia di formare ombre di sapienti e non sapienti veri.</text:span></text:p>
      <text:p text:style-name="P25"><text:span text:style-name="T5">Ai sofisti si deve lo spostamento della ricerca filosofica dalla natura all’uomo, infatti vengono </text:span><text:soft-page-break/><text:span text:style-name="T5">definiti come i primi umanisti antichi. L’indagine sulla natura viene abbandonata perché le possibilità di ricerca si erano esaurite per gli strumenti di quel periodo. </text:span><text:span text:style-name="T7">E</text:span><text:span text:style-name="T5">rano esperti del sapere che giravano di città in città facendosi pagare per il proprio insegnamento, erano cioè come dei professori itineranti. I contenuti dell’insegnamento sofistico sono estremamente diversi, e molti di loro possedevano un sapere enciclopedico. Le materie principali sono quelle scientifiche, letterarie, artistico-musicali e l’arte della politica.</text:span></text:p>
      <text:p text:style-name="P18">Soprattutto viene insegnata l’arte della retorica, cioè l’arte della persuasione mediante il linguaggio, che era molto importante nelle polis. Per questo motivo vengono chiamati i “maestri della parola”.</text:p>
      <text:p text:style-name="P16">Un esempio di persuasione tramite il discorso sono i “Discorsi duplici”, un’opera in cui viene dimostrato che ad ogni affermazione vera se ne può opporre una contraria ma vera quanto la prima. I discorsi contrapposti vengono anche chiamati “antilogie”.</text:p>
      <text:p text:style-name="P16">I sofisti si rendono conto della potenza della parola come strumento di dominio sulle masse. Molto spesso l’uso delle nuove tecniche del discorso ha come scopo solo la propria affermazione personale, <text:soft-page-break/>che porta ad un uso spregiudicato della parola per la conquista del potere.</text:p>
      <text:p text:style-name="P5">La frattura tra noi e la realtà</text:p>
      <text:p text:style-name="P4">I sofisti introducono una prospettiva rivoluzionaria basata sulla frattura insanabile tra l'individuo e il mondo esterno, negando che esista un legame diretto tra il pensiero umano e la verità oggettiva. Essi sfidano le basi della filosofia tradizionale sostenendo che la realtà non possiede strutture fisse e immutabili che noi possiamo comprendere con certezza. Di conseguenza, la conoscenza non <text:span text:style-name="T18">è</text:span> un rispecchiamento dell'essere, ma piuttosto il risultato di una messa in discussione delle pretese metafisiche che vorrebbero l'uomo capace di decifrare un ordine universale. Questa <text:span text:style-name="T18">argomentazione </text:span>mira a mostrare come la nostra percezione sia intrinsecamente separata dall'oggetto, rendendo ogni pretesa di verità assoluta e oggettiva del tutto infondata.</text:p>
      <text:p text:style-name="P2">Spieghiamo meglio. Gli altri filosofi (i presocratici prima; Platone e Aristotele dopo) sono convinti che tra noi e la realtà ci sia un rapporto dato, certo. Tutto gira intorno al termine logos: logos, in greco, non significa solo pensiero, parola o linguaggio (la nostra <text:soft-page-break/>attività di esseri razionali, insomma); logos indica anche la struttura ordinata della realtà. La convinzione di fondo dei filosofi è che esista un rapporto dato, certo tra noi e la realtà che ci circonda. Se sapremo usare il nostro logos correttamente, la verità, unica e incontrovertibile, si mostrerà in tutta la sua evidenza. L’ambizione della filosofia tradizionale è scoprire il senso del mondo, mostrarne la razionalità e offrirci una guida per le nostre azioni. </text:p>
      <text:p text:style-name="P6">L’obiettivo polemico dei sofisti è precisamente questa presunta corrispondenza tra l’essere, il pensiero e il linguaggio <text:span text:style-name="T18">e ciò rappresenta </text:span>un problema filosofico d’importanza capitale.</text:p>
      <text:p text:style-name="P6">Per i sofisti è tutto più complicato: ci siamo noi e c’è il mondo, certo. Ma è sicuro che ci sia un legame tra noi e il mondo? L’intuizione dei sofisti è tutta qui: è la presa d’atto del rapporto problematico che separa noi e la realtà, i soggetti e gli oggetti. La realtà che ci circonda è sfuggente, non è dotata di senso univoco e tanto meno di un valore assoluto: è ambigua. Non si tratta dunque di estrarre un senso dalla realtà (perché non c’è nessun senso); al contrario si tratta di darle un significato e un valore – un significato e <text:soft-page-break/>un valore umano. Il mondo non è qui per noi, siamo noi a dover trovare il nostro posto in esso. E per fare questo lo strumento di cui disponiamo è il logos: inteso soltanto come pensieri, ragionamenti, parole e discorsi.</text:p>
      <text:p text:style-name="P27">Il linguaggio e la sua funzione:</text:p>
      <text:p text:style-name="P22"><text:span text:style-name="T10">La parola non ha più il </text:span><text:span text:style-name="T12">compito di descrivere la realtà</text:span></text:p>
      <text:p text:style-name="P23"><text:span text:style-name="T10">con la mediazione della ragione. La parola deve creare, </text:span><text:span text:style-name="T12">e</text:span><text:span text:style-name="T10"> può farlo perché, a dispetto della sua apparente inconsistenza, è potentissima, come spiega Gorgia </text:span><text:span text:style-name="T13">nel celebre testo “Encomio di Elena”</text:span><text:span text:style-name="T13"><text:note text:id="ftn2" text:note-class="footnote"><text:note-citation>2</text:note-citation><text:note-body><text:p text:style-name="P26"><text:span text:style-name="T20">P</text:span>er Gorgia Elena è innocente proprio perché la parola di Paride ha agito su di lei come una forza divina e irresistibile, privandola della capacità di decidere liberamente</text:p></text:note-body></text:note></text:span><text:span text:style-name="T10">: la parola è </text:span><text:span text:style-name="T15">«un grande sovrano, che con un piccolissimo corpo e invisibile porta a compimento opere divine: sa calmare la paura, eliminare il dolore, suscitare la gioia, sollevare la pietà»</text:span><text:span text:style-name="T10">. La parola può suscitare emozioni, può creare e convincere, «i</text:span><text:span text:style-name="T15">ncontrandosi con l’anima, la potenza della parola la ammalia, la persuade, la trascina con il suo incantesimo»</text:span><text:span text:style-name="T10">: </text:span><text:span text:style-name="T13">l</text:span><text:span text:style-name="T10">a parola è insomma un pharmakon, termine che in greco significa sia medicina sia veleno. Può essere usata bene o male: può essere usate bene per aiutarci a costruire un rapporto </text:span><text:soft-page-break/><text:span text:style-name="T10">vantaggioso con la realtà, aiutandoci a muoverci in essa; ma può anche essere usata male, intossicandoci, nascondendo la realtà, impedendoci di comprenderne la complessità. È una concezione rivoluzionaria del linguaggio. Di certo comunque non c’è nulla più importante che della parola, e di questo si occupano infatti i sofisti: della retorica, dell’arte di ben parlare. </text:span><text:span text:style-name="T5">Una transizione culturale fondamentale in cui la figura del filosofo classico (Detienne), dedito alla scoperta delle verità ontologiche profonde, viene soppiantata da quella del retore. Quest'ultimo non si concentra sull'essenza dell'essere, bensì sull'acquisizio</text:span><text:span text:style-name="T9">ne </text:span><text:span text:style-name="T5">di abilità oratorie e persuasive finalizzate al raggiungimento del potere sociale.</text:span></text:p>
      <text:p text:style-name="P7">Attraverso questo cambiamento, la parola smette di essere uno strumento di indagine metafisica per trasformarsi in un mezzo pratico volto al successo nel mondo umano.</text:p>
      <text:p text:style-name="P4">Si comprende così da dove nascesse la seconda accusa, quella più grave, l’accusa di essere cattivi maestri. I sofisti sono cattivi maestri perché, interessati solo a prevalere nelle discussioni, insegnano a giocare con le parole, e così facendo <text:soft-page-break/>mettono in discussione tutti i valori della città. Ma dovrebbe essere ormai chiaro che si tratta di una accusa caricaturale: i sofisti non sono certo i cantori della tradizione o i difensori di principi divini e assoluti, <text:span text:style-name="T20">m</text:span>a non sono neppure i cinici distruttori dei valori del bel tempo che fu. Quello che fanno è piuttosto promuovere una riflessione critica e condivisa sui valori che dovrebbero fondare la città. Non è questo il compito della buona filosofia, di chiedere il perché, <text:span text:style-name="T20">p</text:span>erché crediamo in certi valori e non in altri?</text:p>
      <text:p text:style-name="P4">Questo e non altro voleva significare la celebre tesi di Protagora: <text:span text:style-name="T4">«l’uomo è misura di tutte le cose, di quelle che sono come sono e di quelle che non sono come non sono»</text:span>.</text:p>
      <text:p text:style-name="P8">Questa frase è prima di tutto una difesa e una rivalutazione delle esperienze individuali di ciascuno di noi (contro la pretesa dei filosofi di essere i soli in possesso della verità). Ognuno di noi è misura, nel senso che ognuno di noi, ciascuno singolarmente preso, è giudice ultimo e inappellabile delle proprie esperienze, per cui quello che pare a ciascuno, tale è veramente per lui, e non è possibile, nel caso si crei un disaccordo, risolvere il conflitto, dando ragione a <text:soft-page-break/>uno o agli altri (se a me il vento pare caldo, per me sarà caldo; se a te pare freddo, per te sarà freddo e non ha senso contestare la legittimità di queste nostre esperienze). La vera misura non è insomma l’uomo in astratto, ma l’esperienza di ciascun singolo individuo, e ognuno ha diritto a esprimere le proprie opinioni. </text:p>
      <text:p text:style-name="P21"><text:span text:style-name="T10">La frase di Protagora apriva una declamazione con un titolo altisonante: la Verità, </text:span><text:span text:style-name="T14">m</text:span><text:span text:style-name="T10">a la conclusione di Protagora non manca di stupire: non esiste una verità assoluta e valida universalmente per tutti a cui ci si deve conformare. La verità è frantumata in tanti soggetti quanti sono i soggetti percipienti. </text:span><text:span text:style-name="T11">La visione del mondo è incentrata sul </text:span><text:span text:style-name="T16">soggettivismo radicale</text:span><text:span text:style-name="T11"> dove l’individuo funge da unico arbitro della propria realtà.</text:span></text:p>
      <text:p text:style-name="P2">Come fare a vivere, però, in un mondo in cui tutti hanno ragione? Anche di questo la tesi dell’uomo misura si occupa.</text:p>
      <text:p text:style-name="P5">Armonizzare le singole e irrepetibili esperienze:</text:p>
      <text:p text:style-name="P4"><text:span text:style-name="T21">l</text:span>’abolizione del criterio di verità non è infatti fine a se stessa, ma serve a promuovere altri criteri regolativi più facilmente applicabili nel mondo umano. Ciò che appare ad una persona per questa persona è vero: <text:soft-page-break/>ma ci sono alcune apparenze più utili e vantaggiose di altre. Ad es<text:span text:style-name="T21">empio,</text:span> nessuno può contestare il malato quando dice che il miele è amaro; ma si può concordare che è meglio essere sani che malati. E allora come il medico, il sofista è colui che è capace di ristabilire per sé e per gli altri un rapporto più vantaggioso con le cose. Il criterio che si sostituisce a quello della verità è l’utile, un criterio più debole, ma efficace per governare le azioni. A questo si dovrebbe guardare nella città, a quello che realmente aiuta la comunità a vivere e prosperare. </text:p>
      <text:p text:style-name="P4">In un contesto caratterizzato dall’assenza di verità e valori assoluti, gli uomini devono trovare insieme quei valori che garantiranno la sopravvivenza della comunità. Ognuno di noi (l’uomo come individuo) ha delle ragioni da far valere e che tutti insieme (l’uomo come umanità) possiamo e dobbiamo trovare un accordo circa ciò che è giusto o no, il bene e il male. Il problema non è quello di denigrare le esperienze individuali ricercando inesistenti verità universali. Il problema è quello di armonizzare le singole e irrepetibili esperienze di ciascuno di noi in modo più efficace: perché non ci si salva mai da soli. Anche questo fa parte della «verità» di Protagora, e in <text:soft-page-break/>questo consiste la politica. <text:span text:style-name="T21">Incidentalmente</text:span>, si noti ancora una volta l’importanza delle parole: perché solo questo abbiamo - parole, ragionamenti, discorsi - prima di ripiombare nella violenza e nella forza. Il linguaggio è un fatto politico, ed è bene imparare a padroneggiarlo, prima che altri lo facciano per noi.</text:p>
      <text:p text:style-name="P2"/>
      <text:p text:style-name="P2">Tutto considerato, la lezione dei sofisti è meno cupa di quanto non si ripeta. È un invito a farsi carico in modo critico delle proprie scelte in modo consapevole, così da costruire insieme un mondo in cui ci si possa ritrovare, uscendo dalla logica della forza. Magari non è molto per chi sperava di trovare la verità assoluta. Ma di certo non è poco.</text:p>
      <text:p text:style-name="P28">Un figura strettamente legata ai sofisti è il retore, con la sottile differenza riguardo al ruolo cuturale e alla tecnica utilizzata.</text:p>
      <text:p text:style-name="P19">l<text:span text:style-name="T22">l</text:span> sofista era un intellettuale che faceva della sapienza una professione, insegnando dietro compenso, <text:span text:style-name="T22">s</text:span>i occupava di filosofia, etica, politica e pedagogia.<text:span text:style-name="T27"> </text:span><text:span text:style-name="T28">Il suo obi</text:span><text:span text:style-name="T27">ettivo </text:span><text:span text:style-name="T28">era f</text:span><text:span text:style-name="T27">ormare il cittadino e il futuro uomo politico, fornendogli gli strumenti per avere successo nella vita pubblica attraverso il relativismo (l'idea che non esista una verità assoluta, </text:span><text:soft-page-break/><text:span text:style-name="T27">ma solo opinioni più o meno utili). Utilizzava la dialettica e l'eristica (l'arte di vincere una disputa verbale indipendentemente dalla verità). </text:span></text:p>
      <text:p text:style-name="P9">Il Retore: il "Maestro dell'Eloquenza" era propriamente l'esperto e l'insegnante di retorica, definita come "l'arte del ben parlare". <text:span text:style-name="T23">La sua sfera di competenza era focalizzata sulla struttura specifica <text:s/>del discorso: introduzione, narrazione, prove ed epilogo e sull’oratoria</text:span>. <text:span text:style-name="T23">Il suo scopo era l</text:span>a persuasione (peithó), convincere l'uditorio (in tribunale o in assemblea) utilizzando figure retoriche, ritmo e argomentazioni probabili. </text:p>
      <text:p text:style-name="P9">Oggi, entrambi i termini possono assumere una connotazione negativa: il "sofisma" indica un ragionamento falso ma apparentemente valido, mentre la "retorica" è spesso usata per descrivere un discorso vuoto o puramente decorativo. </text:p>
      <text:p text:style-name="P9">I maggiori sofisti dell'antica Grecia vengono solitamente suddivisi in due generazioni, distinte per l'approccio teorico e l'uso della retorica.</text:p>
      <text:p text:style-name="P11">I "Grandi Maestri" (Prima Generazione) <text:span text:style-name="T23">s</text:span>ono i fondatori del movimento, focalizzati sulla formazione politica e culturale del cittadino.</text:p>
      <text:p text:style-name="P10"><text:soft-page-break/><text:span text:style-name="T24">Protagora di Abdera</text:span>: Il primo e più celebre sofista, noto per il motto "l'uomo è misura di tutte le cose". Introdusse il relativismo e la tecnica dei "ragionamenti contrapposti" (Dissoi logoi).</text:p>
      <text:p text:style-name="P10"><text:span text:style-name="T24">Gorgia da Lentini</text:span><text:span text:style-name="T2">:</text:span> Maestro della retorica e del nichilismo. Sostenne l'impossibilità di conoscere o comunicare l'essere, esaltando il potere magico e persuasivo della parola.</text:p>
      <text:p text:style-name="P2"><text:span text:style-name="T24">Prodico di Ceo</text:span>: <text:span text:style-name="T26">c</text:span>elebre per i suoi studi sulla sinonimica, <text:span text:style-name="T26">analisi dei sinonimi, fondamentale per discernere le sfumature del significato </text:span>(la precisione del linguaggio) e per un'interpretazione utilitaristica della religione.</text:p>
      <text:p text:style-name="P4"><text:span text:style-name="T24">Ippia di Elide</text:span>: Polimat<text:span text:style-name="T26">e (uomo universale)</text:span> che mirava a un sapere enciclopedico e teorizzò la distinzione tra la legge naturale (physis), uguale per tutti, e la legge umana (nomos), spesso tirannica.</text:p>
      <text:p text:style-name="P5">Gli "Eristi" e Politici (Seconda Generazione)</text:p>
      <text:p text:style-name="P4">I loro successori estremizzarono il metodo dialettico, trasformandolo spesso in pura tecnica per prevalere sull'avversario (eristica). </text:p>
      <text:p text:style-name="P4"><text:span text:style-name="T24">Antifonte</text:span>: Radicò l'opposizione tra natura e legge, sostenendo l'uguaglianza naturale di tutti gli uomini.</text:p>
      <text:p text:style-name="P4"><text:soft-page-break/><text:span text:style-name="T24">Trasimaco di Calcedonia</text:span>: Famoso per aver definito la giustizia come "l'utile del più forte" nel primo libro della Repubblica di Platone.</text:p>
      <text:p text:style-name="P13"><text:span text:style-name="T24">Demostene: </text:span><text:span text:style-name="T25">È considerato il più grande oratore dell'antica Grecia, la sua storia è molto diversa da quella dei sofisti: per lui la parola non è un gioco retorico, ma un'arma di resistenza.</text:span></text:p>
      <text:p text:style-name="P12"><text:span text:style-name="T24">Crizia:</text:span> Membro dei Trenta Tiranni, considerava la religione un<text:span text:style-name="T26">a </text:span>"invenzione dei governanti" per spaventare i sudditi e far rispettare le leggi.</text:p>
      <text:p text:style-name="P12"><text:span text:style-name="T24">Callicle</text:span>: Sostenne <text:s/>il diritto <text:s/>del "migliore" a dominare</text:p>
      <text:p text:style-name="P29">sui deboli, criticando le leggi come uno strumento dei mediocri per limitare i fort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2-13T17:22:01.933855310</meta:creation-date>
    <dc:date>2026-02-15T18:22:28.288136568</dc:date>
    <dc:creator>corrado tafaro</dc:creator>
    <meta:editing-duration>PT26M49S</meta:editing-duration>
    <meta:editing-cycles>4</meta:editing-cycles>
    <meta:generator>LibreOffice/24.2.7.2$Linux_X86_64 LibreOffice_project/420$Build-2</meta:generator>
    <meta:document-statistic meta:table-count="0" meta:image-count="0" meta:object-count="0" meta:page-count="17" meta:paragraph-count="60" meta:word-count="3022" meta:character-count="19259" meta:non-whitespace-character-count="16277"/>
  </office:meta>
</office:document-meta>
</file>