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1DBC2CA1570.jpg" manifest:media-type="image/jpeg"/>
  <manifest:file-entry manifest:full-path="Pictures/100000010000012C000000352446D0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5bf61" style:font-size-asian="12pt" style:font-size-complex="12pt"/>
    </style:style>
    <style:style style:name="P2" style:family="paragraph" style:parent-style-name="Standard">
      <style:paragraph-properties fo:line-height="115%" fo:text-align="justify" style:justify-single-word="false"/>
      <style:text-properties style:font-name="Noto Sans1" fo:font-size="12pt" officeooo:paragraph-rsid="0015bf61" style:font-size-asian="12pt" style:font-size-complex="12pt"/>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style:font-size-asian="12pt" style:font-size-complex="12pt"/>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1e8d6" style:font-size-asian="12pt" style:font-size-complex="12pt"/>
    </style:style>
    <style:style style:name="P5"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6b553" style:font-size-asian="12pt" style:font-size-complex="12pt"/>
    </style:style>
    <style:style style:name="P6"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831b4" style:font-size-asian="12pt" style:font-size-complex="12pt"/>
    </style:style>
    <style:style style:name="P7"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84e08" style:font-size-asian="12pt" style:font-size-complex="12pt"/>
    </style:style>
    <style:style style:name="P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a2ae7" style:font-size-asian="12pt" style:font-size-complex="12pt"/>
    </style:style>
    <style:style style:name="P9" style:family="paragraph" style:parent-style-name="Standard">
      <style:paragraph-properties fo:line-height="115%" fo:text-align="justify" style:justify-single-word="false"/>
      <style:text-properties style:font-name="Noto Sans1" fo:font-size="12pt" fo:font-weight="bold" officeooo:paragraph-rsid="00184e08" style:font-size-asian="12pt" style:font-weight-asian="bold" style:font-size-complex="12pt" style:font-weight-complex="bold"/>
    </style:style>
    <style:style style:name="P10" style:family="paragraph" style:parent-style-name="Standard">
      <style:paragraph-properties fo:line-height="100%" fo:text-align="justify" style:justify-single-word="false"/>
      <style:text-properties style:font-name="Noto Sans1" fo:font-size="12pt" style:font-size-asian="12pt" style:font-size-complex="12pt"/>
    </style:style>
    <style:style style:name="P11" style:family="paragraph" style:parent-style-name="Standard">
      <style:paragraph-properties fo:margin-top="0.199cm" fo:margin-bottom="0cm" style:contextual-spacing="false" fo:line-height="100%" fo:text-align="justify" style:justify-single-word="false"/>
      <style:text-properties style:font-name="Noto Sans1" fo:font-size="12pt" officeooo:paragraph-rsid="001e0c8d" style:font-size-asian="12pt" style:font-size-complex="12pt"/>
    </style:style>
    <style:style style:name="P12"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ad0b4" style:font-size-asian="12pt" style:font-size-complex="12pt"/>
    </style:style>
    <style:style style:name="P13"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ad0b4" style:font-size-asian="12pt" style:font-size-complex="12pt"/>
    </style:style>
    <style:style style:name="P14"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b3838" style:font-size-asian="12pt" style:font-size-complex="12pt"/>
    </style:style>
    <style:style style:name="P15"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b3838" style:font-size-asian="12pt" style:font-size-complex="12pt"/>
    </style:style>
    <style:style style:name="P16" style:family="paragraph" style:parent-style-name="Standard">
      <style:paragraph-properties fo:margin-top="0.101cm" fo:margin-bottom="0cm" style:contextual-spacing="false" fo:line-height="115%" fo:text-align="justify" style:justify-single-word="false"/>
      <style:text-properties style:font-name="Noto Sans1" fo:font-size="12pt" style:font-size-asian="12pt" style:font-size-complex="12pt"/>
    </style:style>
    <style:style style:name="P17"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c09bf" style:font-size-asian="12pt" style:font-size-complex="12pt"/>
    </style:style>
    <style:style style:name="P1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c09bf" style:font-size-asian="12pt" style:font-size-complex="12pt"/>
    </style:style>
    <style:style style:name="P19"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84e08" style:font-size-asian="12pt" style:font-size-complex="12pt"/>
    </style:style>
    <style:style style:name="P20"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84e08" style:font-size-asian="12pt" style:font-size-complex="12pt"/>
    </style:style>
    <style:style style:name="P21"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e0c8d" style:font-size-asian="12pt" style:font-size-complex="12pt"/>
    </style:style>
    <style:style style:name="P22"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1e8d6" style:font-size-asian="12pt" style:font-size-complex="12pt"/>
    </style:style>
    <style:style style:name="P23"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6b553" style:font-size-asian="12pt" style:font-size-complex="12pt"/>
    </style:style>
    <style:style style:name="P24"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f4d7c" style:font-size-asian="12pt" style:font-size-complex="12pt"/>
    </style:style>
    <style:style style:name="P25"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f4d7c" style:font-size-asian="12pt" style:font-size-complex="12pt"/>
    </style:style>
    <style:style style:name="P26"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f4d7c" style:font-size-asian="12pt" style:font-size-complex="12pt"/>
    </style:style>
    <style:style style:name="P27" style:family="paragraph" style:parent-style-name="Standard">
      <style:paragraph-properties fo:margin-top="0.101cm" fo:margin-bottom="0cm" style:contextual-spacing="false" fo:line-height="115%" fo:text-align="center" style:justify-single-word="false"/>
      <style:text-properties style:font-name="Noto Sans1" fo:font-size="12pt" fo:font-style="italic" style:font-size-asian="12pt" style:font-style-asian="italic" style:font-size-complex="12pt" style:font-style-complex="italic"/>
    </style:style>
    <style:style style:name="P28" style:family="paragraph" style:parent-style-name="Standard">
      <style:paragraph-properties fo:margin-top="0.101cm" fo:margin-bottom="0cm" style:contextual-spacing="false" fo:line-height="115%" fo:text-align="center" style:justify-single-word="false"/>
      <style:text-properties style:font-name="Noto Sans1" fo:font-size="12pt" fo:font-style="italic" officeooo:paragraph-rsid="001ad0b4" style:font-size-asian="12pt" style:font-style-asian="italic" style:font-size-complex="12pt" style:font-style-complex="italic"/>
    </style:style>
    <style:style style:name="P29" style:family="paragraph" style:parent-style-name="Standard">
      <style:paragraph-properties fo:margin-top="0.101cm" fo:margin-bottom="0cm" style:contextual-spacing="false" fo:line-height="115%" fo:text-align="center" style:justify-single-word="false"/>
      <style:text-properties style:font-name="Noto Sans1" fo:font-size="9pt" officeooo:paragraph-rsid="001ad0b4" style:font-size-asian="9pt" style:font-size-complex="9pt"/>
    </style:style>
    <style:style style:name="P30" style:family="paragraph" style:parent-style-name="Standard">
      <style:paragraph-properties fo:margin-top="0.199cm" fo:margin-bottom="0cm" style:contextual-spacing="false" fo:line-height="115%" fo:text-align="justify" style:justify-single-word="false"/>
      <style:text-properties style:font-name="Noto Sans1" fo:font-size="11pt" fo:font-weight="bold" officeooo:paragraph-rsid="00184e08" style:font-size-asian="11pt" style:font-weight-asian="bold" style:font-size-complex="11pt" style:font-weight-complex="bold"/>
    </style:style>
    <style:style style:name="P31" style:family="paragraph" style:parent-style-name="Standard">
      <style:paragraph-properties fo:line-height="115%" fo:text-align="justify" style:justify-single-word="false"/>
      <style:text-properties style:font-name="Noto Sans1" fo:font-size="11pt" fo:font-weight="bold" style:font-size-asian="11pt" style:font-weight-asian="bold" style:font-size-complex="11pt" style:font-weight-complex="bold"/>
    </style:style>
    <style:style style:name="P32" style:family="paragraph" style:parent-style-name="Standard">
      <style:paragraph-properties fo:margin-top="0.199cm" fo:margin-bottom="0cm" style:contextual-spacing="false" fo:line-height="115%" fo:text-align="justify" style:justify-single-word="false"/>
      <style:text-properties style:font-name="Noto Sans1" fo:font-size="11pt" fo:font-weight="bold" style:font-size-asian="11pt" style:font-weight-asian="bold" style:font-size-complex="11pt" style:font-weight-complex="bold"/>
    </style:style>
    <style:style style:name="P33" style:family="paragraph" style:parent-style-name="Standard" style:list-style-name="L1">
      <style:paragraph-properties fo:margin-top="0cm" fo:margin-bottom="0cm" style:contextual-spacing="false" fo:line-height="115%" fo:text-align="justify" style:justify-single-word="false"/>
      <style:text-properties officeooo:paragraph-rsid="001c09bf"/>
    </style:style>
    <style:style style:name="P34" style:family="paragraph" style:parent-style-name="Standard" style:list-style-name="L2">
      <style:paragraph-properties fo:margin-top="0.101cm" fo:margin-bottom="0cm" style:contextual-spacing="false" fo:line-height="115%" fo:text-align="justify" style:justify-single-word="false"/>
    </style:style>
    <style:style style:name="P35" style:family="paragraph" style:parent-style-name="Standard" style:list-style-name="L3">
      <style:paragraph-properties fo:margin-top="0.101cm" fo:margin-bottom="0cm" style:contextual-spacing="false" fo:line-height="115%" fo:text-align="justify" style:justify-single-word="false"/>
      <style:text-properties officeooo:paragraph-rsid="001ef84e"/>
    </style:style>
    <style:style style:name="P36" style:family="paragraph" style:parent-style-name="Standard">
      <style:paragraph-properties fo:margin-top="0.101cm" fo:margin-bottom="0cm" style:contextual-spacing="false" fo:line-height="115%" fo:text-align="justify" style:justify-single-word="false"/>
      <style:text-properties officeooo:paragraph-rsid="001ef84e"/>
    </style:style>
    <style:style style:name="T1" style:family="text">
      <style:text-properties fo:font-style="italic" style:font-style-asian="italic" style:font-style-complex="italic"/>
    </style:style>
    <style:style style:name="T2" style:family="text">
      <style:text-properties fo:font-style="italic" officeooo:rsid="001db7c0" style:font-style-asian="italic" style:font-style-complex="italic"/>
    </style:style>
    <style:style style:name="T3" style:family="text">
      <style:text-properties fo:font-style="italic" officeooo:rsid="001ef84e" style:font-style-asian="italic" style:font-style-complex="italic"/>
    </style:style>
    <style:style style:name="T4" style:family="text">
      <style:text-properties officeooo:rsid="00140791"/>
    </style:style>
    <style:style style:name="T5" style:family="text">
      <style:text-properties officeooo:rsid="0015bf61"/>
    </style:style>
    <style:style style:name="T6" style:family="text">
      <style:text-properties officeooo:rsid="0016b553"/>
    </style:style>
    <style:style style:name="T7" style:family="text">
      <style:text-properties officeooo:rsid="001831b4"/>
    </style:style>
    <style:style style:name="T8" style:family="text">
      <style:text-properties officeooo:rsid="00184e08"/>
    </style:style>
    <style:style style:name="T9" style:family="text">
      <style:text-properties officeooo:rsid="001ad0b4"/>
    </style:style>
    <style:style style:name="T10" style:family="text">
      <style:text-properties style:font-name="Noto Sans1" fo:font-size="12pt" style:font-size-asian="12pt" style:font-size-complex="12pt"/>
    </style:style>
    <style:style style:name="T11" style:family="text">
      <style:text-properties style:font-name="Noto Sans1" fo:font-size="12pt" officeooo:rsid="001c09bf" style:font-size-asian="12pt" style:font-size-complex="12pt"/>
    </style:style>
    <style:style style:name="T12" style:family="text">
      <style:text-properties fo:font-weight="bold" style:font-weight-asian="bold" style:font-weight-complex="bold"/>
    </style:style>
    <style:style style:name="T13" style:family="text">
      <style:text-properties officeooo:rsid="001b3838"/>
    </style:style>
    <style:style style:name="T14" style:family="text">
      <style:text-properties officeooo:rsid="001c09bf"/>
    </style:style>
    <style:style style:name="T15" style:family="text">
      <style:text-properties officeooo:rsid="001ef84e"/>
    </style:style>
    <style:style style:name="T16" style:family="text">
      <style:text-properties fo:font-size="11pt" fo:font-weight="bold" style:font-size-asian="11pt" style:font-weight-asian="bold" style:font-size-complex="11pt" style:font-weight-complex="bold"/>
    </style:style>
    <style:style style:name="T17" style:family="text">
      <style:text-properties officeooo:rsid="001f4d7c"/>
    </style:style>
    <style:style style:name="T18" style:family="text">
      <style:text-properties fo:font-style="normal" style:font-style-asian="normal" style:font-style-complex="normal"/>
    </style:style>
    <style:style style:name="T19" style:family="text">
      <style:text-properties fo:font-style="normal" officeooo:rsid="001ef84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rthur Schopenhauer</text:p>
      <text:p text:style-name="P7">Schopenhauer appartiene a pieno titolo alla filosofia moderna, ma con una precisazione fondamentale: ne rappresenta contemporaneamente il culmine e la crisi profonda. Se guardiamo alla cronologia, Schopenhauer (1788-1860) vive in pieno Ottocento, il secolo dei grandi sistemi idealistici (come quello di Hegel). Tuttavia, la sua posizione è particolare perché agisce come un "ponte" verso la filosofia contemporanea.</text:p>
      <text:p text:style-name="P7">Ecco come possiamo inquadrarlo:</text:p>
      <text:p text:style-name="P30">Moderno per eredità (Kant)</text:p>
      <text:p text:style-name="P21">Schopenhauer si definisce l'unico vero erede di Immanuel Kant, il pilastro della modernità. Da lui riprende la distinzione fondamentale tra:</text:p>
      <text:p text:style-name="P11"><text:span text:style-name="T1">Fenomeno</text:span>: Il mondo come ci appare (Rappresentazione).</text:p>
      <text:p text:style-name="P7"><text:span text:style-name="T1">Noumeno</text:span>: La cosa in sé (che per Schopenhauer è la Volontà).</text:p>
      <text:p text:style-name="P7">Senza la "rivoluzione copernicana" di Kant, il sistema di Schopenhauer non esisterebbe. In questo senso, egli conclude il percorso della gnoseologia moderna.</text:p>
      <text:p text:style-name="P30">Anti-Moderno per reazione (Contro Hegel)</text:p>
      <text:p text:style-name="P20">La modernità è stata spesso il secolo della Ragione (Illuminismo) e dello Spirito (Idealismo). Schopenhauer rompe questo schema:</text:p>
      <text:p text:style-name="P7"><text:soft-page-break/><text:span text:style-name="T1">Contro l'ottimismo</text:span>: Mentre Hegel diceva che "tutto ciò che è reale è razionale", Schopenhauer risponde che la realtà è irrazionale, cieca e senza scopo.</text:p>
      <text:p text:style-name="P7"><text:span text:style-name="T1">Il pessimismo</text:span>: Introduce una visione del mondo cupa e tragica che smentisce l'idea moderna di "progresso" infinito della storia.</text:p>
      <text:p text:style-name="P30">Precursore della Filosofia Contemporanea</text:p>
      <text:p text:style-name="P20">È proprio per questo suo "tradimento" dei valori ottimisti della modernità che Schopenhauer è considerato il padre di correnti successive:</text:p>
      <text:p text:style-name="P20"><text:span text:style-name="T1">Nietzsche</text:span>: Che riprenderà il concetto di Volontà trasformandolo in "Volontà di Potenza".</text:p>
      <text:p text:style-name="P20"><text:span text:style-name="T1">Freud:</text:span> L'idea che l'uomo sia mosso da impulsi inconsci (la Volontà) anziché dalla ragione anticipa la psicoanalisi.</text:p>
      <text:p text:style-name="P20"><text:span text:style-name="T1">Esistenzialismo</text:span>: Il focus sul dolore, la noia e l'assurdità dell'esistenza sarà centrale nel Novecento.</text:p>
      <text:p text:style-name="P20"><draw:frame draw:style-name="fr1" draw:name="Immagine2" text:anchor-type="char" svg:x="1.633cm" svg:y="0.37cm" svg:width="7.936cm" svg:height="0.901cm" draw:z-index="1"><draw:image xlink:href="Pictures/100000010000012C000000352446D063.png" xlink:type="simple" xlink:show="embed" xlink:actuate="onLoad" draw:mime-type="image/png"/></draw:frame></text:p>
      <text:p text:style-name="P7">Arthur Schopenhauer, nato a Danzica nel 1788 e morto a Francoforte sul Meno nel 1860, è una delle figure più originali del pensiero moderno. Filosofo dalla personalità irrequieta e polemica, fu noto per il suo carattere litigioso, la sua insofferenza verso l’accademia <text:soft-page-break/>e la sua costante rivendicazione di indipendenza intellettuale.</text:p>
      <text:p text:style-name="P8">Fin dagli anni giovanili mostrò un temperamento insofferente all’autorità e un orgoglio che lo accompagnò per tutta la vita. Dopo aver studiato a Göttingen e a Berlino, dove seguì le lezioni di Fichte e Schleiermacher, Schopenhauer maturò una repulsione total<draw:frame draw:style-name="fr2" draw:name="Immagine1" text:anchor-type="char" svg:x="5.017cm" svg:y="3.025cm" svg:width="6.421cm" svg:height="5.946cm" draw:z-index="0"><draw:image xlink:href="Pictures/100000000000024E000001DBC2CA1570.jpg" xlink:type="simple" xlink:show="embed" xlink:actuate="onLoad" draw:mime-type="image/jpeg"/></draw:frame>e per la filosofia <text:s/>idealistica dominante, soprattutto per Hegel, che conside­rava un ciarlatano e un <text:span text:style-name="T8">e</text:span>sempio di corruzione accademica. </text:p>
      <text:p text:style-name="P8">La rivalità con Hegel toc­cò il masochismo: Scho­penhauer fissò voluta­mente le sue lezioni uni­versitarie all’orario di quelle del rivale, rimanendo poi a parlare davanti a un’aula con tre studenti. </text:p>
      <text:p text:style-name="P1">In fondo, nell’orgoglio c’era anche la sicurezza del grande borghese. Cresciuto in un ambiente cosmopolita grazie al padre, ricco commerciante con legami internazionali, viaggiò sin da giovane in Europa e coltivò la letteratura, la musica e le arti figurative. La madre, Johanna Schopenhauer, era una scrittrice di successo e <text:soft-page-break/>teneva un celebre salotto letterario a Weimar frequentato da Goethe, che esercitò una profonda influenza su Arthur, soprattutto nella riflessione sulla natura e sulla luce. La cultura di Schopenhauer non fu mai meramente filosofica: fu un pensatore letterato, capace di scrivere in uno stile limpido, elegante e tagliente, lontano dall’oscurità dell’idealismo tedesco.</text:p>
      <text:p text:style-name="P2">La sua prosa ebbe un effetto immediato sui lettori, anticipando per chiarezza e forza espressiva la scrittura saggistica moderna. Schopenhauer aspirava a essere un autore per pochi, ma il suo linguaggio, chiaro e forte, lo rese capace di raggiungere un pubblico ben più vasto di quello accademico. <text:span text:style-name="T5">Fu il</text:span> filosofo che <text:span text:style-name="T5">riuscì ad unire </text:span>l'universo letterario di Thomas Mann (in particolare nel romanzo I Buddenbrook) e il pensiero del filosofo Ludwig Wittgenstein.</text:p>
      <text:p text:style-name="P3">Schopenhauer fu riscoperto e amato da generazioni successive di lettori e pensatori che si riconobbero in lui come in un maestro spirituale (“<text:span text:style-name="T1">Schopenhauer come educatore</text:span>” si intitola un famoso saggio di Nietzsche apparso nel 1874). Il suo destino editoriale fu singolare: ignorato durante buona parte della vita (la prima edizione del suo capolavoro, <text:span text:style-name="T1">Il mondo come volontà e rappresentazione</text:span>, 1818/1819, restò in buona parte invenduta, contrariamente alla terza, del 1859), conobbe un enorme successo solo dopo la <text:soft-page-break/>pubblicazione dei Parerga e Paralipomena nel 1851, una raccolta di saggi e riflessioni morali che lo rivelò a un pubblico più vasto. Fu allora che la cultura europea cominciò a riconoscere in lui il primo grande pensatore del pessimismo moderno.</text:p>
      <text:p text:style-name="P10"/>
      <text:p text:style-name="P31">Letterature straniere</text:p>
      <text:p text:style-name="P12">Il capitolo dei Buddenbrook in cui Thomas Buddenbrook scopre Schopenhauer (leggendo proprio <text:span text:style-name="T1">Il mondo come volontà e rappresentazione</text:span>) è uno dei momenti più alti e tragici dell'intera opera di <text:span text:style-name="T13">Thomas </text:span>Mann.</text:p>
      <text:p text:style-name="P14">Nelle pagine del romanzo, la scoperta di Schopenhauer segna per Thomas Buddenbrook una rivelazione: la consapevolezza che dietro l’apparente solidità della vita borghese si cela un principio irrazionale e distruttivo, la volontà di vivere, che muove ogni cosa senza scopo e senza fine, prendendo la forma e la forza di un destino nibelungico (Wagner fu uno dei massimi estimatori di Schopenhauer). Thomas è l'uomo del "dovere", della facciata borghese, della disciplina ferrea che nasconde un vuoto interiore. Quando incontra la filosofia di Schopenhauer, avviene un ribaltamento totale. </text:p>
      <text:p text:style-name="P13">Thomas, logorato dal peso di mantenere in piedi una ditta e una famiglia in rovina, trova conforto nell'idea che la morte non sia la fine di "tutto", ma solo la fine di un'individualità dolorosa.</text:p>
      <text:p text:style-name="P28"><text:soft-page-break/>"Non è forse la morte una felicità per una personalità così tormentata come la mia?"</text:p>
      <text:p text:style-name="P29">Riflessione di Thomas Buddenbrook ispirata da Schopenhauer.</text:p>
      <text:p text:style-name="P12">Il superamento del <text:span text:style-name="T1">Principium Individuationis</text:span> <text:span text:style-name="T9">(il principio di individuazione</text:span> in Schopenhauer è lo spazio-tempo che scompone la Volontà unica e universale in molteplici enti individuali, costituendo il "velo di Maya" della rappresentazione<text:span text:style-name="T9">)</text:span> <text:span text:style-name="T9">p</text:span>ermette di distinguere le cose, nascondendo però l'essenza unitaria del mond<text:span text:style-name="T9">o.</text:span></text:p>
      <text:p text:style-name="P12">Leggendo Schopenhauer, Thomas capisce che il suo "io" (il senatore Buddenbrook, il commerciante, il padre) è solo un'illusione, un frammento della Volontà universale. Morire significa tornare a far parte del Tutto, liberandosi dalle catene del nome e del ruolo sociale.</text:p>
      <text:p text:style-name="P12">La vita è vista come un pendolo tra dolore e noia. La filosofia gli offre la "giustificazione" intellettuale per smettere di lottare.</text:p>
      <text:p text:style-name="P15">Per Thomas, Schopenhauer non è solo una lettura, ma una rivelazione liberatoria che arriva nel momento del suo massimo declino fisico e psicologico. </text:p>
      <text:p text:style-name="P15"><text:span text:style-name="T13">Thomas Mann ammira la profondità metafisica del filosofo, ma come scrittore è troppo legato alla realtà materiale e borghese per accettarne fino in fondo la soluzione finale (l'ascesi e il nulla). </text:span><text:span text:style-name="T14">Qui si manifesta il</text:span> paradosso di Mann, <text:span text:style-name="T14">i</text:span>n particolare, nei Buddenbrook, il paradosso si articola su tre live<text:span text:style-name="T14">lli:</text:span></text:p>
      <text:list text:style-name="L1">
        <text:list-item>
          <text:p text:style-name="P33"><text:soft-page-break/><text:span text:style-name="T11">L'estasi intellettuale vs. La miseria fisica</text:span></text:p>
        </text:list-item>
      </text:list>
      <text:p text:style-name="P17"><text:span text:style-name="T14">T</text:span>homas Buddenbrook vive una notte di illuminazione quasi mistica leggendo Schopenhauer. Si sente un gigante, un essere eterno che ha sconfitto la morte attraverso la conoscenza.</text:p>
      <text:p text:style-name="P15"><text:span text:style-name="T1">Il paradosso</text:span>: Questa grandezza spirituale non lo salva minimamente dalla realtà biologica. Poco dopo aver "vinto la morte" col pensiero, Thomas muore per un banale ascesso a un dente, crollando nel fango della strada in modo umiliante. Mann ci dice che la filosofia può consolare l'anima, ma non può nulla contro il decadimento della carne.</text:p>
      <text:list text:style-name="L2">
        <text:list-item>
          <text:p text:style-name="P34"><text:span text:style-name="T10">Sensibilità come sintomo di morte</text:span></text:p>
        </text:list-item>
      </text:list>
      <text:p text:style-name="P18">Per Schopenhauer, la conoscenza è la via per la liberazione. Per Mann, invece, l'acquisto di sensibilità e cultura filosofica è il segno della fine.</text:p>
      <text:p text:style-name="P18"><text:span text:style-name="T1">Il paradosso</text:span>: Più i membri della famiglia Buddenbrook diventano raffinati, colti e sensibili (come Thomas e il piccolo Hanno), più diventano inadatti alla vita. La forza vitale (la Volontà) appartiene ai personaggi rozzi, pratici e "ignoranti". In Mann, la profondità intellettuale è un fiore che sboccia solo su un organismo che sta morendo. </text:p>
      <text:list text:style-name="L3">
        <text:list-item>
          <text:p text:style-name="P35"><text:span text:style-name="T10">L'ironia verso la "Nolontà"</text:span></text:p>
        </text:list-item>
      </text:list>
      <text:p text:style-name="P36"><text:soft-page-break/><text:span text:style-name="T10">Schopenhauer predica l'ascesi come distacco sereno. Mann, con la suatipica ironia, mostra che per un borghese di Lubecca il distacco totale è impossibile.</text:span></text:p>
      <text:p text:style-name="P3"><text:span text:style-name="T1">l</text:span><text:span text:style-name="T2">l</text:span><text:span text:style-name="T1"> paradosso</text:span>: Thomas Buddenbrook prova a negare la volontà di vivere, ma rimane un uomo ossessionato dall'aspetto esteriore, dai guanti puliti e dalla reputazione della ditta. La sua "ascesi" è solo un pensiero elegante che non riesce a scalfire la sua natura di uomo d'affari sconfitto.</text:p>
      <text:p text:style-name="P3">Il paradosso di Mann consiste nel vedere la filosofia di Schopenhauer come una malattia affascinante. Non è una via di salvezza per tutti, ma il "canto del cigno" di una classe sociale (la borghesia) che ha finito la sua energia vitale e può solo contemplare la propria fine con dignità intellettuale.</text:p>
      <text:p text:style-name="P27">"L'anima è un lusso che la biologia non sempre può permettersi."</text:p>
      <text:p text:style-name="P3">Allo stesso modo, <text:span text:style-name="T16">Ludwig Wittgenstein</text:span> trovò in Schopenhauer un maestro spirituale, riconoscendo nella distinzione schopenhaueriana tra mondo come rappresentazione e mondo come volontà, un’anticipazione del proprio dualismo tra il dire e il mostrare, tra ciò che il linguaggio può esprimere e ciò che resta indicibile. Ed è attraverso Schopenhauer che Wittgenstein maturò la convinzione che la filosofia non possa spiegare il mondo, ma solo chiarirne i limiti, <text:soft-page-break/>lasciando spazio al silenzio, alla mistica, all’etica e all’arte come luoghi di redenzione dal non senso della vita.</text:p>
      <text:p text:style-name="P3"><text:span text:style-name="T1">La radicalizzazione di Kant</text:span>: dal fenomeno alla rappresentazione, dal noumeno alla volontà</text:p>
      <text:p text:style-name="P3">Il mondo come volontà e rappresentazione è il punto culminante della tradizione critica inaugurata da Kant, ma anche una sua radicale trasformazione. Schopenhauer eredita da Kant la distinzione tra <text:span text:style-name="T1">fenomeno</text:span> e <text:span text:style-name="T1">noumeno</text:span>, ma la rielabora per intero. Per Kant, il fenomeno è il mondo quale appare al soggetto attraverso le forme a priori della sensibilità e dell’intelletto, mentre il noumeno è la realtà in sé, inconoscibile. Schopenhauer accetta questa distinzione, ma le dà un significato nuovo. Il mondo è rappresentazione: tutto ciò che esiste per noi esiste solo in quanto appare a un soggetto che conosce. Lo spazio, il tempo e la causalità non sono proprietà delle cose, bensì modalità attraverso cui la mente ordina i dati dell’esperienza. </text:p>
      <text:p text:style-name="P3">Sin qui, Schopenhauer è pienamente kantiano. Ma la sua vera originalità sta nella risposta alla domanda: che cos’è il noumeno? Se il fenomeno è rappresentazione, il noumeno, ossia la realtà in sé, deve essere qualcosa di completamente diverso dal mondo dell’apparenza. E tuttavia, Schopenhauer rifiuta l’idea che il noumeno sia totalmente inconoscibile: ritiene anzi che, almeno in un <text:soft-page-break/>punto, noi possiamo avere accesso diretto alla cosa in sé. Questo punto è il corpo. Quando agiamo, non percepiamo il nostro corpo solo come oggetto nel mondo, ma lo viviamo anche dall’interno, come impulso, desiderio, forza. Da questa esperienza immediata, Schopenhauer deduce che la realtà noumenica non è né pensiero né materia, ma volontà: un impulso cieco, irrazionale e incessante, che si manifesta in tutte le forme dell’essere.</text:p>
      <text:p text:style-name="P3">Ogni desiderio, una volta soddisfatto, ne genera uno nuovo, e l’esistenza si riduce a un alternarsi di sofferenza e noia.</text:p>
      <text:p text:style-name="P3">Così, il mondo intero appare come espressione della volontà di vivere: la natura, gli animali, gli esseri umani, tutto è mosso da una tensione senza fine verso la conservazione e la riproduzione. La volontà non ha scopo né direzione: vuole e basta. E il dolore, così universale, nasce proprio dalla incontentabilità del volere. Ogni desiderio, una volta soddisfatto, ne genera uno nuovo, e l’esistenza si riduce a un alternarsi di sofferenza e noia. In questa prospettiva, l’ottimismo degli idealisti, e poi di Marx, si capovolge in pessimismo: la realtà non è razionale, come voleva Hegel, ma assurda e cieca, così come lo sarà per tanti autori che hanno contato molto per il pensiero moderno: sopra <text:soft-page-break/>tutti, Nietzsche e Freud, e, nel nostro secolo, Camus o Sartre. </text:p>
      <text:p text:style-name="P32">Liberarsi dalla volontà</text:p>
      <text:p text:style-name="P4">Se la volontà è la radice della sofferenza, la salvezza può consistere solo nella sua sospensione o negazione. Schopenhauer elabora, su questo punto, una filosofia della liberazione aperta verso l’Oriente, ispirandosi esplicitamente al buddhismo e all’induismo (conosciuti non nel loro volto filosofico, ma in quello poetico, le Upanishad), e vedendo nella noluntas <text:span text:style-name="T4">(</text:span>rinuncia al volere<text:span text:style-name="T4">)</text:span> il cammino verso la redenzione. La liberazione non è un atto volontaristico (la volontà è il male), ma un processo di conoscenza: comprendere che la volontà è la fonte del dolore significa cominciare a distaccarsene. </text:p>
      <text:p text:style-name="P22">Tre vie principali conducono a questo distacco: l’arte, la morale e l’ascesi. </text:p>
      <text:p text:style-name="P23">L'arte è la prima tappa, ma è solo un conforto temporaneo. </text:p>
      <text:p text:style-name="P23">Quando contempliamo un'opera d'arte, smettiamo di guardare gli oggetti come strumenti per i nostri bisogni e iniziamo a vederli come Idee eterne.</text:p>
      <text:p text:style-name="P5">L'individuo si trasforma in "puro occhio del mondo". Per un istante, il tempo si ferma e il dolore svanisce.</text:p>
      <text:p text:style-name="P5">Schopenhauer pone la tragedia ai vertici delle arti visive perché mette in scena il dolore dell'esistenza, ma la <text:soft-page-break/>musica occupa un posto a parte: essa non copia le Idee, ma è l'immagine della Volontà stessa.</text:p>
      <text:p text:style-name="P5">È un "breve incantesimo". Appena l'estasi finisce, torniamo a essere schiavi dei nostri desideri. </text:p>
      <text:p text:style-name="P5">L’arte consente di contemplare il mondo senza desiderio, <text:span text:style-name="T6">l</text:span>’arte, soprattutto la musica in quanto è pura espressione della volontà senza rappresentazione, consente di contemplare il mondo senza desiderio, di cogliere le forme pure della realtà al di là dell’utile e del bisogno. Nell’esperienza estetica, il soggetto si dimentica di sé e diventa «puro soggetto del conoscere»: in questo stato di sospensione, la volontà tace, e l’individuo sperimenta un momentaneo riscatto dalla sofferenza. </text:p>
      <text:p text:style-name="P24"><text:span text:style-name="T17">L</text:span>a morale implica un impegno nel mondo <text:span text:style-name="T17">(m</text:span>entre l'arte è una contemplazione distaccata<text:span text:style-name="T17">)</text:span></text:p>
      <text:p text:style-name="P25">Essa nasce dalla compassione (Mitleid), ovvero il "patire insieme". L'uomo morale riconosce che la distinzione tra sé e gli altri è solo un'illusione (il Velo di Maya). Capisce che il carnefice e la vittima sono in realtà la stessa Volontà che si lacera da sola. Si esprime attraverso la giustizia (non fare il male) e la carità (fare il bene attivamente). La morale limita il dolore del mondo, ma non annulla la Volontà di vivere alla radice. La morale, fondata sulla compassione, rappresenta invece la presa di coscienza che l’altro è nostro fratello nel dolore di una <text:soft-page-break/>volontà insoddisfatta. Attraverso la pietà, l’uomo riconosce la comune radice del dolore e si libera, in parte, dall’egoismo che alimenta la volontà.</text:p>
      <text:p text:style-name="P26"><text:span text:style-name="T19">L</text:span><text:span text:style-name="T18">’ascesi è la forma più radicale di liberazione, </text:span>consiste nella rinuncia ai desideri, al piacere e alla volontà stessa di vivere. L’asceta, come il santo o il mistico, raggiunge lo stato di quiete che Schopenhauer descrive come «negazione della volontà», un ritorno al nulla non come nichilismo, ma come pace assoluta. Questo nulla non è negazione dell’essere, ma del dolore. È il silenzio dopo il tumulto, la calma dopo il tormento, la capitolazione senza riserve rispetto alle proprie illusioni e alle proprie ambizioni sbagliate. L'ascesi è l'unica via che porta alla liberazione definitiva, <text:span text:style-name="T7">a</text:span>ttraverso la castità, la povertà volontaria e il digiuno, l'asceta mortifica il corpo, che è la manifestazione massima della Volontà.</text:p>
      <text:p text:style-name="P6">Se la Volontà viene negata in un solo individuo, essa viene colpita alla radice. L'obiettivo è lo stato di Nirvana: non un nulla assoluto, ma un nulla relativo al mondo fenomenico. Per chi ha raggiunto l'ascesi, questo mondo fatto di desideri e sofferenza diventa "nul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3-25T17:33:41.351912612</meta:creation-date>
    <dc:date>2026-03-28T17:23:18.814358213</dc:date>
    <dc:creator>corrado tafaro</dc:creator>
    <meta:editing-duration>PT1H23M42S</meta:editing-duration>
    <meta:editing-cycles>8</meta:editing-cycles>
    <meta:generator>LibreOffice/24.2.7.2$Linux_X86_64 LibreOffice_project/420$Build-2</meta:generator>
    <meta:document-statistic meta:table-count="0" meta:image-count="2" meta:object-count="0" meta:page-count="13" meta:paragraph-count="64" meta:word-count="2402" meta:character-count="15658" meta:non-whitespace-character-count="13310"/>
  </office:meta>
</office:document-meta>
</file>